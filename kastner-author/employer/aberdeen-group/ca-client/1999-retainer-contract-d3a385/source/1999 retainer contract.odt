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</office:font-face-decls>
  <office:automatic-styles>
    <style:style style:name="P1" style:family="paragraph" style:parent-style-name="Aberadd">
      <style:paragraph-properties fo:margin-left="-0.0752in" fo:margin-right="0in" fo:line-height="0.1945in" fo:text-indent="0.0752in" style:auto-text-indent="false"/>
    </style:style>
    <style:style style:name="P2" style:family="paragraph" style:parent-style-name="Aberadd">
      <style:paragraph-properties fo:margin-left="-0.0752in" fo:margin-right="0in" fo:line-height="0.1945in" fo:text-indent="0.0752in" style:auto-text-indent="false"/>
      <style:text-properties style:font-name="Garamond" fo:font-size="13pt" fo:font-weight="bold" style:font-size-asian="13pt" style:font-weight-asian="bold" style:font-name-complex="Garamond"/>
    </style:style>
    <style:style style:name="P3" style:family="paragraph" style:parent-style-name="Aberadd">
      <style:paragraph-properties fo:margin-left="-0.0752in" fo:margin-right="0in" fo:line-height="0.1945in" fo:text-indent="0.0752in" style:auto-text-indent="false"/>
      <style:text-properties style:font-name="Garamond" fo:font-size="13pt" fo:font-style="normal" fo:font-weight="bold" style:font-size-asian="13pt" style:font-style-asian="normal" style:font-weight-asian="bold" style:font-name-complex="Garamond"/>
    </style:style>
    <style:style style:name="P4" style:family="paragraph" style:parent-style-name="Header">
      <style:text-properties style:font-name="Garamond" fo:font-size="13pt" fo:font-weight="bold" style:font-size-asian="13pt" style:font-weight-asian="bold" style:font-name-complex="Garamond"/>
    </style:style>
    <style:style style:name="P5" style:family="paragraph" style:parent-style-name="Heading_20_1">
      <style:text-properties fo:font-style="italic" style:font-style-asian="italic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line-height="93%">
        <style:tab-stops>
          <style:tab-stop style:position="-0.5in"/>
        </style:tab-stops>
      </style:paragraph-properties>
      <style:text-properties fo:font-size="12pt" style:font-size-asian="12pt"/>
    </style:style>
    <style:style style:name="P8" style:family="paragraph" style:parent-style-name="Standard" style:list-style-name="">
      <style:paragraph-properties fo:line-height="93%">
        <style:tab-stops>
          <style:tab-stop style:position="-0.5in"/>
        </style:tab-stops>
      </style:paragraph-properties>
      <style:text-properties fo:font-size="12pt" style:font-size-asian="12pt"/>
    </style:style>
    <style:style style:name="P9" style:family="paragraph" style:parent-style-name="Standard" style:list-style-name="">
      <style:paragraph-properties fo:margin-right="0in" fo:text-indent="0.5in" style:auto-text-indent="false"/>
      <style:text-properties fo:font-size="12pt" fo:font-weight="bold" style:font-size-asian="12pt" style:font-weight-asian="bold"/>
    </style:style>
    <style:style style:name="P10" style:family="paragraph" style:parent-style-name="Standard" style:list-style-name="">
      <style:paragraph-properties fo:margin-left="0.25in" fo:margin-right="0in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margin-right="0in" fo:text-indent="0.5in" style:auto-text-indent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.25in" fo:margin-right="0in" fo:text-indent="-0.25in" style:auto-text-indent="false"/>
      <style:text-properties fo:font-weight="bold" style:font-weight-asian="bold"/>
    </style:style>
    <style:style style:name="P13" style:family="paragraph" style:parent-style-name="Standard" style:list-style-name="">
      <style:paragraph-properties fo:margin-left="0.25in" fo:margin-right="0in" fo:text-indent="-0.25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.25in" fo:margin-right="0in" fo:text-indent="-0.25in" style:auto-text-indent="false"/>
    </style:style>
    <style:style style:name="P15" style:family="paragraph" style:parent-style-name="Standard" style:list-style-name="">
      <style:paragraph-properties fo:margin-right="0in" fo:text-indent="0.5in" style:auto-text-indent="false"/>
    </style:style>
    <style:style style:name="P16" style:family="paragraph" style:parent-style-name="Standard">
      <style:paragraph-properties fo:line-height="93%">
        <style:tab-stops>
          <style:tab-stop style:position="-0.5in"/>
        </style:tab-stops>
      </style:paragraph-properties>
    </style:style>
    <style:style style:name="P17" style:family="paragraph" style:parent-style-name="Standard">
      <style:paragraph-properties fo:margin-top="0.25in" fo:margin-bottom="0in" style:contextual-spacing="false" fo:orphans="0" fo:widows="0"/>
    </style:style>
    <style:style style:name="P18" style:family="paragraph" style:parent-style-name="Text_20_body_20_indent">
      <style:paragraph-properties fo:margin-left="0.25in" fo:margin-right="0in" fo:text-indent="-0.25in" style:auto-text-indent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fo:font-weight="bold" style:font-size-asian="12pt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808000" loext:opacity="100%" fo:letter-spacing="-0.0016in" style:letter-kerning="true"/>
    </style:style>
    <style:style style:name="T9" style:family="text">
      <style:text-properties fo:color="#808000" loext:opacity="100%" style:font-name="Garamond" fo:font-size="22pt" fo:letter-spacing="-0.0016in" fo:font-weight="bold" style:letter-kerning="true" style:font-size-asian="22pt" style:font-weight-asian="bold" style:font-name-complex="Garamond"/>
    </style:style>
    <style:style style:name="T10" style:family="text">
      <style:text-properties fo:color="#808000" loext:opacity="100%" style:font-name="Garamond" fo:font-size="22pt" fo:letter-spacing="-0.0016in" fo:font-style="italic" fo:font-weight="bold" style:letter-kerning="true" style:font-size-asian="22pt" style:font-style-asian="italic" style:font-weight-asian="bold" style:font-name-complex="Garamond"/>
    </style:style>
    <style:style style:name="T11" style:family="text">
      <style:text-properties fo:color="#808000" loext:opacity="100%" style:font-name="Garamond" fo:letter-spacing="-0.0016in" fo:font-weight="bold" style:letter-kerning="true" style:font-weight-asian="bold" style:font-name-complex="Garamond"/>
    </style:style>
    <style:style style:name="T12" style:family="text">
      <style:text-properties style:font-name="Garamond" fo:font-size="13pt" fo:font-style="normal" fo:font-weight="bold" style:font-size-asian="13pt" style:font-style-asian="normal" style:font-weight-asian="bold" style:font-name-complex="Garamond"/>
    </style:style>
    <style:style style:name="T13" style:family="text">
      <style:text-properties style:font-name="Garamond" fo:font-size="13pt" fo:font-weight="bold" style:font-size-asian="13pt" style:font-weight-asian="bold" style:font-name-complex="Garamond"/>
    </style:style>
    <style:style style:name="T14" style:family="text">
      <style:text-properties style:font-name="Symbol" fo:font-size="13pt" fo:font-weight="bold" style:font-name-asian="Symbol" style:font-size-asian="13pt" style:font-weight-asian="bold" style:font-name-complex="Symbol"/>
    </style:style>
    <style:style style:name="Sect1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November 20, 1998</text:p>
      <text:p text:style-name="P6"/>
      <text:p text:style-name="P6">Mr. Herb Siegel</text:p>
      <text:p text:style-name="P6">Vice President, Analyst Relations</text:p>
      <text:p text:style-name="P6">Computer Associates International, Inc.</text:p>
      <text:p text:style-name="P6">One Computer Associates Plaza</text:p>
      <text:p text:style-name="P6">Islandia, NY 11788-7000</text:p>
      <text:p text:style-name="P6"/>
      <text:p text:style-name="P6">Dear Herb:</text:p>
      <text:p text:style-name="P6"/>
      <text:p text:style-name="P6">Thank you for your continued interest and support. <text:s/>Per our discussions, Aberdeen Group is pleased to present the following proposal of five Retainer Services for your consideration.</text:p>
      <text:p text:style-name="Standard"><text:span text:style-name="T1"><text:line-break/></text:span><text:span text:style-name="T2">Background</text:span></text:p>
      <text:p text:style-name="Standard"><text:span text:style-name="T1">Aberdeen Group offers both Consulting Services </text:span><text:span text:style-name="T3">and</text:span><text:span text:style-name="T1"> Strategic Analysis Retainer Services. <text:s/>As you know from your experience with us, our Consulting Services range from White Papers, Market Surveys and Sales Force Education Seminars to extensive Management Consulting Engagements. <text:s/>However, you may not be as familiar with our Retainer Services that are listed here by Knowledge Center:</text:span></text:p>
      <text:p text:style-name="P6"/>
      <text:section text:style-name="Sect1" text:name="Section1">
        <text:h text:style-name="P13" text:outline-level="1">Network Services</text:h>
        <text:p text:style-name="P14">· Information Security</text:p>
        <text:p text:style-name="P14">· Internet Infrastructures </text:p>
        <text:p text:style-name="P14">- Application Development and Strategic Data Management</text:p>
        <text:p text:style-name="Standard">- Middleware</text:p>
        <text:p text:style-name="P14">· Network Operating Systems (NOS)</text:p>
        <text:p text:style-name="P14">· Systems and Network Management</text:p>
        <text:p text:style-name="P12"/>
        <text:h text:style-name="P13" text:outline-level="1">Professional Services</text:h>
        <text:p text:style-name="P14">· Electronic Commerce</text:p>
        <text:p text:style-name="P14">· Enterprise Resource Planning (ERP)</text:p>
        <text:p text:style-name="P14">· NT Systems</text:p>
        <text:p text:style-name="P14"/>
        <text:h text:style-name="P13" text:outline-level="1">Industry Services</text:h>
        <text:p text:style-name="Standard">- Utilities, Healthcare and Retail</text:p>
        <text:p text:style-name="Standard"/>
        <text:h text:style-name="P13" text:outline-level="1">Year 2000</text:h>
        <text:p text:style-name="Standard"><text:s/>- Year 2000</text:p>
        <text:p text:style-name="Standard"/>
        <text:h text:style-name="P13" text:outline-level="1">Enterprise Business Applications</text:h>
        <text:p text:style-name="P14">· Customer Integration Software (CIS)</text:p>
        <text:p text:style-name="P14">· Data Knowledge and Complex Decision Support (CDS)</text:p>
        <text:p text:style-name="P14">· Electronic Commerce</text:p>
        <text:p text:style-name="P14">· Enterprise Resource Planning (ERP)</text:p>
        <text:p text:style-name="P12"/>
        <text:h text:style-name="P13" text:outline-level="1">Networking and Telecommunications</text:h>
        <text:p text:style-name="Standard"><text:s/>- Networking and Telecommunications</text:p>
        <text:p text:style-name="Standard"/>
        <text:h text:style-name="P13" text:outline-level="1">Systems Platforms and Architectures</text:h>
        <text:p text:style-name="P14">· Enterprise Hardware Architectures</text:p>
        <text:p text:style-name="P14">- Midrange Computing</text:p>
        <text:p text:style-name="P14">· Storage Management</text:p>
        <text:p text:style-name="P14">· NT Servers</text:p>
        <text:p text:style-name="P18">- Workstation, Network Computer &amp; Desktop Environments</text:p>
        <text:p text:style-name="Standard"/>
      </text:section>
      <text:section text:style-name="Sect2" text:name="Section2">
        <text:h text:style-name="P5" text:outline-level="1"><text:soft-page-break/>Retainer Service Components</text:h>
        <text:p text:style-name="P6">Each of the Aberdeen Group Retainer Services offers the following components:</text:p>
        <text:p text:style-name="P6"/>
        <text:h text:style-name="P9" text:outline-level="1">Two Days of Consulting</text:h>
        <text:p text:style-name="P6">The specific nature of Aberdeen’s two full-day consulting sessions may be outlined in any manner the client deems appropriate.</text:p>
        <text:p text:style-name="P11"/>
        <text:h text:style-name="P9" text:outline-level="1">Quarterly Briefings</text:h>
        <text:p text:style-name="P6">An Aberdeen analyst takes part in quarterly interactive one-hour sessions that review recent market developments, identify what to expect from the upcoming quarter, and provide recommendations on market strategy and messages.</text:p>
        <text:p text:style-name="P11"/>
        <text:h text:style-name="P15" text:outline-level="1"><text:span text:style-name="T5">Strategic Inquiry Service</text:span><text:span text:style-name="T1"> </text:span></text:h>
        <text:p text:style-name="Standard"><text:span text:style-name="T1">Aberdeen’s Retainer Services include </text:span><text:span text:style-name="T4">unlimited</text:span><text:span text:style-name="T1"> client interaction via telephone or e-mail with one or more Aberdeen analysts. <text:s/>Strategic inquiry is designed to address the need for urgent review industry trends and issues as well analyze the latest breaking news. <text:s/></text:span></text:p>
        <text:p text:style-name="P6"/>
        <text:h text:style-name="P15" text:outline-level="1"><text:span text:style-name="T5">Practice Summary</text:span><text:span text:style-name="T1"> </text:span></text:h>
        <text:p text:style-name="P6">Invaluable documentation that includes high-level market analysis and encapsulates the most important market issues and trends. <text:s/>Practice Summaries are the perfect tool to get those that are new to the industry quickly up to speed.</text:p>
        <text:p text:style-name="P6"/>
        <text:h text:style-name="P9" text:outline-level="1">Major Research Reports </text:h>
        <text:p text:style-name="P6">Many of Aberdeen Group’s Practice Centers write at least one major research report within a twelve month period. <text:s/>As a client of a Practice Center’s Retainer Service, you have access to any major research report produced by Practice Centers in the services that you retain.</text:p>
        <text:p text:style-name="P6"/>
        <text:h text:style-name="P9" text:outline-level="1">Viewpoints </text:h>
        <text:p text:style-name="P6">Aberdeen Viewpoints present Aberdeen analysts’ opinions on the market and business dynamics of current industry issues. As a client of a Practice Center’s Retainer Service, you have access to all Viewpoints produced by Practice Centers in the services that you retain.</text:p>
        <text:p text:style-name="P6"/>
        <text:h text:style-name="P9" text:outline-level="1">Profiles </text:h>
        <text:p text:style-name="P6">Aberdeen Profiles present objective analyses of suppliers and their products and strategies. As a client of a Practice Center’s Retainer Service, you have access to all Profiles produced by Practice Centers in the services that you retain.</text:p>
        <text:p text:style-name="P6"><text:soft-page-break/></text:p>
        <text:p text:style-name="P6">The annual fee for each Strategic Analysis Retainer Service is $15,000 and includes provisions for two client interfaces.</text:p>
        <text:h text:style-name="P5" text:outline-level="1">A Tailored Response to Computer Associates Unique Needs</text:h>
        <text:p text:style-name="P6">In on-going discussions, you requested tailored response to meet the unique requirements at Computer Associates. <text:s/>We agreed to the following.</text:p>
        <text:p text:style-name="P6"/>
        <text:p text:style-name="P6">In our discussions Computer Associates requested that Peter Kastner prioritize the services that he thought would be of most value to Computer Associates. <text:s/>The five services Peter suggested are:</text:p>
        <text:p text:style-name="P6"/>
        <text:h text:style-name="P10" text:outline-level="1">Application Development and Strategic Data Management</text:h>
        <text:h text:style-name="P10" text:outline-level="1">Systems and Network Management</text:h>
        <text:h text:style-name="P10" text:outline-level="1">Information Security</text:h>
        <text:h text:style-name="Heading_20_2" text:outline-level="2">Internet Infrastructure</text:h>
        <text:h text:style-name="Heading_20_2" text:outline-level="2">Professional Services</text:h>
        <text:p text:style-name="P6"/>
        <text:p text:style-name="Standard"><text:span text:style-name="T2">Strategic, highly consultative analysis</text:span><text:span text:style-name="T1"> is a key differentiating factor of Aberdeen Group’s Retainer services. <text:s/>In addition to maintaining a very low client to analyst ratio, each of our Retainer Services clients has a senior analyst assigned by practice area to manage the relationship and tailor service activities according to the client’s individual needs </text:span><text:span text:style-name="T4">including </text:span><text:span text:style-name="T2">written responses</text:span><text:span text:style-name="T4"> to, or assessments of client interactions</text:span><text:span text:style-name="T1">. <text:s/>(See Attached Aberdeen Biographies for the analysts assigned to the five services listed above.) <text:s/></text:span></text:p>
        <text:p text:style-name="P6"/>
        <text:p text:style-name="P6">Peter Kastner will continue to manage the overall consulting relationship with Computer Associates with each of the analysts directing activities within their assigned areas.</text:p>
        <text:p text:style-name="P6"/>
        <text:h text:style-name="P5" text:outline-level="1">Reduction in Number of Consulting Days</text:h>
        <text:p text:style-name="P6">A key issue that you raised in regard to our standard Retainer Service configuration is that Consulting Days and multiple Quarterly Briefings are difficult to absorb at Computer Associates. <text:s/>To address your requirement, we have reconfigured the five services you selected. <text:s/>Instead of two consulting days and four quarterly briefings per service, we propose one consulting day and semi-annual (twice a year) briefings. <text:s/></text:p>
        <text:p text:style-name="P6"/>
        <text:p text:style-name="P6">The special fee per service is $9,000. <text:s/>The new annual fee for five services is $45,000 with invoices of $11,250 per quarter (4 * $11,250 = $45,000).</text:p>
        <text:p text:style-name="P6"/>
        <text:p text:style-name="P6"><text:soft-page-break/>The fees quoted here are based on a minimum of five services. <text:s/>The proposal is valid until December 21, 1998. <text:s/>If additional consulting days are required, Computer Associates can commission additional days as needed on a project per project basis .</text:p>
        <text:p text:style-name="P6"/>
        <text:h text:style-name="P5" text:outline-level="1">Intranet Access Option</text:h>
        <text:p text:style-name="P6">We have included the right for C/A employees to access the research from these five services via the Internet. <text:s/></text:p>
        <text:p text:style-name="P6"/>
        <text:p text:style-name="P16"><text:span text:style-name="T5">Research</text:span><text:span text:style-name="T1">:</text:span></text:p>
        <text:p text:style-name="P7">During the course of the contract each of the five services will write either an Impact or a Profile covering a Computer Associates product, service or strategy. <text:s/></text:p>
        <text:p text:style-name="P7"/>
        <text:h text:style-name="P5" text:outline-level="1">License for Posting on the World-Wide-Web and Paper Reprints</text:h>
        <text:p text:style-name="P7">As part of this proposal we are including special rates for purchasing Internet License for posting for external viewing and paper reprint orders (See Attachment). <text:s/></text:p>
        <text:p text:style-name="P7"/>
        <text:p text:style-name="P16"><text:span text:style-name="T2">Acceptance</text:span><text:span text:style-name="T5"><text:line-break/></text:span><text:span text:style-name="T1">Aberdeen Group will accept a signed copy of this letter as a contractual document authorizing the five services. <text:s/>Alternatively, we will accept a verbal purchase order authorizing us to proceed, followed by your written purchase order. </text:span></text:p>
        <text:p text:style-name="P7"/>
        <text:p text:style-name="P7">Thank you again for the opportunity to offer our services to Computer Associates. <text:s/>Please call me at (617) 854-5231 with any questions.</text:p>
        <text:p text:style-name="P7"/>
        <text:p text:style-name="P7">Sincerely,</text:p>
        <text:p text:style-name="P7"/>
        <text:p text:style-name="P7"/>
        <text:p text:style-name="P7"/>
        <text:h text:style-name="P8" text:outline-level="1">Fred H. Abbott</text:h>
        <text:p text:style-name="P7">Senior Vice President</text:p>
        <text:p text:style-name="P7">Aberdeen Group, Inc.</text:p>
        <text:p text:style-name="P7"/>
        <text:p text:style-name="Text_20_body">Accepted by Computer Associates International:</text:p>
        <text:p text:style-name="Text_20_body"/>
        <text:p text:style-name="Text_20_body"/>
        <text:p text:style-name="P7"><text:tab/><text:tab/>____________________________<text:line-break/><text:tab/><text:tab/>(Signature)<text:line-break/></text:p>
        <text:p text:style-name="P7"><text:tab/><text:tab/>____________________________<text:line-break/> <text:s text:c="19"/><text:tab/>(Printed Name)</text:p>
        <text:p text:style-name="Text_20_body"><text:soft-page-break/><text:tab/><text:tab/>____________________________<text:line-break/><text:tab/><text:tab/>(Title)</text:p>
        <text:p text:style-name="P7"><text:tab/><text:tab/>____________________________<text:line-break/><text:tab/><text:tab/>(Date)</text:p>
        <text:p text:style-name="P7"/>
        <text:p text:style-name="P7">Enclosure</text:p>
        <text:p text:style-name="P7"/>
        <text:p text:style-name="P7">CC: Mr. Peter Kastner, Aberdeen Group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93%">
        <style:tab-stops>
          <style:tab-stop style:position="-0.5in"/>
        </style:tab-stops>
      </style:paragraph-properties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25in" fo:margin-right="0in" fo:text-indent="0in" style:auto-text-indent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0.5in" style:auto-text-indent="false" fo:keep-with-next="always"/>
      <style:text-properties fo:font-size="12pt" fo:font-weight="bold" style:font-size-asian="12pt" style:font-weight-asian="bold"/>
    </style:style>
    <style:style style:name="Text_20_body_20_indent" style:display-name="Text body indent" style:family="paragraph" style:parent-style-name="Standard" style:class="text">
      <style:paragraph-properties fo:margin-left="0.1252in" fo:margin-right="0in" fo:text-indent="-0.1252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beradd" style:family="paragraph" style:parent-style-name="Standard">
      <style:paragraph-properties fo:line-height="0.2016in"/>
      <style:text-properties style:font-name="Tms Rmn" fo:font-family="'Tms Rmn', 'Times New Roman'" style:font-family-generic="roman" style:font-pitch="variable" fo:font-size="12pt" fo:font-style="italic" style:letter-kerning="true" style:font-size-asian="12pt" style:font-style-asian="italic" style:font-name-complex="Tms Rmn" style:font-family-complex="'Tms Rmn', 'Times New Roman'" style:font-family-generic-complex="roman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25in" fo:margin-bottom="0in" style:contextual-spacing="false" fo:orphans="0" fo:widows="0"/>
    </style:style>
    <style:style style:name="MP2" style:family="paragraph" style:parent-style-name="Aberadd">
      <style:paragraph-properties fo:margin-left="-0.0752in" fo:margin-right="0in" fo:line-height="0.1945in" fo:text-indent="0.0752in" style:auto-text-indent="false"/>
      <style:text-properties style:font-name="Garamond" fo:font-size="13pt" fo:font-weight="bold" style:font-size-asian="13pt" style:font-weight-asian="bold" style:font-name-complex="Garamond"/>
    </style:style>
    <style:style style:name="MP3" style:family="paragraph" style:parent-style-name="Aberadd">
      <style:paragraph-properties fo:margin-left="-0.0752in" fo:margin-right="0in" fo:line-height="0.1945in" fo:text-indent="0.0752in" style:auto-text-indent="false"/>
      <style:text-properties style:font-name="Garamond" fo:font-size="13pt" fo:font-style="normal" fo:font-weight="bold" style:font-size-asian="13pt" style:font-style-asian="normal" style:font-weight-asian="bold" style:font-name-complex="Garamond"/>
    </style:style>
    <style:style style:name="MP4" style:family="paragraph" style:parent-style-name="Aberadd">
      <style:paragraph-properties fo:margin-left="-0.0752in" fo:margin-right="0in" fo:line-height="0.1945in" fo:text-indent="0.0752in" style:auto-text-indent="false"/>
    </style:style>
    <style:style style:name="MP5" style:family="paragraph" style:parent-style-name="Header">
      <style:text-properties style:font-name="Garamond" fo:font-size="13pt" fo:font-weight="bold" style:font-size-asian="13pt" style:font-weight-asian="bold" style:font-name-complex="Garamond"/>
    </style:style>
    <style:style style:name="MT1" style:family="text">
      <style:text-properties fo:color="#808000" loext:opacity="100%" style:font-name="Garamond" fo:font-size="22pt" fo:letter-spacing="-0.0016in" fo:font-weight="bold" style:letter-kerning="true" style:font-size-asian="22pt" style:font-weight-asian="bold" style:font-name-complex="Garamond"/>
    </style:style>
    <style:style style:name="MT2" style:family="text">
      <style:text-properties fo:color="#808000" loext:opacity="100%" style:font-name="Garamond" fo:font-size="22pt" fo:letter-spacing="-0.0016in" fo:font-style="italic" fo:font-weight="bold" style:letter-kerning="true" style:font-size-asian="22pt" style:font-style-asian="italic" style:font-weight-asian="bold" style:font-name-complex="Garamond"/>
    </style:style>
    <style:style style:name="MT3" style:family="text">
      <style:text-properties style:font-name="Garamond" fo:font-size="13pt" fo:font-weight="bold" style:font-size-asian="13pt" style:font-weight-asian="bold" style:font-name-complex="Garamond"/>
    </style:style>
    <style:style style:name="MT4" style:family="text">
      <style:text-properties style:font-name="Symbol" fo:font-size="13pt" fo:font-weight="bold" style:font-name-asian="Symbol" style:font-size-asian="13pt" style:font-weight-asian="bold" style:font-name-complex="Symbol"/>
    </style:style>
    <style:style style:name="MT5" style:family="text">
      <style:text-properties fo:font-size="12pt" style:font-size-asian="12pt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5in" fo:margin-bottom="1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berdeen</text:span><text:span text:style-name="MT2">Group</text:span></text:p>
        <text:p text:style-name="MP2">One Boston Place</text:p>
        <text:p text:style-name="MP2">Boston, Massachusetts</text:p>
        <text:p text:style-name="MP2">02108 <text:s text:c="2"/>USA</text:p>
        <text:p text:style-name="MP3"/>
        <text:p text:style-name="MP4"><text:span text:style-name="MT3">Telephone: 617</text:span><text:span text:style-name="MT4"></text:span><text:span text:style-name="MT3"> 723</text:span><text:span text:style-name="MT4"></text:span><text:span text:style-name="MT3"> 7890</text:span></text:p>
        <text:p text:style-name="MP4"><text:span text:style-name="MT3">FAX: 617</text:span><text:span text:style-name="MT4"></text:span><text:span text:style-name="MT3"> 723</text:span><text:span text:style-name="MT4"></text:span><text:span text:style-name="MT3"> 7897</text:span></text:p>
        <text:p text:style-name="MP5">www.aberdeen.com</text:p>
      </style:header>
    </style:master-page>
    <style:master-page style:name="Convert_20_1" style:display-name="Convert 1" style:page-layout-name="Mpm1">
      <style:header>
        <text:p text:style-name="MP1"><text:span text:style-name="MT1">Aberdeen</text:span><text:span text:style-name="MT2">Group</text:span></text:p>
        <text:p text:style-name="Header"><text:span text:style-name="Page_20_Number"><text:span text:style-name="MT5">Mr. David Hood, Computer Associates, Page </text:span></text:span><text:span text:style-name="Page_20_Number"><text:span text:style-name="MT5"><text:page-number text:select-page="current">0</text:page-number></text:span></text:span></text:p>
      </style:header>
    </style:master-page>
    <style:master-page style:name="Convert_20_2" style:display-name="Convert 2" style:page-layout-name="Mpm1">
      <style:header>
        <text:p text:style-name="MP1"><text:span text:style-name="MT1">Aberdeen</text:span><text:span text:style-name="MT2">Group</text:span></text:p>
        <text:p text:style-name="Header"><text:span text:style-name="Page_20_Number"><text:span text:style-name="MT5">Mr. David Hood — Computer Associates International</text:span></text:span></text:p>
        <text:p text:style-name="Header"><text:span text:style-name="Page_20_Number"><text:span text:style-name="MT5">Page </text:span></text:span><text:span text:style-name="Page_20_Number"><text:page-number text:select-page="current">0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uter Associates retainer proposal</dc:title>
    <meta:keyword>CA retainer ITMD proposal</meta:keyword>
    <meta:initial-creator>Fred Abbott</meta:initial-creator>
    <meta:creation-date>1998-11-24T18:57:00</meta:creation-date>
    <dc:creator>Peter Kastner</dc:creator>
    <dc:date>1998-11-24T18:57:00</dc:date>
    <meta:print-date>1998-11-24T10:05:00</meta:print-date>
    <meta:editing-cycles>2</meta:editing-cycles>
    <meta:editing-duration>PT1M</meta:editing-duration>
    <meta:document-statistic meta:table-count="0" meta:image-count="0" meta:object-count="0" meta:page-count="5" meta:paragraph-count="100" meta:word-count="1031" meta:character-count="7105" meta:non-whitespace-character-count="6100"/>
    <meta:generator>LibreOffice/24.2.7.2$Linux_X86_64 LibreOffice_project/420$Build-2</meta:generator>
  </office:meta>
</office:document-meta>
</file>