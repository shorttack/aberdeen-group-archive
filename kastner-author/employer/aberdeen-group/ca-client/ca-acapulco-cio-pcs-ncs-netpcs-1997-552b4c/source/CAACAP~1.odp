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3A8000069EB00005F790262E9E5.wmf" manifest:media-type="image/x-wmf"/>
  <manifest:file-entry manifest:full-path="Pictures/10000001000003C3000002077743AE6E.png" manifest:media-type="image/png"/>
  <manifest:file-entry manifest:full-path="Pictures/10000001000002E90000029F79E0152F.png" manifest:media-type="image/png"/>
  <manifest:file-entry manifest:full-path="Pictures/1000098E00006A010000668B182C70C5.wmf" manifest:media-type="image/x-wmf"/>
  <manifest:file-entry manifest:full-path="Pictures/10000001000003B100000211CAED2EE0.png" manifest:media-type="image/png"/>
  <manifest:file-entry manifest:full-path="Pictures/100038B000006A0A00004DAE1E15C9ED.wmf" manifest:media-type="image/x-wmf"/>
  <manifest:file-entry manifest:full-path="Pictures/10001850000069D800006381A2F3DD63.wmf" manifest:media-type="image/x-wmf"/>
  <manifest:file-entry manifest:full-path="Pictures/10000001000002D9000002AE8CA11CA8.png" manifest:media-type="image/png"/>
  <manifest:file-entry manifest:full-path="Pictures/10000D7C000069E500004019F3B70CCC.wmf" manifest:media-type="image/x-wmf"/>
  <manifest:file-entry manifest:full-path="Pictures/100000010000033A0000025D9DF3F3B0.png" manifest:media-type="image/png"/>
  <manifest:file-entry manifest:full-path="Pictures/100000010000038D00000226EE049374.png" manifest:media-type="image/png"/>
  <manifest:file-entry manifest:full-path="Pictures/10000001000002CF000002B79C7D91B1.png" manifest:media-type="image/png"/>
  <manifest:file-entry manifest:full-path="Pictures/10001DB000006A0500003B63D7095AA5.wmf" manifest:media-type="image/x-wmf"/>
  <manifest:file-entry manifest:full-path="Pictures/10001B5A000069E5000039229847DE0B.wmf" manifest:media-type="image/x-wmf"/>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3.175cm" fo:min-width="2.54cm" fo:padding-top="0cm" fo:padding-bottom="0cm" fo:padding-left="0cm" fo:padding-right="0cm" loext:decorative="false"/>
      <style:paragraph-properties style:writing-mode="lr-tb"/>
    </style:style>
    <style:style style:name="gr2" style:family="graphic" style:parent-style-name="standard">
      <style:graphic-properties draw:stroke="none" draw:fill="none" fo:min-height="4.868cm" fo:min-width="2.54cm" fo:padding-top="0cm" fo:padding-bottom="0cm" fo:padding-left="0cm" fo:padding-right="0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fo:min-height="11.642cm" fo:min-width="2.54cm" fo:padding-top="0cm" fo:padding-bottom="0cm" fo:padding-left="0cm" fo:padding-right="0cm" loext:decorative="false"/>
      <style:paragraph-properties style:writing-mode="lr-tb"/>
    </style:style>
    <style:style style:name="gr5" style:family="graphic" style:parent-style-name="standard">
      <style:graphic-properties draw:stroke="none" draw:fill="none" style:mirror="none" loext:decorative="false"/>
    </style:style>
    <style:style style:name="gr6" style:family="graphic">
      <style:graphic-properties style:writing-mode="lr-tb" loext:decorative="false"/>
    </style:style>
    <style:style style:name="gr7" style:family="graphic" style:parent-style-name="standard">
      <style:graphic-properties draw:stroke="none" draw:fill="solid" draw:fill-color="#000000" draw:opacity="100%" draw:shadow="hidden" loext:decorative="false"/>
    </style:style>
    <style:style style:name="gr8" style:family="graphic" style:parent-style-name="standard">
      <style:graphic-properties draw:stroke="solid" svg:stroke-width="0.035cm" svg:stroke-color="#000000" draw:fill="none" fo:padding-top="0.142cm" fo:padding-bottom="0.142cm" fo:padding-left="0.267cm" fo:padding-right="0.267cm" loext:decorative="false"/>
    </style:style>
    <style:style style:name="gr9" style:family="graphic" style:parent-style-name="standard">
      <style:graphic-properties draw:stroke="none" draw:fill="solid" draw:fill-color="#ffffff" draw:opacity="100%" draw:shadow="hidden" loext:decorative="false"/>
    </style:style>
    <style:style style:name="gr10" style:family="graphic" style:parent-style-name="standard">
      <style:graphic-properties draw:stroke="none" draw:fill="solid" draw:fill-color="#cc9966" draw:opacity="100%" draw:shadow="hidden" loext:decorative="false"/>
    </style:style>
    <style:style style:name="gr11" style:family="graphic" style:parent-style-name="standard">
      <style:graphic-properties draw:stroke="none" draw:fill="solid" draw:fill-color="#e6cd9a" draw:opacity="100%" draw:shadow="hidden" loext:decorative="false"/>
    </style:style>
    <style:style style:name="gr12" style:family="graphic">
      <style:graphic-properties loext:decorative="false"/>
    </style:style>
    <style:style style:name="gr13" style:family="graphic" style:parent-style-name="standard">
      <style:graphic-properties draw:stroke="none" draw:fill="solid" draw:fill-color="#ece7db" draw:opacity="100%" draw:shadow="hidden" loext:decorative="false"/>
    </style:style>
    <style:style style:name="gr14" style:family="graphic" style:parent-style-name="standard">
      <style:graphic-properties draw:stroke="none" draw:fill="solid" draw:fill-color="#5a8dc0" draw:opacity="100%" draw:shadow="hidden" loext:decorative="false"/>
    </style:style>
    <style:style style:name="gr15" style:family="graphic" style:parent-style-name="standard">
      <style:graphic-properties draw:stroke="none" draw:fill="solid" draw:fill-color="#b8b3a7" draw:opacity="100%" draw:shadow="hidden" loext:decorative="false"/>
    </style:style>
    <style:style style:name="gr16" style:family="graphic" style:parent-style-name="standard">
      <style:graphic-properties draw:stroke="none" draw:fill="solid" draw:fill-color="#e6a276" draw:opacity="100%" draw:shadow="hidden" loext:decorative="false"/>
    </style:style>
    <style:style style:name="gr17" style:family="graphic" style:parent-style-name="standard">
      <style:graphic-properties draw:stroke="none" draw:fill="solid" draw:fill-color="#d2cec2" draw:opacity="100%" draw:shadow="hidden" loext:decorative="false"/>
    </style:style>
    <style:style style:name="gr18" style:family="graphic" style:parent-style-name="standard">
      <style:graphic-properties draw:stroke="none" draw:fill="solid" draw:fill-color="#374d80" draw:opacity="100%" draw:shadow="hidden" loext:decorative="false"/>
    </style:style>
    <style:style style:name="gr19" style:family="graphic" style:parent-style-name="standard">
      <style:graphic-properties draw:stroke="none" draw:fill="solid" draw:fill-color="#ffbb8f" draw:opacity="100%" draw:shadow="hidden" loext:decorative="false"/>
    </style:style>
    <style:style style:name="gr20" style:family="graphic" style:parent-style-name="standard">
      <style:graphic-properties draw:stroke="none" draw:fill="gradient" draw:fill-gradient-name="Gradient_5f_1" draw:shadow="hidden" loext:decorative="false"/>
    </style:style>
    <style:style style:name="gr21" style:family="graphic" style:parent-style-name="standard">
      <style:graphic-properties draw:stroke="none" draw:fill="none" fo:min-height="1.473cm" fo:min-width="2.54cm" fo:padding-top="0cm" fo:padding-bottom="0cm" fo:padding-left="0cm" fo:padding-right="0cm" loext:decorative="false"/>
      <style:paragraph-properties style:writing-mode="lr-tb"/>
    </style:style>
    <style:style style:name="gr22" style:family="graphic" style:parent-style-name="standard">
      <style:graphic-properties draw:stroke="none" draw:fill="none" fo:min-height="6.266cm" fo:min-width="2.54cm" fo:padding-top="0cm" fo:padding-bottom="0cm" fo:padding-left="0cm" fo:padding-right="0cm" loext:decorative="false"/>
      <style:paragraph-properties style:writing-mode="lr-tb"/>
    </style:style>
    <style:style style:name="pr1" style:family="presentation" style:parent-style-name="Master0-notes">
      <style:graphic-properties draw:fill-color="#ffffff" fo:min-height="12.572cm" loext:decorative="false"/>
      <style:paragraph-properties style:writing-mode="lr-tb"/>
    </style:style>
    <style:style style:name="pr2" style:family="presentation" style:parent-style-name="Master0-notes">
      <style:graphic-properties draw:fill="none" fo:min-height="12.573cm" loext:decorative="false"/>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none"/>
    </style:style>
    <style:style style:name="P3" style:family="paragraph">
      <style:paragraph-properties fo:margin-left="0.953cm" fo:margin-right="0cm" fo:margin-top="0.169cm" fo:margin-bottom="0cm" fo:line-height="100%" fo:text-align="center" fo:text-indent="-0.953cm"/>
    </style:style>
    <style:style style:name="P4" style:family="paragraph">
      <style:paragraph-properties fo:margin-left="0.953cm" fo:margin-right="0cm" fo:margin-top="0.169cm" fo:margin-bottom="0cm" fo:line-height="70%" fo:text-align="center" fo:text-indent="-0.953cm"/>
    </style:style>
    <style:style style:name="P5" style:family="paragraph">
      <loext:graphic-properties draw:fill-color="#ffffff"/>
    </style:style>
    <style:style style:name="P6" style:family="paragraph">
      <style:paragraph-properties fo:margin-left="0.953cm" fo:margin-right="0cm" fo:margin-top="0.169cm" fo:margin-bottom="0cm" fo:line-height="100%" fo:text-align="start" fo:text-indent="-0.953cm"/>
    </style:style>
    <style:style style:name="P7" style:family="paragraph">
      <loext:graphic-properties draw:fill="solid" draw:fill-color="#000000" draw:opacity="100%"/>
    </style:style>
    <style:style style:name="P8" style:family="paragraph">
      <loext:graphic-properties draw:fill="solid" draw:fill-color="#ffffff" draw:opacity="100%"/>
    </style:style>
    <style:style style:name="P9" style:family="paragraph">
      <loext:graphic-properties draw:fill="solid" draw:fill-color="#cc9966" draw:opacity="100%"/>
    </style:style>
    <style:style style:name="P10" style:family="paragraph">
      <loext:graphic-properties draw:fill="solid" draw:fill-color="#e6cd9a" draw:opacity="100%"/>
    </style:style>
    <style:style style:name="P11" style:family="paragraph">
      <loext:graphic-properties draw:fill="solid" draw:fill-color="#ece7db" draw:opacity="100%"/>
    </style:style>
    <style:style style:name="P12" style:family="paragraph">
      <loext:graphic-properties draw:fill="solid" draw:fill-color="#5a8dc0" draw:opacity="100%"/>
    </style:style>
    <style:style style:name="P13" style:family="paragraph">
      <loext:graphic-properties draw:fill="solid" draw:fill-color="#b8b3a7" draw:opacity="100%"/>
    </style:style>
    <style:style style:name="P14" style:family="paragraph">
      <loext:graphic-properties draw:fill="solid" draw:fill-color="#e6a276" draw:opacity="100%"/>
    </style:style>
    <style:style style:name="P15" style:family="paragraph">
      <loext:graphic-properties draw:fill="solid" draw:fill-color="#d2cec2" draw:opacity="100%"/>
    </style:style>
    <style:style style:name="P16" style:family="paragraph">
      <loext:graphic-properties draw:fill="solid" draw:fill-color="#374d80" draw:opacity="100%"/>
    </style:style>
    <style:style style:name="P17" style:family="paragraph">
      <loext:graphic-properties draw:fill="solid" draw:fill-color="#ffbb8f" draw:opacity="100%"/>
    </style:style>
    <style:style style:name="P18" style:family="paragraph">
      <loext:graphic-properties draw:fill="gradient" draw:fill-gradient-name="Gradient_5f_1"/>
    </style:style>
    <style:style style:name="P19" style:family="paragraph">
      <style:paragraph-properties fo:margin-left="0cm" fo:margin-right="0cm" fo:margin-top="0.254cm" fo:margin-bottom="0cm" fo:line-height="90%" fo:text-align="start" fo:text-indent="0cm"/>
    </style:style>
    <style:style style:name="P20" style:family="paragraph">
      <style:paragraph-properties fo:margin-left="0cm" fo:margin-right="0cm" fo:margin-top="0.254cm" fo:margin-bottom="0cm" fo:line-height="100%" fo:text-align="start" fo:text-indent="0cm"/>
    </style:style>
    <style:style style:name="P21" style:family="paragraph">
      <loext:graphic-properties draw:fill="none"/>
      <style:paragraph-properties fo:margin-left="0.61cm" fo:margin-right="0cm" fo:text-indent="0cm"/>
    </style:style>
    <style:style style:name="P22" style:family="paragraph">
      <style:paragraph-properties fo:margin-left="2.064cm" fo:margin-right="0cm" fo:margin-top="0.169cm" fo:margin-bottom="0cm" fo:line-height="100%" fo:text-align="start" fo:text-indent="-0.794cm"/>
    </style:style>
    <style:style style:name="P23" style:family="paragraph">
      <style:paragraph-properties fo:margin-left="0.953cm" fo:margin-right="0cm" fo:margin-top="0.169cm" fo:margin-bottom="0cm" fo:line-height="130%" fo:text-align="start" fo:text-indent="-0.953cm"/>
    </style:style>
    <style:style style:name="P24" style:family="paragraph">
      <style:paragraph-properties fo:margin-left="2.064cm" fo:margin-right="0cm" fo:margin-top="0.169cm" fo:margin-bottom="0cm" fo:line-height="130%" fo:text-align="start" fo:text-indent="-0.794cm"/>
    </style:style>
    <style:style style:name="P25" style:family="paragraph">
      <style:paragraph-properties fo:margin-left="1.27cm" fo:margin-right="0cm" fo:margin-top="0.169cm" fo:margin-bottom="0cm" fo:line-height="80%" fo:text-align="start" fo:text-indent="0cm"/>
    </style:style>
    <style:style style:name="P26" style:family="paragraph">
      <style:paragraph-properties fo:margin-left="0.953cm" fo:margin-right="0cm" fo:margin-top="0.169cm" fo:margin-bottom="0cm" fo:line-height="180%" fo:text-align="start" fo:text-indent="-0.953cm"/>
    </style:style>
    <style:style style:name="P27" style:family="paragraph">
      <style:paragraph-properties fo:margin-left="0cm" fo:margin-right="0cm" fo:margin-top="0cm" fo:margin-bottom="0cm" fo:line-height="100%" fo:text-align="start" fo:text-indent="0cm"/>
    </style:style>
    <style:style style:name="P28" style:family="paragraph">
      <style:paragraph-properties fo:margin-left="0.953cm" fo:margin-right="0cm" fo:margin-top="0.169cm" fo:margin-bottom="0cm" fo:line-height="150%" fo:text-align="start" fo:text-indent="-0.953cm"/>
    </style:style>
    <style:style style:name="P29" style:family="paragraph">
      <style:paragraph-properties fo:margin-left="0.953cm" fo:margin-right="0cm" fo:margin-top="0.169cm" fo:margin-bottom="0cm" fo:line-height="120%" fo:text-align="start" fo:text-indent="-0.953cm"/>
    </style:style>
    <style:style style:name="P30" style:family="paragraph">
      <style:paragraph-properties fo:margin-left="0.953cm" fo:margin-right="0cm" fo:margin-top="0.169cm" fo:margin-bottom="0cm" fo:line-height="170%" fo:text-align="start" fo:text-indent="-0.953cm"/>
    </style:style>
    <style:style style:name="P31" style:family="paragraph">
      <style:paragraph-properties fo:margin-left="0.953cm" fo:margin-right="0cm" fo:margin-top="0.169cm" fo:margin-bottom="0cm" fo:line-height="90%" fo:text-align="start" fo:text-indent="-0.953cm"/>
    </style:style>
    <style:style style:name="P32" style:family="paragraph">
      <style:paragraph-properties fo:margin-left="2.064cm" fo:margin-right="0cm" fo:margin-top="0.169cm" fo:margin-bottom="0cm" fo:line-height="90%" fo:text-align="start" fo:text-indent="-0.794cm"/>
    </style:style>
    <style:style style:name="P33" style:family="paragraph">
      <style:paragraph-properties fo:margin-left="2.064cm" fo:margin-right="0cm" fo:margin-top="0.169cm" fo:margin-bottom="0cm" fo:line-height="80%" fo:text-align="start" fo:text-indent="-0.794cm"/>
    </style:style>
    <style:style style:name="P34" style:family="paragraph">
      <style:paragraph-properties fo:margin-left="0.953cm" fo:margin-right="0cm" fo:margin-top="0.169cm" fo:margin-bottom="0cm" fo:line-height="140%" fo:text-align="start" fo:text-indent="-0.953cm"/>
    </style:style>
    <style:style style:name="P35" style:family="paragraph">
      <style:paragraph-properties fo:margin-left="0.953cm" fo:margin-right="0cm" fo:margin-top="0.169cm" fo:margin-bottom="0cm" fo:line-height="160%" fo:text-align="start" fo:text-indent="-0.953cm"/>
    </style:style>
    <style:style style:name="P36" style:family="paragraph">
      <style:paragraph-properties fo:margin-left="0.953cm" fo:margin-right="0cm" fo:margin-top="0.677cm" fo:margin-bottom="0cm" fo:line-height="105%" fo:text-align="start" fo:text-indent="-0.953cm"/>
    </style:style>
    <style:style style:name="P37" style:family="paragraph">
      <style:paragraph-properties fo:margin-left="0.953cm" fo:margin-right="0cm" fo:margin-top="0.169cm" fo:margin-bottom="0cm" fo:line-height="110%" fo:text-align="start" fo:text-indent="-0.953cm"/>
    </style:style>
    <style:style style:name="T1" style:family="text">
      <style:text-properties fo:color="#ffcc99" loext:opacity="100%" style:font-name="Arial" fo:font-size="40pt" fo:text-shadow="1pt 1pt" fo:font-weight="bold" style:font-name-asian="Arial" style:font-size-asian="40pt" style:font-weight-asian="bold" style:font-name-complex="Arial" style:font-size-complex="40pt" style:font-weight-complex="bold"/>
    </style:style>
    <style:style style:name="T2" style:family="text">
      <style:text-properties fo:color="#ffcc99" loext:opacity="100%" style:font-name="Arial" fo:font-size="40pt" fo:font-style="italic" fo:text-shadow="1pt 1pt" fo:font-weight="bold" style:font-name-asian="Arial" style:font-size-asian="40pt" style:font-style-asian="italic" style:font-weight-asian="bold" style:font-name-complex="Arial" style:font-size-complex="40pt" style:font-style-complex="italic" style:font-weight-complex="bold"/>
    </style:style>
    <style:style style:name="T3" style:family="text">
      <style:text-properties fo:color="#000000" loext:opacity="100%" style:font-name="Arial" fo:font-size="24pt" fo:font-style="italic" fo:font-weight="bold" style:font-name-asian="Arial" style:font-size-asian="24pt" style:font-style-asian="italic" style:font-weight-asian="bold" style:font-name-complex="Arial" style:font-size-complex="24pt" style:font-style-complex="italic" style:font-weight-complex="bold"/>
    </style:style>
    <style:style style:name="T4" style:family="text">
      <style:text-properties fo:color="#000000" loext:opacity="100%" style:font-name="Arial" fo:font-size="24pt" fo:font-weight="bold" style:font-name-asian="Arial" style:font-size-asian="24pt" style:font-weight-asian="bold" style:font-name-complex="Arial" style:font-size-complex="24pt" style:font-weight-complex="bold"/>
    </style:style>
    <style:style style:name="T5" style:family="text">
      <style:text-properties fo:color="#000000" loext:opacity="100%" style:font-name="Arial" fo:font-size="20pt" fo:font-weight="bold" style:font-name-asian="Arial" style:font-size-asian="20pt" style:font-weight-asian="bold" style:font-name-complex="Arial" style:font-size-complex="20pt" style:font-weight-complex="bold"/>
    </style:style>
    <style:style style:name="T6" style:family="text">
      <style:text-properties fo:color="#000000" loext:opacity="100%" style:font-name="Arial" fo:font-size="20pt" fo:font-style="italic" fo:font-weight="bold" style:font-name-asian="Arial" style:font-size-asian="20pt" style:font-style-asian="italic" style:font-weight-asian="bold" style:font-name-complex="Arial" style:font-size-complex="20pt" style:font-style-complex="italic" style:font-weight-complex="bold"/>
    </style:style>
    <style:style style:name="T7" style:family="text">
      <style:text-properties fo:color="#790015" loext:opacity="100%" style:font-name="Arial" fo:font-size="24pt" fo:font-weight="bold" style:font-name-asian="Arial" style:font-size-asian="24pt" style:font-weight-asian="bold" style:font-name-complex="Arial" style:font-size-complex="24pt" style:font-weight-complex="bold"/>
    </style:style>
    <style:style style:name="T8" style:family="text">
      <style:text-properties fo:color="#ffffff" loext:opacity="100%" style:font-name="Arial" fo:font-size="32pt" fo:font-weight="bold" style:font-name-asian="Arial" style:font-size-asian="32pt" style:font-weight-asian="bold" style:font-name-complex="Arial" style:font-size-complex="32pt" style:font-weight-complex="bold"/>
    </style:style>
    <style:style style:name="T9" style:family="text">
      <style:text-properties fo:color="#ffcc99" loext:opacity="100%" style:font-name="Arial" fo:font-size="36pt" fo:text-shadow="1pt 1pt" fo:font-weight="bold" style:font-name-asian="Arial" style:font-size-asian="36pt" style:font-weight-asian="bold" style:font-name-complex="Arial" style:font-size-complex="36pt" style:font-weight-complex="bold"/>
    </style:style>
    <style:style style:name="T10" style:family="text">
      <style:text-properties fo:color="#000000" loext:opacity="100%" style:font-name="Times New Roman" fo:font-size="12pt" style:font-name-asian="Times New Roman" style:font-size-asian="12pt" style:font-name-complex="Times New Roman" style:font-size-complex="12pt"/>
    </style:style>
    <style:style style:name="T11" style:family="text">
      <style:text-properties fo:color="#790015" loext:opacity="100%" style:font-name="Arial" fo:font-size="28pt" fo:font-weight="bold" style:font-name-asian="Arial" style:font-size-asian="28pt" style:font-weight-asian="bold" style:font-name-complex="Arial" style:font-size-complex="28pt" style:font-weight-complex="bold"/>
    </style:style>
    <style:style style:name="T12" style:family="text">
      <style:text-properties fo:color="#f57b49" loext:opacity="100%" style:font-name="Arial" fo:font-size="142pt" fo:font-style="italic" fo:font-weight="bold" style:font-name-asian="Arial" style:font-size-asian="142pt" style:font-style-asian="italic" style:font-weight-asian="bold" style:font-name-complex="Arial" style:font-size-complex="142pt" style:font-style-complex="italic" style:font-weight-complex="bold"/>
    </style:style>
    <style:style style:name="T13" style:family="text">
      <style:text-properties fo:color="#790015" loext:opacity="100%" style:font-name="Arial" fo:font-size="28pt" style:text-underline-style="solid" style:text-underline-width="auto" style:text-underline-color="font-color" fo:font-weight="bold" style:font-name-asian="Arial" style:font-size-asian="28pt" style:font-weight-asian="bold" style:font-name-complex="Arial" style:font-size-complex="28pt" style:font-weight-complex="bold"/>
    </style:style>
    <style:style style:name="T14" style:family="text">
      <style:text-properties fo:color="#790015" loext:opacity="100%" style:font-name="Arial" fo:font-size="20pt" fo:font-weight="bold" style:font-name-asian="Arial" style:font-size-asian="20pt" style:font-weight-asian="bold" style:font-name-complex="Arial" style:font-size-complex="20pt" style:font-weight-complex="bold"/>
    </style:style>
    <style:style style:name="T15" style:family="text">
      <style:text-properties fo:color="#790015" loext:opacity="100%" style:font-name="Arial" fo:font-size="25pt" fo:font-weight="bold" style:font-name-asian="Arial" style:font-size-asian="25pt" style:font-weight-asian="bold" style:font-name-complex="Arial" style:font-size-complex="25pt" style:font-weight-complex="bold"/>
    </style:style>
    <style:style style:name="T16" style:family="text">
      <style:text-properties fo:color="#000000" loext:opacity="100%" style:font-name="Arial" fo:font-size="14pt" fo:font-weight="bold" style:font-name-asian="Arial" style:font-size-asian="14pt" style:font-weight-asian="bold" style:font-name-complex="Arial" style:font-size-complex="1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254cm"/>
        <style:text-properties fo:font-family="'Monotype Sorts'" fo:color="#ffcc99" fo:font-size="75%"/>
      </text:list-level-style-bullet>
      <text:list-level-style-bullet text:level="2" text:bullet-char="">
        <style:list-level-properties text:min-label-width="0.254cm"/>
        <style:text-properties fo:font-family="CP1252" fo:color="#ffcc99"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254cm"/>
        <style:text-properties fo:font-family="'Monotype Sorts'" fo:color="#ef9100" fo:font-size="7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
        <style:list-level-properties text:min-label-width="0.254cm"/>
        <style:text-properties style:use-window-font-color="true" fo:font-size="45%"/>
      </text:list-level-style-bullet>
      <text:list-level-style-bullet text:level="2" text:bullet-char="">
        <style:list-level-properties text:min-label-width="0.254cm"/>
        <style:text-properties fo:font-family="CP1252" fo:color="#000000"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254cm"/>
        <style:text-properties fo:font-family="'Monotype Sorts'" fo:color="#ffcc99" fo:font-size="7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254cm"/>
        <style:text-properties fo:font-family="'Monotype Sorts'" fo:color="#00cc99" fo:font-size="7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0" presentation:presentation-page-layout-name="AL1T0">
        <draw:frame draw:style-name="gr1" draw:text-style-name="P2" draw:layer="layout" svg:width="21.59cm" svg:height="6.301cm" svg:x="1.905cm" svg:y="4.657cm">
          <draw:text-box>
            <text:p text:style-name="P1"><text:span text:style-name="T1">PCs, NCs, and NetPCs</text:span><text:span text:style-name="T1"><text:line-break/></text:span><text:span text:style-name="T1"><text:line-break/></text:span><text:span text:style-name="T1"><text:line-break/></text:span><text:span text:style-name="T2">Where Do We Go From Here?</text:span></text:p>
          </draw:text-box>
        </draw:frame>
        <draw:frame draw:style-name="gr2" draw:text-style-name="P2" draw:layer="layout" svg:width="17.78cm" svg:height="7.872cm" svg:x="3.81cm" svg:y="9.737cm">
          <draw:text-box>
            <text:p text:style-name="P3"><text:span text:style-name="T3">Computer Associates International</text:span><text:span text:style-name="T3"><text:line-break/></text:span><text:span text:style-name="T3">May 1997 -- Acapulco CIO Conference</text:span></text:p>
            <text:p text:style-name="P3"><text:span text:style-name="T4"/></text:p>
            <text:p text:style-name="P4"><text:span text:style-name="T5">Peter S. Kastner</text:span></text:p>
            <text:p text:style-name="P4"><text:span text:style-name="T5">Group Vice President</text:span><text:span text:style-name="T5"><text:line-break/></text:span><text:span text:style-name="T5"/></text:p>
            <text:p text:style-name="P4"><text:span text:style-name="T6">Aberdeen Group, Inc.</text:span></text:p>
            <text:p text:style-name="P4"><text:span text:style-name="T5">One Boston Place</text:span></text:p>
            <text:p text:style-name="P4"><text:span text:style-name="T5">Boston, MA 02108 USA</text:span></text:p>
            <text:p text:style-name="P4"><text:span text:style-name="T5">617/723-7890</text:span></text:p>
          </draw:text-box>
        </draw:fram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Master0">
        <draw:frame draw:style-name="gr1" draw:text-style-name="P2" draw:layer="layout" svg:width="21.378cm" svg:height="3.175cm" svg:x="2.117cm" svg:y="0.635cm">
          <draw:text-box>
            <text:p text:style-name="P1"><text:span text:style-name="T1">Agenda</text:span></text:p>
          </draw:text-box>
        </draw:frame>
        <draw:frame draw:style-name="gr4" draw:text-style-name="P2" draw:layer="layout" svg:width="21.537cm" svg:height="11.642cm" svg:x="3.175cm" svg:y="5.08cm">
          <draw:text-box>
            <text:list text:style-name="L2">
              <text:list-item>
                <text:p text:style-name="P6"><text:span text:style-name="T7">Desktop business drivers</text:span></text:p>
              </text:list-item>
              <text:list-item>
                <text:p text:style-name="P6"><text:span text:style-name="T7">The PC, NC, NetPC choice dilemma</text:span></text:p>
              </text:list-item>
              <text:list-item>
                <text:p text:style-name="P6"><text:span text:style-name="T7">The Microsoft/Intel approach</text:span></text:p>
              </text:list-item>
              <text:list-item>
                <text:p text:style-name="P6"><text:span text:style-name="T7">The Network Computer approach</text:span></text:p>
              </text:list-item>
              <text:list-item>
                <text:p text:style-name="P6"><text:span text:style-name="T7">Where PCs and Network Computing are best suited</text:span></text:p>
              </text:list-item>
            </text:list>
          </draw:text-box>
        </draw:frame>
        <draw:frame draw:style-name="gr5" draw:text-style-name="P2" draw:layer="layout" svg:width="4.895cm" svg:height="4.41cm" svg:x="17.78cm" svg:y="12.277cm">
          <draw:image xlink:href="Pictures/100003A8000069EB00005F790262E9E5.wmf" xlink:type="simple" xlink:show="embed" xlink:actuate="onLoad" draw:mime-type="image/x-wmf">
            <text:p/>
          </draw:image>
          <draw:image xlink:href="Pictures/10000001000002E90000029F79E0152F.png" xlink:type="simple" xlink:show="embed" xlink:actuate="onLoad" draw:mime-type="image/png"/>
        </draw:frame>
        <draw:frame draw:style-name="gr5" draw:text-style-name="P2" draw:layer="layout" svg:width="4.335cm" svg:height="4.194cm" svg:x="3.175cm" svg:y="12.7cm">
          <draw:image xlink:href="Pictures/1000098E00006A010000668B182C70C5.wmf" xlink:type="simple" xlink:show="embed" xlink:actuate="onLoad" draw:mime-type="image/x-wmf">
            <text:p/>
          </draw:image>
          <draw:image xlink:href="Pictures/10000001000002CF000002B79C7D91B1.png" xlink:type="simple" xlink:show="embed" xlink:actuate="onLoad" draw:mime-type="image/png"/>
        </draw:frame>
        <presentation:notes draw:style-name="dp2">
          <draw:page-thumbnail draw:style-name="gr3"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Master0">
        <draw:frame draw:style-name="gr1" draw:text-style-name="P2" draw:layer="layout" svg:width="21.378cm" svg:height="3.175cm" svg:x="2.117cm" svg:y="0.635cm">
          <draw:text-box>
            <text:p text:style-name="P1"><text:span text:style-name="T1">Desktop Business Drivers</text:span></text:p>
          </draw:text-box>
        </draw:frame>
        <draw:frame draw:style-name="gr4" draw:text-style-name="P2" draw:layer="layout" svg:width="21.537cm" svg:height="11.642cm" svg:x="3.175cm" svg:y="5.08cm">
          <draw:text-box>
            <text:list text:style-name="L2">
              <text:list-item>
                <text:p text:style-name="P6"><text:span text:style-name="T7">Expanded internal communications (e.g., Intranets)</text:span></text:p>
              </text:list-item>
              <text:list-item>
                <text:p text:style-name="P6"><text:span text:style-name="T7">Expanded external communications (e.g., Extranets)</text:span></text:p>
              </text:list-item>
              <text:list-item>
                <text:p text:style-name="P6"><text:span text:style-name="T7">Just-in-time supply chain management</text:span></text:p>
              </text:list-item>
              <text:list-item>
                <text:p text:style-name="P6"><text:span text:style-name="T7">Globalization eliminates distances</text:span></text:p>
              </text:list-item>
            </text:list>
          </draw:text-box>
        </draw:frame>
        <draw:frame draw:style-name="gr5" draw:text-style-name="P2" draw:layer="layout" svg:width="10.372cm" svg:height="5.794cm" svg:x="14.182cm" svg:y="10.844cm">
          <draw:image xlink:href="Pictures/10001DB000006A0500003B63D7095AA5.wmf" xlink:type="simple" xlink:show="embed" xlink:actuate="onLoad" draw:mime-type="image/x-wmf">
            <text:p/>
          </draw:image>
          <draw:image xlink:href="Pictures/10000001000003B100000211CAED2EE0.png" xlink:type="simple" xlink:show="embed" xlink:actuate="onLoad" draw:mime-type="image/png"/>
        </draw:frame>
        <presentation:notes draw:style-name="dp2">
          <draw:page-thumbnail draw:style-name="gr3"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Master0">
        <draw:g draw:style-name="gr6">
          <draw:polygon draw:style-name="gr7" draw:text-style-name="P7" draw:layer="layout" svg:width="12.246cm" svg:height="9.798cm" svg:x="0.467cm" svg:y="8.652cm" svg:viewBox="0 0 12247 9799" draw:points="5327,767 5327,767 8988,948 10184,1190 10289,1618 11802,2037 11612,4343 11423,4418 11348,4926 10206,4979 10713,5138 12115,5297 12115,6752 12247,6752 12247,9772 26,9799 0,8211 158,8260 158,8128 158,7995 189,7863 189,7731 216,7598 216,7466 264,7202 264,7122 264,7069 291,7047 291,6937 291,6858 291,6672 291,6487 291,6276 264,6090 264,6007 291,5905 291,5826 291,5742 321,5610 348,5477 370,5213 396,5111 423,4979 454,4872 454,4815 480,4740 502,4709 502,4661 529,4634 555,4608 612,4528 661,4445 718,4370 767,4312 824,4237 851,4211 851,4180 877,4131 899,4078 926,4048 926,4021 956,3999 983,3973 1009,3946 1031,3915 1058,3889 1115,3867 1142,3840 1164,3814 1221,3814 1274,3783 1296,3783 1353,3757 1380,3757 1486,3735 1561,3708 1644,3708 1750,3682 1825,3682 1909,3651 1935,3651 1988,3651 2015,3624 2041,3624 2072,3602 2041,3576 2015,3576 1988,3545 1935,3545 1909,3545 1882,3545 1803,3545 1724,3518 1671,3518 1644,3518 1618,3518 1561,3492 1538,3492 1512,3492 1486,3443 1486,3413 1459,3360 1428,3311 1428,3254 1406,3205 1406,3122 1406,3073 1406,3016 1406,2963 1406,2914 1406,2857 1406,2782 1428,2676 1428,2619 1428,2544 1459,2434 1486,2381 1512,2301 1538,2196 1561,2090 1591,1984 1644,1882 1693,1693 1750,1534 1803,1344 1825,1270 1882,1190 1882,1137 1909,1080 1935,1058 1935,1005 1988,926 2015,842 2072,767 2094,740 2121,709 2147,661 2173,635 2226,608 2226,577 2253,577 2279,551 2306,529 2363,502 2385,476 2412,476 2438,445 2469,418 2495,396 2544,370 2601,313 2650,264 2703,211 2734,180 2760,180 2782,154 2808,154 2839,132 2892,105 2914,105 2941,79 2998,79 3047,48 3074,48 3131,48 3180,22 3206,22 3264,22 3312,22 3370,0 3422,0 3502,0 3555,0 3608,0 3661,0 3709,0 3793,22 3841,22 3899,22 3974,48 4088,48 4163,79 4243,79 4269,105 4296,132 4322,132 4375,154 4428,211 4485,238 4507,264 4507,286 4534,286 4560,313 4587,313 4617,343 4692,370 4719,370 4750,396 4825,418 4904,445 4988,476 5036,502 5120,529 5169,551 5195,551 5222,551 5222,577 5252,577 5252,608 5279,608 5279,635 5301,635 5301,661 5301,683 5327,709 5327,740">
            <text:p/>
          </draw:polygon>
          <draw:polyline draw:style-name="gr8" draw:text-style-name="P2" draw:layer="layout" svg:width="12.29cm" svg:height="9.842cm" svg:x="0.423cm" svg:y="8.652cm" svg:viewBox="0 0 12291 9843" draw:points="8992,952 8992,952 10219,1195 10325,1622 11842,2046 11652,4361 11467,4440 11387,4948 10241,5001 10752,5160 12159,5319 12159,6783 12291,6783 12291,9817 26,9843 0,8247 158,8295 158,8088 216,7497 264,7153 295,6915 295,6650 295,6302 264,6090 264,5901 348,5319 427,4922 533,4656 824,4281 956,3884 1728,3695 2050,3642 2076,3620 2024,3563 1569,3536 1516,3510 1490,3488 1411,3267 1411,2689 1547,2156 1887,1115 2129,608 2447,449 2742,180 2954,79 3325,0 3753,0 4102,48 4313,105 4631,343 4710,370 5164,555 5213,555 5270,555 5349,714 5349,798">
            <text:p/>
          </draw:polyline>
          <draw:polyline draw:style-name="gr8" draw:text-style-name="P2" draw:layer="layout" svg:width="12.29cm" svg:height="9.842cm" svg:x="0.423cm" svg:y="8.652cm" svg:viewBox="0 0 12291 9843" draw:points="5349,771 5349,771 9023,952 10219,1195 10325,1622 11842,2046 11652,4361 11467,4440 11387,4948 10241,5001 10752,5160 12159,5319 12159,6783 12291,6783 12291,9817 26,9843 0,8247 158,8295 158,8163 158,8031 189,7898 189,7766 216,7634 216,7497 264,7232 264,7153 264,7100 295,7078 295,6968 295,6888 295,6699 295,6518 295,6302 264,6117 264,6037 295,5932 295,5852 295,5768 321,5636 348,5504 370,5239 396,5133 427,5001 454,4894 454,4837 480,4762 502,4731 502,4683 533,4656 560,4625 612,4550 665,4467 718,4387 771,4334 824,4255 855,4228 855,4202 881,4149 903,4096 930,4065 930,4039 956,4017 987,3990 1014,3964 1036,3933 1062,3907 1120,3884 1146,3858 1168,3827 1225,3827 1278,3801 1300,3801 1358,3774 1384,3774 1490,3752 1569,3726 1649,3726 1755,3695 1834,3695 1918,3668 1944,3668 1993,3668 2024,3642 2050,3642 2076,3620 2050,3589 2024,3589 1993,3563 1944,3563 1918,3563 1887,3563 1812,3563 1728,3536 1680,3536 1649,3536 1622,3536 1569,3510 1547,3510 1516,3510 1490,3457 1490,3430 1464,3373 1433,3324 1433,3267 1411,3219 1411,3135 1411,3086 1411,3029 1411,2976 1411,2928 1411,2870 1411,2791 1433,2689 1433,2632 1433,2553 1464,2442 1490,2394 1516,2310 1547,2204 1569,2099 1596,1993 1649,1891 1702,1702 1755,1538 1812,1353 1834,1274 1887,1195 1887,1142 1918,1084 1944,1062 1944,1009 1993,930 2024,846 2076,771 2099,740 2129,714 2156,665 2182,639 2231,608 2231,582 2262,582 2288,555 2315,533 2372,502 2394,476 2420,476 2447,449 2478,423 2504,396 2553,370 2610,317 2659,264 2716,211 2742,180 2769,180 2791,154 2822,154 2848,132 2901,105 2923,105 2954,79 3007,79 3060,48 3087,48 3140,48 3193,22 3220,22 3277,22 3325,22 3378,0 3436,0 3515,0 3568,0 3621,0 3674,0 3722,0 3806,22 3859,22 3912,22 3991,48 4102,48 4177,79 4256,79 4282,105 4313,132 4340,132 4388,154 4446,211 4498,238 4520,264 4520,286 4551,286 4578,317 4604,317 4631,343 4710,370 4737,370 4767,396 4842,423 4922,449 5006,476 5054,502 5138,533 5186,555 5213,555 5244,555 5244,582 5270,582 5270,608 5297,608 5297,639 5319,639 5319,665 5319,687 5349,714 5349,740">
            <text:p/>
          </draw:polyline>
          <draw:polygon draw:style-name="gr9" draw:text-style-name="P8" draw:layer="layout" svg:width="2.218cm" svg:height="1.636cm" svg:x="4.723cm" svg:y="11.919cm" svg:viewBox="0 0 2219 1637" draw:points="2219,1451 2219,1451 1023,1271 1023,935 965,935 912,935 864,909 811,909 762,882 705,882 679,860 652,860 652,834 679,0 652,26 630,26 604,52 577,52 551,52 520,52 498,79 445,79 418,79 392,79 370,79 317,79 286,52 260,52 238,52 211,52 185,52 132,79 110,101 79,101 79,127 52,127 52,158 26,185 0,211 26,233 52,260 79,313 110,388 132,414 132,471 132,489 158,546 158,573 158,621 185,648 185,674 185,727 185,749 260,802 370,834 445,882 498,909 551,935 604,962 630,988 679,1037 732,1063 811,1138 837,1165 890,1196 912,1222 939,1248 965,1297 996,1323 1023,1350 1045,1398 1071,1425 1071,1451 1071,1478 1098,1509 1125,1531 1125,1557 1125,1584 1151,1584 1151,1637">
            <text:p/>
          </draw:polygon>
          <draw:polyline draw:style-name="gr8" draw:text-style-name="P2" draw:layer="layout" svg:width="2.262cm" svg:height="1.68cm" svg:x="4.679cm" svg:y="11.919cm" svg:viewBox="0 0 2263 1681" draw:points="1040,1301 1040,1301 1040,962 908,962 692,904 665,856 692,0 643,57 511,83 321,83 216,57 132,83 57,158 0,216 83,321 189,639 189,771 295,824 533,931 798,1147 1040,1385 1093,1522 1178,1623 1178,1681 2263,1522">
            <text:p/>
          </draw:polyline>
          <draw:polyline draw:style-name="gr8" draw:text-style-name="P2" draw:layer="layout" svg:width="2.262cm" svg:height="1.68cm" svg:x="4.679cm" svg:y="11.919cm" svg:viewBox="0 0 2263 1681" draw:points="2263,1491 2263,1491 1040,1301 1040,962 987,962 930,962 881,931 824,931 776,904 718,904 692,882 665,882 665,856 692,0 665,26 643,26 617,57 586,57 560,57 533,57 511,83 454,83 427,83 401,83 379,83 321,83 295,57 264,57 242,57 216,57 189,57 132,83 110,105 83,105 83,132 57,132 57,158 26,189 0,216 26,238 57,264 83,321 110,401 132,427 132,480 132,502 158,560 158,586 158,639 189,665 189,692 189,749 189,771 264,824 379,856 454,904 511,931 560,962 617,988 643,1015 692,1063 749,1094 824,1169 855,1200 908,1226 930,1253 961,1279 987,1332 1014,1359 1040,1385 1062,1438 1093,1465 1093,1491 1093,1522 1120,1548 1147,1570 1147,1597 1147,1623 1178,1623 1178,1681">
            <text:p/>
          </draw:polyline>
          <draw:polygon draw:style-name="gr10" draw:text-style-name="P9" draw:layer="layout" svg:width="6.235cm" svg:height="1.685cm" svg:x="6.478cm" svg:y="16.739cm" svg:viewBox="0 0 6236 1686" draw:points="5499,1686 5499,1686 0,521 612,596 2460,207 2509,185 2535,185 2566,185 2566,158 2566,127 2535,127 2509,127 2509,101 2482,101 2403,101 2138,52 2328,0 6236,702 6236,1686">
            <text:p/>
          </draw:polygon>
          <draw:polyline draw:style-name="gr8" draw:text-style-name="P2" draw:layer="layout" svg:width="6.279cm" svg:height="1.729cm" svg:x="6.434cm" svg:y="16.739cm" svg:viewBox="0 0 6280 1730" draw:points="0,534 617,636 2478,211 2553,189 2584,158 2526,105 2420,105 2156,57 2345,0 6280,719 6280,1730 5508,1730">
            <text:p/>
          </draw:polyline>
          <draw:polyline draw:style-name="gr8" draw:text-style-name="P2" draw:layer="layout" svg:width="6.279cm" svg:height="1.729cm" svg:x="6.434cm" svg:y="16.739cm" svg:viewBox="0 0 6280 1730" draw:points="5539,1730 5539,1730 0,534 617,609 2478,211 2526,189 2553,189 2584,189 2584,158 2584,132 2553,132 2526,132 2526,105 2500,105 2420,105 2156,57 2345,0 6280,719 6280,1730">
            <text:p/>
          </draw:polyline>
          <draw:polygon draw:style-name="gr11" draw:text-style-name="P10" draw:layer="layout" svg:width="2.91cm" svg:height="1.468cm" svg:x="2.862cm" svg:y="8.652cm" svg:viewBox="0 0 2911 1469" draw:points="0,463 0,463 26,463 52,436 83,410 110,410 132,388 158,361 211,308 260,260 317,202 343,176 370,176 392,149 418,149 449,127 476,101 524,101 551,74 604,74 657,48 683,48 736,48 784,22 815,22 868,22 917,22 970,22 1027,0 1102,0 1159,0 1208,0 1261,0 1309,0 1393,22 1441,22 1495,22 1575,48 1681,48 1760,74 1813,101 1835,101 1861,101 1888,127 1919,127 1967,149 2020,202 2077,229 2095,277 2126,277 2152,308 2179,308 2205,335 2285,361 2311,388 2338,388 2413,410 2492,436 2571,463 2620,489 2704,515 2779,537 2805,537 2805,564 2836,564 2836,590 2862,590 2862,617 2884,643 2884,665 2911,692 2911,718 2911,777 2884,718 2884,692 2862,665 2836,643 2805,617 2779,617 2752,590 2730,564 2704,564 2677,537 2651,515 2620,515 2598,515 2571,489 2545,489 2518,489 2470,463 2413,463 2360,436 2311,436 2227,436 2179,436 2152,410 2126,388 2095,361 2077,361 2020,335 1945,308 1888,277 1813,260 1734,229 1654,202 1575,202 1495,176 1441,176 1367,176 1287,149 1208,149 1177,149 1128,176 1075,176 1001,176 970,176 943,202 943,176 970,176 1001,176 1027,176 1075,202 1102,202 1128,202 1102,202 1075,202 1049,202 1027,229 970,229 943,229 917,260 895,277 917,277 943,308 970,308 943,308 895,308 868,308 842,335 815,335 784,361 762,361 762,388 784,388 815,388 868,361 895,361 917,361 943,388 970,410 1001,410 1049,388 1102,388 1159,388 1287,388 1367,388 1393,410 1419,436 1469,463 1469,489 1469,463 1495,436 1495,410 1522,410 1553,436 1575,436 1628,463 1703,489 1734,515 1786,537 1861,564 1919,564 1994,643 2020,643 2047,665 2095,665 2152,665 2179,665 2227,692 2285,692 2311,718 2285,692 2254,665 2227,665 2205,643 2179,643 2152,617 2152,590 2152,564 2152,537 2179,515 2205,489 2254,489 2311,489 2413,489 2443,489 2492,515 2518,515 2571,515 2571,537 2598,537 2620,564 2620,590 2620,617 2598,643 2620,643 2651,665 2677,665 2704,692 2704,718 2730,718 2730,750 2752,777 2752,799 2752,825 2779,878 2779,927 2598,718 2571,718 2571,750 2545,777 2545,799 2518,825 2518,852 2492,825 2470,777 2443,750 2413,718 2386,718 2413,750 2443,777 2492,852 2545,927 2545,953 2571,979 2598,979 2620,979 2651,979 2677,1006 2704,1006 2730,1032 2752,1032 2779,1054 2752,1081 2752,1107 2730,1134 2704,1182 2704,1209 2677,1240 2651,1266 2620,1293 2598,1315 2545,1341 2492,1394 2470,1394 2443,1420 2413,1442 2386,1469 2360,1442 2360,1420 2338,1394 2338,1341 2311,1315 2311,1293 2285,1240 2285,1209 2254,1160 2227,1160 2205,1182 2179,1209 2152,1240 2126,1293 2126,1266 2126,1240 2126,1209 2152,1182 2152,1160 2152,1134 2179,1134 2179,1107 2095,1182 2095,1160 2095,1134 2095,1107 2095,1081 2077,1081 2047,1054 2020,1032 1994,1006 1994,979 1967,979 1967,953 1945,953 1945,852 1919,852 1919,825 1888,825 1888,799 1861,777 1861,750 1835,750 1835,718 1813,692 1813,665 1813,904 1760,953 1734,979 1703,1006 1703,1032 1681,1032 1654,1054 1628,1054 1654,1032 1654,1006 1681,953 1681,927 1681,878 1703,852 1703,825 1703,799 1681,799 1681,825 1681,852 1654,852 1654,878 1654,904 1654,927 1654,953 1628,904 1628,852 1628,825 1601,799 1601,777 1628,777 1628,750 1601,750 1575,750 1553,718 1522,718 1495,718 1469,750 1419,777 1367,825 1336,825 1309,852 1309,825 1336,799 1336,777 1336,718 1309,750 1287,777 1261,799 1208,799 1177,825 1159,852 1128,852 1159,825 1159,799 1159,777 1102,750 1049,718 1001,692 943,692 917,665 895,665 868,665 842,665 815,665 784,692 736,692 709,718 657,643 604,643 551,643 524,643 502,643 476,643 476,617 502,564 476,564 449,564 449,537 418,515 418,489 418,463 449,436 449,410 449,388 476,388 476,335 502,308 370,361 317,410 238,436 185,463 158,489 110,515 83,537 52,564 26,590 0,617 52,590 83,537 185,463 260,361 317,308 343,277 317,308 291,335 260,335 238,361 185,388 132,410 83,436 26,463">
            <text:p/>
          </draw:polygon>
          <draw:polyline draw:style-name="gr8" draw:text-style-name="P2" draw:layer="layout" svg:width="2.955cm" svg:height="1.513cm" svg:x="2.818cm" svg:y="8.652cm" svg:viewBox="0 0 2956 1514" draw:points="0,477 83,450 348,180 560,79 931,0 1359,0 1707,48 1919,105 2183,317 2317,370 2718,534 2824,556 2877,556 2956,715 2956,799 2850,583 2422,450 2242,450 2214,450 2183,419 2108,370 1919,286 1465,154 1173,154 1015,180 957,211 957,180 1041,180 1121,211 1094,211 957,238 909,286 957,317 909,317 799,370 777,397 799,397 909,370 931,370 957,397 988,419 1015,419 1310,397 1385,397 1416,419 1491,503 1491,419 1548,419 1786,556 1945,583 1998,666 2077,666 2264,715 2347,741 2317,715 2183,636 2183,583 2242,503 2264,503 2422,503 2661,534 2661,636 2639,666 2718,666 2824,847 2824,953 2639,741 2612,772 2555,821 2555,878 2528,821 2453,741 2422,741 2480,772 2586,979 2612,1010 2661,1010 2775,1063 2824,1085 2775,1249 2453,1488 2422,1514 2374,1435 2317,1249 2290,1197 2242,1197 2183,1302 2157,1333 2157,1302 2183,1170 2183,1144 2130,1249 2108,1197 2130,1170 2130,1116 2108,1116 1998,979 1976,979 1976,878 1919,847 1861,741 1839,715 1839,931 1786,979 1681,1085 1654,1085 1681,1037 1729,878 1729,821 1707,821 1681,931 1681,979 1654,931 1623,847 1623,799 1654,772 1597,772 1548,741 1442,799 1332,878 1332,847 1359,772 1359,741 1332,772 1200,878 1147,878 1173,821 1173,799 1094,772 931,688 799,688 718,741 665,666 586,666 511,666 454,636 511,583 480,583 427,556 427,477 480,343 511,317 374,370 110,534 0,636 189,477 348,286 321,343 57,477 0,477 26,477 57,450 83,419 110,419 132,397 158,370 216,317 264,264 321,211 348,180 374,180 401,154 427,154 454,132 480,105 533,105 560,79 617,79 665,48 692,48 750,48 799,22 825,22 882,22 931,22 988,22 1041,0 1121,0 1173,0 1226,0 1279,0 1332,0 1416,22 1465,22 1517,22 1597,48 1707,48 1786,79 1839,105 1861,105 1892,105 1919,132 1945,132 1998,154 2051,211 2108,238 2130,286 2157,286 2183,317 2214,317 2242,343 2317,370 2347,397 2374,397 2453,419 2528,450 2612,477 2661,503 2744,534 2824,556 2850,556 2850,583 2877,583 2877,609 2908,609 2908,636 2930,666 2930,688 2956,715 2956,741 2956,799 2930,741 2930,715 2908,688 2877,666 2850,636 2824,636 2797,609 2775,583 2744,583 2718,556 2691,534 2661,534 2639,534 2612,503 2586,503 2555,503 2506,477 2453,477 2396,450 2347,450 2264,450 2214,450 2183,419 2157,397 2130,370 2108,370 2051,343 1976,317 1919,286 1839,264 1756,238 1681,211 1597,211 1517,180 1465,180 1385,180 1310,154 1226,154 1200,154 1147,180 1094,180 1015,180 988,180 957,211 957,180 988,180 1015,180 1041,180 1094,211 1121,211 1147,211 1121,211 1094,211 1063,211 1041,238 988,238 957,238 931,264 909,286 931,286 957,317 988,317 957,317 909,317 882,317 856,343 825,343 799,370 777,370 777,397 799,397 825,397 882,370 909,370 931,370 957,397 988,419 1015,419 1063,397 1121,397 1173,397 1310,397 1385,397 1416,419 1442,450 1491,477 1491,503 1491,477 1517,450 1517,419 1548,419 1575,450 1597,450 1654,477 1729,503 1756,534 1813,556 1892,583 1945,583 2025,666 2051,666 2077,688 2130,688 2183,688 2214,688 2264,715 2317,715 2347,741 2317,715 2290,688 2264,688 2242,666 2214,666 2183,636 2183,609 2183,583 2183,556 2214,534 2242,503 2290,503 2347,503 2453,503 2480,503 2528,534 2555,534 2612,534 2612,556 2639,556 2661,583 2661,609 2661,636 2639,666 2661,666 2691,688 2718,688 2744,715 2744,741 2775,741 2775,772 2797,799 2797,821 2797,847 2824,904 2824,953 2639,741 2612,741 2612,772 2586,799 2586,821 2555,847 2555,878 2528,847 2506,799 2480,772 2453,741 2422,741 2453,772 2480,799 2528,878 2586,953 2586,979 2612,1010 2639,1010 2661,1010 2691,1010 2718,1037 2744,1037 2775,1063 2797,1063 2824,1085 2797,1116 2797,1144 2775,1170 2744,1219 2744,1249 2718,1276 2691,1302 2661,1333 2639,1355 2586,1382 2528,1435 2506,1435 2480,1466 2453,1488 2422,1514 2396,1488 2396,1466 2374,1435 2374,1382 2347,1355 2347,1333 2317,1276 2317,1249 2290,1197 2264,1197 2242,1219 2214,1249 2183,1276 2157,1333 2157,1302 2157,1276 2157,1249 2183,1219 2183,1197 2183,1170 2214,1170 2214,1144 2130,1219 2130,1197 2130,1170 2130,1144 2130,1116 2108,1116 2077,1085 2051,1063 2025,1037 2025,1010 1998,1010 1998,979 1976,979 1976,878 1945,878 1945,847 1919,847 1919,821 1892,799 1892,772 1861,772 1861,741 1839,715 1839,688 1839,931 1786,979 1756,1010 1729,1037 1729,1063 1707,1063 1681,1085 1654,1085 1681,1063 1681,1037 1707,979 1707,953 1707,904 1729,878 1729,847 1729,821 1707,821 1707,847 1707,878 1681,878 1681,904 1681,931 1681,953 1681,979 1654,931 1654,878 1654,847 1623,821 1623,799 1654,799 1654,772 1623,772 1597,772 1575,741 1548,741 1517,741 1491,772 1442,799 1385,847 1359,847 1332,878 1332,847 1359,821 1359,799 1359,741 1332,772 1310,799 1279,821 1226,821 1200,847 1173,878 1147,878 1173,847 1173,821 1173,799 1121,772 1063,741 1015,715 957,715 931,688 909,688 882,688 856,688 825,688 799,715 750,715 718,741 665,666 617,666 560,666 533,666 511,666 480,666 480,636 511,583 480,583 454,583 454,556 427,534 427,503 427,477 454,450 454,419 454,397 480,397 480,343 511,317 374,370 321,419 242,450 189,477 158,503 110,534 83,556 57,583 26,609 0,636 57,609 83,556 189,477 264,370 321,317 348,286 321,317 295,343 264,343 242,370 189,397 132,419 83,450 26,477">
            <text:p/>
          </draw:polyline>
          <draw:g draw:style-name="gr6">
            <draw:g draw:style-name="gr12">
              <draw:polygon draw:style-name="gr13" draw:text-style-name="P11" draw:layer="layout" svg:width="0.141cm" svg:height="0.071cm" svg:x="5.578cm" svg:y="10.164cm" svg:viewBox="0 0 142 72" draw:points="39,72 39,72 142,72 142,48 120,48 120,0 22,0 0,72">
                <text:p/>
              </draw:polygon>
              <draw:polygon draw:style-name="gr13" draw:text-style-name="P11" draw:layer="layout" svg:width="0.172cm" svg:height="0.353cm" svg:x="5.547cm" svg:y="10.354cm" svg:viewBox="0 0 173 354" draw:points="0,0 0,0 0,26 0,48 22,70 45,70 67,93 84,93 22,120 0,212 106,354 106,328 106,306 128,284 151,234 151,212 151,186 151,142 151,93 173,48 173,0">
                <text:p/>
              </draw:polygon>
            </draw:g>
            <draw:g draw:style-name="gr12">
              <draw:polyline draw:style-name="gr8" draw:text-style-name="P2" draw:layer="layout" svg:width="0.185cm" svg:height="0.071cm" svg:x="5.534cm" svg:y="10.164cm" svg:viewBox="0 0 186 72" draw:points="159,72 159,72 159,38 186,38 159,0 26,0 0,72 52,72 186,72 186,38 159,38 159,0 26,0 0,72 52,72">
                <text:p/>
              </draw:polyline>
              <draw:polyline draw:style-name="gr8" draw:text-style-name="P2" draw:layer="layout" svg:width="0.216cm" svg:height="0.397cm" svg:x="5.503cm" svg:y="10.354cm" svg:viewBox="0 0 217 398" draw:points="0,26 26,79 105,106 26,133 0,239 133,398 159,323 190,106 217,0 0,0 0,26 0,57 26,79 57,79 83,106 105,106 26,133 0,239 133,398 133,372 133,345 159,323 190,265 190,239 190,212 190,159 190,106 217,57 217,0 0,0">
                <text:p/>
              </draw:polyline>
            </draw:g>
          </draw:g>
          <draw:polygon draw:style-name="gr9" draw:text-style-name="P8" draw:layer="layout" svg:width="0.622cm" svg:height="0.697cm" svg:x="4.247cm" svg:y="11.95cm" svg:viewBox="0 0 623 698" draw:points="274,0 274,0 300,26 322,26 349,52 375,52 397,74 397,97 424,123 446,149 473,177 473,199 500,225 526,274 553,349 570,402 570,446 597,499 597,553 623,601 623,623 623,676 623,698 597,698 570,698 553,698 526,698 500,676 473,650 446,650 424,623 397,601 375,575 300,499 247,446 199,402 177,402 177,375 149,375 123,349 97,349 97,322 70,322 52,322 26,322 0,322 26,300 52,274 70,274 123,252 177,199 199,199 225,177 225,149 247,149 247,123 274,97 274,74 274,52 274,26">
            <text:p/>
          </draw:polygon>
          <draw:polyline draw:style-name="gr8" draw:text-style-name="P2" draw:layer="layout" svg:width="0.666cm" svg:height="0.741cm" svg:x="4.202cm" svg:y="11.95cm" svg:viewBox="0 0 667 742" draw:points="296,0 455,79 667,530 667,742 535,742 132,344 0,344 105,265 296,132 296,0 322,26 344,26 371,57 402,57 428,79 428,105 455,132 477,158 509,190 509,212 535,239 562,292 588,371 610,428 610,477 641,530 641,588 667,637 667,663 667,720 667,742 641,742 610,742 588,742 562,742 535,720 509,694 477,694 455,663 428,637 402,610 322,530 265,477 212,428 190,428 190,397 158,397 132,371 105,371 105,344 79,344 57,344 26,344 0,344 26,322 57,292 79,292 132,265 190,212 212,212 239,190 239,158 265,158 265,132 296,105 296,79 296,57 296,26">
            <text:p/>
          </draw:polyline>
          <draw:g draw:style-name="gr6">
            <draw:g draw:style-name="gr12">
              <draw:polygon draw:style-name="gr14" draw:text-style-name="P12" draw:layer="layout" svg:width="0.463cm" svg:height="0.115cm" svg:x="4.035cm" svg:y="14.905cm" svg:viewBox="0 0 464 116" draw:points="411,116 411,116 437,99 437,58 464,0 411,0 389,0 318,0 265,17 220,17 194,17 123,99 22,99 22,116 0,116">
                <text:p/>
              </draw:polygon>
              <draw:polygon draw:style-name="gr14" draw:text-style-name="P12" draw:layer="layout" svg:width="5.014cm" svg:height="2.725cm" svg:x="0.838cm" svg:y="12.294cm" svg:viewBox="0 0 5015 2726" draw:points="2532,2726 2532,2726 2589,2642 2642,2567 2748,2435 2849,2280 2907,2223 2955,2148 2955,2174 2955,2201 2981,2223 3008,2201 3039,2148 3114,2047 3171,1989 3193,1963 3220,1941 3246,1914 3246,1888 3273,1888 3299,1888 3321,1857 3352,1857 3378,1831 3405,1831 3453,1808 3511,1782 3564,1782 3586,1756 3612,1756 3643,1729 3669,1729 3744,1703 3776,1681 3803,1681 3851,1654 3878,1623 3904,1623 3935,1597 3983,1570 3983,1548 4010,1522 4010,1495 4036,1495 4036,1465 4010,1438 3983,1465 3961,1465 3904,1522 3851,1522 3829,1548 3803,1548 3776,1548 3718,1495 3744,1495 3776,1465 3803,1465 3803,1438 3829,1416 3829,1390 3851,1362 3878,1336 3904,1309 3904,1287 3935,1261 3961,1230 3983,1230 4010,1203 4036,1177 4067,1177 4094,1177 4094,1203 4116,1230 4116,1261 4142,1230 4169,1230 4195,1261 4195,1287 4169,1309 4142,1362 4142,1390 4195,1336 4226,1287 4248,1261 4275,1230 4301,1203 4327,1203 4327,1177 4358,1177 4380,1177 4407,1177 4433,1203 4460,1203 4486,1203 4508,1203 4566,1230 4592,1230 4698,1230 4698,1261 4698,1287 4724,1336 4724,1362 4799,1336 4857,1336 4883,1336 4905,1336 4932,1336 4962,1362 4989,1362 5015,1390 5015,1336 5015,1309 5015,1261 4989,1230 4989,1203 4962,1155 4932,1128 4932,1102 4905,1102 4883,1071 4883,1045 4830,1023 4799,996 4773,996 4751,970 4698,943 4671,943 4641,917 4592,917 4539,895 4460,868 4486,868 4508,868 4539,868 4566,895 4618,895 4641,895 4671,917 4724,917 4773,943 4830,970 4857,996 4830,970 4799,943 4751,868 4698,811 4641,784 4618,762 4592,736 4566,709 4486,652 4433,604 4358,577 4327,551 4301,524 4226,502 4142,476 4094,445 4010,418 3935,392 3851,370 3776,343 3696,370 3669,370 3643,370 3564,370 3511,370 3431,392 3378,392 3299,392 3246,418 3220,418 3220,445 3193,445 3171,476 3140,476 3114,502 3087,502 3061,502 3039,502 2981,524 2929,524 2880,524 2774,524 2717,524 2664,524 2615,524 2589,524 2558,551 2532,551 2510,551 2483,551 2483,577 2457,577 2426,604 2399,630 2324,683 2245,762 2219,784 2192,811 2166,811 2135,868 2086,917 2033,943 2007,970 1985,970 1954,996 1901,996 1901,1023 1875,1023 1875,996 1844,996 1844,970 1822,970 1822,943 1822,917 1769,943 1716,970 1694,970 1637,996 1610,996 1562,996 1531,996 1478,1023 1451,1023 1403,1023 1372,1023 1345,996 1319,996 1297,996 1271,970 1297,943 1297,895 1297,837 1297,811 1297,784 1080,524 1111,502 1111,476 1111,445 1137,418 1137,392 1164,370 1164,343 1212,317 1212,291 1239,291 1297,238 1345,211 1403,158 1451,132 1531,83 1610,26 1663,0 1637,0 1610,26 1562,26 1531,26 1451,52 1372,83 1271,83 1186,110 1111,110 1005,132 978,132 921,158 873,158 846,185 789,185 767,211 740,238 687,260 657,291 635,291 635,317 608,343 555,370 555,392 529,418 529,445 507,502 476,524 476,551 449,577 449,604 396,683 343,762 291,811 264,868 242,895 185,970 158,996 132,1045 132,1071 110,1128 132,1177 132,1203 110,1230 110,1309 110,1390 52,1548 52,1570 52,1597 52,1654 83,1654 110,1623 110,1681 83,1756 83,1808 26,1888 26,1941 0,2016 0,2073 0,2148 26,2148 52,2122 83,2095 110,2073 158,2047 185,2016 216,2016 242,1989 264,1963 291,1941 317,1888 343,1808 396,1729 423,1654 449,1597 476,1570 476,1548 507,1522 529,1495 555,1495 555,1522 529,1548 529,1570 529,1597 507,1597 507,1623 507,1681 476,1729 476,1782 476,1808 476,1857 449,1888 449,1914 423,1963 423,1989 423,2047 423,2122 423,2174 396,2249 396,2333 374,2355 374,2382 374,2435 374,2466 374,2514 374,2541 374,2567 374,2593 374,2615 449,2466 476,2408 507,2382 507,2355 529,2307 529,2280 555,2249 555,2223 582,2174 608,2148 608,2122 635,2095 657,2073 687,2047 740,1989 789,1963 789,1941 820,1941 873,1914 921,1888 1031,1831 1137,1782 1186,1756 1239,1703 1239,1729 1271,1729 1297,1756 1319,1782 1345,1808 1345,1857 1345,1914 1319,1963 1319,2016 1297,2073 1271,2122 1239,2174 1212,2223 1186,2280 1080,2466 1053,2514 1031,2567 1005,2615 978,2673 1005,2673 1031,2673 1053,2673 1080,2673 1080,2642 1111,2615 1111,2593 1137,2567 1137,2541 1186,2488 1212,2408 1239,2355 1271,2307 1297,2280 1297,2249 1319,2223 1319,2201 1345,2174 1345,2122 1372,2095 1403,2047 1429,2016 1451,2016 1478,1963 1504,1914 1562,1888 1610,1831 1637,1808 1694,1782 1716,1756 1742,1756 1769,1729 1795,1729 1822,1729 1844,1729 1875,1729 1875,1703 1844,1703 1844,1681 1844,1654 1844,1623 1844,1597 1875,1597 1875,1570 1901,1570 1928,1570 1985,1597 2007,1597 2086,1597 2135,1623 2166,1623 2192,1623 2166,1597 2135,1570 2113,1570 2086,1548 2033,1495 2007,1495 1985,1465 2033,1465 2060,1465 2086,1495 2113,1495 2166,1522 2192,1548 2192,1570 2219,1570 2245,1597 2245,1623 2245,1654 2245,1681 2245,1703 2245,1729 2267,1756 2267,1782 2298,1808 2324,1831 2351,1831 2351,1857 2377,1857 2399,1857 2426,1888 2483,1888 2483,1857 2510,1831 2532,1808 2558,1782 2615,1756 2642,1756 2664,1729 2690,1729 2717,1729 2717,1703 2774,1703 2796,1703 2823,1703 2849,1729 2880,1729 2907,1729 2907,1756 2929,1782 2907,1808 2907,1831 2849,1914 2823,1963 2796,2016 2796,2047 2774,2095 2748,2148 2690,2201 2664,2249 2642,2307 2615,2355 2532,2435 2483,2514 2426,2593 2377,2673 2324,2726">
                <text:p/>
              </draw:polygon>
              <draw:polygon draw:style-name="gr14" draw:text-style-name="P12" draw:layer="layout" svg:width="0.622cm" svg:height="0.379cm" svg:x="3.819cm" svg:y="15.064cm" svg:viewBox="0 0 623 380" draw:points="300,380 300,380 327,358 349,358 375,336 375,309 397,309 397,287 424,261 424,239 424,217 450,217 450,189 500,163 526,141 553,141 553,119 575,119 597,97 597,70 623,22 623,0 203,0 177,22 149,22 177,70 203,119 225,163 247,189 225,189 225,217 203,217 177,217 177,239 177,261 177,287 149,287 123,309 97,309 79,336 52,358 0,380">
                <text:p/>
              </draw:polygon>
              <draw:polygon draw:style-name="gr14" draw:text-style-name="P12" draw:layer="layout" svg:width="0.22cm" svg:height="0.11cm" svg:x="3.126cm" svg:y="15.064cm" svg:viewBox="0 0 221 111" draw:points="221,0 221,0 203,35 181,58 155,93 133,111 111,111 92,111 70,111 44,111 22,111 22,93 0,93 0,75 0,58 22,58 22,35 22,17 44,0">
                <text:p/>
              </draw:polygon>
              <draw:polygon draw:style-name="gr14" draw:text-style-name="P12" draw:layer="layout" svg:width="0.591cm" svg:height="0.864cm" svg:x="3.506cm" svg:y="15.487cm" svg:viewBox="0 0 592 865" draw:points="592,0 592,0 517,52 495,52 441,79 415,105 393,127 371,154 371,180 344,207 344,251 318,277 269,304 247,304 247,330 221,330 195,357 168,379 145,405 145,508 168,561 195,587 247,587 292,587 371,587 393,587 415,587 168,684 168,737 168,759 168,785 168,812 145,838 145,865 70,838 70,812 44,812 44,785 22,785 22,759 22,737 22,631 0,561 0,459 22,433 22,379 44,330 70,277 97,233 123,180 123,127 145,105 168,105 168,79 195,79 221,79 247,52 269,26 292,0">
                <text:p/>
              </draw:polygon>
              <draw:polygon draw:style-name="gr14" draw:text-style-name="P12" draw:layer="layout" svg:width="0.273cm" svg:height="1.204cm" svg:x="3.29cm" svg:y="16.528cm" svg:viewBox="0 0 274 1205" draw:points="203,0 203,0 225,22 252,48 252,74 274,127 274,149 274,176 274,277 252,305 225,331 203,384 203,406 186,459 186,512 186,534 186,587 186,618 203,644 203,662 203,693 225,719 225,772 225,821 203,874 203,923 203,976 186,923 159,900 159,874 136,821 114,746 88,719 70,693 48,746 48,821 48,874 48,976 48,1077 48,1157 48,1205 48,1179 48,1157 48,1077 48,1029 22,976 22,900 0,847 0,794 0,746 0,719 48,662 22,561 22,459 22,406 22,331 48,277 48,229 48,176 48,149 70,149 70,127 70,101 88,74 114,48 136,22 159,22 186,0">
                <text:p/>
              </draw:polygon>
            </draw:g>
            <draw:g draw:style-name="gr12">
              <draw:polyline draw:style-name="gr8" draw:text-style-name="P2" draw:layer="layout" svg:width="5.058cm" svg:height="2.924cm" svg:x="0.794cm" svg:y="12.294cm" svg:viewBox="0 0 5059 2925" draw:points="110,1147 132,1041 454,612 586,242 1359,57 1681,0 1491,110 1089,396 1089,533 1306,799 1306,825 1279,957 1279,988 1359,1041 1548,1041 1786,988 1839,931 1839,1041 1972,1041 2183,852 2183,825 2342,692 2479,586 2580,533 3198,533 3273,427 3352,427 3753,374 4129,427 4663,750 4901,1015 4795,957 4605,882 4499,882 4843,988 5059,1253 5059,1412 5033,1385 4949,1359 4901,1359 4795,1385 4764,1385 4764,1359 4711,1253 4605,1253 4473,1226 4394,1196 4367,1226 4261,1306 4178,1412 4178,1385 4235,1306 4235,1279 4208,1253 4178,1253 4151,1279 4151,1253 4129,1196 4072,1196 3834,1438 3834,1491 3780,1517 3753,1517 3807,1575 3834,1575 3997,1491 4045,1465 4072,1465 4072,1575 3834,1729 3484,1839 3246,1945 3008,2237 3008,2259 2981,2211 2717,2555 2448,2925 2289,2925 2289,2846 2743,2259 2876,1945 2955,1813 2902,1729 2717,1729 2554,1839 2479,1914 2373,1914 2267,1756 2267,1623 2135,1491 2003,1491 2025,1517 2157,1597 2210,1650 2183,1650 1945,1597 1861,1597 1861,1707 1888,1756 1861,1756 1707,1756 1359,2104 1332,2237 1225,2475 1089,2713 987,2713 1014,2639 1332,2051 1359,1888 1359,1839 1332,1813 1252,1729 1040,1861 612,2104 511,2422 396,2608 374,2661 396,2608 374,2475 374,2422 396,2343 427,1972 480,1888 480,1839 511,1650 511,1623 560,1575 560,1517 511,1517 264,1994 110,2104 0,2183 0,2051 83,1813 110,1707 110,1650 57,1676 26,1676 26,1650 110,1279 110,1173 110,1147 132,1090 132,1063 158,1015 189,988 242,909 295,825 348,777 396,692 454,612 454,586 480,560 511,511 533,454 533,427 560,396 560,374 612,348 643,321 665,295 692,264 749,242 776,216 798,189 851,189 881,158 930,158 987,132 1014,132 1062,110 1120,110 1195,110 1385,83 1465,57 1548,26 1623,26 1650,0 1681,0 1650,26 1623,26 1548,83 1465,132 1412,158 1359,216 1306,242 1252,295 1225,321 1172,348 1172,374 1146,396 1146,427 1120,454 1120,480 1120,511 1089,533 1306,799 1306,825 1306,852 1306,909 1306,957 1279,988 1306,1015 1332,1015 1359,1015 1385,1041 1412,1041 1465,1041 1491,1041 1548,1015 1575,1015 1623,1015 1650,1015 1707,988 1729,988 1786,957 1839,931 1839,957 1839,988 1861,988 1861,1015 1888,1015 1888,1041 1919,1041 1919,1015 1945,1015 1972,1015 2003,988 2025,988 2051,957 2104,931 2157,882 2183,825 2210,825 2241,799 2267,777 2289,750 2342,692 2373,665 2421,643 2448,612 2479,586 2505,586 2505,560 2532,560 2580,560 2638,533 2686,533 2743,533 2796,533 2902,533 2955,533 3008,533 3034,511 3065,511 3087,511 3114,511 3140,511 3171,480 3198,480 3220,454 3246,454 3246,427 3273,427 3330,396 3352,396 3409,396 3462,396 3542,374 3594,374 3674,374 3727,374 3807,348 3886,374 3970,396 4045,427 4129,454 4178,480 4261,511 4283,511 4341,533 4394,586 4473,612 4526,665 4605,718 4663,777 4738,825 4795,882 4843,957 4901,1015 4870,988 4817,957 4764,931 4711,931 4663,909 4632,909 4605,909 4579,882 4548,882 4526,882 4499,882 4548,909 4579,909 4632,931 4685,931 4711,957 4738,957 4795,988 4817,1015 4870,1041 4927,1063 4927,1090 4949,1121 4976,1147 5002,1173 5033,1196 5033,1226 5033,1253 5059,1279 5059,1328 5059,1359 5059,1412 5033,1385 5002,1385 4976,1359 4949,1359 4927,1359 4901,1359 4843,1359 4817,1385 4764,1385 4764,1359 4738,1306 4738,1279 4738,1253 4632,1253 4605,1253 4548,1226 4526,1226 4473,1226 4447,1196 4416,1196 4394,1196 4367,1196 4341,1226 4310,1253 4283,1279 4235,1359 4178,1412 4178,1385 4208,1328 4235,1306 4235,1279 4208,1253 4178,1253 4151,1279 4151,1253 4129,1226 4129,1196 4103,1196 4072,1196 4045,1226 4019,1253 3997,1253 3970,1279 3939,1306 3913,1359 3886,1385 3864,1412 3864,1438 3834,1465 3834,1491 3807,1491 3780,1517 3753,1517 3807,1575 3834,1575 3864,1575 3886,1544 3939,1544 3997,1491 4019,1491 4045,1465 4072,1491 4072,1517 4045,1517 4045,1544 4019,1575 4019,1597 3997,1597 3970,1623 3939,1650 3913,1650 3886,1676 3834,1707 3780,1729 3700,1756 3674,1756 3616,1782 3594,1813 3542,1813 3484,1839 3436,1861 3409,1861 3352,1888 3330,1888 3330,1914 3303,1914 3273,1914 3273,1945 3246,1972 3198,2020 3140,2077 3114,2126 3065,2183 3034,2237 3008,2259 2981,2237 2981,2211 2981,2183 2933,2237 2902,2259 2818,2370 2770,2475 2686,2581 2638,2661 2554,2771 2505,2846 2479,2903 2448,2925 2399,2925 2373,2925 2342,2925 2316,2903 2289,2903 2289,2877 2316,2846 2316,2819 2342,2793 2342,2771 2399,2713 2479,2581 2532,2528 2611,2449 2664,2370 2717,2259 2743,2237 2770,2183 2796,2126 2818,2077 2818,2051 2849,1994 2876,1945 2902,1888 2933,1861 2933,1839 2955,1813 2933,1782 2902,1756 2876,1756 2849,1729 2818,1729 2796,1729 2743,1729 2717,1756 2686,1756 2664,1782 2638,1782 2580,1813 2554,1839 2532,1861 2505,1888 2505,1914 2448,1914 2421,1888 2399,1888 2373,1888 2373,1861 2342,1861 2316,1839 2289,1813 2289,1782 2267,1756 2267,1729 2267,1707 2267,1676 2267,1650 2267,1623 2241,1597 2210,1597 2210,1575 2183,1544 2157,1544 2135,1517 2104,1517 2077,1491 2051,1491 2003,1491 2025,1517 2051,1517 2104,1575 2135,1597 2157,1597 2183,1623 2210,1650 2183,1650 2157,1650 2104,1623 2025,1623 2003,1623 1945,1597 1919,1597 1888,1597 1888,1623 1861,1623 1861,1650 1861,1676 1861,1707 1861,1729 1888,1729 1888,1756 1861,1756 1839,1756 1813,1756 1786,1756 1756,1782 1729,1782 1707,1813 1650,1839 1623,1861 1597,1888 1575,1914 1517,1945 1491,1994 1465,2051 1412,2077 1385,2126 1359,2152 1359,2211 1332,2237 1332,2259 1306,2290 1306,2317 1279,2343 1252,2392 1225,2449 1195,2528 1146,2581 1120,2639 1120,2661 1089,2687 1089,2713 1062,2713 1040,2713 1014,2713 987,2713 1014,2661 1040,2608 1062,2555 1089,2506 1195,2317 1252,2211 1279,2152 1306,2104 1332,2051 1332,2020 1332,1994 1359,1972 1359,1945 1359,1914 1359,1888 1359,1839 1359,1813 1332,1813 1306,1782 1279,1756 1252,1756 1252,1729 1195,1782 1146,1813 1040,1861 930,1914 881,1945 824,1972 798,1994 749,2020 718,2051 692,2077 665,2104 643,2126 612,2152 586,2211 560,2259 560,2290 533,2317 533,2343 511,2392 511,2422 454,2506 374,2661 374,2608 374,2581 374,2555 374,2506 374,2475 374,2449 374,2422 374,2392 396,2370 396,2290 427,2211 427,2152 427,2077 427,2051 427,2020 427,1994 454,1945 454,1914 480,1888 480,1839 480,1813 480,1756 511,1707 511,1650 511,1623 533,1623 533,1597 533,1575 560,1544 560,1517 533,1517 511,1544 480,1575 480,1597 427,1676 396,1756 348,1839 321,1914 295,1972 264,1994 242,2020 216,2051 189,2051 158,2077 110,2104 57,2152 26,2183 0,2183 0,2104 0,2051 26,1972 26,1914 83,1839 83,1782 110,1707 110,1650 83,1676 57,1676 57,1623 57,1575 110,1412 110,1328 110,1253 132,1226 132,1196">
                <text:p/>
              </draw:polyline>
              <draw:polyline draw:style-name="gr8" draw:text-style-name="P2" draw:layer="layout" svg:width="1.067cm" svg:height="1.49cm" svg:x="3.431cm" svg:y="14.905cm" svg:viewBox="0 0 1068 1491" draw:points="48,1248 48,1248 0,1196 0,1063 48,1010 163,799 185,692 238,692 476,476 533,476 533,427 533,396 583,370 613,370 583,343 507,238 507,180 533,180 561,158 583,132 697,132 772,26 830,26 1041,0 1068,0 1010,180 962,295 935,295 803,396 803,502 427,714 401,799 401,847 370,878 317,904 211,957 185,1010 185,1116 211,1196 268,1196 449,1226 476,1226 211,1301 211,1381 211,1434 185,1491 132,1465 48,1407 48,1359 48,1248 26,1169 26,1063 48,1037 48,979 79,931 105,878 132,825 163,772 163,714 185,692 211,665 238,665 268,665 295,635 295,608 343,582 401,560 427,533 449,502 476,502 507,476 533,476 533,449 533,427 533,396 561,396 583,396 583,370 613,370 583,343 561,295 533,238 507,211 507,180 533,180 561,158 583,158 583,132 697,132 772,26 803,26 852,26 904,0 984,0 1010,0 1068,0 1041,79 1041,132 1010,158 1010,211 984,238 984,264 962,295 935,295 935,317 904,317 878,343 830,370 830,396 803,396 803,427 803,449 772,476 772,502 746,502 746,533 719,533 697,560 640,608 561,635 533,665 507,692 476,692 449,714 427,740 427,772 401,799 401,847 370,878 317,904 295,904 295,931 268,931 238,957 211,979 185,1010 185,1116 211,1169 238,1196 295,1196 343,1196 427,1196 449,1196 476,1196 211,1301 211,1359 211,1381 211,1407 211,1434 185,1465 185,1491 105,1465 105,1434 79,1434 79,1407 48,1407 48,1381 48,1359">
                <text:p/>
              </draw:polyline>
              <draw:polyline draw:style-name="gr8" draw:text-style-name="P2" draw:layer="layout" svg:width="0.318cm" svg:height="1.248cm" svg:x="3.246cm" svg:y="16.528cm" svg:viewBox="0 0 319 1249" draw:points="234,0 293,48 319,154 319,286 266,344 186,534 186,609 234,666 266,746 266,847 234,1011 159,847 84,715 26,772 26,878 52,1201 52,1170 0,821 0,746 26,688 26,640 26,503 26,238 106,0 234,0 266,22 293,48 293,79 319,132 319,154 319,185 319,286 293,318 266,344 234,402 234,424 212,477 212,534 212,556 212,609 212,640 234,666 234,688 234,715 266,746 266,799 266,847 234,904 234,954 234,1011 212,954 186,931 186,904 159,847 133,772 106,746 84,715 52,772 52,847 52,904 52,1011 52,1117 52,1201 52,1249 52,1223 52,1201 52,1117 52,1064 26,1011 26,931 0,878 0,821 0,772 0,746 52,688 26,583 26,477 26,424 26,344 52,286 52,238 52,185 52,154 84,154 84,132 84,105 106,79 133,48 159,22 186,22 212,0">
                <text:p/>
              </draw:polyline>
            </draw:g>
          </draw:g>
          <draw:g draw:style-name="gr6">
            <draw:g draw:style-name="gr12">
              <draw:polygon draw:style-name="gr15" draw:text-style-name="P13" draw:layer="layout" svg:width="2.906cm" svg:height="1.874cm" svg:x="9.357cm" svg:y="9.631cm" svg:viewBox="0 0 2907 1875" draw:points="2823,1875 2823,1875 2907,1068 1411,626 1309,211 652,101 467,1875 0,1875 207,101 207,79 207,52 180,26 154,0 132,0 652,101 467,1875">
                <text:p/>
              </draw:polygon>
              <draw:polygon draw:style-name="gr15" draw:text-style-name="P13" draw:layer="layout" svg:width="3.043cm" svg:height="1.442cm" svg:x="9.538cm" svg:y="14.001cm" svg:viewBox="0 0 3044 1443" draw:points="2885,1443 2885,1443 3044,1395 3044,0 0,591 0,1443">
                <text:p/>
              </draw:polygon>
              <draw:polygon draw:style-name="gr15" draw:text-style-name="P13" draw:layer="layout" svg:width="3.144cm" svg:height="1.79cm" svg:x="9.036cm" svg:y="11.549cm" svg:viewBox="0 0 3145 1791" draw:points="3145,0 3145,0 3039,1376 577,1764 599,1764 599,1742 599,1716 626,1689 626,1663 784,0 317,0 132,1584 105,1614 105,1632 105,1663 74,1689 52,1716 0,1742 577,1791 577,1764 599,1764 599,1742 599,1716 599,1689 626,1663 784,0">
                <text:p/>
              </draw:polygon>
              <draw:polygon draw:style-name="gr15" draw:text-style-name="P13" draw:layer="layout" svg:width="2.906cm" svg:height="0.939cm" svg:x="9.512cm" svg:y="15.487cm" svg:viewBox="0 0 2907 940" draw:points="2907,0 2907,0 0,940 26,0">
                <text:p/>
              </draw:polygon>
            </draw:g>
            <draw:g draw:style-name="gr12">
              <draw:polyline draw:style-name="gr8" draw:text-style-name="P2" draw:layer="layout" svg:width="3.113cm" svg:height="2.469cm" svg:x="9.468cm" svg:y="14.001cm" svg:viewBox="0 0 3114 2470" draw:points="26,608 26,608 3114,0 3114,1434 0,2470 26,608 3114,0 3114,1434 0,2470">
                <text:p/>
              </draw:polyline>
              <draw:polyline draw:style-name="gr8" draw:text-style-name="P2" draw:layer="layout" svg:width="0.983cm" svg:height="3.753cm" svg:x="8.991cm" svg:y="9.631cm" svg:viewBox="0 0 984 3754" draw:points="609,3622 609,3675 587,3754 0,3706 57,3675 105,3595 132,3543 530,105 530,83 530,26 454,0 984,105 636,3622 609,3648 609,3675 609,3706 609,3728 587,3728 587,3754 0,3706 57,3675 79,3648 105,3622 105,3595 105,3573 132,3543 530,105 530,83 530,57 503,26 476,0 454,0 984,105">
                <text:p/>
              </draw:polyline>
              <draw:polyline draw:style-name="gr8" draw:text-style-name="P2" draw:layer="layout" svg:width="2.686cm" svg:height="3.62cm" svg:x="9.578cm" svg:y="9.737cm" svg:viewBox="0 0 2687 3621" draw:points="22,3515 48,3515 48,3572 22,3621 0,3621 2497,3220 2687,987 1169,537 1063,110 396,0 48,3515 48,3542 22,3572 22,3599 22,3621 0,3621 2497,3220 2687,987 1169,537 1063,110 396,0">
                <text:p/>
              </draw:polyline>
            </draw:g>
          </draw:g>
          <draw:g draw:style-name="gr6">
            <draw:g draw:style-name="gr12">
              <draw:polygon draw:style-name="gr16" draw:text-style-name="P14" draw:layer="layout" svg:width="0.194cm" svg:height="0.172cm" svg:x="5.442cm" svg:y="10.592cm" svg:viewBox="0 0 195 173" draw:points="195,128 195,128 83,0 61,0 44,0 22,22 0,22 0,45 22,67 22,84 22,106 22,128 22,173 44,173 61,173 83,173 111,173 133,173 155,151 172,128">
                <text:p/>
              </draw:polygon>
              <draw:polygon draw:style-name="gr16" draw:text-style-name="P14" draw:layer="layout" svg:width="0.146cm" svg:height="0.088cm" svg:x="5.389cm" svg:y="10.354cm" svg:viewBox="0 0 147 89" draw:points="125,0 125,0 102,0 84,17 67,17 67,35 45,35 22,53 0,53 0,71 0,89 22,89 45,71 84,71 102,71 125,53 147,53 125,17">
                <text:p/>
              </draw:polygon>
            </draw:g>
            <draw:g draw:style-name="gr12">
              <draw:polyline draw:style-name="gr8" draw:text-style-name="P2" draw:layer="layout" svg:width="0.212cm" svg:height="0.216cm" svg:x="5.398cm" svg:y="10.592cm" svg:viewBox="0 0 213 217" draw:points="213,159 106,0 80,0 0,26 26,57 26,159 26,217 58,217 165,217">
                <text:p/>
              </draw:polyline>
              <draw:polyline draw:style-name="gr8" draw:text-style-name="P2" draw:layer="layout" svg:width="0.238cm" svg:height="0.216cm" svg:x="5.398cm" svg:y="10.592cm" svg:viewBox="0 0 239 217" draw:points="239,159 239,159 105,0 79,0 57,0 26,26 0,26 0,57 26,83 26,105 26,133 26,159 26,217 57,217 79,217 105,217 133,217 159,217 190,190 212,159">
                <text:p/>
              </draw:polyline>
              <draw:polyline draw:style-name="gr8" draw:text-style-name="P2" draw:layer="layout" svg:width="0.19cm" svg:height="0.132cm" svg:x="5.345cm" svg:y="10.354cm" svg:viewBox="0 0 191 133" draw:points="133,0 133,0 84,26 0,106 0,133 165,80 191,80 165,57 165,0 133,0 111,26 84,26 84,57 58,57 26,80 0,80 0,106 0,133 26,133 58,106 111,106 133,106 165,80 191,80 165,26 165,0">
                <text:p/>
              </draw:polyline>
            </draw:g>
          </draw:g>
          <draw:g draw:style-name="gr6">
            <draw:g draw:style-name="gr12">
              <draw:polygon draw:style-name="gr17" draw:text-style-name="P15" draw:layer="layout" svg:width="6.125cm" svg:height="0.595cm" svg:x="5.764cm" svg:y="12.96cm" svg:viewBox="0 0 6126 596" draw:points="5416,596 5416,596 6051,569 6126,123 3855,472 3458,446 0,0 0,246 2747,596">
                <text:p/>
              </draw:polygon>
              <draw:polygon draw:style-name="gr17" draw:text-style-name="P15" draw:layer="layout" svg:width="1.023cm" svg:height="0.071cm" svg:x="5.896cm" svg:y="13.516cm" svg:viewBox="0 0 1024 72" draw:points="790,72 790,72 1024,48 971,24 918,24 816,24 715,0 688,0 640,0 0,72">
                <text:p/>
              </draw:polygon>
              <draw:polygon draw:style-name="gr17" draw:text-style-name="P15" draw:layer="layout" svg:width="5.278cm" svg:height="0.776cm" svg:x="5.896cm" svg:y="13.6cm" svg:viewBox="0 0 5279 777" draw:points="4617,777 4617,777 4882,728 3564,631 3056,728 2085,578 3056,702 5279,299 5226,198 3056,578 48,145 815,0 0,0 22,101 22,127 48,145 48,171 48,224 48,251 48,273 736,397 48,326 22,503 2134,777">
                <text:p/>
              </draw:polygon>
              <draw:polygon draw:style-name="gr17" draw:text-style-name="P15" draw:layer="layout" svg:width="1.367cm" svg:height="0.163cm" svg:x="5.896cm" svg:y="14.213cm" svg:viewBox="0 0 1368 164" draw:points="1368,164 1368,164 22,0 22,84 0,164">
                <text:p/>
              </draw:polygon>
              <draw:polygon draw:style-name="gr17" draw:text-style-name="P15" draw:layer="layout" svg:width="2.646cm" svg:height="0.071cm" svg:x="8.528cm" svg:y="13.6cm" svg:viewBox="0 0 2647 72" draw:points="2647,0 2647,0 1019,51 891,72 834,72 785,72 733,72 706,72 652,72 599,72 0,0">
                <text:p/>
              </draw:polygon>
              <draw:polygon draw:style-name="gr17" draw:text-style-name="P15" draw:layer="layout" svg:width="3.814cm" svg:height="1.023cm" svg:x="5.68cm" svg:y="14.42cm" svg:viewBox="0 0 3815 1024" draw:points="3815,1024 3815,1024 3815,180 3656,282 1605,0 211,0 211,105 185,233 158,383 105,565 0,1024">
                <text:p/>
              </draw:polygon>
              <draw:polygon draw:style-name="gr17" draw:text-style-name="P15" draw:layer="layout" svg:width="2.461cm" svg:height="0.146cm" svg:x="8.048cm" svg:y="14.42cm" svg:viewBox="0 0 2462 147" draw:points="2462,0 2462,0 1465,147 0,0">
                <text:p/>
              </draw:polygon>
              <draw:polygon draw:style-name="gr17" draw:text-style-name="P15" draw:layer="layout" svg:width="3.814cm" svg:height="0.781cm" svg:x="5.68cm" svg:y="15.487cm" svg:viewBox="0 0 3815 782" draw:points="3788,782 3788,782 3815,0 0,0 0,26 3290,632 3317,632 3343,632 3370,632 3370,654 3370,681 3370,734 3370,782">
                <text:p/>
              </draw:polygon>
              <draw:polygon draw:style-name="gr17" draw:text-style-name="P15" draw:layer="layout" svg:width="0.384cm" svg:height="0.119cm" svg:x="8.661cm" svg:y="16.148cm" svg:viewBox="0 0 385 120" draw:points="385,120 385,120 385,84 385,62 385,39 359,22 337,0 310,0 0,120">
                <text:p/>
              </draw:polygon>
              <draw:polygon draw:style-name="gr17" draw:text-style-name="P15" draw:layer="layout" svg:width="0.379cm" svg:height="0.115cm" svg:x="9.088cm" svg:y="16.312cm" svg:viewBox="0 0 380 116" draw:points="380,0 380,0 380,116 239,75 0,58 0,0">
                <text:p/>
              </draw:polygon>
              <draw:polygon draw:style-name="gr17" draw:text-style-name="P15" draw:layer="layout" svg:width="2.192cm" svg:height="0.97cm" svg:x="6.853cm" svg:y="16.312cm" svg:viewBox="0 0 2193 971" draw:points="2193,0 2193,0 2167,207 2167,229 2140,255 2114,282 2114,308 2083,308 2061,335 2034,335 2034,357 1981,357 1907,383 807,763 238,971 211,971 185,971 158,971 132,971 110,971 79,944 52,918 26,865 26,843 0,816 781,463 1774,0">
                <text:p/>
              </draw:polygon>
            </draw:g>
            <draw:g draw:style-name="gr12">
              <draw:polyline draw:style-name="gr8" draw:text-style-name="P2" draw:layer="layout" svg:width="3.859cm" svg:height="2.258cm" svg:x="5.636cm" svg:y="14.213cm" svg:viewBox="0 0 3860 2259" draw:points="3326,1937 3357,1937 3410,1964 3410,2021 3410,2048 3410,2180 3679,2202 3834,2259 3860,396 3701,529 238,0 238,211 189,454 105,799 0,1301 3326,1937 3357,1937 3384,1937 3410,1937 3410,1964 3410,1995 3410,2048 3410,2180 3679,2202 3834,2259 3860,396 3701,502 238,0 238,79 238,189 216,264 216,343 189,454 158,560 105,799 0,1301">
                <text:p/>
              </draw:polyline>
              <draw:polyline draw:style-name="gr8" draw:text-style-name="P2" draw:layer="layout" svg:width="5.323cm" svg:height="1.094cm" svg:x="5.852cm" svg:y="13.516cm" svg:viewBox="0 0 5324 1095" draw:points="22,189 22,189 22,216 48,322 48,371 740,508 48,428 22,618 3643,1095 4923,857 3594,750 3083,857 2104,693 3083,831 5324,402 5267,296 3083,693 48,238 1062,57 1009,26 714,0 665,0 0,83 22,189 22,216 48,238 48,264 48,322 48,349 48,371 740,508 48,428 22,618 3643,1095 4923,857 3594,750 3083,857 2104,693 3083,831 5324,402 5267,296 3083,693 48,238 1062,57 1009,26 952,26 846,26 740,0 714,0 665,0 0,83">
                <text:p/>
              </draw:polyline>
              <draw:polyline draw:style-name="gr8" draw:text-style-name="P2" draw:layer="layout" svg:width="6.169cm" svg:height="0.745cm" svg:x="5.719cm" svg:y="12.96cm" svg:viewBox="0 0 6170 746" draw:points="3881,508 3881,508 3480,481 0,0 0,264 3374,746 3405,746 3480,746 3616,746 3802,719 6090,613 6170,132 3881,508 3480,481 0,0 0,264 3374,746 3431,746 3480,746 3511,746 3564,746 3616,746 3669,746 3802,719 6090,613 6170,132">
                <text:p/>
              </draw:polyline>
              <draw:polyline draw:style-name="gr8" draw:text-style-name="P2" draw:layer="layout" svg:width="2.236cm" svg:height="1.199cm" svg:x="6.809cm" svg:y="16.148cm" svg:viewBox="0 0 2237 1200" draw:points="799,666 0,1015 26,1094 110,1200 216,1200 242,1178 825,962 1942,560 2048,533 2180,454 2211,379 2237,110 2237,57 2180,0 2153,0 799,644 0,1015 26,1046 26,1068 57,1121 83,1151 110,1178 132,1178 158,1178 189,1178 216,1178 242,1178 825,962 1942,560 2021,533 2078,533 2078,511 2105,511 2127,511 2127,485 2153,485 2153,454 2180,427 2211,401 2211,379 2237,110 2237,83 2237,57 2211,26 2180,0 2153,0">
                <text:p/>
              </draw:polyline>
            </draw:g>
          </draw:g>
          <draw:polygon draw:style-name="gr9" draw:text-style-name="P8" draw:layer="layout" svg:width="3.576cm" svg:height="0.538cm" svg:x="5.918cm" svg:y="14.133cm" svg:viewBox="0 0 3577 539" draw:points="3577,442 3577,442 3418,539 0,70 0,0">
            <text:p/>
          </draw:polygon>
          <draw:g draw:style-name="gr6">
            <draw:g draw:style-name="gr12">
              <draw:polygon draw:style-name="gr13" draw:text-style-name="P11" draw:layer="layout" svg:width="0.137cm" svg:height="0.833cm" svg:x="9.357cm" svg:y="14.609cm" svg:viewBox="0 0 138 834" draw:points="138,834 138,834 138,0 0,127 0,834">
                <text:p/>
              </draw:polygon>
              <draw:polygon draw:style-name="gr13" draw:text-style-name="P11" draw:layer="layout" svg:width="4.132cm" svg:height="3.841cm" svg:x="5.389cm" svg:y="9.45cm" svg:viewBox="0 0 4133 3842" draw:points="26,2130 26,2130 52,2104 83,2077 110,2051 110,2020 110,2003 110,1972 83,1972 83,1945 52,1945 26,1945 26,1919 52,1919 83,1892 110,1892 110,1870 110,1839 110,1813 110,1760 132,1681 158,1628 185,1606 211,1606 242,1606 291,1606 317,1606 343,1606 374,1606 374,1579 392,1579 392,1553 423,1553 423,1522 423,1495 423,1473 392,1447 392,1420 343,1363 343,1341 317,1315 343,1288 343,1262 374,1235 392,1182 392,1156 423,1103 423,1081 423,1054 449,997 449,971 449,895 449,815 449,732 392,679 185,679 185,630 185,604 158,573 158,546 185,524 211,498 211,471 242,445 264,414 264,392 291,366 317,313 317,264 343,207 343,154 343,132 374,207 374,286 374,313 374,366 374,392 374,414 374,445 343,471 343,498 317,524 317,546 291,546 291,573 264,573 242,604 264,604 291,604 317,573 343,573 374,546 374,524 392,524 392,498 392,471 392,445 392,392 392,366 392,313 392,264 392,233 392,207 392,180 374,132 374,105 374,74 374,48 392,48 392,22 423,0 4058,180 4080,180 4107,207 4133,233 4133,264 3741,3657 3741,3684 3710,3710 3710,3732 3710,3759 3684,3789 3662,3816 3635,3816 3635,3842 3609,3842 3578,3842 3551,3842 3551,3816 423,3419 317,3393 242,3393 185,3366 132,3366 110,3366 83,3340 52,3340 26,3318 0,3318 0,3291 26,2443 52,2395 52,2342 52,2311 52,2285 52,2236 26,2183 26,2152">
                <text:p/>
              </draw:polygon>
              <draw:polygon draw:style-name="gr13" draw:text-style-name="P11" draw:layer="layout" svg:width="0.137cm" svg:height="0.939cm" svg:x="9.357cm" svg:y="15.487cm" svg:viewBox="0 0 138 940" draw:points="138,0 138,0 116,940 0,887 0,0">
                <text:p/>
              </draw:polygon>
              <draw:polygon draw:style-name="gr13" draw:text-style-name="P11" draw:layer="layout" svg:width="3.413cm" svg:height="1.182cm" svg:x="5.547cm" svg:y="15.513cm" svg:viewBox="0 0 3414 1183" draw:points="132,0 132,0 132,26 132,52 105,101 105,127 83,180 83,207 52,229 26,255 26,358 26,486 26,569 26,644 26,671 0,697 0,724 0,746 26,746 52,746 83,746 105,746 105,724 158,697 211,644 264,613 291,613 317,596 343,596 366,569 392,569 423,569 449,569 498,569 551,569 608,569 630,538 657,538 683,538 683,512 709,512 736,486 758,437 789,437 815,411 842,384 868,384 868,358 890,358 917,358 948,384 974,384 974,411 1001,411 1001,437 1001,468 1001,486 1001,512 1001,538 1023,538 1049,512 1106,486 1155,468 1181,437 1208,411 1234,411 1265,411 1340,512 1340,538 1340,569 1314,569 1314,596 1283,596 1265,644 1208,671 1181,697 1155,724 1155,746 1181,746 1208,724 1234,724 1265,724 1283,724 1283,746 1314,746 1340,772 1367,772 2364,980 1941,1183 2258,1157 3414,613">
                <text:p/>
              </draw:polygon>
            </draw:g>
            <draw:g draw:style-name="gr12">
              <draw:polyline draw:style-name="gr8" draw:text-style-name="P2" draw:layer="layout" svg:width="4.176cm" svg:height="3.885cm" svg:x="5.345cm" svg:y="9.45cm" svg:viewBox="0 0 4177 3886" draw:points="57,2130 110,2047 110,2025 110,1994 26,1967 26,1941 110,1914 110,1892 110,1861 110,1835 110,1808 110,1729 110,1703 158,1645 216,1623 295,1623 374,1623 396,1597 427,1539 427,1513 427,1491 321,1359 321,1332 396,1226 454,930 454,740 396,687 189,687 189,639 158,555 242,476 348,238 348,132 348,180 374,286 374,449 321,582 264,608 348,608 374,533 396,476 396,264 374,132 348,79 374,79 427,22 427,0 4097,180 4119,180 4177,211 4177,264 3780,3697 3749,3886 3616,3886 3590,3860 427,3459 189,3432 0,3353 0,3326 26,2474 57,2421 57,2338 26,2157 57,2130 83,2100 110,2073 110,2047 110,2025 110,1994 83,1994 83,1967 57,1967 26,1967 26,1941 57,1941 83,1914 110,1914 110,1892 110,1861 110,1835 110,1778 132,1703 158,1645 189,1623 216,1623 242,1623 295,1623 321,1623 348,1623 374,1623 374,1597 396,1597 396,1570 427,1570 427,1539 427,1513 427,1491 396,1465 396,1438 348,1381 348,1359 321,1332 348,1301 348,1275 374,1248 396,1196 396,1169 427,1116 427,1094 427,1063 454,1010 454,979 454,903 454,824 454,740 396,687 189,687 189,639 189,608 158,582 158,555 189,533 216,502 216,476 242,449 264,423 264,396 295,370 321,317 321,264 348,211 348,154 348,132 374,211 374,286 374,317 374,370 374,396 374,423 374,449 348,476 348,502 321,533 321,555 295,555 295,582 264,582 242,608 264,608 295,608 321,582 348,582 374,555 374,533 396,533 396,502 396,476 396,449 396,396 396,370 396,317 396,264 396,238 396,211 396,180 374,132 374,105 374,79 374,48 396,48 396,22 427,0 4097,180 4119,180 4150,211 4177,238 4177,264 3780,3697 3780,3728 3749,3754 3749,3776 3749,3803 3722,3829 3700,3860 3674,3860 3674,3886 3643,3886 3616,3886 3590,3886 3590,3860 427,3459 321,3432 242,3432 189,3406 132,3406 110,3406 83,3375 57,3375 26,3353 0,3353 0,3326 26,2474 57,2421 57,2369 57,2338 57,2311 57,2263 26,2205 26,2179 26,2157">
                <text:p/>
              </draw:polyline>
              <draw:polyline draw:style-name="gr8" draw:text-style-name="P2" draw:layer="layout" svg:width="3.457cm" svg:height="1.252cm" svg:x="5.503cm" svg:y="15.513cm" svg:viewBox="0 0 3458 1253" draw:points="132,57 83,216 26,264 26,454 26,693 0,772 26,772 83,772 216,693 321,612 533,586 665,560 881,370 930,370 1014,427 1014,560 1225,427 1252,427 1278,427 1358,560 1168,750 1168,772 1252,750 1278,750 1300,750 1331,799 1384,799 2395,1015 1967,1253 2289,1196 3458,640 132,0 132,26 132,57 105,105 105,132 83,189 83,216 57,238 26,264 26,370 26,502 26,586 26,666 26,693 0,719 0,750 0,772 26,772 57,772 83,772 105,772 105,750 158,719 216,666 264,640 295,640 321,612 348,612 370,586 396,586 427,586 454,586 502,586 560,586 612,586 635,560 665,560 692,560 692,533 718,533 749,502 771,454 798,454 824,427 851,396 881,396 881,370 903,370 930,370 956,396 987,396 987,427 1014,427 1014,454 1014,480 1014,502 1014,533 1014,560 1036,560 1062,533 1120,502 1168,480 1195,454 1225,427 1252,427 1278,427 1358,533 1358,560 1358,586 1331,586 1331,612 1300,612 1278,666 1225,693 1195,719 1168,750 1168,772 1195,772 1225,750 1252,750 1278,750 1300,750 1300,772 1331,772 1358,799 1384,799 2395,1015 1967,1226 2289,1196 3458,640 132,0">
                <text:p/>
              </draw:polyline>
              <draw:polyline draw:style-name="gr8" draw:text-style-name="P2" draw:layer="layout" svg:width="0.185cm" svg:height="1.861cm" svg:x="9.309cm" svg:y="14.609cm" svg:viewBox="0 0 186 1862" draw:points="0,132 0,132 0,1805 159,1862 186,0 0,132 0,1805 159,1862 186,0">
                <text:p/>
              </draw:polyline>
            </draw:g>
          </draw:g>
          <draw:polygon draw:style-name="gr9" draw:text-style-name="P8" draw:layer="layout" svg:width="3.281cm" svg:height="2.963cm" svg:x="5.737cm" svg:y="9.794cm" svg:viewBox="0 0 3282 2964" draw:points="3177,158 3177,158 339,0 313,0 291,0 264,26 233,52 207,52 207,74 207,105 180,132 180,158 0,2461 0,2488 0,2518 0,2545 0,2571 26,2593 48,2620 74,2620 74,2646 105,2646 2890,2964 2916,2964 2938,2964 2965,2937 2991,2937 2991,2911 3018,2880 3018,2854 3018,2832 3018,2805 3282,339 3282,317 3282,291 3282,260 3282,233 3256,207 3256,185 3229,185 3199,185 3199,158">
            <text:p/>
          </draw:polygon>
          <draw:polyline draw:style-name="gr8" draw:text-style-name="P2" draw:layer="layout" svg:width="3.351cm" svg:height="3.007cm" svg:x="5.666cm" svg:y="9.794cm" svg:viewBox="0 0 3352 3008" draw:points="370,0 343,0 295,0 211,105 211,158 0,2496 0,2527 0,2580 79,2686 132,2686 2955,3008 3004,3008 3087,2924 3087,2849 3352,343 3352,321 3352,264 3295,158 3246,158 370,0 343,0 321,0 295,26 264,57 238,57 238,79 238,105 211,132 211,158 26,2496 26,2527 26,2554 26,2580 26,2611 57,2633 79,2660 105,2660 105,2686 132,2686 2955,3008 2981,3008 3004,3008 3030,2981 3056,2981 3056,2951 3087,2924 3087,2898 3087,2876 3087,2849 3352,343 3352,321 3352,295 3352,264 3352,238 3325,211 3325,189 3295,189 3268,189 3268,158 3246,158">
            <text:p/>
          </draw:polyline>
          <draw:polygon draw:style-name="gr17" draw:text-style-name="P15" draw:layer="layout" svg:width="3.118cm" svg:height="2.805cm" svg:x="5.816cm" svg:y="9.869cm" svg:viewBox="0 0 3119 2806" draw:points="3013,158 3013,158 317,0 291,0 260,0 260,26 233,26 211,52 211,83 185,83 185,110 185,132 0,2339 0,2387 0,2414 0,2440 26,2467 52,2493 83,2493 105,2515 2753,2806 2780,2806 2806,2806 2837,2780 2837,2758 2859,2758 2859,2731 2885,2700 2885,2674 3119,317 3119,291 3119,260 3119,238 3097,211 3097,185 3071,185 3071,158 3044,158">
            <text:p/>
          </draw:polygon>
          <draw:polygon draw:style-name="gr18" draw:text-style-name="P16" draw:layer="layout" svg:width="2.932cm" svg:height="2.699cm" svg:x="6.002cm" svg:y="9.926cm" svg:viewBox="0 0 2933 2700" draw:points="291,0 291,0 260,26 260,52 233,101 207,158 207,207 180,260 180,343 158,392 158,476 132,551 105,737 74,918 48,1103 48,1310 26,1495 26,1676 0,1756 0,1831 0,1914 0,1989 0,2070 0,2123 26,2175 26,2224 26,2281 26,2308 48,2330 74,2330 74,2356 105,2356 132,2383 180,2383 233,2409 313,2409 366,2440 524,2462 705,2489 890,2541 1098,2568 1309,2590 1517,2616 1734,2647 1910,2674 2100,2674 2254,2700 2386,2700 2435,2700 2492,2700 2518,2700 2541,2700 2567,2700 2593,2700 2620,2674 2651,2674 2673,2647 2673,2616 2699,2616 2911,577 2911,445 2933,418 2933,366 2933,317 2933,291 2933,260 2933,233 2933,207 2933,185 2933,158 2911,158 2911,132 2884,132 2752,101 2620,101 2307,74 2148,52 1967,52 1782,26 1601,26 1415,26 1230,0 1049,0 890,0 705,0 551,0 498,0 418,0 339,0">
            <text:p/>
          </draw:polygon>
          <draw:polyline draw:style-name="gr8" draw:text-style-name="P2" draw:layer="layout" svg:width="2.977cm" svg:height="2.743cm" svg:x="5.958cm" svg:y="9.926cm" svg:viewBox="0 0 2978 2744" draw:points="295,0 180,132 0,1517 0,2233 48,2422 1037,2612 2264,2744 2502,2744 2528,2744 2608,2744 2713,2718 2740,2661 2956,586 2978,348 2978,158 2930,132 2502,79 1143,0 449,0 295,0 264,26 264,57 238,105 211,158 211,211 180,264 180,348 158,396 158,480 132,560 105,750 79,931 48,1121 48,1332 26,1517 26,1703 0,1786 0,1861 0,1945 0,2025 0,2101 0,2158 26,2211 26,2264 26,2317 26,2347 48,2370 79,2370 79,2396 105,2396 132,2422 180,2422 238,2449 317,2449 370,2480 533,2502 714,2528 904,2586 1116,2612 1332,2634 1539,2661 1756,2687 1941,2718 2130,2718 2290,2744 2422,2744 2475,2744 2528,2744 2555,2744 2577,2744 2608,2744 2634,2744 2661,2718 2691,2718 2713,2687 2713,2661 2740,2661 2956,586 2956,454 2978,427 2978,370 2978,321 2978,295 2978,264 2978,238 2978,211 2978,189 2978,158 2956,158 2956,132 2930,132 2797,105 2661,105 2339,79 2179,57 1998,57 1808,26 1623,26 1438,26 1248,0 1063,0 904,0 714,0 560,0 502,0 427,0 343,0">
            <text:p/>
          </draw:polyline>
          <draw:g draw:style-name="gr6">
            <draw:g draw:style-name="gr12">
              <draw:polygon draw:style-name="gr19" draw:text-style-name="P17" draw:layer="layout" svg:width="1.336cm" svg:height="1.764cm" svg:x="4.436cm" svg:y="10.328cm" svg:viewBox="0 0 1337 1765" draw:points="1054,26 1054,26 537,0 537,101 361,313 330,313 304,313 277,313 255,286 229,286 202,260 176,233 149,211 127,211 101,211 74,211 74,233 74,260 101,286 22,388 48,388 74,388 74,414 101,414 127,440 127,649 101,649 74,622 48,622 22,622 22,675 22,702 22,728 0,750 0,777 0,803 22,803 22,830 48,856 74,878 101,878 127,878 149,878 149,856 176,856 176,830 176,909 176,962 176,1010 176,1037 176,1063 202,1090 202,1116 202,1138 229,1165 255,1191 304,1266 277,1248 255,1218 229,1218 202,1191 176,1165 149,1138 149,1116 127,1116 127,1090 127,1063 101,1063 101,1037 101,1010 101,1037 101,1063 101,1138 127,1297 127,1323 127,1377 127,1399 127,1452 127,1479 127,1505 127,1554 127,1580 127,1611 149,1638 202,1686 255,1712 277,1739 277,1765 304,1739 330,1712 361,1686 388,1660 405,1638 436,1611 463,1611 489,1580 463,1554 436,1505 405,1452 405,1426 388,1426 388,1399 405,1426 436,1426 436,1452 463,1479 489,1505 515,1527 515,1554 537,1554 537,1580 564,1580 590,1611 617,1611 643,1611 693,1611 719,1611 772,1611 821,1611 847,1611 900,1580 922,1580 949,1554 975,1527 975,1505 975,1479 975,1452 975,1426 975,1399 975,1351 949,1297 949,1266 949,1248 975,1218 1006,1191 1032,1165 1032,1138 1032,1116 1032,1090 1006,1090 1006,1063 975,1063 949,1063 949,1037 975,1037 1006,1010 1032,1010 1032,988 1032,962 1032,935 1032,878 1054,803 1054,750 1054,728 1054,702 1107,649 1134,649 1160,649 1160,675 1182,675 1209,702 1235,702 1262,702 1288,702 1310,675 1337,649 1337,622 1337,600 1310,574 1310,547 1235,440 1209,468 1182,490 1160,490 1134,490 1107,490 1054,490 1032,490 1006,490 1006,440 1006,388 1006,339 975,286 975,260 975,233 949,211 949,185 922,185 922,154 922,127 922,101 949,101 975,79 1032,52 1032,26">
                <text:p/>
              </draw:polygon>
              <draw:polygon draw:style-name="gr19" draw:text-style-name="P17" draw:layer="layout" svg:width="0.516cm" svg:height="0.071cm" svg:x="5.018cm" svg:y="10.116cm" svg:viewBox="0 0 517 72" draw:points="517,15 517,15 491,15 447,15 447,0 420,0 394,0 367,0 322,15 296,36 269,51 247,51 199,36 172,36 150,15 123,15 97,15 74,36 52,51 26,51 0,72 517,72 517,36">
                <text:p/>
              </draw:polygon>
              <draw:polygon draw:style-name="gr19" draw:text-style-name="P17" draw:layer="layout" svg:width="1.124cm" svg:height="1.473cm" svg:x="5.816cm" svg:y="15.884cm" svg:viewBox="0 0 1125 1474" draw:points="255,1474 255,1474 308,1448 357,1399 410,1373 436,1346 463,1320 485,1294 511,1294 537,1245 591,1161 640,1113 693,1010 741,957 768,882 821,830 869,777 896,755 922,728 949,697 975,671 975,644 997,644 1024,622 1050,622 1076,596 1103,596 1103,569 1125,543 1125,516 1125,494 1125,468 1125,441 1103,441 1076,415 1050,415 1024,415 997,415 975,415 949,441 847,516 794,543 768,543 768,569 741,569 719,569 693,569 666,569 693,543 768,494 821,441 896,389 922,366 949,339 975,313 997,286 1024,260 1050,238 1050,211 1050,180 1050,154 1024,127 997,105 975,79 949,52 922,52 896,79 869,105 821,105 768,154 741,180 719,180 719,154 719,127 719,105 719,79 719,52 693,52 693,26 666,26 640,0 613,0 591,26 565,26 537,52 511,52 511,79 485,105 463,127 436,154 410,180 436,211 357,313 357,339 357,389 383,415 383,441 383,468 383,494 410,516 436,516 436,494 463,468 485,468 436,516 410,543 383,569 357,596 335,569 335,543 308,543 308,569 282,569 255,596 255,622 229,622 180,671 101,755 101,777 127,803 127,856 127,904 127,931 127,957 0,1113 26,1113 26,1139 52,1139 52,1161 79,1161 101,1214 154,1294 207,1346">
                <text:p/>
              </draw:polygon>
            </draw:g>
            <draw:g draw:style-name="gr12">
              <draw:polyline draw:style-name="gr8" draw:text-style-name="P2" draw:layer="layout" svg:width="1.38cm" svg:height="1.812cm" svg:x="4.392cm" svg:y="10.328cm" svg:viewBox="0 0 1381 1813" draw:points="1085,26 555,0 555,105 370,348 317,348 132,216 79,216 79,238 105,295 22,396 48,396 105,427 105,454 105,665 22,639 22,718 0,771 0,824 48,855 105,903 154,903 180,855 180,903 180,931 180,1015 180,1094 238,1196 317,1301 238,1253 105,1094 105,1253 132,1517 132,1570 105,1654 211,1729 286,1813 343,1756 476,1654 502,1654 449,1548 401,1438 401,1465 555,1623 639,1654 821,1681 979,1597 1010,1570 1010,1517 1010,1465 979,1301 1010,1253 1063,1169 1063,1147 1063,1121 979,1094 979,1063 1063,1037 1063,1015 1063,988 1063,957 1063,931 1085,855 1085,749 1085,718 1143,665 1169,665 1275,749 1332,718 1381,665 1381,617 1354,560 1275,454 1248,480 1169,502 1063,533 1037,502 1037,480 1037,370 1010,238 953,158 953,132 1037,57 1085,26 555,0 555,105 370,321 343,321 317,321 286,321 264,295 238,295 211,264 180,238 154,216 132,216 105,216 79,216 79,238 79,264 105,295 22,396 48,396 79,396 79,427 105,427 132,454 132,665 105,665 79,639 48,639 22,639 22,692 22,718 22,749 0,771 0,798 0,824 22,824 22,855 48,881 79,903 105,903 132,903 154,903 154,881 180,881 180,855 180,931 180,988 180,1037 180,1063 180,1094 211,1121 211,1147 211,1169 238,1196 264,1226 317,1301 286,1279 264,1253 238,1253 211,1226 180,1196 154,1169 154,1147 132,1147 132,1121 132,1094 105,1094 105,1063 105,1037 105,1063 105,1094 105,1169 132,1332 132,1359 132,1416 132,1438 132,1491 132,1517 132,1548 132,1597 132,1623 132,1654 154,1681 211,1729 264,1756 286,1786 286,1813 317,1786 343,1756 370,1729 401,1703 423,1681 449,1654 476,1654 502,1623 476,1597 449,1548 423,1491 423,1465 401,1465 401,1438 423,1465 449,1465 449,1491 476,1517 502,1548 533,1570 533,1597 555,1597 555,1623 582,1623 608,1654 639,1654 665,1654 715,1654 741,1654 799,1654 847,1654 878,1654 931,1623 953,1623 979,1597 1010,1570 1010,1548 1010,1517 1010,1491 1010,1465 1010,1438 1010,1385 979,1332 979,1301 979,1279 1010,1253 1037,1226 1063,1196 1063,1169 1063,1147 1063,1121 1037,1121 1037,1094 1010,1094 979,1094 979,1063 1010,1063 1037,1037 1063,1037 1063,1015 1063,988 1063,957 1063,903 1085,824 1085,771 1085,749 1085,718 1143,665 1169,665 1200,665 1200,692 1222,692 1248,718 1275,718 1301,718 1332,718 1354,692 1381,665 1381,639 1381,617 1354,586 1354,560 1275,454 1248,480 1222,502 1200,502 1169,502 1143,502 1085,502 1063,502 1037,502 1037,454 1037,396 1037,348 1010,295 1010,264 1010,238 979,216 979,189 953,189 953,158 953,132 953,105 979,105 1010,83 1063,57 1063,26">
                <text:p/>
              </draw:polyline>
              <draw:polyline draw:style-name="gr8" draw:text-style-name="P2" draw:layer="layout" svg:width="1.169cm" svg:height="1.517cm" svg:x="5.772cm" svg:y="15.884cm" svg:viewBox="0 0 1170 1518" draw:points="428,1439 534,1307 666,1148 719,1041 799,909 1016,666 1170,587 1170,481 1122,428 1064,428 958,481 772,587 719,587 693,587 883,428 1091,242 1091,158 1038,110 989,57 958,57 825,158 750,216 750,158 750,110 719,26 666,0 587,0 481,132 428,189 455,216 371,321 371,348 397,481 428,534 503,481 455,534 371,613 349,587 322,587 189,693 105,777 105,799 132,957 132,984 0,1148 26,1148 158,1329 216,1386 264,1518 322,1492 371,1439 428,1413 455,1386 481,1360 503,1329 534,1329 561,1280 613,1197 666,1148 719,1041 772,984 799,909 852,852 905,799 932,777 958,746 989,719 1016,693 1016,666 1038,666 1064,644 1091,644 1122,613 1148,613 1148,587 1170,561 1170,534 1170,512 1170,481 1170,455 1148,455 1122,428 1091,428 1064,428 1038,428 1016,428 989,455 883,534 825,561 799,561 799,587 772,587 750,587 719,587 693,587 719,561 799,512 852,455 932,397 958,374 989,348 1016,321 1038,295 1064,264 1091,242 1091,216 1091,189 1091,158 1064,132 1038,110 1016,83 989,57 958,57 932,83 905,110 852,110 799,158 772,189 750,189 750,158 750,132 750,110 750,83 750,57 719,57 719,26 693,26 666,0 636,0 613,26 587,26 561,57 534,57 534,83 503,110 481,132 455,158 428,189 455,216 371,321 371,348 371,397 397,428 397,455 397,481 397,512 428,534 455,534 455,512 481,481 503,481 455,534 428,561 397,587 371,613 349,587 349,561 322,561 322,587 296,587 264,613 264,644 238,644 189,693 105,777 105,799 132,825 132,882 132,931 132,957 132,984 0,1148 26,1148 26,1174 57,1174 57,1197 83,1197 105,1254 158,1329 216,1386 264,1518">
                <text:p/>
              </draw:polyline>
              <draw:polyline draw:style-name="gr8" draw:text-style-name="P2" draw:layer="layout" svg:width="0.56cm" svg:height="0.106cm" svg:x="4.974cm" svg:y="10.116cm" svg:viewBox="0 0 561 107" draw:points="503,22 455,0 402,0 322,49 296,81 216,81 105,22 83,49 0,107 561,107 561,81 561,49 561,22 534,22 481,22 481,0 455,0 428,0 402,0 349,22 322,49 296,81 264,81 216,49 189,49 158,22 132,22 105,22 83,49 57,81 26,81 0,107 561,107 561,49 561,22">
                <text:p/>
              </draw:polyline>
            </draw:g>
          </draw:g>
          <draw:g draw:style-name="gr12">
            <draw:polyline draw:style-name="gr8" draw:text-style-name="P2" draw:layer="layout" svg:width="3.532cm" svg:height="0.639cm" svg:x="5.666cm" svg:y="15.408cm" svg:viewBox="0 0 3533 640" draw:points="0,0 0,0 3533,640">
              <text:p/>
            </draw:polyline>
            <draw:polyline draw:style-name="gr8" draw:text-style-name="P2" draw:layer="layout" svg:width="3.532cm" svg:height="0.639cm" svg:x="5.666cm" svg:y="15.408cm" svg:viewBox="0 0 3533 640" draw:points="0,0 0,0 3533,640">
              <text:p/>
            </draw:polyline>
            <draw:polyline draw:style-name="gr8" draw:text-style-name="P2" draw:layer="layout" svg:width="3.479cm" svg:height="0.639cm" svg:x="5.719cm" svg:y="15.196cm" svg:viewBox="0 0 3480 640" draw:points="0,0 0,0 3480,640">
              <text:p/>
            </draw:polyline>
            <draw:polyline draw:style-name="gr8" draw:text-style-name="P2" draw:layer="layout" svg:width="3.479cm" svg:height="0.639cm" svg:x="5.719cm" svg:y="15.196cm" svg:viewBox="0 0 3480 640" draw:points="0,0 0,0 3480,640">
              <text:p/>
            </draw:polyline>
            <draw:polyline draw:style-name="gr8" draw:text-style-name="P2" draw:layer="layout" svg:width="3.484cm" svg:height="0.639cm" svg:x="5.693cm" svg:y="15.302cm" svg:viewBox="0 0 3485 640" draw:points="0,0 0,0 3485,640">
              <text:p/>
            </draw:polyline>
            <draw:polyline draw:style-name="gr8" draw:text-style-name="P2" draw:layer="layout" svg:width="3.484cm" svg:height="0.639cm" svg:x="5.693cm" svg:y="15.302cm" svg:viewBox="0 0 3485 640" draw:points="0,0 0,0 3485,640">
              <text:p/>
            </draw:polyline>
          </draw:g>
          <draw:polygon draw:style-name="gr7" draw:text-style-name="P7" draw:layer="layout" svg:width="0.071cm" svg:height="0.071cm" svg:x="5.666cm" svg:y="15.363cm" svg:viewBox="0 0 72 72" draw:points="72,72 72,72 0,72 72,0">
            <text:p/>
          </draw:polygon>
          <draw:polygon draw:style-name="gr7" draw:text-style-name="P7" draw:layer="layout" svg:width="3.488cm" svg:height="0.648cm" svg:x="5.711cm" svg:y="15.381cm" svg:viewBox="0 0 3489 649" draw:points="3489,622 3489,622 3489,649 0,26 0,0">
            <text:p/>
          </draw:polygon>
          <draw:polygon draw:style-name="gr7" draw:text-style-name="P7" draw:layer="layout" svg:width="0cm" svg:height="0.069cm" svg:x="9.199cm" svg:y="16.029cm" svg:viewBox="0 0 0 70" draw:points="0,0 0,0 0,70">
            <text:p/>
          </draw:polygon>
          <draw:polygon draw:style-name="gr7" draw:text-style-name="P7" draw:layer="layout" svg:width="0.071cm" svg:height="0.071cm" svg:x="5.719cm" svg:y="15.174cm" svg:viewBox="0 0 72 72" draw:points="72,72 72,72 0,0 72,0">
            <text:p/>
          </draw:polygon>
          <draw:polygon draw:style-name="gr7" draw:text-style-name="P7" draw:layer="layout" svg:width="3.435cm" svg:height="0.622cm" svg:x="5.764cm" svg:y="15.196cm" svg:viewBox="0 0 3436 623" draw:points="3436,597 3436,597 3436,623 0,22 0,0">
            <text:p/>
          </draw:polygon>
          <draw:polygon draw:style-name="gr7" draw:text-style-name="P7" draw:layer="layout" svg:width="0cm" svg:height="0.069cm" svg:x="9.199cm" svg:y="15.818cm" svg:viewBox="0 0 0 70" draw:points="0,0 0,0 0,70">
            <text:p/>
          </draw:polygon>
          <draw:polygon draw:style-name="gr7" draw:text-style-name="P7" draw:layer="layout" svg:width="0.071cm" svg:height="0.071cm" svg:x="5.693cm" svg:y="15.258cm" svg:viewBox="0 0 72 72" draw:points="72,72 72,72 0,72 0,0 72,0">
            <text:p/>
          </draw:polygon>
          <draw:polygon draw:style-name="gr7" draw:text-style-name="P7" draw:layer="layout" svg:width="3.44cm" svg:height="0.622cm" svg:x="5.737cm" svg:y="15.275cm" svg:viewBox="0 0 3441 623" draw:points="3441,623 3441,623 0,26 0,0">
            <text:p/>
          </draw:polygon>
        </draw:g>
        <draw:g draw:style-name="gr6">
          <draw:g draw:style-name="gr12">
            <draw:ellipse draw:style-name="gr7" draw:text-style-name="P7" draw:layer="layout" svg:width="1.191cm" svg:height="0.212cm" svg:x="10.689cm" svg:y="11.659cm">
              <text:p/>
            </draw:ellipse>
            <draw:polygon draw:style-name="gr7" draw:text-style-name="P7" draw:layer="layout" svg:width="5.949cm" svg:height="5.578cm" svg:x="8.361cm" svg:y="6.213cm" svg:viewBox="0 0 5950 5579" draw:points="0,0 2320,4189 2317,5579 3534,5579 3537,4194 5950,84">
              <text:p/>
            </draw:polygon>
            <draw:ellipse draw:style-name="gr7" draw:text-style-name="P7" draw:layer="layout" svg:width="6.032cm" svg:height="0.503cm" svg:x="8.361cm" svg:y="5.962cm">
              <text:p/>
            </draw:ellipse>
          </draw:g>
          <draw:g draw:style-name="gr12">
            <draw:ellipse draw:style-name="gr7" draw:text-style-name="P7" draw:layer="layout" svg:width="1.195cm" svg:height="0.212cm" svg:x="10.513cm" svg:y="11.505cm">
              <text:p/>
            </draw:ellipse>
            <draw:polygon draw:style-name="gr20" draw:text-style-name="P18" draw:layer="layout" svg:width="5.953cm" svg:height="5.578cm" svg:x="8.184cm" svg:y="6.059cm" svg:viewBox="0 0 5954 5579" draw:points="0,0 2321,4189 2318,5579 3537,5579 3540,4194 5954,84">
              <text:p/>
            </draw:polygon>
            <draw:ellipse draw:style-name="gr20" draw:text-style-name="P18" draw:layer="layout" svg:width="6.032cm" svg:height="0.503cm" svg:x="8.184cm" svg:y="5.808cm">
              <text:p/>
            </draw:ellipse>
          </draw:g>
        </draw:g>
        <draw:frame draw:style-name="gr21" draw:text-style-name="P2" draw:layer="layout" svg:width="5.869cm" svg:height="1.473cm" svg:x="15.072cm" svg:y="6.879cm">
          <draw:text-box>
            <text:list text:style-name="L3">
              <text:list-item>
                <text:p text:style-name="P19"><text:span text:style-name="T8">Analyze</text:span></text:p>
              </text:list-item>
            </text:list>
          </draw:text-box>
        </draw:frame>
        <draw:frame draw:style-name="gr21" draw:text-style-name="P2" draw:layer="layout" svg:width="5.305cm" svg:height="1.473cm" svg:x="15.946cm" svg:y="8.784cm">
          <draw:text-box>
            <text:list text:style-name="L3">
              <text:list-item>
                <text:p text:style-name="P19"><text:span text:style-name="T8">Decide</text:span></text:p>
              </text:list-item>
            </text:list>
          </draw:text-box>
        </draw:frame>
        <draw:frame draw:style-name="gr21" draw:text-style-name="P2" draw:layer="layout" svg:width="6.306cm" svg:height="1.473cm" svg:x="17.11cm" svg:y="10.742cm">
          <draw:text-box>
            <text:list text:style-name="L3">
              <text:list-item>
                <text:p text:style-name="P19"><text:span text:style-name="T8">Transact</text:span></text:p>
              </text:list-item>
            </text:list>
          </draw:text-box>
        </draw:frame>
        <draw:frame draw:style-name="gr21" draw:text-style-name="P2" draw:layer="layout" svg:width="5.239cm" svg:height="1.473cm" svg:x="18.327cm" svg:y="12.965cm">
          <draw:text-box>
            <text:list text:style-name="L3">
              <text:list-item>
                <text:p text:style-name="P19"><text:span text:style-name="T8">Report</text:span></text:p>
              </text:list-item>
            </text:list>
          </draw:text-box>
        </draw:frame>
        <draw:frame draw:style-name="gr1" draw:text-style-name="P2" draw:layer="layout" svg:width="21.908cm" svg:height="3.175cm" svg:x="2.117cm" svg:y="0.265cm">
          <draw:text-box>
            <text:p text:style-name="P1"><text:span text:style-name="T9">New End User </text:span><text:span text:style-name="T9"><text:line-break/></text:span><text:span text:style-name="T9">Decision-Making Model</text:span></text:p>
          </draw:text-box>
        </draw:frame>
        <presentation:notes draw:style-name="dp2">
          <draw:page-thumbnail draw:style-name="gr3" draw:layer="layout" svg:width="13.97cm" svg:height="10.465cm" svg:x="3.81cm" svg:y="2.134cm" draw:page-number="4" presentation:class="page"/>
          <draw:frame presentation:style-name="pr2" draw:text-style-name="P21" draw:layer="layout" svg:width="17.272cm" svg:height="12.573cm" svg:x="2.159cm" svg:y="13.259cm" presentation:class="notes" presentation:user-transformed="true">
            <draw:text-box>
              <text:p text:style-name="P20"><text:span text:style-name="T10">EVERY surviving worker is a decision-maker</text:span></text:p>
              <text:p text:style-name="P20"><text:span text:style-name="T10">Use same terminal/workstation for DSS and OLTP</text:span></text:p>
              <text:p text:style-name="P20"><text:span text:style-name="T10"/></text:p>
              <text:p text:style-name="P20"><text:span text:style-name="T10">Realtime, online, right-now --- no 90-day batch lag time</text:span></text:p>
              <text:p text:style-name="P20"><text:span text:style-name="T10"/></text:p>
              <text:p text:style-name="P20"><text:span text:style-name="T10">We never architected our IS infrastructure to support this</text:span></text:p>
              <text:p text:style-name="P20"><text:span text:style-name="T10"/></text:p>
            </draw:text-box>
          </draw:frame>
        </presentation:notes>
      </draw:page>
      <draw:page draw:name="page5" draw:style-name="dp1" draw:master-page-name="Master0">
        <draw:frame draw:style-name="gr1" draw:text-style-name="P2" draw:layer="layout" svg:width="21.378cm" svg:height="3.175cm" svg:x="2.117cm" svg:y="0.635cm">
          <draw:text-box>
            <text:p text:style-name="P1"><text:span text:style-name="T1">Next Step: <text:s/></text:span><text:span text:style-name="T1"><text:line-break/></text:span><text:span text:style-name="T1">Desktops for Everyone</text:span></text:p>
          </draw:text-box>
        </draw:frame>
        <draw:frame draw:style-name="gr4" draw:text-style-name="P2" draw:layer="layout" svg:width="21.537cm" svg:height="11.642cm" svg:x="3.175cm" svg:y="5.08cm">
          <draw:text-box>
            <text:list text:style-name="L2">
              <text:list-item>
                <text:p text:style-name="P6"><text:span text:style-name="T11">Electronic mail</text:span></text:p>
              </text:list-item>
              <text:list-item>
                <text:p text:style-name="P6"><text:span text:style-name="T11">Intranet applications eliminate paper forms &amp; promote workflow</text:span></text:p>
              </text:list-item>
              <text:list-item>
                <text:p text:style-name="P6"><text:span text:style-name="T11">Personal productivity applications</text:span></text:p>
              </text:list-item>
              <text:list-item>
                <text:p text:style-name="P6"><text:span text:style-name="T11">Data collection and transaction processing</text:span></text:p>
              </text:list-item>
              <text:list-item>
                <text:p text:style-name="P6"><text:span text:style-name="T11">Limited voice and video</text:span></text:p>
              </text:list-item>
            </text:list>
          </draw:text-box>
        </draw:frame>
        <draw:frame draw:style-name="gr5" draw:text-style-name="P2" draw:layer="layout" svg:width="3.854cm" svg:height="3.629cm" svg:x="2.284cm" svg:y="14.887cm">
          <draw:image xlink:href="Pictures/10001850000069D800006381A2F3DD63.wmf" xlink:type="simple" xlink:show="embed" xlink:actuate="onLoad" draw:mime-type="image/x-wmf">
            <text:p/>
          </draw:image>
          <draw:image xlink:href="Pictures/10000001000002D9000002AE8CA11CA8.png" xlink:type="simple" xlink:show="embed" xlink:actuate="onLoad" draw:mime-type="image/png"/>
        </draw:frame>
        <draw:frame draw:style-name="gr5" draw:text-style-name="P2" draw:layer="layout" svg:width="4.445cm" svg:height="2.69cm" svg:x="13.123cm" svg:y="15.703cm">
          <draw:image xlink:href="Pictures/10000D7C000069E500004019F3B70CCC.wmf" xlink:type="simple" xlink:show="embed" xlink:actuate="onLoad" draw:mime-type="image/x-wmf">
            <text:p/>
          </draw:image>
          <draw:image xlink:href="Pictures/100000010000038D00000226EE049374.png" xlink:type="simple" xlink:show="embed" xlink:actuate="onLoad" draw:mime-type="image/png"/>
        </draw:frame>
        <draw:frame draw:style-name="gr5" draw:text-style-name="P2" draw:layer="layout" svg:width="5.503cm" svg:height="2.963cm" svg:x="18.203cm" svg:y="12.272cm">
          <draw:image xlink:href="Pictures/10001B5A000069E5000039229847DE0B.wmf" xlink:type="simple" xlink:show="embed" xlink:actuate="onLoad" draw:mime-type="image/x-wmf">
            <text:p/>
          </draw:image>
          <draw:image xlink:href="Pictures/10000001000003C3000002077743AE6E.png" xlink:type="simple" xlink:show="embed" xlink:actuate="onLoad" draw:mime-type="image/png"/>
        </draw:frame>
        <presentation:notes draw:style-name="dp2">
          <draw:page-thumbnail draw:style-name="gr3"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Master0">
        <draw:frame draw:style-name="gr1" draw:text-style-name="P2" draw:layer="layout" svg:width="21.378cm" svg:height="3.175cm" svg:x="2.117cm" svg:y="0.635cm">
          <draw:text-box>
            <text:p text:style-name="P1"><text:span text:style-name="T1">The World Just Changed!</text:span></text:p>
          </draw:text-box>
        </draw:frame>
        <draw:frame draw:style-name="gr4" draw:text-style-name="P2" draw:layer="layout" svg:width="21.537cm" svg:height="11.642cm" svg:x="3.175cm" svg:y="5.08cm">
          <draw:text-box>
            <text:list text:style-name="L2">
              <text:list-item>
                <text:p text:style-name="P6"><text:span text:style-name="T11">Network Computers (NCs) offer a new style of computing </text:span></text:p>
                <text:list>
                  <text:list-item>
                    <text:p text:style-name="P22"><text:span text:style-name="T7">at lower cost, for more workers</text:span></text:p>
                  </text:list-item>
                </text:list>
              </text:list-item>
              <text:list-item>
                <text:p text:style-name="P6"><text:span text:style-name="T11">Intel &amp; Microsoft respond by changing the PC reference platform to the “NetPC”</text:span></text:p>
                <text:list>
                  <text:list-item>
                    <text:p text:style-name="P22"><text:span text:style-name="T7">Obsoletes existing PCs</text:span></text:p>
                  </text:list-item>
                  <text:list-item>
                    <text:p text:style-name="P22"><text:span text:style-name="T7">Promises more manageability, at lower life cycle costs</text:span></text:p>
                  </text:list-item>
                </text:list>
              </text:list-item>
            </text:list>
          </draw:text-box>
        </draw:frame>
        <draw:frame draw:style-name="gr5" draw:text-style-name="P2" draw:layer="layout" svg:width="3.951cm" svg:height="3.563cm" svg:x="11.642cm" svg:y="14.605cm">
          <draw:image xlink:href="Pictures/100003A8000069EB00005F790262E9E5.wmf" xlink:type="simple" xlink:show="embed" xlink:actuate="onLoad" draw:mime-type="image/x-wmf">
            <text:p/>
          </draw:image>
          <draw:image xlink:href="Pictures/10000001000002E90000029F79E0152F.png" xlink:type="simple" xlink:show="embed" xlink:actuate="onLoad" draw:mime-type="image/png"/>
        </draw:frame>
        <presentation:notes draw:style-name="dp2">
          <draw:page-thumbnail draw:style-name="gr3"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Master0">
        <draw:frame draw:style-name="gr1" draw:text-style-name="P2" draw:layer="layout" svg:width="21.378cm" svg:height="3.175cm" svg:x="2.117cm" svg:y="0.635cm">
          <draw:text-box>
            <text:p text:style-name="P1"><text:span text:style-name="T1">Why Change From </text:span><text:span text:style-name="T1"><text:line-break/></text:span><text:span text:style-name="T1">Today’s PCs?</text:span></text:p>
          </draw:text-box>
        </draw:frame>
        <draw:frame draw:style-name="gr4" draw:text-style-name="P2" draw:layer="layout" svg:width="21.537cm" svg:height="11.642cm" svg:x="3.175cm" svg:y="5.08cm">
          <draw:text-box>
            <text:list text:style-name="L2">
              <text:list-item>
                <text:p text:style-name="P23"><text:span text:style-name="T11">Ask anybody. <text:s/>Client-server costs too much over desktop’s ownership life</text:span></text:p>
              </text:list-item>
              <text:list-item>
                <text:p text:style-name="P23"><text:span text:style-name="T11">Example: <text:s/>Microsoft’s 1997 Plans</text:span></text:p>
                <text:list>
                  <text:list-item>
                    <text:p text:style-name="P24"><text:span text:style-name="T7">Office 97 in first quarter</text:span></text:p>
                  </text:list-item>
                  <text:list-item>
                    <text:p text:style-name="P24"><text:span text:style-name="T7">Windows 97 in third quarter -- whoops, 1998</text:span></text:p>
                  </text:list-item>
                </text:list>
              </text:list-item>
            </text:list>
          </draw:text-box>
        </draw:frame>
        <draw:frame draw:style-name="gr5" draw:text-style-name="P2" draw:layer="layout" svg:width="6.562cm" svg:height="4.802cm" svg:x="8.255cm" svg:y="13.564cm">
          <draw:image xlink:href="Pictures/100038B000006A0A00004DAE1E15C9ED.wmf" xlink:type="simple" xlink:show="embed" xlink:actuate="onLoad" draw:mime-type="image/x-wmf">
            <text:p/>
          </draw:image>
          <draw:image xlink:href="Pictures/100000010000033A0000025D9DF3F3B0.png" xlink:type="simple" xlink:show="embed" xlink:actuate="onLoad" draw:mime-type="image/png"/>
        </draw:frame>
        <presentation:notes draw:style-name="dp2">
          <draw:page-thumbnail draw:style-name="gr3" draw:layer="layout" svg:width="13.97cm" svg:height="10.465cm" svg:x="3.81cm" svg:y="2.134cm" draw:page-number="7" presentation:class="page"/>
          <draw:frame presentation:style-name="pr2" draw:text-style-name="P21" draw:layer="layout" svg:width="17.272cm" svg:height="12.573cm" svg:x="2.159cm" svg:y="13.259cm" presentation:class="notes" presentation:user-transformed="true">
            <draw:text-box>
              <text:list text:style-name="L5">
                <text:list-item>
                  <text:list>
                    <text:list-item>
                      <text:p text:style-name="P25"><text:span text:style-name="T5">User training and “desktop twiddling”</text:span></text:p>
                    </text:list-item>
                    <text:list-item>
                      <text:p text:style-name="P25"><text:span text:style-name="T5">Backup, recovery of desktop disasters</text:span></text:p>
                    </text:list-item>
                    <text:list-item>
                      <text:p text:style-name="P25"><text:span text:style-name="T5">Help desk staffing</text:span></text:p>
                    </text:list-item>
                    <text:list-item>
                      <text:p text:style-name="P25"><text:span text:style-name="T5">Yearly software upgrades -- implemented manually desk by desk …</text:span></text:p>
                    </text:list-item>
                    <text:list-item>
                      <text:p text:style-name="P25"><text:span text:style-name="T5">Followed by retraining</text:span></text:p>
                    </text:list-item>
                    <text:list-item>
                      <text:p text:style-name="P25"><text:span text:style-name="T5">Hardware obsolescence, depreciation and upgrades</text:span></text:p>
                    </text:list-item>
                    <text:list-item>
                      <text:p text:style-name="P25"><text:span text:style-name="T5">Individual desktop software licenses and upgrades</text:span></text:p>
                    </text:list-item>
                  </text:list>
                </text:list-item>
              </text:list>
            </draw:text-box>
          </draw:frame>
        </presentation:notes>
      </draw:page>
      <draw:page draw:name="page8" draw:style-name="dp1" draw:master-page-name="Master0">
        <draw:frame draw:style-name="gr1" draw:text-style-name="P2" draw:layer="layout" svg:width="21.378cm" svg:height="3.175cm" svg:x="2.117cm" svg:y="0.635cm">
          <draw:text-box>
            <text:p text:style-name="P1"><text:span text:style-name="T1">Four PC Strategies</text:span></text:p>
          </draw:text-box>
        </draw:frame>
        <draw:frame draw:style-name="gr4" draw:text-style-name="P2" draw:layer="layout" svg:width="21.537cm" svg:height="11.642cm" svg:x="3.175cm" svg:y="5.08cm">
          <draw:text-box>
            <text:list text:style-name="L2">
              <text:list-item>
                <text:p text:style-name="P26"><text:span text:style-name="T11">No change evolution</text:span></text:p>
              </text:list-item>
              <text:list-item>
                <text:p text:style-name="P26"><text:span text:style-name="T11">NetPC evolution</text:span></text:p>
              </text:list-item>
              <text:list-item>
                <text:p text:style-name="P26"><text:span text:style-name="T11">High-end PC/low-end NC revolution</text:span></text:p>
              </text:list-item>
              <text:list-item>
                <text:p text:style-name="P26"><text:span text:style-name="T11">Windows terminal fantasy</text:span></text:p>
              </text:list-item>
            </text:list>
          </draw:text-box>
        </draw:frame>
        <draw:frame draw:style-name="gr22" draw:text-style-name="P2" draw:layer="layout" svg:width="3.298cm" svg:height="6.266cm" svg:x="20.699cm" svg:y="4.048cm">
          <draw:text-box>
            <text:p text:style-name="P27"><text:span text:style-name="T12">4</text:span></text:p>
          </draw:text-box>
        </draw:frame>
        <presentation:notes draw:style-name="dp2">
          <draw:page-thumbnail draw:style-name="gr3"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Master0">
        <draw:frame draw:style-name="gr1" draw:text-style-name="P2" draw:layer="layout" svg:width="21.378cm" svg:height="3.175cm" svg:x="2.117cm" svg:y="0.635cm">
          <draw:text-box>
            <text:p text:style-name="P1"><text:span text:style-name="T1">#1 No Change</text:span></text:p>
          </draw:text-box>
        </draw:frame>
        <draw:frame draw:style-name="gr4" draw:text-style-name="P2" draw:layer="layout" svg:width="21.537cm" svg:height="11.642cm" svg:x="3.175cm" svg:y="5.08cm">
          <draw:text-box>
            <text:list text:style-name="L2">
              <text:list-item>
                <text:p text:style-name="P28"><text:span text:style-name="T11">Hardware costs fall towards $1,000</text:span></text:p>
              </text:list-item>
              <text:list-item>
                <text:p text:style-name="P28"><text:span text:style-name="T11">Performance of 133MHz Pentium is plenty</text:span></text:p>
              </text:list-item>
              <text:list-item>
                <text:p text:style-name="P28"><text:span text:style-name="T11">Software costs remain stable</text:span></text:p>
              </text:list-item>
              <text:list-item>
                <text:p text:style-name="P28"><text:span text:style-name="T11">Cost of ownership remains (too) high</text:span></text:p>
              </text:list-item>
              <text:list-item>
                <text:p text:style-name="P28"><text:span text:style-name="T11">Issues are known and solved with money</text:span></text:p>
              </text:list-item>
            </text:list>
          </draw:text-box>
        </draw:frame>
        <presentation:notes draw:style-name="dp2">
          <draw:page-thumbnail draw:style-name="gr3"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Master0">
        <draw:frame draw:style-name="gr1" draw:text-style-name="P2" draw:layer="layout" svg:width="21.378cm" svg:height="3.175cm" svg:x="2.117cm" svg:y="0.635cm">
          <draw:text-box>
            <text:p text:style-name="P1"><text:span text:style-name="T1">#2 NetPC Evolution</text:span></text:p>
          </draw:text-box>
        </draw:frame>
        <draw:frame draw:style-name="gr4" draw:text-style-name="P2" draw:layer="layout" svg:width="21.537cm" svg:height="11.642cm" svg:x="3.175cm" svg:y="5.08cm">
          <draw:text-box>
            <text:list text:style-name="L2">
              <text:list-item>
                <text:p text:style-name="P6"><text:span text:style-name="T11">Microsoft / Intel solution: <text:s/>NetPC desktop</text:span></text:p>
                <text:list>
                  <text:list-item>
                    <text:p text:style-name="P22"><text:span text:style-name="T7">Closed case -- no internal upgrades</text:span></text:p>
                  </text:list-item>
                  <text:list-item>
                    <text:p text:style-name="P22"><text:span text:style-name="T7">Intel microprocessor</text:span></text:p>
                  </text:list-item>
                  <text:list-item>
                    <text:p text:style-name="P22"><text:span text:style-name="T7">Microsoft’s new Windows 98 operating system or NT</text:span></text:p>
                  </text:list-item>
                  <text:list-item>
                    <text:p text:style-name="P22"><text:span text:style-name="T7">New “Zero Administration” tools</text:span></text:p>
                  </text:list-item>
                </text:list>
              </text:list-item>
              <text:list-item>
                <text:p text:style-name="P6"><text:span text:style-name="T11">Wintel has a huge monopoly at stake</text:span></text:p>
              </text:list-item>
              <text:list-item>
                <text:p text:style-name="P6"><text:span text:style-name="T11">Note: Wintel created most of the client-server cost “mess”</text:span></text:p>
              </text:list-item>
            </text:list>
          </draw:text-box>
        </draw:frame>
        <presentation:notes draw:style-name="dp2">
          <draw:page-thumbnail draw:style-name="gr3"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Master0">
        <draw:frame draw:style-name="gr1" draw:text-style-name="P2" draw:layer="layout" svg:width="21.378cm" svg:height="3.175cm" svg:x="2.117cm" svg:y="0.635cm">
          <draw:text-box>
            <text:p text:style-name="P1"><text:span text:style-name="T1">Microsoft/Intel NetPC Issues</text:span></text:p>
          </draw:text-box>
        </draw:frame>
        <draw:frame draw:style-name="gr4" draw:text-style-name="P2" draw:layer="layout" svg:width="21.537cm" svg:height="11.642cm" svg:x="3.175cm" svg:y="5.08cm">
          <draw:text-box>
            <text:list text:style-name="L2">
              <text:list-item>
                <text:p text:style-name="P29"><text:span text:style-name="T11">NetPC hardware is brand new</text:span></text:p>
              </text:list-item>
              <text:list-item>
                <text:p text:style-name="P29"><text:span text:style-name="T11">No ability for in-case hardware upgrades or add-ins, except PCMCIA cards</text:span></text:p>
              </text:list-item>
              <text:list-item>
                <text:p text:style-name="P29"><text:span text:style-name="T11">Operating system and administration tools are undelivered, unproven</text:span></text:p>
              </text:list-item>
              <text:list-item>
                <text:p text:style-name="P29"><text:span text:style-name="T11">COO economies only occur if you replace </text:span><text:span text:style-name="T13">all</text:span><text:span text:style-name="T11"> your Wintel PC desktops</text:span></text:p>
              </text:list-item>
            </text:list>
          </draw:text-box>
        </draw:frame>
        <presentation:notes draw:style-name="dp2">
          <draw:page-thumbnail draw:style-name="gr3"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Master0">
        <draw:frame draw:style-name="gr1" draw:text-style-name="P2" draw:layer="layout" svg:width="21.378cm" svg:height="3.175cm" svg:x="2.117cm" svg:y="0.635cm">
          <draw:text-box>
            <text:p text:style-name="P1"><text:span text:style-name="T1">#3 High-end PC/</text:span><text:span text:style-name="T1"><text:line-break/></text:span><text:span text:style-name="T1">Low-end NC Revolution</text:span></text:p>
          </draw:text-box>
        </draw:frame>
        <draw:frame draw:style-name="gr4" draw:text-style-name="P2" draw:layer="layout" svg:width="21.537cm" svg:height="11.642cm" svg:x="3.175cm" svg:y="5.08cm">
          <draw:text-box>
            <text:list text:style-name="L2">
              <text:list-item>
                <text:p text:style-name="P30"><text:span text:style-name="T11">Buy PCs for heavy computing users</text:span></text:p>
              </text:list-item>
              <text:list-item>
                <text:p text:style-name="P30"><text:span text:style-name="T11">Buy Network Computers for everyone else</text:span></text:p>
              </text:list-item>
              <text:list-item>
                <text:p text:style-name="P29"><text:span text:style-name="T11">The likely strategy for those who are changing</text:span></text:p>
              </text:list-item>
            </text:list>
          </draw:text-box>
        </draw:frame>
        <draw:frame draw:style-name="gr5" draw:text-style-name="P2" draw:layer="layout" svg:width="4.895cm" svg:height="4.41cm" svg:x="17.78cm" svg:y="13.335cm">
          <draw:image xlink:href="Pictures/100003A8000069EB00005F790262E9E5.wmf" xlink:type="simple" xlink:show="embed" xlink:actuate="onLoad" draw:mime-type="image/x-wmf">
            <text:p/>
          </draw:image>
          <draw:image xlink:href="Pictures/10000001000002E90000029F79E0152F.png" xlink:type="simple" xlink:show="embed" xlink:actuate="onLoad" draw:mime-type="image/png"/>
        </draw:frame>
        <draw:frame draw:style-name="gr5" draw:text-style-name="P2" draw:layer="layout" svg:width="4.335cm" svg:height="4.194cm" svg:x="3.175cm" svg:y="13.758cm">
          <draw:image xlink:href="Pictures/1000098E00006A010000668B182C70C5.wmf" xlink:type="simple" xlink:show="embed" xlink:actuate="onLoad" draw:mime-type="image/x-wmf">
            <text:p/>
          </draw:image>
          <draw:image xlink:href="Pictures/10000001000002CF000002B79C7D91B1.png" xlink:type="simple" xlink:show="embed" xlink:actuate="onLoad" draw:mime-type="image/png"/>
        </draw:frame>
        <presentation:notes draw:style-name="dp2">
          <draw:page-thumbnail draw:style-name="gr3"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Master0">
        <draw:frame draw:style-name="gr1" draw:text-style-name="P2" draw:layer="layout" svg:width="21.378cm" svg:height="3.175cm" svg:x="2.117cm" svg:y="0.635cm">
          <draw:text-box>
            <text:p text:style-name="P1"><text:span text:style-name="T1">What is Network Computing?</text:span></text:p>
          </draw:text-box>
        </draw:frame>
        <draw:frame draw:style-name="gr4" draw:text-style-name="P2" draw:layer="layout" svg:width="21.537cm" svg:height="11.642cm" svg:x="3.175cm" svg:y="5.08cm">
          <draw:text-box>
            <text:list text:style-name="L2">
              <text:list-item>
                <text:p text:style-name="P31"><text:span text:style-name="T11">Light-weight desktop, home or mobile appliance</text:span></text:p>
              </text:list-item>
              <text:list-item>
                <text:p text:style-name="P31"><text:span text:style-name="T11">Simple client OS runs Internet browser and Java</text:span></text:p>
              </text:list-item>
              <text:list-item>
                <text:p text:style-name="P31"><text:span text:style-name="T11">Networked with Internet standards</text:span></text:p>
              </text:list-item>
              <text:list-item>
                <text:p text:style-name="P31"><text:span text:style-name="T11">Heavy-weight server</text:span></text:p>
                <text:list>
                  <text:list-item>
                    <text:p text:style-name="P32"><text:span text:style-name="T7">HTML and Web browsing for Internet and Intranet</text:span></text:p>
                  </text:list-item>
                  <text:list-item>
                    <text:p text:style-name="P32"><text:span text:style-name="T7">File and print serving, including Java applets</text:span></text:p>
                  </text:list-item>
                </text:list>
              </text:list-item>
              <text:list-item>
                <text:p text:style-name="P31"><text:span text:style-name="T11">New generation of applications based on Java portability</text:span></text:p>
              </text:list-item>
            </text:list>
          </draw:text-box>
        </draw:frame>
        <presentation:notes draw:style-name="dp2">
          <draw:page-thumbnail draw:style-name="gr3"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Master0">
        <draw:frame draw:style-name="gr1" draw:text-style-name="P2" draw:layer="layout" svg:width="21.378cm" svg:height="3.175cm" svg:x="2.117cm" svg:y="0.635cm">
          <draw:text-box>
            <text:p text:style-name="P1"><text:span text:style-name="T1">Network Computer Hardware</text:span></text:p>
          </draw:text-box>
        </draw:frame>
        <draw:frame draw:style-name="gr4" draw:text-style-name="P2" draw:layer="layout" svg:width="21.537cm" svg:height="11.835cm" svg:x="3.175cm" svg:y="5.08cm">
          <draw:text-box>
            <text:list text:style-name="L2">
              <text:list-item>
                <text:p text:style-name="P31"><text:span text:style-name="T11">Desktop minimalism</text:span></text:p>
                <text:list>
                  <text:list-item>
                    <text:p text:style-name="P32"><text:span text:style-name="T7">No hard drive, local applications, user data</text:span></text:p>
                  </text:list-item>
                  <text:list-item>
                    <text:p text:style-name="P32"><text:span text:style-name="T7">Form factor of a hardcover book</text:span></text:p>
                  </text:list-item>
                  <text:list-item>
                    <text:p text:style-name="P32"><text:span text:style-name="T7">Closed-case -- no internal upgrades</text:span></text:p>
                  </text:list-item>
                  <text:list-item>
                    <text:p text:style-name="P32"><text:span text:style-name="T7">Runs Java applications and displays User Interface</text:span></text:p>
                  </text:list-item>
                </text:list>
              </text:list-item>
              <text:list-item>
                <text:p text:style-name="P31"><text:span text:style-name="T11">Servers on steroids</text:span></text:p>
                <text:list>
                  <text:list-item>
                    <text:p text:style-name="P32"><text:span text:style-name="T7">File serving user data, applications, </text:span><text:span text:style-name="T7"><text:line-break/></text:span><text:span text:style-name="T7">desktop graphical look and feel</text:span></text:p>
                  </text:list-item>
                  <text:list-item>
                    <text:p text:style-name="P32"><text:span text:style-name="T7">Runs most application process functionality</text:span></text:p>
                  </text:list-item>
                  <text:list-item>
                    <text:p text:style-name="P32"><text:span text:style-name="T7">Works much harder than server in C-S environment</text:span></text:p>
                  </text:list-item>
                </text:list>
              </text:list-item>
            </text:list>
          </draw:text-box>
        </draw:frame>
        <presentation:notes draw:style-name="dp2">
          <draw:page-thumbnail draw:style-name="gr3"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Master0">
        <draw:frame draw:style-name="gr1" draw:text-style-name="P2" draw:layer="layout" svg:width="21.378cm" svg:height="3.175cm" svg:x="2.117cm" svg:y="0.635cm">
          <draw:text-box>
            <text:p text:style-name="P1"><text:span text:style-name="T1">Network Computer Software</text:span></text:p>
          </draw:text-box>
        </draw:frame>
        <draw:frame draw:style-name="gr4" draw:text-style-name="P2" draw:layer="layout" svg:width="21.537cm" svg:height="11.642cm" svg:x="3.175cm" svg:y="5.08cm">
          <draw:text-box>
            <text:list text:style-name="L2">
              <text:list-item>
                <text:p text:style-name="P6"><text:span text:style-name="T7">Desktop minimalism = fewer features</text:span></text:p>
              </text:list-item>
              <text:list-item>
                <text:p text:style-name="P6"><text:span text:style-name="T7">Real-time operating system in ROM supports</text:span></text:p>
                <text:list>
                  <text:list-item>
                    <text:p text:style-name="P33"><text:span text:style-name="T14">Java virtual machine</text:span></text:p>
                  </text:list-item>
                  <text:list-item>
                    <text:p text:style-name="P33"><text:span text:style-name="T14">TCP/IP</text:span></text:p>
                  </text:list-item>
                  <text:list-item>
                    <text:p text:style-name="P33"><text:span text:style-name="T14">Browser &amp; desktop user interface</text:span></text:p>
                  </text:list-item>
                  <text:list-item>
                    <text:p text:style-name="P33"><text:span text:style-name="T14">Administration tools</text:span></text:p>
                  </text:list-item>
                </text:list>
              </text:list-item>
              <text:list-item>
                <text:p text:style-name="P6"><text:span text:style-name="T7">Runs Java applications downloaded from server or loaded into ROM</text:span></text:p>
              </text:list-item>
              <text:list-item>
                <text:p text:style-name="P6"><text:span text:style-name="T7">Optionally runs terminal and network emulation</text:span></text:p>
                <text:list>
                  <text:list-item>
                    <text:p text:style-name="P32"><text:span text:style-name="T14">Microsoft Windows GUI</text:span></text:p>
                  </text:list-item>
                  <text:list-item>
                    <text:p text:style-name="P32"><text:span text:style-name="T14">3270/5250 front-end terminal emulation</text:span></text:p>
                  </text:list-item>
                </text:list>
              </text:list-item>
            </text:list>
          </draw:text-box>
        </draw:frame>
        <presentation:notes draw:style-name="dp2">
          <draw:page-thumbnail draw:style-name="gr3"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Master0">
        <draw:frame draw:style-name="gr1" draw:text-style-name="P2" draw:layer="layout" svg:width="21.378cm" svg:height="3.175cm" svg:x="2.117cm" svg:y="0.635cm">
          <draw:text-box>
            <text:p text:style-name="P1"><text:span text:style-name="T1">Network Computing Issues</text:span></text:p>
          </draw:text-box>
        </draw:frame>
        <draw:frame draw:style-name="gr4" draw:text-style-name="P2" draw:layer="layout" svg:width="21.537cm" svg:height="11.642cm" svg:x="3.175cm" svg:y="5.08cm">
          <draw:text-box>
            <text:list text:style-name="L2">
              <text:list-item>
                <text:p text:style-name="P6"><text:span text:style-name="T7">Where are the applications?</text:span></text:p>
                <text:list>
                  <text:list-item>
                    <text:p text:style-name="P22"><text:span text:style-name="T14">Java-based office suites are just arriving from Corel, IBM/Lotus and Oracle</text:span></text:p>
                  </text:list-item>
                  <text:list-item>
                    <text:p text:style-name="P22"><text:span text:style-name="T14">Enterprise Application versions are 1998 and beyond from Baan, SAP, Oracle, Peoplesoft, etc.</text:span></text:p>
                  </text:list-item>
                </text:list>
              </text:list-item>
              <text:list-item>
                <text:p text:style-name="P6"><text:span text:style-name="T7">Where are the development tools?</text:span></text:p>
                <text:list>
                  <text:list-item>
                    <text:p text:style-name="P22"><text:span text:style-name="T14">Just arriving from numerous sources</text:span></text:p>
                  </text:list-item>
                  <text:list-item>
                    <text:p text:style-name="P22"><text:span text:style-name="T14">But middleware is generally lacking</text:span></text:p>
                  </text:list-item>
                </text:list>
              </text:list-item>
              <text:list-item>
                <text:p text:style-name="P6"><text:span text:style-name="T7">Co-existence with Windows desktop applications</text:span></text:p>
                <text:list>
                  <text:list-item>
                    <text:p text:style-name="P22"><text:span text:style-name="T14">Timesharing add-ons to NT Server from Citrix, Network Computing Devices, others</text:span></text:p>
                  </text:list-item>
                  <text:list-item>
                    <text:p text:style-name="P22"><text:span text:style-name="T14">Microsoft threatens to do own timesharing add-on</text:span></text:p>
                  </text:list-item>
                </text:list>
              </text:list-item>
            </text:list>
          </draw:text-box>
        </draw:frame>
        <presentation:notes draw:style-name="dp2">
          <draw:page-thumbnail draw:style-name="gr3"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Master0">
        <draw:frame draw:style-name="gr1" draw:text-style-name="P2" draw:layer="layout" svg:width="21.378cm" svg:height="3.175cm" svg:x="2.117cm" svg:y="0.635cm">
          <draw:text-box>
            <text:p text:style-name="P1"><text:span text:style-name="T1">#4 Microsoft Windows Terminal</text:span></text:p>
          </draw:text-box>
        </draw:frame>
        <draw:frame draw:style-name="gr4" draw:text-style-name="P2" draw:layer="layout" svg:width="21.537cm" svg:height="11.642cm" svg:x="3.175cm" svg:y="5.08cm">
          <draw:text-box>
            <text:list text:style-name="L6">
              <text:list-item>
                <text:p text:style-name="P34"><text:span text:style-name="T11">Graphics-only desktop for late 1998, </text:span><text:span text:style-name="T11"><text:line-break/></text:span><text:span text:style-name="T11">if ever</text:span></text:p>
              </text:list-item>
              <text:list-item>
                <text:p text:style-name="P34"><text:span text:style-name="T11">Not a viable strategy for 1997</text:span></text:p>
              </text:list-item>
              <text:list-item>
                <text:p text:style-name="P34"><text:span text:style-name="T11">Microsoft reaction to the good ideas </text:span><text:span text:style-name="T11"><text:line-break/></text:span><text:span text:style-name="T11">of NCs</text:span></text:p>
              </text:list-item>
            </text:list>
          </draw:text-box>
        </draw:frame>
        <presentation:notes draw:style-name="dp2">
          <draw:page-thumbnail draw:style-name="gr3"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Master0">
        <draw:frame draw:style-name="gr1" draw:text-style-name="P2" draw:layer="layout" svg:width="21.378cm" svg:height="3.175cm" svg:x="2.117cm" svg:y="0.635cm">
          <draw:text-box>
            <text:p text:style-name="P1"><text:span text:style-name="T1">Aberdeen Desktop </text:span><text:span text:style-name="T1"><text:line-break/></text:span><text:span text:style-name="T1">Strategies for Mid-1997</text:span></text:p>
          </draw:text-box>
        </draw:frame>
        <draw:frame draw:style-name="gr4" draw:text-style-name="P2" draw:layer="layout" svg:width="22.595cm" svg:height="11.642cm" svg:x="2.54cm" svg:y="5.08cm">
          <draw:text-box>
            <text:list text:style-name="L6">
              <text:list-item>
                <text:p text:style-name="P35"><text:span text:style-name="T15">Dumb-terminal replacement -- NC immediately</text:span></text:p>
              </text:list-item>
              <text:list-item>
                <text:p text:style-name="P35"><text:span text:style-name="T15">Old PC 386/486 replacements -- NC or NetPC?</text:span></text:p>
              </text:list-item>
              <text:list-item>
                <text:p text:style-name="P35"><text:span text:style-name="T15">Light-duty office work -- hard choice of PC or NC</text:span></text:p>
              </text:list-item>
              <text:list-item>
                <text:p text:style-name="P35"><text:span text:style-name="T15">Dedicated application worker -- investigate NC</text:span></text:p>
              </text:list-item>
              <text:list-item>
                <text:p text:style-name="P35"><text:span text:style-name="T15">Heavy Internet/light office -- PC or NC</text:span></text:p>
              </text:list-item>
              <text:list-item>
                <text:p text:style-name="P35"><text:span text:style-name="T15">Heavy office/desktop analyst -- PC usually</text:span></text:p>
              </text:list-item>
            </text:list>
          </draw:text-box>
        </draw:frame>
        <presentation:notes draw:style-name="dp2">
          <draw:page-thumbnail draw:style-name="gr3"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Master0">
        <draw:frame draw:style-name="gr1" draw:text-style-name="P2" draw:layer="layout" svg:width="21.378cm" svg:height="3.175cm" svg:x="2.117cm" svg:y="0.635cm">
          <draw:text-box>
            <text:p text:style-name="P1"><text:span text:style-name="T1">Aberdeen Conclusions</text:span></text:p>
          </draw:text-box>
        </draw:frame>
        <draw:frame draw:style-name="gr4" draw:text-style-name="P2" draw:layer="layout" svg:width="21.378cm" svg:height="11.642cm" svg:x="3.175cm" svg:y="5.08cm">
          <draw:text-box>
            <text:list text:style-name="L6">
              <text:list-item>
                <text:p text:style-name="P36"><text:span text:style-name="T7">Complications require strategic IT planning</text:span></text:p>
              </text:list-item>
              <text:list-item>
                <text:p text:style-name="P36"><text:span text:style-name="T7">Enormous market pressures to lower life-cycle costs and improve worker productivity </text:span></text:p>
              </text:list-item>
              <text:list-item>
                <text:p text:style-name="P36"><text:span text:style-name="T7">Network Computing has arrived. <text:s/></text:span><text:span text:style-name="T7"><text:line-break/></text:span><text:span text:style-name="T7">NCs make sense for many users &amp; applications</text:span></text:p>
              </text:list-item>
              <text:list-item>
                <text:p text:style-name="P36"><text:span text:style-name="T7">Beware of heavy desktop users who spend all day in Excel. <text:s/>An organizational/political issue.</text:span></text:p>
              </text:list-item>
            </text:list>
          </draw:text-box>
        </draw:frame>
        <presentation:notes draw:style-name="dp2">
          <draw:page-thumbnail draw:style-name="gr3" draw:layer="layout" svg:width="13.97cm" svg:height="10.465cm" svg:x="3.81cm" svg:y="2.134cm" draw:page-number="19" presentation:class="page"/>
          <draw:frame presentation:style-name="pr2" draw:text-style-name="P21" draw:layer="layout" svg:width="17.272cm" svg:height="12.573cm" svg:x="2.159cm" svg:y="13.259cm" presentation:class="notes" presentation:user-transformed="true">
            <draw:text-box>
              <text:list text:style-name="L7">
                <text:list-item>
                  <text:p text:style-name="P37"><text:span text:style-name="T16">Buying desktops just got more complicated and </text:span><text:span text:style-name="T16"><text:line-break/></text:span><text:span text:style-name="T16">requires strategic IT planning</text:span></text:p>
                </text:list-item>
                <text:list-item>
                  <text:p text:style-name="P37"><text:span text:style-name="T16">The Wintel desktop as we know it will change dramatically this year as enormous market pressures to lower life-cycle costs and improve worker productivity force Intel and Microsoft to react</text:span></text:p>
                </text:list-item>
                <text:list-item>
                  <text:p text:style-name="P37"><text:span text:style-name="T16">Network Computing has arrived. <text:s/>NCs make sense immediately for dumb terminal replacements, <text:s/>occasional users, and probably dedicated transaction-processing users</text:span></text:p>
                </text:list-item>
                <text:list-item>
                  <text:p text:style-name="P37"><text:span text:style-name="T16">Heavy desktop users who spend all day in Excel will organizationally fight the NC bitterly. <text:s/>Leave them alone.</text:span></text:p>
                </text:list-item>
              </text:list>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5f_0" draw:display-name="Gradient_0" draw:style="linear" draw:start-color="#0000ff" draw:end-color="#ff9900" draw:start-intensity="100%" draw:end-intensity="100%" draw:angle="315deg" draw:border="0%">
      <loext:gradient-stop svg:offset="0" loext:color-type="rgb" loext:color-value="#0000ff"/>
      <loext:gradient-stop svg:offset="1" loext:color-type="rgb" loext:color-value="#ff9900"/>
    </draw:gradient>
    <draw:gradient draw:name="Gradient_5f_1" draw:display-name="Gradient_1" draw:style="linear" draw:start-color="#676767" draw:end-color="#ffffff" draw:start-intensity="100%" draw:end-intensity="100%" draw:angle="0deg" draw:border="0%">
      <loext:gradient-stop svg:offset="0" loext:color-type="rgb" loext:color-value="#676767"/>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0-background" style:family="presentation">
      <style:graphic-properties draw:stroke="none" draw:fill="none"/>
      <style:text-properties style:letter-kerning="true"/>
    </style:style>
    <style:style style:name="Master0-backgroundobjects" style:family="presentation">
      <style:graphic-properties draw:textarea-horizontal-align="justify" draw:shadow="hidden" draw:shadow-offset-x="0.2cm" draw:shadow-offset-y="0.2cm" draw:shadow-color="#808080"/>
      <style:text-properties style:letter-kerning="true"/>
    </style:style>
    <style:style style:name="Master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0-outline1" style:family="presentation">
      <style:graphic-properties draw:stroke="none" draw:fill="none" draw:auto-grow-height="false" draw:fit-to-size="false" style:shrink-to-fit="true">
        <text:list-style style:name="Master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0-outline2" style:family="presentation" style:parent-style-name="Master0-outline1">
      <style:paragraph-properties fo:margin-top="0.4cm" fo:margin-bottom="0cm"/>
      <style:text-properties fo:font-size="28pt" style:font-size-asian="28pt" style:font-size-complex="28pt"/>
    </style:style>
    <style:style style:name="Master0-outline3" style:family="presentation" style:parent-style-name="Master0-outline2">
      <style:paragraph-properties fo:margin-top="0.3cm" fo:margin-bottom="0cm"/>
      <style:text-properties fo:font-size="24pt" style:font-size-asian="24pt" style:font-size-complex="24pt"/>
    </style:style>
    <style:style style:name="Master0-outline4" style:family="presentation" style:parent-style-name="Master0-outline3">
      <style:paragraph-properties fo:margin-top="0.2cm" fo:margin-bottom="0cm"/>
      <style:text-properties fo:font-size="20pt" style:font-size-asian="20pt" style:font-size-complex="20pt"/>
    </style:style>
    <style:style style:name="Master0-outline5" style:family="presentation" style:parent-style-name="Master0-outline4">
      <style:paragraph-properties fo:margin-top="0.1cm" fo:margin-bottom="0cm"/>
      <style:text-properties fo:font-size="20pt" style:font-size-asian="20pt" style:font-size-complex="20pt"/>
    </style:style>
    <style:style style:name="Master0-outline6" style:family="presentation" style:parent-style-name="Master0-outline5">
      <style:paragraph-properties fo:margin-top="0.1cm" fo:margin-bottom="0cm"/>
      <style:text-properties fo:font-size="20pt" style:font-size-asian="20pt" style:font-size-complex="20pt"/>
    </style:style>
    <style:style style:name="Master0-outline7" style:family="presentation" style:parent-style-name="Master0-outline6">
      <style:paragraph-properties fo:margin-top="0.1cm" fo:margin-bottom="0cm"/>
      <style:text-properties fo:font-size="20pt" style:font-size-asian="20pt" style:font-size-complex="20pt"/>
    </style:style>
    <style:style style:name="Master0-outline8" style:family="presentation" style:parent-style-name="Master0-outline7">
      <style:paragraph-properties fo:margin-top="0.1cm" fo:margin-bottom="0cm"/>
      <style:text-properties fo:font-size="20pt" style:font-size-asian="20pt" style:font-size-complex="20pt"/>
    </style:style>
    <style:style style:name="Master0-outline9" style:family="presentation" style:parent-style-name="Master0-outline8">
      <style:paragraph-properties fo:margin-top="0.1cm" fo:margin-bottom="0cm"/>
      <style:text-properties fo:font-size="20pt" style:font-size-asian="20pt" style:font-size-complex="20pt"/>
    </style:style>
    <style:style style:name="Master0-subtitle" style:family="presentation">
      <style:graphic-properties draw:stroke="none" draw:fill="none" draw:textarea-vertical-align="middle">
        <text:list-style style:name="Master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0-title" style:family="presentation">
      <style:graphic-properties draw:stroke="none" draw:fill="none" draw:textarea-vertical-align="middle">
        <text:list-style style:name="Master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solid" draw:fill-color="#0000ff" draw:opacity="100%" draw:shadow="hidden" loext:decorative="false"/>
    </style:style>
    <style:style style:name="Mgr4" style:family="graphic">
      <style:graphic-properties loext:decorative="false"/>
    </style:style>
    <style:style style:name="Mgr5" style:family="graphic" style:parent-style-name="standard">
      <style:graphic-properties draw:stroke="none" draw:fill="gradient" draw:fill-gradient-name="Gradient_5f_0" draw:shadow="hidden" loext:decorative="false"/>
    </style:style>
    <style:style style:name="Mgr6" style:family="graphic" style:parent-style-name="standard">
      <style:graphic-properties draw:stroke="solid" svg:stroke-width="0.035cm" svg:stroke-color="#ffffff" draw:fill="none" fo:padding-top="0.142cm" fo:padding-bottom="0.142cm" fo:padding-left="0.267cm" fo:padding-right="0.267cm" loext:decorative="false"/>
    </style:style>
    <style:style style:name="Mgr7" style:family="graphic" style:parent-style-name="standard">
      <style:graphic-properties draw:stroke="none" draw:fill="none" fo:min-height="0.935cm" fo:min-width="2.54cm" fo:padding-top="0cm" fo:padding-bottom="0cm" fo:padding-left="0cm" fo:padding-right="0cm" loext:decorative="false"/>
      <style:paragraph-properties style:writing-mode="lr-tb"/>
    </style:style>
    <style:style style:name="Mpr1" style:family="presentation" style:parent-style-name="Master0-backgroundobjects">
      <style:graphic-properties draw:stroke="none" draw:fill="none" draw:fill-color="#ffffff" draw:auto-grow-height="false" fo:min-height="1.397cm" loext:decorative="false"/>
      <style:paragraph-properties style:writing-mode="lr-tb"/>
    </style:style>
    <style:style style:name="Mpr2" style:family="presentation" style:parent-style-name="Master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ff" draw:opacity="100%"/>
    </style:style>
    <style:style style:name="MP6" style:family="paragraph">
      <loext:graphic-properties draw:fill="gradient" draw:fill-gradient-name="Gradient_5f_0"/>
    </style:style>
    <style:style style:name="MP7" style:family="paragraph">
      <loext:graphic-properties draw:fill="none"/>
    </style:style>
    <style:style style:name="MP8" style:family="paragraph">
      <style:paragraph-properties fo:margin-left="0cm" fo:margin-right="0cm" fo:margin-top="0cm" fo:margin-bottom="0cm" fo:line-height="100%" fo:text-align="start" fo:text-indent="0cm"/>
    </style:style>
    <style:style style:name="MT1" style:family="text">
      <style:text-properties fo:color="#99ffff" loext:opacity="100%" style:font-name="Times New Roman" fo:font-size="16pt" fo:font-weight="bold" style:font-name-asian="Times New Roman" style:font-size-asian="16pt" style:font-weight-asian="bold" style:font-name-complex="Times New Roman" style:font-size-complex="16pt" style:font-weight-complex="bold"/>
    </style:style>
    <style:style style:name="MT2" style:family="text">
      <style:text-properties fo:color="#99ffff" loext:opacity="100%" style:font-name="Times New Roman" fo:font-size="16pt" fo:font-style="italic" fo:font-weight="bold" style:font-name-asian="Times New Roman" style:font-size-asian="16pt" style:font-style-asian="italic" style:font-weight-asian="bold" style:font-name-complex="Times New Roman" style:font-size-complex="16pt" style:font-style-complex="italic"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Master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draw:style-name="Mgr3" draw:text-style-name="MP5" draw:layer="layout" svg:width="25.4cm" svg:height="19.05cm" svg:x="0cm" svg:y="0cm">
        <text:p/>
      </draw:rect>
      <draw:g draw:style-name="Mgr4">
        <draw:rect draw:style-name="Mgr5" draw:text-style-name="MP6" draw:layer="layout" svg:width="0.661cm" svg:height="19.015cm" svg:x="0.657cm" svg:y="0cm">
          <text:p/>
        </draw:rect>
        <draw:rect draw:style-name="Mgr5" draw:text-style-name="MP6" draw:layer="layout" svg:width="1.036cm" svg:height="12.965cm" svg:x="1.221cm" svg:y="0cm">
          <text:p/>
        </draw:rect>
        <draw:rect draw:style-name="Mgr5" draw:text-style-name="MP6" draw:layer="layout" svg:width="3.007cm" svg:height="9.313cm" svg:x="0.895cm" svg:y="0cm">
          <text:p/>
        </draw:rect>
        <draw:rect draw:style-name="Mgr5" draw:text-style-name="MP6" draw:layer="layout" svg:width="0.847cm" svg:height="10.795cm" svg:x="1.129cm" svg:y="0cm">
          <text:p/>
        </draw:rect>
        <draw:rect draw:style-name="Mgr5" draw:text-style-name="MP6" draw:layer="layout" svg:width="1.46cm" svg:height="3.387cm" svg:x="1.645cm" svg:y="4.075cm">
          <text:p/>
        </draw:rect>
        <draw:rect draw:style-name="Mgr5" draw:text-style-name="MP6" draw:layer="layout" svg:width="23.958cm" svg:height="0.37cm" svg:x="1.411cm" svg:y="3.916cm">
          <text:p/>
        </draw:rect>
        <draw:line draw:style-name="Mgr6" draw:text-style-name="MP7" draw:layer="layout" svg:x1="0.657cm" svg:y1="3.916cm" svg:x2="25.369cm" svg:y2="3.916cm">
          <text:p/>
        </draw:line>
      </draw:g>
      <draw:frame draw:style-name="Mgr7" draw:text-style-name="MP7" draw:layer="layout" svg:width="4.366cm" svg:height="0.935cm" svg:x="19.57cm" svg:y="17.564cm">
        <draw:text-box>
          <text:p text:style-name="MP8"><text:span text:style-name="MT1">Aberdeen</text:span><text:span text:style-name="MT2">Group</text:span></text:p>
        </draw:text-box>
      </draw:frame>
      <draw:frame presentation:style-name="Master0-title" draw:layer="backgroundobjects" svg:width="22.859cm" svg:height="3.18cm" svg:x="1.27cm" svg:y="0.76cm" presentation:class="title" presentation:placeholder="true">
        <draw:text-box/>
      </draw:frame>
      <draw:frame presentation:style-name="Master0-outline1" draw:layer="backgroundobjects" svg:width="22.859cm" svg:height="11.048cm" svg:x="1.27cm" svg:y="4.457cm" presentation:class="outline" presentation:placeholder="true">
        <draw:text-box/>
      </draw:frame>
      <presentation:notes style:page-layout-name="PM0">
        <draw:page-thumbnail presentation:style-name="Master0-title" draw:layer="backgroundobjects" svg:width="18.624cm" svg:height="10.476cm" svg:x="1.482cm" svg:y="2.123cm" presentation:class="page"/>
        <draw:frame presentation:style-name="Master0-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creator>Peter S. Kastner, Group Vice President</dc:creator>
    <dc:subject>Client-Server vs. Network Computing: Perspectives</dc:subject>
    <dc:title>PCs, NCs, or NetPCs: Where do we go from here?</dc:title>
    <meta:initial-creator>Peter S. Kastner, Group Vice President</meta:initial-creator>
    <meta:keywords>CA desktop PC NC network computing</meta:keywords>
    <meta:generator>LibreOffice/24.2.7.2$Linux_X86_64 LibreOffice_project/420$Build-2</meta:generator>
    <meta:document-statistic meta:object-count="236"/>
  </office:meta>
</office:document-meta>
</file>