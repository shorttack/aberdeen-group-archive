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right="-0.1in" fo:line-height="0.1665in" fo:text-align="center" style:justify-single-word="false">
        <style:tab-stops>
          <style:tab-stop style:position="0.5in"/>
          <style:tab-stop style:position="0.8in"/>
        </style:tab-stops>
      </style:paragraph-properties>
    </style:style>
    <style:style style:name="P2" style:family="paragraph" style:parent-style-name="Standard">
      <style:paragraph-properties fo:margin-right="-0.1in" fo:line-height="0.1665in">
        <style:tab-stops>
          <style:tab-stop style:position="0.5in"/>
          <style:tab-stop style:position="0.9in"/>
          <style:tab-stop style:position="4.5in"/>
        </style:tab-stops>
      </style:paragraph-properties>
    </style:style>
    <style:style style:name="P3" style:family="paragraph" style:parent-style-name="Standard" style:list-style-name="L3">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4" style:family="paragraph" style:parent-style-name="Standard" style:list-style-name="L3">
      <style:paragraph-properties fo:margin-left="0.75in" fo:margin-right="-0.1in" fo:line-height="0.1665in">
        <style:tab-stops>
          <style:tab-stop style:position="0.5in"/>
          <style:tab-stop style:position="0.9in"/>
          <style:tab-stop style:position="4.5in"/>
        </style:tab-stops>
      </style:paragraph-properties>
    </style:style>
    <style:style style:name="P5" style:family="paragraph" style:parent-style-name="Standard">
      <style:paragraph-properties fo:margin-left="0.9in" fo:margin-right="-0.1in" fo:line-height="0.1665in" fo:text-indent="-0.9in" style:auto-text-indent="false">
        <style:tab-stops>
          <style:tab-stop style:position="0.5in"/>
          <style:tab-stop style:position="0.9in"/>
          <style:tab-stop style:position="4.5in"/>
        </style:tab-stops>
      </style:paragraph-properties>
    </style:style>
    <style:style style:name="P6" style:family="paragraph" style:parent-style-name="Standard" style:list-style-name="L4">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7" style:family="paragraph" style:parent-style-name="Standard" style:list-style-name="L4">
      <style:paragraph-properties fo:margin-left="0.75in" fo:margin-right="-0.1in" fo:line-height="0.1665in">
        <style:tab-stops>
          <style:tab-stop style:position="0.5in"/>
          <style:tab-stop style:position="0.9in"/>
          <style:tab-stop style:position="4.5in"/>
        </style:tab-stops>
      </style:paragraph-properties>
    </style:style>
    <style:style style:name="P8" style:family="paragraph" style:parent-style-name="Standard" style:list-style-name="L5">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9" style:family="paragraph" style:parent-style-name="Standard" style:list-style-name="L5">
      <style:paragraph-properties fo:margin-left="0.75in" fo:margin-right="-0.1in" fo:line-height="0.1665in">
        <style:tab-stops>
          <style:tab-stop style:position="0.5in"/>
          <style:tab-stop style:position="0.9in"/>
          <style:tab-stop style:position="4.5in"/>
        </style:tab-stops>
      </style:paragraph-properties>
    </style:style>
    <style:style style:name="P10" style:family="paragraph" style:parent-style-name="Standard" style:list-style-name="L6">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11" style:family="paragraph" style:parent-style-name="Standard" style:list-style-name="L6">
      <style:paragraph-properties fo:margin-left="0.75in" fo:margin-right="-0.1in" fo:line-height="0.1665in">
        <style:tab-stops>
          <style:tab-stop style:position="0.5in"/>
          <style:tab-stop style:position="0.9in"/>
          <style:tab-stop style:position="4.5in"/>
        </style:tab-stops>
      </style:paragraph-properties>
    </style:style>
    <style:style style:name="P12" style:family="paragraph" style:parent-style-name="Standard" style:list-style-name="L7">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13" style:family="paragraph" style:parent-style-name="Standard" style:list-style-name="L7">
      <style:paragraph-properties fo:margin-left="0.75in" fo:margin-right="-0.1in" fo:line-height="0.1665in">
        <style:tab-stops>
          <style:tab-stop style:position="0.5in"/>
          <style:tab-stop style:position="0.9in"/>
          <style:tab-stop style:position="4.5in"/>
        </style:tab-stops>
      </style:paragraph-properties>
    </style:style>
    <style:style style:name="P14" style:family="paragraph" style:parent-style-name="Standard" style:list-style-name="L8">
      <style:paragraph-properties fo:margin-left="0.75in" fo:margin-right="-0.1in" fo:line-height="0.1665in">
        <style:tab-stops>
          <style:tab-stop style:position="0.5in"/>
          <style:tab-stop style:position="0.9in"/>
          <style:tab-stop style:position="4.5in"/>
        </style:tab-stops>
      </style:paragraph-properties>
    </style:style>
    <style:style style:name="P15" style:family="paragraph" style:parent-style-name="Standard" style:list-style-name="L9">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16" style:family="paragraph" style:parent-style-name="Standard" style:list-style-name="L10">
      <style:paragraph-properties fo:margin-left="0.75in" fo:margin-right="-0.1in" fo:line-height="0.1665in" fo:text-indent="-0.25in" style:auto-text-indent="false">
        <style:tab-stops>
          <style:tab-stop style:position="0.5in"/>
          <style:tab-stop style:position="0.9in"/>
          <style:tab-stop style:position="4.5in"/>
        </style:tab-stops>
      </style:paragraph-properties>
    </style:style>
    <style:style style:name="P17" style:family="paragraph" style:parent-style-name="Standard" style:list-style-name="L8">
      <style:paragraph-properties fo:margin-left="0.75in" fo:margin-right="-0.1in" fo:line-height="0.1665in" fo:text-indent="-0.25in" style:auto-text-indent="false">
        <style:tab-stops>
          <style:tab-stop style:position="0.5in"/>
          <style:tab-stop style:position="0.9in"/>
          <style:tab-stop style:position="1in"/>
          <style:tab-stop style:position="1.8in"/>
          <style:tab-stop style:position="3in"/>
          <style:tab-stop style:position="4.1in"/>
          <style:tab-stop style:position="4.3in"/>
          <style:tab-stop style:position="4.4in"/>
        </style:tab-stops>
      </style:paragraph-properties>
    </style:style>
    <style:style style:name="P18" style:family="paragraph" style:parent-style-name="Standard" style:list-style-name="L9">
      <style:paragraph-properties fo:margin-left="0.75in" fo:margin-right="-0.1in" fo:line-height="0.1665in" fo:text-indent="-0.25in" style:auto-text-indent="false">
        <style:tab-stops>
          <style:tab-stop style:position="0.5in"/>
          <style:tab-stop style:position="0.9in"/>
        </style:tab-stops>
      </style:paragraph-properties>
    </style:style>
    <style:style style:name="P19" style:family="paragraph" style:parent-style-name="Standard" style:list-style-name="L9">
      <style:paragraph-properties fo:margin-left="0.75in" fo:margin-right="-0.1in" fo:line-height="0.1665in">
        <style:tab-stops>
          <style:tab-stop style:position="0.5in"/>
          <style:tab-stop style:position="0.9in"/>
        </style:tab-stops>
      </style:paragraph-properties>
    </style:style>
    <style:style style:name="P20" style:family="paragraph" style:parent-style-name="Standard" style:list-style-name="L10">
      <style:paragraph-properties fo:margin-left="0.75in" fo:margin-right="-0.1in" fo:line-height="0.1665in" fo:text-indent="-0.25in" style:auto-text-indent="false">
        <style:tab-stops>
          <style:tab-stop style:position="0.5in"/>
          <style:tab-stop style:position="0.9in"/>
        </style:tab-stops>
      </style:paragraph-properties>
    </style:style>
    <style:style style:name="P21" style:family="paragraph" style:parent-style-name="Standard" style:list-style-name="L10">
      <style:paragraph-properties fo:margin-left="0.75in" fo:margin-right="-0.1in" fo:line-height="0.1665in">
        <style:tab-stops>
          <style:tab-stop style:position="0.5in"/>
          <style:tab-stop style:position="0.9in"/>
        </style:tab-stops>
      </style:paragraph-properties>
    </style:style>
    <style:style style:name="P22" style:family="paragraph" style:parent-style-name="Standard">
      <style:paragraph-properties fo:margin-right="-0.1in" fo:line-height="0.1665in" fo:text-align="center" style:justify-single-word="false">
        <style:tab-stops>
          <style:tab-stop style:position="0.5in"/>
          <style:tab-stop style:position="0.8in"/>
        </style:tab-stops>
      </style:paragraph-properties>
      <style:text-properties fo:font-weight="bold" style:font-weight-asian="bold" style:font-weight-complex="bold"/>
    </style:style>
    <style:style style:name="P23" style:family="paragraph" style:parent-style-name="Standard">
      <style:paragraph-properties fo:margin-right="-0.1in" fo:line-height="0.1665in">
        <style:tab-stops>
          <style:tab-stop style:position="0.5in"/>
          <style:tab-stop style:position="0.9in"/>
          <style:tab-stop style:position="4.5in"/>
        </style:tab-stops>
      </style:paragraph-properties>
      <style:text-properties fo:font-size="14pt" fo:font-weight="bold" style:font-size-asian="14pt" style:font-weight-asian="bold" style:font-size-complex="14pt" style:font-weight-complex="bold"/>
    </style:style>
    <style:style style:name="P24" style:family="paragraph" style:parent-style-name="Standard">
      <style:paragraph-properties fo:margin-left="0.9in" fo:margin-right="-0.1in" fo:line-height="0.1665in" fo:text-indent="-0.9in" style:auto-text-indent="false">
        <style:tab-stops>
          <style:tab-stop style:position="0.5in"/>
          <style:tab-stop style:position="0.9in"/>
          <style:tab-stop style:position="4.5in"/>
        </style:tab-stops>
      </style:paragraph-properties>
      <style:text-properties fo:font-size="14pt" fo:font-weight="bold" style:font-size-asian="14pt" style:font-weight-asian="bold" style:font-size-complex="14pt" style:font-weight-complex="bold"/>
    </style:style>
    <style:style style:name="P25" style:family="paragraph" style:parent-style-name="Standard">
      <style:paragraph-properties fo:margin-right="0in" fo:text-indent="0.5in" style:auto-text-indent="false"/>
    </style:style>
    <style:style style:name="P26" style:family="paragraph" style:parent-style-name="Standard" style:list-style-name="L1">
      <style:paragraph-properties fo:margin-left="0.75in" fo:margin-right="-0.6in" fo:text-indent="-0.25in" style:auto-text-indent="false">
        <style:tab-stops>
          <style:tab-stop style:position="0.5in"/>
          <style:tab-stop style:position="1in" style:type="char" style:char="."/>
        </style:tab-stops>
      </style:paragraph-properties>
    </style:style>
    <style:style style:name="P27" style:family="paragraph" style:parent-style-name="Standard" style:list-style-name="L1">
      <style:paragraph-properties fo:margin-left="0.75in" fo:margin-right="-0.6in">
        <style:tab-stops>
          <style:tab-stop style:position="0.5in"/>
          <style:tab-stop style:position="1in" style:type="char" style:char="."/>
        </style:tab-stops>
      </style:paragraph-properties>
    </style:style>
    <style:style style:name="P28" style:family="paragraph" style:parent-style-name="Standard" style:list-style-name="L2">
      <style:paragraph-properties fo:margin-left="0.75in" fo:margin-right="-0.1in" fo:text-indent="-0.25in" style:auto-text-indent="false">
        <style:tab-stops>
          <style:tab-stop style:position="0.5in"/>
          <style:tab-stop style:position="0.9in"/>
          <style:tab-stop style:position="4.5in"/>
        </style:tab-stops>
      </style:paragraph-properties>
    </style:style>
    <style:style style:name="P29" style:family="paragraph" style:parent-style-name="Standard" style:list-style-name="L2">
      <style:paragraph-properties fo:margin-left="0.75in" fo:margin-right="-0.1in">
        <style:tab-stops>
          <style:tab-stop style:position="0.5in"/>
          <style:tab-stop style:position="0.9in"/>
          <style:tab-stop style:position="4.5in"/>
        </style:tab-stops>
      </style:paragraph-properties>
    </style:style>
    <style:style style:name="P30" style:family="paragraph" style:parent-style-name="Standard">
      <style:paragraph-properties fo:margin-right="-0.1in">
        <style:tab-stops>
          <style:tab-stop style:position="0.5in"/>
          <style:tab-stop style:position="0.9in"/>
          <style:tab-stop style:position="4.5in"/>
        </style:tab-stops>
      </style:paragraph-properties>
    </style:style>
    <style:style style:name="P31" style:family="paragraph" style:parent-style-name="Standard" style:list-style-name="L11">
      <style:paragraph-properties fo:margin-left="0.75in" fo:margin-right="-0.1in" fo:text-indent="-0.25in" style:auto-text-indent="false">
        <style:tab-stops>
          <style:tab-stop style:position="0.5in"/>
          <style:tab-stop style:position="0.9in"/>
          <style:tab-stop style:position="4.5in"/>
        </style:tab-stops>
      </style:paragraph-properties>
    </style:style>
    <style:style style:name="P32" style:family="paragraph" style:parent-style-name="Standard" style:list-style-name="L11">
      <style:paragraph-properties fo:margin-left="0.75in" fo:margin-right="-0.1in">
        <style:tab-stops>
          <style:tab-stop style:position="0.5in"/>
          <style:tab-stop style:position="0.9in"/>
          <style:tab-stop style:position="4.5in"/>
        </style:tab-stops>
      </style:paragraph-properties>
    </style:style>
    <style:style style:name="P33" style:family="paragraph" style:parent-style-name="Standard">
      <style:paragraph-properties fo:margin-left="0.75in" fo:margin-right="-0.1in">
        <style:tab-stops>
          <style:tab-stop style:position="0.5in"/>
          <style:tab-stop style:position="0.9in"/>
          <style:tab-stop style:position="4.5in"/>
        </style:tab-stops>
      </style:paragraph-properties>
    </style:style>
    <style:style style:name="P34" style:family="paragraph" style:parent-style-name="Standard">
      <style:paragraph-properties fo:margin-right="-0.1in" fo:line-height="0.1665in">
        <style:tab-stops>
          <style:tab-stop style:position="0.5in"/>
          <style:tab-stop style:position="0.9in"/>
          <style:tab-stop style:position="4.5in"/>
        </style:tab-stops>
      </style:paragraph-properties>
      <style:text-properties style:text-underline-style="solid" style:text-underline-width="auto" style:text-underline-color="font-color"/>
    </style:style>
    <style:style style:name="P35" style:family="paragraph" style:parent-style-name="Standard">
      <style:paragraph-properties fo:margin-left="0.75in" fo:margin-right="-0.1in">
        <style:tab-stops>
          <style:tab-stop style:position="0.5in"/>
          <style:tab-stop style:position="0.9in"/>
          <style:tab-stop style:position="4.5in"/>
        </style:tab-stops>
      </style:paragraph-properties>
      <style:text-properties officeooo:rsid="00083db3" officeooo:paragraph-rsid="00083db3"/>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officeooo:rsid="00083db3"/>
    </style:style>
    <text:list-style style:name="L1">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Customer Focused Selling”</text:span></text:p>
      <text:p text:style-name="P23"/>
      <text:p text:style-name="P2"><text:span text:style-name="T4">Day</text:span> <text:span text:style-name="T4">1</text:span></text:p>
      <text:p text:style-name="P2"/>
      <text:p text:style-name="P25"><text:span text:style-name="T1">Introduction</text:span> (1 hour)</text:p>
      <text:list text:style-name="L1">
        <text:list-item>
          <text:p text:style-name="P26">Overview - Fact finding review</text:p>
        </text:list-item>
        <text:list-item>
          <text:p text:style-name="P26">Price versus Value</text:p>
        </text:list-item>
        <text:list-item>
          <text:p text:style-name="P26">The complete high tech sales professional</text:p>
        </text:list-item>
        <text:list-item>
          <text:p text:style-name="P27">The Sales Cycle</text:p>
        </text:list-item>
      </text:list>
      <text:p text:style-name="P2"/>
      <text:p text:style-name="P2"/>
      <text:p text:style-name="P2">1.<text:tab/><text:span text:style-name="T1">Behavior Styles and Selling Styles</text:span> (4 hours)</text:p>
      <text:list text:style-name="L2">
        <text:list-item>
          <text:p text:style-name="P28">The Four Dimensions of Behavior</text:p>
        </text:list-item>
        <text:list-item>
          <text:p text:style-name="P28">Motivation Principles</text:p>
        </text:list-item>
        <text:list-item>
          <text:p text:style-name="P28">The<text:span text:style-name="T4"> Personal Profile System </text:span>Instrument - Understanding DiSC Styles</text:p>
        </text:list-item>
        <text:list-item>
          <text:p text:style-name="P28">Work Behavior Characteristics - People Reading Exercise</text:p>
        </text:list-item>
        <text:list-item>
          <text:p text:style-name="P28">DiSC Behavior Characteristics</text:p>
        </text:list-item>
        <text:list-item>
          <text:p text:style-name="P28">Personality Expectations Exercise</text:p>
        </text:list-item>
        <text:list-item>
          <text:p text:style-name="P28">Motivating &amp; Communicating with the Four Behavioral Styles</text:p>
        </text:list-item>
        <text:list-item>
          <text:p text:style-name="P29">Using DiSC in Sales Role Plays</text:p>
        </text:list-item>
      </text:list>
      <text:p text:style-name="P30"/>
      <text:p text:style-name="P30"/>
      <text:p text:style-name="P2">2.<text:tab/><text:span text:style-name="T1">Establishing Credibility &amp; Trust</text:span> <text:s/>(3 hours)</text:p>
      <text:list text:style-name="L3">
        <text:list-item>
          <text:p text:style-name="P3">Controlling the Emotional Climate</text:p>
        </text:list-item>
        <text:list-item>
          <text:p text:style-name="P3">Four Elements of Trust</text:p>
        </text:list-item>
        <text:list-item>
          <text:p text:style-name="P3">Pacing Techniques to Get on Common Ground</text:p>
        </text:list-item>
        <text:list-item>
          <text:p text:style-name="P3">The Problem of Explaining Too Much</text:p>
        </text:list-item>
        <text:list-item>
          <text:p text:style-name="P3">Avoiding Challenging Statements</text:p>
        </text:list-item>
        <text:list-item>
          <text:p text:style-name="P3">Personal Listening Profile</text:p>
        </text:list-item>
        <text:list-item>
          <text:p text:style-name="P3">Active Listening</text:p>
        </text:list-item>
        <text:list-item>
          <text:p text:style-name="P3">Practice Sessions</text:p>
        </text:list-item>
        <text:list-item>
          <text:p text:style-name="P4">Interactive Role Plays</text:p>
        </text:list-item>
      </text:list>
      <text:p text:style-name="P34"/>
      <text:p text:style-name="P34"/>
      <text:p text:style-name="P2"><text:span text:style-name="T4">Day</text:span> <text:span text:style-name="T4">2</text:span></text:p>
      <text:p text:style-name="P2"/>
      <text:p text:style-name="P5">3. <text:s text:c="2"/><text:tab/><text:span text:style-name="T1">Prospecting &amp; Pre-Call Planning</text:span> (4 hours) </text:p>
      <text:list text:style-name="L4">
        <text:list-item>
          <text:p text:style-name="P6">The Best Lead Sources</text:p>
        </text:list-item>
        <text:list-item>
          <text:p text:style-name="P6">Seven Step Process to uncover Strategic Opportunities</text:p>
        </text:list-item>
        <text:list-item>
          <text:p text:style-name="P6">Skill Exercise - Creating an Initial Benefit Statement</text:p>
        </text:list-item>
        <text:list-item>
          <text:p text:style-name="P6">Approaches - Initiating Conversations with Executives</text:p>
        </text:list-item>
        <text:list-item>
          <text:p text:style-name="P6">Creating Active References &amp; Centers of Influence</text:p>
        </text:list-item>
        <text:list-item>
          <text:p text:style-name="P6">Pre-Call Planning - The Why’s and How’s</text:p>
        </text:list-item>
        <text:list-item>
          <text:p text:style-name="P6">Setting Sales Call Objectives - Making each Visit Important to the Customer </text:p>
        </text:list-item>
        <text:list-item>
          <text:p text:style-name="P6">Questions to ask - Objections to Anticipate - Rating My Effectiveness </text:p>
        </text:list-item>
        <text:list-item>
          <text:p text:style-name="P7">Planning my next Sales Call using the <text:span text:style-name="T4">Sales Action Planner</text:span> </text:p>
        </text:list-item>
      </text:list>
      <text:p text:style-name="P5"/>
      <text:p text:style-name="P5"/>
      <text:p text:style-name="P5"/>
      <text:p text:style-name="P5"/>
      <text:p text:style-name="P5"/>
      <text:p text:style-name="P5"><text:soft-page-break/></text:p>
      <text:p text:style-name="P5"/>
      <text:p text:style-name="P1"><text:span text:style-name="T1">“</text:span><text:span text:style-name="T2">Customer Focused Selling” </text:span><text:span text:style-name="T3"><text:s/>(continued)</text:span></text:p>
      <text:p text:style-name="P24"/>
      <text:p text:style-name="P2"/>
      <text:p text:style-name="P5">4. <text:s text:c="2"/><text:tab/><text:span text:style-name="T1">Customer Focused Sales Interviews - Discovering Needs &amp; Wants</text:span> (4 hours)</text:p>
      <text:list text:style-name="L5">
        <text:list-item>
          <text:p text:style-name="P8">Organizational Dynamics - Key Areas of Interest</text:p>
        </text:list-item>
        <text:list-item>
          <text:p text:style-name="P8">The F.I.N.D. Interview System - Conducting an Effective Sales Interview</text:p>
        </text:list-item>
        <text:list-item>
          <text:p text:style-name="P8">Determining the Facts with Open/Closed Questions</text:p>
        </text:list-item>
        <text:list-item>
          <text:p text:style-name="P8">Identifying Important Areas of Interest</text:p>
        </text:list-item>
        <text:list-item>
          <text:p text:style-name="P8">Determining Needs and Problem Areas</text:p>
        </text:list-item>
        <text:list-item>
          <text:p text:style-name="P8">Finding The Prospect’s Dream and Personal Win</text:p>
        </text:list-item>
        <text:list-item>
          <text:p text:style-name="P8">Four Skill Building Practice Sessions</text:p>
        </text:list-item>
        <text:list-item>
          <text:p text:style-name="P8">Tying it All Together during the Interview</text:p>
        </text:list-item>
        <text:list-item>
          <text:p text:style-name="P9">Three Interactive Role Plays</text:p>
        </text:list-item>
      </text:list>
      <text:p text:style-name="P2"/>
      <text:p text:style-name="P34"/>
      <text:p text:style-name="P34">Day 3</text:p>
      <text:p text:style-name="P34"/>
      <text:p text:style-name="P5">5. <text:s text:c="2"/><text:tab/><text:span text:style-name="T1">Making Customer Focused Proposals &amp; Presentations</text:span> (4 hours)</text:p>
      <text:list text:style-name="L6">
        <text:list-item>
          <text:p text:style-name="P10">Feature - Advantage - Benefit <text:s/>Discussion and application</text:p>
        </text:list-item>
        <text:list-item>
          <text:p text:style-name="P10">Why <text:s/>Your Company?</text:p>
        </text:list-item>
        <text:list-item>
          <text:p text:style-name="P10">Constructing the Benefit Statement</text:p>
        </text:list-item>
        <text:list-item>
          <text:p text:style-name="P10">How to make the Advantage important to the prospect</text:p>
        </text:list-item>
        <text:list-item>
          <text:p text:style-name="P10">Fear - Uncertainty - .Doubt</text:p>
        </text:list-item>
        <text:list-item>
          <text:p text:style-name="P10">Three Practice Exercises</text:p>
        </text:list-item>
        <text:list-item>
          <text:p text:style-name="P10">Constructing Effective Benefit Messages</text:p>
        </text:list-item>
        <text:list-item>
          <text:p text:style-name="P10">Effective Presentations </text:p>
        </text:list-item>
        <text:list-item>
          <text:p text:style-name="P10">Presenting to Committees</text:p>
        </text:list-item>
        <text:list-item>
          <text:p text:style-name="P10">The Issues Cluster Matrix</text:p>
        </text:list-item>
        <text:list-item>
          <text:p text:style-name="P10">Writing “Proposals that Sell”</text:p>
        </text:list-item>
        <text:list-item>
          <text:p text:style-name="P10">Proposal Checklist</text:p>
        </text:list-item>
        <text:list-item>
          <text:p text:style-name="P11">Practice Session - Presenting the best solution </text:p>
        </text:list-item>
      </text:list>
      <text:p text:style-name="P2"/>
      <text:p text:style-name="P2"/>
      <text:p text:style-name="P2">6.<text:tab/><text:span text:style-name="T1">Overcoming Objections</text:span> (4 hours)</text:p>
      <text:list text:style-name="L7">
        <text:list-item>
          <text:p text:style-name="P12">Tangible &amp; Intangible Objections</text:p>
        </text:list-item>
        <text:list-item>
          <text:p text:style-name="P12">Defusing the Objection - Their right to an opinion </text:p>
        </text:list-item>
        <text:list-item>
          <text:p text:style-name="P12">Chart of Objections</text:p>
        </text:list-item>
        <text:list-item>
          <text:p text:style-name="P12">Six Step System for Dealing with Objections</text:p>
        </text:list-item>
        <text:list-item>
          <text:p text:style-name="P12">Practice Sessions</text:p>
        </text:list-item>
        <text:list-item>
          <text:p text:style-name="P12">Reframing - Changing the Prospect’s Perspective </text:p>
        </text:list-item>
        <text:list-item>
          <text:p text:style-name="P12">The Analogy Reframe</text:p>
        </text:list-item>
        <text:list-item>
          <text:p text:style-name="P12">The Big Picture Reframe</text:p>
        </text:list-item>
        <text:list-item>
          <text:p text:style-name="P13">Objection Handling Competition</text:p>
        </text:list-item>
      </text:list>
      <text:p text:style-name="P22"/>
      <text:p text:style-name="P22"/>
      <text:p text:style-name="P22"/>
      <text:p text:style-name="P22"/>
      <text:p text:style-name="P22"/>
      <text:p text:style-name="P22"/>
      <text:p text:style-name="P22"/>
      <text:p text:style-name="P22"/>
      <text:p text:style-name="P1"><text:span text:style-name="T1">“</text:span><text:span text:style-name="T2">Customer Focused Selling” </text:span><text:span text:style-name="T3">(continued)</text:span></text:p>
      <text:p text:style-name="P34"><text:soft-page-break/>Day 4</text:p>
      <text:p text:style-name="P34"/>
      <text:p text:style-name="P2">7.<text:tab/><text:span text:style-name="T1">Time &amp; Territory and Account Management</text:span> (4 hours)</text:p>
      <text:list text:style-name="L8">
        <text:list-item>
          <text:p text:style-name="P17">Defining Your Territory</text:p>
        </text:list-item>
        <text:list-item>
          <text:p text:style-name="P17">Ranking your Customers and Prospects</text:p>
        </text:list-item>
        <text:list-item>
          <text:p text:style-name="P17">Working your Sales Funnel</text:p>
        </text:list-item>
        <text:list-item>
          <text:p text:style-name="P17">Plan your Work - Work Your Plan</text:p>
        </text:list-item>
        <text:list-item>
          <text:p text:style-name="P17">Analyzing each Sales Opportunity Quickly</text:p>
        </text:list-item>
        <text:list-item>
          <text:p text:style-name="P17">Managing Your Prospects</text:p>
        </text:list-item>
        <text:list-item>
          <text:p text:style-name="P17">Using Your Selling Time Wisely - What is Your Time Worth?</text:p>
        </text:list-item>
        <text:list-item>
          <text:p text:style-name="P17">Your Sales Tool Kit</text:p>
        </text:list-item>
        <text:list-item>
          <text:p text:style-name="P17">The <text:span text:style-name="T4">Time</text:span> <text:span text:style-name="T4">Mastery</text:span> <text:span text:style-name="T4">Profile</text:span></text:p>
        </text:list-item>
        <text:list-item>
          <text:p text:style-name="P14">Time Management Checklist - Territory Management Checklist</text:p>
        </text:list-item>
      </text:list>
      <text:p text:style-name="P2"/>
      <text:p text:style-name="P2">8.<text:tab/><text:span text:style-name="T1">Negotiating a Win/Win</text:span> (4 hours)</text:p>
      <text:list text:style-name="L9">
        <text:list-item>
          <text:p text:style-name="P15">Why Everybody Wins in a Successful Negotiation</text:p>
        </text:list-item>
        <text:list-item>
          <text:p text:style-name="P15">Four Negotiation Strategies</text:p>
        </text:list-item>
        <text:list-item>
          <text:p text:style-name="P18">Preparing to Negotiate - Sales Negotiation Check List</text:p>
        </text:list-item>
        <text:list-item>
          <text:p text:style-name="P18">Understanding People and their Interests, Needs and Motivation</text:p>
        </text:list-item>
        <text:list-item>
          <text:p text:style-name="P18">Exploring or Inventing Options for the Win/Win</text:p>
        </text:list-item>
        <text:list-item>
          <text:p text:style-name="P18">Brainstorming Possible Solutions</text:p>
        </text:list-item>
        <text:list-item>
          <text:p text:style-name="P18">Collaboration with the Customer: The Ultimate Negotiation Technique</text:p>
        </text:list-item>
        <text:list-item>
          <text:p text:style-name="P18">Defenses Against Buyer Negotiation Tactics</text:p>
        </text:list-item>
        <text:list-item>
          <text:p text:style-name="P18">Successfully Dealing with Requests for Price Concessions - </text:p>
        </text:list-item>
        <text:list-item>
          <text:p text:style-name="P19">Facilitator Models a Win/Win Negotiation for the Class</text:p>
        </text:list-item>
      </text:list>
      <text:p text:style-name="P2"/>
      <text:p text:style-name="P2"><text:span text:style-name="T4">Day</text:span> <text:span text:style-name="T4">5</text:span></text:p>
      <text:p text:style-name="P2"/>
      <text:p text:style-name="P2">9.<text:tab/><text:span text:style-name="T1">Team Selling &amp; Executive Bridging</text:span> (4 hours)</text:p>
      <text:list text:style-name="L10">
        <text:list-item>
          <text:p text:style-name="P16">How Executive Bridges Works and Why</text:p>
        </text:list-item>
        <text:list-item>
          <text:p text:style-name="P16">Methods for Keeping the Competition Out</text:p>
        </text:list-item>
        <text:list-item>
          <text:p text:style-name="P16">Documenting Your Performance</text:p>
        </text:list-item>
        <text:list-item>
          <text:p text:style-name="P20">Preparing for an Executive Bridge Meeting</text:p>
        </text:list-item>
        <text:list-item>
          <text:p text:style-name="P20">Executive Bridge Check List</text:p>
        </text:list-item>
        <text:list-item>
          <text:p text:style-name="P20">The Role of The “Salesperson-in-Charge”</text:p>
        </text:list-item>
        <text:list-item>
          <text:p text:style-name="P20">Where Team Selling is Most effective</text:p>
        </text:list-item>
        <text:list-item>
          <text:p text:style-name="P20">Selecting your Sales Team</text:p>
        </text:list-item>
        <text:list-item>
          <text:p text:style-name="P20">Mobilizing your Sales Team</text:p>
        </text:list-item>
        <text:list-item>
          <text:p text:style-name="P20">Proving Your Value</text:p>
        </text:list-item>
        <text:list-item>
          <text:p text:style-name="P21">Successful Case Studies and Real Life Experiences</text:p>
        </text:list-item>
      </text:list>
      <text:p text:style-name="P2"/>
      <text:p text:style-name="P2">10. <text:s/><text:tab/><text:span text:style-name="T1">Commitment To Action/Closing &amp; Review</text:span> (4 hours)</text:p>
      <text:list text:style-name="L11">
        <text:list-item>
          <text:p text:style-name="P31">Closing is a process, not a point in time </text:p>
        </text:list-item>
        <text:list-item>
          <text:p text:style-name="P31">When and How To Close</text:p>
        </text:list-item>
        <text:list-item>
          <text:p text:style-name="P31">Small commitments - large commitments</text:p>
        </text:list-item>
        <text:list-item>
          <text:p text:style-name="P31">Buying Signals - Trial Closes - Danger Signs </text:p>
        </text:list-item>
        <text:list-item>
          <text:p text:style-name="P31">Dealing with Resistance during the close</text:p>
        </text:list-item>
        <text:list-item>
          <text:p text:style-name="P31">Asking for the Order</text:p>
        </text:list-item>
        <text:list-item>
          <text:p text:style-name="P31">Applying “Just Enough” Pressure</text:p>
        </text:list-item>
        <text:list-item>
          <text:p text:style-name="P31">Practice Session - Handling Objections During The Final Close</text:p>
        </text:list-item>
        <text:list-item>
          <text:p text:style-name="P32">Practice Exercises &amp; Role Plays - Course Review &amp; Questio<text:span text:style-name="T5">ns</text:span></text:p>
        </text:list-item>
      </text:list>
      <text:p text:style-name="P33"/>
      <text:p text:style-name="P35"><text:soft-page-break/>Memoir Note: Aberdeen used an agenda like this for quarterly sales classes of about 100 people for two years. VP of Sales said “Aberdeen street knowledge made his new sales force productive 90 days earlier than previous training methods.” – Peter S Kastn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yle1" style:family="paragraph" style:parent-style-name="Standard"/>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stomer Focused Selling"</dc:title>
    <meta:initial-creator>Preferred Customer</meta:initial-creator>
    <meta:creation-date>1997-05-23T13:02:00</meta:creation-date>
    <dc:date>2026-04-19T14:37:53.344046427</dc:date>
    <meta:editing-cycles>3</meta:editing-cycles>
    <meta:editing-duration>PT3M41S</meta:editing-duration>
    <meta:document-statistic meta:table-count="0" meta:image-count="0" meta:object-count="0" meta:page-count="4" meta:paragraph-count="121" meta:word-count="799" meta:character-count="4786" meta:non-whitespace-character-count="4182"/>
    <meta:generator>LibreOffice/24.2.7.2$Linux_X86_64 LibreOffice_project/420$Build-2</meta:generator>
  </office:meta>
</office:document-meta>
</file>