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BB000002CB1C9342BB.png" manifest:media-type="image/png"/>
  <manifest:file-entry manifest:full-path="Pictures/10002E6400006A9D000058B7D885EBB1.wmf" manifest:media-type="image/x-wmf"/>
  <manifest:file-entry manifest:full-path="Pictures/10000001000001900000003012956D44.png" manifest:media-type="image/png"/>
  <manifest:file-entry manifest:full-path="Pictures/1000000100000307000002853850F70A.png" manifest:media-type="image/png"/>
  <manifest:file-entry manifest:full-path="Pictures/10003228000069F200005440CB18D39C.wmf" manifest:media-type="image/x-wmf"/>
  <manifest:file-entry manifest:full-path="Pictures/100016AE000069FE0000618B074D62E5.wmf" manifest:media-type="image/x-wmf"/>
  <manifest:file-entry manifest:full-path="Pictures/100003BA00006A0300006C85BC49BDCD.wmf" manifest:media-type="image/x-wmf"/>
  <manifest:file-entry manifest:full-path="Pictures/100000010000031900000277B02CD1C4.png" manifest:media-type="image/png"/>
  <manifest:file-entry manifest:full-path="Pictures/10000001000002E1000002A6C98D981B.png" manifest:media-type="image/png"/>
  <manifest:file-entry manifest:full-path="Pictures/1000093E00006A3100008D4E88A7A992.wmf" manifest:media-type="image/x-wmf"/>
  <manifest:file-entry manifest:full-path="Pictures/10000000000000DB000000289DFEB865.png" manifest:media-type="image/png"/>
  <manifest:file-entry manifest:full-path="Pictures/100058E8000062640000B8CC65540C2D.wmf" manifest:media-type="image/x-wmf"/>
  <manifest:file-entry manifest:full-path="Pictures/1000000100000204000003C9AB1219BB.png" manifest:media-type="image/png"/>
  <manifest:file-entry manifest:full-path="Pictures/1003B36A000069E600002D79F3B5F317.wmf" manifest:media-type="image/x-wmf"/>
  <manifest:file-entry manifest:full-path="Pictures/1000000100000401000001B87491DE35.png" manifest:media-type="image/png"/>
  <manifest:file-entry manifest:full-path="Pictures/100000010000026500000330206F0A73.png" manifest:media-type="image/png"/>
  <manifest:file-entry manifest:full-path="Pictures/100016C2000069FE0000618B4635E028.wmf" manifest:media-type="image/x-wmf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Thumbnails/thumbnail.png" manifest:media-type="image/png"/>
  <manifest:file-entry manifest:full-path="meta.xml" manifest:media-type="text/xml"/>
  <manifest:file-entry manifest:full-path="Object 6" manifest:media-type="application/vnd.sun.star.oleobject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 5" manifest:media-type="application/vnd.sun.star.oleobjec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ertus Extra Bold" svg:font-family="'Albertus Extra Bold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Univers" svg:font-family="Univers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none" draw:fill-color="#ff6600" draw:textarea-horizontal-align="left" draw:textarea-vertical-align="middle" draw:auto-grow-height="false" fo:min-height="1.01cm" fo:min-width="4.769cm" fo:padding-top="0.13cm" fo:padding-bottom="0.13cm" fo:padding-left="0.25cm" fo:padding-right="0.25cm" fo:wrap-option="no-wrap" draw:shadow-color="#5e574e" loext:decorative="false"/>
    </style:style>
    <style:style style:name="gr3" style:family="graphic" style:parent-style-name="standard">
      <style:graphic-properties draw:stroke="none" draw:fill="none" draw:fill-color="#ff6600" draw:textarea-horizontal-align="left" draw:textarea-vertical-align="middle" draw:auto-grow-height="false" fo:min-height="1.01cm" fo:min-width="7.402cm" fo:padding-top="0.13cm" fo:padding-bottom="0.13cm" fo:padding-left="0.25cm" fo:padding-right="0.25cm" fo:wrap-option="no-wrap" draw:shadow-color="#5e574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808000" draw:textarea-horizontal-align="left" draw:textarea-vertical-align="middle" draw:auto-grow-height="false" fo:min-height="1.433cm" fo:min-width="0.509cm" fo:padding-top="0.13cm" fo:padding-bottom="0.13cm" fo:padding-left="0.25cm" fo:padding-right="0.25cm" fo:wrap-option="no-wrap" draw:shadow-color="#5e574e" loext:decorative="false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808000" draw:textarea-horizontal-align="left" draw:textarea-vertical-align="middle" draw:auto-grow-height="false" fo:min-height="1.432cm" fo:min-width="0.512cm" fo:padding-top="0.13cm" fo:padding-bottom="0.13cm" fo:padding-left="0.25cm" fo:padding-right="0.25cm" fo:wrap-option="no-wrap" draw:shadow-color="#5e574e" loext:decorative="false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808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9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1.177cm" fo:min-width="0.223cm" fo:padding-top="0.13cm" fo:padding-bottom="0.13cm" fo:padding-left="0.25cm" fo:padding-right="0.25cm" fo:wrap-option="no-wrap" draw:shadow-color="#5e574e" loext:decorative="fals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6600" draw:textarea-horizontal-align="left" draw:textarea-vertical-align="middle" draw:auto-grow-height="false" fo:min-height="1.439cm" fo:min-width="1.665cm" fo:padding-top="0.13cm" fo:padding-bottom="0.13cm" fo:padding-left="0.25cm" fo:padding-right="0.25cm" fo:wrap-option="no-wrap" draw:shadow-color="#5e574e" loext:decorative="false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6600" draw:textarea-horizontal-align="left" draw:textarea-vertical-align="middle" draw:auto-grow-height="false" fo:min-height="0cm" fo:min-width="0.668cm" fo:padding-top="0.13cm" fo:padding-bottom="0.13cm" fo:padding-left="0.25cm" fo:padding-right="0.25cm" fo:wrap-option="no-wrap" draw:shadow-color="#5e574e" loext:decorative="false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808000" draw:textarea-horizontal-align="left" draw:textarea-vertical-align="middle" draw:auto-grow-height="false" fo:min-height="2.664cm" fo:min-width="1.739cm" fo:padding-top="0.13cm" fo:padding-bottom="0.13cm" fo:padding-left="0.25cm" fo:padding-right="0.25cm" fo:wrap-option="no-wrap" draw:shadow-color="#5e574e" loext:decorative="false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808000" draw:textarea-horizontal-align="left" draw:textarea-vertical-align="middle" draw:auto-grow-height="false" fo:min-height="0.062cm" fo:min-width="0.784cm" fo:padding-top="0.13cm" fo:padding-bottom="0.13cm" fo:padding-left="0.25cm" fo:padding-right="0.25cm" fo:wrap-option="no-wrap" draw:shadow-color="#5e574e" loext:decorative="false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808000" draw:textarea-horizontal-align="left" draw:textarea-vertical-align="middle" draw:auto-grow-height="false" fo:min-height="0.262cm" fo:min-width="1.017cm" fo:padding-top="0.13cm" fo:padding-bottom="0.13cm" fo:padding-left="0.25cm" fo:padding-right="0.25cm" fo:wrap-option="no-wrap" draw:shadow-color="#5e574e" loext:decorative="false"/>
    </style:style>
    <style:style style:name="gr17" style:family="graphic" style:parent-style-name="standard">
      <style:graphic-properties draw:stroke="solid" svg:stroke-width="0.035cm" svg:stroke-color="#000000" draw:stroke-linejoin="miter" svg:stroke-linecap="round" draw:fill="none" draw:fill-color="#ff6600" draw:textarea-horizontal-align="left" draw:textarea-vertical-align="middle" draw:auto-grow-height="false" fo:min-height="0.665cm" fo:min-width="1.819cm" fo:padding-top="0.13cm" fo:padding-bottom="0.13cm" fo:padding-left="0.25cm" fo:padding-right="0.25cm" fo:wrap-option="no-wrap" draw:shadow-color="#5e574e" loext:decorative="false"/>
    </style:style>
    <style:style style:name="gr18" style:family="graphic" style:parent-style-name="standard">
      <style:graphic-properties draw:stroke="solid" svg:stroke-width="0.035cm" svg:stroke-color="#000000" draw:stroke-linejoin="miter" svg:stroke-linecap="round" draw:fill="none" draw:fill-color="#ff6600" draw:textarea-horizontal-align="left" draw:textarea-vertical-align="middle" draw:auto-grow-height="false" fo:min-height="0.665cm" fo:min-width="1.827cm" fo:padding-top="0.13cm" fo:padding-bottom="0.13cm" fo:padding-left="0.25cm" fo:padding-right="0.25cm" fo:wrap-option="no-wrap" draw:shadow-color="#5e574e" loext:decorative="false"/>
    </style:style>
    <style:style style:name="gr19" style:family="graphic" style:parent-style-name="standard">
      <style:graphic-properties draw:stroke="solid" svg:stroke-width="0.035cm" svg:stroke-color="#000000" draw:stroke-linejoin="miter" svg:stroke-linecap="round" draw:fill="none" draw:fill-color="#ff6600" draw:textarea-horizontal-align="left" draw:textarea-vertical-align="middle" draw:auto-grow-height="false" fo:min-height="0.674cm" fo:min-width="1.819cm" fo:padding-top="0.13cm" fo:padding-bottom="0.13cm" fo:padding-left="0.25cm" fo:padding-right="0.25cm" fo:wrap-option="no-wrap" draw:shadow-color="#5e574e" loext:decorative="false"/>
    </style:style>
    <style:style style:name="gr20" style:family="graphic" style:parent-style-name="standard">
      <style:graphic-properties draw:stroke="solid" svg:stroke-width="0.035cm" svg:stroke-color="#000000" draw:stroke-linejoin="miter" svg:stroke-linecap="round" draw:fill="none" draw:fill-color="#ff6600" draw:textarea-horizontal-align="left" draw:textarea-vertical-align="middle" draw:auto-grow-height="false" fo:min-height="0.674cm" fo:min-width="1.827cm" fo:padding-top="0.13cm" fo:padding-bottom="0.13cm" fo:padding-left="0.25cm" fo:padding-right="0.25cm" fo:wrap-option="no-wrap" draw:shadow-color="#5e574e" loext:decorative="false"/>
    </style:style>
    <style:style style:name="gr21" style:family="graphic" style:parent-style-name="standard">
      <style:graphic-properties draw:stroke="solid" svg:stroke-width="0.3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22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2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29" style:family="graphic" style:parent-style-name="standard">
      <style:graphic-properties draw:stroke="solid" svg:stroke-width="0.141cm" svg:stroke-color="#ffcc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30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011cm" fo:min-width="0cm" fo:padding-top="0.13cm" fo:padding-bottom="0.13cm" fo:padding-left="0.25cm" fo:padding-right="0.25cm" fo:wrap-option="wrap" draw:shadow-color="#969696" loext:decorative="false"/>
      <style:paragraph-properties style:writing-mode="lr-tb"/>
    </style:style>
    <style:style style:name="gr3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011cm" fo:min-width="0cm" fo:padding-top="0.13cm" fo:padding-bottom="0.13cm" fo:padding-left="0.25cm" fo:padding-right="0.25cm" fo:wrap-option="wrap" draw:shadow-color="#969696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1.283cm" fo:min-width="0.24cm" fo:padding-top="0.13cm" fo:padding-bottom="0.13cm" fo:padding-left="0.25cm" fo:padding-right="0.25cm" fo:wrap-option="no-wrap" draw:shadow-color="#5e574e" loext:decorative="false"/>
    </style:style>
    <style:style style:name="gr36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37" style:family="graphic" style:parent-style-name="standard">
      <style:graphic-properties draw:stroke="solid" svg:stroke-width="0.353cm" svg:stroke-color="#996633" draw:marker-start="msArrowStealthEnd_20_6" draw:marker-start-width="1.059cm" draw:marker-start-center="false" draw:marker-end="msArrowStealthEnd_20_6" draw:marker-end-width="1.059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38" style:family="graphic" style:parent-style-name="standard">
      <style:graphic-properties draw:stroke="solid" svg:stroke-width="0.282cm" svg:stroke-color="#fc0128" draw:marker-end="Arrowheads_20_1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39" style:family="graphic" style:parent-style-name="standard">
      <style:graphic-properties draw:stroke="solid" svg:stroke-width="0.282cm" svg:stroke-color="#618ffd" draw:marker-end="Arrowheads_20_2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0" style:family="graphic" style:parent-style-name="standard">
      <style:graphic-properties draw:stroke="solid" svg:stroke-width="0.353cm" svg:stroke-color="#d0bd6e" draw:marker-end="msArrowStealthEnd_20_6" draw:marker-end-width="1.059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106cm" draw:shadow-offset-y="0.035cm" draw:shadow-color="#996633" loext:decorative="false"/>
    </style:style>
    <style:style style:name="gr41" style:family="graphic" style:parent-style-name="standard">
      <style:graphic-properties draw:stroke="solid" svg:stroke-width="0.282cm" svg:stroke-color="#618ffd" draw:marker-end="Arrowheads_20_3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2" style:family="graphic" style:parent-style-name="standard">
      <style:graphic-properties draw:stroke="solid" svg:stroke-width="0.282cm" svg:stroke-color="#618ffd" draw:marker-end="Arrowheads_20_4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3" style:family="graphic" style:parent-style-name="standard">
      <style:graphic-properties draw:stroke="solid" svg:stroke-width="0.282cm" svg:stroke-color="#618ffd" draw:marker-end="Arrowheads_20_5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4" style:family="graphic" style:parent-style-name="standard">
      <style:graphic-properties draw:stroke="solid" svg:stroke-width="0.282cm" svg:stroke-color="#618ffd" draw:marker-end="Arrowheads_20_6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5" style:family="graphic" style:parent-style-name="standard">
      <style:graphic-properties draw:stroke="solid" svg:stroke-width="0.282cm" svg:stroke-color="#618ffd" draw:marker-end="Arrowheads_20_7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6" style:family="graphic" style:parent-style-name="standard" style:list-style-name="L11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48" style:family="graphic" style:parent-style-name="standard" style:list-style-name="L11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0" style:family="graphic" style:parent-style-name="standard" style:list-style-name="L12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1" style:family="graphic" style:parent-style-name="standard">
      <style:graphic-properties draw:stroke="solid" svg:stroke-width="0.212cm" svg:stroke-color="#9900ff" draw:marker-start="msArrowStealthEnd_20_6" draw:marker-start-width="0.636cm" draw:marker-start-center="false" draw:marker-end="msArrowStealthEnd_20_6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2" style:family="graphic" style:parent-style-name="standard">
      <style:graphic-properties draw:stroke="none" draw:fill="gradient" draw:fill-color="#ffc62a" draw:fill-gradient-name="Gradient_20_1" draw:textarea-horizontal-align="left" draw:textarea-vertical-align="top" draw:auto-grow-height="false" fo:min-height="0.79cm" fo:min-width="2.627cm" fo:padding-top="0.13cm" fo:padding-bottom="0.13cm" fo:padding-left="0.25cm" fo:padding-right="0.25cm" fo:wrap-option="wrap" draw:shadow-color="#5e574e" loext:decorative="false"/>
    </style:style>
    <style:style style:name="gr53" style:family="graphic" style:parent-style-name="standard">
      <style:graphic-properties draw:stroke="none" draw:fill="solid" draw:fill-color="#ff6600" draw:textarea-horizontal-align="left" draw:textarea-vertical-align="middle" draw:auto-grow-height="false" fo:min-height="0.136cm" fo:min-width="1.708cm" fo:padding-top="0.13cm" fo:padding-bottom="0.13cm" fo:padding-left="0.25cm" fo:padding-right="0.25cm" fo:wrap-option="no-wrap" draw:shadow-color="#5e574e" loext:decorative="false"/>
    </style:style>
    <style:style style:name="gr54" style:family="graphic" style:parent-style-name="standard">
      <style:graphic-properties draw:stroke="none" draw:fill="gradient" draw:fill-color="#ffc62a" draw:fill-gradient-name="Gradient_20_1" draw:textarea-horizontal-align="left" draw:textarea-vertical-align="middle" draw:auto-grow-height="false" fo:min-height="0.136cm" fo:min-width="1.708cm" fo:padding-top="0.13cm" fo:padding-bottom="0.13cm" fo:padding-left="0.25cm" fo:padding-right="0.25cm" fo:wrap-option="no-wrap" draw:shadow-color="#5e574e" loext:decorative="false"/>
    </style:style>
    <style:style style:name="gr55" style:family="graphic" style:parent-style-name="standard" style:list-style-name="L13">
      <style:graphic-properties draw:stroke="none" draw:fill="none" draw:fill-color="#ff6600" draw:textarea-horizontal-align="justify" draw:textarea-vertical-align="middle" draw:auto-grow-height="false" fo:min-height="1.014cm" fo:min-width="4.184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c0c0c0" draw:textarea-horizontal-align="left" draw:textarea-vertical-align="top" draw:auto-grow-height="false" fo:min-height="4.264cm" fo:min-width="0.501cm" fo:padding-top="0.13cm" fo:padding-bottom="0.13cm" fo:padding-left="0.25cm" fo:padding-right="0.25cm" fo:wrap-option="wrap" draw:shadow-color="#5e574e" loext:decorative="false"/>
    </style:style>
    <style:style style:name="gr5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2a6bff" draw:textarea-horizontal-align="left" draw:textarea-vertical-align="top" draw:auto-grow-height="false" fo:min-height="4.472cm" fo:min-width="2.066cm" fo:padding-top="0.13cm" fo:padding-bottom="0.13cm" fo:padding-left="0.25cm" fo:padding-right="0.25cm" fo:wrap-option="wrap" draw:shadow-color="#5e574e" loext:decorative="false"/>
    </style:style>
    <style:style style:name="gr58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404040" draw:textarea-horizontal-align="left" draw:textarea-vertical-align="top" draw:auto-grow-height="false" fo:min-height="0.292cm" fo:min-width="3.063cm" fo:padding-top="0.13cm" fo:padding-bottom="0.13cm" fo:padding-left="0.25cm" fo:padding-right="0.25cm" fo:wrap-option="wrap" draw:shadow-color="#5e574e" loext:decorative="false"/>
    </style:style>
    <style:style style:name="gr59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e3e3e3" draw:textarea-horizontal-align="left" draw:textarea-vertical-align="top" draw:auto-grow-height="false" fo:min-height="4.066cm" fo:min-width="0cm" fo:padding-top="0.13cm" fo:padding-bottom="0.13cm" fo:padding-left="0.25cm" fo:padding-right="0.25cm" fo:wrap-option="wrap" draw:shadow-color="#5e574e" loext:decorative="false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61" style:family="graphic" style:parent-style-name="standard">
      <style:graphic-properties draw:stroke="none" draw:fill="none" draw:fill-color="#ff6600" draw:textarea-horizontal-align="left" draw:textarea-vertical-align="top" draw:auto-grow-height="false" fo:min-height="1.116cm" fo:min-width="0cm" fo:padding-top="0.13cm" fo:padding-bottom="0.13cm" fo:padding-left="0.25cm" fo:padding-right="0.25cm" fo:wrap-option="wrap" draw:shadow-color="#5e574e" loext:decorative="false"/>
    </style:style>
    <style:style style:name="gr62" style:family="graphic" style:parent-style-name="standard">
      <style:graphic-properties draw:stroke="solid" svg:stroke-width="0.035cm" svg:stroke-color="#000000" svg:stroke-opacity="100%" draw:stroke-linejoin="round" svg:stroke-linecap="round" draw:fill="none" draw:fill-color="#ff6600" draw:textarea-horizontal-align="left" draw:textarea-vertical-align="top" draw:auto-grow-height="false" fo:min-height="1.226cm" fo:min-width="0cm" fo:padding-top="0.13cm" fo:padding-bottom="0.13cm" fo:padding-left="0.25cm" fo:padding-right="0.25cm" fo:wrap-option="wrap" draw:shadow-color="#5e574e" loext:decorative="false"/>
    </style:style>
    <style:style style:name="gr63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000000" draw:textarea-horizontal-align="left" draw:textarea-vertical-align="top" draw:auto-grow-height="false" fo:min-height="1.032cm" fo:min-width="0.02cm" fo:padding-top="0.13cm" fo:padding-bottom="0.13cm" fo:padding-left="0.25cm" fo:padding-right="0.25cm" fo:wrap-option="wrap" draw:shadow-color="#5e574e" loext:decorative="false"/>
    </style:style>
    <style:style style:name="gr64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8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5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3.855cm" fo:min-width="0cm" fo:padding-top="0.13cm" fo:padding-bottom="0.13cm" fo:padding-left="0.25cm" fo:padding-right="0.25cm" fo:wrap-option="wrap" draw:shadow-color="#5e574e" loext:decorative="false"/>
    </style:style>
    <style:style style:name="gr6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3.916cm" fo:min-width="0cm" fo:padding-top="0.13cm" fo:padding-bottom="0.13cm" fo:padding-left="0.25cm" fo:padding-right="0.25cm" fo:wrap-option="wrap" draw:shadow-color="#5e574e" loext:decorative="false"/>
    </style:style>
    <style:style style:name="gr68" style:family="graphic" style:parent-style-name="standard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e574e" loext:decorative="false"/>
      <style:paragraph-properties style:writing-mode="lr-tb"/>
    </style:style>
    <style:style style:name="gr69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c0c0c0" draw:textarea-horizontal-align="left" draw:textarea-vertical-align="top" draw:auto-grow-height="false" fo:min-height="6.66cm" fo:min-width="1.523cm" fo:padding-top="0.13cm" fo:padding-bottom="0.13cm" fo:padding-left="0.25cm" fo:padding-right="0.25cm" fo:wrap-option="wrap" draw:shadow-color="#5e574e" loext:decorative="false"/>
    </style:style>
    <style:style style:name="gr70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2a6bff" draw:textarea-horizontal-align="left" draw:textarea-vertical-align="top" draw:auto-grow-height="false" fo:min-height="6.982cm" fo:min-width="4.68cm" fo:padding-top="0.13cm" fo:padding-bottom="0.13cm" fo:padding-left="0.25cm" fo:padding-right="0.25cm" fo:wrap-option="wrap" draw:shadow-color="#5e574e" loext:decorative="false"/>
    </style:style>
    <style:style style:name="gr71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404040" draw:textarea-horizontal-align="left" draw:textarea-vertical-align="top" draw:auto-grow-height="false" fo:min-height="0.578cm" fo:min-width="6.696cm" fo:padding-top="0.13cm" fo:padding-bottom="0.13cm" fo:padding-left="0.25cm" fo:padding-right="0.25cm" fo:wrap-option="wrap" draw:shadow-color="#5e574e" loext:decorative="false"/>
    </style:style>
    <style:style style:name="gr72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e3e3e3" draw:textarea-horizontal-align="left" draw:textarea-vertical-align="top" draw:auto-grow-height="false" fo:min-height="6.36cm" fo:min-width="0cm" fo:padding-top="0.13cm" fo:padding-bottom="0.13cm" fo:padding-left="0.25cm" fo:padding-right="0.25cm" fo:wrap-option="wrap" draw:shadow-color="#5e574e" loext:decorative="false"/>
    </style:style>
    <style:style style:name="gr73" style:family="graphic" style:parent-style-name="standard">
      <style:graphic-properties draw:stroke="none" draw:fill="none" draw:fill-color="#ff6600" draw:textarea-horizontal-align="left" draw:textarea-vertical-align="top" draw:auto-grow-height="false" fo:min-height="1.851cm" fo:min-width="0cm" fo:padding-top="0.13cm" fo:padding-bottom="0.13cm" fo:padding-left="0.25cm" fo:padding-right="0.25cm" fo:wrap-option="wrap" draw:shadow-color="#5e574e" loext:decorative="false"/>
    </style:style>
    <style:style style:name="gr74" style:family="graphic" style:parent-style-name="standard">
      <style:graphic-properties draw:stroke="solid" svg:stroke-width="0.035cm" svg:stroke-color="#000000" svg:stroke-opacity="100%" draw:stroke-linejoin="round" svg:stroke-linecap="round" draw:fill="none" draw:fill-color="#ff6600" draw:textarea-horizontal-align="left" draw:textarea-vertical-align="top" draw:auto-grow-height="false" fo:min-height="2.019cm" fo:min-width="0.091cm" fo:padding-top="0.13cm" fo:padding-bottom="0.13cm" fo:padding-left="0.25cm" fo:padding-right="0.25cm" fo:wrap-option="wrap" draw:shadow-color="#5e574e" loext:decorative="false"/>
    </style:style>
    <style:style style:name="gr75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000000" draw:textarea-horizontal-align="left" draw:textarea-vertical-align="top" draw:auto-grow-height="false" fo:min-height="1.697cm" fo:min-width="0.545cm" fo:padding-top="0.13cm" fo:padding-bottom="0.13cm" fo:padding-left="0.25cm" fo:padding-right="0.25cm" fo:wrap-option="wrap" draw:shadow-color="#5e574e" loext:decorative="false"/>
    </style:style>
    <style:style style:name="gr7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80" draw:textarea-horizontal-align="left" draw:textarea-vertical-align="top" draw:auto-grow-height="false" fo:min-height="0.055cm" fo:min-width="0.177cm" fo:padding-top="0.13cm" fo:padding-bottom="0.13cm" fo:padding-left="0.25cm" fo:padding-right="0.25cm" fo:wrap-option="wrap" draw:shadow-color="#5e574e" loext:decorative="false"/>
    </style:style>
    <style:style style:name="gr7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80" draw:textarea-horizontal-align="left" draw:textarea-vertical-align="top" draw:auto-grow-height="false" fo:min-height="0.055cm" fo:min-width="0.077cm" fo:padding-top="0.13cm" fo:padding-bottom="0.13cm" fo:padding-left="0.25cm" fo:padding-right="0.25cm" fo:wrap-option="wrap" draw:shadow-color="#5e574e" loext:decorative="false"/>
    </style:style>
    <style:style style:name="gr78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0.055cm" fo:min-width="0cm" fo:padding-top="0.13cm" fo:padding-bottom="0.13cm" fo:padding-left="0.25cm" fo:padding-right="0.25cm" fo:wrap-option="wrap" draw:shadow-color="#5e574e" loext:decorative="false"/>
    </style:style>
    <style:style style:name="gr79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6.032cm" fo:min-width="0cm" fo:padding-top="0.13cm" fo:padding-bottom="0.13cm" fo:padding-left="0.25cm" fo:padding-right="0.25cm" fo:wrap-option="wrap" draw:shadow-color="#5e574e" loext:decorative="false"/>
    </style:style>
    <style:style style:name="gr80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0.047cm" fo:min-width="0cm" fo:padding-top="0.13cm" fo:padding-bottom="0.13cm" fo:padding-left="0.25cm" fo:padding-right="0.25cm" fo:wrap-option="wrap" draw:shadow-color="#5e574e" loext:decorative="false"/>
    </style:style>
    <style:style style:name="gr81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d5006c" draw:textarea-horizontal-align="left" draw:textarea-vertical-align="top" draw:auto-grow-height="false" fo:min-height="6.129cm" fo:min-width="0cm" fo:padding-top="0.13cm" fo:padding-bottom="0.13cm" fo:padding-left="0.25cm" fo:padding-right="0.25cm" fo:wrap-option="wrap" draw:shadow-color="#5e574e" loext:decorative="false"/>
    </style:style>
    <style:style style:name="gr82" style:family="graphic" style:parent-style-name="standard">
      <style:graphic-properties draw:stroke="dash" draw:stroke-dash="Long_20_Dash_20_Dot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83" style:family="graphic" style:parent-style-name="standard">
      <style:graphic-properties draw:stroke="none" draw:fill="solid" draw:fill-color="#3c0023" draw:textarea-horizontal-align="left" draw:textarea-vertical-align="middle" draw:auto-grow-height="false" fo:min-height="0.035cm" fo:min-width="0.432cm" fo:padding-top="0.13cm" fo:padding-bottom="0.13cm" fo:padding-left="0.25cm" fo:padding-right="0.25cm" fo:wrap-option="no-wrap" draw:shadow-color="#5e574e" loext:decorative="false"/>
    </style:style>
    <style:style style:name="gr84" style:family="graphic" style:parent-style-name="standard">
      <style:graphic-properties draw:stroke="none" draw:fill="gradient" draw:fill-color="#6e0043" draw:fill-gradient-name="Gradient_20_2" draw:textarea-horizontal-align="left" draw:textarea-vertical-align="top" draw:auto-grow-height="false" fo:min-height="0.815cm" fo:min-width="0.479cm" fo:padding-top="0.13cm" fo:padding-bottom="0.13cm" fo:padding-left="0.25cm" fo:padding-right="0.25cm" fo:wrap-option="wrap" draw:shadow-color="#5e574e" loext:decorative="false"/>
    </style:style>
    <style:style style:name="gr85" style:family="graphic" style:parent-style-name="standard">
      <style:graphic-properties draw:stroke="none" draw:fill="gradient" draw:fill-color="#d93192" draw:fill-gradient-name="Gradient_20_3" draw:textarea-horizontal-align="left" draw:textarea-vertical-align="top" draw:auto-grow-height="false" fo:min-height="0.749cm" fo:min-width="0cm" fo:padding-top="0.13cm" fo:padding-bottom="0.13cm" fo:padding-left="0.25cm" fo:padding-right="0.25cm" fo:wrap-option="wrap" draw:shadow-color="#5e574e" loext:decorative="false"/>
    </style:style>
    <style:style style:name="gr86" style:family="graphic" style:parent-style-name="standard">
      <style:graphic-properties draw:stroke="none" draw:fill="gradient" draw:fill-color="#d93192" draw:fill-gradient-name="Gradient_20_4" draw:textarea-horizontal-align="left" draw:textarea-vertical-align="top" draw:auto-grow-height="false" fo:min-height="0.142cm" fo:min-width="0.629cm" fo:padding-top="0.13cm" fo:padding-bottom="0.13cm" fo:padding-left="0.25cm" fo:padding-right="0.25cm" fo:wrap-option="wrap" draw:shadow-color="#5e574e" loext:decorative="false"/>
    </style:style>
    <style:style style:name="gr87" style:family="graphic" style:parent-style-name="standard" style:list-style-name="L14">
      <style:graphic-properties draw:stroke="none" draw:fill="solid" draw:fill-color="#5e574e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88" style:family="graphic" style:parent-style-name="standard" style:list-style-name="L1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89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65cm" fo:min-width="6.278cm" fo:padding-top="0.13cm" fo:padding-bottom="0.13cm" fo:padding-left="0.25cm" fo:padding-right="0.25cm" fo:wrap-option="wrap" draw:shadow-color="#5e574e" loext:decorative="false"/>
    </style:style>
    <style:style style:name="gr90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761cm" fo:min-width="8.487cm" fo:padding-top="0.13cm" fo:padding-bottom="0.13cm" fo:padding-left="0.25cm" fo:padding-right="0.25cm" fo:wrap-option="wrap" draw:shadow-color="#5e574e" loext:decorative="false"/>
    </style:style>
    <style:style style:name="gr91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761cm" fo:min-width="7.221cm" fo:padding-top="0.13cm" fo:padding-bottom="0.13cm" fo:padding-left="0.25cm" fo:padding-right="0.25cm" fo:wrap-option="wrap" draw:shadow-color="#5e574e" loext:decorative="false"/>
    </style:style>
    <style:style style:name="gr92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3.29cm" fo:min-width="9.007cm" fo:padding-top="0.13cm" fo:padding-bottom="0.13cm" fo:padding-left="0.25cm" fo:padding-right="0.25cm" fo:wrap-option="wrap" draw:shadow-color="#5e574e" loext:decorative="false"/>
    </style:style>
    <style:style style:name="gr93" style:family="graphic" style:parent-style-name="standard" style:list-style-name="L1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94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429cm" fo:min-width="0.316cm" fo:padding-top="0.13cm" fo:padding-bottom="0.13cm" fo:padding-left="0.25cm" fo:padding-right="0.25cm" fo:wrap-option="wrap" draw:shadow-color="#5e574e" loext:decorative="false"/>
    </style:style>
    <style:style style:name="gr95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68cm" fo:min-width="3.738cm" fo:padding-top="0.13cm" fo:padding-bottom="0.13cm" fo:padding-left="0.25cm" fo:padding-right="0.25cm" fo:wrap-option="wrap" draw:shadow-color="#5e574e" loext:decorative="false"/>
    </style:style>
    <style:style style:name="gr96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703cm" fo:min-width="1.669cm" fo:padding-top="0.13cm" fo:padding-bottom="0.13cm" fo:padding-left="0.25cm" fo:padding-right="0.25cm" fo:wrap-option="wrap" draw:shadow-color="#5e574e" loext:decorative="false"/>
    </style:style>
    <style:style style:name="gr97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544cm" fo:min-width="2.653cm" fo:padding-top="0.13cm" fo:padding-bottom="0.13cm" fo:padding-left="0.25cm" fo:padding-right="0.25cm" fo:wrap-option="wrap" draw:shadow-color="#5e574e" loext:decorative="false"/>
    </style:style>
    <style:style style:name="gr98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179cm" fo:min-width="0.96cm" fo:padding-top="0.13cm" fo:padding-bottom="0.13cm" fo:padding-left="0.25cm" fo:padding-right="0.25cm" fo:wrap-option="wrap" draw:shadow-color="#5e574e" loext:decorative="false"/>
    </style:style>
    <style:style style:name="gr99" style:family="graphic" style:parent-style-name="standard">
      <style:graphic-properties draw:stroke="solid" svg:stroke-width="0.071cm" svg:stroke-color="#000000" draw:stroke-linejoin="miter" draw:fill="none" draw:fill-color="#ff6600" draw:textarea-horizontal-align="left" draw:textarea-vertical-align="middle" draw:auto-grow-height="false" fo:min-height="1.736cm" fo:min-width="4.911cm" fo:padding-top="0.13cm" fo:padding-bottom="0.13cm" fo:padding-left="0.25cm" fo:padding-right="0.25cm" fo:wrap-option="no-wrap" draw:shadow-color="#5e574e" loext:decorative="false"/>
    </style:style>
    <style:style style:name="gr100" style:family="graphic" style:parent-style-name="standard">
      <style:graphic-properties draw:stroke="none" draw:fill="solid" draw:fill-color="#f0e0c0" draw:textarea-horizontal-align="left" draw:textarea-vertical-align="top" draw:auto-grow-height="false" fo:min-height="0.755cm" fo:min-width="0.051cm" fo:padding-top="0.13cm" fo:padding-bottom="0.13cm" fo:padding-left="0.25cm" fo:padding-right="0.25cm" fo:wrap-option="wrap" draw:shadow-color="#5e574e" loext:decorative="false"/>
    </style:style>
    <style:style style:name="gr101" style:family="graphic" style:parent-style-name="standard">
      <style:graphic-properties draw:stroke="none" draw:fill="solid" draw:fill-color="#a0a080" draw:textarea-horizontal-align="left" draw:textarea-vertical-align="top" draw:auto-grow-height="false" fo:min-height="0cm" fo:min-width="0.051cm" fo:padding-top="0.13cm" fo:padding-bottom="0.13cm" fo:padding-left="0.25cm" fo:padding-right="0.25cm" fo:wrap-option="wrap" draw:shadow-color="#5e574e" loext:decorative="false"/>
    </style:style>
    <style:style style:name="gr102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051cm" fo:padding-top="0.13cm" fo:padding-bottom="0.13cm" fo:padding-left="0.25cm" fo:padding-right="0.25cm" fo:wrap-option="wrap" draw:shadow-color="#5e574e" loext:decorative="false"/>
    </style:style>
    <style:style style:name="gr103" style:family="graphic" style:parent-style-name="standard">
      <style:graphic-properties draw:stroke="none" draw:fill="solid" draw:fill-color="#80806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" style:family="graphic" style:parent-style-name="standard">
      <style:graphic-properties draw:stroke="solid" svg:stroke-width="0.035cm" svg:stroke-color="#80806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98cm" fo:min-width="0cm" fo:padding-top="0.13cm" fo:padding-bottom="0.13cm" fo:padding-left="0.25cm" fo:padding-right="0.25cm" fo:wrap-option="wrap" draw:shadow-color="#5e574e" loext:decorative="false"/>
    </style:style>
    <style:style style:name="gr105" style:family="graphic" style:parent-style-name="standard">
      <style:graphic-properties draw:stroke="none" draw:fill="solid" draw:fill-color="#f0e0c0" draw:textarea-horizontal-align="left" draw:textarea-vertical-align="top" draw:auto-grow-height="false" fo:min-height="0.494cm" fo:min-width="0.051cm" fo:padding-top="0.13cm" fo:padding-bottom="0.13cm" fo:padding-left="0.25cm" fo:padding-right="0.25cm" fo:wrap-option="wrap" draw:shadow-color="#5e574e" loext:decorative="false"/>
    </style:style>
    <style:style style:name="gr106" style:family="graphic" style:parent-style-name="standard">
      <style:graphic-properties draw:stroke="none" draw:fill="solid" draw:fill-color="#f0e0c0" draw:textarea-horizontal-align="left" draw:textarea-vertical-align="top" draw:auto-grow-height="false" fo:min-height="0.203cm" fo:min-width="0cm" fo:padding-top="0.13cm" fo:padding-bottom="0.13cm" fo:padding-left="0.25cm" fo:padding-right="0.25cm" fo:wrap-option="wrap" draw:shadow-color="#5e574e" loext:decorative="false"/>
    </style:style>
    <style:style style:name="gr10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50502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8" style:family="graphic" style:parent-style-name="standard">
      <style:graphic-properties draw:stroke="none" draw:fill="solid" draw:fill-color="#c0c08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9" style:family="graphic" style:parent-style-name="standard">
      <style:graphic-properties draw:stroke="none" draw:fill="solid" draw:fill-color="#00dfc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0" style:family="graphic" style:parent-style-name="standard">
      <style:graphic-properties draw:stroke="none" draw:fill="solid" draw:fill-color="#80805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1" style:family="graphic" style:parent-style-name="standard">
      <style:graphic-properties draw:stroke="none" draw:fill="solid" draw:fill-color="#a0a08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2" style:family="graphic" style:parent-style-name="standard">
      <style:graphic-properties draw:stroke="none" draw:fill="solid" draw:fill-color="#a0806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3" style:family="graphic" style:parent-style-name="standard">
      <style:graphic-properties draw:stroke="none" draw:fill="solid" draw:fill-color="#50502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4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5" style:family="graphic" style:parent-style-name="standard">
      <style:graphic-properties draw:stroke="none" draw:fill="solid" draw:fill-color="#40401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6" style:family="graphic" style:parent-style-name="standard">
      <style:graphic-properties draw:stroke="none" draw:fill="solid" draw:fill-color="#e0d0a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7" style:family="graphic" style:parent-style-name="standard">
      <style:graphic-properties draw:stroke="none" draw:fill="solid" draw:fill-color="#e0e0b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8" style:family="graphic" style:parent-style-name="standard">
      <style:graphic-properties draw:stroke="none" draw:fill="solid" draw:fill-color="#f0e0c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9" style:family="graphic" style:parent-style-name="standard">
      <style:graphic-properties draw:stroke="none" draw:fill="solid" draw:fill-color="#a0a07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0" style:family="graphic" style:parent-style-name="standard">
      <style:graphic-properties draw:stroke="none" draw:fill="solid" draw:fill-color="#a0ff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1" style:family="graphic" style:parent-style-name="standard">
      <style:graphic-properties draw:stroke="non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2" style:family="graphic" style:parent-style-name="standard">
      <style:graphic-properties draw:stroke="none" draw:fill="solid" draw:fill-color="#70604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3" style:family="graphic" style:parent-style-name="standard">
      <style:graphic-properties draw:stroke="none" draw:fill="solid" draw:fill-color="#d0c0a0" draw:textarea-horizontal-align="left" draw:textarea-vertical-align="top" draw:auto-grow-height="false" fo:min-height="0cm" fo:min-width="0.051cm" fo:padding-top="0.13cm" fo:padding-bottom="0.13cm" fo:padding-left="0.25cm" fo:padding-right="0.25cm" fo:wrap-option="wrap" draw:shadow-color="#5e574e" loext:decorative="false"/>
    </style:style>
    <style:style style:name="gr124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5" style:family="graphic" style:parent-style-name="standard">
      <style:graphic-properties draw:stroke="solid" svg:stroke-width="0.035cm" svg:stroke-color="#000000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6" style:family="graphic" style:parent-style-name="standard">
      <style:graphic-properties draw:stroke="solid" svg:stroke-width="0.035cm" svg:stroke-color="#808060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7" style:family="graphic" style:parent-style-name="standard">
      <style:graphic-properties draw:stroke="solid" svg:stroke-width="0.035cm" svg:stroke-color="#c0c0c0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8" style:family="graphic" style:parent-style-name="standard">
      <style:graphic-properties draw:stroke="none" draw:fill="solid" draw:fill-color="#ff6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29" style:family="graphic" style:parent-style-name="standard">
      <style:graphic-properties draw:stroke="solid" svg:stroke-width="0.035cm" svg:stroke-color="#f0e0c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30" style:family="graphic" style:parent-style-name="standard">
      <style:graphic-properties draw:stroke="none" draw:fill="solid" draw:fill-color="#f0e0c0" draw:textarea-horizontal-align="left" draw:textarea-vertical-align="top" draw:auto-grow-height="false" fo:min-height="0.754cm" fo:min-width="0.047cm" fo:padding-top="0.13cm" fo:padding-bottom="0.13cm" fo:padding-left="0.25cm" fo:padding-right="0.25cm" fo:wrap-option="wrap" draw:shadow-color="#5e574e" loext:decorative="false"/>
    </style:style>
    <style:style style:name="gr131" style:family="graphic" style:parent-style-name="standard">
      <style:graphic-properties draw:stroke="none" draw:fill="solid" draw:fill-color="#a0a080" draw:textarea-horizontal-align="left" draw:textarea-vertical-align="top" draw:auto-grow-height="false" fo:min-height="0cm" fo:min-width="0.047cm" fo:padding-top="0.13cm" fo:padding-bottom="0.13cm" fo:padding-left="0.25cm" fo:padding-right="0.25cm" fo:wrap-option="wrap" draw:shadow-color="#5e574e" loext:decorative="false"/>
    </style:style>
    <style:style style:name="gr132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047cm" fo:padding-top="0.13cm" fo:padding-bottom="0.13cm" fo:padding-left="0.25cm" fo:padding-right="0.25cm" fo:wrap-option="wrap" draw:shadow-color="#5e574e" loext:decorative="false"/>
    </style:style>
    <style:style style:name="gr133" style:family="graphic" style:parent-style-name="standard">
      <style:graphic-properties draw:stroke="solid" svg:stroke-width="0.035cm" svg:stroke-color="#80806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97cm" fo:min-width="0cm" fo:padding-top="0.13cm" fo:padding-bottom="0.13cm" fo:padding-left="0.25cm" fo:padding-right="0.25cm" fo:wrap-option="wrap" draw:shadow-color="#5e574e" loext:decorative="false"/>
    </style:style>
    <style:style style:name="gr134" style:family="graphic" style:parent-style-name="standard">
      <style:graphic-properties draw:stroke="none" draw:fill="solid" draw:fill-color="#f0e0c0" draw:textarea-horizontal-align="left" draw:textarea-vertical-align="top" draw:auto-grow-height="false" fo:min-height="0.494cm" fo:min-width="0.047cm" fo:padding-top="0.13cm" fo:padding-bottom="0.13cm" fo:padding-left="0.25cm" fo:padding-right="0.25cm" fo:wrap-option="wrap" draw:shadow-color="#5e574e" loext:decorative="false"/>
    </style:style>
    <style:style style:name="gr135" style:family="graphic" style:parent-style-name="standard">
      <style:graphic-properties draw:stroke="none" draw:fill="solid" draw:fill-color="#d0c0a0" draw:textarea-horizontal-align="left" draw:textarea-vertical-align="top" draw:auto-grow-height="false" fo:min-height="0cm" fo:min-width="0.047cm" fo:padding-top="0.13cm" fo:padding-bottom="0.13cm" fo:padding-left="0.25cm" fo:padding-right="0.25cm" fo:wrap-option="wrap" draw:shadow-color="#5e574e" loext:decorative="false"/>
    </style:style>
    <style:style style:name="gr136" style:family="graphic" style:parent-style-name="standard">
      <style:graphic-properties draw:stroke="none" draw:fill="solid" draw:fill-color="#f0e0c0" draw:textarea-horizontal-align="left" draw:textarea-vertical-align="top" draw:auto-grow-height="false" fo:min-height="0.755cm" fo:min-width="0.052cm" fo:padding-top="0.13cm" fo:padding-bottom="0.13cm" fo:padding-left="0.25cm" fo:padding-right="0.25cm" fo:wrap-option="wrap" draw:shadow-color="#5e574e" loext:decorative="false"/>
    </style:style>
    <style:style style:name="gr137" style:family="graphic" style:parent-style-name="standard">
      <style:graphic-properties draw:stroke="none" draw:fill="solid" draw:fill-color="#a0a080" draw:textarea-horizontal-align="left" draw:textarea-vertical-align="top" draw:auto-grow-height="false" fo:min-height="0cm" fo:min-width="0.052cm" fo:padding-top="0.13cm" fo:padding-bottom="0.13cm" fo:padding-left="0.25cm" fo:padding-right="0.25cm" fo:wrap-option="wrap" draw:shadow-color="#5e574e" loext:decorative="false"/>
    </style:style>
    <style:style style:name="gr138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052cm" fo:padding-top="0.13cm" fo:padding-bottom="0.13cm" fo:padding-left="0.25cm" fo:padding-right="0.25cm" fo:wrap-option="wrap" draw:shadow-color="#5e574e" loext:decorative="false"/>
    </style:style>
    <style:style style:name="gr139" style:family="graphic" style:parent-style-name="standard">
      <style:graphic-properties draw:stroke="none" draw:fill="solid" draw:fill-color="#f0e0c0" draw:textarea-horizontal-align="left" draw:textarea-vertical-align="top" draw:auto-grow-height="false" fo:min-height="0.494cm" fo:min-width="0.052cm" fo:padding-top="0.13cm" fo:padding-bottom="0.13cm" fo:padding-left="0.25cm" fo:padding-right="0.25cm" fo:wrap-option="wrap" draw:shadow-color="#5e574e" loext:decorative="false"/>
    </style:style>
    <style:style style:name="gr140" style:family="graphic" style:parent-style-name="standard">
      <style:graphic-properties draw:stroke="none" draw:fill="solid" draw:fill-color="#f0e0c0" draw:textarea-horizontal-align="left" draw:textarea-vertical-align="top" draw:auto-grow-height="false" fo:min-height="0.204cm" fo:min-width="0cm" fo:padding-top="0.13cm" fo:padding-bottom="0.13cm" fo:padding-left="0.25cm" fo:padding-right="0.25cm" fo:wrap-option="wrap" draw:shadow-color="#5e574e" loext:decorative="false"/>
    </style:style>
    <style:style style:name="gr141" style:family="graphic" style:parent-style-name="standard">
      <style:graphic-properties draw:stroke="none" draw:fill="solid" draw:fill-color="#d0c0a0" draw:textarea-horizontal-align="left" draw:textarea-vertical-align="top" draw:auto-grow-height="false" fo:min-height="0cm" fo:min-width="0.052cm" fo:padding-top="0.13cm" fo:padding-bottom="0.13cm" fo:padding-left="0.25cm" fo:padding-right="0.25cm" fo:wrap-option="wrap" draw:shadow-color="#5e574e" loext:decorative="false"/>
    </style:style>
    <style:style style:name="gr142" style:family="graphic" style:parent-style-name="standard">
      <style:graphic-properties draw:stroke="none" draw:fill="solid" draw:fill-color="#f0e0c0" draw:textarea-horizontal-align="left" draw:textarea-vertical-align="top" draw:auto-grow-height="false" fo:min-height="0.755cm" fo:min-width="0.047cm" fo:padding-top="0.13cm" fo:padding-bottom="0.13cm" fo:padding-left="0.25cm" fo:padding-right="0.25cm" fo:wrap-option="wrap" draw:shadow-color="#5e574e" loext:decorative="false"/>
    </style:style>
    <style:style style:name="gr143" style:family="graphic" style:parent-style-name="standard" style:list-style-name="L1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44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173cm" fo:min-width="4.54cm" fo:padding-top="0.13cm" fo:padding-bottom="0.13cm" fo:padding-left="0.25cm" fo:padding-right="0.25cm" fo:wrap-option="wrap" draw:shadow-color="#5e574e" loext:decorative="false"/>
    </style:style>
    <style:style style:name="gr145" style:family="graphic" style:parent-style-name="standard">
      <style:graphic-properties draw:stroke="none" draw:fill="solid" draw:fill-color="#f0e0c0" draw:textarea-horizontal-align="left" draw:textarea-vertical-align="top" draw:auto-grow-height="false" fo:min-height="0.754cm" fo:min-width="0.051cm" fo:padding-top="0.13cm" fo:padding-bottom="0.13cm" fo:padding-left="0.25cm" fo:padding-right="0.25cm" fo:wrap-option="wrap" draw:shadow-color="#5e574e" loext:decorative="false"/>
    </style:style>
    <style:style style:name="gr146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703cm" fo:min-width="1.666cm" fo:padding-top="0.13cm" fo:padding-bottom="0.13cm" fo:padding-left="0.25cm" fo:padding-right="0.25cm" fo:wrap-option="wrap" draw:shadow-color="#5e574e" loext:decorative="false"/>
    </style:style>
    <style:style style:name="gr147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429cm" fo:min-width="0cm" fo:padding-top="0.13cm" fo:padding-bottom="0.13cm" fo:padding-left="0.25cm" fo:padding-right="0.25cm" fo:wrap-option="wrap" draw:shadow-color="#5e574e" loext:decorative="false"/>
    </style:style>
    <style:style style:name="gr148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875cm" fo:min-width="0.964cm" fo:padding-top="0.13cm" fo:padding-bottom="0.13cm" fo:padding-left="0.25cm" fo:padding-right="0.25cm" fo:wrap-option="wrap" draw:shadow-color="#5e574e" loext:decorative="false"/>
    </style:style>
    <style:style style:name="gr149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179cm" fo:min-width="6.89cm" fo:padding-top="0.13cm" fo:padding-bottom="0.13cm" fo:padding-left="0.25cm" fo:padding-right="0.25cm" fo:wrap-option="wrap" draw:shadow-color="#5e574e" loext:decorative="false"/>
    </style:style>
    <style:style style:name="gr150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319cm" fo:min-width="2.657cm" fo:padding-top="0.13cm" fo:padding-bottom="0.13cm" fo:padding-left="0.25cm" fo:padding-right="0.25cm" fo:wrap-option="wrap" draw:shadow-color="#5e574e" loext:decorative="false"/>
    </style:style>
    <style:style style:name="gr151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173cm" fo:min-width="4.959cm" fo:padding-top="0.13cm" fo:padding-bottom="0.13cm" fo:padding-left="0.25cm" fo:padding-right="0.25cm" fo:wrap-option="wrap" draw:shadow-color="#5e574e" loext:decorative="false"/>
    </style:style>
    <style:style style:name="gr152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914cm" fo:min-width="5.855cm" fo:padding-top="0.13cm" fo:padding-bottom="0.13cm" fo:padding-left="0.25cm" fo:padding-right="0.25cm" fo:wrap-option="wrap" draw:shadow-color="#5e574e" loext:decorative="false"/>
    </style:style>
    <style:style style:name="gr153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919cm" fo:min-width="7.596cm" fo:padding-top="0.13cm" fo:padding-bottom="0.13cm" fo:padding-left="0.25cm" fo:padding-right="0.25cm" fo:wrap-option="wrap" draw:shadow-color="#5e574e" loext:decorative="false"/>
    </style:style>
    <style:style style:name="gr154" style:family="graphic" style:parent-style-name="standard" style:list-style-name="L1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55" style:family="graphic" style:parent-style-name="standard" style:list-style-name="L1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56" style:family="graphic" style:parent-style-name="standard">
      <style:graphic-properties draw:stroke="none" draw:fill="gradient" draw:fill-color="#dc0081" draw:fill-gradient-name="Gradient_20_5" draw:textarea-horizontal-align="left" draw:textarea-vertical-align="middle" draw:auto-grow-height="false" fo:min-height="0.957cm" fo:min-width="3.637cm" fo:padding-top="0.13cm" fo:padding-bottom="0.13cm" fo:padding-left="0.25cm" fo:padding-right="0.25cm" fo:wrap-option="no-wrap" draw:shadow-color="#5e574e" loext:decorative="false"/>
    </style:style>
    <style:style style:name="gr157" style:family="graphic" style:parent-style-name="standard" style:list-style-name="L14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58" style:family="graphic" style:parent-style-name="standard">
      <style:graphic-properties draw:stroke="none" draw:fill="solid" draw:fill-color="#f0e0c0" draw:textarea-horizontal-align="left" draw:textarea-vertical-align="top" draw:auto-grow-height="false" fo:min-height="1.005cm" fo:min-width="0.184cm" fo:padding-top="0.13cm" fo:padding-bottom="0.13cm" fo:padding-left="0.25cm" fo:padding-right="0.25cm" fo:wrap-option="wrap" draw:shadow-color="#5e574e" loext:decorative="false"/>
    </style:style>
    <style:style style:name="gr159" style:family="graphic" style:parent-style-name="standard">
      <style:graphic-properties draw:stroke="none" draw:fill="solid" draw:fill-color="#a0a080" draw:textarea-horizontal-align="left" draw:textarea-vertical-align="top" draw:auto-grow-height="false" fo:min-height="0cm" fo:min-width="0.184cm" fo:padding-top="0.13cm" fo:padding-bottom="0.13cm" fo:padding-left="0.25cm" fo:padding-right="0.25cm" fo:wrap-option="wrap" draw:shadow-color="#5e574e" loext:decorative="false"/>
    </style:style>
    <style:style style:name="gr160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184cm" fo:padding-top="0.13cm" fo:padding-bottom="0.13cm" fo:padding-left="0.25cm" fo:padding-right="0.25cm" fo:wrap-option="wrap" draw:shadow-color="#5e574e" loext:decorative="false"/>
    </style:style>
    <style:style style:name="gr161" style:family="graphic" style:parent-style-name="standard">
      <style:graphic-properties draw:stroke="solid" svg:stroke-width="0.035cm" svg:stroke-color="#80806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85cm" fo:min-width="0cm" fo:padding-top="0.13cm" fo:padding-bottom="0.13cm" fo:padding-left="0.25cm" fo:padding-right="0.25cm" fo:wrap-option="wrap" draw:shadow-color="#5e574e" loext:decorative="false"/>
    </style:style>
    <style:style style:name="gr162" style:family="graphic" style:parent-style-name="standard">
      <style:graphic-properties draw:stroke="none" draw:fill="solid" draw:fill-color="#f0e0c0" draw:textarea-horizontal-align="left" draw:textarea-vertical-align="top" draw:auto-grow-height="false" fo:min-height="0.679cm" fo:min-width="0.184cm" fo:padding-top="0.13cm" fo:padding-bottom="0.13cm" fo:padding-left="0.25cm" fo:padding-right="0.25cm" fo:wrap-option="wrap" draw:shadow-color="#5e574e" loext:decorative="false"/>
    </style:style>
    <style:style style:name="gr163" style:family="graphic" style:parent-style-name="standard">
      <style:graphic-properties draw:stroke="none" draw:fill="solid" draw:fill-color="#f0e0c0" draw:textarea-horizontal-align="left" draw:textarea-vertical-align="top" draw:auto-grow-height="false" fo:min-height="0.317cm" fo:min-width="0.047cm" fo:padding-top="0.13cm" fo:padding-bottom="0.13cm" fo:padding-left="0.25cm" fo:padding-right="0.25cm" fo:wrap-option="wrap" draw:shadow-color="#5e574e" loext:decorative="false"/>
    </style:style>
    <style:style style:name="gr164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505020" draw:textarea-horizontal-align="left" draw:textarea-vertical-align="top" draw:auto-grow-height="false" fo:min-height="0cm" fo:min-width="0.047cm" fo:padding-top="0.13cm" fo:padding-bottom="0.13cm" fo:padding-left="0.25cm" fo:padding-right="0.25cm" fo:wrap-option="wrap" draw:shadow-color="#5e574e" loext:decorative="false"/>
    </style:style>
    <style:style style:name="gr165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505020" draw:textarea-horizontal-align="left" draw:textarea-vertical-align="top" draw:auto-grow-height="false" fo:min-height="0cm" fo:min-width="0.051cm" fo:padding-top="0.13cm" fo:padding-bottom="0.13cm" fo:padding-left="0.25cm" fo:padding-right="0.25cm" fo:wrap-option="wrap" draw:shadow-color="#5e574e" loext:decorative="false"/>
    </style:style>
    <style:style style:name="gr166" style:family="graphic" style:parent-style-name="standard">
      <style:graphic-properties draw:stroke="none" draw:fill="solid" draw:fill-color="#c0c080" draw:textarea-horizontal-align="left" draw:textarea-vertical-align="top" draw:auto-grow-height="false" fo:min-height="0cm" fo:min-width="0.033cm" fo:padding-top="0.13cm" fo:padding-bottom="0.13cm" fo:padding-left="0.25cm" fo:padding-right="0.25cm" fo:wrap-option="wrap" draw:shadow-color="#5e574e" loext:decorative="false"/>
    </style:style>
    <style:style style:name="gr167" style:family="graphic" style:parent-style-name="standard">
      <style:graphic-properties draw:stroke="none" draw:fill="solid" draw:fill-color="#c0c080" draw:textarea-horizontal-align="left" draw:textarea-vertical-align="top" draw:auto-grow-height="false" fo:min-height="0cm" fo:min-width="0.029cm" fo:padding-top="0.13cm" fo:padding-bottom="0.13cm" fo:padding-left="0.25cm" fo:padding-right="0.25cm" fo:wrap-option="wrap" draw:shadow-color="#5e574e" loext:decorative="false"/>
    </style:style>
    <style:style style:name="gr168" style:family="graphic" style:parent-style-name="standard">
      <style:graphic-properties draw:stroke="none" draw:fill="solid" draw:fill-color="#505020" draw:textarea-horizontal-align="left" draw:textarea-vertical-align="top" draw:auto-grow-height="false" fo:min-height="0cm" fo:min-width="0.025cm" fo:padding-top="0.13cm" fo:padding-bottom="0.13cm" fo:padding-left="0.25cm" fo:padding-right="0.25cm" fo:wrap-option="wrap" draw:shadow-color="#5e574e" loext:decorative="false"/>
    </style:style>
    <style:style style:name="gr169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029cm" fo:padding-top="0.13cm" fo:padding-bottom="0.13cm" fo:padding-left="0.25cm" fo:padding-right="0.25cm" fo:wrap-option="wrap" draw:shadow-color="#5e574e" loext:decorative="false"/>
    </style:style>
    <style:style style:name="gr170" style:family="graphic" style:parent-style-name="standard">
      <style:graphic-properties draw:stroke="none" draw:fill="solid" draw:fill-color="#e0d0a0" draw:textarea-horizontal-align="left" draw:textarea-vertical-align="top" draw:auto-grow-height="false" fo:min-height="0cm" fo:min-width="0.06cm" fo:padding-top="0.13cm" fo:padding-bottom="0.13cm" fo:padding-left="0.25cm" fo:padding-right="0.25cm" fo:wrap-option="wrap" draw:shadow-color="#5e574e" loext:decorative="false"/>
    </style:style>
    <style:style style:name="gr171" style:family="graphic" style:parent-style-name="standard">
      <style:graphic-properties draw:stroke="none" draw:fill="solid" draw:fill-color="#d0c0a0" draw:textarea-horizontal-align="left" draw:textarea-vertical-align="top" draw:auto-grow-height="false" fo:min-height="0cm" fo:min-width="0.184cm" fo:padding-top="0.13cm" fo:padding-bottom="0.13cm" fo:padding-left="0.25cm" fo:padding-right="0.25cm" fo:wrap-option="wrap" draw:shadow-color="#5e574e" loext:decorative="false"/>
    </style:style>
    <style:style style:name="gr172" style:family="graphic" style:parent-style-name="standard">
      <style:graphic-properties draw:stroke="none" draw:fill="solid" draw:fill-color="#f0e0c0" draw:textarea-horizontal-align="left" draw:textarea-vertical-align="top" draw:auto-grow-height="false" fo:min-height="0cm" fo:min-width="0.06cm" fo:padding-top="0.13cm" fo:padding-bottom="0.13cm" fo:padding-left="0.25cm" fo:padding-right="0.25cm" fo:wrap-option="wrap" draw:shadow-color="#5e574e" loext:decorative="false"/>
    </style:style>
    <style:style style:name="gr173" style:family="graphic" style:parent-style-name="standard">
      <style:graphic-properties draw:stroke="solid" svg:stroke-width="0.035cm" svg:stroke-color="#808060" svg:stroke-opacity="100%" draw:stroke-linejoin="round" svg:stroke-linecap="round" draw:fill="none" draw:fill-color="#ff6600" draw:textarea-horizontal-align="left" draw:textarea-vertical-align="top" draw:auto-grow-height="false" fo:min-height="0cm" fo:min-width="0.082cm" fo:padding-top="0.13cm" fo:padding-bottom="0.13cm" fo:padding-left="0.25cm" fo:padding-right="0.25cm" fo:wrap-option="wrap" draw:shadow-color="#5e574e" loext:decorative="false"/>
    </style:style>
    <style:style style:name="gr174" style:family="graphic" style:parent-style-name="standard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7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 loext:decorative="false"/>
      <style:paragraph-properties style:writing-mode="lr-tb"/>
    </style:style>
    <style:style style:name="gr176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13cm" fo:min-width="0.424cm" fo:padding-top="0.13cm" fo:padding-bottom="0.13cm" fo:padding-left="0.25cm" fo:padding-right="0.25cm" fo:wrap-option="wrap" draw:shadow-color="#5e574e" loext:decorative="false"/>
    </style:style>
    <style:style style:name="gr177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485cm" fo:min-width="0cm" fo:padding-top="0.13cm" fo:padding-bottom="0.13cm" fo:padding-left="0.25cm" fo:padding-right="0.25cm" fo:wrap-option="wrap" draw:shadow-color="#5e574e" loext:decorative="false"/>
    </style:style>
    <style:style style:name="gr178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125cm" fo:min-width="0.125cm" fo:padding-top="0.13cm" fo:padding-bottom="0.13cm" fo:padding-left="0.25cm" fo:padding-right="0.25cm" fo:wrap-option="wrap" draw:shadow-color="#5e574e" loext:decorative="false"/>
    </style:style>
    <style:style style:name="gr179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322cm" fo:min-width="2.655cm" fo:padding-top="0.13cm" fo:padding-bottom="0.13cm" fo:padding-left="0.25cm" fo:padding-right="0.25cm" fo:wrap-option="wrap" draw:shadow-color="#5e574e" loext:decorative="false"/>
    </style:style>
    <style:style style:name="gr180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601cm" fo:min-width="1.309cm" fo:padding-top="0.13cm" fo:padding-bottom="0.13cm" fo:padding-left="0.25cm" fo:padding-right="0.25cm" fo:wrap-option="wrap" draw:shadow-color="#5e574e" loext:decorative="false"/>
    </style:style>
    <style:style style:name="gr181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764cm" fo:min-width="0.848cm" fo:padding-top="0.13cm" fo:padding-bottom="0.13cm" fo:padding-left="0.25cm" fo:padding-right="0.25cm" fo:wrap-option="wrap" draw:shadow-color="#5e574e" loext:decorative="false"/>
    </style:style>
    <style:style style:name="gr182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669cm" fo:min-width="1.831cm" fo:padding-top="0.13cm" fo:padding-bottom="0.13cm" fo:padding-left="0.25cm" fo:padding-right="0.25cm" fo:wrap-option="wrap" draw:shadow-color="#5e574e" loext:decorative="false"/>
    </style:style>
    <style:style style:name="gr183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15cm" fo:min-width="2.213cm" fo:padding-top="0.13cm" fo:padding-bottom="0.13cm" fo:padding-left="0.25cm" fo:padding-right="0.25cm" fo:wrap-option="wrap" draw:shadow-color="#5e574e" loext:decorative="false"/>
    </style:style>
    <style:style style:name="gr184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803cm" fo:min-width="2.957cm" fo:padding-top="0.13cm" fo:padding-bottom="0.13cm" fo:padding-left="0.25cm" fo:padding-right="0.25cm" fo:wrap-option="wrap" draw:shadow-color="#5e574e" loext:decorative="false"/>
    </style:style>
    <style:style style:name="gr185" style:family="graphic" style:parent-style-name="standard" style:list-style-name="L1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86" style:family="graphic" style:parent-style-name="standard" style:list-style-name="L1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87" style:family="graphic" style:parent-style-name="standard">
      <style:graphic-properties draw:stroke="none" draw:fill="solid" draw:fill-color="#3c0023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188" style:family="graphic" style:parent-style-name="standard">
      <style:graphic-properties draw:stroke="none" draw:fill="gradient" draw:fill-color="#6e0043" draw:fill-gradient-name="Gradient_20_2" draw:textarea-horizontal-align="left" draw:textarea-vertical-align="top" draw:auto-grow-height="false" fo:min-height="0.436cm" fo:min-width="0cm" fo:padding-top="0.13cm" fo:padding-bottom="0.13cm" fo:padding-left="0.25cm" fo:padding-right="0.25cm" fo:wrap-option="wrap" draw:shadow-color="#5e574e" loext:decorative="false"/>
    </style:style>
    <style:style style:name="gr189" style:family="graphic" style:parent-style-name="standard">
      <style:graphic-properties draw:stroke="none" draw:fill="gradient" draw:fill-color="#d93192" draw:fill-gradient-name="Gradient_20_3" draw:textarea-horizontal-align="left" draw:textarea-vertical-align="top" draw:auto-grow-height="false" fo:min-height="0.394cm" fo:min-width="0cm" fo:padding-top="0.13cm" fo:padding-bottom="0.13cm" fo:padding-left="0.25cm" fo:padding-right="0.25cm" fo:wrap-option="wrap" draw:shadow-color="#5e574e" loext:decorative="false"/>
    </style:style>
    <style:style style:name="gr190" style:family="graphic" style:parent-style-name="standard">
      <style:graphic-properties draw:stroke="none" draw:fill="gradient" draw:fill-color="#d93192" draw:fill-gradient-name="Gradient_20_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91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978cm" fo:min-width="2.394cm" fo:padding-top="0.13cm" fo:padding-bottom="0.13cm" fo:padding-left="0.25cm" fo:padding-right="0.25cm" fo:wrap-option="wrap" draw:shadow-color="#5e574e" loext:decorative="false"/>
    </style:style>
    <style:style style:name="gr192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698cm" fo:min-width="3.337cm" fo:padding-top="0.13cm" fo:padding-bottom="0.13cm" fo:padding-left="0.25cm" fo:padding-right="0.25cm" fo:wrap-option="wrap" draw:shadow-color="#5e574e" loext:decorative="false"/>
    </style:style>
    <style:style style:name="gr193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698cm" fo:min-width="2.797cm" fo:padding-top="0.13cm" fo:padding-bottom="0.13cm" fo:padding-left="0.25cm" fo:padding-right="0.25cm" fo:wrap-option="wrap" draw:shadow-color="#5e574e" loext:decorative="false"/>
    </style:style>
    <style:style style:name="gr194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041cm" fo:min-width="3.559cm" fo:padding-top="0.13cm" fo:padding-bottom="0.13cm" fo:padding-left="0.25cm" fo:padding-right="0.25cm" fo:wrap-option="wrap" draw:shadow-color="#5e574e" loext:decorative="false"/>
    </style:style>
    <style:style style:name="gr195" style:family="graphic" style:parent-style-name="standard" style:list-style-name="L1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96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483cm" fo:min-width="0cm" fo:padding-top="0.13cm" fo:padding-bottom="0.13cm" fo:padding-left="0.25cm" fo:padding-right="0.25cm" fo:wrap-option="wrap" draw:shadow-color="#5e574e" loext:decorative="false"/>
    </style:style>
    <style:style style:name="gr197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12cm" fo:min-width="0.426cm" fo:padding-top="0.13cm" fo:padding-bottom="0.13cm" fo:padding-left="0.25cm" fo:padding-right="0.25cm" fo:wrap-option="wrap" draw:shadow-color="#5e574e" loext:decorative="false"/>
    </style:style>
    <style:style style:name="gr198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909cm" fo:min-width="0.846cm" fo:padding-top="0.13cm" fo:padding-bottom="0.13cm" fo:padding-left="0.25cm" fo:padding-right="0.25cm" fo:wrap-option="wrap" draw:shadow-color="#5e574e" loext:decorative="false"/>
    </style:style>
    <style:style style:name="gr199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321cm" fo:min-width="0.123cm" fo:padding-top="0.13cm" fo:padding-bottom="0.13cm" fo:padding-left="0.25cm" fo:padding-right="0.25cm" fo:wrap-option="wrap" draw:shadow-color="#5e574e" loext:decorative="false"/>
    </style:style>
    <style:style style:name="gr200" style:family="graphic" style:parent-style-name="standard">
      <style:graphic-properties draw:stroke="solid" svg:stroke-width="0.071cm" svg:stroke-color="#000000" draw:stroke-linejoin="miter" draw:fill="none" draw:fill-color="#ff6600" draw:textarea-horizontal-align="left" draw:textarea-vertical-align="middle" draw:auto-grow-height="false" fo:min-height="1.035cm" fo:min-width="1.811cm" fo:padding-top="0.13cm" fo:padding-bottom="0.13cm" fo:padding-left="0.25cm" fo:padding-right="0.25cm" fo:wrap-option="no-wrap" draw:shadow-color="#5e574e" loext:decorative="false"/>
    </style:style>
    <style:style style:name="gr201" style:family="graphic" style:parent-style-name="standard">
      <style:graphic-properties draw:stroke="none" draw:fill="solid" draw:fill-color="#f0e0c0" draw:textarea-horizontal-align="left" draw:textarea-vertical-align="top" draw:auto-grow-height="false" fo:min-height="0.397cm" fo:min-width="0cm" fo:padding-top="0.13cm" fo:padding-bottom="0.13cm" fo:padding-left="0.25cm" fo:padding-right="0.25cm" fo:wrap-option="wrap" draw:shadow-color="#5e574e" loext:decorative="false"/>
    </style:style>
    <style:style style:name="gr202" style:family="graphic" style:parent-style-name="standard">
      <style:graphic-properties draw:stroke="solid" svg:stroke-width="0.035cm" svg:stroke-color="#80806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203" style:family="graphic" style:parent-style-name="standard">
      <style:graphic-properties draw:stroke="none" draw:fill="solid" draw:fill-color="#f0e0c0" draw:textarea-horizontal-align="left" draw:textarea-vertical-align="top" draw:auto-grow-height="false" fo:min-height="0.228cm" fo:min-width="0cm" fo:padding-top="0.13cm" fo:padding-bottom="0.13cm" fo:padding-left="0.25cm" fo:padding-right="0.25cm" fo:wrap-option="wrap" draw:shadow-color="#5e574e" loext:decorative="false"/>
    </style:style>
    <style:style style:name="gr204" style:family="graphic" style:parent-style-name="standard">
      <style:graphic-properties draw:stroke="none" draw:fill="solid" draw:fill-color="#f0e0c0" draw:textarea-horizontal-align="left" draw:textarea-vertical-align="top" draw:auto-grow-height="false" fo:min-height="0.04cm" fo:min-width="0cm" fo:padding-top="0.13cm" fo:padding-bottom="0.13cm" fo:padding-left="0.25cm" fo:padding-right="0.25cm" fo:wrap-option="wrap" draw:shadow-color="#5e574e" loext:decorative="false"/>
    </style:style>
    <style:style style:name="gr205" style:family="graphic" style:parent-style-name="standard">
      <style:graphic-properties draw:stroke="none" draw:fill="solid" draw:fill-color="#d0c0a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206" style:family="graphic" style:parent-style-name="standard">
      <style:graphic-properties draw:stroke="none" draw:fill="solid" draw:fill-color="#f0e0c0" draw:textarea-horizontal-align="left" draw:textarea-vertical-align="top" draw:auto-grow-height="false" fo:min-height="0.398cm" fo:min-width="0cm" fo:padding-top="0.13cm" fo:padding-bottom="0.13cm" fo:padding-left="0.25cm" fo:padding-right="0.25cm" fo:wrap-option="wrap" draw:shadow-color="#5e574e" loext:decorative="false"/>
    </style:style>
    <style:style style:name="gr207" style:family="graphic" style:parent-style-name="standard" style:list-style-name="L16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208" style:family="graphic" style:parent-style-name="standard">
      <style:graphic-properties draw:stroke="dash" draw:stroke-dash="Dot" svg:stroke-width="0.035cm" svg:stroke-color="#00dfca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669cm" fo:min-width="1.652cm" fo:padding-top="0.13cm" fo:padding-bottom="0.13cm" fo:padding-left="0.25cm" fo:padding-right="0.25cm" fo:wrap-option="wrap" draw:shadow-color="#5e574e" loext:decorative="false"/>
    </style:style>
    <style:style style:name="gr209" style:family="graphic" style:parent-style-name="standard">
      <style:graphic-properties draw:stroke="none" draw:fill="gradient" draw:fill-color="#dc0081" draw:fill-gradient-name="Gradient_20_5" draw:textarea-horizontal-align="left" draw:textarea-vertical-align="middle" draw:auto-grow-height="false" fo:min-height="0.528cm" fo:min-width="1.264cm" fo:padding-top="0.13cm" fo:padding-bottom="0.13cm" fo:padding-left="0.25cm" fo:padding-right="0.25cm" fo:wrap-option="no-wrap" draw:shadow-color="#5e574e" loext:decorative="false"/>
    </style:style>
    <style:style style:name="gr210" style:family="graphic" style:parent-style-name="standard" style:list-style-name="L14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211" style:family="graphic" style:parent-style-name="standard">
      <style:graphic-properties draw:stroke="none" draw:fill="solid" draw:fill-color="#f0e0c0" draw:textarea-horizontal-align="left" draw:textarea-vertical-align="top" draw:auto-grow-height="false" fo:min-height="0.56cm" fo:min-width="0cm" fo:padding-top="0.13cm" fo:padding-bottom="0.13cm" fo:padding-left="0.25cm" fo:padding-right="0.25cm" fo:wrap-option="wrap" draw:shadow-color="#5e574e" loext:decorative="false"/>
    </style:style>
    <style:style style:name="gr212" style:family="graphic" style:parent-style-name="standard">
      <style:graphic-properties draw:stroke="solid" svg:stroke-width="0.035cm" svg:stroke-color="#80806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28cm" fo:min-width="0cm" fo:padding-top="0.13cm" fo:padding-bottom="0.13cm" fo:padding-left="0.25cm" fo:padding-right="0.25cm" fo:wrap-option="wrap" draw:shadow-color="#5e574e" loext:decorative="false"/>
    </style:style>
    <style:style style:name="gr213" style:family="graphic" style:parent-style-name="standard">
      <style:graphic-properties draw:stroke="none" draw:fill="solid" draw:fill-color="#f0e0c0" draw:textarea-horizontal-align="left" draw:textarea-vertical-align="top" draw:auto-grow-height="false" fo:min-height="0.348cm" fo:min-width="0cm" fo:padding-top="0.13cm" fo:padding-bottom="0.13cm" fo:padding-left="0.25cm" fo:padding-right="0.25cm" fo:wrap-option="wrap" draw:shadow-color="#5e574e" loext:decorative="false"/>
    </style:style>
    <style:style style:name="gr214" style:family="graphic" style:parent-style-name="standard">
      <style:graphic-properties draw:stroke="none" draw:fill="solid" draw:fill-color="#f0e0c0" draw:textarea-horizontal-align="left" draw:textarea-vertical-align="top" draw:auto-grow-height="false" fo:min-height="0.114cm" fo:min-width="0cm" fo:padding-top="0.13cm" fo:padding-bottom="0.13cm" fo:padding-left="0.25cm" fo:padding-right="0.25cm" fo:wrap-option="wrap" draw:shadow-color="#5e574e" loext:decorative="false"/>
    </style:style>
    <style:style style:name="gr215" style:family="graphic" style:parent-style-name="standard">
      <style:graphic-properties draw:stroke="none" draw:fill="gradient" draw:fill-color="#cbcbcb" draw:fill-gradient-name="Gradient_20_6" draw:textarea-horizontal-align="left" draw:textarea-vertical-align="middle" draw:auto-grow-height="false" fo:min-height="9.477cm" fo:min-width="23.418cm" fo:padding-top="0.13cm" fo:padding-bottom="0.13cm" fo:padding-left="0.25cm" fo:padding-right="0.25cm" fo:wrap-option="no-wrap" draw:shadow-color="#5e574e" loext:decorative="false"/>
    </style:style>
    <style:style style:name="gr21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217" style:family="graphic" style:parent-style-name="standard">
      <style:graphic-properties draw:stroke="none" draw:fill="solid" draw:fill-color="#315faf" draw:textarea-horizontal-align="left" draw:textarea-vertical-align="middle" draw:auto-grow-height="false" fo:min-height="1.416cm" fo:min-width="3.116cm" fo:padding-top="0.13cm" fo:padding-bottom="0.13cm" fo:padding-left="0.25cm" fo:padding-right="0.25cm" fo:wrap-option="no-wrap" draw:shadow-color="#5e574e" loext:decorative="false"/>
    </style:style>
    <style:style style:name="gr218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219" style:family="graphic" style:parent-style-name="standard">
      <style:graphic-properties draw:stroke="solid" svg:stroke-width="0.071cm" svg:stroke-color="#000000" draw:marker-start="" draw:marker-start-width="0.142cm" draw:marker-start-center="false" draw:marker-end="" draw:marker-end-width="0.142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486cm" fo:min-width="0cm" fo:padding-top="0.13cm" fo:padding-bottom="0.13cm" fo:padding-left="0.25cm" fo:padding-right="0.25cm" fo:wrap-option="wrap" draw:shadow-color="#5e574e" loext:decorative="false"/>
    </style:style>
    <style:style style:name="gr220" style:family="graphic" style:parent-style-name="standard">
      <style:graphic-properties draw:stroke="solid" svg:stroke-width="0.071cm" svg:stroke-color="#000000" draw:marker-start="" draw:marker-start-width="0.142cm" draw:marker-start-center="false" draw:marker-end="" draw:marker-end-width="0.142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271cm" fo:min-width="3.721cm" fo:padding-top="0.13cm" fo:padding-bottom="0.13cm" fo:padding-left="0.25cm" fo:padding-right="0.25cm" fo:wrap-option="wrap" draw:shadow-color="#5e574e" loext:decorative="false"/>
    </style:style>
    <style:style style:name="gr221" style:family="graphic" style:parent-style-name="standard">
      <style:graphic-properties draw:stroke="none" draw:fill="solid" draw:fill-color="#676767" draw:textarea-horizontal-align="left" draw:textarea-vertical-align="top" draw:auto-grow-height="false" fo:min-height="0.247cm" fo:min-width="0cm" fo:padding-top="0.13cm" fo:padding-bottom="0.13cm" fo:padding-left="0.25cm" fo:padding-right="0.25cm" fo:wrap-option="wrap" draw:shadow-color="#5e574e" loext:decorative="false"/>
    </style:style>
    <style:style style:name="gr222" style:family="graphic" style:parent-style-name="standard">
      <style:graphic-properties draw:stroke="none" draw:fill="solid" draw:fill-color="#5e574e" draw:textarea-horizontal-align="left" draw:textarea-vertical-align="top" draw:auto-grow-height="false" fo:min-height="0.441cm" fo:min-width="0.21cm" fo:padding-top="0.13cm" fo:padding-bottom="0.13cm" fo:padding-left="0.25cm" fo:padding-right="0.25cm" fo:wrap-option="wrap" draw:shadow-color="#5e574e" loext:decorative="false"/>
    </style:style>
    <style:style style:name="gr223" style:family="graphic" style:parent-style-name="standard">
      <style:graphic-properties draw:stroke="none" draw:fill="solid" draw:fill-color="#808000" draw:textarea-horizontal-align="left" draw:textarea-vertical-align="top" draw:auto-grow-height="false" fo:min-height="0.472cm" fo:min-width="0.717cm" fo:padding-top="0.13cm" fo:padding-bottom="0.13cm" fo:padding-left="0.25cm" fo:padding-right="0.25cm" fo:wrap-option="wrap" draw:shadow-color="#5e574e" loext:decorative="false"/>
    </style:style>
    <style:style style:name="gr224" style:family="graphic" style:parent-style-name="standard">
      <style:graphic-properties draw:stroke="none" draw:fill="solid" draw:fill-color="#dadada" draw:textarea-horizontal-align="left" draw:textarea-vertical-align="top" draw:auto-grow-height="false" fo:min-height="0.423cm" fo:min-width="0.607cm" fo:padding-top="0.13cm" fo:padding-bottom="0.13cm" fo:padding-left="0.25cm" fo:padding-right="0.25cm" fo:wrap-option="wrap" draw:shadow-color="#5e574e" loext:decorative="false"/>
    </style:style>
    <style:style style:name="gr225" style:family="graphic" style:parent-style-name="standard">
      <style:graphic-properties draw:stroke="none" draw:fill="solid" draw:fill-color="#676767" draw:textarea-horizontal-align="left" draw:textarea-vertical-align="top" draw:auto-grow-height="false" fo:min-height="0.574cm" fo:min-width="0.003cm" fo:padding-top="0.13cm" fo:padding-bottom="0.13cm" fo:padding-left="0.25cm" fo:padding-right="0.25cm" fo:wrap-option="wrap" draw:shadow-color="#5e574e" loext:decorative="false"/>
    </style:style>
    <style:style style:name="gr226" style:family="graphic" style:parent-style-name="standard">
      <style:graphic-properties draw:stroke="none" draw:fill="solid" draw:fill-color="#5e574e" draw:textarea-horizontal-align="left" draw:textarea-vertical-align="top" draw:auto-grow-height="false" fo:min-height="0.662cm" fo:min-width="0.121cm" fo:padding-top="0.13cm" fo:padding-bottom="0.13cm" fo:padding-left="0.25cm" fo:padding-right="0.25cm" fo:wrap-option="wrap" draw:shadow-color="#5e574e" loext:decorative="false"/>
    </style:style>
    <style:style style:name="gr227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406cm" fo:min-width="0cm" fo:padding-top="0.13cm" fo:padding-bottom="0.13cm" fo:padding-left="0.25cm" fo:padding-right="0.25cm" fo:wrap-option="wrap" draw:shadow-color="#5e574e" loext:decorative="false"/>
    </style:style>
    <style:style style:name="gr228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393cm" fo:min-width="0cm" fo:padding-top="0.13cm" fo:padding-bottom="0.13cm" fo:padding-left="0.25cm" fo:padding-right="0.25cm" fo:wrap-option="wrap" draw:shadow-color="#5e574e" loext:decorative="false"/>
    </style:style>
    <style:style style:name="gr229" style:family="graphic" style:parent-style-name="standard">
      <style:graphic-properties draw:stroke="none" draw:fill="solid" draw:fill-color="#5e574e" draw:textarea-horizontal-align="left" draw:textarea-vertical-align="top" draw:auto-grow-height="false" fo:min-height="0.38cm" fo:min-width="0.457cm" fo:padding-top="0.13cm" fo:padding-bottom="0.13cm" fo:padding-left="0.25cm" fo:padding-right="0.25cm" fo:wrap-option="wrap" draw:shadow-color="#5e574e" loext:decorative="false"/>
    </style:style>
    <style:style style:name="gr230" style:family="graphic" style:parent-style-name="standard">
      <style:graphic-properties draw:stroke="none" draw:fill="solid" draw:fill-color="#919191" draw:textarea-horizontal-align="left" draw:textarea-vertical-align="top" draw:auto-grow-height="false" fo:min-height="0.419cm" fo:min-width="0.457cm" fo:padding-top="0.13cm" fo:padding-bottom="0.13cm" fo:padding-left="0.25cm" fo:padding-right="0.25cm" fo:wrap-option="wrap" draw:shadow-color="#5e574e" loext:decorative="false"/>
    </style:style>
    <style:style style:name="gr231" style:family="graphic" style:parent-style-name="standard">
      <style:graphic-properties draw:stroke="none" draw:fill="solid" draw:fill-color="#67676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232" style:family="graphic" style:parent-style-name="standard">
      <style:graphic-properties draw:stroke="solid" svg:stroke-width="0.035cm" svg:stroke-color="#8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233" style:family="graphic" style:parent-style-name="standard">
      <style:graphic-properties draw:stroke="none" draw:fill="solid" draw:fill-color="#676767" draw:textarea-horizontal-align="left" draw:textarea-vertical-align="top" draw:auto-grow-height="false" fo:min-height="0.194cm" fo:min-width="0.139cm" fo:padding-top="0.13cm" fo:padding-bottom="0.13cm" fo:padding-left="0.25cm" fo:padding-right="0.25cm" fo:wrap-option="wrap" draw:shadow-color="#5e574e" loext:decorative="false"/>
    </style:style>
    <style:style style:name="gr234" style:family="graphic" style:parent-style-name="standard">
      <style:graphic-properties draw:stroke="none" draw:fill="solid" draw:fill-color="#808000" draw:textarea-horizontal-align="left" draw:textarea-vertical-align="top" draw:auto-grow-height="false" fo:min-height="0.203cm" fo:min-width="0.139cm" fo:padding-top="0.13cm" fo:padding-bottom="0.13cm" fo:padding-left="0.25cm" fo:padding-right="0.25cm" fo:wrap-option="wrap" draw:shadow-color="#5e574e" loext:decorative="false"/>
    </style:style>
    <style:style style:name="gr235" style:family="graphic" style:parent-style-name="standard">
      <style:graphic-properties draw:stroke="none" draw:fill="solid" draw:fill-color="#808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236" style:family="graphic" style:parent-style-name="standard">
      <style:graphic-properties draw:stroke="solid" svg:stroke-width="0.071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237" style:family="graphic" style:parent-style-name="standard">
      <style:graphic-properties draw:stroke="solid" svg:stroke-width="0.071cm" svg:stroke-color="#000000" draw:marker-start="" draw:marker-start-width="0.142cm" draw:marker-start-center="false" draw:marker-end="" draw:marker-end-width="0.142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134cm" fo:min-width="4.413cm" fo:padding-top="0.13cm" fo:padding-bottom="0.13cm" fo:padding-left="0.25cm" fo:padding-right="0.25cm" fo:wrap-option="wrap" draw:shadow-color="#5e574e" loext:decorative="false"/>
    </style:style>
    <style:style style:name="gr238" style:family="graphic" style:parent-style-name="standard">
      <style:graphic-properties draw:stroke="none" draw:fill="solid" draw:fill-color="#aaaaaa" draw:textarea-horizontal-align="left" draw:textarea-vertical-align="middle" draw:auto-grow-height="false" fo:min-height="0cm" fo:min-width="0.413cm" fo:padding-top="0.13cm" fo:padding-bottom="0.13cm" fo:padding-left="0.25cm" fo:padding-right="0.25cm" fo:wrap-option="no-wrap" draw:shadow-color="#5e574e" loext:decorative="false"/>
    </style:style>
    <style:style style:name="gr239" style:family="graphic" style:parent-style-name="standard">
      <style:graphic-properties draw:stroke="none" draw:fill="solid" draw:fill-color="#fcfcfc" draw:textarea-horizontal-align="left" draw:textarea-vertical-align="middle" draw:auto-grow-height="false" fo:min-height="0cm" fo:min-width="0.413cm" fo:padding-top="0.13cm" fo:padding-bottom="0.13cm" fo:padding-left="0.25cm" fo:padding-right="0.25cm" fo:wrap-option="no-wrap" draw:shadow-color="#5e574e" loext:decorative="false"/>
    </style:style>
    <style:style style:name="gr240" style:family="graphic" style:parent-style-name="standard">
      <style:graphic-properties draw:stroke="none" draw:fill="solid" draw:fill-color="#fdfdfd" draw:textarea-horizontal-align="left" draw:textarea-vertical-align="middle" draw:auto-grow-height="false" fo:min-height="0cm" fo:min-width="0.413cm" fo:padding-top="0.13cm" fo:padding-bottom="0.13cm" fo:padding-left="0.25cm" fo:padding-right="0.25cm" fo:wrap-option="no-wrap" draw:shadow-color="#5e574e" loext:decorative="false"/>
    </style:style>
    <style:style style:name="gr241" style:family="graphic" style:parent-style-name="standard">
      <style:graphic-properties draw:stroke="none" draw:fill="solid" draw:fill-color="#fefefe" draw:textarea-horizontal-align="left" draw:textarea-vertical-align="middle" draw:auto-grow-height="false" fo:min-height="0cm" fo:min-width="0.413cm" fo:padding-top="0.13cm" fo:padding-bottom="0.13cm" fo:padding-left="0.25cm" fo:padding-right="0.25cm" fo:wrap-option="no-wrap" draw:shadow-color="#5e574e" loext:decorative="false"/>
    </style:style>
    <style:style style:name="gr242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.413cm" fo:padding-top="0.13cm" fo:padding-bottom="0.13cm" fo:padding-left="0.25cm" fo:padding-right="0.25cm" fo:wrap-option="no-wrap" draw:shadow-color="#5e574e" loext:decorative="false"/>
    </style:style>
    <style:style style:name="gr243" style:family="graphic" style:parent-style-name="standard">
      <style:graphic-properties draw:stroke="solid" svg:stroke-width="0.035cm" svg:stroke-color="#000000" draw:stroke-linejoin="miter" draw:fill="solid" draw:fill-color="#cecece" draw:textarea-horizontal-align="left" draw:textarea-vertical-align="middle" draw:auto-grow-height="false" fo:min-height="1.693cm" fo:min-width="0.378cm" fo:padding-top="0.13cm" fo:padding-bottom="0.13cm" fo:padding-left="0.25cm" fo:padding-right="0.25cm" fo:wrap-option="no-wrap" draw:shadow-color="#5e574e" loext:decorative="false"/>
    </style:style>
    <style:style style:name="gr244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629cm" fo:padding-top="0.13cm" fo:padding-bottom="0.13cm" fo:padding-left="0.25cm" fo:padding-right="0.25cm" fo:wrap-option="no-wrap" draw:shadow-color="#5e574e" loext:decorative="false"/>
    </style:style>
    <style:style style:name="gr245" style:family="graphic" style:parent-style-name="standard">
      <style:graphic-properties draw:stroke="none" draw:fill="solid" draw:fill-color="#8e8e8e" draw:textarea-horizontal-align="left" draw:textarea-vertical-align="middle" draw:auto-grow-height="false" fo:min-height="0cm" fo:min-width="0.183cm" fo:padding-top="0.13cm" fo:padding-bottom="0.13cm" fo:padding-left="0.25cm" fo:padding-right="0.25cm" fo:wrap-option="no-wrap" draw:shadow-color="#5e574e" loext:decorative="false"/>
    </style:style>
    <style:style style:name="gr246" style:family="graphic" style:parent-style-name="standard">
      <style:graphic-properties draw:stroke="none" draw:fill="solid" draw:fill-color="#c7c7c7" draw:textarea-horizontal-align="left" draw:textarea-vertical-align="middle" draw:auto-grow-height="false" fo:min-height="0cm" fo:min-width="0.183cm" fo:padding-top="0.13cm" fo:padding-bottom="0.13cm" fo:padding-left="0.25cm" fo:padding-right="0.25cm" fo:wrap-option="no-wrap" draw:shadow-color="#5e574e" loext:decorative="false"/>
    </style:style>
    <style:style style:name="gr247" style:family="graphic" style:parent-style-name="standard">
      <style:graphic-properties draw:stroke="none" draw:fill="solid" draw:fill-color="#e3e3e3" draw:textarea-horizontal-align="left" draw:textarea-vertical-align="middle" draw:auto-grow-height="false" fo:min-height="0cm" fo:min-width="0.183cm" fo:padding-top="0.13cm" fo:padding-bottom="0.13cm" fo:padding-left="0.25cm" fo:padding-right="0.25cm" fo:wrap-option="no-wrap" draw:shadow-color="#5e574e" loext:decorative="false"/>
    </style:style>
    <style:style style:name="gr248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.183cm" fo:padding-top="0.13cm" fo:padding-bottom="0.13cm" fo:padding-left="0.25cm" fo:padding-right="0.25cm" fo:wrap-option="no-wrap" draw:shadow-color="#5e574e" loext:decorative="false"/>
    </style:style>
    <style:style style:name="gr249" style:family="graphic" style:parent-style-name="standard">
      <style:graphic-properties draw:stroke="solid" svg:stroke-width="0.035cm" svg:stroke-color="#55555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250" style:family="graphic" style:parent-style-name="standard">
      <style:graphic-properties draw:stroke="none" draw:fill="solid" draw:fill-color="#8e8e8e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251" style:family="graphic" style:parent-style-name="standard">
      <style:graphic-properties draw:stroke="solid" svg:stroke-width="0.035cm" svg:stroke-color="#3300aa" svg:stroke-opacity="100%" draw:stroke-linejoin="round" svg:stroke-linecap="round" draw:fill="solid" draw:fill-color="#4000d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252" style:family="graphic" style:parent-style-name="standard">
      <style:graphic-properties draw:stroke="none" draw:fill="solid" draw:fill-color="#5e574e" draw:textarea-horizontal-align="left" draw:textarea-vertical-align="top" draw:auto-grow-height="false" fo:min-height="0.441cm" fo:min-width="0.215cm" fo:padding-top="0.13cm" fo:padding-bottom="0.13cm" fo:padding-left="0.25cm" fo:padding-right="0.25cm" fo:wrap-option="wrap" draw:shadow-color="#5e574e" loext:decorative="false"/>
    </style:style>
    <style:style style:name="gr253" style:family="graphic" style:parent-style-name="standard">
      <style:graphic-properties draw:stroke="none" draw:fill="solid" draw:fill-color="#808000" draw:textarea-horizontal-align="left" draw:textarea-vertical-align="top" draw:auto-grow-height="false" fo:min-height="0.472cm" fo:min-width="0.712cm" fo:padding-top="0.13cm" fo:padding-bottom="0.13cm" fo:padding-left="0.25cm" fo:padding-right="0.25cm" fo:wrap-option="wrap" draw:shadow-color="#5e574e" loext:decorative="false"/>
    </style:style>
    <style:style style:name="gr254" style:family="graphic" style:parent-style-name="standard">
      <style:graphic-properties draw:stroke="none" draw:fill="solid" draw:fill-color="#dadada" draw:textarea-horizontal-align="left" draw:textarea-vertical-align="top" draw:auto-grow-height="false" fo:min-height="0.423cm" fo:min-width="0.603cm" fo:padding-top="0.13cm" fo:padding-bottom="0.13cm" fo:padding-left="0.25cm" fo:padding-right="0.25cm" fo:wrap-option="wrap" draw:shadow-color="#5e574e" loext:decorative="false"/>
    </style:style>
    <style:style style:name="gr255" style:family="graphic" style:parent-style-name="standard">
      <style:graphic-properties draw:stroke="none" draw:fill="solid" draw:fill-color="#5e574e" draw:textarea-horizontal-align="left" draw:textarea-vertical-align="top" draw:auto-grow-height="false" fo:min-height="0.662cm" fo:min-width="0.113cm" fo:padding-top="0.13cm" fo:padding-bottom="0.13cm" fo:padding-left="0.25cm" fo:padding-right="0.25cm" fo:wrap-option="wrap" draw:shadow-color="#5e574e" loext:decorative="false"/>
    </style:style>
    <style:style style:name="gr256" style:family="graphic" style:parent-style-name="standard">
      <style:graphic-properties draw:stroke="none" draw:fill="solid" draw:fill-color="#919191" draw:textarea-horizontal-align="left" draw:textarea-vertical-align="top" draw:auto-grow-height="false" fo:min-height="0.419cm" fo:min-width="0.453cm" fo:padding-top="0.13cm" fo:padding-bottom="0.13cm" fo:padding-left="0.25cm" fo:padding-right="0.25cm" fo:wrap-option="wrap" draw:shadow-color="#5e574e" loext:decorative="false"/>
    </style:style>
    <style:style style:name="gr257" style:family="graphic" style:parent-style-name="standard">
      <style:graphic-properties draw:stroke="none" draw:fill="solid" draw:fill-color="#676767" draw:textarea-horizontal-align="left" draw:textarea-vertical-align="top" draw:auto-grow-height="false" fo:min-height="0.194cm" fo:min-width="0.143cm" fo:padding-top="0.13cm" fo:padding-bottom="0.13cm" fo:padding-left="0.25cm" fo:padding-right="0.25cm" fo:wrap-option="wrap" draw:shadow-color="#5e574e" loext:decorative="false"/>
    </style:style>
    <style:style style:name="gr258" style:family="graphic" style:parent-style-name="standard">
      <style:graphic-properties draw:stroke="none" draw:fill="solid" draw:fill-color="#808000" draw:textarea-horizontal-align="left" draw:textarea-vertical-align="top" draw:auto-grow-height="false" fo:min-height="0.203cm" fo:min-width="0.143cm" fo:padding-top="0.13cm" fo:padding-bottom="0.13cm" fo:padding-left="0.25cm" fo:padding-right="0.25cm" fo:wrap-option="wrap" draw:shadow-color="#5e574e" loext:decorative="false"/>
    </style:style>
    <style:style style:name="gr259" style:family="graphic" style:parent-style-name="standard">
      <style:graphic-properties draw:stroke="none" draw:fill="solid" draw:fill-color="#676767" draw:textarea-horizontal-align="left" draw:textarea-vertical-align="top" draw:auto-grow-height="false" fo:min-height="0.247cm" fo:min-width="0.002cm" fo:padding-top="0.13cm" fo:padding-bottom="0.13cm" fo:padding-left="0.25cm" fo:padding-right="0.25cm" fo:wrap-option="wrap" draw:shadow-color="#5e574e" loext:decorative="false"/>
    </style:style>
    <style:style style:name="gr260" style:family="graphic" style:parent-style-name="standard">
      <style:graphic-properties draw:stroke="none" draw:fill="solid" draw:fill-color="#5e574e" draw:textarea-horizontal-align="left" draw:textarea-vertical-align="top" draw:auto-grow-height="false" fo:min-height="0.437cm" fo:min-width="0.215cm" fo:padding-top="0.13cm" fo:padding-bottom="0.13cm" fo:padding-left="0.25cm" fo:padding-right="0.25cm" fo:wrap-option="wrap" draw:shadow-color="#5e574e" loext:decorative="false"/>
    </style:style>
    <style:style style:name="gr261" style:family="graphic" style:parent-style-name="standard">
      <style:graphic-properties draw:stroke="none" draw:fill="solid" draw:fill-color="#dadada" draw:textarea-horizontal-align="left" draw:textarea-vertical-align="top" draw:auto-grow-height="false" fo:min-height="0.424cm" fo:min-width="0.607cm" fo:padding-top="0.13cm" fo:padding-bottom="0.13cm" fo:padding-left="0.25cm" fo:padding-right="0.25cm" fo:wrap-option="wrap" draw:shadow-color="#5e574e" loext:decorative="false"/>
    </style:style>
    <style:style style:name="gr262" style:family="graphic" style:parent-style-name="standard">
      <style:graphic-properties draw:stroke="none" draw:fill="solid" draw:fill-color="#676767" draw:textarea-horizontal-align="left" draw:textarea-vertical-align="top" draw:auto-grow-height="false" fo:min-height="0.569cm" fo:min-width="0.008cm" fo:padding-top="0.13cm" fo:padding-bottom="0.13cm" fo:padding-left="0.25cm" fo:padding-right="0.25cm" fo:wrap-option="wrap" draw:shadow-color="#5e574e" loext:decorative="false"/>
    </style:style>
    <style:style style:name="gr263" style:family="graphic" style:parent-style-name="standard">
      <style:graphic-properties draw:stroke="none" draw:fill="solid" draw:fill-color="#5e574e" draw:textarea-horizontal-align="left" draw:textarea-vertical-align="top" draw:auto-grow-height="false" fo:min-height="0.661cm" fo:min-width="0.113cm" fo:padding-top="0.13cm" fo:padding-bottom="0.13cm" fo:padding-left="0.25cm" fo:padding-right="0.25cm" fo:wrap-option="wrap" draw:shadow-color="#5e574e" loext:decorative="false"/>
    </style:style>
    <style:style style:name="gr264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405cm" fo:min-width="0cm" fo:padding-top="0.13cm" fo:padding-bottom="0.13cm" fo:padding-left="0.25cm" fo:padding-right="0.25cm" fo:wrap-option="wrap" draw:shadow-color="#5e574e" loext:decorative="false"/>
    </style:style>
    <style:style style:name="gr265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388cm" fo:min-width="0cm" fo:padding-top="0.13cm" fo:padding-bottom="0.13cm" fo:padding-left="0.25cm" fo:padding-right="0.25cm" fo:wrap-option="wrap" draw:shadow-color="#5e574e" loext:decorative="false"/>
    </style:style>
    <style:style style:name="gr266" style:family="graphic" style:parent-style-name="standard">
      <style:graphic-properties draw:stroke="none" draw:fill="solid" draw:fill-color="#5e574e" draw:textarea-horizontal-align="left" draw:textarea-vertical-align="top" draw:auto-grow-height="false" fo:min-height="0.379cm" fo:min-width="0.462cm" fo:padding-top="0.13cm" fo:padding-bottom="0.13cm" fo:padding-left="0.25cm" fo:padding-right="0.25cm" fo:wrap-option="wrap" draw:shadow-color="#5e574e" loext:decorative="false"/>
    </style:style>
    <style:style style:name="gr267" style:family="graphic" style:parent-style-name="standard">
      <style:graphic-properties draw:stroke="none" draw:fill="solid" draw:fill-color="#808000" draw:textarea-horizontal-align="left" draw:textarea-vertical-align="top" draw:auto-grow-height="false" fo:min-height="0.198cm" fo:min-width="0.143cm" fo:padding-top="0.13cm" fo:padding-bottom="0.13cm" fo:padding-left="0.25cm" fo:padding-right="0.25cm" fo:wrap-option="wrap" draw:shadow-color="#5e574e" loext:decorative="false"/>
    </style:style>
    <style:style style:name="gr268" style:family="graphic" style:parent-style-name="standard">
      <style:graphic-properties draw:stroke="none" draw:fill="solid" draw:fill-color="#676767" draw:textarea-horizontal-align="left" draw:textarea-vertical-align="top" draw:auto-grow-height="false" fo:min-height="0.243cm" fo:min-width="0cm" fo:padding-top="0.13cm" fo:padding-bottom="0.13cm" fo:padding-left="0.25cm" fo:padding-right="0.25cm" fo:wrap-option="wrap" draw:shadow-color="#5e574e" loext:decorative="false"/>
    </style:style>
    <style:style style:name="gr269" style:family="graphic" style:parent-style-name="standard">
      <style:graphic-properties draw:stroke="none" draw:fill="solid" draw:fill-color="#5e574e" draw:textarea-horizontal-align="left" draw:textarea-vertical-align="top" draw:auto-grow-height="false" fo:min-height="0.423cm" fo:min-width="0.215cm" fo:padding-top="0.13cm" fo:padding-bottom="0.13cm" fo:padding-left="0.25cm" fo:padding-right="0.25cm" fo:wrap-option="wrap" draw:shadow-color="#5e574e" loext:decorative="false"/>
    </style:style>
    <style:style style:name="gr270" style:family="graphic" style:parent-style-name="standard">
      <style:graphic-properties draw:stroke="none" draw:fill="solid" draw:fill-color="#808000" draw:textarea-horizontal-align="left" draw:textarea-vertical-align="top" draw:auto-grow-height="false" fo:min-height="0.481cm" fo:min-width="0.713cm" fo:padding-top="0.13cm" fo:padding-bottom="0.13cm" fo:padding-left="0.25cm" fo:padding-right="0.25cm" fo:wrap-option="wrap" draw:shadow-color="#5e574e" loext:decorative="false"/>
    </style:style>
    <style:style style:name="gr271" style:family="graphic" style:parent-style-name="standard">
      <style:graphic-properties draw:stroke="none" draw:fill="solid" draw:fill-color="#dadada" draw:textarea-horizontal-align="left" draw:textarea-vertical-align="top" draw:auto-grow-height="false" fo:min-height="0.433cm" fo:min-width="0.603cm" fo:padding-top="0.13cm" fo:padding-bottom="0.13cm" fo:padding-left="0.25cm" fo:padding-right="0.25cm" fo:wrap-option="wrap" draw:shadow-color="#5e574e" loext:decorative="false"/>
    </style:style>
    <style:style style:name="gr272" style:family="graphic" style:parent-style-name="standard">
      <style:graphic-properties draw:stroke="none" draw:fill="solid" draw:fill-color="#676767" draw:textarea-horizontal-align="left" draw:textarea-vertical-align="top" draw:auto-grow-height="false" fo:min-height="0.569cm" fo:min-width="0.012cm" fo:padding-top="0.13cm" fo:padding-bottom="0.13cm" fo:padding-left="0.25cm" fo:padding-right="0.25cm" fo:wrap-option="wrap" draw:shadow-color="#5e574e" loext:decorative="false"/>
    </style:style>
    <style:style style:name="gr273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41cm" fo:min-width="0cm" fo:padding-top="0.13cm" fo:padding-bottom="0.13cm" fo:padding-left="0.25cm" fo:padding-right="0.25cm" fo:wrap-option="wrap" draw:shadow-color="#5e574e" loext:decorative="false"/>
    </style:style>
    <style:style style:name="gr274" style:family="graphic" style:parent-style-name="standard">
      <style:graphic-properties draw:stroke="none" draw:fill="solid" draw:fill-color="#5e574e" draw:textarea-horizontal-align="left" draw:textarea-vertical-align="top" draw:auto-grow-height="false" fo:min-height="0.384cm" fo:min-width="0.457cm" fo:padding-top="0.13cm" fo:padding-bottom="0.13cm" fo:padding-left="0.25cm" fo:padding-right="0.25cm" fo:wrap-option="wrap" draw:shadow-color="#5e574e" loext:decorative="false"/>
    </style:style>
    <style:style style:name="gr275" style:family="graphic" style:parent-style-name="standard">
      <style:graphic-properties draw:stroke="none" draw:fill="solid" draw:fill-color="#919191" draw:textarea-horizontal-align="left" draw:textarea-vertical-align="top" draw:auto-grow-height="false" fo:min-height="0.424cm" fo:min-width="0.462cm" fo:padding-top="0.13cm" fo:padding-bottom="0.13cm" fo:padding-left="0.25cm" fo:padding-right="0.25cm" fo:wrap-option="wrap" draw:shadow-color="#5e574e" loext:decorative="false"/>
    </style:style>
    <style:style style:name="gr276" style:family="graphic" style:parent-style-name="standard">
      <style:graphic-properties draw:stroke="none" draw:fill="solid" draw:fill-color="#676767" draw:textarea-horizontal-align="left" draw:textarea-vertical-align="top" draw:auto-grow-height="false" fo:min-height="0.198cm" fo:min-width="0.144cm" fo:padding-top="0.13cm" fo:padding-bottom="0.13cm" fo:padding-left="0.25cm" fo:padding-right="0.25cm" fo:wrap-option="wrap" draw:shadow-color="#5e574e" loext:decorative="false"/>
    </style:style>
    <style:style style:name="gr277" style:family="graphic" style:parent-style-name="standard">
      <style:graphic-properties draw:stroke="none" draw:fill="solid" draw:fill-color="#808000" draw:textarea-horizontal-align="left" draw:textarea-vertical-align="top" draw:auto-grow-height="false" fo:min-height="0.19cm" fo:min-width="0.144cm" fo:padding-top="0.13cm" fo:padding-bottom="0.13cm" fo:padding-left="0.25cm" fo:padding-right="0.25cm" fo:wrap-option="wrap" draw:shadow-color="#5e574e" loext:decorative="false"/>
    </style:style>
    <style:style style:name="gr278" style:family="graphic" style:parent-style-name="standard">
      <style:graphic-properties draw:stroke="none" draw:fill="solid" draw:fill-color="#5e574e" draw:textarea-horizontal-align="left" draw:textarea-vertical-align="top" draw:auto-grow-height="false" fo:min-height="0.432cm" fo:min-width="0.214cm" fo:padding-top="0.13cm" fo:padding-bottom="0.13cm" fo:padding-left="0.25cm" fo:padding-right="0.25cm" fo:wrap-option="wrap" draw:shadow-color="#5e574e" loext:decorative="false"/>
    </style:style>
    <style:style style:name="gr279" style:family="graphic" style:parent-style-name="standard">
      <style:graphic-properties draw:stroke="none" draw:fill="solid" draw:fill-color="#808000" draw:textarea-horizontal-align="left" draw:textarea-vertical-align="top" draw:auto-grow-height="false" fo:min-height="0.472cm" fo:min-width="0.713cm" fo:padding-top="0.13cm" fo:padding-bottom="0.13cm" fo:padding-left="0.25cm" fo:padding-right="0.25cm" fo:wrap-option="wrap" draw:shadow-color="#5e574e" loext:decorative="false"/>
    </style:style>
    <style:style style:name="gr280" style:family="graphic" style:parent-style-name="standard">
      <style:graphic-properties draw:stroke="none" draw:fill="solid" draw:fill-color="#dadada" draw:textarea-horizontal-align="left" draw:textarea-vertical-align="top" draw:auto-grow-height="false" fo:min-height="0.424cm" fo:min-width="0.603cm" fo:padding-top="0.13cm" fo:padding-bottom="0.13cm" fo:padding-left="0.25cm" fo:padding-right="0.25cm" fo:wrap-option="wrap" draw:shadow-color="#5e574e" loext:decorative="false"/>
    </style:style>
    <style:style style:name="gr281" style:family="graphic" style:parent-style-name="standard">
      <style:graphic-properties draw:stroke="none" draw:fill="solid" draw:fill-color="#676767" draw:textarea-horizontal-align="left" draw:textarea-vertical-align="top" draw:auto-grow-height="false" fo:min-height="0.569cm" fo:min-width="0.003cm" fo:padding-top="0.13cm" fo:padding-bottom="0.13cm" fo:padding-left="0.25cm" fo:padding-right="0.25cm" fo:wrap-option="wrap" draw:shadow-color="#5e574e" loext:decorative="false"/>
    </style:style>
    <style:style style:name="gr282" style:family="graphic" style:parent-style-name="standard">
      <style:graphic-properties draw:stroke="none" draw:fill="solid" draw:fill-color="#5e574e" draw:textarea-horizontal-align="left" draw:textarea-vertical-align="top" draw:auto-grow-height="false" fo:min-height="0.662cm" fo:min-width="0.117cm" fo:padding-top="0.13cm" fo:padding-bottom="0.13cm" fo:padding-left="0.25cm" fo:padding-right="0.25cm" fo:wrap-option="wrap" draw:shadow-color="#5e574e" loext:decorative="false"/>
    </style:style>
    <style:style style:name="gr283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384cm" fo:min-width="0cm" fo:padding-top="0.13cm" fo:padding-bottom="0.13cm" fo:padding-left="0.25cm" fo:padding-right="0.25cm" fo:wrap-option="wrap" draw:shadow-color="#5e574e" loext:decorative="false"/>
    </style:style>
    <style:style style:name="gr284" style:family="graphic" style:parent-style-name="standard">
      <style:graphic-properties draw:stroke="none" draw:fill="solid" draw:fill-color="#5e574e" draw:textarea-horizontal-align="left" draw:textarea-vertical-align="top" draw:auto-grow-height="false" fo:min-height="0.379cm" fo:min-width="0.453cm" fo:padding-top="0.13cm" fo:padding-bottom="0.13cm" fo:padding-left="0.25cm" fo:padding-right="0.25cm" fo:wrap-option="wrap" draw:shadow-color="#5e574e" loext:decorative="false"/>
    </style:style>
    <style:style style:name="gr285" style:family="graphic" style:parent-style-name="standard">
      <style:graphic-properties draw:stroke="none" draw:fill="solid" draw:fill-color="#919191" draw:textarea-horizontal-align="left" draw:textarea-vertical-align="top" draw:auto-grow-height="false" fo:min-height="0.419cm" fo:min-width="0.452cm" fo:padding-top="0.13cm" fo:padding-bottom="0.13cm" fo:padding-left="0.25cm" fo:padding-right="0.25cm" fo:wrap-option="wrap" draw:shadow-color="#5e574e" loext:decorative="false"/>
    </style:style>
    <style:style style:name="gr286" style:family="graphic" style:parent-style-name="standard">
      <style:graphic-properties draw:stroke="none" draw:fill="solid" draw:fill-color="#676767" draw:textarea-horizontal-align="left" draw:textarea-vertical-align="top" draw:auto-grow-height="false" fo:min-height="0.195cm" fo:min-width="0.149cm" fo:padding-top="0.13cm" fo:padding-bottom="0.13cm" fo:padding-left="0.25cm" fo:padding-right="0.25cm" fo:wrap-option="wrap" draw:shadow-color="#5e574e" loext:decorative="false"/>
    </style:style>
    <style:style style:name="gr287" style:family="graphic" style:parent-style-name="standard">
      <style:graphic-properties draw:stroke="none" draw:fill="solid" draw:fill-color="#808000" draw:textarea-horizontal-align="left" draw:textarea-vertical-align="top" draw:auto-grow-height="false" fo:min-height="0.194cm" fo:min-width="0.149cm" fo:padding-top="0.13cm" fo:padding-bottom="0.13cm" fo:padding-left="0.25cm" fo:padding-right="0.25cm" fo:wrap-option="wrap" draw:shadow-color="#5e574e" loext:decorative="false"/>
    </style:style>
    <style:style style:name="gr288" style:family="graphic" style:parent-style-name="standard">
      <style:graphic-properties draw:stroke="none" draw:fill="solid" draw:fill-color="#5e574e" draw:textarea-horizontal-align="left" draw:textarea-vertical-align="top" draw:auto-grow-height="false" fo:min-height="0.432cm" fo:min-width="0.21cm" fo:padding-top="0.13cm" fo:padding-bottom="0.13cm" fo:padding-left="0.25cm" fo:padding-right="0.25cm" fo:wrap-option="wrap" draw:shadow-color="#5e574e" loext:decorative="false"/>
    </style:style>
    <style:style style:name="gr289" style:family="graphic" style:parent-style-name="standard">
      <style:graphic-properties draw:stroke="none" draw:fill="solid" draw:fill-color="#808000" draw:textarea-horizontal-align="left" draw:textarea-vertical-align="top" draw:auto-grow-height="false" fo:min-height="0.472cm" fo:min-width="0.708cm" fo:padding-top="0.13cm" fo:padding-bottom="0.13cm" fo:padding-left="0.25cm" fo:padding-right="0.25cm" fo:wrap-option="wrap" draw:shadow-color="#5e574e" loext:decorative="false"/>
    </style:style>
    <style:style style:name="gr290" style:family="graphic" style:parent-style-name="standard">
      <style:graphic-properties draw:stroke="none" draw:fill="solid" draw:fill-color="#dadada" draw:textarea-horizontal-align="left" draw:textarea-vertical-align="top" draw:auto-grow-height="false" fo:min-height="0.424cm" fo:min-width="0.598cm" fo:padding-top="0.13cm" fo:padding-bottom="0.13cm" fo:padding-left="0.25cm" fo:padding-right="0.25cm" fo:wrap-option="wrap" draw:shadow-color="#5e574e" loext:decorative="false"/>
    </style:style>
    <style:style style:name="gr291" style:family="graphic" style:parent-style-name="standard">
      <style:graphic-properties draw:stroke="none" draw:fill="solid" draw:fill-color="#676767" draw:textarea-horizontal-align="left" draw:textarea-vertical-align="top" draw:auto-grow-height="false" fo:min-height="0.569cm" fo:min-width="0cm" fo:padding-top="0.13cm" fo:padding-bottom="0.13cm" fo:padding-left="0.25cm" fo:padding-right="0.25cm" fo:wrap-option="wrap" draw:shadow-color="#5e574e" loext:decorative="false"/>
    </style:style>
    <style:style style:name="gr292" style:family="graphic" style:parent-style-name="standard">
      <style:graphic-properties draw:stroke="none" draw:fill="solid" draw:fill-color="#5e574e" draw:textarea-horizontal-align="left" draw:textarea-vertical-align="top" draw:auto-grow-height="false" fo:min-height="0.662cm" fo:min-width="0.126cm" fo:padding-top="0.13cm" fo:padding-bottom="0.13cm" fo:padding-left="0.25cm" fo:padding-right="0.25cm" fo:wrap-option="wrap" draw:shadow-color="#5e574e" loext:decorative="false"/>
    </style:style>
    <style:style style:name="gr293" style:family="graphic" style:parent-style-name="standard">
      <style:graphic-properties draw:stroke="none" draw:fill="solid" draw:fill-color="#919191" draw:textarea-horizontal-align="left" draw:textarea-vertical-align="top" draw:auto-grow-height="false" fo:min-height="0.419cm" fo:min-width="0.461cm" fo:padding-top="0.13cm" fo:padding-bottom="0.13cm" fo:padding-left="0.25cm" fo:padding-right="0.25cm" fo:wrap-option="wrap" draw:shadow-color="#5e574e" loext:decorative="false"/>
    </style:style>
    <style:style style:name="gr294" style:family="graphic" style:parent-style-name="standard">
      <style:graphic-properties draw:stroke="none" draw:fill="solid" draw:fill-color="#676767" draw:textarea-horizontal-align="left" draw:textarea-vertical-align="top" draw:auto-grow-height="false" fo:min-height="0.195cm" fo:min-width="0.135cm" fo:padding-top="0.13cm" fo:padding-bottom="0.13cm" fo:padding-left="0.25cm" fo:padding-right="0.25cm" fo:wrap-option="wrap" draw:shadow-color="#5e574e" loext:decorative="false"/>
    </style:style>
    <style:style style:name="gr295" style:family="graphic" style:parent-style-name="standard">
      <style:graphic-properties draw:stroke="none" draw:fill="solid" draw:fill-color="#808000" draw:textarea-horizontal-align="left" draw:textarea-vertical-align="top" draw:auto-grow-height="false" fo:min-height="0.194cm" fo:min-width="0.135cm" fo:padding-top="0.13cm" fo:padding-bottom="0.13cm" fo:padding-left="0.25cm" fo:padding-right="0.25cm" fo:wrap-option="wrap" draw:shadow-color="#5e574e" loext:decorative="false"/>
    </style:style>
    <style:style style:name="gr296" style:family="graphic" style:parent-style-name="standard">
      <style:graphic-properties draw:stroke="none" draw:fill="solid" draw:fill-color="#676767" draw:textarea-horizontal-align="left" draw:textarea-vertical-align="top" draw:auto-grow-height="false" fo:min-height="0.242cm" fo:min-width="0cm" fo:padding-top="0.13cm" fo:padding-bottom="0.13cm" fo:padding-left="0.25cm" fo:padding-right="0.25cm" fo:wrap-option="wrap" draw:shadow-color="#5e574e" loext:decorative="false"/>
    </style:style>
    <style:style style:name="gr297" style:family="graphic" style:parent-style-name="standard">
      <style:graphic-properties draw:stroke="none" draw:fill="solid" draw:fill-color="#5e574e" draw:textarea-horizontal-align="left" draw:textarea-vertical-align="top" draw:auto-grow-height="false" fo:min-height="0.423cm" fo:min-width="0.21cm" fo:padding-top="0.13cm" fo:padding-bottom="0.13cm" fo:padding-left="0.25cm" fo:padding-right="0.25cm" fo:wrap-option="wrap" draw:shadow-color="#5e574e" loext:decorative="false"/>
    </style:style>
    <style:style style:name="gr298" style:family="graphic" style:parent-style-name="standard">
      <style:graphic-properties draw:stroke="none" draw:fill="solid" draw:fill-color="#808000" draw:textarea-horizontal-align="left" draw:textarea-vertical-align="top" draw:auto-grow-height="false" fo:min-height="0.481cm" fo:min-width="0.717cm" fo:padding-top="0.13cm" fo:padding-bottom="0.13cm" fo:padding-left="0.25cm" fo:padding-right="0.25cm" fo:wrap-option="wrap" draw:shadow-color="#5e574e" loext:decorative="false"/>
    </style:style>
    <style:style style:name="gr299" style:family="graphic" style:parent-style-name="standard">
      <style:graphic-properties draw:stroke="none" draw:fill="solid" draw:fill-color="#dadada" draw:textarea-horizontal-align="left" draw:textarea-vertical-align="top" draw:auto-grow-height="false" fo:min-height="0.432cm" fo:min-width="0.598cm" fo:padding-top="0.13cm" fo:padding-bottom="0.13cm" fo:padding-left="0.25cm" fo:padding-right="0.25cm" fo:wrap-option="wrap" draw:shadow-color="#5e574e" loext:decorative="false"/>
    </style:style>
    <style:style style:name="gr300" style:family="graphic" style:parent-style-name="standard">
      <style:graphic-properties draw:stroke="none" draw:fill="solid" draw:fill-color="#676767" draw:textarea-horizontal-align="left" draw:textarea-vertical-align="top" draw:auto-grow-height="false" fo:min-height="0.569cm" fo:min-width="0.002cm" fo:padding-top="0.13cm" fo:padding-bottom="0.13cm" fo:padding-left="0.25cm" fo:padding-right="0.25cm" fo:wrap-option="wrap" draw:shadow-color="#5e574e" loext:decorative="false"/>
    </style:style>
    <style:style style:name="gr301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415cm" fo:min-width="0cm" fo:padding-top="0.13cm" fo:padding-bottom="0.13cm" fo:padding-left="0.25cm" fo:padding-right="0.25cm" fo:wrap-option="wrap" draw:shadow-color="#5e574e" loext:decorative="false"/>
    </style:style>
    <style:style style:name="gr302" style:family="graphic" style:parent-style-name="standard">
      <style:graphic-properties draw:stroke="none" draw:fill="solid" draw:fill-color="#5e574e" draw:textarea-horizontal-align="left" draw:textarea-vertical-align="top" draw:auto-grow-height="false" fo:min-height="0.384cm" fo:min-width="0.462cm" fo:padding-top="0.13cm" fo:padding-bottom="0.13cm" fo:padding-left="0.25cm" fo:padding-right="0.25cm" fo:wrap-option="wrap" draw:shadow-color="#5e574e" loext:decorative="false"/>
    </style:style>
    <style:style style:name="gr303" style:family="graphic" style:parent-style-name="standard">
      <style:graphic-properties draw:stroke="none" draw:fill="solid" draw:fill-color="#919191" draw:textarea-horizontal-align="left" draw:textarea-vertical-align="top" draw:auto-grow-height="false" fo:min-height="0.423cm" fo:min-width="0.457cm" fo:padding-top="0.13cm" fo:padding-bottom="0.13cm" fo:padding-left="0.25cm" fo:padding-right="0.25cm" fo:wrap-option="wrap" draw:shadow-color="#5e574e" loext:decorative="false"/>
    </style:style>
    <style:style style:name="gr304" style:family="graphic" style:parent-style-name="standard">
      <style:graphic-properties draw:stroke="none" draw:fill="solid" draw:fill-color="#676767" draw:textarea-horizontal-align="left" draw:textarea-vertical-align="top" draw:auto-grow-height="false" fo:min-height="0.199cm" fo:min-width="0.139cm" fo:padding-top="0.13cm" fo:padding-bottom="0.13cm" fo:padding-left="0.25cm" fo:padding-right="0.25cm" fo:wrap-option="wrap" draw:shadow-color="#5e574e" loext:decorative="false"/>
    </style:style>
    <style:style style:name="gr305" style:family="graphic" style:parent-style-name="standard">
      <style:graphic-properties draw:stroke="none" draw:fill="solid" draw:fill-color="#808000" draw:textarea-horizontal-align="left" draw:textarea-vertical-align="top" draw:auto-grow-height="false" fo:min-height="0.19cm" fo:min-width="0.139cm" fo:padding-top="0.13cm" fo:padding-bottom="0.13cm" fo:padding-left="0.25cm" fo:padding-right="0.25cm" fo:wrap-option="wrap" draw:shadow-color="#5e574e" loext:decorative="false"/>
    </style:style>
    <style:style style:name="gr306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3.819cm" fo:min-width="2.375cm" fo:padding-top="0.13cm" fo:padding-bottom="0.13cm" fo:padding-left="0.25cm" fo:padding-right="0.25cm" fo:wrap-option="wrap" draw:shadow-color="#5e574e" loext:decorative="false"/>
    </style:style>
    <style:style style:name="gr307" style:family="graphic" style:parent-style-name="standard">
      <style:graphic-properties draw:stroke="none" draw:fill="solid" draw:fill-color="#5e574e" draw:textarea-horizontal-align="left" draw:textarea-vertical-align="top" draw:auto-grow-height="false" fo:min-height="0.291cm" fo:min-width="0.166cm" fo:padding-top="0.13cm" fo:padding-bottom="0.13cm" fo:padding-left="0.25cm" fo:padding-right="0.25cm" fo:wrap-option="wrap" draw:shadow-color="#5e574e" loext:decorative="false"/>
    </style:style>
    <style:style style:name="gr308" style:family="graphic" style:parent-style-name="standard">
      <style:graphic-properties draw:stroke="none" draw:fill="solid" draw:fill-color="#808000" draw:textarea-horizontal-align="left" draw:textarea-vertical-align="top" draw:auto-grow-height="false" fo:min-height="0.467cm" fo:min-width="0.638cm" fo:padding-top="0.13cm" fo:padding-bottom="0.13cm" fo:padding-left="0.25cm" fo:padding-right="0.25cm" fo:wrap-option="wrap" draw:shadow-color="#5e574e" loext:decorative="false"/>
    </style:style>
    <style:style style:name="gr309" style:family="graphic" style:parent-style-name="standard">
      <style:graphic-properties draw:stroke="none" draw:fill="solid" draw:fill-color="#676767" draw:textarea-horizontal-align="left" draw:textarea-vertical-align="top" draw:auto-grow-height="false" fo:min-height="0.119cm" fo:min-width="0cm" fo:padding-top="0.13cm" fo:padding-bottom="0.13cm" fo:padding-left="0.25cm" fo:padding-right="0.25cm" fo:wrap-option="wrap" draw:shadow-color="#5e574e" loext:decorative="false"/>
    </style:style>
    <style:style style:name="gr310" style:family="graphic" style:parent-style-name="standard">
      <style:graphic-properties draw:stroke="none" draw:fill="solid" draw:fill-color="#5e574e" draw:textarea-horizontal-align="left" draw:textarea-vertical-align="top" draw:auto-grow-height="false" fo:min-height="0.573cm" fo:min-width="0.311cm" fo:padding-top="0.13cm" fo:padding-bottom="0.13cm" fo:padding-left="0.25cm" fo:padding-right="0.25cm" fo:wrap-option="wrap" draw:shadow-color="#5e574e" loext:decorative="false"/>
    </style:style>
    <style:style style:name="gr311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282cm" fo:min-width="0.029cm" fo:padding-top="0.13cm" fo:padding-bottom="0.13cm" fo:padding-left="0.25cm" fo:padding-right="0.25cm" fo:wrap-option="wrap" draw:shadow-color="#5e574e" loext:decorative="false"/>
    </style:style>
    <style:style style:name="gr312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78cm" fo:min-width="0cm" fo:padding-top="0.13cm" fo:padding-bottom="0.13cm" fo:padding-left="0.25cm" fo:padding-right="0.25cm" fo:wrap-option="wrap" draw:shadow-color="#5e574e" loext:decorative="false"/>
    </style:style>
    <style:style style:name="gr313" style:family="graphic" style:parent-style-name="standard">
      <style:graphic-properties draw:stroke="none" draw:fill="solid" draw:fill-color="#808000" draw:textarea-horizontal-align="left" draw:textarea-vertical-align="top" draw:auto-grow-height="false" fo:min-height="0.164cm" fo:min-width="0.254cm" fo:padding-top="0.13cm" fo:padding-bottom="0.13cm" fo:padding-left="0.25cm" fo:padding-right="0.25cm" fo:wrap-option="wrap" draw:shadow-color="#5e574e" loext:decorative="false"/>
    </style:style>
    <style:style style:name="gr314" style:family="graphic" style:parent-style-name="standard">
      <style:graphic-properties draw:stroke="none" draw:fill="solid" draw:fill-color="#676767" draw:textarea-horizontal-align="left" draw:textarea-vertical-align="top" draw:auto-grow-height="false" fo:min-height="0.163cm" fo:min-width="0cm" fo:padding-top="0.13cm" fo:padding-bottom="0.13cm" fo:padding-left="0.25cm" fo:padding-right="0.25cm" fo:wrap-option="wrap" draw:shadow-color="#5e574e" loext:decorative="false"/>
    </style:style>
    <style:style style:name="gr315" style:family="graphic" style:parent-style-name="standard">
      <style:graphic-properties draw:stroke="solid" svg:stroke-width="0.035cm" svg:stroke-color="#5e574e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316" style:family="graphic" style:parent-style-name="standard">
      <style:graphic-properties draw:stroke="none" draw:fill="none" draw:fill-color="#ff6600" draw:textarea-horizontal-align="left" draw:textarea-vertical-align="middle" draw:auto-grow-height="false" fo:min-height="1.354cm" fo:min-width="3.733cm" fo:padding-top="0.13cm" fo:padding-bottom="0.13cm" fo:padding-left="0.25cm" fo:padding-right="0.25cm" fo:wrap-option="no-wrap" draw:shadow-color="#5e574e" loext:decorative="false"/>
    </style:style>
    <style:style style:name="gr317" style:family="graphic" style:parent-style-name="standard">
      <style:graphic-properties draw:stroke="none" draw:fill="solid" draw:fill-color="#676767" draw:textarea-horizontal-align="left" draw:textarea-vertical-align="top" draw:auto-grow-height="false" fo:min-height="1.874cm" fo:min-width="0.21cm" fo:padding-top="0.13cm" fo:padding-bottom="0.13cm" fo:padding-left="0.25cm" fo:padding-right="0.25cm" fo:wrap-option="wrap" draw:shadow-color="#5e574e" loext:decorative="false"/>
    </style:style>
    <style:style style:name="gr318" style:family="graphic" style:parent-style-name="standard">
      <style:graphic-properties draw:stroke="none" draw:fill="solid" draw:fill-color="#5e574e" draw:textarea-horizontal-align="left" draw:textarea-vertical-align="top" draw:auto-grow-height="false" fo:min-height="2.073cm" fo:min-width="0.527cm" fo:padding-top="0.13cm" fo:padding-bottom="0.13cm" fo:padding-left="0.25cm" fo:padding-right="0.25cm" fo:wrap-option="wrap" draw:shadow-color="#5e574e" loext:decorative="false"/>
    </style:style>
    <style:style style:name="gr319" style:family="graphic" style:parent-style-name="standard">
      <style:graphic-properties draw:stroke="none" draw:fill="solid" draw:fill-color="#808000" draw:textarea-horizontal-align="left" draw:textarea-vertical-align="top" draw:auto-grow-height="false" fo:min-height="0.71cm" fo:min-width="1.251cm" fo:padding-top="0.13cm" fo:padding-bottom="0.13cm" fo:padding-left="0.25cm" fo:padding-right="0.25cm" fo:wrap-option="wrap" draw:shadow-color="#5e574e" loext:decorative="false"/>
    </style:style>
    <style:style style:name="gr320" style:family="graphic" style:parent-style-name="standard">
      <style:graphic-properties draw:stroke="none" draw:fill="solid" draw:fill-color="#808000" draw:textarea-horizontal-align="left" draw:textarea-vertical-align="top" draw:auto-grow-height="false" fo:min-height="0.393cm" fo:min-width="0.624cm" fo:padding-top="0.13cm" fo:padding-bottom="0.13cm" fo:padding-left="0.25cm" fo:padding-right="0.25cm" fo:wrap-option="wrap" draw:shadow-color="#5e574e" loext:decorative="false"/>
    </style:style>
    <style:style style:name="gr321" style:family="graphic" style:parent-style-name="standard">
      <style:graphic-properties draw:stroke="none" draw:fill="solid" draw:fill-color="#5e574e" draw:textarea-horizontal-align="left" draw:textarea-vertical-align="top" draw:auto-grow-height="false" fo:min-height="1.566cm" fo:min-width="0.567cm" fo:padding-top="0.13cm" fo:padding-bottom="0.13cm" fo:padding-left="0.25cm" fo:padding-right="0.25cm" fo:wrap-option="wrap" draw:shadow-color="#5e574e" loext:decorative="false"/>
    </style:style>
    <style:style style:name="gr322" style:family="graphic" style:parent-style-name="standard">
      <style:graphic-properties draw:stroke="none" draw:fill="solid" draw:fill-color="#676767" draw:textarea-horizontal-align="left" draw:textarea-vertical-align="top" draw:auto-grow-height="false" fo:min-height="1.857cm" fo:min-width="0.329cm" fo:padding-top="0.13cm" fo:padding-bottom="0.13cm" fo:padding-left="0.25cm" fo:padding-right="0.25cm" fo:wrap-option="wrap" draw:shadow-color="#5e574e" loext:decorative="false"/>
    </style:style>
    <style:style style:name="gr323" style:family="graphic" style:parent-style-name="standard">
      <style:graphic-properties draw:stroke="none" draw:fill="solid" draw:fill-color="#808000" draw:textarea-horizontal-align="left" draw:textarea-vertical-align="top" draw:auto-grow-height="false" fo:min-height="0.392cm" fo:min-width="0.624cm" fo:padding-top="0.13cm" fo:padding-bottom="0.13cm" fo:padding-left="0.25cm" fo:padding-right="0.25cm" fo:wrap-option="wrap" draw:shadow-color="#5e574e" loext:decorative="false"/>
    </style:style>
    <style:style style:name="gr324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325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32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327" style:family="graphic" style:parent-style-name="standard">
      <style:graphic-properties draw:stroke="none" draw:fill="solid" draw:fill-color="#5e574e" draw:textarea-horizontal-align="left" draw:textarea-vertical-align="top" draw:auto-grow-height="false" fo:min-height="0.384cm" fo:min-width="0.461cm" fo:padding-top="0.13cm" fo:padding-bottom="0.13cm" fo:padding-left="0.25cm" fo:padding-right="0.25cm" fo:wrap-option="wrap" draw:shadow-color="#5e574e" loext:decorative="false"/>
    </style:style>
    <style:style style:name="gr328" style:family="graphic" style:parent-style-name="standard">
      <style:graphic-properties draw:stroke="none" draw:fill="solid" draw:fill-color="#676767" draw:textarea-horizontal-align="left" draw:textarea-vertical-align="top" draw:auto-grow-height="false" fo:min-height="0.199cm" fo:min-width="0.14cm" fo:padding-top="0.13cm" fo:padding-bottom="0.13cm" fo:padding-left="0.25cm" fo:padding-right="0.25cm" fo:wrap-option="wrap" draw:shadow-color="#5e574e" loext:decorative="false"/>
    </style:style>
    <style:style style:name="gr329" style:family="graphic" style:parent-style-name="standard">
      <style:graphic-properties draw:stroke="none" draw:fill="solid" draw:fill-color="#808000" draw:textarea-horizontal-align="left" draw:textarea-vertical-align="top" draw:auto-grow-height="false" fo:min-height="0.19cm" fo:min-width="0.14cm" fo:padding-top="0.13cm" fo:padding-bottom="0.13cm" fo:padding-left="0.25cm" fo:padding-right="0.25cm" fo:wrap-option="wrap" draw:shadow-color="#5e574e" loext:decorative="false"/>
    </style:style>
    <style:style style:name="gr330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331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3.59cm" fo:min-width="2.331cm" fo:padding-top="0.13cm" fo:padding-bottom="0.13cm" fo:padding-left="0.25cm" fo:padding-right="0.25cm" fo:wrap-option="wrap" draw:shadow-color="#5e574e" loext:decorative="false"/>
    </style:style>
    <style:style style:name="gr332" style:family="graphic" style:parent-style-name="standard">
      <style:graphic-properties draw:stroke="none" draw:fill="solid" draw:fill-color="#aaaaaa" draw:textarea-horizontal-align="left" draw:textarea-vertical-align="middle" draw:auto-grow-height="false" fo:min-height="0cm" fo:min-width="0.421cm" fo:padding-top="0.13cm" fo:padding-bottom="0.13cm" fo:padding-left="0.25cm" fo:padding-right="0.25cm" fo:wrap-option="no-wrap" draw:shadow-color="#5e574e" loext:decorative="false"/>
    </style:style>
    <style:style style:name="gr333" style:family="graphic" style:parent-style-name="standard">
      <style:graphic-properties draw:stroke="none" draw:fill="solid" draw:fill-color="#fcfcfc" draw:textarea-horizontal-align="left" draw:textarea-vertical-align="middle" draw:auto-grow-height="false" fo:min-height="0cm" fo:min-width="0.421cm" fo:padding-top="0.13cm" fo:padding-bottom="0.13cm" fo:padding-left="0.25cm" fo:padding-right="0.25cm" fo:wrap-option="no-wrap" draw:shadow-color="#5e574e" loext:decorative="false"/>
    </style:style>
    <style:style style:name="gr334" style:family="graphic" style:parent-style-name="standard">
      <style:graphic-properties draw:stroke="none" draw:fill="solid" draw:fill-color="#fdfdfd" draw:textarea-horizontal-align="left" draw:textarea-vertical-align="middle" draw:auto-grow-height="false" fo:min-height="0cm" fo:min-width="0.421cm" fo:padding-top="0.13cm" fo:padding-bottom="0.13cm" fo:padding-left="0.25cm" fo:padding-right="0.25cm" fo:wrap-option="no-wrap" draw:shadow-color="#5e574e" loext:decorative="false"/>
    </style:style>
    <style:style style:name="gr335" style:family="graphic" style:parent-style-name="standard">
      <style:graphic-properties draw:stroke="none" draw:fill="solid" draw:fill-color="#fefefe" draw:textarea-horizontal-align="left" draw:textarea-vertical-align="middle" draw:auto-grow-height="false" fo:min-height="0cm" fo:min-width="0.421cm" fo:padding-top="0.13cm" fo:padding-bottom="0.13cm" fo:padding-left="0.25cm" fo:padding-right="0.25cm" fo:wrap-option="no-wrap" draw:shadow-color="#5e574e" loext:decorative="false"/>
    </style:style>
    <style:style style:name="gr336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.421cm" fo:padding-top="0.13cm" fo:padding-bottom="0.13cm" fo:padding-left="0.25cm" fo:padding-right="0.25cm" fo:wrap-option="no-wrap" draw:shadow-color="#5e574e" loext:decorative="false"/>
    </style:style>
    <style:style style:name="gr337" style:family="graphic" style:parent-style-name="standard">
      <style:graphic-properties draw:stroke="solid" svg:stroke-width="0.035cm" svg:stroke-color="#000000" draw:stroke-linejoin="miter" draw:fill="solid" draw:fill-color="#cecece" draw:textarea-horizontal-align="left" draw:textarea-vertical-align="middle" draw:auto-grow-height="false" fo:min-height="1.694cm" fo:min-width="0.387cm" fo:padding-top="0.13cm" fo:padding-bottom="0.13cm" fo:padding-left="0.25cm" fo:padding-right="0.25cm" fo:wrap-option="no-wrap" draw:shadow-color="#5e574e" loext:decorative="false"/>
    </style:style>
    <style:style style:name="gr338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625cm" fo:padding-top="0.13cm" fo:padding-bottom="0.13cm" fo:padding-left="0.25cm" fo:padding-right="0.25cm" fo:wrap-option="no-wrap" draw:shadow-color="#5e574e" loext:decorative="false"/>
    </style:style>
    <style:style style:name="gr339" style:family="graphic" style:parent-style-name="standard">
      <style:graphic-properties draw:stroke="none" draw:fill="solid" draw:fill-color="#8e8e8e" draw:textarea-horizontal-align="left" draw:textarea-vertical-align="middle" draw:auto-grow-height="false" fo:min-height="0cm" fo:min-width="0.188cm" fo:padding-top="0.13cm" fo:padding-bottom="0.13cm" fo:padding-left="0.25cm" fo:padding-right="0.25cm" fo:wrap-option="no-wrap" draw:shadow-color="#5e574e" loext:decorative="false"/>
    </style:style>
    <style:style style:name="gr340" style:family="graphic" style:parent-style-name="standard">
      <style:graphic-properties draw:stroke="none" draw:fill="solid" draw:fill-color="#c7c7c7" draw:textarea-horizontal-align="left" draw:textarea-vertical-align="middle" draw:auto-grow-height="false" fo:min-height="0cm" fo:min-width="0.188cm" fo:padding-top="0.13cm" fo:padding-bottom="0.13cm" fo:padding-left="0.25cm" fo:padding-right="0.25cm" fo:wrap-option="no-wrap" draw:shadow-color="#5e574e" loext:decorative="false"/>
    </style:style>
    <style:style style:name="gr341" style:family="graphic" style:parent-style-name="standard">
      <style:graphic-properties draw:stroke="none" draw:fill="solid" draw:fill-color="#e3e3e3" draw:textarea-horizontal-align="left" draw:textarea-vertical-align="middle" draw:auto-grow-height="false" fo:min-height="0cm" fo:min-width="0.188cm" fo:padding-top="0.13cm" fo:padding-bottom="0.13cm" fo:padding-left="0.25cm" fo:padding-right="0.25cm" fo:wrap-option="no-wrap" draw:shadow-color="#5e574e" loext:decorative="false"/>
    </style:style>
    <style:style style:name="gr342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.188cm" fo:padding-top="0.13cm" fo:padding-bottom="0.13cm" fo:padding-left="0.25cm" fo:padding-right="0.25cm" fo:wrap-option="no-wrap" draw:shadow-color="#5e574e" loext:decorative="false"/>
    </style:style>
    <style:style style:name="gr343" style:family="graphic" style:parent-style-name="standard">
      <style:graphic-properties draw:stroke="none" draw:fill="solid" draw:fill-color="#315faf" draw:textarea-horizontal-align="left" draw:textarea-vertical-align="middle" draw:auto-grow-height="false" fo:min-height="1.089cm" fo:min-width="3.826cm" fo:padding-top="0.13cm" fo:padding-bottom="0.13cm" fo:padding-left="0.25cm" fo:padding-right="0.25cm" fo:wrap-option="no-wrap" draw:shadow-color="#5e574e" loext:decorative="false"/>
    </style:style>
    <style:style style:name="gr344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345" style:family="graphic" style:parent-style-name="standard">
      <style:graphic-properties draw:stroke="none" draw:fill="solid" draw:fill-color="#5e574e" draw:textarea-horizontal-align="left" draw:textarea-vertical-align="top" draw:auto-grow-height="false" fo:min-height="0.428cm" fo:min-width="0.21cm" fo:padding-top="0.13cm" fo:padding-bottom="0.13cm" fo:padding-left="0.25cm" fo:padding-right="0.25cm" fo:wrap-option="wrap" draw:shadow-color="#5e574e" loext:decorative="false"/>
    </style:style>
    <style:style style:name="gr346" style:family="graphic" style:parent-style-name="standard">
      <style:graphic-properties draw:stroke="none" draw:fill="solid" draw:fill-color="#808000" draw:textarea-horizontal-align="left" draw:textarea-vertical-align="top" draw:auto-grow-height="false" fo:min-height="0.476cm" fo:min-width="0.708cm" fo:padding-top="0.13cm" fo:padding-bottom="0.13cm" fo:padding-left="0.25cm" fo:padding-right="0.25cm" fo:wrap-option="wrap" draw:shadow-color="#5e574e" loext:decorative="false"/>
    </style:style>
    <style:style style:name="gr347" style:family="graphic" style:parent-style-name="standard">
      <style:graphic-properties draw:stroke="none" draw:fill="solid" draw:fill-color="#dadada" draw:textarea-horizontal-align="left" draw:textarea-vertical-align="top" draw:auto-grow-height="false" fo:min-height="0.428cm" fo:min-width="0.602cm" fo:padding-top="0.13cm" fo:padding-bottom="0.13cm" fo:padding-left="0.25cm" fo:padding-right="0.25cm" fo:wrap-option="wrap" draw:shadow-color="#5e574e" loext:decorative="false"/>
    </style:style>
    <style:style style:name="gr348" style:family="graphic" style:parent-style-name="standard">
      <style:graphic-properties draw:stroke="none" draw:fill="solid" draw:fill-color="#5e574e" draw:textarea-horizontal-align="left" draw:textarea-vertical-align="top" draw:auto-grow-height="false" fo:min-height="0.379cm" fo:min-width="0.466cm" fo:padding-top="0.13cm" fo:padding-bottom="0.13cm" fo:padding-left="0.25cm" fo:padding-right="0.25cm" fo:wrap-option="wrap" draw:shadow-color="#5e574e" loext:decorative="false"/>
    </style:style>
    <style:style style:name="gr349" style:family="graphic" style:parent-style-name="standard">
      <style:graphic-properties draw:stroke="none" draw:fill="solid" draw:fill-color="#919191" draw:textarea-horizontal-align="left" draw:textarea-vertical-align="top" draw:auto-grow-height="false" fo:min-height="0.42cm" fo:min-width="0.471cm" fo:padding-top="0.13cm" fo:padding-bottom="0.13cm" fo:padding-left="0.25cm" fo:padding-right="0.25cm" fo:wrap-option="wrap" draw:shadow-color="#5e574e" loext:decorative="false"/>
    </style:style>
    <style:style style:name="gr350" style:family="graphic" style:parent-style-name="standard">
      <style:graphic-properties draw:stroke="none" draw:fill="solid" draw:fill-color="#676767" draw:textarea-horizontal-align="left" draw:textarea-vertical-align="top" draw:auto-grow-height="false" fo:min-height="0.199cm" fo:min-width="0.135cm" fo:padding-top="0.13cm" fo:padding-bottom="0.13cm" fo:padding-left="0.25cm" fo:padding-right="0.25cm" fo:wrap-option="wrap" draw:shadow-color="#5e574e" loext:decorative="false"/>
    </style:style>
    <style:style style:name="gr351" style:family="graphic" style:parent-style-name="standard">
      <style:graphic-properties draw:stroke="none" draw:fill="solid" draw:fill-color="#808000" draw:textarea-horizontal-align="left" draw:textarea-vertical-align="top" draw:auto-grow-height="false" fo:min-height="0.19cm" fo:min-width="0.135cm" fo:padding-top="0.13cm" fo:padding-bottom="0.13cm" fo:padding-left="0.25cm" fo:padding-right="0.25cm" fo:wrap-option="wrap" draw:shadow-color="#5e574e" loext:decorative="false"/>
    </style:style>
    <style:style style:name="gr352" style:family="graphic" style:parent-style-name="standard">
      <style:graphic-properties draw:stroke="none" draw:fill="solid" draw:fill-color="#aaaaaa" draw:textarea-horizontal-align="left" draw:textarea-vertical-align="middle" draw:auto-grow-height="false" fo:min-height="0cm" fo:min-width="0.418cm" fo:padding-top="0.13cm" fo:padding-bottom="0.13cm" fo:padding-left="0.25cm" fo:padding-right="0.25cm" fo:wrap-option="no-wrap" draw:shadow-color="#5e574e" loext:decorative="false"/>
    </style:style>
    <style:style style:name="gr353" style:family="graphic" style:parent-style-name="standard">
      <style:graphic-properties draw:stroke="none" draw:fill="solid" draw:fill-color="#fcfcfc" draw:textarea-horizontal-align="left" draw:textarea-vertical-align="middle" draw:auto-grow-height="false" fo:min-height="0cm" fo:min-width="0.418cm" fo:padding-top="0.13cm" fo:padding-bottom="0.13cm" fo:padding-left="0.25cm" fo:padding-right="0.25cm" fo:wrap-option="no-wrap" draw:shadow-color="#5e574e" loext:decorative="false"/>
    </style:style>
    <style:style style:name="gr354" style:family="graphic" style:parent-style-name="standard">
      <style:graphic-properties draw:stroke="none" draw:fill="solid" draw:fill-color="#fdfdfd" draw:textarea-horizontal-align="left" draw:textarea-vertical-align="middle" draw:auto-grow-height="false" fo:min-height="0cm" fo:min-width="0.418cm" fo:padding-top="0.13cm" fo:padding-bottom="0.13cm" fo:padding-left="0.25cm" fo:padding-right="0.25cm" fo:wrap-option="no-wrap" draw:shadow-color="#5e574e" loext:decorative="false"/>
    </style:style>
    <style:style style:name="gr355" style:family="graphic" style:parent-style-name="standard">
      <style:graphic-properties draw:stroke="none" draw:fill="solid" draw:fill-color="#fefefe" draw:textarea-horizontal-align="left" draw:textarea-vertical-align="middle" draw:auto-grow-height="false" fo:min-height="0cm" fo:min-width="0.418cm" fo:padding-top="0.13cm" fo:padding-bottom="0.13cm" fo:padding-left="0.25cm" fo:padding-right="0.25cm" fo:wrap-option="no-wrap" draw:shadow-color="#5e574e" loext:decorative="false"/>
    </style:style>
    <style:style style:name="gr356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.418cm" fo:padding-top="0.13cm" fo:padding-bottom="0.13cm" fo:padding-left="0.25cm" fo:padding-right="0.25cm" fo:wrap-option="no-wrap" draw:shadow-color="#5e574e" loext:decorative="false"/>
    </style:style>
    <style:style style:name="gr357" style:family="graphic" style:parent-style-name="standard">
      <style:graphic-properties draw:stroke="solid" svg:stroke-width="0.035cm" svg:stroke-color="#000000" draw:stroke-linejoin="miter" draw:fill="solid" draw:fill-color="#cecece" draw:textarea-horizontal-align="left" draw:textarea-vertical-align="middle" draw:auto-grow-height="false" fo:min-height="1.693cm" fo:min-width="0.382cm" fo:padding-top="0.13cm" fo:padding-bottom="0.13cm" fo:padding-left="0.25cm" fo:padding-right="0.25cm" fo:wrap-option="no-wrap" draw:shadow-color="#5e574e" loext:decorative="false"/>
    </style:style>
    <style:style style:name="gr358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637cm" fo:padding-top="0.13cm" fo:padding-bottom="0.13cm" fo:padding-left="0.25cm" fo:padding-right="0.25cm" fo:wrap-option="no-wrap" draw:shadow-color="#5e574e" loext:decorative="false"/>
    </style:style>
    <style:style style:name="gr359" style:family="graphic" style:parent-style-name="standard">
      <style:graphic-properties draw:stroke="none" draw:fill="solid" draw:fill-color="#8e8e8e" draw:textarea-horizontal-align="left" draw:textarea-vertical-align="middle" draw:auto-grow-height="false" fo:min-height="0cm" fo:min-width="0.179cm" fo:padding-top="0.13cm" fo:padding-bottom="0.13cm" fo:padding-left="0.25cm" fo:padding-right="0.25cm" fo:wrap-option="no-wrap" draw:shadow-color="#5e574e" loext:decorative="false"/>
    </style:style>
    <style:style style:name="gr360" style:family="graphic" style:parent-style-name="standard">
      <style:graphic-properties draw:stroke="none" draw:fill="solid" draw:fill-color="#c7c7c7" draw:textarea-horizontal-align="left" draw:textarea-vertical-align="middle" draw:auto-grow-height="false" fo:min-height="0cm" fo:min-width="0.179cm" fo:padding-top="0.13cm" fo:padding-bottom="0.13cm" fo:padding-left="0.25cm" fo:padding-right="0.25cm" fo:wrap-option="no-wrap" draw:shadow-color="#5e574e" loext:decorative="false"/>
    </style:style>
    <style:style style:name="gr361" style:family="graphic" style:parent-style-name="standard">
      <style:graphic-properties draw:stroke="none" draw:fill="solid" draw:fill-color="#e3e3e3" draw:textarea-horizontal-align="left" draw:textarea-vertical-align="middle" draw:auto-grow-height="false" fo:min-height="0cm" fo:min-width="0.179cm" fo:padding-top="0.13cm" fo:padding-bottom="0.13cm" fo:padding-left="0.25cm" fo:padding-right="0.25cm" fo:wrap-option="no-wrap" draw:shadow-color="#5e574e" loext:decorative="false"/>
    </style:style>
    <style:style style:name="gr362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.179cm" fo:padding-top="0.13cm" fo:padding-bottom="0.13cm" fo:padding-left="0.25cm" fo:padding-right="0.25cm" fo:wrap-option="no-wrap" draw:shadow-color="#5e574e" loext:decorative="false"/>
    </style:style>
    <style:style style:name="gr363" style:family="graphic" style:parent-style-name="standard">
      <style:graphic-properties draw:stroke="none" draw:fill="solid" draw:fill-color="#5e574e" draw:textarea-horizontal-align="left" draw:textarea-vertical-align="top" draw:auto-grow-height="false" fo:min-height="0.437cm" fo:min-width="0.21cm" fo:padding-top="0.13cm" fo:padding-bottom="0.13cm" fo:padding-left="0.25cm" fo:padding-right="0.25cm" fo:wrap-option="wrap" draw:shadow-color="#5e574e" loext:decorative="false"/>
    </style:style>
    <style:style style:name="gr364" style:family="graphic" style:parent-style-name="standard">
      <style:graphic-properties draw:stroke="none" draw:fill="solid" draw:fill-color="#808000" draw:textarea-horizontal-align="left" draw:textarea-vertical-align="top" draw:auto-grow-height="false" fo:min-height="0.472cm" fo:min-width="0.704cm" fo:padding-top="0.13cm" fo:padding-bottom="0.13cm" fo:padding-left="0.25cm" fo:padding-right="0.25cm" fo:wrap-option="wrap" draw:shadow-color="#5e574e" loext:decorative="false"/>
    </style:style>
    <style:style style:name="gr365" style:family="graphic" style:parent-style-name="standard">
      <style:graphic-properties draw:stroke="none" draw:fill="solid" draw:fill-color="#dadada" draw:textarea-horizontal-align="left" draw:textarea-vertical-align="top" draw:auto-grow-height="false" fo:min-height="0.424cm" fo:min-width="0.602cm" fo:padding-top="0.13cm" fo:padding-bottom="0.13cm" fo:padding-left="0.25cm" fo:padding-right="0.25cm" fo:wrap-option="wrap" draw:shadow-color="#5e574e" loext:decorative="false"/>
    </style:style>
    <style:style style:name="gr366" style:family="graphic" style:parent-style-name="standard">
      <style:graphic-properties draw:stroke="none" draw:fill="solid" draw:fill-color="#5e574e" draw:textarea-horizontal-align="left" draw:textarea-vertical-align="top" draw:auto-grow-height="false" fo:min-height="0.379cm" fo:min-width="0.457cm" fo:padding-top="0.13cm" fo:padding-bottom="0.13cm" fo:padding-left="0.25cm" fo:padding-right="0.25cm" fo:wrap-option="wrap" draw:shadow-color="#5e574e" loext:decorative="false"/>
    </style:style>
    <style:style style:name="gr367" style:family="graphic" style:parent-style-name="standard">
      <style:graphic-properties draw:stroke="none" draw:fill="solid" draw:fill-color="#676767" draw:textarea-horizontal-align="left" draw:textarea-vertical-align="top" draw:auto-grow-height="false" fo:min-height="0.194cm" fo:min-width="0.144cm" fo:padding-top="0.13cm" fo:padding-bottom="0.13cm" fo:padding-left="0.25cm" fo:padding-right="0.25cm" fo:wrap-option="wrap" draw:shadow-color="#5e574e" loext:decorative="false"/>
    </style:style>
    <style:style style:name="gr368" style:family="graphic" style:parent-style-name="standard">
      <style:graphic-properties draw:stroke="none" draw:fill="solid" draw:fill-color="#808000" draw:textarea-horizontal-align="left" draw:textarea-vertical-align="top" draw:auto-grow-height="false" fo:min-height="0.198cm" fo:min-width="0.144cm" fo:padding-top="0.13cm" fo:padding-bottom="0.13cm" fo:padding-left="0.25cm" fo:padding-right="0.25cm" fo:wrap-option="wrap" draw:shadow-color="#5e574e" loext:decorative="false"/>
    </style:style>
    <style:style style:name="gr369" style:family="graphic" style:parent-style-name="standard" style:list-style-name="L18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370" style:family="graphic" style:parent-style-name="standard">
      <style:graphic-properties draw:stroke="none" draw:fill="solid" draw:fill-color="#5e574e" draw:textarea-horizontal-align="left" draw:textarea-vertical-align="top" draw:auto-grow-height="false" fo:min-height="0.084cm" fo:min-width="0cm" fo:padding-top="0.13cm" fo:padding-bottom="0.13cm" fo:padding-left="0.25cm" fo:padding-right="0.25cm" fo:wrap-option="wrap" draw:shadow-color="#5e574e" loext:decorative="false"/>
    </style:style>
    <style:style style:name="gr371" style:family="graphic" style:parent-style-name="standard">
      <style:graphic-properties draw:stroke="none" draw:fill="solid" draw:fill-color="#808000" draw:textarea-horizontal-align="left" draw:textarea-vertical-align="top" draw:auto-grow-height="false" fo:min-height="0.106cm" fo:min-width="0.117cm" fo:padding-top="0.13cm" fo:padding-bottom="0.13cm" fo:padding-left="0.25cm" fo:padding-right="0.25cm" fo:wrap-option="wrap" draw:shadow-color="#5e574e" loext:decorative="false"/>
    </style:style>
    <style:style style:name="gr372" style:family="graphic" style:parent-style-name="standard">
      <style:graphic-properties draw:stroke="none" draw:fill="solid" draw:fill-color="#dadada" draw:textarea-horizontal-align="left" draw:textarea-vertical-align="top" draw:auto-grow-height="false" fo:min-height="0.088cm" fo:min-width="0.069cm" fo:padding-top="0.13cm" fo:padding-bottom="0.13cm" fo:padding-left="0.25cm" fo:padding-right="0.25cm" fo:wrap-option="wrap" draw:shadow-color="#5e574e" loext:decorative="false"/>
    </style:style>
    <style:style style:name="gr373" style:family="graphic" style:parent-style-name="standard">
      <style:graphic-properties draw:stroke="none" draw:fill="solid" draw:fill-color="#676767" draw:textarea-horizontal-align="left" draw:textarea-vertical-align="top" draw:auto-grow-height="false" fo:min-height="0.155cm" fo:min-width="0cm" fo:padding-top="0.13cm" fo:padding-bottom="0.13cm" fo:padding-left="0.25cm" fo:padding-right="0.25cm" fo:wrap-option="wrap" draw:shadow-color="#5e574e" loext:decorative="false"/>
    </style:style>
    <style:style style:name="gr374" style:family="graphic" style:parent-style-name="standard">
      <style:graphic-properties draw:stroke="none" draw:fill="solid" draw:fill-color="#5e574e" draw:textarea-horizontal-align="left" draw:textarea-vertical-align="top" draw:auto-grow-height="false" fo:min-height="0.203cm" fo:min-width="0cm" fo:padding-top="0.13cm" fo:padding-bottom="0.13cm" fo:padding-left="0.25cm" fo:padding-right="0.25cm" fo:wrap-option="wrap" draw:shadow-color="#5e574e" loext:decorative="false"/>
    </style:style>
    <style:style style:name="gr375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071cm" fo:min-width="0cm" fo:padding-top="0.13cm" fo:padding-bottom="0.13cm" fo:padding-left="0.25cm" fo:padding-right="0.25cm" fo:wrap-option="wrap" draw:shadow-color="#5e574e" loext:decorative="false"/>
    </style:style>
    <style:style style:name="gr376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62cm" fo:min-width="0cm" fo:padding-top="0.13cm" fo:padding-bottom="0.13cm" fo:padding-left="0.25cm" fo:padding-right="0.25cm" fo:wrap-option="wrap" draw:shadow-color="#5e574e" loext:decorative="false"/>
    </style:style>
    <style:style style:name="gr377" style:family="graphic" style:parent-style-name="standard">
      <style:graphic-properties draw:stroke="none" draw:fill="solid" draw:fill-color="#5e574e" draw:textarea-horizontal-align="left" draw:textarea-vertical-align="top" draw:auto-grow-height="false" fo:min-height="0.066cm" fo:min-width="0cm" fo:padding-top="0.13cm" fo:padding-bottom="0.13cm" fo:padding-left="0.25cm" fo:padding-right="0.25cm" fo:wrap-option="wrap" draw:shadow-color="#5e574e" loext:decorative="false"/>
    </style:style>
    <style:style style:name="gr378" style:family="graphic" style:parent-style-name="standard">
      <style:graphic-properties draw:stroke="none" draw:fill="solid" draw:fill-color="#919191" draw:textarea-horizontal-align="left" draw:textarea-vertical-align="top" draw:auto-grow-height="false" fo:min-height="0.08cm" fo:min-width="0cm" fo:padding-top="0.13cm" fo:padding-bottom="0.13cm" fo:padding-left="0.25cm" fo:padding-right="0.25cm" fo:wrap-option="wrap" draw:shadow-color="#5e574e" loext:decorative="false"/>
    </style:style>
    <style:style style:name="gr379" style:family="graphic" style:parent-style-name="standard">
      <style:graphic-properties draw:stroke="none" draw:fill="solid" draw:fill-color="#808000" draw:textarea-horizontal-align="left" draw:textarea-vertical-align="top" draw:auto-grow-height="false" fo:min-height="0.106cm" fo:min-width="0.126cm" fo:padding-top="0.13cm" fo:padding-bottom="0.13cm" fo:padding-left="0.25cm" fo:padding-right="0.25cm" fo:wrap-option="wrap" draw:shadow-color="#5e574e" loext:decorative="false"/>
    </style:style>
    <style:style style:name="gr380" style:family="graphic" style:parent-style-name="standard">
      <style:graphic-properties draw:stroke="none" draw:fill="solid" draw:fill-color="#5e574e" draw:textarea-horizontal-align="left" draw:textarea-vertical-align="top" draw:auto-grow-height="false" fo:min-height="0.088cm" fo:min-width="0cm" fo:padding-top="0.13cm" fo:padding-bottom="0.13cm" fo:padding-left="0.25cm" fo:padding-right="0.25cm" fo:wrap-option="wrap" draw:shadow-color="#5e574e" loext:decorative="false"/>
    </style:style>
    <style:style style:name="gr381" style:family="graphic" style:parent-style-name="standard">
      <style:graphic-properties draw:stroke="none" draw:fill="solid" draw:fill-color="#808000" draw:textarea-horizontal-align="left" draw:textarea-vertical-align="top" draw:auto-grow-height="false" fo:min-height="0.111cm" fo:min-width="0.118cm" fo:padding-top="0.13cm" fo:padding-bottom="0.13cm" fo:padding-left="0.25cm" fo:padding-right="0.25cm" fo:wrap-option="wrap" draw:shadow-color="#5e574e" loext:decorative="false"/>
    </style:style>
    <style:style style:name="gr382" style:family="graphic" style:parent-style-name="standard">
      <style:graphic-properties draw:stroke="none" draw:fill="solid" draw:fill-color="#dadada" draw:textarea-horizontal-align="left" draw:textarea-vertical-align="top" draw:auto-grow-height="false" fo:min-height="0.084cm" fo:min-width="0.065cm" fo:padding-top="0.13cm" fo:padding-bottom="0.13cm" fo:padding-left="0.25cm" fo:padding-right="0.25cm" fo:wrap-option="wrap" draw:shadow-color="#5e574e" loext:decorative="false"/>
    </style:style>
    <style:style style:name="gr383" style:family="graphic" style:parent-style-name="standard">
      <style:graphic-properties draw:stroke="none" draw:fill="solid" draw:fill-color="#676767" draw:textarea-horizontal-align="left" draw:textarea-vertical-align="top" draw:auto-grow-height="false" fo:min-height="0.15cm" fo:min-width="0cm" fo:padding-top="0.13cm" fo:padding-bottom="0.13cm" fo:padding-left="0.25cm" fo:padding-right="0.25cm" fo:wrap-option="wrap" draw:shadow-color="#5e574e" loext:decorative="false"/>
    </style:style>
    <style:style style:name="gr384" style:family="graphic" style:parent-style-name="standard">
      <style:graphic-properties draw:stroke="none" draw:fill="solid" draw:fill-color="#5e574e" draw:textarea-horizontal-align="left" draw:textarea-vertical-align="top" draw:auto-grow-height="false" fo:min-height="0.198cm" fo:min-width="0cm" fo:padding-top="0.13cm" fo:padding-bottom="0.13cm" fo:padding-left="0.25cm" fo:padding-right="0.25cm" fo:wrap-option="wrap" draw:shadow-color="#5e574e" loext:decorative="false"/>
    </style:style>
    <style:style style:name="gr385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076cm" fo:min-width="0cm" fo:padding-top="0.13cm" fo:padding-bottom="0.13cm" fo:padding-left="0.25cm" fo:padding-right="0.25cm" fo:wrap-option="wrap" draw:shadow-color="#5e574e" loext:decorative="false"/>
    </style:style>
    <style:style style:name="gr386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67cm" fo:min-width="0cm" fo:padding-top="0.13cm" fo:padding-bottom="0.13cm" fo:padding-left="0.25cm" fo:padding-right="0.25cm" fo:wrap-option="wrap" draw:shadow-color="#5e574e" loext:decorative="false"/>
    </style:style>
    <style:style style:name="gr387" style:family="graphic" style:parent-style-name="standard">
      <style:graphic-properties draw:stroke="none" draw:fill="solid" draw:fill-color="#5e574e" draw:textarea-horizontal-align="left" draw:textarea-vertical-align="top" draw:auto-grow-height="false" fo:min-height="0.067cm" fo:min-width="0cm" fo:padding-top="0.13cm" fo:padding-bottom="0.13cm" fo:padding-left="0.25cm" fo:padding-right="0.25cm" fo:wrap-option="wrap" draw:shadow-color="#5e574e" loext:decorative="false"/>
    </style:style>
    <style:style style:name="gr388" style:family="graphic" style:parent-style-name="standard">
      <style:graphic-properties draw:stroke="none" draw:fill="solid" draw:fill-color="#919191" draw:textarea-horizontal-align="left" draw:textarea-vertical-align="top" draw:auto-grow-height="false" fo:min-height="0.089cm" fo:min-width="0cm" fo:padding-top="0.13cm" fo:padding-bottom="0.13cm" fo:padding-left="0.25cm" fo:padding-right="0.25cm" fo:wrap-option="wrap" draw:shadow-color="#5e574e" loext:decorative="false"/>
    </style:style>
    <style:style style:name="gr389" style:family="graphic" style:parent-style-name="standard">
      <style:graphic-properties draw:stroke="none" draw:fill="solid" draw:fill-color="#aaaaaa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0" style:family="graphic" style:parent-style-name="standard">
      <style:graphic-properties draw:stroke="none" draw:fill="solid" draw:fill-color="#fcfcf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1" style:family="graphic" style:parent-style-name="standard">
      <style:graphic-properties draw:stroke="none" draw:fill="solid" draw:fill-color="#fdfdfd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2" style:family="graphic" style:parent-style-name="standard">
      <style:graphic-properties draw:stroke="none" draw:fill="solid" draw:fill-color="#fefefe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3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4" style:family="graphic" style:parent-style-name="standard">
      <style:graphic-properties draw:stroke="solid" svg:stroke-width="0.035cm" svg:stroke-color="#000000" draw:stroke-linejoin="miter" draw:fill="solid" draw:fill-color="#cecece" draw:textarea-horizontal-align="left" draw:textarea-vertical-align="middle" draw:auto-grow-height="false" fo:min-height="0.697cm" fo:min-width="0cm" fo:padding-top="0.13cm" fo:padding-bottom="0.13cm" fo:padding-left="0.25cm" fo:padding-right="0.25cm" fo:wrap-option="no-wrap" draw:shadow-color="#5e574e" loext:decorative="false"/>
    </style:style>
    <style:style style:name="gr395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6" style:family="graphic" style:parent-style-name="standard">
      <style:graphic-properties draw:stroke="none" draw:fill="solid" draw:fill-color="#c7c7c7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7" style:family="graphic" style:parent-style-name="standard">
      <style:graphic-properties draw:stroke="none" draw:fill="solid" draw:fill-color="#e3e3e3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398" style:family="graphic" style:parent-style-name="standard">
      <style:graphic-properties draw:stroke="none" draw:fill="solid" draw:fill-color="#676767" draw:textarea-horizontal-align="left" draw:textarea-vertical-align="top" draw:auto-grow-height="false" fo:min-height="0.092cm" fo:min-width="0cm" fo:padding-top="0.13cm" fo:padding-bottom="0.13cm" fo:padding-left="0.25cm" fo:padding-right="0.25cm" fo:wrap-option="wrap" draw:shadow-color="#5e574e" loext:decorative="false"/>
    </style:style>
    <style:style style:name="gr399" style:family="graphic" style:parent-style-name="standard">
      <style:graphic-properties draw:stroke="none" draw:fill="solid" draw:fill-color="#5e574e" draw:textarea-horizontal-align="left" draw:textarea-vertical-align="top" draw:auto-grow-height="false" fo:min-height="0.22cm" fo:min-width="0.016cm" fo:padding-top="0.13cm" fo:padding-bottom="0.13cm" fo:padding-left="0.25cm" fo:padding-right="0.25cm" fo:wrap-option="wrap" draw:shadow-color="#5e574e" loext:decorative="false"/>
    </style:style>
    <style:style style:name="gr400" style:family="graphic" style:parent-style-name="standard">
      <style:graphic-properties draw:stroke="none" draw:fill="solid" draw:fill-color="#808000" draw:textarea-horizontal-align="left" draw:textarea-vertical-align="top" draw:auto-grow-height="false" fo:min-height="0.256cm" fo:min-width="0.373cm" fo:padding-top="0.13cm" fo:padding-bottom="0.13cm" fo:padding-left="0.25cm" fo:padding-right="0.25cm" fo:wrap-option="wrap" draw:shadow-color="#5e574e" loext:decorative="false"/>
    </style:style>
    <style:style style:name="gr401" style:family="graphic" style:parent-style-name="standard">
      <style:graphic-properties draw:stroke="none" draw:fill="solid" draw:fill-color="#dadada" draw:textarea-horizontal-align="left" draw:textarea-vertical-align="top" draw:auto-grow-height="false" fo:min-height="0.225cm" fo:min-width="0.307cm" fo:padding-top="0.13cm" fo:padding-bottom="0.13cm" fo:padding-left="0.25cm" fo:padding-right="0.25cm" fo:wrap-option="wrap" draw:shadow-color="#5e574e" loext:decorative="false"/>
    </style:style>
    <style:style style:name="gr402" style:family="graphic" style:parent-style-name="standard">
      <style:graphic-properties draw:stroke="none" draw:fill="solid" draw:fill-color="#676767" draw:textarea-horizontal-align="left" draw:textarea-vertical-align="top" draw:auto-grow-height="false" fo:min-height="0.318cm" fo:min-width="0cm" fo:padding-top="0.13cm" fo:padding-bottom="0.13cm" fo:padding-left="0.25cm" fo:padding-right="0.25cm" fo:wrap-option="wrap" draw:shadow-color="#5e574e" loext:decorative="false"/>
    </style:style>
    <style:style style:name="gr403" style:family="graphic" style:parent-style-name="standard">
      <style:graphic-properties draw:stroke="none" draw:fill="solid" draw:fill-color="#5e574e" draw:textarea-horizontal-align="left" draw:textarea-vertical-align="top" draw:auto-grow-height="false" fo:min-height="0.388cm" fo:min-width="0cm" fo:padding-top="0.13cm" fo:padding-bottom="0.13cm" fo:padding-left="0.25cm" fo:padding-right="0.25cm" fo:wrap-option="wrap" draw:shadow-color="#5e574e" loext:decorative="false"/>
    </style:style>
    <style:style style:name="gr404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207cm" fo:min-width="0cm" fo:padding-top="0.13cm" fo:padding-bottom="0.13cm" fo:padding-left="0.25cm" fo:padding-right="0.25cm" fo:wrap-option="wrap" draw:shadow-color="#5e574e" loext:decorative="false"/>
    </style:style>
    <style:style style:name="gr405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94cm" fo:min-width="0cm" fo:padding-top="0.13cm" fo:padding-bottom="0.13cm" fo:padding-left="0.25cm" fo:padding-right="0.25cm" fo:wrap-option="wrap" draw:shadow-color="#5e574e" loext:decorative="false"/>
    </style:style>
    <style:style style:name="gr406" style:family="graphic" style:parent-style-name="standard">
      <style:graphic-properties draw:stroke="none" draw:fill="solid" draw:fill-color="#5e574e" draw:textarea-horizontal-align="left" draw:textarea-vertical-align="top" draw:auto-grow-height="false" fo:min-height="0.199cm" fo:min-width="0.201cm" fo:padding-top="0.13cm" fo:padding-bottom="0.13cm" fo:padding-left="0.25cm" fo:padding-right="0.25cm" fo:wrap-option="wrap" draw:shadow-color="#5e574e" loext:decorative="false"/>
    </style:style>
    <style:style style:name="gr407" style:family="graphic" style:parent-style-name="standard">
      <style:graphic-properties draw:stroke="none" draw:fill="solid" draw:fill-color="#919191" draw:textarea-horizontal-align="left" draw:textarea-vertical-align="top" draw:auto-grow-height="false" fo:min-height="0.212cm" fo:min-width="0.201cm" fo:padding-top="0.13cm" fo:padding-bottom="0.13cm" fo:padding-left="0.25cm" fo:padding-right="0.25cm" fo:wrap-option="wrap" draw:shadow-color="#5e574e" loext:decorative="false"/>
    </style:style>
    <style:style style:name="gr408" style:family="graphic" style:parent-style-name="standard">
      <style:graphic-properties draw:stroke="none" draw:fill="solid" draw:fill-color="#676767" draw:textarea-horizontal-align="left" draw:textarea-vertical-align="top" draw:auto-grow-height="false" fo:min-height="0.053cm" fo:min-width="0cm" fo:padding-top="0.13cm" fo:padding-bottom="0.13cm" fo:padding-left="0.25cm" fo:padding-right="0.25cm" fo:wrap-option="wrap" draw:shadow-color="#5e574e" loext:decorative="false"/>
    </style:style>
    <style:style style:name="gr409" style:family="graphic" style:parent-style-name="standard">
      <style:graphic-properties draw:stroke="none" draw:fill="solid" draw:fill-color="#808000" draw:textarea-horizontal-align="left" draw:textarea-vertical-align="top" draw:auto-grow-height="false" fo:min-height="0.062cm" fo:min-width="0cm" fo:padding-top="0.13cm" fo:padding-bottom="0.13cm" fo:padding-left="0.25cm" fo:padding-right="0.25cm" fo:wrap-option="wrap" draw:shadow-color="#5e574e" loext:decorative="false"/>
    </style:style>
    <style:style style:name="gr410" style:family="graphic" style:parent-style-name="standard">
      <style:graphic-properties draw:stroke="none" draw:fill="solid" draw:fill-color="#808000" draw:textarea-horizontal-align="left" draw:textarea-vertical-align="top" draw:auto-grow-height="false" fo:min-height="0.256cm" fo:min-width="0.387cm" fo:padding-top="0.13cm" fo:padding-bottom="0.13cm" fo:padding-left="0.25cm" fo:padding-right="0.25cm" fo:wrap-option="wrap" draw:shadow-color="#5e574e" loext:decorative="false"/>
    </style:style>
    <style:style style:name="gr411" style:family="graphic" style:parent-style-name="standard">
      <style:graphic-properties draw:stroke="none" draw:fill="solid" draw:fill-color="#676767" draw:textarea-horizontal-align="left" draw:textarea-vertical-align="top" draw:auto-grow-height="false" fo:min-height="0.097cm" fo:min-width="0cm" fo:padding-top="0.13cm" fo:padding-bottom="0.13cm" fo:padding-left="0.25cm" fo:padding-right="0.25cm" fo:wrap-option="wrap" draw:shadow-color="#5e574e" loext:decorative="false"/>
    </style:style>
    <style:style style:name="gr412" style:family="graphic" style:parent-style-name="standard">
      <style:graphic-properties draw:stroke="none" draw:fill="solid" draw:fill-color="#5e574e" draw:textarea-horizontal-align="left" draw:textarea-vertical-align="top" draw:auto-grow-height="false" fo:min-height="0.225cm" fo:min-width="0.021cm" fo:padding-top="0.13cm" fo:padding-bottom="0.13cm" fo:padding-left="0.25cm" fo:padding-right="0.25cm" fo:wrap-option="wrap" draw:shadow-color="#5e574e" loext:decorative="false"/>
    </style:style>
    <style:style style:name="gr413" style:family="graphic" style:parent-style-name="standard">
      <style:graphic-properties draw:stroke="none" draw:fill="solid" draw:fill-color="#808000" draw:textarea-horizontal-align="left" draw:textarea-vertical-align="top" draw:auto-grow-height="false" fo:min-height="0.256cm" fo:min-width="0.377cm" fo:padding-top="0.13cm" fo:padding-bottom="0.13cm" fo:padding-left="0.25cm" fo:padding-right="0.25cm" fo:wrap-option="wrap" draw:shadow-color="#5e574e" loext:decorative="false"/>
    </style:style>
    <style:style style:name="gr414" style:family="graphic" style:parent-style-name="standard">
      <style:graphic-properties draw:stroke="none" draw:fill="solid" draw:fill-color="#dadada" draw:textarea-horizontal-align="left" draw:textarea-vertical-align="top" draw:auto-grow-height="false" fo:min-height="0.221cm" fo:min-width="0.298cm" fo:padding-top="0.13cm" fo:padding-bottom="0.13cm" fo:padding-left="0.25cm" fo:padding-right="0.25cm" fo:wrap-option="wrap" draw:shadow-color="#5e574e" loext:decorative="false"/>
    </style:style>
    <style:style style:name="gr415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212cm" fo:min-width="0cm" fo:padding-top="0.13cm" fo:padding-bottom="0.13cm" fo:padding-left="0.25cm" fo:padding-right="0.25cm" fo:wrap-option="wrap" draw:shadow-color="#5e574e" loext:decorative="false"/>
    </style:style>
    <style:style style:name="gr416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99cm" fo:min-width="0cm" fo:padding-top="0.13cm" fo:padding-bottom="0.13cm" fo:padding-left="0.25cm" fo:padding-right="0.25cm" fo:wrap-option="wrap" draw:shadow-color="#5e574e" loext:decorative="false"/>
    </style:style>
    <style:style style:name="gr417" style:family="graphic" style:parent-style-name="standard">
      <style:graphic-properties draw:stroke="none" draw:fill="solid" draw:fill-color="#5e574e" draw:textarea-horizontal-align="left" draw:textarea-vertical-align="top" draw:auto-grow-height="false" fo:min-height="0.194cm" fo:min-width="0.192cm" fo:padding-top="0.13cm" fo:padding-bottom="0.13cm" fo:padding-left="0.25cm" fo:padding-right="0.25cm" fo:wrap-option="wrap" draw:shadow-color="#5e574e" loext:decorative="false"/>
    </style:style>
    <style:style style:name="gr418" style:family="graphic" style:parent-style-name="standard">
      <style:graphic-properties draw:stroke="none" draw:fill="solid" draw:fill-color="#919191" draw:textarea-horizontal-align="left" draw:textarea-vertical-align="top" draw:auto-grow-height="false" fo:min-height="0.225cm" fo:min-width="0.188cm" fo:padding-top="0.13cm" fo:padding-bottom="0.13cm" fo:padding-left="0.25cm" fo:padding-right="0.25cm" fo:wrap-option="wrap" draw:shadow-color="#5e574e" loext:decorative="false"/>
    </style:style>
    <style:style style:name="gr419" style:family="graphic" style:parent-style-name="standard">
      <style:graphic-properties draw:stroke="none" draw:fill="solid" draw:fill-color="#808000" draw:textarea-horizontal-align="left" draw:textarea-vertical-align="top" draw:auto-grow-height="false" fo:min-height="0.057cm" fo:min-width="0cm" fo:padding-top="0.13cm" fo:padding-bottom="0.13cm" fo:padding-left="0.25cm" fo:padding-right="0.25cm" fo:wrap-option="wrap" draw:shadow-color="#5e574e" loext:decorative="false"/>
    </style:style>
    <style:style style:name="gr420" style:family="graphic" style:parent-style-name="standard">
      <style:graphic-properties draw:stroke="solid" svg:stroke-width="0.035cm" svg:stroke-color="#000000" draw:stroke-linejoin="miter" draw:fill="solid" draw:fill-color="#cecece" draw:textarea-horizontal-align="left" draw:textarea-vertical-align="middle" draw:auto-grow-height="false" fo:min-height="1.102cm" fo:min-width="0cm" fo:padding-top="0.13cm" fo:padding-bottom="0.13cm" fo:padding-left="0.25cm" fo:padding-right="0.25cm" fo:wrap-option="no-wrap" draw:shadow-color="#5e574e" loext:decorative="false"/>
    </style:style>
    <style:style style:name="gr421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82cm" fo:padding-top="0.13cm" fo:padding-bottom="0.13cm" fo:padding-left="0.25cm" fo:padding-right="0.25cm" fo:wrap-option="no-wrap" draw:shadow-color="#5e574e" loext:decorative="false"/>
    </style:style>
    <style:style style:name="gr422" style:family="graphic" style:parent-style-name="standard">
      <style:graphic-properties draw:stroke="none" draw:fill="solid" draw:fill-color="#ff6600" draw:textarea-horizontal-align="left" draw:textarea-vertical-align="middle" draw:auto-grow-height="false" fo:min-height="1.187cm" fo:min-width="3.826cm" fo:padding-top="0.13cm" fo:padding-bottom="0.13cm" fo:padding-left="0.25cm" fo:padding-right="0.25cm" fo:wrap-option="no-wrap" draw:shadow="visible" draw:shadow-offset-x="0.212cm" draw:shadow-offset-y="0.212cm" draw:shadow-color="#5e574e" loext:decorative="false"/>
    </style:style>
    <style:style style:name="gr423" style:family="graphic" style:parent-style-name="standard" style:list-style-name="L5">
      <style:graphic-properties draw:stroke="none" draw:fill="solid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="visible" draw:shadow-offset-x="0.212cm" draw:shadow-offset-y="0.212cm" draw:shadow-color="#5e574e" loext:decorative="false"/>
      <style:paragraph-properties style:writing-mode="lr-tb"/>
    </style:style>
    <style:style style:name="gr424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425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26" style:family="graphic" style:parent-style-name="standard">
      <style:graphic-properties draw:stroke="solid" svg:stroke-width="0.071cm" svg:stroke-color="#000000" draw:marker-start="" draw:marker-start-width="0.142cm" draw:marker-start-center="false" draw:marker-end="" draw:marker-end-width="0.142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44cm" fo:min-width="1.246cm" fo:padding-top="0.13cm" fo:padding-bottom="0.13cm" fo:padding-left="0.25cm" fo:padding-right="0.25cm" fo:wrap-option="wrap" draw:shadow-color="#5e574e" loext:decorative="false"/>
    </style:style>
    <style:style style:name="gr427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428" style:family="graphic" style:parent-style-name="standard">
      <style:graphic-properties draw:stroke="none" draw:fill="solid" draw:fill-color="#5e574e" draw:textarea-horizontal-align="left" draw:textarea-vertical-align="top" draw:auto-grow-height="false" fo:min-height="0.093cm" fo:min-width="0cm" fo:padding-top="0.13cm" fo:padding-bottom="0.13cm" fo:padding-left="0.25cm" fo:padding-right="0.25cm" fo:wrap-option="wrap" draw:shadow-color="#5e574e" loext:decorative="false"/>
    </style:style>
    <style:style style:name="gr429" style:family="graphic" style:parent-style-name="standard">
      <style:graphic-properties draw:stroke="none" draw:fill="solid" draw:fill-color="#808000" draw:textarea-horizontal-align="left" draw:textarea-vertical-align="top" draw:auto-grow-height="false" fo:min-height="0.111cm" fo:min-width="0.183cm" fo:padding-top="0.13cm" fo:padding-bottom="0.13cm" fo:padding-left="0.25cm" fo:padding-right="0.25cm" fo:wrap-option="wrap" draw:shadow-color="#5e574e" loext:decorative="false"/>
    </style:style>
    <style:style style:name="gr430" style:family="graphic" style:parent-style-name="standard">
      <style:graphic-properties draw:stroke="none" draw:fill="solid" draw:fill-color="#dadada" draw:textarea-horizontal-align="left" draw:textarea-vertical-align="top" draw:auto-grow-height="false" fo:min-height="0.087cm" fo:min-width="0.121cm" fo:padding-top="0.13cm" fo:padding-bottom="0.13cm" fo:padding-left="0.25cm" fo:padding-right="0.25cm" fo:wrap-option="wrap" draw:shadow-color="#5e574e" loext:decorative="false"/>
    </style:style>
    <style:style style:name="gr431" style:family="graphic" style:parent-style-name="standard">
      <style:graphic-properties draw:stroke="none" draw:fill="solid" draw:fill-color="#676767" draw:textarea-horizontal-align="left" draw:textarea-vertical-align="top" draw:auto-grow-height="false" fo:min-height="0.161cm" fo:min-width="0cm" fo:padding-top="0.13cm" fo:padding-bottom="0.13cm" fo:padding-left="0.25cm" fo:padding-right="0.25cm" fo:wrap-option="wrap" draw:shadow-color="#5e574e" loext:decorative="false"/>
    </style:style>
    <style:style style:name="gr432" style:family="graphic" style:parent-style-name="standard">
      <style:graphic-properties draw:stroke="none" draw:fill="solid" draw:fill-color="#5e574e" draw:textarea-horizontal-align="left" draw:textarea-vertical-align="top" draw:auto-grow-height="false" fo:min-height="0.207cm" fo:min-width="0cm" fo:padding-top="0.13cm" fo:padding-bottom="0.13cm" fo:padding-left="0.25cm" fo:padding-right="0.25cm" fo:wrap-option="wrap" draw:shadow-color="#5e574e" loext:decorative="false"/>
    </style:style>
    <style:style style:name="gr433" style:family="graphic" style:parent-style-name="standard">
      <style:graphic-properties draw:stroke="none" draw:fill="gradient" draw:fill-color="#114ffb" draw:fill-gradient-name="Gradient_20_7" draw:textarea-horizontal-align="left" draw:textarea-vertical-align="top" draw:auto-grow-height="false" fo:min-height="0.077cm" fo:min-width="0cm" fo:padding-top="0.13cm" fo:padding-bottom="0.13cm" fo:padding-left="0.25cm" fo:padding-right="0.25cm" fo:wrap-option="wrap" draw:shadow-color="#5e574e" loext:decorative="false"/>
    </style:style>
    <style:style style:name="gr434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69cm" fo:min-width="0cm" fo:padding-top="0.13cm" fo:padding-bottom="0.13cm" fo:padding-left="0.25cm" fo:padding-right="0.25cm" fo:wrap-option="wrap" draw:shadow-color="#5e574e" loext:decorative="false"/>
    </style:style>
    <style:style style:name="gr435" style:family="graphic" style:parent-style-name="standard">
      <style:graphic-properties draw:stroke="none" draw:fill="solid" draw:fill-color="#5e574e" draw:textarea-horizontal-align="left" draw:textarea-vertical-align="top" draw:auto-grow-height="false" fo:min-height="0.064cm" fo:min-width="0.039cm" fo:padding-top="0.13cm" fo:padding-bottom="0.13cm" fo:padding-left="0.25cm" fo:padding-right="0.25cm" fo:wrap-option="wrap" draw:shadow-color="#5e574e" loext:decorative="false"/>
    </style:style>
    <style:style style:name="gr436" style:family="graphic" style:parent-style-name="standard">
      <style:graphic-properties draw:stroke="none" draw:fill="solid" draw:fill-color="#919191" draw:textarea-horizontal-align="left" draw:textarea-vertical-align="top" draw:auto-grow-height="false" fo:min-height="0.084cm" fo:min-width="0.037cm" fo:padding-top="0.13cm" fo:padding-bottom="0.13cm" fo:padding-left="0.25cm" fo:padding-right="0.25cm" fo:wrap-option="wrap" draw:shadow-color="#5e574e" loext:decorative="false"/>
    </style:style>
    <style:style style:name="gr437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e574e" loext:decorative="false"/>
      <style:paragraph-properties style:writing-mode="lr-tb"/>
    </style:style>
    <style:style style:name="gr438" style:family="graphic" style:parent-style-name="standard">
      <style:graphic-properties draw:stroke="none" draw:fill="solid" draw:fill-color="#dadada" draw:textarea-horizontal-align="left" draw:textarea-vertical-align="top" draw:auto-grow-height="false" fo:min-height="0.087cm" fo:min-width="0.122cm" fo:padding-top="0.13cm" fo:padding-bottom="0.13cm" fo:padding-left="0.25cm" fo:padding-right="0.25cm" fo:wrap-option="wrap" draw:shadow-color="#5e574e" loext:decorative="false"/>
    </style:style>
    <style:style style:name="gr439" style:family="graphic" style:parent-style-name="standard">
      <style:graphic-properties draw:stroke="none" draw:fill="solid" draw:fill-color="#5e574e" draw:textarea-horizontal-align="left" draw:textarea-vertical-align="top" draw:auto-grow-height="false" fo:min-height="0.064cm" fo:min-width="0.04cm" fo:padding-top="0.13cm" fo:padding-bottom="0.13cm" fo:padding-left="0.25cm" fo:padding-right="0.25cm" fo:wrap-option="wrap" draw:shadow-color="#5e574e" loext:decorative="false"/>
    </style:style>
    <style:style style:name="gr440" style:family="graphic" style:parent-style-name="standard">
      <style:graphic-properties draw:stroke="solid" svg:stroke-width="0.141cm" svg:stroke-color="#ff6600" draw:stroke-linejoin="miter" draw:fill="none" draw:fill-color="#ff6600" draw:textarea-horizontal-align="left" draw:textarea-vertical-align="middle" draw:auto-grow-height="false" fo:min-height="1.885cm" fo:min-width="7.033cm" fo:padding-top="0.13cm" fo:padding-bottom="0.13cm" fo:padding-left="0.25cm" fo:padding-right="0.25cm" fo:wrap-option="no-wrap" draw:shadow-color="#5e574e" loext:decorative="false"/>
    </style:style>
    <style:style style:name="gr441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5.348cm" draw:visible-area-height="9.392cm" draw:ole-draw-aspect="1" loext:decorative="false"/>
    </style:style>
    <style:style style:name="gr442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0.465cm" fo:min-width="1.421cm" fo:padding-top="0.13cm" fo:padding-bottom="0.13cm" fo:padding-left="0.25cm" fo:padding-right="0.25cm" fo:wrap-option="no-wrap" draw:shadow-color="#5e574e" loext:decorative="false"/>
    </style:style>
    <style:style style:name="gr443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0.465cm" fo:min-width="1.422cm" fo:padding-top="0.13cm" fo:padding-bottom="0.13cm" fo:padding-left="0.25cm" fo:padding-right="0.25cm" fo:wrap-option="no-wrap" draw:shadow-color="#5e574e" loext:decorative="false"/>
    </style:style>
    <style:style style:name="gr444" style:family="graphic" style:parent-style-name="standard" style:list-style-name="L19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445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1.284cm" fo:min-width="8.584cm" fo:padding-top="0.13cm" fo:padding-bottom="0.13cm" fo:padding-left="0.25cm" fo:padding-right="0.25cm" fo:wrap-option="no-wrap" draw:shadow-color="#5e574e" loext:decorative="false"/>
    </style:style>
    <style:style style:name="gr446" style:family="graphic" style:parent-style-name="standard">
      <style:graphic-properties draw:stroke="solid" svg:stroke-width="0.035cm" svg:stroke-color="#000000" draw:stroke-linejoin="miter" draw:fill="solid" draw:fill-color="#00b7a5" draw:textarea-horizontal-align="left" draw:textarea-vertical-align="middle" draw:auto-grow-height="false" fo:min-height="0cm" fo:min-width="4.121cm" fo:padding-top="0.13cm" fo:padding-bottom="0.13cm" fo:padding-left="0.25cm" fo:padding-right="0.25cm" fo:wrap-option="no-wrap" draw:shadow-color="#5e574e" loext:decorative="false"/>
    </style:style>
    <style:style style:name="gr447" style:family="graphic" style:parent-style-name="standard">
      <style:graphic-properties draw:stroke="none" draw:fill="solid" draw:fill-color="#00b7a5" draw:textarea-horizontal-align="left" draw:textarea-vertical-align="middle" draw:auto-grow-height="false" fo:min-height="0.692cm" fo:min-width="6.07cm" fo:padding-top="0.13cm" fo:padding-bottom="0.13cm" fo:padding-left="0.25cm" fo:padding-right="0.25cm" fo:wrap-option="no-wrap" draw:shadow-color="#5e574e" loext:decorative="false"/>
    </style:style>
    <style:style style:name="gr448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811cm" fo:min-width="8.584cm" fo:padding-top="0.13cm" fo:padding-bottom="0.13cm" fo:padding-left="0.25cm" fo:padding-right="0.25cm" fo:wrap-option="no-wrap" draw:shadow-color="#5e574e" loext:decorative="false"/>
    </style:style>
    <style:style style:name="gr449" style:family="graphic" style:parent-style-name="standard">
      <style:graphic-properties draw:stroke="solid" svg:stroke-width="0.035cm" svg:stroke-color="#000000" draw:stroke-linejoin="miter" draw:fill="solid" draw:fill-color="#00ae00" draw:textarea-horizontal-align="left" draw:textarea-vertical-align="middle" draw:auto-grow-height="false" fo:min-height="0cm" fo:min-width="0.634cm" fo:padding-top="0.13cm" fo:padding-bottom="0.13cm" fo:padding-left="0.25cm" fo:padding-right="0.25cm" fo:wrap-option="no-wrap" draw:shadow-color="#5e574e" loext:decorative="false"/>
    </style:style>
    <style:style style:name="gr450" style:family="graphic" style:parent-style-name="standard">
      <style:graphic-properties draw:stroke="none" draw:fill="solid" draw:fill-color="#00ae00" draw:textarea-horizontal-align="left" draw:textarea-vertical-align="middle" draw:auto-grow-height="false" fo:min-height="0.418cm" fo:min-width="1.14cm" fo:padding-top="0.13cm" fo:padding-bottom="0.13cm" fo:padding-left="0.25cm" fo:padding-right="0.25cm" fo:wrap-option="no-wrap" draw:shadow-color="#5e574e" loext:decorative="false"/>
    </style:style>
    <style:style style:name="gr451" style:family="graphic" style:parent-style-name="standard">
      <style:graphic-properties draw:stroke="solid" svg:stroke-width="0.035cm" svg:stroke-color="#000000" draw:stroke-linejoin="miter" draw:fill="solid" draw:fill-color="#00ae00" draw:textarea-horizontal-align="left" draw:textarea-vertical-align="middle" draw:auto-grow-height="false" fo:min-height="0cm" fo:min-width="0.633cm" fo:padding-top="0.13cm" fo:padding-bottom="0.13cm" fo:padding-left="0.25cm" fo:padding-right="0.25cm" fo:wrap-option="no-wrap" draw:shadow-color="#5e574e" loext:decorative="false"/>
    </style:style>
    <style:style style:name="gr452" style:family="graphic" style:parent-style-name="standard">
      <style:graphic-properties draw:stroke="none" draw:fill="solid" draw:fill-color="#00ae00" draw:textarea-horizontal-align="left" draw:textarea-vertical-align="middle" draw:auto-grow-height="false" fo:min-height="0.418cm" fo:min-width="1.137cm" fo:padding-top="0.13cm" fo:padding-bottom="0.13cm" fo:padding-left="0.25cm" fo:padding-right="0.25cm" fo:wrap-option="no-wrap" draw:shadow-color="#5e574e" loext:decorative="false"/>
    </style:style>
    <style:style style:name="gr453" style:family="graphic" style:parent-style-name="standard">
      <style:graphic-properties draw:stroke="solid" svg:stroke-width="0.035cm" svg:stroke-color="#000000" draw:stroke-linejoin="miter" draw:fill="solid" draw:fill-color="#00ae00" draw:textarea-horizontal-align="left" draw:textarea-vertical-align="middle" draw:auto-grow-height="false" fo:min-height="0cm" fo:min-width="0.635cm" fo:padding-top="0.13cm" fo:padding-bottom="0.13cm" fo:padding-left="0.25cm" fo:padding-right="0.25cm" fo:wrap-option="no-wrap" draw:shadow-color="#5e574e" loext:decorative="false"/>
    </style:style>
    <style:style style:name="gr454" style:family="graphic" style:parent-style-name="standard">
      <style:graphic-properties draw:stroke="none" draw:fill="solid" draw:fill-color="#00ae00" draw:textarea-horizontal-align="left" draw:textarea-vertical-align="middle" draw:auto-grow-height="false" fo:min-height="0.418cm" fo:min-width="1.139cm" fo:padding-top="0.13cm" fo:padding-bottom="0.13cm" fo:padding-left="0.25cm" fo:padding-right="0.25cm" fo:wrap-option="no-wrap" draw:shadow-color="#5e574e" loext:decorative="false"/>
    </style:style>
    <style:style style:name="gr455" style:family="graphic" style:parent-style-name="standard">
      <style:graphic-properties draw:stroke="solid" svg:stroke-width="0.035cm" svg:stroke-color="#000000" draw:stroke-linejoin="miter" draw:fill="solid" draw:fill-color="#00ae00" draw:textarea-horizontal-align="left" draw:textarea-vertical-align="middle" draw:auto-grow-height="false" fo:min-height="0cm" fo:min-width="0.639cm" fo:padding-top="0.13cm" fo:padding-bottom="0.13cm" fo:padding-left="0.25cm" fo:padding-right="0.25cm" fo:wrap-option="no-wrap" draw:shadow-color="#5e574e" loext:decorative="false"/>
    </style:style>
    <style:style style:name="gr456" style:family="graphic" style:parent-style-name="standard">
      <style:graphic-properties draw:stroke="none" draw:fill="solid" draw:fill-color="#00ae00" draw:textarea-horizontal-align="left" draw:textarea-vertical-align="middle" draw:auto-grow-height="false" fo:min-height="0.418cm" fo:min-width="1.144cm" fo:padding-top="0.13cm" fo:padding-bottom="0.13cm" fo:padding-left="0.25cm" fo:padding-right="0.25cm" fo:wrap-option="no-wrap" draw:shadow-color="#5e574e" loext:decorative="false"/>
    </style:style>
    <style:style style:name="gr457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807cm" fo:min-width="8.584cm" fo:padding-top="0.13cm" fo:padding-bottom="0.13cm" fo:padding-left="0.25cm" fo:padding-right="0.25cm" fo:wrap-option="no-wrap" draw:shadow-color="#5e574e" loext:decorative="false"/>
    </style:style>
    <style:style style:name="gr458" style:family="graphic" style:parent-style-name="standard">
      <style:graphic-properties draw:stroke="solid" svg:stroke-width="0.035cm" svg:stroke-color="#000000" draw:stroke-linejoin="miter" draw:fill="solid" draw:fill-color="#ff6600" draw:textarea-horizontal-align="left" draw:textarea-vertical-align="middle" draw:auto-grow-height="false" fo:min-height="0cm" fo:min-width="0.688cm" fo:padding-top="0.13cm" fo:padding-bottom="0.13cm" fo:padding-left="0.25cm" fo:padding-right="0.25cm" fo:wrap-option="no-wrap" draw:shadow-color="#5e574e" loext:decorative="false"/>
    </style:style>
    <style:style style:name="gr459" style:family="graphic" style:parent-style-name="standard">
      <style:graphic-properties draw:stroke="none" draw:fill="solid" draw:fill-color="#ff6600" draw:textarea-horizontal-align="left" draw:textarea-vertical-align="middle" draw:auto-grow-height="false" fo:min-height="0.357cm" fo:min-width="1.214cm" fo:padding-top="0.13cm" fo:padding-bottom="0.13cm" fo:padding-left="0.25cm" fo:padding-right="0.25cm" fo:wrap-option="no-wrap" draw:shadow-color="#5e574e" loext:decorative="false"/>
    </style:style>
    <style:style style:name="gr460" style:family="graphic" style:parent-style-name="standard">
      <style:graphic-properties draw:stroke="solid" svg:stroke-width="0.035cm" svg:stroke-color="#000000" draw:stroke-linejoin="miter" draw:fill="solid" draw:fill-color="#ff6600" draw:textarea-horizontal-align="left" draw:textarea-vertical-align="middle" draw:auto-grow-height="false" fo:min-height="0cm" fo:min-width="0.684cm" fo:padding-top="0.13cm" fo:padding-bottom="0.13cm" fo:padding-left="0.25cm" fo:padding-right="0.25cm" fo:wrap-option="no-wrap" draw:shadow-color="#5e574e" loext:decorative="false"/>
    </style:style>
    <style:style style:name="gr461" style:family="graphic" style:parent-style-name="standard">
      <style:graphic-properties draw:stroke="none" draw:fill="solid" draw:fill-color="#ff6600" draw:textarea-horizontal-align="left" draw:textarea-vertical-align="middle" draw:auto-grow-height="false" fo:min-height="0.357cm" fo:min-width="1.209cm" fo:padding-top="0.13cm" fo:padding-bottom="0.13cm" fo:padding-left="0.25cm" fo:padding-right="0.25cm" fo:wrap-option="no-wrap" draw:shadow-color="#5e574e" loext:decorative="false"/>
    </style:style>
    <style:style style:name="gr462" style:family="graphic" style:parent-style-name="standard">
      <style:graphic-properties draw:stroke="solid" svg:stroke-width="0.035cm" svg:stroke-color="#000000" draw:stroke-linejoin="miter" draw:fill="solid" draw:fill-color="#ff6600" draw:textarea-horizontal-align="left" draw:textarea-vertical-align="middle" draw:auto-grow-height="false" fo:min-height="0cm" fo:min-width="0.818cm" fo:padding-top="0.13cm" fo:padding-bottom="0.13cm" fo:padding-left="0.25cm" fo:padding-right="0.25cm" fo:wrap-option="no-wrap" draw:shadow-color="#5e574e" loext:decorative="false"/>
    </style:style>
    <style:style style:name="gr463" style:family="graphic" style:parent-style-name="standard">
      <style:graphic-properties draw:stroke="none" draw:fill="solid" draw:fill-color="#ff6600" draw:textarea-horizontal-align="left" draw:textarea-vertical-align="middle" draw:auto-grow-height="false" fo:min-height="0.357cm" fo:min-width="1.4cm" fo:padding-top="0.13cm" fo:padding-bottom="0.13cm" fo:padding-left="0.25cm" fo:padding-right="0.25cm" fo:wrap-option="no-wrap" draw:shadow-color="#5e574e" loext:decorative="false"/>
    </style:style>
    <style:style style:name="gr464" style:family="graphic" style:parent-style-name="standard">
      <style:graphic-properties draw:stroke="solid" svg:stroke-width="0.035cm" svg:stroke-color="#000000" draw:stroke-linejoin="miter" draw:fill="solid" draw:fill-color="#fdc0e5" draw:textarea-horizontal-align="left" draw:textarea-vertical-align="middle" draw:auto-grow-height="false" fo:min-height="0cm" fo:min-width="0.684cm" fo:padding-top="0.13cm" fo:padding-bottom="0.13cm" fo:padding-left="0.25cm" fo:padding-right="0.25cm" fo:wrap-option="no-wrap" draw:shadow-color="#5e574e" loext:decorative="false"/>
    </style:style>
    <style:style style:name="gr465" style:family="graphic" style:parent-style-name="standard">
      <style:graphic-properties draw:stroke="none" draw:fill="solid" draw:fill-color="#fdc0e5" draw:textarea-horizontal-align="left" draw:textarea-vertical-align="middle" draw:auto-grow-height="false" fo:min-height="0.357cm" fo:min-width="1.209cm" fo:padding-top="0.13cm" fo:padding-bottom="0.13cm" fo:padding-left="0.25cm" fo:padding-right="0.25cm" fo:wrap-option="no-wrap" draw:shadow-color="#5e574e" loext:decorative="false"/>
    </style:style>
    <style:style style:name="gr466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965cm" fo:min-width="8.584cm" fo:padding-top="0.13cm" fo:padding-bottom="0.13cm" fo:padding-left="0.25cm" fo:padding-right="0.25cm" fo:wrap-option="no-wrap" draw:shadow-color="#5e574e" loext:decorative="false"/>
    </style:style>
    <style:style style:name="gr467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14.494cm" draw:visible-area-height="12.801cm" draw:ole-draw-aspect="1" loext:decorative="false"/>
    </style:style>
    <style:style style:name="gr468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19.257cm" draw:visible-area-height="10.724cm" draw:ole-draw-aspect="1" loext:decorative="false"/>
    </style:style>
    <style:style style:name="gr469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11.09cm" draw:visible-area-height="5.604cm" draw:ole-draw-aspect="1" loext:decorative="false"/>
    </style:style>
    <style:style style:name="gr470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969cm" fo:min-width="8.584cm" fo:padding-top="0.13cm" fo:padding-bottom="0.13cm" fo:padding-left="0.25cm" fo:padding-right="0.25cm" fo:wrap-option="no-wrap" draw:shadow-color="#5e574e" loext:decorative="false"/>
    </style:style>
    <style:style style:name="gr471" style:family="graphic" style:parent-style-name="standard">
      <style:graphic-properties draw:stroke="none" draw:fill="solid" draw:fill-color="#ff0000" draw:textarea-horizontal-align="left" draw:textarea-vertical-align="top" draw:auto-grow-height="false" fo:min-height="0.213cm" fo:min-width="0.168cm" fo:padding-top="0.13cm" fo:padding-bottom="0.13cm" fo:padding-left="0.25cm" fo:padding-right="0.25cm" fo:wrap-option="wrap" draw:shadow-color="#5e574e" loext:decorative="false"/>
    </style:style>
    <style:style style:name="gr472" style:family="graphic" style:parent-style-name="standard">
      <style:graphic-properties draw:stroke="none" draw:fill="solid" draw:fill-color="#ff0000" draw:textarea-horizontal-align="left" draw:textarea-vertical-align="top" draw:auto-grow-height="false" fo:min-height="0.179cm" fo:min-width="0.108cm" fo:padding-top="0.13cm" fo:padding-bottom="0.13cm" fo:padding-left="0.25cm" fo:padding-right="0.25cm" fo:wrap-option="wrap" draw:shadow-color="#5e574e" loext:decorative="false"/>
    </style:style>
    <style:style style:name="gr473" style:family="graphic" style:parent-style-name="standard">
      <style:graphic-properties draw:stroke="none" draw:fill="solid" draw:fill-color="#ff0000" draw:textarea-horizontal-align="left" draw:textarea-vertical-align="top" draw:auto-grow-height="false" fo:min-height="0.209cm" fo:min-width="0.169cm" fo:padding-top="0.13cm" fo:padding-bottom="0.13cm" fo:padding-left="0.25cm" fo:padding-right="0.25cm" fo:wrap-option="wrap" draw:shadow-color="#5e574e" loext:decorative="false"/>
    </style:style>
    <style:style style:name="gr474" style:family="graphic" style:parent-style-name="standard">
      <style:graphic-properties draw:stroke="none" draw:fill="solid" draw:fill-color="#ff0000" draw:textarea-horizontal-align="left" draw:textarea-vertical-align="top" draw:auto-grow-height="false" fo:min-height="0.17cm" fo:min-width="0.099cm" fo:padding-top="0.13cm" fo:padding-bottom="0.13cm" fo:padding-left="0.25cm" fo:padding-right="0.25cm" fo:wrap-option="wrap" draw:shadow-color="#5e574e" loext:decorative="false"/>
    </style:style>
    <style:style style:name="gr475" style:family="graphic" style:parent-style-name="standard">
      <style:graphic-properties draw:stroke="none" draw:fill="solid" draw:fill-color="#ff0000" draw:textarea-horizontal-align="left" draw:textarea-vertical-align="top" draw:auto-grow-height="false" fo:min-height="0.457cm" fo:min-width="0.38cm" fo:padding-top="0.13cm" fo:padding-bottom="0.13cm" fo:padding-left="0.25cm" fo:padding-right="0.25cm" fo:wrap-option="wrap" draw:shadow-color="#5e574e" loext:decorative="false"/>
    </style:style>
    <style:style style:name="gr476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5.375cm" draw:visible-area-height="4.564cm" draw:ole-draw-aspect="1" loext:decorative="false"/>
    </style:style>
    <style:style style:name="gr477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969cm" fo:min-width="1.015cm" fo:padding-top="0.13cm" fo:padding-bottom="0.13cm" fo:padding-left="0.25cm" fo:padding-right="0.25cm" fo:wrap-option="no-wrap" draw:shadow-color="#5e574e" loext:decorative="false"/>
    </style:style>
    <style:style style:name="gr478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.086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479" style:family="graphic" style:parent-style-name="standard">
      <style:graphic-properties draw:stroke="solid" svg:stroke-width="0.035cm" svg:stroke-color="#000000" draw:stroke-linejoin="miter" draw:fill="solid" draw:fill-color="#008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480" style:family="graphic" style:parent-style-name="standard">
      <style:graphic-properties draw:stroke="none" draw:fill="solid" draw:fill-color="#dbdbdb" draw:textarea-horizontal-align="left" draw:textarea-vertical-align="middle" draw:auto-grow-height="false" fo:min-height="0cm" fo:min-width="0.082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481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32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482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272cm" fo:padding-top="0.13cm" fo:padding-bottom="0.13cm" fo:padding-left="0.25cm" fo:padding-right="0.25cm" fo:wrap-option="wrap" draw:shadow-color="#5e574e" loext:decorative="false"/>
    </style:style>
    <style:style style:name="gr483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484" style:family="graphic" style:parent-style-name="standard">
      <style:graphic-properties draw:stroke="solid" svg:stroke-width="0.035cm" svg:stroke-color="#dadad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85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312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486" style:family="graphic" style:parent-style-name="standard">
      <style:graphic-properties draw:stroke="solid" svg:stroke-width="0.035cm" svg:stroke-color="#474747" svg:stroke-opacity="100%" draw:stroke-linejoin="round" svg:stroke-linecap="round" draw:fill="solid" draw:fill-color="#47474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487" style:family="graphic" style:parent-style-name="standard">
      <style:graphic-properties draw:stroke="none" draw:fill="solid" draw:fill-color="#cecece" draw:textarea-horizontal-align="left" draw:textarea-vertical-align="top" draw:auto-grow-height="false" fo:min-height="0cm" fo:min-width="0cm" fo:padding-top="0.13cm" fo:padding-bottom="0.13cm" fo:padding-left="0.25cm" fo:padding-right="0.25cm" fo:wrap-option="wrap" draw:shadow="visible" draw:shadow-offset-x="0.035cm" draw:shadow-offset-y="0.035cm" draw:shadow-color="#000000" draw:shadow-opacity="100%" loext:decorative="false"/>
    </style:style>
    <style:style style:name="gr488" style:family="graphic" style:parent-style-name="standard">
      <style:graphic-properties draw:stroke="solid" svg:stroke-width="0.035cm" svg:stroke-color="#dadada" draw:stroke-linejoin="miter" draw:fill="solid" draw:fill-color="#dbdbdb" draw:textarea-horizontal-align="left" draw:textarea-vertical-align="middle" draw:auto-grow-height="false" fo:min-height="0.047cm" fo:min-width="0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489" style:family="graphic" style:parent-style-name="standard">
      <style:graphic-properties draw:stroke="none" draw:fill="solid" draw:fill-color="#474747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490" style:family="graphic" style:parent-style-name="standard">
      <style:graphic-properties draw:stroke="none" draw:fill="solid" draw:fill-color="#037c03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491" style:family="graphic" style:parent-style-name="standard">
      <style:graphic-properties draw:stroke="solid" svg:stroke-width="0.035cm" svg:stroke-color="#fe9b0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92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="visible" draw:shadow-offset-x="0cm" draw:shadow-offset-y="0cm" draw:shadow-color="#000000" draw:shadow-opacity="100%" loext:decorative="false"/>
    </style:style>
    <style:style style:name="gr493" style:family="graphic" style:parent-style-name="standard">
      <style:graphic-properties draw:stroke="solid" svg:stroke-width="0.035cm" svg:stroke-color="#dadad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cm" draw:shadow-color="#000000" loext:decorative="false"/>
    </style:style>
    <style:style style:name="gr494" style:family="graphic" style:parent-style-name="standard">
      <style:graphic-properties draw:stroke="solid" svg:stroke-width="0.035cm" svg:stroke-color="#919191" svg:stroke-opacity="100%" draw:stroke-linejoin="round" svg:stroke-linecap="round" draw:fill="solid" draw:fill-color="#91919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="visible" draw:shadow-offset-x="0cm" draw:shadow-offset-y="0cm" draw:shadow-color="#000000" draw:shadow-opacity="100%" loext:decorative="false"/>
    </style:style>
    <style:style style:name="gr495" style:family="graphic" style:parent-style-name="standard">
      <style:graphic-properties draw:stroke="solid" svg:stroke-width="0.035cm" svg:stroke-color="#91919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cm" draw:shadow-color="#000000" loext:decorative="false"/>
    </style:style>
    <style:style style:name="gr496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497" style:family="graphic" style:parent-style-name="standard">
      <style:graphic-properties draw:stroke="solid" svg:stroke-width="0.035cm" svg:stroke-color="#cecece" draw:stroke-linejoin="miter" draw:fill="solid" draw:fill-color="#c0c0c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visible" draw:shadow-offset-x="0cm" draw:shadow-offset-y="0cm" draw:shadow-color="#000000" loext:decorative="false"/>
    </style:style>
    <style:style style:name="gr498" style:family="graphic" style:parent-style-name="standard">
      <style:graphic-properties draw:stroke="solid" svg:stroke-width="0.035cm" svg:stroke-color="#474747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499" style:family="graphic" style:parent-style-name="standard">
      <style:graphic-properties draw:stroke="solid" svg:stroke-width="0.035cm" svg:stroke-color="#cecece" draw:stroke-linejoin="miter" draw:fill="solid" draw:fill-color="#cecece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500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01" style:family="graphic" style:parent-style-name="standard">
      <style:graphic-properties draw:stroke="none" draw:fill="solid" draw:fill-color="#000000" draw:textarea-horizontal-align="left" draw:textarea-vertical-align="top" draw:auto-grow-height="false" fo:min-height="0.056cm" fo:min-width="0cm" fo:padding-top="0.13cm" fo:padding-bottom="0.13cm" fo:padding-left="0.25cm" fo:padding-right="0.25cm" fo:wrap-option="wrap" draw:shadow-color="#5e574e" loext:decorative="false"/>
    </style:style>
    <style:style style:name="gr502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12.038cm" draw:visible-area-height="13.096cm" draw:ole-draw-aspect="1" loext:decorative="false"/>
    </style:style>
    <style:style style:name="gr503" style:family="graphic" style:parent-style-name="standard">
      <style:graphic-properties draw:stroke="dash" draw:stroke-dash="Long_20_Dash_20_Dot" svg:stroke-width="0.035cm" svg:stroke-color="#000000" draw:stroke-linejoin="miter" draw:fill="gradient" draw:fill-color="#618ffd" draw:fill-gradient-name="Gradient_20_8" draw:textarea-horizontal-align="left" draw:textarea-vertical-align="middle" draw:auto-grow-height="false" fo:min-height="0.491cm" fo:min-width="0.976cm" fo:padding-top="0.13cm" fo:padding-bottom="0.13cm" fo:padding-left="0.25cm" fo:padding-right="0.25cm" fo:wrap-option="no-wrap" draw:shadow-color="#5e574e" loext:decorative="false"/>
    </style:style>
    <style:style style:name="gr504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806cm" fo:min-width="8.584cm" fo:padding-top="0.13cm" fo:padding-bottom="0.13cm" fo:padding-left="0.25cm" fo:padding-right="0.25cm" fo:wrap-option="no-wrap" draw:shadow-color="#5e574e" loext:decorative="false"/>
    </style:style>
    <style:style style:name="gr505" style:family="graphic" style:parent-style-name="standard">
      <style:graphic-properties draw:stroke="solid" svg:stroke-width="0.035cm" svg:stroke-color="#5e574e" draw:marker-end="Arrowheads_20_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06" style:family="graphic" style:parent-style-name="standard">
      <style:graphic-properties draw:stroke="solid" svg:stroke-width="0.035cm" svg:stroke-color="#5e574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07" style:family="graphic" style:parent-style-name="standard">
      <style:graphic-properties draw:stroke="solid" svg:stroke-width="0.035cm" svg:stroke-color="#5e574e" draw:marker-end="Arrowheads_20_10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08" style:family="graphic" style:parent-style-name="standard">
      <style:graphic-properties draw:stroke="solid" svg:stroke-width="0.035cm" svg:stroke-color="#5e574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09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1.127cm" fo:min-width="1.037cm" fo:padding-top="0.13cm" fo:padding-bottom="0.13cm" fo:padding-left="0.25cm" fo:padding-right="0.25cm" fo:wrap-option="no-wrap" draw:shadow-color="#5e574e" loext:decorative="false"/>
    </style:style>
    <style:style style:name="gr510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511" style:family="graphic" style:parent-style-name="standard">
      <style:graphic-properties draw:stroke="none" draw:fill="solid" draw:fill-color="#dbdbdb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12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186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13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142cm" fo:padding-top="0.13cm" fo:padding-bottom="0.13cm" fo:padding-left="0.25cm" fo:padding-right="0.25cm" fo:wrap-option="wrap" draw:shadow-color="#5e574e" loext:decorative="false"/>
    </style:style>
    <style:style style:name="gr514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177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15" style:family="graphic" style:parent-style-name="standard">
      <style:graphic-properties draw:stroke="solid" svg:stroke-width="0.035cm" svg:stroke-color="#dadada" draw:stroke-linejoin="miter" draw:fill="solid" draw:fill-color="#dbdbdb" draw:textarea-horizontal-align="left" draw:textarea-vertical-align="middle" draw:auto-grow-height="false" fo:min-height="0.076cm" fo:min-width="0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16" style:family="graphic" style:parent-style-name="standard">
      <style:graphic-properties draw:stroke="none" draw:fill="solid" draw:fill-color="#474747" draw:textarea-horizontal-align="left" draw:textarea-vertical-align="middle" draw:auto-grow-height="false" fo:min-height="0.01cm" fo:min-width="0cm" fo:padding-top="0.13cm" fo:padding-bottom="0.13cm" fo:padding-left="0.25cm" fo:padding-right="0.25cm" fo:wrap-option="no-wrap" draw:shadow-color="#5e574e" loext:decorative="false"/>
    </style:style>
    <style:style style:name="gr517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1.127cm" fo:min-width="1.14cm" fo:padding-top="0.13cm" fo:padding-bottom="0.13cm" fo:padding-left="0.25cm" fo:padding-right="0.25cm" fo:wrap-option="no-wrap" draw:shadow-color="#5e574e" loext:decorative="false"/>
    </style:style>
    <style:style style:name="gr518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1.127cm" fo:min-width="1.352cm" fo:padding-top="0.13cm" fo:padding-bottom="0.13cm" fo:padding-left="0.25cm" fo:padding-right="0.25cm" fo:wrap-option="no-wrap" draw:shadow-color="#5e574e" loext:decorative="false"/>
    </style:style>
    <style:style style:name="gr519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1.127cm" fo:min-width="0.925cm" fo:padding-top="0.13cm" fo:padding-bottom="0.13cm" fo:padding-left="0.25cm" fo:padding-right="0.25cm" fo:wrap-option="no-wrap" draw:shadow-color="#5e574e" loext:decorative="false"/>
    </style:style>
    <style:style style:name="gr520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177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21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151cm" fo:padding-top="0.13cm" fo:padding-bottom="0.13cm" fo:padding-left="0.25cm" fo:padding-right="0.25cm" fo:wrap-option="wrap" draw:shadow-color="#5e574e" loext:decorative="false"/>
    </style:style>
    <style:style style:name="gr522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168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23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.004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524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173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25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138cm" fo:padding-top="0.13cm" fo:padding-bottom="0.13cm" fo:padding-left="0.25cm" fo:padding-right="0.25cm" fo:wrap-option="wrap" draw:shadow-color="#5e574e" loext:decorative="false"/>
    </style:style>
    <style:style style:name="gr526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164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27" style:family="graphic" style:parent-style-name="standard">
      <style:graphic-properties draw:stroke="none" draw:fill="solid" draw:fill-color="#474747" draw:textarea-horizontal-align="left" draw:textarea-vertical-align="middle" draw:auto-grow-height="false" fo:min-height="0.012cm" fo:min-width="0cm" fo:padding-top="0.13cm" fo:padding-bottom="0.13cm" fo:padding-left="0.25cm" fo:padding-right="0.25cm" fo:wrap-option="no-wrap" draw:shadow-color="#5e574e" loext:decorative="false"/>
    </style:style>
    <style:style style:name="gr528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182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29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173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30" style:family="graphic" style:parent-style-name="standard">
      <style:graphic-properties draw:stroke="none" draw:fill="solid" draw:fill-color="#cecece" draw:textarea-horizontal-align="left" draw:textarea-vertical-align="middle" draw:auto-grow-height="false" fo:min-height="0.593cm" fo:min-width="0cm" fo:padding-top="0.13cm" fo:padding-bottom="0.13cm" fo:padding-left="0.25cm" fo:padding-right="0.25cm" fo:wrap-option="no-wrap" draw:shadow="visible" draw:shadow-offset-x="0.035cm" draw:shadow-offset-y="0.035cm" draw:shadow-color="#5e574e" loext:decorative="false"/>
    </style:style>
    <style:style style:name="gr531" style:family="graphic" style:parent-style-name="standard">
      <style:graphic-properties draw:stroke="none" draw:fill="gradient" draw:fill-color="#676767" draw:fill-gradient-name="Gradient_20_9" draw:textarea-horizontal-align="left" draw:textarea-vertical-align="middle" draw:auto-grow-height="false" fo:min-height="0.593cm" fo:min-width="0cm" fo:padding-top="0.13cm" fo:padding-bottom="0.13cm" fo:padding-left="0.25cm" fo:padding-right="0.25cm" fo:wrap-option="no-wrap" draw:shadow="visible" draw:shadow-offset-x="0.035cm" draw:shadow-offset-y="0.035cm" draw:shadow-color="#5e574e" loext:decorative="false"/>
    </style:style>
    <style:style style:name="gr532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5e574e" loext:decorative="false"/>
    </style:style>
    <style:style style:name="gr533" style:family="graphic" style:parent-style-name="standard">
      <style:graphic-properties draw:stroke="solid" svg:stroke-width="0.035cm" svg:stroke-color="#474747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5e574e" loext:decorative="false"/>
    </style:style>
    <style:style style:name="gr53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5e574e" loext:decorative="false"/>
    </style:style>
    <style:style style:name="gr535" style:family="graphic" style:parent-style-name="standard">
      <style:graphic-properties draw:stroke="dash" draw:stroke-dash="Dot" svg:stroke-width="0.035cm" svg:stroke-color="#000000" draw:stroke-linejoin="miter" draw:fill="none" draw:fill-color="#ff6600" draw:textarea-horizontal-align="left" draw:textarea-vertical-align="middle" draw:auto-grow-height="false" fo:min-height="1.127cm" fo:min-width="1.282cm" fo:padding-top="0.13cm" fo:padding-bottom="0.13cm" fo:padding-left="0.25cm" fo:padding-right="0.25cm" fo:wrap-option="no-wrap" draw:shadow-color="#5e574e" loext:decorative="false"/>
    </style:style>
    <style:style style:name="gr536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653cm" fo:min-width="8.584cm" fo:padding-top="0.13cm" fo:padding-bottom="0.13cm" fo:padding-left="0.25cm" fo:padding-right="0.25cm" fo:wrap-option="no-wrap" draw:shadow-color="#5e574e" loext:decorative="false"/>
    </style:style>
    <style:style style:name="gr537" style:family="graphic" style:parent-style-name="standard">
      <style:graphic-properties draw:stroke="solid" svg:stroke-width="0.035cm" svg:stroke-color="#5e574e" draw:marker-end="Arrowheads_20_1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38" style:family="graphic" style:parent-style-name="standard">
      <style:graphic-properties draw:stroke="solid" svg:stroke-width="0.035cm" svg:stroke-color="#5e574e" draw:marker-end="Arrowheads_20_1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39" style:family="graphic" style:parent-style-name="standard">
      <style:graphic-properties draw:stroke="solid" svg:stroke-width="0.035cm" svg:stroke-color="#5e574e" draw:marker-end="Arrowheads_20_1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40" style:family="graphic" style:parent-style-name="standard">
      <style:graphic-properties draw:stroke="solid" svg:stroke-width="0.035cm" svg:stroke-color="#5e574e" draw:marker-end="Arrowheads_20_1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41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969cm" fo:min-width="1.213cm" fo:padding-top="0.13cm" fo:padding-bottom="0.13cm" fo:padding-left="0.25cm" fo:padding-right="0.25cm" fo:wrap-option="no-wrap" draw:shadow-color="#5e574e" loext:decorative="false"/>
    </style:style>
    <style:style style:name="gr542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.159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543" style:family="graphic" style:parent-style-name="standard">
      <style:graphic-properties draw:stroke="none" draw:fill="solid" draw:fill-color="#dbdbdb" draw:textarea-horizontal-align="left" draw:textarea-vertical-align="middle" draw:auto-grow-height="false" fo:min-height="0cm" fo:min-width="0.155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44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423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45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372cm" fo:padding-top="0.13cm" fo:padding-bottom="0.13cm" fo:padding-left="0.25cm" fo:padding-right="0.25cm" fo:wrap-option="wrap" draw:shadow-color="#5e574e" loext:decorative="false"/>
    </style:style>
    <style:style style:name="gr546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414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47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.082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548" style:family="graphic" style:parent-style-name="standard">
      <style:graphic-properties draw:stroke="none" draw:fill="solid" draw:fill-color="#dbdbdb" draw:textarea-horizontal-align="left" draw:textarea-vertical-align="middle" draw:auto-grow-height="false" fo:min-height="0cm" fo:min-width="0.077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49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268cm" fo:padding-top="0.13cm" fo:padding-bottom="0.13cm" fo:padding-left="0.25cm" fo:padding-right="0.25cm" fo:wrap-option="wrap" draw:shadow-color="#5e574e" loext:decorative="false"/>
    </style:style>
    <style:style style:name="gr550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311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51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.16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552" style:family="graphic" style:parent-style-name="standard">
      <style:graphic-properties draw:stroke="none" draw:fill="solid" draw:fill-color="#dbdbdb" draw:textarea-horizontal-align="left" draw:textarea-vertical-align="middle" draw:auto-grow-height="false" fo:min-height="0cm" fo:min-width="0.156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53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424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54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415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55" style:family="graphic" style:parent-style-name="standard">
      <style:graphic-properties draw:stroke="dash" draw:stroke-dash="Dot" svg:stroke-width="0.035cm" svg:stroke-color="#000000" draw:stroke-linejoin="miter" draw:fill="solid" draw:fill-color="#ffffff" draw:textarea-horizontal-align="left" draw:textarea-vertical-align="middle" draw:auto-grow-height="false" fo:min-height="0.969cm" fo:min-width="1.209cm" fo:padding-top="0.13cm" fo:padding-bottom="0.13cm" fo:padding-left="0.25cm" fo:padding-right="0.25cm" fo:wrap-option="no-wrap" draw:shadow-color="#5e574e" loext:decorative="false"/>
    </style:style>
    <style:style style:name="gr556" style:family="graphic" style:parent-style-name="standard">
      <style:graphic-properties draw:stroke="none" draw:fill="solid" draw:fill-color="#919191" draw:textarea-horizontal-align="left" draw:textarea-vertical-align="top" draw:auto-grow-height="false" fo:min-height="0cm" fo:min-width="0.155cm" fo:padding-top="0.13cm" fo:padding-bottom="0.13cm" fo:padding-left="0.25cm" fo:padding-right="0.25cm" fo:wrap-option="wrap" draw:shadow="visible" draw:shadow-offset-x="0.071cm" draw:shadow-offset-y="0.035cm" draw:shadow-color="#000000" draw:shadow-opacity="100%" loext:decorative="false"/>
    </style:style>
    <style:style style:name="gr557" style:family="graphic" style:parent-style-name="standard">
      <style:graphic-properties draw:stroke="none" draw:fill="solid" draw:fill-color="#dbdbdb" draw:textarea-horizontal-align="left" draw:textarea-vertical-align="middle" draw:auto-grow-height="false" fo:min-height="0cm" fo:min-width="0.151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58" style:family="graphic" style:parent-style-name="standard">
      <style:graphic-properties draw:stroke="none" draw:fill="solid" draw:fill-color="#dadada" draw:textarea-horizontal-align="left" draw:textarea-vertical-align="top" draw:auto-grow-height="false" fo:min-height="0cm" fo:min-width="0.427cm" fo:padding-top="0.13cm" fo:padding-bottom="0.13cm" fo:padding-left="0.25cm" fo:padding-right="0.25cm" fo:wrap-option="wrap" draw:shadow="visible" draw:shadow-offset-x="0.071cm" draw:shadow-offset-y="0.071cm" draw:shadow-color="#000000" draw:shadow-opacity="100%" loext:decorative="false"/>
    </style:style>
    <style:style style:name="gr559" style:family="graphic" style:parent-style-name="standard">
      <style:graphic-properties draw:stroke="solid" svg:stroke-width="0.035cm" svg:stroke-color="#919191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cecece" draw:textarea-horizontal-align="left" draw:textarea-vertical-align="top" draw:auto-grow-height="false" fo:min-height="0cm" fo:min-width="0.367cm" fo:padding-top="0.13cm" fo:padding-bottom="0.13cm" fo:padding-left="0.25cm" fo:padding-right="0.25cm" fo:wrap-option="wrap" draw:shadow-color="#5e574e" loext:decorative="false"/>
    </style:style>
    <style:style style:name="gr560" style:family="graphic" style:parent-style-name="standard">
      <style:graphic-properties draw:stroke="none" draw:fill="solid" draw:fill-color="#cecece" draw:textarea-horizontal-align="left" draw:textarea-vertical-align="middle" draw:auto-grow-height="false" fo:min-height="0cm" fo:min-width="0.419cm" fo:padding-top="0.13cm" fo:padding-bottom="0.13cm" fo:padding-left="0.25cm" fo:padding-right="0.25cm" fo:wrap-option="no-wrap" draw:shadow="visible" draw:shadow-offset-x="0.035cm" draw:shadow-offset-y="0.035cm" draw:shadow-color="#000000" loext:decorative="false"/>
    </style:style>
    <style:style style:name="gr561" style:family="graphic" style:parent-style-name="Object_20_with_20_no_20_fill_20_and_20_no_20_line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visible-area-left="0cm" draw:visible-area-top="0cm" draw:visible-area-width="19.085cm" draw:visible-area-height="10.768cm" draw:ole-draw-aspect="1" loext:decorative="false"/>
    </style:style>
    <style:style style:name="gr562" style:family="graphic" style:parent-style-name="standard" style:list-style-name="L20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63" style:family="graphic" style:parent-style-name="standard">
      <style:graphic-properties draw:stroke="solid" svg:stroke-width="0.353cm" svg:stroke-color="#ff6600" draw:marker-end="msArrowStealthEnd_20_6" draw:marker-end-width="1.059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64" style:family="graphic" style:parent-style-name="standard">
      <style:graphic-properties draw:stroke="none" draw:fill="none" draw:fill-color="#ff6600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5e574e" loext:decorative="false"/>
    </style:style>
    <style:style style:name="gr565" style:family="graphic" style:parent-style-name="standard">
      <style:graphic-properties draw:stroke="solid" svg:stroke-width="0.035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66" style:family="graphic" style:parent-style-name="standard">
      <style:graphic-properties draw:stroke="solid" svg:stroke-width="0.035cm" svg:stroke-color="#ff6600" draw:marker-start="Arrowheads_20_16" draw:marker-start-width="0.21cm" draw:marker-start-center="false" draw:marker-end="Arrowheads_20_1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67" style:family="graphic" style:parent-style-name="standard">
      <style:graphic-properties draw:stroke="solid" svg:stroke-width="0.035cm" svg:stroke-color="#ff6600" draw:marker-start="msArrowStealthEnd_20_6" draw:marker-start-width="0.21cm" draw:marker-start-center="false" draw:marker-end="msArrowStealthEnd_20_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568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69" style:family="graphic" style:parent-style-name="standard">
      <style:graphic-properties draw:stroke="none" draw:fill="gradient" draw:fill-color="#414141" draw:fill-gradient-name="Gradient_20_10" draw:textarea-horizontal-align="left" draw:textarea-vertical-align="top" draw:auto-grow-height="false" fo:min-height="0.957cm" fo:min-width="1.489cm" fo:padding-top="0.13cm" fo:padding-bottom="0.13cm" fo:padding-left="0.25cm" fo:padding-right="0.25cm" fo:wrap-option="wrap" draw:shadow-color="#5e574e" loext:decorative="false"/>
    </style:style>
    <style:style style:name="gr570" style:family="graphic" style:parent-style-name="standard">
      <style:graphic-properties draw:stroke="none" draw:fill="solid" draw:fill-color="#676767" draw:textarea-horizontal-align="left" draw:textarea-vertical-align="top" draw:auto-grow-height="false" fo:min-height="1.504cm" fo:min-width="0.055cm" fo:padding-top="0.13cm" fo:padding-bottom="0.13cm" fo:padding-left="0.25cm" fo:padding-right="0.25cm" fo:wrap-option="wrap" draw:shadow-color="#5e574e" loext:decorative="false"/>
    </style:style>
    <style:style style:name="gr571" style:family="graphic" style:parent-style-name="standard">
      <style:graphic-properties draw:stroke="none" draw:fill="solid" draw:fill-color="#919191" draw:textarea-horizontal-align="left" draw:textarea-vertical-align="top" draw:auto-grow-height="false" fo:min-height="1.671cm" fo:min-width="0.298cm" fo:padding-top="0.13cm" fo:padding-bottom="0.13cm" fo:padding-left="0.25cm" fo:padding-right="0.25cm" fo:wrap-option="wrap" draw:shadow-color="#5e574e" loext:decorative="false"/>
    </style:style>
    <style:style style:name="gr572" style:family="graphic" style:parent-style-name="standard">
      <style:graphic-properties draw:stroke="none" draw:fill="solid" draw:fill-color="#808000" draw:textarea-horizontal-align="left" draw:textarea-vertical-align="top" draw:auto-grow-height="false" fo:min-height="0.546cm" fo:min-width="0.872cm" fo:padding-top="0.13cm" fo:padding-bottom="0.13cm" fo:padding-left="0.25cm" fo:padding-right="0.25cm" fo:wrap-option="wrap" draw:shadow-color="#5e574e" loext:decorative="false"/>
    </style:style>
    <style:style style:name="gr573" style:family="graphic" style:parent-style-name="standard">
      <style:graphic-properties draw:stroke="none" draw:fill="solid" draw:fill-color="#808000" draw:textarea-horizontal-align="left" draw:textarea-vertical-align="top" draw:auto-grow-height="false" fo:min-height="0.278cm" fo:min-width="0.39cm" fo:padding-top="0.13cm" fo:padding-bottom="0.13cm" fo:padding-left="0.25cm" fo:padding-right="0.25cm" fo:wrap-option="wrap" draw:shadow-color="#5e574e" loext:decorative="false"/>
    </style:style>
    <style:style style:name="gr574" style:family="graphic" style:parent-style-name="standard">
      <style:graphic-properties draw:stroke="none" draw:fill="solid" draw:fill-color="#919191" draw:textarea-horizontal-align="left" draw:textarea-vertical-align="top" draw:auto-grow-height="false" fo:min-height="1.257cm" fo:min-width="0.338cm" fo:padding-top="0.13cm" fo:padding-bottom="0.13cm" fo:padding-left="0.25cm" fo:padding-right="0.25cm" fo:wrap-option="wrap" draw:shadow-color="#5e574e" loext:decorative="false"/>
    </style:style>
    <style:style style:name="gr575" style:family="graphic" style:parent-style-name="standard">
      <style:graphic-properties draw:stroke="none" draw:fill="solid" draw:fill-color="#676767" draw:textarea-horizontal-align="left" draw:textarea-vertical-align="top" draw:auto-grow-height="false" fo:min-height="1.491cm" fo:min-width="0.153cm" fo:padding-top="0.13cm" fo:padding-bottom="0.13cm" fo:padding-left="0.25cm" fo:padding-right="0.25cm" fo:wrap-option="wrap" draw:shadow-color="#5e574e" loext:decorative="false"/>
    </style:style>
    <style:style style:name="gr57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77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78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579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5e574e" loext:decorative="false"/>
      <style:paragraph-properties style:writing-mode="lr-tb"/>
    </style:style>
    <style:style style:name="gr580" style:family="graphic" style:parent-style-name="standard">
      <style:graphic-properties draw:stroke="solid" svg:stroke-width="0.035cm" svg:stroke-color="#000000" draw:stroke-linejoin="miter" draw:fill="gradient" draw:fill-color="#0066ff" draw:fill-gradient-name="Gradient_20_11" draw:textarea-horizontal-align="left" draw:textarea-vertical-align="middle" draw:auto-grow-height="false" fo:min-height="1.337cm" fo:min-width="2.485cm" fo:padding-top="0.13cm" fo:padding-bottom="0.13cm" fo:padding-left="0.25cm" fo:padding-right="0.25cm" fo:wrap-option="no-wrap" draw:shadow-color="#5e574e" loext:decorative="false"/>
    </style:style>
    <style:style style:name="gr581" style:family="graphic" style:parent-style-name="standard">
      <style:graphic-properties draw:stroke="solid" svg:stroke-width="0.035cm" svg:stroke-color="#000000" draw:stroke-linejoin="miter" draw:fill="gradient" draw:fill-color="#ff9933" draw:fill-gradient-name="Gradient_20_12" draw:textarea-horizontal-align="left" draw:textarea-vertical-align="middle" draw:auto-grow-height="false" fo:min-height="0.995cm" fo:min-width="1.747cm" fo:padding-top="0.13cm" fo:padding-bottom="0.13cm" fo:padding-left="0.25cm" fo:padding-right="0.25cm" fo:wrap-option="no-wrap" draw:shadow-color="#5e574e" loext:decorative="false"/>
    </style:style>
    <style:style style:name="gr582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83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84" style:family="graphic" style:parent-style-name="standard">
      <style:graphic-properties draw:stroke="solid" svg:stroke-width="0.035cm" svg:stroke-color="#000000" draw:stroke-linejoin="miter" draw:fill="gradient" draw:fill-color="#fc0128" draw:fill-gradient-name="Gradient_20_13" draw:textarea-horizontal-align="left" draw:textarea-vertical-align="middle" draw:auto-grow-height="false" fo:min-height="1.096cm" fo:min-width="2.213cm" fo:padding-top="0.13cm" fo:padding-bottom="0.13cm" fo:padding-left="0.25cm" fo:padding-right="0.25cm" fo:wrap-option="no-wrap" draw:shadow-color="#5e574e" loext:decorative="false"/>
    </style:style>
    <style:style style:name="gr585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86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87" style:family="graphic" style:parent-style-name="standard">
      <style:graphic-properties draw:stroke="solid" svg:stroke-width="0.035cm" svg:stroke-color="#000000" draw:stroke-linejoin="miter" draw:fill="gradient" draw:fill-color="#0066ff" draw:fill-gradient-name="Gradient_20_11" draw:textarea-horizontal-align="left" draw:textarea-vertical-align="middle" draw:auto-grow-height="false" fo:min-height="1.337cm" fo:min-width="2.313cm" fo:padding-top="0.13cm" fo:padding-bottom="0.13cm" fo:padding-left="0.25cm" fo:padding-right="0.25cm" fo:wrap-option="no-wrap" draw:shadow-color="#5e574e" loext:decorative="false"/>
    </style:style>
    <style:style style:name="gr588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89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90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591" style:family="graphic" style:parent-style-name="standard">
      <style:graphic-properties draw:stroke="none" draw:fill="none" draw:fill-color="#00cc99" draw:textarea-horizontal-align="left" draw:textarea-vertical-align="middle" draw:auto-grow-height="false" fo:min-height="1.01cm" fo:min-width="7.759cm" fo:padding-top="0.13cm" fo:padding-bottom="0.13cm" fo:padding-left="0.25cm" fo:padding-right="0.25cm" fo:wrap-option="no-wrap" draw:shadow-color="#969696" loext:decorative="false"/>
    </style:style>
    <style:style style:name="gr592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79cm" fo:min-width="8.153cm" fo:padding-top="0cm" fo:padding-bottom="0cm" fo:padding-left="0.053cm" fo:padding-right="0.053cm" fo:wrap-option="wrap" draw:shadow-color="#969696" loext:decorative="false"/>
      <style:paragraph-properties style:writing-mode="lr-tb"/>
    </style:style>
    <style:style style:name="gr593" style:family="graphic" style:parent-style-name="standard">
      <style:graphic-properties draw:stroke="none" draw:fill="none" draw:fill-color="#00cc99" draw:textarea-horizontal-align="left" draw:textarea-vertical-align="middle" draw:auto-grow-height="false" fo:min-height="1.019cm" fo:min-width="7.759cm" fo:padding-top="0.13cm" fo:padding-bottom="0.13cm" fo:padding-left="0.25cm" fo:padding-right="0.25cm" fo:wrap-option="no-wrap" draw:shadow-color="#969696" loext:decorative="false"/>
    </style:style>
    <style:style style:name="gr594" style:family="graphic" style:parent-style-name="standard">
      <style:graphic-properties draw:stroke="none" draw:fill="solid" draw:fill-color="#00e0e0" draw:textarea-horizontal-align="left" draw:textarea-vertical-align="middle" draw:auto-grow-height="false" fo:min-height="3.78cm" fo:min-width="6.622cm" fo:padding-top="0.13cm" fo:padding-bottom="0.13cm" fo:padding-left="0.25cm" fo:padding-right="0.25cm" fo:wrap-option="no-wrap" draw:shadow-color="#5e574e" loext:decorative="false"/>
    </style:style>
    <style:style style:name="gr595" style:family="graphic" style:parent-style-name="standard">
      <style:graphic-properties draw:stroke="none" draw:fill="solid" draw:fill-color="#80ffff" draw:textarea-horizontal-align="left" draw:textarea-vertical-align="top" draw:auto-grow-height="false" fo:min-height="3.775cm" fo:min-width="5.775cm" fo:padding-top="0.13cm" fo:padding-bottom="0.13cm" fo:padding-left="0.25cm" fo:padding-right="0.25cm" fo:wrap-option="wrap" draw:shadow-color="#5e574e" loext:decorative="false"/>
    </style:style>
    <style:style style:name="gr596" style:family="graphic" style:parent-style-name="standard">
      <style:graphic-properties draw:stroke="none" draw:fill="solid" draw:fill-color="#919191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597" style:family="graphic" style:parent-style-name="standard">
      <style:graphic-properties draw:stroke="none" draw:fill="solid" draw:fill-color="#919191" draw:textarea-horizontal-align="left" draw:textarea-vertical-align="middle" draw:auto-grow-height="false" fo:min-height="3.057cm" fo:min-width="0cm" fo:padding-top="0.13cm" fo:padding-bottom="0.13cm" fo:padding-left="0.25cm" fo:padding-right="0.25cm" fo:wrap-option="no-wrap" draw:shadow-color="#5e574e" loext:decorative="false"/>
    </style:style>
    <style:style style:name="gr598" style:family="graphic" style:parent-style-name="standard">
      <style:graphic-properties draw:stroke="none" draw:fill="solid" draw:fill-color="#606060" draw:textarea-horizontal-align="left" draw:textarea-vertical-align="middle" draw:auto-grow-height="false" fo:min-height="2.941cm" fo:min-width="0cm" fo:padding-top="0.13cm" fo:padding-bottom="0.13cm" fo:padding-left="0.25cm" fo:padding-right="0.25cm" fo:wrap-option="no-wrap" draw:shadow-color="#5e574e" loext:decorative="false"/>
    </style:style>
    <style:style style:name="gr599" style:family="graphic" style:parent-style-name="standard">
      <style:graphic-properties draw:stroke="none" draw:fill="solid" draw:fill-color="#606060" draw:textarea-horizontal-align="left" draw:textarea-vertical-align="middle" draw:auto-grow-height="false" fo:min-height="2.942cm" fo:min-width="0cm" fo:padding-top="0.13cm" fo:padding-bottom="0.13cm" fo:padding-left="0.25cm" fo:padding-right="0.25cm" fo:wrap-option="no-wrap" draw:shadow-color="#5e574e" loext:decorative="false"/>
    </style:style>
    <style:style style:name="gr600" style:family="graphic" style:parent-style-name="standard">
      <style:graphic-properties draw:stroke="none" draw:fill="solid" draw:fill-color="#c0c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5e574e" loext:decorative="false"/>
    </style:style>
    <style:style style:name="gr601" style:family="graphic" style:parent-style-name="standard">
      <style:graphic-properties draw:stroke="none" draw:fill="solid" draw:fill-color="#000000" draw:textarea-horizontal-align="left" draw:textarea-vertical-align="middle" draw:auto-grow-height="false" fo:min-height="1.006cm" fo:min-width="0.157cm" fo:padding-top="0.13cm" fo:padding-bottom="0.13cm" fo:padding-left="0.25cm" fo:padding-right="0.25cm" fo:wrap-option="no-wrap" draw:shadow-color="#5e574e" loext:decorative="false"/>
    </style:style>
    <style:style style:name="gr602" style:family="graphic" style:parent-style-name="standard">
      <style:graphic-properties draw:stroke="none" draw:fill="solid" draw:fill-color="#202020" draw:textarea-horizontal-align="left" draw:textarea-vertical-align="top" draw:auto-grow-height="false" fo:min-height="0.864cm" fo:min-width="0cm" fo:padding-top="0.13cm" fo:padding-bottom="0.13cm" fo:padding-left="0.25cm" fo:padding-right="0.25cm" fo:wrap-option="wrap" draw:shadow-color="#5e574e" loext:decorative="false"/>
    </style:style>
    <style:style style:name="gr603" style:family="graphic" style:parent-style-name="standard">
      <style:graphic-properties draw:stroke="none" draw:fill="solid" draw:fill-color="#a0a0a0" draw:textarea-horizontal-align="left" draw:textarea-vertical-align="top" draw:auto-grow-height="false" fo:min-height="0.53cm" fo:min-width="0.174cm" fo:padding-top="0.13cm" fo:padding-bottom="0.13cm" fo:padding-left="0.25cm" fo:padding-right="0.25cm" fo:wrap-option="wrap" draw:shadow-color="#5e574e" loext:decorative="false"/>
    </style:style>
    <style:style style:name="gr604" style:family="graphic" style:parent-style-name="standard">
      <style:graphic-properties draw:stroke="none" draw:fill="solid" draw:fill-color="#606060" draw:textarea-horizontal-align="left" draw:textarea-vertical-align="middle" draw:auto-grow-height="false" fo:min-height="0.883cm" fo:min-width="0cm" fo:padding-top="0.13cm" fo:padding-bottom="0.13cm" fo:padding-left="0.25cm" fo:padding-right="0.25cm" fo:wrap-option="no-wrap" draw:shadow-color="#5e574e" loext:decorative="false"/>
    </style:style>
    <style:style style:name="gr605" style:family="graphic" style:parent-style-name="standard">
      <style:graphic-properties draw:stroke="none" draw:fill="solid" draw:fill-color="#808080" draw:textarea-horizontal-align="left" draw:textarea-vertical-align="top" draw:auto-grow-height="false" fo:min-height="1.777cm" fo:min-width="0cm" fo:padding-top="0.13cm" fo:padding-bottom="0.13cm" fo:padding-left="0.25cm" fo:padding-right="0.25cm" fo:wrap-option="wrap" draw:shadow-color="#5e574e" loext:decorative="false"/>
    </style:style>
    <style:style style:name="gr606" style:family="graphic" style:parent-style-name="standard">
      <style:graphic-properties draw:stroke="none" draw:fill="solid" draw:fill-color="#404040" draw:textarea-horizontal-align="left" draw:textarea-vertical-align="top" draw:auto-grow-height="false" fo:min-height="1.768cm" fo:min-width="0cm" fo:padding-top="0.13cm" fo:padding-bottom="0.13cm" fo:padding-left="0.25cm" fo:padding-right="0.25cm" fo:wrap-option="wrap" draw:shadow-color="#5e574e" loext:decorative="false"/>
    </style:style>
    <style:style style:name="gr607" style:family="graphic" style:parent-style-name="standard">
      <style:graphic-properties draw:stroke="none" draw:fill="solid" draw:fill-color="#006000" draw:textarea-horizontal-align="left" draw:textarea-vertical-align="top" draw:auto-grow-height="false" fo:min-height="0.786cm" fo:min-width="0.541cm" fo:padding-top="0.13cm" fo:padding-bottom="0.13cm" fo:padding-left="0.25cm" fo:padding-right="0.25cm" fo:wrap-option="wrap" draw:shadow-color="#5e574e" loext:decorative="false"/>
    </style:style>
    <style:style style:name="gr608" style:family="graphic" style:parent-style-name="standard">
      <style:graphic-properties draw:stroke="none" draw:fill="solid" draw:fill-color="#606060" draw:textarea-horizontal-align="left" draw:textarea-vertical-align="top" draw:auto-grow-height="false" fo:min-height="0.52cm" fo:min-width="0cm" fo:padding-top="0.13cm" fo:padding-bottom="0.13cm" fo:padding-left="0.25cm" fo:padding-right="0.25cm" fo:wrap-option="wrap" draw:shadow-color="#5e574e" loext:decorative="false"/>
    </style:style>
    <style:style style:name="gr609" style:family="graphic" style:parent-style-name="standard">
      <style:graphic-properties draw:stroke="none" draw:fill="solid" draw:fill-color="#808080" draw:textarea-horizontal-align="left" draw:textarea-vertical-align="top" draw:auto-grow-height="false" fo:min-height="0.534cm" fo:min-width="0cm" fo:padding-top="0.13cm" fo:padding-bottom="0.13cm" fo:padding-left="0.25cm" fo:padding-right="0.25cm" fo:wrap-option="wrap" draw:shadow-color="#5e574e" loext:decorative="false"/>
    </style:style>
    <style:style style:name="gr610" style:family="graphic" style:parent-style-name="standard">
      <style:graphic-properties draw:stroke="none" draw:fill="solid" draw:fill-color="#202020" draw:textarea-horizontal-align="left" draw:textarea-vertical-align="middle" draw:auto-grow-height="false" fo:min-height="1.535cm" fo:min-width="0cm" fo:padding-top="0.13cm" fo:padding-bottom="0.13cm" fo:padding-left="0.25cm" fo:padding-right="0.25cm" fo:wrap-option="no-wrap" draw:shadow-color="#5e574e" loext:decorative="false"/>
    </style:style>
    <style:style style:name="gr611" style:family="graphic" style:parent-style-name="standard">
      <style:graphic-properties draw:stroke="none" draw:fill="solid" draw:fill-color="#808080" draw:textarea-horizontal-align="left" draw:textarea-vertical-align="top" draw:auto-grow-height="false" fo:min-height="1.856cm" fo:min-width="0.4cm" fo:padding-top="0.13cm" fo:padding-bottom="0.13cm" fo:padding-left="0.25cm" fo:padding-right="0.25cm" fo:wrap-option="wrap" draw:shadow-color="#5e574e" loext:decorative="false"/>
    </style:style>
    <style:style style:name="gr612" style:family="graphic" style:parent-style-name="standard">
      <style:graphic-properties draw:stroke="none" draw:fill="solid" draw:fill-color="#606060" draw:textarea-horizontal-align="left" draw:textarea-vertical-align="top" draw:auto-grow-height="false" fo:min-height="1.865cm" fo:min-width="0cm" fo:padding-top="0.13cm" fo:padding-bottom="0.13cm" fo:padding-left="0.25cm" fo:padding-right="0.25cm" fo:wrap-option="wrap" draw:shadow-color="#5e574e" loext:decorative="false"/>
    </style:style>
    <style:style style:name="gr613" style:family="graphic" style:parent-style-name="standard">
      <style:graphic-properties draw:stroke="solid" svg:stroke-width="0.035cm" svg:stroke-color="#c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614" style:family="graphic" style:parent-style-name="standard">
      <style:graphic-properties draw:stroke="none" draw:fill="solid" draw:fill-color="#808080" draw:textarea-horizontal-align="left" draw:textarea-vertical-align="top" draw:auto-grow-height="false" fo:min-height="1.972cm" fo:min-width="0cm" fo:padding-top="0.13cm" fo:padding-bottom="0.13cm" fo:padding-left="0.25cm" fo:padding-right="0.25cm" fo:wrap-option="wrap" draw:shadow-color="#5e574e" loext:decorative="false"/>
    </style:style>
    <style:style style:name="gr615" style:family="graphic" style:parent-style-name="standard">
      <style:graphic-properties draw:stroke="none" draw:fill="solid" draw:fill-color="#606060" draw:textarea-horizontal-align="left" draw:textarea-vertical-align="top" draw:auto-grow-height="false" fo:min-height="1.98cm" fo:min-width="0cm" fo:padding-top="0.13cm" fo:padding-bottom="0.13cm" fo:padding-left="0.25cm" fo:padding-right="0.25cm" fo:wrap-option="wrap" draw:shadow-color="#5e574e" loext:decorative="false"/>
    </style:style>
    <style:style style:name="gr616" style:family="graphic" style:parent-style-name="standard">
      <style:graphic-properties draw:stroke="solid" svg:stroke-width="0.035cm" svg:stroke-color="#8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617" style:family="graphic" style:parent-style-name="standard">
      <style:graphic-properties draw:stroke="none" draw:fill="solid" draw:fill-color="#404040" draw:textarea-horizontal-align="left" draw:textarea-vertical-align="top" draw:auto-grow-height="false" fo:min-height="1.332cm" fo:min-width="0cm" fo:padding-top="0.13cm" fo:padding-bottom="0.13cm" fo:padding-left="0.25cm" fo:padding-right="0.25cm" fo:wrap-option="wrap" draw:shadow-color="#5e574e" loext:decorative="false"/>
    </style:style>
    <style:style style:name="gr618" style:family="graphic" style:parent-style-name="standard">
      <style:graphic-properties draw:stroke="none" draw:fill="solid" draw:fill-color="#202020" draw:textarea-horizontal-align="left" draw:textarea-vertical-align="top" draw:auto-grow-height="false" fo:min-height="2.139cm" fo:min-width="0.828cm" fo:padding-top="0.13cm" fo:padding-bottom="0.13cm" fo:padding-left="0.25cm" fo:padding-right="0.25cm" fo:wrap-option="wrap" draw:shadow-color="#5e574e" loext:decorative="false"/>
    </style:style>
    <style:style style:name="gr619" style:family="graphic" style:parent-style-name="standard">
      <style:graphic-properties draw:stroke="solid" svg:stroke-width="0.035cm" svg:stroke-color="#ffc08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620" style:family="graphic" style:parent-style-name="standard">
      <style:graphic-properties draw:stroke="none" draw:fill="solid" draw:fill-color="#808080" draw:textarea-horizontal-align="left" draw:textarea-vertical-align="top" draw:auto-grow-height="false" fo:min-height="1.455cm" fo:min-width="0.977cm" fo:padding-top="0.13cm" fo:padding-bottom="0.13cm" fo:padding-left="0.25cm" fo:padding-right="0.25cm" fo:wrap-option="wrap" draw:shadow-color="#5e574e" loext:decorative="false"/>
    </style:style>
    <style:style style:name="gr621" style:family="graphic" style:parent-style-name="standard">
      <style:graphic-properties draw:stroke="none" draw:fill="solid" draw:fill-color="#404040" draw:textarea-horizontal-align="left" draw:textarea-vertical-align="top" draw:auto-grow-height="false" fo:min-height="0.362cm" fo:min-width="0cm" fo:padding-top="0.13cm" fo:padding-bottom="0.13cm" fo:padding-left="0.25cm" fo:padding-right="0.25cm" fo:wrap-option="wrap" draw:shadow-color="#5e574e" loext:decorative="false"/>
    </style:style>
    <style:style style:name="gr622" style:family="graphic" style:parent-style-name="standard">
      <style:graphic-properties draw:stroke="none" draw:fill="solid" draw:fill-color="#404040" draw:textarea-horizontal-align="left" draw:textarea-vertical-align="top" draw:auto-grow-height="false" fo:min-height="1.041cm" fo:min-width="0cm" fo:padding-top="0.13cm" fo:padding-bottom="0.13cm" fo:padding-left="0.25cm" fo:padding-right="0.25cm" fo:wrap-option="wrap" draw:shadow-color="#5e574e" loext:decorative="false"/>
    </style:style>
    <style:style style:name="gr623" style:family="graphic" style:parent-style-name="standard">
      <style:graphic-properties draw:stroke="none" draw:fill="solid" draw:fill-color="#606060" draw:textarea-horizontal-align="left" draw:textarea-vertical-align="top" draw:auto-grow-height="false" fo:min-height="1.045cm" fo:min-width="0cm" fo:padding-top="0.13cm" fo:padding-bottom="0.13cm" fo:padding-left="0.25cm" fo:padding-right="0.25cm" fo:wrap-option="wrap" draw:shadow-color="#5e574e" loext:decorative="false"/>
    </style:style>
    <style:style style:name="gr624" style:family="graphic" style:parent-style-name="standard">
      <style:graphic-properties draw:stroke="none" draw:fill="solid" draw:fill-color="#202020" draw:textarea-horizontal-align="left" draw:textarea-vertical-align="top" draw:auto-grow-height="false" fo:min-height="0.926cm" fo:min-width="0.302cm" fo:padding-top="0.13cm" fo:padding-bottom="0.13cm" fo:padding-left="0.25cm" fo:padding-right="0.25cm" fo:wrap-option="wrap" draw:shadow-color="#5e574e" loext:decorative="false"/>
    </style:style>
    <style:style style:name="gr625" style:family="graphic" style:parent-style-name="standard">
      <style:graphic-properties draw:stroke="none" draw:fill="solid" draw:fill-color="#a0a0a0" draw:textarea-horizontal-align="left" draw:textarea-vertical-align="top" draw:auto-grow-height="false" fo:min-height="1.433cm" fo:min-width="0cm" fo:padding-top="0.13cm" fo:padding-bottom="0.13cm" fo:padding-left="0.25cm" fo:padding-right="0.25cm" fo:wrap-option="wrap" draw:shadow-color="#5e574e" loext:decorative="false"/>
    </style:style>
    <style:style style:name="gr626" style:family="graphic" style:parent-style-name="standard">
      <style:graphic-properties draw:stroke="none" draw:fill="solid" draw:fill-color="#404040" draw:textarea-horizontal-align="left" draw:textarea-vertical-align="top" draw:auto-grow-height="false" fo:min-height="1.411cm" fo:min-width="0.042cm" fo:padding-top="0.13cm" fo:padding-bottom="0.13cm" fo:padding-left="0.25cm" fo:padding-right="0.25cm" fo:wrap-option="wrap" draw:shadow-color="#5e574e" loext:decorative="false"/>
    </style:style>
    <style:style style:name="gr627" style:family="graphic" style:parent-style-name="standard">
      <style:graphic-properties draw:stroke="none" draw:fill="solid" draw:fill-color="#a0a0a0" draw:textarea-horizontal-align="left" draw:textarea-vertical-align="top" draw:auto-grow-height="false" fo:min-height="0.852cm" fo:min-width="0cm" fo:padding-top="0.13cm" fo:padding-bottom="0.13cm" fo:padding-left="0.25cm" fo:padding-right="0.25cm" fo:wrap-option="wrap" draw:shadow-color="#5e574e" loext:decorative="false"/>
    </style:style>
    <style:style style:name="gr628" style:family="graphic" style:parent-style-name="standard">
      <style:graphic-properties draw:stroke="none" draw:fill="solid" draw:fill-color="#e0e0e0" draw:textarea-horizontal-align="left" draw:textarea-vertical-align="top" draw:auto-grow-height="false" fo:min-height="0.851cm" fo:min-width="0cm" fo:padding-top="0.13cm" fo:padding-bottom="0.13cm" fo:padding-left="0.25cm" fo:padding-right="0.25cm" fo:wrap-option="wrap" draw:shadow-color="#5e574e" loext:decorative="false"/>
    </style:style>
    <style:style style:name="gr629" style:family="graphic" style:parent-style-name="standard">
      <style:graphic-properties draw:stroke="none" draw:fill="solid" draw:fill-color="#006000" draw:textarea-horizontal-align="left" draw:textarea-vertical-align="top" draw:auto-grow-height="false" fo:min-height="0.242cm" fo:min-width="0.196cm" fo:padding-top="0.13cm" fo:padding-bottom="0.13cm" fo:padding-left="0.25cm" fo:padding-right="0.25cm" fo:wrap-option="wrap" draw:shadow-color="#5e574e" loext:decorative="false"/>
    </style:style>
    <style:style style:name="gr630" style:family="graphic" style:parent-style-name="standard">
      <style:graphic-properties draw:stroke="none" draw:fill="solid" draw:fill-color="#202020" draw:textarea-horizontal-align="left" draw:textarea-vertical-align="top" draw:auto-grow-height="false" fo:min-height="1.95cm" fo:min-width="5.7cm" fo:padding-top="0.13cm" fo:padding-bottom="0.13cm" fo:padding-left="0.25cm" fo:padding-right="0.25cm" fo:wrap-option="wrap" draw:shadow-color="#5e574e" loext:decorative="false"/>
    </style:style>
    <style:style style:name="gr631" style:family="graphic" style:parent-style-name="standard">
      <style:graphic-properties draw:stroke="none" draw:fill="solid" draw:fill-color="#a0a0a0" draw:textarea-horizontal-align="left" draw:textarea-vertical-align="top" draw:auto-grow-height="false" fo:min-height="1.954cm" fo:min-width="2.207cm" fo:padding-top="0.13cm" fo:padding-bottom="0.13cm" fo:padding-left="0.25cm" fo:padding-right="0.25cm" fo:wrap-option="wrap" draw:shadow-color="#5e574e" loext:decorative="false"/>
    </style:style>
    <style:style style:name="gr632" style:family="graphic" style:parent-style-name="standard">
      <style:graphic-properties draw:stroke="none" draw:fill="solid" draw:fill-color="#00a000" draw:textarea-horizontal-align="left" draw:textarea-vertical-align="top" draw:auto-grow-height="false" fo:min-height="2.082cm" fo:min-width="3.121cm" fo:padding-top="0.13cm" fo:padding-bottom="0.13cm" fo:padding-left="0.25cm" fo:padding-right="0.25cm" fo:wrap-option="wrap" draw:shadow-color="#5e574e" loext:decorative="false"/>
    </style:style>
    <style:style style:name="gr633" style:family="graphic" style:parent-style-name="standard">
      <style:graphic-properties draw:stroke="none" draw:fill="solid" draw:fill-color="#019700" draw:textarea-horizontal-align="left" draw:textarea-vertical-align="top" draw:auto-grow-height="false" fo:min-height="2.597cm" fo:min-width="1.802cm" fo:padding-top="0.13cm" fo:padding-bottom="0.13cm" fo:padding-left="0.25cm" fo:padding-right="0.25cm" fo:wrap-option="wrap" draw:shadow-color="#5e574e" loext:decorative="false"/>
    </style:style>
    <style:style style:name="gr634" style:family="graphic" style:parent-style-name="standard">
      <style:graphic-properties draw:stroke="none" draw:fill="solid" draw:fill-color="#606060" draw:textarea-horizontal-align="left" draw:textarea-vertical-align="top" draw:auto-grow-height="false" fo:min-height="0.666cm" fo:min-width="4.434cm" fo:padding-top="0.13cm" fo:padding-bottom="0.13cm" fo:padding-left="0.25cm" fo:padding-right="0.25cm" fo:wrap-option="wrap" draw:shadow-color="#5e574e" loext:decorative="false"/>
    </style:style>
    <style:style style:name="gr635" style:family="graphic" style:parent-style-name="standard">
      <style:graphic-properties draw:stroke="none" draw:fill="solid" draw:fill-color="#202020" draw:textarea-horizontal-align="left" draw:textarea-vertical-align="top" draw:auto-grow-height="false" fo:min-height="0.186cm" fo:min-width="0cm" fo:padding-top="0.13cm" fo:padding-bottom="0.13cm" fo:padding-left="0.25cm" fo:padding-right="0.25cm" fo:wrap-option="wrap" draw:shadow-color="#5e574e" loext:decorative="false"/>
    </style:style>
    <style:style style:name="gr636" style:family="graphic" style:parent-style-name="standard">
      <style:graphic-properties draw:stroke="none" draw:fill="solid" draw:fill-color="#202020" draw:textarea-horizontal-align="left" draw:textarea-vertical-align="top" draw:auto-grow-height="false" fo:min-height="0.137cm" fo:min-width="0cm" fo:padding-top="0.13cm" fo:padding-bottom="0.13cm" fo:padding-left="0.25cm" fo:padding-right="0.25cm" fo:wrap-option="wrap" draw:shadow-color="#5e574e" loext:decorative="false"/>
    </style:style>
    <style:style style:name="gr637" style:family="graphic" style:parent-style-name="standard">
      <style:graphic-properties draw:stroke="none" draw:fill="solid" draw:fill-color="#202020" draw:textarea-horizontal-align="left" draw:textarea-vertical-align="top" draw:auto-grow-height="false" fo:min-height="0.084cm" fo:min-width="0cm" fo:padding-top="0.13cm" fo:padding-bottom="0.13cm" fo:padding-left="0.25cm" fo:padding-right="0.25cm" fo:wrap-option="wrap" draw:shadow-color="#5e574e" loext:decorative="false"/>
    </style:style>
    <style:style style:name="gr638" style:family="graphic" style:parent-style-name="standard">
      <style:graphic-properties draw:stroke="none" draw:fill="solid" draw:fill-color="#202020" draw:textarea-horizontal-align="left" draw:textarea-vertical-align="top" draw:auto-grow-height="false" fo:min-height="0.08cm" fo:min-width="0cm" fo:padding-top="0.13cm" fo:padding-bottom="0.13cm" fo:padding-left="0.25cm" fo:padding-right="0.25cm" fo:wrap-option="wrap" draw:shadow-color="#5e574e" loext:decorative="false"/>
    </style:style>
    <style:style style:name="gr639" style:family="graphic" style:parent-style-name="standard">
      <style:graphic-properties draw:stroke="none" draw:fill="solid" draw:fill-color="#e0e0e0" draw:textarea-horizontal-align="left" draw:textarea-vertical-align="top" draw:auto-grow-height="false" fo:min-height="0cm" fo:min-width="4.285cm" fo:padding-top="0.13cm" fo:padding-bottom="0.13cm" fo:padding-left="0.25cm" fo:padding-right="0.25cm" fo:wrap-option="wrap" draw:shadow-color="#5e574e" loext:decorative="false"/>
    </style:style>
    <style:style style:name="gr640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a0a0a0" draw:textarea-horizontal-align="left" draw:textarea-vertical-align="top" draw:auto-grow-height="false" fo:min-height="0.208cm" fo:min-width="3.856cm" fo:padding-top="0.13cm" fo:padding-bottom="0.13cm" fo:padding-left="0.25cm" fo:padding-right="0.25cm" fo:wrap-option="wrap" draw:shadow-color="#5e574e" loext:decorative="false"/>
    </style:style>
    <style:style style:name="gr641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80" draw:textarea-horizontal-align="left" draw:textarea-vertical-align="top" draw:auto-grow-height="false" fo:min-height="0.454cm" fo:min-width="3.601cm" fo:padding-top="0.13cm" fo:padding-bottom="0.13cm" fo:padding-left="0.25cm" fo:padding-right="0.25cm" fo:wrap-option="wrap" draw:shadow-color="#5e574e" loext:decorative="false"/>
    </style:style>
    <style:style style:name="gr642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e0e0e0" draw:textarea-horizontal-align="left" draw:textarea-vertical-align="top" draw:auto-grow-height="false" fo:min-height="0.41cm" fo:min-width="3.562cm" fo:padding-top="0.13cm" fo:padding-bottom="0.13cm" fo:padding-left="0.25cm" fo:padding-right="0.25cm" fo:wrap-option="wrap" draw:shadow-color="#5e574e" loext:decorative="false"/>
    </style:style>
    <style:style style:name="gr643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c0c0c0" draw:textarea-horizontal-align="left" draw:textarea-vertical-align="top" draw:auto-grow-height="false" fo:min-height="0.362cm" fo:min-width="3.57cm" fo:padding-top="0.13cm" fo:padding-bottom="0.13cm" fo:padding-left="0.25cm" fo:padding-right="0.25cm" fo:wrap-option="wrap" draw:shadow-color="#5e574e" loext:decorative="false"/>
    </style:style>
    <style:style style:name="gr644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a0a0a0" draw:textarea-horizontal-align="left" draw:textarea-vertical-align="top" draw:auto-grow-height="false" fo:min-height="0.437cm" fo:min-width="3.813cm" fo:padding-top="0.13cm" fo:padding-bottom="0.13cm" fo:padding-left="0.25cm" fo:padding-right="0.25cm" fo:wrap-option="wrap" draw:shadow-color="#5e574e" loext:decorative="false"/>
    </style:style>
    <style:style style:name="gr645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606060" draw:textarea-horizontal-align="left" draw:textarea-vertical-align="top" draw:auto-grow-height="false" fo:min-height="0.583cm" fo:min-width="1.688cm" fo:padding-top="0.13cm" fo:padding-bottom="0.13cm" fo:padding-left="0.25cm" fo:padding-right="0.25cm" fo:wrap-option="wrap" draw:shadow-color="#5e574e" loext:decorative="false"/>
    </style:style>
    <style:style style:name="gr64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606060" draw:textarea-horizontal-align="left" draw:textarea-vertical-align="top" draw:auto-grow-height="false" fo:min-height="1.169cm" fo:min-width="0.673cm" fo:padding-top="0.13cm" fo:padding-bottom="0.13cm" fo:padding-left="0.25cm" fo:padding-right="0.25cm" fo:wrap-option="wrap" draw:shadow-color="#5e574e" loext:decorative="false"/>
    </style:style>
    <style:style style:name="gr64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606060" draw:textarea-horizontal-align="left" draw:textarea-vertical-align="top" draw:auto-grow-height="false" fo:min-height="1.27cm" fo:min-width="0.241cm" fo:padding-top="0.13cm" fo:padding-bottom="0.13cm" fo:padding-left="0.25cm" fo:padding-right="0.25cm" fo:wrap-option="wrap" draw:shadow-color="#5e574e" loext:decorative="false"/>
    </style:style>
    <style:style style:name="gr648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ffa040" draw:textarea-horizontal-align="left" draw:textarea-vertical-align="top" draw:auto-grow-height="false" fo:min-height="1.12cm" fo:min-width="2.164cm" fo:padding-top="0.13cm" fo:padding-bottom="0.13cm" fo:padding-left="0.25cm" fo:padding-right="0.25cm" fo:wrap-option="wrap" draw:shadow-color="#5e574e" loext:decorative="false"/>
    </style:style>
    <style:style style:name="gr649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ffc080" draw:textarea-horizontal-align="left" draw:textarea-vertical-align="top" draw:auto-grow-height="false" fo:min-height="1.12cm" fo:min-width="2.168cm" fo:padding-top="0.13cm" fo:padding-bottom="0.13cm" fo:padding-left="0.25cm" fo:padding-right="0.25cm" fo:wrap-option="wrap" draw:shadow-color="#5e574e" loext:decorative="false"/>
    </style:style>
    <style:style style:name="gr650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ffe0c0" draw:textarea-horizontal-align="left" draw:textarea-vertical-align="top" draw:auto-grow-height="false" fo:min-height="1.129cm" fo:min-width="2.159cm" fo:padding-top="0.13cm" fo:padding-bottom="0.13cm" fo:padding-left="0.25cm" fo:padding-right="0.25cm" fo:wrap-option="wrap" draw:shadow-color="#5e574e" loext:decorative="false"/>
    </style:style>
    <style:style style:name="gr651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a0a0a0" draw:textarea-horizontal-align="left" draw:textarea-vertical-align="top" draw:auto-grow-height="false" fo:min-height="0.172cm" fo:min-width="0.329cm" fo:padding-top="0.13cm" fo:padding-bottom="0.13cm" fo:padding-left="0.25cm" fo:padding-right="0.25cm" fo:wrap-option="wrap" draw:shadow-color="#5e574e" loext:decorative="false"/>
    </style:style>
    <style:style style:name="gr652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a0a0a0" draw:textarea-horizontal-align="left" draw:textarea-vertical-align="top" draw:auto-grow-height="false" fo:min-height="0cm" fo:min-width="0.192cm" fo:padding-top="0.13cm" fo:padding-bottom="0.13cm" fo:padding-left="0.25cm" fo:padding-right="0.25cm" fo:wrap-option="wrap" draw:shadow-color="#5e574e" loext:decorative="false"/>
    </style:style>
    <style:style style:name="gr653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60606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54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606060" draw:textarea-horizontal-align="left" draw:textarea-vertical-align="top" draw:auto-grow-height="false" fo:min-height="0.538cm" fo:min-width="0.1cm" fo:padding-top="0.13cm" fo:padding-bottom="0.13cm" fo:padding-left="0.25cm" fo:padding-right="0.25cm" fo:wrap-option="wrap" draw:shadow-color="#5e574e" loext:decorative="false"/>
    </style:style>
    <style:style style:name="gr655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ff" draw:textarea-horizontal-align="left" draw:textarea-vertical-align="top" draw:auto-grow-height="false" fo:min-height="0.172cm" fo:min-width="2.004cm" fo:padding-top="0.13cm" fo:padding-bottom="0.13cm" fo:padding-left="0.25cm" fo:padding-right="0.25cm" fo:wrap-option="wrap" draw:shadow-color="#5e574e" loext:decorative="false"/>
    </style:style>
    <style:style style:name="gr65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ff" draw:textarea-horizontal-align="left" draw:textarea-vertical-align="top" draw:auto-grow-height="false" fo:min-height="0.159cm" fo:min-width="0.695cm" fo:padding-top="0.13cm" fo:padding-bottom="0.13cm" fo:padding-left="0.25cm" fo:padding-right="0.25cm" fo:wrap-option="wrap" draw:shadow-color="#5e574e" loext:decorative="false"/>
    </style:style>
    <style:style style:name="gr65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8080ff" draw:textarea-horizontal-align="left" draw:textarea-vertical-align="top" draw:auto-grow-height="false" fo:min-height="0.198cm" fo:min-width="1.021cm" fo:padding-top="0.13cm" fo:padding-bottom="0.13cm" fo:padding-left="0.25cm" fo:padding-right="0.25cm" fo:wrap-option="wrap" draw:shadow-color="#5e574e" loext:decorative="false"/>
    </style:style>
    <style:style style:name="gr658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e0e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59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00ffff" draw:textarea-horizontal-align="left" draw:textarea-vertical-align="top" draw:auto-grow-height="false" fo:min-height="0cm" fo:min-width="0.518cm" fo:padding-top="0.13cm" fo:padding-bottom="0.13cm" fo:padding-left="0.25cm" fo:padding-right="0.25cm" fo:wrap-option="wrap" draw:shadow-color="#5e574e" loext:decorative="false"/>
    </style:style>
    <style:style style:name="gr660" style:family="graphic" style:parent-style-name="standard">
      <style:graphic-properties draw:stroke="none" draw:fill="solid" draw:fill-color="#c5ffff" draw:textarea-horizontal-align="left" draw:textarea-vertical-align="top" draw:auto-grow-height="false" fo:min-height="3.157cm" fo:min-width="2.993cm" fo:padding-top="0.13cm" fo:padding-bottom="0.13cm" fo:padding-left="0.25cm" fo:padding-right="0.25cm" fo:wrap-option="wrap" draw:shadow-color="#5e574e" loext:decorative="false"/>
    </style:style>
    <style:style style:name="gr661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3.157cm" fo:min-width="2.993cm" fo:padding-top="0.13cm" fo:padding-bottom="0.13cm" fo:padding-left="0.25cm" fo:padding-right="0.25cm" fo:wrap-option="wrap" draw:shadow-color="#5e574e" loext:decorative="false"/>
    </style:style>
    <style:style style:name="gr66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507cm" fo:min-width="0.593cm" fo:padding-top="0.13cm" fo:padding-bottom="0.13cm" fo:padding-left="0.25cm" fo:padding-right="0.25cm" fo:wrap-option="wrap" draw:shadow-color="#5e574e" loext:decorative="false"/>
    </style:style>
    <style:style style:name="gr663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07cm" fo:min-width="0.179cm" fo:padding-top="0.13cm" fo:padding-bottom="0.13cm" fo:padding-left="0.25cm" fo:padding-right="0.25cm" fo:wrap-option="wrap" draw:shadow-color="#5e574e" loext:decorative="false"/>
    </style:style>
    <style:style style:name="gr664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71cm" fo:min-width="0.453cm" fo:padding-top="0.13cm" fo:padding-bottom="0.13cm" fo:padding-left="0.25cm" fo:padding-right="0.25cm" fo:wrap-option="wrap" draw:shadow-color="#5e574e" loext:decorative="false"/>
    </style:style>
    <style:style style:name="gr665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525cm" fo:min-width="0cm" fo:padding-top="0.13cm" fo:padding-bottom="0.13cm" fo:padding-left="0.25cm" fo:padding-right="0.25cm" fo:wrap-option="wrap" draw:shadow-color="#5e574e" loext:decorative="false"/>
    </style:style>
    <style:style style:name="gr666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67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494cm" fo:min-width="0.082cm" fo:padding-top="0.13cm" fo:padding-bottom="0.13cm" fo:padding-left="0.25cm" fo:padding-right="0.25cm" fo:wrap-option="wrap" draw:shadow-color="#5e574e" loext:decorative="false"/>
    </style:style>
    <style:style style:name="gr668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25cm" fo:min-width="0.281cm" fo:padding-top="0.13cm" fo:padding-bottom="0.13cm" fo:padding-left="0.25cm" fo:padding-right="0.25cm" fo:wrap-option="wrap" draw:shadow-color="#5e574e" loext:decorative="false"/>
    </style:style>
    <style:style style:name="gr669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69cm" fo:min-width="0cm" fo:padding-top="0.13cm" fo:padding-bottom="0.13cm" fo:padding-left="0.25cm" fo:padding-right="0.25cm" fo:wrap-option="wrap" draw:shadow-color="#5e574e" loext:decorative="false"/>
    </style:style>
    <style:style style:name="gr670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016cm" fo:padding-top="0.13cm" fo:padding-bottom="0.13cm" fo:padding-left="0.25cm" fo:padding-right="0.25cm" fo:wrap-option="wrap" draw:shadow-color="#5e574e" loext:decorative="false"/>
    </style:style>
    <style:style style:name="gr671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66cm" fo:min-width="0cm" fo:padding-top="0.13cm" fo:padding-bottom="0.13cm" fo:padding-left="0.25cm" fo:padding-right="0.25cm" fo:wrap-option="wrap" draw:shadow-color="#5e574e" loext:decorative="false"/>
    </style:style>
    <style:style style:name="gr67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46cm" fo:min-width="0.139cm" fo:padding-top="0.13cm" fo:padding-bottom="0.13cm" fo:padding-left="0.25cm" fo:padding-right="0.25cm" fo:wrap-option="wrap" draw:shadow-color="#5e574e" loext:decorative="false"/>
    </style:style>
    <style:style style:name="gr673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26cm" fo:min-width="0cm" fo:padding-top="0.13cm" fo:padding-bottom="0.13cm" fo:padding-left="0.25cm" fo:padding-right="0.25cm" fo:wrap-option="wrap" draw:shadow-color="#5e574e" loext:decorative="false"/>
    </style:style>
    <style:style style:name="gr674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06cm" fo:min-width="0.179cm" fo:padding-top="0.13cm" fo:padding-bottom="0.13cm" fo:padding-left="0.25cm" fo:padding-right="0.25cm" fo:wrap-option="wrap" draw:shadow-color="#5e574e" loext:decorative="false"/>
    </style:style>
    <style:style style:name="gr675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36cm" fo:min-width="0cm" fo:padding-top="0.13cm" fo:padding-bottom="0.13cm" fo:padding-left="0.25cm" fo:padding-right="0.25cm" fo:wrap-option="wrap" draw:shadow-color="#5e574e" loext:decorative="false"/>
    </style:style>
    <style:style style:name="gr676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18cm" fo:min-width="0cm" fo:padding-top="0.13cm" fo:padding-bottom="0.13cm" fo:padding-left="0.25cm" fo:padding-right="0.25cm" fo:wrap-option="wrap" draw:shadow-color="#5e574e" loext:decorative="false"/>
    </style:style>
    <style:style style:name="gr677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6cm" fo:min-width="0cm" fo:padding-top="0.13cm" fo:padding-bottom="0.13cm" fo:padding-left="0.25cm" fo:padding-right="0.25cm" fo:wrap-option="wrap" draw:shadow-color="#5e574e" loext:decorative="false"/>
    </style:style>
    <style:style style:name="gr678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1cm" fo:min-width="0.404cm" fo:padding-top="0.13cm" fo:padding-bottom="0.13cm" fo:padding-left="0.25cm" fo:padding-right="0.25cm" fo:wrap-option="wrap" draw:shadow-color="#5e574e" loext:decorative="false"/>
    </style:style>
    <style:style style:name="gr679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065cm" fo:padding-top="0.13cm" fo:padding-bottom="0.13cm" fo:padding-left="0.25cm" fo:padding-right="0.25cm" fo:wrap-option="wrap" draw:shadow-color="#5e574e" loext:decorative="false"/>
    </style:style>
    <style:style style:name="gr680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67cm" fo:min-width="0cm" fo:padding-top="0.13cm" fo:padding-bottom="0.13cm" fo:padding-left="0.25cm" fo:padding-right="0.25cm" fo:wrap-option="wrap" draw:shadow-color="#5e574e" loext:decorative="false"/>
    </style:style>
    <style:style style:name="gr681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81cm" fo:min-width="0.241cm" fo:padding-top="0.13cm" fo:padding-bottom="0.13cm" fo:padding-left="0.25cm" fo:padding-right="0.25cm" fo:wrap-option="wrap" draw:shadow-color="#5e574e" loext:decorative="false"/>
    </style:style>
    <style:style style:name="gr68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76cm" fo:min-width="0.109cm" fo:padding-top="0.13cm" fo:padding-bottom="0.13cm" fo:padding-left="0.25cm" fo:padding-right="0.25cm" fo:wrap-option="wrap" draw:shadow-color="#5e574e" loext:decorative="false"/>
    </style:style>
    <style:style style:name="gr683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1cm" fo:min-width="0cm" fo:padding-top="0.13cm" fo:padding-bottom="0.13cm" fo:padding-left="0.25cm" fo:padding-right="0.25cm" fo:wrap-option="wrap" draw:shadow-color="#5e574e" loext:decorative="false"/>
    </style:style>
    <style:style style:name="gr684" style:family="graphic" style:parent-style-name="standard">
      <style:graphic-properties draw:stroke="none" draw:fill="solid" draw:fill-color="#00ff00" draw:textarea-horizontal-align="left" draw:textarea-vertical-align="top" draw:auto-grow-height="false" fo:min-height="1.058cm" fo:min-width="1.824cm" fo:padding-top="0.13cm" fo:padding-bottom="0.13cm" fo:padding-left="0.25cm" fo:padding-right="0.25cm" fo:wrap-option="wrap" draw:shadow-color="#5e574e" loext:decorative="false"/>
    </style:style>
    <style:style style:name="gr685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58cm" fo:min-width="1.824cm" fo:padding-top="0.13cm" fo:padding-bottom="0.13cm" fo:padding-left="0.25cm" fo:padding-right="0.25cm" fo:wrap-option="wrap" draw:shadow-color="#5e574e" loext:decorative="false"/>
    </style:style>
    <style:style style:name="gr686" style:family="graphic" style:parent-style-name="standard">
      <style:graphic-properties draw:stroke="none" draw:fill="solid" draw:fill-color="#00ff00" draw:textarea-horizontal-align="left" draw:textarea-vertical-align="top" draw:auto-grow-height="false" fo:min-height="1.023cm" fo:min-width="0cm" fo:padding-top="0.13cm" fo:padding-bottom="0.13cm" fo:padding-left="0.25cm" fo:padding-right="0.25cm" fo:wrap-option="wrap" draw:shadow-color="#5e574e" loext:decorative="false"/>
    </style:style>
    <style:style style:name="gr687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023cm" fo:min-width="0cm" fo:padding-top="0.13cm" fo:padding-bottom="0.13cm" fo:padding-left="0.25cm" fo:padding-right="0.25cm" fo:wrap-option="wrap" draw:shadow-color="#5e574e" loext:decorative="false"/>
    </style:style>
    <style:style style:name="gr688" style:family="graphic" style:parent-style-name="standard">
      <style:graphic-properties draw:stroke="none" draw:fill="solid" draw:fill-color="#00ff00" draw:textarea-horizontal-align="left" draw:textarea-vertical-align="top" draw:auto-grow-height="false" fo:min-height="0.3cm" fo:min-width="0cm" fo:padding-top="0.13cm" fo:padding-bottom="0.13cm" fo:padding-left="0.25cm" fo:padding-right="0.25cm" fo:wrap-option="wrap" draw:shadow-color="#5e574e" loext:decorative="false"/>
    </style:style>
    <style:style style:name="gr689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3cm" fo:min-width="0cm" fo:padding-top="0.13cm" fo:padding-bottom="0.13cm" fo:padding-left="0.25cm" fo:padding-right="0.25cm" fo:wrap-option="wrap" draw:shadow-color="#5e574e" loext:decorative="false"/>
    </style:style>
    <style:style style:name="gr690" style:family="graphic" style:parent-style-name="standard">
      <style:graphic-properties draw:stroke="none" draw:fill="solid" draw:fill-color="#00ff00" draw:textarea-horizontal-align="left" draw:textarea-vertical-align="top" draw:auto-grow-height="false" fo:min-height="2.522cm" fo:min-width="1.679cm" fo:padding-top="0.13cm" fo:padding-bottom="0.13cm" fo:padding-left="0.25cm" fo:padding-right="0.25cm" fo:wrap-option="wrap" draw:shadow-color="#5e574e" loext:decorative="false"/>
    </style:style>
    <style:style style:name="gr691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522cm" fo:min-width="1.679cm" fo:padding-top="0.13cm" fo:padding-bottom="0.13cm" fo:padding-left="0.25cm" fo:padding-right="0.25cm" fo:wrap-option="wrap" draw:shadow-color="#5e574e" loext:decorative="false"/>
    </style:style>
    <style:style style:name="gr692" style:family="graphic" style:parent-style-name="standard">
      <style:graphic-properties draw:stroke="none" draw:fill="solid" draw:fill-color="#00ff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93" style:family="graphic" style:parent-style-name="standard">
      <style:graphic-properties draw:stroke="none" draw:fill="solid" draw:fill-color="#00ff00" draw:textarea-horizontal-align="left" draw:textarea-vertical-align="top" draw:auto-grow-height="false" fo:min-height="0.058cm" fo:min-width="0cm" fo:padding-top="0.13cm" fo:padding-bottom="0.13cm" fo:padding-left="0.25cm" fo:padding-right="0.25cm" fo:wrap-option="wrap" draw:shadow-color="#5e574e" loext:decorative="false"/>
    </style:style>
    <style:style style:name="gr694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058cm" fo:min-width="0cm" fo:padding-top="0.13cm" fo:padding-bottom="0.13cm" fo:padding-left="0.25cm" fo:padding-right="0.25cm" fo:wrap-option="wrap" draw:shadow-color="#5e574e" loext:decorative="false"/>
    </style:style>
    <style:style style:name="gr695" style:family="graphic" style:parent-style-name="standard">
      <style:graphic-properties draw:stroke="none" draw:fill="solid" draw:fill-color="#83ff8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96" style:family="graphic" style:parent-style-name="standard">
      <style:graphic-properties draw:stroke="none" draw:fill="solid" draw:fill-color="#c5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697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798cm" fo:min-width="0.488cm" fo:padding-top="0.13cm" fo:padding-bottom="0.13cm" fo:padding-left="0.25cm" fo:padding-right="0.25cm" fo:wrap-option="wrap" draw:shadow-color="#5e574e" loext:decorative="false"/>
    </style:style>
    <style:style style:name="gr698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113cm" fo:min-width="1.934cm" fo:padding-top="0.13cm" fo:padding-bottom="0.13cm" fo:padding-left="0.25cm" fo:padding-right="0.25cm" fo:wrap-option="wrap" draw:shadow-color="#5e574e" loext:decorative="false"/>
    </style:style>
    <style:style style:name="gr699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3.951cm" fo:min-width="3.791cm" fo:padding-top="0.13cm" fo:padding-bottom="0.13cm" fo:padding-left="0.25cm" fo:padding-right="0.25cm" fo:wrap-option="wrap" draw:shadow-color="#5e574e" loext:decorative="false"/>
    </style:style>
    <style:style style:name="gr700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5.857cm" fo:min-width="2.393cm" fo:padding-top="0.13cm" fo:padding-bottom="0.13cm" fo:padding-left="0.25cm" fo:padding-right="0.25cm" fo:wrap-option="wrap" draw:shadow-color="#5e574e" loext:decorative="false"/>
    </style:style>
    <style:style style:name="gr701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574cm" fo:min-width="1.71cm" fo:padding-top="0.13cm" fo:padding-bottom="0.13cm" fo:padding-left="0.25cm" fo:padding-right="0.25cm" fo:wrap-option="wrap" draw:shadow-color="#5e574e" loext:decorative="false"/>
    </style:style>
    <style:style style:name="gr70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2.218cm" fo:min-width="2.989cm" fo:padding-top="0.13cm" fo:padding-bottom="0.13cm" fo:padding-left="0.25cm" fo:padding-right="0.25cm" fo:wrap-option="wrap" draw:shadow-color="#5e574e" loext:decorative="false"/>
    </style:style>
    <style:style style:name="gr703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6.491cm" fo:min-width="6.811cm" fo:padding-top="0.13cm" fo:padding-bottom="0.13cm" fo:padding-left="0.25cm" fo:padding-right="0.25cm" fo:wrap-option="wrap" draw:shadow-color="#5e574e" loext:decorative="false"/>
    </style:style>
    <style:style style:name="gr704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6.623cm" fo:min-width="0.717cm" fo:padding-top="0.13cm" fo:padding-bottom="0.13cm" fo:padding-left="0.25cm" fo:padding-right="0.25cm" fo:wrap-option="wrap" draw:shadow-color="#5e574e" loext:decorative="false"/>
    </style:style>
    <style:style style:name="gr705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78cm" fo:min-width="6.847cm" fo:padding-top="0.13cm" fo:padding-bottom="0.13cm" fo:padding-left="0.25cm" fo:padding-right="0.25cm" fo:wrap-option="wrap" draw:shadow-color="#5e574e" loext:decorative="false"/>
    </style:style>
    <style:style style:name="gr706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81cm" fo:min-width="0.704cm" fo:padding-top="0.13cm" fo:padding-bottom="0.13cm" fo:padding-left="0.25cm" fo:padding-right="0.25cm" fo:wrap-option="wrap" draw:shadow-color="#5e574e" loext:decorative="false"/>
    </style:style>
    <style:style style:name="gr707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4.996cm" fo:min-width="0.166cm" fo:padding-top="0.13cm" fo:padding-bottom="0.13cm" fo:padding-left="0.25cm" fo:padding-right="0.25cm" fo:wrap-option="wrap" draw:shadow-color="#5e574e" loext:decorative="false"/>
    </style:style>
    <style:style style:name="gr708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967cm" fo:min-width="1.541cm" fo:padding-top="0.13cm" fo:padding-bottom="0.13cm" fo:padding-left="0.25cm" fo:padding-right="0.25cm" fo:wrap-option="wrap" draw:shadow-color="#5e574e" loext:decorative="false"/>
    </style:style>
    <style:style style:name="gr709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428cm" fo:min-width="5.1cm" fo:padding-top="0.13cm" fo:padding-bottom="0.13cm" fo:padding-left="0.25cm" fo:padding-right="0.25cm" fo:wrap-option="wrap" draw:shadow-color="#5e574e" loext:decorative="false"/>
    </style:style>
    <style:style style:name="gr710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714cm" fo:min-width="0.298cm" fo:padding-top="0.13cm" fo:padding-bottom="0.13cm" fo:padding-left="0.25cm" fo:padding-right="0.25cm" fo:wrap-option="wrap" draw:shadow-color="#5e574e" loext:decorative="false"/>
    </style:style>
    <style:style style:name="gr711" style:family="graphic" style:parent-style-name="standard">
      <style:graphic-properties draw:stroke="none" draw:fill="solid" draw:fill-color="#99cccc" draw:textarea-horizontal-align="left" draw:textarea-vertical-align="top" draw:auto-grow-height="false" fo:min-height="0.322cm" fo:min-width="3.01cm" fo:padding-top="0.13cm" fo:padding-bottom="0.13cm" fo:padding-left="0.25cm" fo:padding-right="0.25cm" fo:wrap-option="wrap" draw:shadow-color="#5e574e" loext:decorative="false"/>
    </style:style>
    <style:style style:name="gr712" style:family="graphic" style:parent-style-name="standard">
      <style:graphic-properties draw:stroke="none" draw:fill="solid" draw:fill-color="#9ccfcf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3" style:family="graphic" style:parent-style-name="standard">
      <style:graphic-properties draw:stroke="none" draw:fill="solid" draw:fill-color="#9fcfcf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4" style:family="graphic" style:parent-style-name="standard">
      <style:graphic-properties draw:stroke="none" draw:fill="solid" draw:fill-color="#a2d2d2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5" style:family="graphic" style:parent-style-name="standard">
      <style:graphic-properties draw:stroke="none" draw:fill="solid" draw:fill-color="#a5d2d2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6" style:family="graphic" style:parent-style-name="standard">
      <style:graphic-properties draw:stroke="none" draw:fill="solid" draw:fill-color="#a9d4d4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7" style:family="graphic" style:parent-style-name="standard">
      <style:graphic-properties draw:stroke="none" draw:fill="solid" draw:fill-color="#afd7d7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8" style:family="graphic" style:parent-style-name="standard">
      <style:graphic-properties draw:stroke="none" draw:fill="solid" draw:fill-color="#b3d9d9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19" style:family="graphic" style:parent-style-name="standard">
      <style:graphic-properties draw:stroke="none" draw:fill="solid" draw:fill-color="#b6dcdc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0" style:family="graphic" style:parent-style-name="standard">
      <style:graphic-properties draw:stroke="none" draw:fill="solid" draw:fill-color="#bbdcdc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1" style:family="graphic" style:parent-style-name="standard">
      <style:graphic-properties draw:stroke="none" draw:fill="solid" draw:fill-color="#bddede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2" style:family="graphic" style:parent-style-name="standard">
      <style:graphic-properties draw:stroke="none" draw:fill="solid" draw:fill-color="#c0e1e1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3" style:family="graphic" style:parent-style-name="standard">
      <style:graphic-properties draw:stroke="none" draw:fill="solid" draw:fill-color="#c3e1e1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4" style:family="graphic" style:parent-style-name="standard">
      <style:graphic-properties draw:stroke="none" draw:fill="solid" draw:fill-color="#c5e1e1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5" style:family="graphic" style:parent-style-name="standard">
      <style:graphic-properties draw:stroke="none" draw:fill="solid" draw:fill-color="#c7e3e3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6" style:family="graphic" style:parent-style-name="standard">
      <style:graphic-properties draw:stroke="none" draw:fill="solid" draw:fill-color="#cae6e6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7" style:family="graphic" style:parent-style-name="standard">
      <style:graphic-properties draw:stroke="none" draw:fill="solid" draw:fill-color="#cde6e6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8" style:family="graphic" style:parent-style-name="standard">
      <style:graphic-properties draw:stroke="none" draw:fill="solid" draw:fill-color="#d0e9e9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29" style:family="graphic" style:parent-style-name="standard">
      <style:graphic-properties draw:stroke="none" draw:fill="solid" draw:fill-color="#d3e9e9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0" style:family="graphic" style:parent-style-name="standard">
      <style:graphic-properties draw:stroke="none" draw:fill="solid" draw:fill-color="#d5e9e9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1" style:family="graphic" style:parent-style-name="standard">
      <style:graphic-properties draw:stroke="none" draw:fill="solid" draw:fill-color="#d7ebeb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2" style:family="graphic" style:parent-style-name="standard">
      <style:graphic-properties draw:stroke="none" draw:fill="solid" draw:fill-color="#daeeee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3" style:family="graphic" style:parent-style-name="standard">
      <style:graphic-properties draw:stroke="none" draw:fill="solid" draw:fill-color="#ddeeee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4" style:family="graphic" style:parent-style-name="standard">
      <style:graphic-properties draw:stroke="none" draw:fill="solid" draw:fill-color="#dff0f0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5" style:family="graphic" style:parent-style-name="standard">
      <style:graphic-properties draw:stroke="none" draw:fill="solid" draw:fill-color="#e1f0f0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6" style:family="graphic" style:parent-style-name="standard">
      <style:graphic-properties draw:stroke="none" draw:fill="solid" draw:fill-color="#e4f3f3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7" style:family="graphic" style:parent-style-name="standard">
      <style:graphic-properties draw:stroke="none" draw:fill="solid" draw:fill-color="#e7f3f3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8" style:family="graphic" style:parent-style-name="standard">
      <style:graphic-properties draw:stroke="none" draw:fill="solid" draw:fill-color="#e9f5f5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39" style:family="graphic" style:parent-style-name="standard">
      <style:graphic-properties draw:stroke="none" draw:fill="solid" draw:fill-color="#ebf5f5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0" style:family="graphic" style:parent-style-name="standard">
      <style:graphic-properties draw:stroke="none" draw:fill="solid" draw:fill-color="#eef8f8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1" style:family="graphic" style:parent-style-name="standard">
      <style:graphic-properties draw:stroke="none" draw:fill="solid" draw:fill-color="#f1f8f8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2" style:family="graphic" style:parent-style-name="standard">
      <style:graphic-properties draw:stroke="none" draw:fill="solid" draw:fill-color="#f3fafa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3" style:family="graphic" style:parent-style-name="standard">
      <style:graphic-properties draw:stroke="none" draw:fill="solid" draw:fill-color="#f5fafa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4" style:family="graphic" style:parent-style-name="standard">
      <style:graphic-properties draw:stroke="none" draw:fill="solid" draw:fill-color="#f8fdfd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5" style:family="graphic" style:parent-style-name="standard">
      <style:graphic-properties draw:stroke="none" draw:fill="solid" draw:fill-color="#fbfdfd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6" style:family="graphic" style:parent-style-name="standard">
      <style:graphic-properties draw:stroke="none" draw:fill="solid" draw:fill-color="#fdffff" draw:textarea-horizontal-align="left" draw:textarea-vertical-align="top" draw:auto-grow-height="false" fo:min-height="0cm" fo:min-width="3.01cm" fo:padding-top="0.13cm" fo:padding-bottom="0.13cm" fo:padding-left="0.25cm" fo:padding-right="0.25cm" fo:wrap-option="wrap" draw:shadow-color="#5e574e" loext:decorative="false"/>
    </style:style>
    <style:style style:name="gr747" style:family="graphic" style:parent-style-name="standard">
      <style:graphic-properties draw:stroke="none" draw:fill="solid" draw:fill-color="#ffffff" draw:textarea-horizontal-align="left" draw:textarea-vertical-align="top" draw:auto-grow-height="false" fo:min-height="0.322cm" fo:min-width="3.01cm" fo:padding-top="0.13cm" fo:padding-bottom="0.13cm" fo:padding-left="0.25cm" fo:padding-right="0.25cm" fo:wrap-option="wrap" draw:shadow-color="#5e574e" loext:decorative="false"/>
    </style:style>
    <style:style style:name="gr748" style:family="graphic" style:parent-style-name="standard">
      <style:graphic-properties draw:stroke="none" draw:fill="solid" draw:fill-color="#339966" draw:textarea-horizontal-align="left" draw:textarea-vertical-align="top" draw:auto-grow-height="false" fo:min-height="0cm" fo:min-width="0.549cm" fo:padding-top="0.13cm" fo:padding-bottom="0.13cm" fo:padding-left="0.25cm" fo:padding-right="0.25cm" fo:wrap-option="wrap" draw:shadow-color="#5e574e" loext:decorative="false"/>
    </style:style>
    <style:style style:name="gr749" style:family="graphic" style:parent-style-name="standard">
      <style:graphic-properties draw:stroke="none" draw:fill="solid" draw:fill-color="#339966" draw:textarea-horizontal-align="left" draw:textarea-vertical-align="top" draw:auto-grow-height="false" fo:min-height="0cm" fo:min-width="0.223cm" fo:padding-top="0.13cm" fo:padding-bottom="0.13cm" fo:padding-left="0.25cm" fo:padding-right="0.25cm" fo:wrap-option="wrap" draw:shadow-color="#5e574e" loext:decorative="false"/>
    </style:style>
    <style:style style:name="gr750" style:family="graphic" style:parent-style-name="standard">
      <style:graphic-properties draw:stroke="none" draw:fill="solid" draw:fill-color="#000000" draw:textarea-horizontal-align="left" draw:textarea-vertical-align="top" draw:auto-grow-height="false" fo:min-height="0.26cm" fo:min-width="0cm" fo:padding-top="0.13cm" fo:padding-bottom="0.13cm" fo:padding-left="0.25cm" fo:padding-right="0.25cm" fo:wrap-option="wrap" draw:shadow-color="#5e574e" loext:decorative="false"/>
    </style:style>
    <style:style style:name="gr751" style:family="graphic" style:parent-style-name="standard">
      <style:graphic-properties draw:stroke="none" draw:fill="solid" draw:fill-color="#000000" draw:textarea-horizontal-align="left" draw:textarea-vertical-align="top" draw:auto-grow-height="false" fo:min-height="0.353cm" fo:min-width="0cm" fo:padding-top="0.13cm" fo:padding-bottom="0.13cm" fo:padding-left="0.25cm" fo:padding-right="0.25cm" fo:wrap-option="wrap" draw:shadow-color="#5e574e" loext:decorative="false"/>
    </style:style>
    <style:style style:name="gr752" style:family="graphic" style:parent-style-name="standard">
      <style:graphic-properties draw:stroke="none" draw:fill="solid" draw:fill-color="#000000" draw:textarea-horizontal-align="left" draw:textarea-vertical-align="top" draw:auto-grow-height="false" fo:min-height="0.212cm" fo:min-width="0cm" fo:padding-top="0.13cm" fo:padding-bottom="0.13cm" fo:padding-left="0.25cm" fo:padding-right="0.25cm" fo:wrap-option="wrap" draw:shadow-color="#5e574e" loext:decorative="false"/>
    </style:style>
    <style:style style:name="gr753" style:family="graphic" style:parent-style-name="standard">
      <style:graphic-properties draw:stroke="none" draw:fill="solid" draw:fill-color="#000000" draw:textarea-horizontal-align="left" draw:textarea-vertical-align="top" draw:auto-grow-height="false" fo:min-height="0.097cm" fo:min-width="0cm" fo:padding-top="0.13cm" fo:padding-bottom="0.13cm" fo:padding-left="0.25cm" fo:padding-right="0.25cm" fo:wrap-option="wrap" draw:shadow-color="#5e574e" loext:decorative="false"/>
    </style:style>
    <style:style style:name="gr754" style:family="graphic" style:parent-style-name="standard">
      <style:graphic-properties draw:stroke="none" draw:fill="solid" draw:fill-color="#000000" draw:textarea-horizontal-align="left" draw:textarea-vertical-align="top" draw:auto-grow-height="false" fo:min-height="0.335cm" fo:min-width="0cm" fo:padding-top="0.13cm" fo:padding-bottom="0.13cm" fo:padding-left="0.25cm" fo:padding-right="0.25cm" fo:wrap-option="wrap" draw:shadow-color="#5e574e" loext:decorative="false"/>
    </style:style>
    <style:style style:name="gr755" style:family="graphic" style:parent-style-name="standard">
      <style:graphic-properties draw:stroke="none" draw:fill="solid" draw:fill-color="#b3b3b3" draw:textarea-horizontal-align="left" draw:textarea-vertical-align="top" draw:auto-grow-height="false" fo:min-height="0.123cm" fo:min-width="0.624cm" fo:padding-top="0.13cm" fo:padding-bottom="0.13cm" fo:padding-left="0.25cm" fo:padding-right="0.25cm" fo:wrap-option="wrap" draw:shadow-color="#5e574e" loext:decorative="false"/>
    </style:style>
    <style:style style:name="gr756" style:family="graphic" style:parent-style-name="standard">
      <style:graphic-properties draw:stroke="none" draw:fill="solid" draw:fill-color="#808080" draw:textarea-horizontal-align="left" draw:textarea-vertical-align="top" draw:auto-grow-height="false" fo:min-height="0.26cm" fo:min-width="0.602cm" fo:padding-top="0.13cm" fo:padding-bottom="0.13cm" fo:padding-left="0.25cm" fo:padding-right="0.25cm" fo:wrap-option="wrap" draw:shadow-color="#5e574e" loext:decorative="false"/>
    </style:style>
    <style:style style:name="gr757" style:family="graphic" style:parent-style-name="standard">
      <style:graphic-properties draw:stroke="none" draw:fill="solid" draw:fill-color="#80808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58" style:family="graphic" style:parent-style-name="standard">
      <style:graphic-properties draw:stroke="none" draw:fill="solid" draw:fill-color="#7d7d7d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59" style:family="graphic" style:parent-style-name="standard">
      <style:graphic-properties draw:stroke="none" draw:fill="solid" draw:fill-color="#7b7b7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60" style:family="graphic" style:parent-style-name="standard">
      <style:graphic-properties draw:stroke="none" draw:fill="solid" draw:fill-color="#787878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61" style:family="graphic" style:parent-style-name="standard">
      <style:graphic-properties draw:stroke="none" draw:fill="solid" draw:fill-color="#76767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62" style:family="graphic" style:parent-style-name="standard">
      <style:graphic-properties draw:stroke="none" draw:fill="solid" draw:fill-color="#73737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63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64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047cm" fo:padding-top="0.13cm" fo:padding-bottom="0.13cm" fo:padding-left="0.25cm" fo:padding-right="0.25cm" fo:wrap-option="wrap" draw:shadow-color="#5e574e" loext:decorative="false"/>
    </style:style>
    <style:style style:name="gr765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.091cm" fo:padding-top="0.13cm" fo:padding-bottom="0.13cm" fo:padding-left="0.25cm" fo:padding-right="0.25cm" fo:wrap-option="wrap" draw:shadow-color="#5e574e" loext:decorative="false"/>
    </style:style>
    <style:style style:name="gr766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.143cm" fo:padding-top="0.13cm" fo:padding-bottom="0.13cm" fo:padding-left="0.25cm" fo:padding-right="0.25cm" fo:wrap-option="wrap" draw:shadow-color="#5e574e" loext:decorative="false"/>
    </style:style>
    <style:style style:name="gr767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.197cm" fo:padding-top="0.13cm" fo:padding-bottom="0.13cm" fo:padding-left="0.25cm" fo:padding-right="0.25cm" fo:wrap-option="wrap" draw:shadow-color="#5e574e" loext:decorative="false"/>
    </style:style>
    <style:style style:name="gr768" style:family="graphic" style:parent-style-name="standard">
      <style:graphic-properties draw:stroke="none" draw:fill="solid" draw:fill-color="#666666" draw:textarea-horizontal-align="left" draw:textarea-vertical-align="top" draw:auto-grow-height="false" fo:min-height="0cm" fo:min-width="0.254cm" fo:padding-top="0.13cm" fo:padding-bottom="0.13cm" fo:padding-left="0.25cm" fo:padding-right="0.25cm" fo:wrap-option="wrap" draw:shadow-color="#5e574e" loext:decorative="false"/>
    </style:style>
    <style:style style:name="gr769" style:family="graphic" style:parent-style-name="standard">
      <style:graphic-properties draw:stroke="none" draw:fill="solid" draw:fill-color="#666666" draw:textarea-horizontal-align="left" draw:textarea-vertical-align="top" draw:auto-grow-height="false" fo:min-height="0cm" fo:min-width="0.311cm" fo:padding-top="0.13cm" fo:padding-bottom="0.13cm" fo:padding-left="0.25cm" fo:padding-right="0.25cm" fo:wrap-option="wrap" draw:shadow-color="#5e574e" loext:decorative="false"/>
    </style:style>
    <style:style style:name="gr770" style:family="graphic" style:parent-style-name="standard">
      <style:graphic-properties draw:stroke="none" draw:fill="solid" draw:fill-color="#646464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771" style:family="graphic" style:parent-style-name="standard">
      <style:graphic-properties draw:stroke="none" draw:fill="solid" draw:fill-color="#616161" draw:textarea-horizontal-align="left" draw:textarea-vertical-align="top" draw:auto-grow-height="false" fo:min-height="0cm" fo:min-width="0.404cm" fo:padding-top="0.13cm" fo:padding-bottom="0.13cm" fo:padding-left="0.25cm" fo:padding-right="0.25cm" fo:wrap-option="wrap" draw:shadow-color="#5e574e" loext:decorative="false"/>
    </style:style>
    <style:style style:name="gr772" style:family="graphic" style:parent-style-name="standard">
      <style:graphic-properties draw:stroke="none" draw:fill="solid" draw:fill-color="#5f5f5f" draw:textarea-horizontal-align="left" draw:textarea-vertical-align="top" draw:auto-grow-height="false" fo:min-height="0cm" fo:min-width="0.408cm" fo:padding-top="0.13cm" fo:padding-bottom="0.13cm" fo:padding-left="0.25cm" fo:padding-right="0.25cm" fo:wrap-option="wrap" draw:shadow-color="#5e574e" loext:decorative="false"/>
    </style:style>
    <style:style style:name="gr773" style:family="graphic" style:parent-style-name="standard">
      <style:graphic-properties draw:stroke="none" draw:fill="solid" draw:fill-color="#5f5f5f" draw:textarea-horizontal-align="left" draw:textarea-vertical-align="top" draw:auto-grow-height="false" fo:min-height="0cm" fo:min-width="0.413cm" fo:padding-top="0.13cm" fo:padding-bottom="0.13cm" fo:padding-left="0.25cm" fo:padding-right="0.25cm" fo:wrap-option="wrap" draw:shadow-color="#5e574e" loext:decorative="false"/>
    </style:style>
    <style:style style:name="gr774" style:family="graphic" style:parent-style-name="standard">
      <style:graphic-properties draw:stroke="none" draw:fill="solid" draw:fill-color="#5c5c5c" draw:textarea-horizontal-align="left" draw:textarea-vertical-align="top" draw:auto-grow-height="false" fo:min-height="0cm" fo:min-width="0.399cm" fo:padding-top="0.13cm" fo:padding-bottom="0.13cm" fo:padding-left="0.25cm" fo:padding-right="0.25cm" fo:wrap-option="wrap" draw:shadow-color="#5e574e" loext:decorative="false"/>
    </style:style>
    <style:style style:name="gr775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391cm" fo:padding-top="0.13cm" fo:padding-bottom="0.13cm" fo:padding-left="0.25cm" fo:padding-right="0.25cm" fo:wrap-option="wrap" draw:shadow-color="#5e574e" loext:decorative="false"/>
    </style:style>
    <style:style style:name="gr776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386cm" fo:padding-top="0.13cm" fo:padding-bottom="0.13cm" fo:padding-left="0.25cm" fo:padding-right="0.25cm" fo:wrap-option="wrap" draw:shadow-color="#5e574e" loext:decorative="false"/>
    </style:style>
    <style:style style:name="gr777" style:family="graphic" style:parent-style-name="standard">
      <style:graphic-properties draw:stroke="none" draw:fill="solid" draw:fill-color="#575757" draw:textarea-horizontal-align="left" draw:textarea-vertical-align="top" draw:auto-grow-height="false" fo:min-height="0cm" fo:min-width="0.359cm" fo:padding-top="0.13cm" fo:padding-bottom="0.13cm" fo:padding-left="0.25cm" fo:padding-right="0.25cm" fo:wrap-option="wrap" draw:shadow-color="#5e574e" loext:decorative="false"/>
    </style:style>
    <style:style style:name="gr778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.333cm" fo:padding-top="0.13cm" fo:padding-bottom="0.13cm" fo:padding-left="0.25cm" fo:padding-right="0.25cm" fo:wrap-option="wrap" draw:shadow-color="#5e574e" loext:decorative="false"/>
    </style:style>
    <style:style style:name="gr779" style:family="graphic" style:parent-style-name="standard">
      <style:graphic-properties draw:stroke="none" draw:fill="solid" draw:fill-color="#525252" draw:textarea-horizontal-align="left" draw:textarea-vertical-align="top" draw:auto-grow-height="false" fo:min-height="0cm" fo:min-width="0.311cm" fo:padding-top="0.13cm" fo:padding-bottom="0.13cm" fo:padding-left="0.25cm" fo:padding-right="0.25cm" fo:wrap-option="wrap" draw:shadow-color="#5e574e" loext:decorative="false"/>
    </style:style>
    <style:style style:name="gr780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289cm" fo:padding-top="0.13cm" fo:padding-bottom="0.13cm" fo:padding-left="0.25cm" fo:padding-right="0.25cm" fo:wrap-option="wrap" draw:shadow-color="#5e574e" loext:decorative="false"/>
    </style:style>
    <style:style style:name="gr781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254cm" fo:padding-top="0.13cm" fo:padding-bottom="0.13cm" fo:padding-left="0.25cm" fo:padding-right="0.25cm" fo:wrap-option="wrap" draw:shadow-color="#5e574e" loext:decorative="false"/>
    </style:style>
    <style:style style:name="gr782" style:family="graphic" style:parent-style-name="standard">
      <style:graphic-properties draw:stroke="none" draw:fill="solid" draw:fill-color="#4d4d4d" draw:textarea-horizontal-align="left" draw:textarea-vertical-align="top" draw:auto-grow-height="false" fo:min-height="0cm" fo:min-width="0.223cm" fo:padding-top="0.13cm" fo:padding-bottom="0.13cm" fo:padding-left="0.25cm" fo:padding-right="0.25cm" fo:wrap-option="wrap" draw:shadow-color="#5e574e" loext:decorative="false"/>
    </style:style>
    <style:style style:name="gr783" style:family="graphic" style:parent-style-name="standard">
      <style:graphic-properties draw:stroke="none" draw:fill="solid" draw:fill-color="#4a4a4a" draw:textarea-horizontal-align="left" draw:textarea-vertical-align="top" draw:auto-grow-height="false" fo:min-height="0cm" fo:min-width="0.197cm" fo:padding-top="0.13cm" fo:padding-bottom="0.13cm" fo:padding-left="0.25cm" fo:padding-right="0.25cm" fo:wrap-option="wrap" draw:shadow-color="#5e574e" loext:decorative="false"/>
    </style:style>
    <style:style style:name="gr784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161cm" fo:padding-top="0.13cm" fo:padding-bottom="0.13cm" fo:padding-left="0.25cm" fo:padding-right="0.25cm" fo:wrap-option="wrap" draw:shadow-color="#5e574e" loext:decorative="false"/>
    </style:style>
    <style:style style:name="gr785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121cm" fo:padding-top="0.13cm" fo:padding-bottom="0.13cm" fo:padding-left="0.25cm" fo:padding-right="0.25cm" fo:wrap-option="wrap" draw:shadow-color="#5e574e" loext:decorative="false"/>
    </style:style>
    <style:style style:name="gr786" style:family="graphic" style:parent-style-name="standard">
      <style:graphic-properties draw:stroke="none" draw:fill="solid" draw:fill-color="#454545" draw:textarea-horizontal-align="left" draw:textarea-vertical-align="top" draw:auto-grow-height="false" fo:min-height="0cm" fo:min-width="0.086cm" fo:padding-top="0.13cm" fo:padding-bottom="0.13cm" fo:padding-left="0.25cm" fo:padding-right="0.25cm" fo:wrap-option="wrap" draw:shadow-color="#5e574e" loext:decorative="false"/>
    </style:style>
    <style:style style:name="gr787" style:family="graphic" style:parent-style-name="standard">
      <style:graphic-properties draw:stroke="none" draw:fill="solid" draw:fill-color="#434343" draw:textarea-horizontal-align="left" draw:textarea-vertical-align="top" draw:auto-grow-height="false" fo:min-height="0cm" fo:min-width="0.055cm" fo:padding-top="0.13cm" fo:padding-bottom="0.13cm" fo:padding-left="0.25cm" fo:padding-right="0.25cm" fo:wrap-option="wrap" draw:shadow-color="#5e574e" loext:decorative="false"/>
    </style:style>
    <style:style style:name="gr788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016cm" fo:padding-top="0.13cm" fo:padding-bottom="0.13cm" fo:padding-left="0.25cm" fo:padding-right="0.25cm" fo:wrap-option="wrap" draw:shadow-color="#5e574e" loext:decorative="false"/>
    </style:style>
    <style:style style:name="gr789" style:family="graphic" style:parent-style-name="standard">
      <style:graphic-properties draw:stroke="none" draw:fill="solid" draw:fill-color="#3e3e3e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90" style:family="graphic" style:parent-style-name="standard">
      <style:graphic-properties draw:stroke="none" draw:fill="solid" draw:fill-color="#3b3b3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91" style:family="graphic" style:parent-style-name="standard">
      <style:graphic-properties draw:stroke="none" draw:fill="solid" draw:fill-color="#39393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92" style:family="graphic" style:parent-style-name="standard">
      <style:graphic-properties draw:stroke="none" draw:fill="solid" draw:fill-color="#36363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93" style:family="graphic" style:parent-style-name="standard">
      <style:graphic-properties draw:stroke="none" draw:fill="solid" draw:fill-color="#33333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794" style:family="graphic" style:parent-style-name="standard">
      <style:graphic-properties draw:stroke="none" draw:fill="solid" draw:fill-color="#808080" draw:textarea-horizontal-align="left" draw:textarea-vertical-align="top" draw:auto-grow-height="false" fo:min-height="0.798cm" fo:min-width="0.444cm" fo:padding-top="0.13cm" fo:padding-bottom="0.13cm" fo:padding-left="0.25cm" fo:padding-right="0.25cm" fo:wrap-option="wrap" draw:shadow-color="#5e574e" loext:decorative="false"/>
    </style:style>
    <style:style style:name="gr795" style:family="graphic" style:parent-style-name="standard">
      <style:graphic-properties draw:stroke="none" draw:fill="solid" draw:fill-color="#808080" draw:textarea-horizontal-align="left" draw:textarea-vertical-align="top" draw:auto-grow-height="false" fo:min-height="0.017cm" fo:min-width="0.444cm" fo:padding-top="0.13cm" fo:padding-bottom="0.13cm" fo:padding-left="0.25cm" fo:padding-right="0.25cm" fo:wrap-option="wrap" draw:shadow-color="#5e574e" loext:decorative="false"/>
    </style:style>
    <style:style style:name="gr796" style:family="graphic" style:parent-style-name="standard">
      <style:graphic-properties draw:stroke="none" draw:fill="solid" draw:fill-color="#808080" draw:textarea-horizontal-align="left" draw:textarea-vertical-align="top" draw:auto-grow-height="false" fo:min-height="0cm" fo:min-width="0.166cm" fo:padding-top="0.13cm" fo:padding-bottom="0.13cm" fo:padding-left="0.25cm" fo:padding-right="0.25cm" fo:wrap-option="wrap" draw:shadow-color="#5e574e" loext:decorative="false"/>
    </style:style>
    <style:style style:name="gr797" style:family="graphic" style:parent-style-name="standard">
      <style:graphic-properties draw:stroke="none" draw:fill="solid" draw:fill-color="#808080" draw:textarea-horizontal-align="left" draw:textarea-vertical-align="top" draw:auto-grow-height="false" fo:min-height="0cm" fo:min-width="0.276cm" fo:padding-top="0.13cm" fo:padding-bottom="0.13cm" fo:padding-left="0.25cm" fo:padding-right="0.25cm" fo:wrap-option="wrap" draw:shadow-color="#5e574e" loext:decorative="false"/>
    </style:style>
    <style:style style:name="gr798" style:family="graphic" style:parent-style-name="standard">
      <style:graphic-properties draw:stroke="none" draw:fill="solid" draw:fill-color="#7d7d7d" draw:textarea-horizontal-align="left" draw:textarea-vertical-align="top" draw:auto-grow-height="false" fo:min-height="0cm" fo:min-width="0.387cm" fo:padding-top="0.13cm" fo:padding-bottom="0.13cm" fo:padding-left="0.25cm" fo:padding-right="0.25cm" fo:wrap-option="wrap" draw:shadow-color="#5e574e" loext:decorative="false"/>
    </style:style>
    <style:style style:name="gr799" style:family="graphic" style:parent-style-name="standard">
      <style:graphic-properties draw:stroke="none" draw:fill="solid" draw:fill-color="#7b7b7b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0" style:family="graphic" style:parent-style-name="standard">
      <style:graphic-properties draw:stroke="none" draw:fill="solid" draw:fill-color="#787878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1" style:family="graphic" style:parent-style-name="standard">
      <style:graphic-properties draw:stroke="none" draw:fill="solid" draw:fill-color="#767676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2" style:family="graphic" style:parent-style-name="standard">
      <style:graphic-properties draw:stroke="none" draw:fill="solid" draw:fill-color="#737373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3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4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5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6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7" style:family="graphic" style:parent-style-name="standard">
      <style:graphic-properties draw:stroke="none" draw:fill="solid" draw:fill-color="#666666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8" style:family="graphic" style:parent-style-name="standard">
      <style:graphic-properties draw:stroke="none" draw:fill="solid" draw:fill-color="#646464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09" style:family="graphic" style:parent-style-name="standard">
      <style:graphic-properties draw:stroke="none" draw:fill="solid" draw:fill-color="#616161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0" style:family="graphic" style:parent-style-name="standard">
      <style:graphic-properties draw:stroke="none" draw:fill="solid" draw:fill-color="#5f5f5f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1" style:family="graphic" style:parent-style-name="standard">
      <style:graphic-properties draw:stroke="none" draw:fill="solid" draw:fill-color="#5c5c5c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2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3" style:family="graphic" style:parent-style-name="standard">
      <style:graphic-properties draw:stroke="none" draw:fill="solid" draw:fill-color="#575757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4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5" style:family="graphic" style:parent-style-name="standard">
      <style:graphic-properties draw:stroke="none" draw:fill="solid" draw:fill-color="#525252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6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7" style:family="graphic" style:parent-style-name="standard">
      <style:graphic-properties draw:stroke="none" draw:fill="solid" draw:fill-color="#4d4d4d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8" style:family="graphic" style:parent-style-name="standard">
      <style:graphic-properties draw:stroke="none" draw:fill="solid" draw:fill-color="#4a4a4a" draw:textarea-horizontal-align="left" draw:textarea-vertical-align="top" draw:auto-grow-height="false" fo:min-height="0cm" fo:min-width="0.444cm" fo:padding-top="0.13cm" fo:padding-bottom="0.13cm" fo:padding-left="0.25cm" fo:padding-right="0.25cm" fo:wrap-option="wrap" draw:shadow-color="#5e574e" loext:decorative="false"/>
    </style:style>
    <style:style style:name="gr819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4cm" fo:padding-top="0.13cm" fo:padding-bottom="0.13cm" fo:padding-left="0.25cm" fo:padding-right="0.25cm" fo:wrap-option="wrap" draw:shadow-color="#5e574e" loext:decorative="false"/>
    </style:style>
    <style:style style:name="gr820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347cm" fo:padding-top="0.13cm" fo:padding-bottom="0.13cm" fo:padding-left="0.25cm" fo:padding-right="0.25cm" fo:wrap-option="wrap" draw:shadow-color="#5e574e" loext:decorative="false"/>
    </style:style>
    <style:style style:name="gr821" style:family="graphic" style:parent-style-name="standard">
      <style:graphic-properties draw:stroke="none" draw:fill="solid" draw:fill-color="#454545" draw:textarea-horizontal-align="left" draw:textarea-vertical-align="top" draw:auto-grow-height="false" fo:min-height="0cm" fo:min-width="0.289cm" fo:padding-top="0.13cm" fo:padding-bottom="0.13cm" fo:padding-left="0.25cm" fo:padding-right="0.25cm" fo:wrap-option="wrap" draw:shadow-color="#5e574e" loext:decorative="false"/>
    </style:style>
    <style:style style:name="gr822" style:family="graphic" style:parent-style-name="standard">
      <style:graphic-properties draw:stroke="none" draw:fill="solid" draw:fill-color="#434343" draw:textarea-horizontal-align="left" draw:textarea-vertical-align="top" draw:auto-grow-height="false" fo:min-height="0cm" fo:min-width="0.232cm" fo:padding-top="0.13cm" fo:padding-bottom="0.13cm" fo:padding-left="0.25cm" fo:padding-right="0.25cm" fo:wrap-option="wrap" draw:shadow-color="#5e574e" loext:decorative="false"/>
    </style:style>
    <style:style style:name="gr823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179cm" fo:padding-top="0.13cm" fo:padding-bottom="0.13cm" fo:padding-left="0.25cm" fo:padding-right="0.25cm" fo:wrap-option="wrap" draw:shadow-color="#5e574e" loext:decorative="false"/>
    </style:style>
    <style:style style:name="gr824" style:family="graphic" style:parent-style-name="standard">
      <style:graphic-properties draw:stroke="none" draw:fill="solid" draw:fill-color="#3e3e3e" draw:textarea-horizontal-align="left" draw:textarea-vertical-align="top" draw:auto-grow-height="false" fo:min-height="0cm" fo:min-width="0.118cm" fo:padding-top="0.13cm" fo:padding-bottom="0.13cm" fo:padding-left="0.25cm" fo:padding-right="0.25cm" fo:wrap-option="wrap" draw:shadow-color="#5e574e" loext:decorative="false"/>
    </style:style>
    <style:style style:name="gr825" style:family="graphic" style:parent-style-name="standard">
      <style:graphic-properties draw:stroke="none" draw:fill="solid" draw:fill-color="#3e3e3e" draw:textarea-horizontal-align="left" draw:textarea-vertical-align="top" draw:auto-grow-height="false" fo:min-height="0cm" fo:min-width="0.069cm" fo:padding-top="0.13cm" fo:padding-bottom="0.13cm" fo:padding-left="0.25cm" fo:padding-right="0.25cm" fo:wrap-option="wrap" draw:shadow-color="#5e574e" loext:decorative="false"/>
    </style:style>
    <style:style style:name="gr826" style:family="graphic" style:parent-style-name="standard">
      <style:graphic-properties draw:stroke="none" draw:fill="solid" draw:fill-color="#3b3b3b" draw:textarea-horizontal-align="left" draw:textarea-vertical-align="top" draw:auto-grow-height="false" fo:min-height="0cm" fo:min-width="0.007cm" fo:padding-top="0.13cm" fo:padding-bottom="0.13cm" fo:padding-left="0.25cm" fo:padding-right="0.25cm" fo:wrap-option="wrap" draw:shadow-color="#5e574e" loext:decorative="false"/>
    </style:style>
    <style:style style:name="gr827" style:family="graphic" style:parent-style-name="standard">
      <style:graphic-properties draw:stroke="none" draw:fill="solid" draw:fill-color="#787878" draw:textarea-horizontal-align="left" draw:textarea-vertical-align="top" draw:auto-grow-height="false" fo:min-height="0cm" fo:min-width="0.029cm" fo:padding-top="0.13cm" fo:padding-bottom="0.13cm" fo:padding-left="0.25cm" fo:padding-right="0.25cm" fo:wrap-option="wrap" draw:shadow-color="#5e574e" loext:decorative="false"/>
    </style:style>
    <style:style style:name="gr828" style:family="graphic" style:parent-style-name="standard">
      <style:graphic-properties draw:stroke="none" draw:fill="solid" draw:fill-color="#767676" draw:textarea-horizontal-align="left" draw:textarea-vertical-align="top" draw:auto-grow-height="false" fo:min-height="0cm" fo:min-width="0.078cm" fo:padding-top="0.13cm" fo:padding-bottom="0.13cm" fo:padding-left="0.25cm" fo:padding-right="0.25cm" fo:wrap-option="wrap" draw:shadow-color="#5e574e" loext:decorative="false"/>
    </style:style>
    <style:style style:name="gr829" style:family="graphic" style:parent-style-name="standard">
      <style:graphic-properties draw:stroke="none" draw:fill="solid" draw:fill-color="#737373" draw:textarea-horizontal-align="left" draw:textarea-vertical-align="top" draw:auto-grow-height="false" fo:min-height="0cm" fo:min-width="0.122cm" fo:padding-top="0.13cm" fo:padding-bottom="0.13cm" fo:padding-left="0.25cm" fo:padding-right="0.25cm" fo:wrap-option="wrap" draw:shadow-color="#5e574e" loext:decorative="false"/>
    </style:style>
    <style:style style:name="gr830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175cm" fo:padding-top="0.13cm" fo:padding-bottom="0.13cm" fo:padding-left="0.25cm" fo:padding-right="0.25cm" fo:wrap-option="wrap" draw:shadow-color="#5e574e" loext:decorative="false"/>
    </style:style>
    <style:style style:name="gr831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219cm" fo:padding-top="0.13cm" fo:padding-bottom="0.13cm" fo:padding-left="0.25cm" fo:padding-right="0.25cm" fo:wrap-option="wrap" draw:shadow-color="#5e574e" loext:decorative="false"/>
    </style:style>
    <style:style style:name="gr832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.267cm" fo:padding-top="0.13cm" fo:padding-bottom="0.13cm" fo:padding-left="0.25cm" fo:padding-right="0.25cm" fo:wrap-option="wrap" draw:shadow-color="#5e574e" loext:decorative="false"/>
    </style:style>
    <style:style style:name="gr833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.316cm" fo:padding-top="0.13cm" fo:padding-bottom="0.13cm" fo:padding-left="0.25cm" fo:padding-right="0.25cm" fo:wrap-option="wrap" draw:shadow-color="#5e574e" loext:decorative="false"/>
    </style:style>
    <style:style style:name="gr834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.364cm" fo:padding-top="0.13cm" fo:padding-bottom="0.13cm" fo:padding-left="0.25cm" fo:padding-right="0.25cm" fo:wrap-option="wrap" draw:shadow-color="#5e574e" loext:decorative="false"/>
    </style:style>
    <style:style style:name="gr835" style:family="graphic" style:parent-style-name="standard">
      <style:graphic-properties draw:stroke="none" draw:fill="solid" draw:fill-color="#666666" draw:textarea-horizontal-align="left" draw:textarea-vertical-align="top" draw:auto-grow-height="false" fo:min-height="0cm" fo:min-width="0.409cm" fo:padding-top="0.13cm" fo:padding-bottom="0.13cm" fo:padding-left="0.25cm" fo:padding-right="0.25cm" fo:wrap-option="wrap" draw:shadow-color="#5e574e" loext:decorative="false"/>
    </style:style>
    <style:style style:name="gr836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422cm" fo:padding-top="0.13cm" fo:padding-bottom="0.13cm" fo:padding-left="0.25cm" fo:padding-right="0.25cm" fo:wrap-option="wrap" draw:shadow-color="#5e574e" loext:decorative="false"/>
    </style:style>
    <style:style style:name="gr837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382cm" fo:padding-top="0.13cm" fo:padding-bottom="0.13cm" fo:padding-left="0.25cm" fo:padding-right="0.25cm" fo:wrap-option="wrap" draw:shadow-color="#5e574e" loext:decorative="false"/>
    </style:style>
    <style:style style:name="gr838" style:family="graphic" style:parent-style-name="standard">
      <style:graphic-properties draw:stroke="none" draw:fill="solid" draw:fill-color="#575757" draw:textarea-horizontal-align="left" draw:textarea-vertical-align="top" draw:auto-grow-height="false" fo:min-height="0cm" fo:min-width="0.347cm" fo:padding-top="0.13cm" fo:padding-bottom="0.13cm" fo:padding-left="0.25cm" fo:padding-right="0.25cm" fo:wrap-option="wrap" draw:shadow-color="#5e574e" loext:decorative="false"/>
    </style:style>
    <style:style style:name="gr839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.312cm" fo:padding-top="0.13cm" fo:padding-bottom="0.13cm" fo:padding-left="0.25cm" fo:padding-right="0.25cm" fo:wrap-option="wrap" draw:shadow-color="#5e574e" loext:decorative="false"/>
    </style:style>
    <style:style style:name="gr840" style:family="graphic" style:parent-style-name="standard">
      <style:graphic-properties draw:stroke="none" draw:fill="solid" draw:fill-color="#525252" draw:textarea-horizontal-align="left" draw:textarea-vertical-align="top" draw:auto-grow-height="false" fo:min-height="0cm" fo:min-width="0.272cm" fo:padding-top="0.13cm" fo:padding-bottom="0.13cm" fo:padding-left="0.25cm" fo:padding-right="0.25cm" fo:wrap-option="wrap" draw:shadow-color="#5e574e" loext:decorative="false"/>
    </style:style>
    <style:style style:name="gr841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237cm" fo:padding-top="0.13cm" fo:padding-bottom="0.13cm" fo:padding-left="0.25cm" fo:padding-right="0.25cm" fo:wrap-option="wrap" draw:shadow-color="#5e574e" loext:decorative="false"/>
    </style:style>
    <style:style style:name="gr842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201cm" fo:padding-top="0.13cm" fo:padding-bottom="0.13cm" fo:padding-left="0.25cm" fo:padding-right="0.25cm" fo:wrap-option="wrap" draw:shadow-color="#5e574e" loext:decorative="false"/>
    </style:style>
    <style:style style:name="gr843" style:family="graphic" style:parent-style-name="standard">
      <style:graphic-properties draw:stroke="none" draw:fill="solid" draw:fill-color="#4d4d4d" draw:textarea-horizontal-align="left" draw:textarea-vertical-align="top" draw:auto-grow-height="false" fo:min-height="0cm" fo:min-width="0.162cm" fo:padding-top="0.13cm" fo:padding-bottom="0.13cm" fo:padding-left="0.25cm" fo:padding-right="0.25cm" fo:wrap-option="wrap" draw:shadow-color="#5e574e" loext:decorative="false"/>
    </style:style>
    <style:style style:name="gr844" style:family="graphic" style:parent-style-name="standard">
      <style:graphic-properties draw:stroke="none" draw:fill="solid" draw:fill-color="#4a4a4a" draw:textarea-horizontal-align="left" draw:textarea-vertical-align="top" draw:auto-grow-height="false" fo:min-height="0cm" fo:min-width="0.126cm" fo:padding-top="0.13cm" fo:padding-bottom="0.13cm" fo:padding-left="0.25cm" fo:padding-right="0.25cm" fo:wrap-option="wrap" draw:shadow-color="#5e574e" loext:decorative="false"/>
    </style:style>
    <style:style style:name="gr845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091cm" fo:padding-top="0.13cm" fo:padding-bottom="0.13cm" fo:padding-left="0.25cm" fo:padding-right="0.25cm" fo:wrap-option="wrap" draw:shadow-color="#5e574e" loext:decorative="false"/>
    </style:style>
    <style:style style:name="gr846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051cm" fo:padding-top="0.13cm" fo:padding-bottom="0.13cm" fo:padding-left="0.25cm" fo:padding-right="0.25cm" fo:wrap-option="wrap" draw:shadow-color="#5e574e" loext:decorative="false"/>
    </style:style>
    <style:style style:name="gr847" style:family="graphic" style:parent-style-name="standard">
      <style:graphic-properties draw:stroke="none" draw:fill="solid" draw:fill-color="#454545" draw:textarea-horizontal-align="left" draw:textarea-vertical-align="top" draw:auto-grow-height="false" fo:min-height="0cm" fo:min-width="0.016cm" fo:padding-top="0.13cm" fo:padding-bottom="0.13cm" fo:padding-left="0.25cm" fo:padding-right="0.25cm" fo:wrap-option="wrap" draw:shadow-color="#5e574e" loext:decorative="false"/>
    </style:style>
    <style:style style:name="gr848" style:family="graphic" style:parent-style-name="standard">
      <style:graphic-properties draw:stroke="none" draw:fill="solid" draw:fill-color="#43434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849" style:family="graphic" style:parent-style-name="standard">
      <style:graphic-properties draw:stroke="none" draw:fill="solid" draw:fill-color="#b3b3b3" draw:textarea-horizontal-align="left" draw:textarea-vertical-align="top" draw:auto-grow-height="false" fo:min-height="0.08cm" fo:min-width="0.466cm" fo:padding-top="0.13cm" fo:padding-bottom="0.13cm" fo:padding-left="0.25cm" fo:padding-right="0.25cm" fo:wrap-option="wrap" draw:shadow-color="#5e574e" loext:decorative="false"/>
    </style:style>
    <style:style style:name="gr85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453cm" fo:padding-top="0.13cm" fo:padding-bottom="0.13cm" fo:padding-left="0.25cm" fo:padding-right="0.25cm" fo:wrap-option="wrap" draw:shadow-color="#5e574e" loext:decorative="false"/>
    </style:style>
    <style:style style:name="gr851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51cm" fo:padding-top="0.13cm" fo:padding-bottom="0.13cm" fo:padding-left="0.25cm" fo:padding-right="0.25cm" fo:wrap-option="wrap" draw:shadow-color="#5e574e" loext:decorative="false"/>
    </style:style>
    <style:style style:name="gr852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457cm" fo:padding-top="0.13cm" fo:padding-bottom="0.13cm" fo:padding-left="0.25cm" fo:padding-right="0.25cm" fo:wrap-option="wrap" draw:shadow-color="#5e574e" loext:decorative="false"/>
    </style:style>
    <style:style style:name="gr853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54cm" fo:padding-top="0.13cm" fo:padding-bottom="0.13cm" fo:padding-left="0.25cm" fo:padding-right="0.25cm" fo:wrap-option="wrap" draw:shadow-color="#5e574e" loext:decorative="false"/>
    </style:style>
    <style:style style:name="gr854" style:family="graphic" style:parent-style-name="standard">
      <style:graphic-properties draw:stroke="none" draw:fill="solid" draw:fill-color="#666666" draw:textarea-horizontal-align="left" draw:textarea-vertical-align="top" draw:auto-grow-height="false" fo:min-height="0.119cm" fo:min-width="0.607cm" fo:padding-top="0.13cm" fo:padding-bottom="0.13cm" fo:padding-left="0.25cm" fo:padding-right="0.25cm" fo:wrap-option="wrap" draw:shadow-color="#5e574e" loext:decorative="false"/>
    </style:style>
    <style:style style:name="gr855" style:family="graphic" style:parent-style-name="standard">
      <style:graphic-properties draw:stroke="none" draw:fill="solid" draw:fill-color="#666666" draw:textarea-horizontal-align="left" draw:textarea-vertical-align="top" draw:auto-grow-height="false" fo:min-height="0.393cm" fo:min-width="0.642cm" fo:padding-top="0.13cm" fo:padding-bottom="0.13cm" fo:padding-left="0.25cm" fo:padding-right="0.25cm" fo:wrap-option="wrap" draw:shadow-color="#5e574e" loext:decorative="false"/>
    </style:style>
    <style:style style:name="gr856" style:family="graphic" style:parent-style-name="standard">
      <style:graphic-properties draw:stroke="none" draw:fill="solid" draw:fill-color="#808080" draw:textarea-horizontal-align="left" draw:textarea-vertical-align="top" draw:auto-grow-height="false" fo:min-height="0.851cm" fo:min-width="0.36cm" fo:padding-top="0.13cm" fo:padding-bottom="0.13cm" fo:padding-left="0.25cm" fo:padding-right="0.25cm" fo:wrap-option="wrap" draw:shadow-color="#5e574e" loext:decorative="false"/>
    </style:style>
    <style:style style:name="gr857" style:family="graphic" style:parent-style-name="standard">
      <style:graphic-properties draw:stroke="none" draw:fill="solid" draw:fill-color="#787878" draw:textarea-horizontal-align="left" draw:textarea-vertical-align="top" draw:auto-grow-height="false" fo:min-height="0cm" fo:min-width="0.025cm" fo:padding-top="0.13cm" fo:padding-bottom="0.13cm" fo:padding-left="0.25cm" fo:padding-right="0.25cm" fo:wrap-option="wrap" draw:shadow-color="#5e574e" loext:decorative="false"/>
    </style:style>
    <style:style style:name="gr858" style:family="graphic" style:parent-style-name="standard">
      <style:graphic-properties draw:stroke="none" draw:fill="solid" draw:fill-color="#767676" draw:textarea-horizontal-align="left" draw:textarea-vertical-align="top" draw:auto-grow-height="false" fo:min-height="0cm" fo:min-width="0.069cm" fo:padding-top="0.13cm" fo:padding-bottom="0.13cm" fo:padding-left="0.25cm" fo:padding-right="0.25cm" fo:wrap-option="wrap" draw:shadow-color="#5e574e" loext:decorative="false"/>
    </style:style>
    <style:style style:name="gr859" style:family="graphic" style:parent-style-name="standard">
      <style:graphic-properties draw:stroke="none" draw:fill="solid" draw:fill-color="#737373" draw:textarea-horizontal-align="left" draw:textarea-vertical-align="top" draw:auto-grow-height="false" fo:min-height="0cm" fo:min-width="0.118cm" fo:padding-top="0.13cm" fo:padding-bottom="0.13cm" fo:padding-left="0.25cm" fo:padding-right="0.25cm" fo:wrap-option="wrap" draw:shadow-color="#5e574e" loext:decorative="false"/>
    </style:style>
    <style:style style:name="gr860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166cm" fo:padding-top="0.13cm" fo:padding-bottom="0.13cm" fo:padding-left="0.25cm" fo:padding-right="0.25cm" fo:wrap-option="wrap" draw:shadow-color="#5e574e" loext:decorative="false"/>
    </style:style>
    <style:style style:name="gr861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862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.254cm" fo:padding-top="0.13cm" fo:padding-bottom="0.13cm" fo:padding-left="0.25cm" fo:padding-right="0.25cm" fo:wrap-option="wrap" draw:shadow-color="#5e574e" loext:decorative="false"/>
    </style:style>
    <style:style style:name="gr863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.307cm" fo:padding-top="0.13cm" fo:padding-bottom="0.13cm" fo:padding-left="0.25cm" fo:padding-right="0.25cm" fo:wrap-option="wrap" draw:shadow-color="#5e574e" loext:decorative="false"/>
    </style:style>
    <style:style style:name="gr864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.356cm" fo:padding-top="0.13cm" fo:padding-bottom="0.13cm" fo:padding-left="0.25cm" fo:padding-right="0.25cm" fo:wrap-option="wrap" draw:shadow-color="#5e574e" loext:decorative="false"/>
    </style:style>
    <style:style style:name="gr865" style:family="graphic" style:parent-style-name="standard">
      <style:graphic-properties draw:stroke="none" draw:fill="solid" draw:fill-color="#666666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66" style:family="graphic" style:parent-style-name="standard">
      <style:graphic-properties draw:stroke="none" draw:fill="solid" draw:fill-color="#616161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67" style:family="graphic" style:parent-style-name="standard">
      <style:graphic-properties draw:stroke="none" draw:fill="solid" draw:fill-color="#5f5f5f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68" style:family="graphic" style:parent-style-name="standard">
      <style:graphic-properties draw:stroke="none" draw:fill="solid" draw:fill-color="#5c5c5c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69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70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.338cm" fo:padding-top="0.13cm" fo:padding-bottom="0.13cm" fo:padding-left="0.25cm" fo:padding-right="0.25cm" fo:wrap-option="wrap" draw:shadow-color="#5e574e" loext:decorative="false"/>
    </style:style>
    <style:style style:name="gr871" style:family="graphic" style:parent-style-name="standard">
      <style:graphic-properties draw:stroke="none" draw:fill="solid" draw:fill-color="#575757" draw:textarea-horizontal-align="left" draw:textarea-vertical-align="top" draw:auto-grow-height="false" fo:min-height="0cm" fo:min-width="0.307cm" fo:padding-top="0.13cm" fo:padding-bottom="0.13cm" fo:padding-left="0.25cm" fo:padding-right="0.25cm" fo:wrap-option="wrap" draw:shadow-color="#5e574e" loext:decorative="false"/>
    </style:style>
    <style:style style:name="gr872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.271cm" fo:padding-top="0.13cm" fo:padding-bottom="0.13cm" fo:padding-left="0.25cm" fo:padding-right="0.25cm" fo:wrap-option="wrap" draw:shadow-color="#5e574e" loext:decorative="false"/>
    </style:style>
    <style:style style:name="gr873" style:family="graphic" style:parent-style-name="standard">
      <style:graphic-properties draw:stroke="none" draw:fill="solid" draw:fill-color="#525252" draw:textarea-horizontal-align="left" draw:textarea-vertical-align="top" draw:auto-grow-height="false" fo:min-height="0cm" fo:min-width="0.236cm" fo:padding-top="0.13cm" fo:padding-bottom="0.13cm" fo:padding-left="0.25cm" fo:padding-right="0.25cm" fo:wrap-option="wrap" draw:shadow-color="#5e574e" loext:decorative="false"/>
    </style:style>
    <style:style style:name="gr874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205cm" fo:padding-top="0.13cm" fo:padding-bottom="0.13cm" fo:padding-left="0.25cm" fo:padding-right="0.25cm" fo:wrap-option="wrap" draw:shadow-color="#5e574e" loext:decorative="false"/>
    </style:style>
    <style:style style:name="gr875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166cm" fo:padding-top="0.13cm" fo:padding-bottom="0.13cm" fo:padding-left="0.25cm" fo:padding-right="0.25cm" fo:wrap-option="wrap" draw:shadow-color="#5e574e" loext:decorative="false"/>
    </style:style>
    <style:style style:name="gr876" style:family="graphic" style:parent-style-name="standard">
      <style:graphic-properties draw:stroke="none" draw:fill="solid" draw:fill-color="#4d4d4d" draw:textarea-horizontal-align="left" draw:textarea-vertical-align="top" draw:auto-grow-height="false" fo:min-height="0cm" fo:min-width="0.13cm" fo:padding-top="0.13cm" fo:padding-bottom="0.13cm" fo:padding-left="0.25cm" fo:padding-right="0.25cm" fo:wrap-option="wrap" draw:shadow-color="#5e574e" loext:decorative="false"/>
    </style:style>
    <style:style style:name="gr877" style:family="graphic" style:parent-style-name="standard">
      <style:graphic-properties draw:stroke="none" draw:fill="solid" draw:fill-color="#4a4a4a" draw:textarea-horizontal-align="left" draw:textarea-vertical-align="top" draw:auto-grow-height="false" fo:min-height="0cm" fo:min-width="0.095cm" fo:padding-top="0.13cm" fo:padding-bottom="0.13cm" fo:padding-left="0.25cm" fo:padding-right="0.25cm" fo:wrap-option="wrap" draw:shadow-color="#5e574e" loext:decorative="false"/>
    </style:style>
    <style:style style:name="gr878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06cm" fo:padding-top="0.13cm" fo:padding-bottom="0.13cm" fo:padding-left="0.25cm" fo:padding-right="0.25cm" fo:wrap-option="wrap" draw:shadow-color="#5e574e" loext:decorative="false"/>
    </style:style>
    <style:style style:name="gr879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029cm" fo:padding-top="0.13cm" fo:padding-bottom="0.13cm" fo:padding-left="0.25cm" fo:padding-right="0.25cm" fo:wrap-option="wrap" draw:shadow-color="#5e574e" loext:decorative="false"/>
    </style:style>
    <style:style style:name="gr880" style:family="graphic" style:parent-style-name="standard">
      <style:graphic-properties draw:stroke="none" draw:fill="solid" draw:fill-color="#45454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881" style:family="graphic" style:parent-style-name="standard">
      <style:graphic-properties draw:stroke="none" draw:fill="solid" draw:fill-color="#808080" draw:textarea-horizontal-align="left" draw:textarea-vertical-align="top" draw:auto-grow-height="false" fo:min-height="0.031cm" fo:min-width="0.36cm" fo:padding-top="0.13cm" fo:padding-bottom="0.13cm" fo:padding-left="0.25cm" fo:padding-right="0.25cm" fo:wrap-option="wrap" draw:shadow-color="#5e574e" loext:decorative="false"/>
    </style:style>
    <style:style style:name="gr882" style:family="graphic" style:parent-style-name="standard">
      <style:graphic-properties draw:stroke="none" draw:fill="solid" draw:fill-color="#808080" draw:textarea-horizontal-align="left" draw:textarea-vertical-align="top" draw:auto-grow-height="false" fo:min-height="0cm" fo:min-width="0.012cm" fo:padding-top="0.13cm" fo:padding-bottom="0.13cm" fo:padding-left="0.25cm" fo:padding-right="0.25cm" fo:wrap-option="wrap" draw:shadow-color="#5e574e" loext:decorative="false"/>
    </style:style>
    <style:style style:name="gr883" style:family="graphic" style:parent-style-name="standard">
      <style:graphic-properties draw:stroke="none" draw:fill="solid" draw:fill-color="#808080" draw:textarea-horizontal-align="left" draw:textarea-vertical-align="top" draw:auto-grow-height="false" fo:min-height="0cm" fo:min-width="0.1cm" fo:padding-top="0.13cm" fo:padding-bottom="0.13cm" fo:padding-left="0.25cm" fo:padding-right="0.25cm" fo:wrap-option="wrap" draw:shadow-color="#5e574e" loext:decorative="false"/>
    </style:style>
    <style:style style:name="gr884" style:family="graphic" style:parent-style-name="standard">
      <style:graphic-properties draw:stroke="none" draw:fill="solid" draw:fill-color="#7d7d7d" draw:textarea-horizontal-align="left" draw:textarea-vertical-align="top" draw:auto-grow-height="false" fo:min-height="0cm" fo:min-width="0.184cm" fo:padding-top="0.13cm" fo:padding-bottom="0.13cm" fo:padding-left="0.25cm" fo:padding-right="0.25cm" fo:wrap-option="wrap" draw:shadow-color="#5e574e" loext:decorative="false"/>
    </style:style>
    <style:style style:name="gr885" style:family="graphic" style:parent-style-name="standard">
      <style:graphic-properties draw:stroke="none" draw:fill="solid" draw:fill-color="#7b7b7b" draw:textarea-horizontal-align="left" draw:textarea-vertical-align="top" draw:auto-grow-height="false" fo:min-height="0cm" fo:min-width="0.268cm" fo:padding-top="0.13cm" fo:padding-bottom="0.13cm" fo:padding-left="0.25cm" fo:padding-right="0.25cm" fo:wrap-option="wrap" draw:shadow-color="#5e574e" loext:decorative="false"/>
    </style:style>
    <style:style style:name="gr886" style:family="graphic" style:parent-style-name="standard">
      <style:graphic-properties draw:stroke="none" draw:fill="solid" draw:fill-color="#7b7b7b" draw:textarea-horizontal-align="left" draw:textarea-vertical-align="top" draw:auto-grow-height="false" fo:min-height="0cm" fo:min-width="0.351cm" fo:padding-top="0.13cm" fo:padding-bottom="0.13cm" fo:padding-left="0.25cm" fo:padding-right="0.25cm" fo:wrap-option="wrap" draw:shadow-color="#5e574e" loext:decorative="false"/>
    </style:style>
    <style:style style:name="gr887" style:family="graphic" style:parent-style-name="standard">
      <style:graphic-properties draw:stroke="none" draw:fill="solid" draw:fill-color="#787878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88" style:family="graphic" style:parent-style-name="standard">
      <style:graphic-properties draw:stroke="none" draw:fill="solid" draw:fill-color="#767676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89" style:family="graphic" style:parent-style-name="standard">
      <style:graphic-properties draw:stroke="none" draw:fill="solid" draw:fill-color="#737373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0" style:family="graphic" style:parent-style-name="standard">
      <style:graphic-properties draw:stroke="none" draw:fill="solid" draw:fill-color="#717171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1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2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3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4" style:family="graphic" style:parent-style-name="standard">
      <style:graphic-properties draw:stroke="none" draw:fill="solid" draw:fill-color="#575757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5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6" style:family="graphic" style:parent-style-name="standard">
      <style:graphic-properties draw:stroke="none" draw:fill="solid" draw:fill-color="#525252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7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8" style:family="graphic" style:parent-style-name="standard">
      <style:graphic-properties draw:stroke="none" draw:fill="solid" draw:fill-color="#4d4d4d" draw:textarea-horizontal-align="left" draw:textarea-vertical-align="top" draw:auto-grow-height="false" fo:min-height="0cm" fo:min-width="0.36cm" fo:padding-top="0.13cm" fo:padding-bottom="0.13cm" fo:padding-left="0.25cm" fo:padding-right="0.25cm" fo:wrap-option="wrap" draw:shadow-color="#5e574e" loext:decorative="false"/>
    </style:style>
    <style:style style:name="gr899" style:family="graphic" style:parent-style-name="standard">
      <style:graphic-properties draw:stroke="none" draw:fill="solid" draw:fill-color="#4a4a4a" draw:textarea-horizontal-align="left" draw:textarea-vertical-align="top" draw:auto-grow-height="false" fo:min-height="0cm" fo:min-width="0.307cm" fo:padding-top="0.13cm" fo:padding-bottom="0.13cm" fo:padding-left="0.25cm" fo:padding-right="0.25cm" fo:wrap-option="wrap" draw:shadow-color="#5e574e" loext:decorative="false"/>
    </style:style>
    <style:style style:name="gr900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258cm" fo:padding-top="0.13cm" fo:padding-bottom="0.13cm" fo:padding-left="0.25cm" fo:padding-right="0.25cm" fo:wrap-option="wrap" draw:shadow-color="#5e574e" loext:decorative="false"/>
    </style:style>
    <style:style style:name="gr901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.214cm" fo:padding-top="0.13cm" fo:padding-bottom="0.13cm" fo:padding-left="0.25cm" fo:padding-right="0.25cm" fo:wrap-option="wrap" draw:shadow-color="#5e574e" loext:decorative="false"/>
    </style:style>
    <style:style style:name="gr902" style:family="graphic" style:parent-style-name="standard">
      <style:graphic-properties draw:stroke="none" draw:fill="solid" draw:fill-color="#454545" draw:textarea-horizontal-align="left" draw:textarea-vertical-align="top" draw:auto-grow-height="false" fo:min-height="0cm" fo:min-width="0.166cm" fo:padding-top="0.13cm" fo:padding-bottom="0.13cm" fo:padding-left="0.25cm" fo:padding-right="0.25cm" fo:wrap-option="wrap" draw:shadow-color="#5e574e" loext:decorative="false"/>
    </style:style>
    <style:style style:name="gr903" style:family="graphic" style:parent-style-name="standard">
      <style:graphic-properties draw:stroke="none" draw:fill="solid" draw:fill-color="#434343" draw:textarea-horizontal-align="left" draw:textarea-vertical-align="top" draw:auto-grow-height="false" fo:min-height="0cm" fo:min-width="0.121cm" fo:padding-top="0.13cm" fo:padding-bottom="0.13cm" fo:padding-left="0.25cm" fo:padding-right="0.25cm" fo:wrap-option="wrap" draw:shadow-color="#5e574e" loext:decorative="false"/>
    </style:style>
    <style:style style:name="gr904" style:family="graphic" style:parent-style-name="standard">
      <style:graphic-properties draw:stroke="none" draw:fill="solid" draw:fill-color="#404040" draw:textarea-horizontal-align="left" draw:textarea-vertical-align="top" draw:auto-grow-height="false" fo:min-height="0cm" fo:min-width="0.073cm" fo:padding-top="0.13cm" fo:padding-bottom="0.13cm" fo:padding-left="0.25cm" fo:padding-right="0.25cm" fo:wrap-option="wrap" draw:shadow-color="#5e574e" loext:decorative="false"/>
    </style:style>
    <style:style style:name="gr905" style:family="graphic" style:parent-style-name="standard">
      <style:graphic-properties draw:stroke="none" draw:fill="solid" draw:fill-color="#3e3e3e" draw:textarea-horizontal-align="left" draw:textarea-vertical-align="top" draw:auto-grow-height="false" fo:min-height="0cm" fo:min-width="0.029cm" fo:padding-top="0.13cm" fo:padding-bottom="0.13cm" fo:padding-left="0.25cm" fo:padding-right="0.25cm" fo:wrap-option="wrap" draw:shadow-color="#5e574e" loext:decorative="false"/>
    </style:style>
    <style:style style:name="gr906" style:family="graphic" style:parent-style-name="standard">
      <style:graphic-properties draw:stroke="none" draw:fill="solid" draw:fill-color="#b3b3b3" draw:textarea-horizontal-align="left" draw:textarea-vertical-align="top" draw:auto-grow-height="false" fo:min-height="0.358cm" fo:min-width="0.368cm" fo:padding-top="0.13cm" fo:padding-bottom="0.13cm" fo:padding-left="0.25cm" fo:padding-right="0.25cm" fo:wrap-option="wrap" draw:shadow-color="#5e574e" loext:decorative="false"/>
    </style:style>
    <style:style style:name="gr907" style:family="graphic" style:parent-style-name="standard">
      <style:graphic-properties draw:stroke="none" draw:fill="solid" draw:fill-color="#b3b3b3" draw:textarea-horizontal-align="left" draw:textarea-vertical-align="top" draw:auto-grow-height="false" fo:min-height="0.344cm" fo:min-width="0.36cm" fo:padding-top="0.13cm" fo:padding-bottom="0.13cm" fo:padding-left="0.25cm" fo:padding-right="0.25cm" fo:wrap-option="wrap" draw:shadow-color="#5e574e" loext:decorative="false"/>
    </style:style>
    <style:style style:name="gr908" style:family="graphic" style:parent-style-name="standard">
      <style:graphic-properties draw:stroke="none" draw:fill="solid" draw:fill-color="#cccccc" draw:textarea-horizontal-align="left" draw:textarea-vertical-align="top" draw:auto-grow-height="false" fo:min-height="0.208cm" fo:min-width="0.016cm" fo:padding-top="0.13cm" fo:padding-bottom="0.13cm" fo:padding-left="0.25cm" fo:padding-right="0.25cm" fo:wrap-option="wrap" draw:shadow-color="#5e574e" loext:decorative="false"/>
    </style:style>
    <style:style style:name="gr909" style:family="graphic" style:parent-style-name="standard">
      <style:graphic-properties draw:stroke="none" draw:fill="solid" draw:fill-color="#cccccc" draw:textarea-horizontal-align="left" draw:textarea-vertical-align="top" draw:auto-grow-height="false" fo:min-height="0.045cm" fo:min-width="0cm" fo:padding-top="0.13cm" fo:padding-bottom="0.13cm" fo:padding-left="0.25cm" fo:padding-right="0.25cm" fo:wrap-option="wrap" draw:shadow-color="#5e574e" loext:decorative="false"/>
    </style:style>
    <style:style style:name="gr910" style:family="graphic" style:parent-style-name="standard">
      <style:graphic-properties draw:stroke="none" draw:fill="solid" draw:fill-color="#cacaca" draw:textarea-horizontal-align="left" draw:textarea-vertical-align="top" draw:auto-grow-height="false" fo:min-height="0.08cm" fo:min-width="0cm" fo:padding-top="0.13cm" fo:padding-bottom="0.13cm" fo:padding-left="0.25cm" fo:padding-right="0.25cm" fo:wrap-option="wrap" draw:shadow-color="#5e574e" loext:decorative="false"/>
    </style:style>
    <style:style style:name="gr911" style:family="graphic" style:parent-style-name="standard">
      <style:graphic-properties draw:stroke="none" draw:fill="solid" draw:fill-color="#cacaca" draw:textarea-horizontal-align="left" draw:textarea-vertical-align="top" draw:auto-grow-height="false" fo:min-height="0.101cm" fo:min-width="0.007cm" fo:padding-top="0.13cm" fo:padding-bottom="0.13cm" fo:padding-left="0.25cm" fo:padding-right="0.25cm" fo:wrap-option="wrap" draw:shadow-color="#5e574e" loext:decorative="false"/>
    </style:style>
    <style:style style:name="gr912" style:family="graphic" style:parent-style-name="standard">
      <style:graphic-properties draw:stroke="none" draw:fill="solid" draw:fill-color="#c7c7c7" draw:textarea-horizontal-align="left" draw:textarea-vertical-align="top" draw:auto-grow-height="false" fo:min-height="0.141cm" fo:min-width="0.052cm" fo:padding-top="0.13cm" fo:padding-bottom="0.13cm" fo:padding-left="0.25cm" fo:padding-right="0.25cm" fo:wrap-option="wrap" draw:shadow-color="#5e574e" loext:decorative="false"/>
    </style:style>
    <style:style style:name="gr913" style:family="graphic" style:parent-style-name="standard">
      <style:graphic-properties draw:stroke="none" draw:fill="solid" draw:fill-color="#c5c5c5" draw:textarea-horizontal-align="left" draw:textarea-vertical-align="top" draw:auto-grow-height="false" fo:min-height="0.172cm" fo:min-width="0.095cm" fo:padding-top="0.13cm" fo:padding-bottom="0.13cm" fo:padding-left="0.25cm" fo:padding-right="0.25cm" fo:wrap-option="wrap" draw:shadow-color="#5e574e" loext:decorative="false"/>
    </style:style>
    <style:style style:name="gr914" style:family="graphic" style:parent-style-name="standard">
      <style:graphic-properties draw:stroke="none" draw:fill="solid" draw:fill-color="#c2c2c2" draw:textarea-horizontal-align="left" draw:textarea-vertical-align="top" draw:auto-grow-height="false" fo:min-height="0.185cm" fo:min-width="0.121cm" fo:padding-top="0.13cm" fo:padding-bottom="0.13cm" fo:padding-left="0.25cm" fo:padding-right="0.25cm" fo:wrap-option="wrap" draw:shadow-color="#5e574e" loext:decorative="false"/>
    </style:style>
    <style:style style:name="gr915" style:family="graphic" style:parent-style-name="standard">
      <style:graphic-properties draw:stroke="none" draw:fill="solid" draw:fill-color="#c0c0c0" draw:textarea-horizontal-align="left" draw:textarea-vertical-align="top" draw:auto-grow-height="false" fo:min-height="0.203cm" fo:min-width="0.14cm" fo:padding-top="0.13cm" fo:padding-bottom="0.13cm" fo:padding-left="0.25cm" fo:padding-right="0.25cm" fo:wrap-option="wrap" draw:shadow-color="#5e574e" loext:decorative="false"/>
    </style:style>
    <style:style style:name="gr916" style:family="graphic" style:parent-style-name="standard">
      <style:graphic-properties draw:stroke="none" draw:fill="solid" draw:fill-color="#c0c0c0" draw:textarea-horizontal-align="left" draw:textarea-vertical-align="top" draw:auto-grow-height="false" fo:min-height="0.207cm" fo:min-width="0.153cm" fo:padding-top="0.13cm" fo:padding-bottom="0.13cm" fo:padding-left="0.25cm" fo:padding-right="0.25cm" fo:wrap-option="wrap" draw:shadow-color="#5e574e" loext:decorative="false"/>
    </style:style>
    <style:style style:name="gr917" style:family="graphic" style:parent-style-name="standard">
      <style:graphic-properties draw:stroke="none" draw:fill="solid" draw:fill-color="#bdbdbd" draw:textarea-horizontal-align="left" draw:textarea-vertical-align="top" draw:auto-grow-height="false" fo:min-height="0.216cm" fo:min-width="0.157cm" fo:padding-top="0.13cm" fo:padding-bottom="0.13cm" fo:padding-left="0.25cm" fo:padding-right="0.25cm" fo:wrap-option="wrap" draw:shadow-color="#5e574e" loext:decorative="false"/>
    </style:style>
    <style:style style:name="gr918" style:family="graphic" style:parent-style-name="standard">
      <style:graphic-properties draw:stroke="none" draw:fill="solid" draw:fill-color="#bbbbbb" draw:textarea-horizontal-align="left" draw:textarea-vertical-align="top" draw:auto-grow-height="false" fo:min-height="0.217cm" fo:min-width="0.175cm" fo:padding-top="0.13cm" fo:padding-bottom="0.13cm" fo:padding-left="0.25cm" fo:padding-right="0.25cm" fo:wrap-option="wrap" draw:shadow-color="#5e574e" loext:decorative="false"/>
    </style:style>
    <style:style style:name="gr919" style:family="graphic" style:parent-style-name="standard">
      <style:graphic-properties draw:stroke="none" draw:fill="solid" draw:fill-color="#b8b8b8" draw:textarea-horizontal-align="left" draw:textarea-vertical-align="top" draw:auto-grow-height="false" fo:min-height="0.225cm" fo:min-width="0.166cm" fo:padding-top="0.13cm" fo:padding-bottom="0.13cm" fo:padding-left="0.25cm" fo:padding-right="0.25cm" fo:wrap-option="wrap" draw:shadow-color="#5e574e" loext:decorative="false"/>
    </style:style>
    <style:style style:name="gr920" style:family="graphic" style:parent-style-name="standard">
      <style:graphic-properties draw:stroke="none" draw:fill="solid" draw:fill-color="#b6b6b6" draw:textarea-horizontal-align="left" draw:textarea-vertical-align="top" draw:auto-grow-height="false" fo:min-height="0.23cm" fo:min-width="0.174cm" fo:padding-top="0.13cm" fo:padding-bottom="0.13cm" fo:padding-left="0.25cm" fo:padding-right="0.25cm" fo:wrap-option="wrap" draw:shadow-color="#5e574e" loext:decorative="false"/>
    </style:style>
    <style:style style:name="gr921" style:family="graphic" style:parent-style-name="standard">
      <style:graphic-properties draw:stroke="none" draw:fill="solid" draw:fill-color="#b6b6b6" draw:textarea-horizontal-align="left" draw:textarea-vertical-align="top" draw:auto-grow-height="false" fo:min-height="0.229cm" fo:min-width="0.184cm" fo:padding-top="0.13cm" fo:padding-bottom="0.13cm" fo:padding-left="0.25cm" fo:padding-right="0.25cm" fo:wrap-option="wrap" draw:shadow-color="#5e574e" loext:decorative="false"/>
    </style:style>
    <style:style style:name="gr922" style:family="graphic" style:parent-style-name="standard">
      <style:graphic-properties draw:stroke="none" draw:fill="solid" draw:fill-color="#b3b3b3" draw:textarea-horizontal-align="left" draw:textarea-vertical-align="top" draw:auto-grow-height="false" fo:min-height="0.229cm" fo:min-width="0.183cm" fo:padding-top="0.13cm" fo:padding-bottom="0.13cm" fo:padding-left="0.25cm" fo:padding-right="0.25cm" fo:wrap-option="wrap" draw:shadow-color="#5e574e" loext:decorative="false"/>
    </style:style>
    <style:style style:name="gr923" style:family="graphic" style:parent-style-name="standard">
      <style:graphic-properties draw:stroke="none" draw:fill="solid" draw:fill-color="#b0b0b0" draw:textarea-horizontal-align="left" draw:textarea-vertical-align="top" draw:auto-grow-height="false" fo:min-height="0.234cm" fo:min-width="0.187cm" fo:padding-top="0.13cm" fo:padding-bottom="0.13cm" fo:padding-left="0.25cm" fo:padding-right="0.25cm" fo:wrap-option="wrap" draw:shadow-color="#5e574e" loext:decorative="false"/>
    </style:style>
    <style:style style:name="gr924" style:family="graphic" style:parent-style-name="standard">
      <style:graphic-properties draw:stroke="none" draw:fill="solid" draw:fill-color="#aeaeae" draw:textarea-horizontal-align="left" draw:textarea-vertical-align="top" draw:auto-grow-height="false" fo:min-height="0.234cm" fo:min-width="0.188cm" fo:padding-top="0.13cm" fo:padding-bottom="0.13cm" fo:padding-left="0.25cm" fo:padding-right="0.25cm" fo:wrap-option="wrap" draw:shadow-color="#5e574e" loext:decorative="false"/>
    </style:style>
    <style:style style:name="gr925" style:family="graphic" style:parent-style-name="standard">
      <style:graphic-properties draw:stroke="none" draw:fill="solid" draw:fill-color="#aeaeae" draw:textarea-horizontal-align="left" draw:textarea-vertical-align="top" draw:auto-grow-height="false" fo:min-height="0.243cm" fo:min-width="0.197cm" fo:padding-top="0.13cm" fo:padding-bottom="0.13cm" fo:padding-left="0.25cm" fo:padding-right="0.25cm" fo:wrap-option="wrap" draw:shadow-color="#5e574e" loext:decorative="false"/>
    </style:style>
    <style:style style:name="gr926" style:family="graphic" style:parent-style-name="standard">
      <style:graphic-properties draw:stroke="none" draw:fill="solid" draw:fill-color="#ababab" draw:textarea-horizontal-align="left" draw:textarea-vertical-align="top" draw:auto-grow-height="false" fo:min-height="0.238cm" fo:min-width="0.192cm" fo:padding-top="0.13cm" fo:padding-bottom="0.13cm" fo:padding-left="0.25cm" fo:padding-right="0.25cm" fo:wrap-option="wrap" draw:shadow-color="#5e574e" loext:decorative="false"/>
    </style:style>
    <style:style style:name="gr927" style:family="graphic" style:parent-style-name="standard">
      <style:graphic-properties draw:stroke="none" draw:fill="solid" draw:fill-color="#a9a9a9" draw:textarea-horizontal-align="left" draw:textarea-vertical-align="top" draw:auto-grow-height="false" fo:min-height="0.239cm" fo:min-width="0.192cm" fo:padding-top="0.13cm" fo:padding-bottom="0.13cm" fo:padding-left="0.25cm" fo:padding-right="0.25cm" fo:wrap-option="wrap" draw:shadow-color="#5e574e" loext:decorative="false"/>
    </style:style>
    <style:style style:name="gr928" style:family="graphic" style:parent-style-name="standard">
      <style:graphic-properties draw:stroke="none" draw:fill="solid" draw:fill-color="#a6a6a6" draw:textarea-horizontal-align="left" draw:textarea-vertical-align="top" draw:auto-grow-height="false" fo:min-height="0.247cm" fo:min-width="0.201cm" fo:padding-top="0.13cm" fo:padding-bottom="0.13cm" fo:padding-left="0.25cm" fo:padding-right="0.25cm" fo:wrap-option="wrap" draw:shadow-color="#5e574e" loext:decorative="false"/>
    </style:style>
    <style:style style:name="gr929" style:family="graphic" style:parent-style-name="standard">
      <style:graphic-properties draw:stroke="none" draw:fill="solid" draw:fill-color="#a4a4a4" draw:textarea-horizontal-align="left" draw:textarea-vertical-align="top" draw:auto-grow-height="false" fo:min-height="0.243cm" fo:min-width="0.21cm" fo:padding-top="0.13cm" fo:padding-bottom="0.13cm" fo:padding-left="0.25cm" fo:padding-right="0.25cm" fo:wrap-option="wrap" draw:shadow-color="#5e574e" loext:decorative="false"/>
    </style:style>
    <style:style style:name="gr930" style:family="graphic" style:parent-style-name="standard">
      <style:graphic-properties draw:stroke="none" draw:fill="solid" draw:fill-color="#a4a4a4" draw:textarea-horizontal-align="left" draw:textarea-vertical-align="top" draw:auto-grow-height="false" fo:min-height="0.247cm" fo:min-width="0.206cm" fo:padding-top="0.13cm" fo:padding-bottom="0.13cm" fo:padding-left="0.25cm" fo:padding-right="0.25cm" fo:wrap-option="wrap" draw:shadow-color="#5e574e" loext:decorative="false"/>
    </style:style>
    <style:style style:name="gr931" style:family="graphic" style:parent-style-name="standard">
      <style:graphic-properties draw:stroke="none" draw:fill="solid" draw:fill-color="#a1a1a1" draw:textarea-horizontal-align="left" draw:textarea-vertical-align="top" draw:auto-grow-height="false" fo:min-height="0.243cm" fo:min-width="0.206cm" fo:padding-top="0.13cm" fo:padding-bottom="0.13cm" fo:padding-left="0.25cm" fo:padding-right="0.25cm" fo:wrap-option="wrap" draw:shadow-color="#5e574e" loext:decorative="false"/>
    </style:style>
    <style:style style:name="gr932" style:family="graphic" style:parent-style-name="standard">
      <style:graphic-properties draw:stroke="none" draw:fill="solid" draw:fill-color="#9f9f9f" draw:textarea-horizontal-align="left" draw:textarea-vertical-align="top" draw:auto-grow-height="false" fo:min-height="0.247cm" fo:min-width="0.205cm" fo:padding-top="0.13cm" fo:padding-bottom="0.13cm" fo:padding-left="0.25cm" fo:padding-right="0.25cm" fo:wrap-option="wrap" draw:shadow-color="#5e574e" loext:decorative="false"/>
    </style:style>
    <style:style style:name="gr933" style:family="graphic" style:parent-style-name="standard">
      <style:graphic-properties draw:stroke="none" draw:fill="solid" draw:fill-color="#9c9c9c" draw:textarea-horizontal-align="left" draw:textarea-vertical-align="top" draw:auto-grow-height="false" fo:min-height="0.248cm" fo:min-width="0.205cm" fo:padding-top="0.13cm" fo:padding-bottom="0.13cm" fo:padding-left="0.25cm" fo:padding-right="0.25cm" fo:wrap-option="wrap" draw:shadow-color="#5e574e" loext:decorative="false"/>
    </style:style>
    <style:style style:name="gr934" style:family="graphic" style:parent-style-name="standard">
      <style:graphic-properties draw:stroke="none" draw:fill="solid" draw:fill-color="#999999" draw:textarea-horizontal-align="left" draw:textarea-vertical-align="top" draw:auto-grow-height="false" fo:min-height="0.252cm" fo:min-width="0.21cm" fo:padding-top="0.13cm" fo:padding-bottom="0.13cm" fo:padding-left="0.25cm" fo:padding-right="0.25cm" fo:wrap-option="wrap" draw:shadow-color="#5e574e" loext:decorative="false"/>
    </style:style>
    <style:style style:name="gr935" style:family="graphic" style:parent-style-name="standard">
      <style:graphic-properties draw:stroke="none" draw:fill="solid" draw:fill-color="#999999" draw:textarea-horizontal-align="left" draw:textarea-vertical-align="top" draw:auto-grow-height="false" fo:min-height="0.248cm" fo:min-width="0.21cm" fo:padding-top="0.13cm" fo:padding-bottom="0.13cm" fo:padding-left="0.25cm" fo:padding-right="0.25cm" fo:wrap-option="wrap" draw:shadow-color="#5e574e" loext:decorative="false"/>
    </style:style>
    <style:style style:name="gr936" style:family="graphic" style:parent-style-name="standard">
      <style:graphic-properties draw:stroke="none" draw:fill="solid" draw:fill-color="#979797" draw:textarea-horizontal-align="left" draw:textarea-vertical-align="top" draw:auto-grow-height="false" fo:min-height="0.247cm" fo:min-width="0.21cm" fo:padding-top="0.13cm" fo:padding-bottom="0.13cm" fo:padding-left="0.25cm" fo:padding-right="0.25cm" fo:wrap-option="wrap" draw:shadow-color="#5e574e" loext:decorative="false"/>
    </style:style>
    <style:style style:name="gr937" style:family="graphic" style:parent-style-name="standard">
      <style:graphic-properties draw:stroke="none" draw:fill="solid" draw:fill-color="#949494" draw:textarea-horizontal-align="left" draw:textarea-vertical-align="top" draw:auto-grow-height="false" fo:min-height="0.256cm" fo:min-width="0.201cm" fo:padding-top="0.13cm" fo:padding-bottom="0.13cm" fo:padding-left="0.25cm" fo:padding-right="0.25cm" fo:wrap-option="wrap" draw:shadow-color="#5e574e" loext:decorative="false"/>
    </style:style>
    <style:style style:name="gr938" style:family="graphic" style:parent-style-name="standard">
      <style:graphic-properties draw:stroke="none" draw:fill="solid" draw:fill-color="#929292" draw:textarea-horizontal-align="left" draw:textarea-vertical-align="top" draw:auto-grow-height="false" fo:min-height="0.252cm" fo:min-width="0.21cm" fo:padding-top="0.13cm" fo:padding-bottom="0.13cm" fo:padding-left="0.25cm" fo:padding-right="0.25cm" fo:wrap-option="wrap" draw:shadow-color="#5e574e" loext:decorative="false"/>
    </style:style>
    <style:style style:name="gr939" style:family="graphic" style:parent-style-name="standard">
      <style:graphic-properties draw:stroke="none" draw:fill="solid" draw:fill-color="#929292" draw:textarea-horizontal-align="left" draw:textarea-vertical-align="top" draw:auto-grow-height="false" fo:min-height="0.256cm" fo:min-width="0.21cm" fo:padding-top="0.13cm" fo:padding-bottom="0.13cm" fo:padding-left="0.25cm" fo:padding-right="0.25cm" fo:wrap-option="wrap" draw:shadow-color="#5e574e" loext:decorative="false"/>
    </style:style>
    <style:style style:name="gr940" style:family="graphic" style:parent-style-name="standard">
      <style:graphic-properties draw:stroke="none" draw:fill="solid" draw:fill-color="#8f8f8f" draw:textarea-horizontal-align="left" draw:textarea-vertical-align="top" draw:auto-grow-height="false" fo:min-height="0.256cm" fo:min-width="0.21cm" fo:padding-top="0.13cm" fo:padding-bottom="0.13cm" fo:padding-left="0.25cm" fo:padding-right="0.25cm" fo:wrap-option="wrap" draw:shadow-color="#5e574e" loext:decorative="false"/>
    </style:style>
    <style:style style:name="gr941" style:family="graphic" style:parent-style-name="standard">
      <style:graphic-properties draw:stroke="none" draw:fill="solid" draw:fill-color="#8d8d8d" draw:textarea-horizontal-align="left" draw:textarea-vertical-align="top" draw:auto-grow-height="false" fo:min-height="0.252cm" fo:min-width="0.214cm" fo:padding-top="0.13cm" fo:padding-bottom="0.13cm" fo:padding-left="0.25cm" fo:padding-right="0.25cm" fo:wrap-option="wrap" draw:shadow-color="#5e574e" loext:decorative="false"/>
    </style:style>
    <style:style style:name="gr942" style:family="graphic" style:parent-style-name="standard">
      <style:graphic-properties draw:stroke="none" draw:fill="solid" draw:fill-color="#8a8a8a" draw:textarea-horizontal-align="left" draw:textarea-vertical-align="top" draw:auto-grow-height="false" fo:min-height="0.256cm" fo:min-width="0.214cm" fo:padding-top="0.13cm" fo:padding-bottom="0.13cm" fo:padding-left="0.25cm" fo:padding-right="0.25cm" fo:wrap-option="wrap" draw:shadow-color="#5e574e" loext:decorative="false"/>
    </style:style>
    <style:style style:name="gr943" style:family="graphic" style:parent-style-name="standard">
      <style:graphic-properties draw:stroke="none" draw:fill="solid" draw:fill-color="#888888" draw:textarea-horizontal-align="left" draw:textarea-vertical-align="top" draw:auto-grow-height="false" fo:min-height="0.252cm" fo:min-width="0.214cm" fo:padding-top="0.13cm" fo:padding-bottom="0.13cm" fo:padding-left="0.25cm" fo:padding-right="0.25cm" fo:wrap-option="wrap" draw:shadow-color="#5e574e" loext:decorative="false"/>
    </style:style>
    <style:style style:name="gr944" style:family="graphic" style:parent-style-name="standard">
      <style:graphic-properties draw:stroke="none" draw:fill="solid" draw:fill-color="#858585" draw:textarea-horizontal-align="left" draw:textarea-vertical-align="top" draw:auto-grow-height="false" fo:min-height="0.256cm" fo:min-width="0.214cm" fo:padding-top="0.13cm" fo:padding-bottom="0.13cm" fo:padding-left="0.25cm" fo:padding-right="0.25cm" fo:wrap-option="wrap" draw:shadow-color="#5e574e" loext:decorative="false"/>
    </style:style>
    <style:style style:name="gr945" style:family="graphic" style:parent-style-name="standard">
      <style:graphic-properties draw:stroke="none" draw:fill="solid" draw:fill-color="#838383" draw:textarea-horizontal-align="left" draw:textarea-vertical-align="top" draw:auto-grow-height="false" fo:min-height="0.252cm" fo:min-width="0.219cm" fo:padding-top="0.13cm" fo:padding-bottom="0.13cm" fo:padding-left="0.25cm" fo:padding-right="0.25cm" fo:wrap-option="wrap" draw:shadow-color="#5e574e" loext:decorative="false"/>
    </style:style>
    <style:style style:name="gr946" style:family="graphic" style:parent-style-name="standard">
      <style:graphic-properties draw:stroke="none" draw:fill="solid" draw:fill-color="#808080" draw:textarea-horizontal-align="left" draw:textarea-vertical-align="top" draw:auto-grow-height="false" fo:min-height="0.348cm" fo:min-width="0.219cm" fo:padding-top="0.13cm" fo:padding-bottom="0.13cm" fo:padding-left="0.25cm" fo:padding-right="0.25cm" fo:wrap-option="wrap" draw:shadow-color="#5e574e" loext:decorative="false"/>
    </style:style>
    <style:style style:name="gr947" style:family="graphic" style:parent-style-name="standard">
      <style:graphic-properties draw:stroke="none" draw:fill="solid" draw:fill-color="#666666" draw:textarea-horizontal-align="left" draw:textarea-vertical-align="top" draw:auto-grow-height="false" fo:min-height="0.362cm" fo:min-width="0.739cm" fo:padding-top="0.13cm" fo:padding-bottom="0.13cm" fo:padding-left="0.25cm" fo:padding-right="0.25cm" fo:wrap-option="wrap" draw:shadow-color="#5e574e" loext:decorative="false"/>
    </style:style>
    <style:style style:name="gr948" style:family="graphic" style:parent-style-name="standard">
      <style:graphic-properties draw:stroke="none" draw:fill="solid" draw:fill-color="#cccccc" draw:textarea-horizontal-align="left" draw:textarea-vertical-align="top" draw:auto-grow-height="false" fo:min-height="0.437cm" fo:min-width="0.497cm" fo:padding-top="0.13cm" fo:padding-bottom="0.13cm" fo:padding-left="0.25cm" fo:padding-right="0.25cm" fo:wrap-option="wrap" draw:shadow-color="#5e574e" loext:decorative="false"/>
    </style:style>
    <style:style style:name="gr949" style:family="graphic" style:parent-style-name="standard">
      <style:graphic-properties draw:stroke="none" draw:fill="solid" draw:fill-color="#cacaca" draw:textarea-horizontal-align="left" draw:textarea-vertical-align="top" draw:auto-grow-height="false" fo:min-height="0cm" fo:min-width="0.17cm" fo:padding-top="0.13cm" fo:padding-bottom="0.13cm" fo:padding-left="0.25cm" fo:padding-right="0.25cm" fo:wrap-option="wrap" draw:shadow-color="#5e574e" loext:decorative="false"/>
    </style:style>
    <style:style style:name="gr950" style:family="graphic" style:parent-style-name="standard">
      <style:graphic-properties draw:stroke="none" draw:fill="solid" draw:fill-color="#c7c7c7" draw:textarea-horizontal-align="left" draw:textarea-vertical-align="top" draw:auto-grow-height="false" fo:min-height="0cm" fo:min-width="0.175cm" fo:padding-top="0.13cm" fo:padding-bottom="0.13cm" fo:padding-left="0.25cm" fo:padding-right="0.25cm" fo:wrap-option="wrap" draw:shadow-color="#5e574e" loext:decorative="false"/>
    </style:style>
    <style:style style:name="gr951" style:family="graphic" style:parent-style-name="standard">
      <style:graphic-properties draw:stroke="none" draw:fill="solid" draw:fill-color="#c5c5c5" draw:textarea-horizontal-align="left" draw:textarea-vertical-align="top" draw:auto-grow-height="false" fo:min-height="0cm" fo:min-width="0.188cm" fo:padding-top="0.13cm" fo:padding-bottom="0.13cm" fo:padding-left="0.25cm" fo:padding-right="0.25cm" fo:wrap-option="wrap" draw:shadow-color="#5e574e" loext:decorative="false"/>
    </style:style>
    <style:style style:name="gr952" style:family="graphic" style:parent-style-name="standard">
      <style:graphic-properties draw:stroke="none" draw:fill="solid" draw:fill-color="#c0c0c0" draw:textarea-horizontal-align="left" draw:textarea-vertical-align="top" draw:auto-grow-height="false" fo:min-height="0cm" fo:min-width="0.184cm" fo:padding-top="0.13cm" fo:padding-bottom="0.13cm" fo:padding-left="0.25cm" fo:padding-right="0.25cm" fo:wrap-option="wrap" draw:shadow-color="#5e574e" loext:decorative="false"/>
    </style:style>
    <style:style style:name="gr953" style:family="graphic" style:parent-style-name="standard">
      <style:graphic-properties draw:stroke="none" draw:fill="solid" draw:fill-color="#bdbdbd" draw:textarea-horizontal-align="left" draw:textarea-vertical-align="top" draw:auto-grow-height="false" fo:min-height="0cm" fo:min-width="0.193cm" fo:padding-top="0.13cm" fo:padding-bottom="0.13cm" fo:padding-left="0.25cm" fo:padding-right="0.25cm" fo:wrap-option="wrap" draw:shadow-color="#5e574e" loext:decorative="false"/>
    </style:style>
    <style:style style:name="gr954" style:family="graphic" style:parent-style-name="standard">
      <style:graphic-properties draw:stroke="none" draw:fill="solid" draw:fill-color="#bbbbbb" draw:textarea-horizontal-align="left" draw:textarea-vertical-align="top" draw:auto-grow-height="false" fo:min-height="0cm" fo:min-width="0.197cm" fo:padding-top="0.13cm" fo:padding-bottom="0.13cm" fo:padding-left="0.25cm" fo:padding-right="0.25cm" fo:wrap-option="wrap" draw:shadow-color="#5e574e" loext:decorative="false"/>
    </style:style>
    <style:style style:name="gr955" style:family="graphic" style:parent-style-name="standard">
      <style:graphic-properties draw:stroke="none" draw:fill="solid" draw:fill-color="#b8b8b8" draw:textarea-horizontal-align="left" draw:textarea-vertical-align="top" draw:auto-grow-height="false" fo:min-height="0cm" fo:min-width="0.192cm" fo:padding-top="0.13cm" fo:padding-bottom="0.13cm" fo:padding-left="0.25cm" fo:padding-right="0.25cm" fo:wrap-option="wrap" draw:shadow-color="#5e574e" loext:decorative="false"/>
    </style:style>
    <style:style style:name="gr956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01cm" fo:padding-top="0.13cm" fo:padding-bottom="0.13cm" fo:padding-left="0.25cm" fo:padding-right="0.25cm" fo:wrap-option="wrap" draw:shadow-color="#5e574e" loext:decorative="false"/>
    </style:style>
    <style:style style:name="gr957" style:family="graphic" style:parent-style-name="standard">
      <style:graphic-properties draw:stroke="none" draw:fill="solid" draw:fill-color="#b0b0b0" draw:textarea-horizontal-align="left" draw:textarea-vertical-align="top" draw:auto-grow-height="false" fo:min-height="0cm" fo:min-width="0.197cm" fo:padding-top="0.13cm" fo:padding-bottom="0.13cm" fo:padding-left="0.25cm" fo:padding-right="0.25cm" fo:wrap-option="wrap" draw:shadow-color="#5e574e" loext:decorative="false"/>
    </style:style>
    <style:style style:name="gr958" style:family="graphic" style:parent-style-name="standard">
      <style:graphic-properties draw:stroke="none" draw:fill="solid" draw:fill-color="#aeaeae" draw:textarea-horizontal-align="left" draw:textarea-vertical-align="top" draw:auto-grow-height="false" fo:min-height="0cm" fo:min-width="0.197cm" fo:padding-top="0.13cm" fo:padding-bottom="0.13cm" fo:padding-left="0.25cm" fo:padding-right="0.25cm" fo:wrap-option="wrap" draw:shadow-color="#5e574e" loext:decorative="false"/>
    </style:style>
    <style:style style:name="gr959" style:family="graphic" style:parent-style-name="standard">
      <style:graphic-properties draw:stroke="none" draw:fill="solid" draw:fill-color="#a9a9a9" draw:textarea-horizontal-align="left" draw:textarea-vertical-align="top" draw:auto-grow-height="false" fo:min-height="0cm" fo:min-width="0.201cm" fo:padding-top="0.13cm" fo:padding-bottom="0.13cm" fo:padding-left="0.25cm" fo:padding-right="0.25cm" fo:wrap-option="wrap" draw:shadow-color="#5e574e" loext:decorative="false"/>
    </style:style>
    <style:style style:name="gr960" style:family="graphic" style:parent-style-name="standard">
      <style:graphic-properties draw:stroke="none" draw:fill="solid" draw:fill-color="#a6a6a6" draw:textarea-horizontal-align="left" draw:textarea-vertical-align="top" draw:auto-grow-height="false" fo:min-height="0cm" fo:min-width="0.201cm" fo:padding-top="0.13cm" fo:padding-bottom="0.13cm" fo:padding-left="0.25cm" fo:padding-right="0.25cm" fo:wrap-option="wrap" draw:shadow-color="#5e574e" loext:decorative="false"/>
    </style:style>
    <style:style style:name="gr961" style:family="graphic" style:parent-style-name="standard">
      <style:graphic-properties draw:stroke="none" draw:fill="solid" draw:fill-color="#a4a4a4" draw:textarea-horizontal-align="left" draw:textarea-vertical-align="top" draw:auto-grow-height="false" fo:min-height="0cm" fo:min-width="0.201cm" fo:padding-top="0.13cm" fo:padding-bottom="0.13cm" fo:padding-left="0.25cm" fo:padding-right="0.25cm" fo:wrap-option="wrap" draw:shadow-color="#5e574e" loext:decorative="false"/>
    </style:style>
    <style:style style:name="gr962" style:family="graphic" style:parent-style-name="standard">
      <style:graphic-properties draw:stroke="none" draw:fill="solid" draw:fill-color="#a1a1a1" draw:textarea-horizontal-align="left" draw:textarea-vertical-align="top" draw:auto-grow-height="false" fo:min-height="0cm" fo:min-width="0.206cm" fo:padding-top="0.13cm" fo:padding-bottom="0.13cm" fo:padding-left="0.25cm" fo:padding-right="0.25cm" fo:wrap-option="wrap" draw:shadow-color="#5e574e" loext:decorative="false"/>
    </style:style>
    <style:style style:name="gr963" style:family="graphic" style:parent-style-name="standard">
      <style:graphic-properties draw:stroke="none" draw:fill="solid" draw:fill-color="#9c9c9c" draw:textarea-horizontal-align="left" draw:textarea-vertical-align="top" draw:auto-grow-height="false" fo:min-height="0cm" fo:min-width="0.206cm" fo:padding-top="0.13cm" fo:padding-bottom="0.13cm" fo:padding-left="0.25cm" fo:padding-right="0.25cm" fo:wrap-option="wrap" draw:shadow-color="#5e574e" loext:decorative="false"/>
    </style:style>
    <style:style style:name="gr964" style:family="graphic" style:parent-style-name="standard">
      <style:graphic-properties draw:stroke="none" draw:fill="solid" draw:fill-color="#999999" draw:textarea-horizontal-align="left" draw:textarea-vertical-align="top" draw:auto-grow-height="false" fo:min-height="0cm" fo:min-width="0.206cm" fo:padding-top="0.13cm" fo:padding-bottom="0.13cm" fo:padding-left="0.25cm" fo:padding-right="0.25cm" fo:wrap-option="wrap" draw:shadow-color="#5e574e" loext:decorative="false"/>
    </style:style>
    <style:style style:name="gr965" style:family="graphic" style:parent-style-name="standard">
      <style:graphic-properties draw:stroke="none" draw:fill="solid" draw:fill-color="#979797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66" style:family="graphic" style:parent-style-name="standard">
      <style:graphic-properties draw:stroke="none" draw:fill="solid" draw:fill-color="#929292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67" style:family="graphic" style:parent-style-name="standard">
      <style:graphic-properties draw:stroke="none" draw:fill="solid" draw:fill-color="#8f8f8f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68" style:family="graphic" style:parent-style-name="standard">
      <style:graphic-properties draw:stroke="none" draw:fill="solid" draw:fill-color="#8d8d8d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69" style:family="graphic" style:parent-style-name="standard">
      <style:graphic-properties draw:stroke="none" draw:fill="solid" draw:fill-color="#8a8a8a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70" style:family="graphic" style:parent-style-name="standard">
      <style:graphic-properties draw:stroke="none" draw:fill="solid" draw:fill-color="#858585" draw:textarea-horizontal-align="left" draw:textarea-vertical-align="top" draw:auto-grow-height="false" fo:min-height="0cm" fo:min-width="0.215cm" fo:padding-top="0.13cm" fo:padding-bottom="0.13cm" fo:padding-left="0.25cm" fo:padding-right="0.25cm" fo:wrap-option="wrap" draw:shadow-color="#5e574e" loext:decorative="false"/>
    </style:style>
    <style:style style:name="gr971" style:family="graphic" style:parent-style-name="standard">
      <style:graphic-properties draw:stroke="none" draw:fill="solid" draw:fill-color="#838383" draw:textarea-horizontal-align="left" draw:textarea-vertical-align="top" draw:auto-grow-height="false" fo:min-height="0cm" fo:min-width="0.214cm" fo:padding-top="0.13cm" fo:padding-bottom="0.13cm" fo:padding-left="0.25cm" fo:padding-right="0.25cm" fo:wrap-option="wrap" draw:shadow-color="#5e574e" loext:decorative="false"/>
    </style:style>
    <style:style style:name="gr972" style:family="graphic" style:parent-style-name="standard">
      <style:graphic-properties draw:stroke="none" draw:fill="solid" draw:fill-color="#808080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73" style:family="graphic" style:parent-style-name="standard">
      <style:graphic-properties draw:stroke="none" draw:fill="solid" draw:fill-color="#7b7b7b" draw:textarea-horizontal-align="left" draw:textarea-vertical-align="top" draw:auto-grow-height="false" fo:min-height="0cm" fo:min-width="0.219cm" fo:padding-top="0.13cm" fo:padding-bottom="0.13cm" fo:padding-left="0.25cm" fo:padding-right="0.25cm" fo:wrap-option="wrap" draw:shadow-color="#5e574e" loext:decorative="false"/>
    </style:style>
    <style:style style:name="gr974" style:family="graphic" style:parent-style-name="standard">
      <style:graphic-properties draw:stroke="none" draw:fill="solid" draw:fill-color="#787878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75" style:family="graphic" style:parent-style-name="standard">
      <style:graphic-properties draw:stroke="none" draw:fill="solid" draw:fill-color="#767676" draw:textarea-horizontal-align="left" draw:textarea-vertical-align="top" draw:auto-grow-height="false" fo:min-height="0cm" fo:min-width="0.219cm" fo:padding-top="0.13cm" fo:padding-bottom="0.13cm" fo:padding-left="0.25cm" fo:padding-right="0.25cm" fo:wrap-option="wrap" draw:shadow-color="#5e574e" loext:decorative="false"/>
    </style:style>
    <style:style style:name="gr976" style:family="graphic" style:parent-style-name="standard">
      <style:graphic-properties draw:stroke="none" draw:fill="solid" draw:fill-color="#737373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77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.223cm" fo:padding-top="0.13cm" fo:padding-bottom="0.13cm" fo:padding-left="0.25cm" fo:padding-right="0.25cm" fo:wrap-option="wrap" draw:shadow-color="#5e574e" loext:decorative="false"/>
    </style:style>
    <style:style style:name="gr978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.219cm" fo:padding-top="0.13cm" fo:padding-bottom="0.13cm" fo:padding-left="0.25cm" fo:padding-right="0.25cm" fo:wrap-option="wrap" draw:shadow-color="#5e574e" loext:decorative="false"/>
    </style:style>
    <style:style style:name="gr979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80" style:family="graphic" style:parent-style-name="standard">
      <style:graphic-properties draw:stroke="none" draw:fill="solid" draw:fill-color="#646464" draw:textarea-horizontal-align="left" draw:textarea-vertical-align="top" draw:auto-grow-height="false" fo:min-height="0cm" fo:min-width="0.223cm" fo:padding-top="0.13cm" fo:padding-bottom="0.13cm" fo:padding-left="0.25cm" fo:padding-right="0.25cm" fo:wrap-option="wrap" draw:shadow-color="#5e574e" loext:decorative="false"/>
    </style:style>
    <style:style style:name="gr981" style:family="graphic" style:parent-style-name="standard">
      <style:graphic-properties draw:stroke="none" draw:fill="solid" draw:fill-color="#616161" draw:textarea-horizontal-align="left" draw:textarea-vertical-align="top" draw:auto-grow-height="false" fo:min-height="0cm" fo:min-width="0.219cm" fo:padding-top="0.13cm" fo:padding-bottom="0.13cm" fo:padding-left="0.25cm" fo:padding-right="0.25cm" fo:wrap-option="wrap" draw:shadow-color="#5e574e" loext:decorative="false"/>
    </style:style>
    <style:style style:name="gr982" style:family="graphic" style:parent-style-name="standard">
      <style:graphic-properties draw:stroke="none" draw:fill="solid" draw:fill-color="#5f5f5f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83" style:family="graphic" style:parent-style-name="standard">
      <style:graphic-properties draw:stroke="none" draw:fill="solid" draw:fill-color="#5c5c5c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84" style:family="graphic" style:parent-style-name="standard">
      <style:graphic-properties draw:stroke="none" draw:fill="solid" draw:fill-color="#575757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85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.214cm" fo:padding-top="0.13cm" fo:padding-bottom="0.13cm" fo:padding-left="0.25cm" fo:padding-right="0.25cm" fo:wrap-option="wrap" draw:shadow-color="#5e574e" loext:decorative="false"/>
    </style:style>
    <style:style style:name="gr986" style:family="graphic" style:parent-style-name="standard">
      <style:graphic-properties draw:stroke="none" draw:fill="solid" draw:fill-color="#525252" draw:textarea-horizontal-align="left" draw:textarea-vertical-align="top" draw:auto-grow-height="false" fo:min-height="0cm" fo:min-width="0.21cm" fo:padding-top="0.13cm" fo:padding-bottom="0.13cm" fo:padding-left="0.25cm" fo:padding-right="0.25cm" fo:wrap-option="wrap" draw:shadow-color="#5e574e" loext:decorative="false"/>
    </style:style>
    <style:style style:name="gr987" style:family="graphic" style:parent-style-name="standard">
      <style:graphic-properties draw:stroke="none" draw:fill="solid" draw:fill-color="#4d4d4d" draw:textarea-horizontal-align="left" draw:textarea-vertical-align="top" draw:auto-grow-height="false" fo:min-height="0.256cm" fo:min-width="0.853cm" fo:padding-top="0.13cm" fo:padding-bottom="0.13cm" fo:padding-left="0.25cm" fo:padding-right="0.25cm" fo:wrap-option="wrap" draw:shadow-color="#5e574e" loext:decorative="false"/>
    </style:style>
    <style:style style:name="gr988" style:family="graphic" style:parent-style-name="standard">
      <style:graphic-properties draw:stroke="none" draw:fill="solid" draw:fill-color="#b3b3b3" draw:textarea-horizontal-align="left" draw:textarea-vertical-align="top" draw:auto-grow-height="false" fo:min-height="1.072cm" fo:min-width="1.374cm" fo:padding-top="0.13cm" fo:padding-bottom="0.13cm" fo:padding-left="0.25cm" fo:padding-right="0.25cm" fo:wrap-option="wrap" draw:shadow-color="#5e574e" loext:decorative="false"/>
    </style:style>
    <style:style style:name="gr989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990" style:family="graphic" style:parent-style-name="standard">
      <style:graphic-properties draw:stroke="none" draw:fill="solid" draw:fill-color="#b3b3b3" draw:textarea-horizontal-align="left" draw:textarea-vertical-align="top" draw:auto-grow-height="false" fo:min-height="1.151cm" fo:min-width="1.48cm" fo:padding-top="0.13cm" fo:padding-bottom="0.13cm" fo:padding-left="0.25cm" fo:padding-right="0.25cm" fo:wrap-option="wrap" draw:shadow-color="#5e574e" loext:decorative="false"/>
    </style:style>
    <style:style style:name="gr991" style:family="graphic" style:parent-style-name="standard">
      <style:graphic-properties draw:stroke="none" draw:fill="solid" draw:fill-color="#b3b3b3" draw:textarea-horizontal-align="left" draw:textarea-vertical-align="top" draw:auto-grow-height="false" fo:min-height="0.203cm" fo:min-width="1.489cm" fo:padding-top="0.13cm" fo:padding-bottom="0.13cm" fo:padding-left="0.25cm" fo:padding-right="0.25cm" fo:wrap-option="wrap" draw:shadow-color="#5e574e" loext:decorative="false"/>
    </style:style>
    <style:style style:name="gr992" style:family="graphic" style:parent-style-name="standard">
      <style:graphic-properties draw:stroke="none" draw:fill="solid" draw:fill-color="#b3b3b3" draw:textarea-horizontal-align="left" draw:textarea-vertical-align="top" draw:auto-grow-height="false" fo:min-height="0.52cm" fo:min-width="1.29cm" fo:padding-top="0.13cm" fo:padding-bottom="0.13cm" fo:padding-left="0.25cm" fo:padding-right="0.25cm" fo:wrap-option="wrap" draw:shadow-color="#5e574e" loext:decorative="false"/>
    </style:style>
    <style:style style:name="gr993" style:family="graphic" style:parent-style-name="standard">
      <style:graphic-properties draw:stroke="none" draw:fill="solid" draw:fill-color="#808080" draw:textarea-horizontal-align="left" draw:textarea-vertical-align="top" draw:auto-grow-height="false" fo:min-height="0.08cm" fo:min-width="0.452cm" fo:padding-top="0.13cm" fo:padding-bottom="0.13cm" fo:padding-left="0.25cm" fo:padding-right="0.25cm" fo:wrap-option="wrap" draw:shadow-color="#5e574e" loext:decorative="false"/>
    </style:style>
    <style:style style:name="gr994" style:family="graphic" style:parent-style-name="standard">
      <style:graphic-properties draw:stroke="none" draw:fill="solid" draw:fill-color="#808080" draw:textarea-horizontal-align="left" draw:textarea-vertical-align="top" draw:auto-grow-height="false" fo:min-height="0.155cm" fo:min-width="0.806cm" fo:padding-top="0.13cm" fo:padding-bottom="0.13cm" fo:padding-left="0.25cm" fo:padding-right="0.25cm" fo:wrap-option="wrap" draw:shadow-color="#5e574e" loext:decorative="false"/>
    </style:style>
    <style:style style:name="gr995" style:family="graphic" style:parent-style-name="standard">
      <style:graphic-properties draw:stroke="none" draw:fill="solid" draw:fill-color="#f5f5f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996" style:family="graphic" style:parent-style-name="standard">
      <style:graphic-properties draw:stroke="none" draw:fill="solid" draw:fill-color="#e9e9e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997" style:family="graphic" style:parent-style-name="standard">
      <style:graphic-properties draw:stroke="none" draw:fill="solid" draw:fill-color="#dedede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998" style:family="graphic" style:parent-style-name="standard">
      <style:graphic-properties draw:stroke="none" draw:fill="solid" draw:fill-color="#d4d4d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999" style:family="graphic" style:parent-style-name="standard">
      <style:graphic-properties draw:stroke="none" draw:fill="solid" draw:fill-color="#cacac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0" style:family="graphic" style:parent-style-name="standard">
      <style:graphic-properties draw:stroke="none" draw:fill="solid" draw:fill-color="#bdbdbd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1" style:family="graphic" style:parent-style-name="standard">
      <style:graphic-properties draw:stroke="none" draw:fill="solid" draw:fill-color="#a9a9a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2" style:family="graphic" style:parent-style-name="standard">
      <style:graphic-properties draw:stroke="none" draw:fill="solid" draw:fill-color="#9c9c9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3" style:family="graphic" style:parent-style-name="standard">
      <style:graphic-properties draw:stroke="none" draw:fill="solid" draw:fill-color="#929292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4" style:family="graphic" style:parent-style-name="standard">
      <style:graphic-properties draw:stroke="none" draw:fill="solid" draw:fill-color="#888888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5" style:family="graphic" style:parent-style-name="standard">
      <style:graphic-properties draw:stroke="none" draw:fill="solid" draw:fill-color="#66666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6" style:family="graphic" style:parent-style-name="standard">
      <style:graphic-properties draw:stroke="none" draw:fill="solid" draw:fill-color="#5c5c5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7" style:family="graphic" style:parent-style-name="standard">
      <style:graphic-properties draw:stroke="none" draw:fill="solid" draw:fill-color="#50505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8" style:family="graphic" style:parent-style-name="standard">
      <style:graphic-properties draw:stroke="none" draw:fill="solid" draw:fill-color="#31313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09" style:family="graphic" style:parent-style-name="standard">
      <style:graphic-properties draw:stroke="none" draw:fill="solid" draw:fill-color="#24242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0" style:family="graphic" style:parent-style-name="standard">
      <style:graphic-properties draw:stroke="none" draw:fill="solid" draw:fill-color="#1a1a1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1" style:family="graphic" style:parent-style-name="standard">
      <style:graphic-properties draw:stroke="none" draw:fill="solid" draw:fill-color="#ebebe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2" style:family="graphic" style:parent-style-name="standard">
      <style:graphic-properties draw:stroke="none" draw:fill="solid" draw:fill-color="#e3e3e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3" style:family="graphic" style:parent-style-name="standard">
      <style:graphic-properties draw:stroke="none" draw:fill="solid" draw:fill-color="#d9d9d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4" style:family="graphic" style:parent-style-name="standard">
      <style:graphic-properties draw:stroke="none" draw:fill="solid" draw:fill-color="#cfcfc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5" style:family="graphic" style:parent-style-name="standard">
      <style:graphic-properties draw:stroke="none" draw:fill="solid" draw:fill-color="#c5c5c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6" style:family="graphic" style:parent-style-name="standard">
      <style:graphic-properties draw:stroke="none" draw:fill="solid" draw:fill-color="#bbbbb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7" style:family="graphic" style:parent-style-name="standard">
      <style:graphic-properties draw:stroke="none" draw:fill="solid" draw:fill-color="#9f9f9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8" style:family="graphic" style:parent-style-name="standard">
      <style:graphic-properties draw:stroke="none" draw:fill="solid" draw:fill-color="#94949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19" style:family="graphic" style:parent-style-name="standard">
      <style:graphic-properties draw:stroke="none" draw:fill="solid" draw:fill-color="#8a8a8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0" style:family="graphic" style:parent-style-name="standard">
      <style:graphic-properties draw:stroke="none" draw:fill="solid" draw:fill-color="#6e6e6e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1" style:family="graphic" style:parent-style-name="standard">
      <style:graphic-properties draw:stroke="none" draw:fill="solid" draw:fill-color="#64646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2" style:family="graphic" style:parent-style-name="standard">
      <style:graphic-properties draw:stroke="none" draw:fill="solid" draw:fill-color="#5a5a5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3" style:family="graphic" style:parent-style-name="standard">
      <style:graphic-properties draw:stroke="none" draw:fill="solid" draw:fill-color="#484848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4" style:family="graphic" style:parent-style-name="standard">
      <style:graphic-properties draw:stroke="none" draw:fill="solid" draw:fill-color="#4d4d4d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5" style:family="graphic" style:parent-style-name="standard">
      <style:graphic-properties draw:stroke="none" draw:fill="solid" draw:fill-color="#55555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6" style:family="graphic" style:parent-style-name="standard">
      <style:graphic-properties draw:stroke="none" draw:fill="solid" draw:fill-color="#61616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7" style:family="graphic" style:parent-style-name="standard">
      <style:graphic-properties draw:stroke="none" draw:fill="solid" draw:fill-color="#69696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8" style:family="graphic" style:parent-style-name="standard">
      <style:graphic-properties draw:stroke="none" draw:fill="solid" draw:fill-color="#6c6c6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29" style:family="graphic" style:parent-style-name="standard">
      <style:graphic-properties draw:stroke="none" draw:fill="solid" draw:fill-color="#83838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0" style:family="graphic" style:parent-style-name="standard">
      <style:graphic-properties draw:stroke="none" draw:fill="solid" draw:fill-color="#8d8d8d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1" style:family="graphic" style:parent-style-name="standard">
      <style:graphic-properties draw:stroke="none" draw:fill="solid" draw:fill-color="#8f8f8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2" style:family="graphic" style:parent-style-name="standard">
      <style:graphic-properties draw:stroke="none" draw:fill="solid" draw:fill-color="#97979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3" style:family="graphic" style:parent-style-name="standard">
      <style:graphic-properties draw:stroke="none" draw:fill="solid" draw:fill-color="#a4a4a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4" style:family="graphic" style:parent-style-name="standard">
      <style:graphic-properties draw:stroke="none" draw:fill="solid" draw:fill-color="#ababa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5" style:family="graphic" style:parent-style-name="standard">
      <style:graphic-properties draw:stroke="none" draw:fill="solid" draw:fill-color="#b0b0b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6" style:family="graphic" style:parent-style-name="standard">
      <style:graphic-properties draw:stroke="none" draw:fill="solid" draw:fill-color="#b6b6b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7" style:family="graphic" style:parent-style-name="standard">
      <style:graphic-properties draw:stroke="none" draw:fill="solid" draw:fill-color="#c0c0c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8" style:family="graphic" style:parent-style-name="standard">
      <style:graphic-properties draw:stroke="none" draw:fill="solid" draw:fill-color="#c2c2c2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39" style:family="graphic" style:parent-style-name="standard">
      <style:graphic-properties draw:stroke="none" draw:fill="solid" draw:fill-color="#c7c7c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0" style:family="graphic" style:parent-style-name="standard">
      <style:graphic-properties draw:stroke="none" draw:fill="solid" draw:fill-color="#d2d2d2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1" style:family="graphic" style:parent-style-name="standard">
      <style:graphic-properties draw:stroke="none" draw:fill="solid" draw:fill-color="#d7d7d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2" style:family="graphic" style:parent-style-name="standard">
      <style:graphic-properties draw:stroke="none" draw:fill="solid" draw:fill-color="#dcdcd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3" style:family="graphic" style:parent-style-name="standard">
      <style:graphic-properties draw:stroke="none" draw:fill="solid" draw:fill-color="#e6e6e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4" style:family="graphic" style:parent-style-name="standard">
      <style:graphic-properties draw:stroke="none" draw:fill="solid" draw:fill-color="#00006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5" style:family="graphic" style:parent-style-name="standard">
      <style:graphic-properties draw:stroke="none" draw:fill="solid" draw:fill-color="#99999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6" style:family="graphic" style:parent-style-name="standard">
      <style:graphic-properties draw:stroke="none" draw:fill="solid" draw:fill-color="#99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7" style:family="graphic" style:parent-style-name="standard">
      <style:graphic-properties draw:stroke="none" draw:fill="solid" draw:fill-color="#585f5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8" style:family="graphic" style:parent-style-name="standard">
      <style:graphic-properties draw:stroke="none" draw:fill="solid" draw:fill-color="#5a616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49" style:family="graphic" style:parent-style-name="standard">
      <style:graphic-properties draw:stroke="none" draw:fill="solid" draw:fill-color="#5a646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0" style:family="graphic" style:parent-style-name="standard">
      <style:graphic-properties draw:stroke="none" draw:fill="solid" draw:fill-color="#5c666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1" style:family="graphic" style:parent-style-name="standard">
      <style:graphic-properties draw:stroke="none" draw:fill="solid" draw:fill-color="#606c6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2" style:family="graphic" style:parent-style-name="standard">
      <style:graphic-properties draw:stroke="none" draw:fill="solid" draw:fill-color="#626e6e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3" style:family="graphic" style:parent-style-name="standard">
      <style:graphic-properties draw:stroke="none" draw:fill="solid" draw:fill-color="#657171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4" style:family="graphic" style:parent-style-name="standard">
      <style:graphic-properties draw:stroke="none" draw:fill="solid" draw:fill-color="#65767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5" style:family="graphic" style:parent-style-name="standard">
      <style:graphic-properties draw:stroke="none" draw:fill="solid" draw:fill-color="#677878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6" style:family="graphic" style:parent-style-name="standard">
      <style:graphic-properties draw:stroke="none" draw:fill="solid" draw:fill-color="#6a7b7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7" style:family="graphic" style:parent-style-name="standard">
      <style:graphic-properties draw:stroke="none" draw:fill="solid" draw:fill-color="#6c808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8" style:family="graphic" style:parent-style-name="standard">
      <style:graphic-properties draw:stroke="none" draw:fill="solid" draw:fill-color="#6d838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59" style:family="graphic" style:parent-style-name="standard">
      <style:graphic-properties draw:stroke="none" draw:fill="solid" draw:fill-color="#6f858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0" style:family="graphic" style:parent-style-name="standard">
      <style:graphic-properties draw:stroke="none" draw:fill="solid" draw:fill-color="#728888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1" style:family="graphic" style:parent-style-name="standard">
      <style:graphic-properties draw:stroke="none" draw:fill="solid" draw:fill-color="#748d8d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2" style:family="graphic" style:parent-style-name="standard">
      <style:graphic-properties draw:stroke="none" draw:fill="solid" draw:fill-color="#768f8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3" style:family="graphic" style:parent-style-name="standard">
      <style:graphic-properties draw:stroke="none" draw:fill="solid" draw:fill-color="#769292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4" style:family="graphic" style:parent-style-name="standard">
      <style:graphic-properties draw:stroke="none" draw:fill="solid" draw:fill-color="#79979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5" style:family="graphic" style:parent-style-name="standard">
      <style:graphic-properties draw:stroke="none" draw:fill="solid" draw:fill-color="#7b999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6" style:family="graphic" style:parent-style-name="standard">
      <style:graphic-properties draw:stroke="none" draw:fill="solid" draw:fill-color="#7e9c9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7" style:family="graphic" style:parent-style-name="standard">
      <style:graphic-properties draw:stroke="none" draw:fill="solid" draw:fill-color="#819f9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8" style:family="graphic" style:parent-style-name="standard">
      <style:graphic-properties draw:stroke="none" draw:fill="solid" draw:fill-color="#81a4a4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69" style:family="graphic" style:parent-style-name="standard">
      <style:graphic-properties draw:stroke="none" draw:fill="solid" draw:fill-color="#83a6a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0" style:family="graphic" style:parent-style-name="standard">
      <style:graphic-properties draw:stroke="none" draw:fill="solid" draw:fill-color="#86a9a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1" style:family="graphic" style:parent-style-name="standard">
      <style:graphic-properties draw:stroke="none" draw:fill="solid" draw:fill-color="#88aeae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2" style:family="graphic" style:parent-style-name="standard">
      <style:graphic-properties draw:stroke="none" draw:fill="solid" draw:fill-color="#88b0b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3" style:family="graphic" style:parent-style-name="standard">
      <style:graphic-properties draw:stroke="none" draw:fill="solid" draw:fill-color="#8bb3b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4" style:family="graphic" style:parent-style-name="standard">
      <style:graphic-properties draw:stroke="none" draw:fill="solid" draw:fill-color="#8eb6b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5" style:family="graphic" style:parent-style-name="standard">
      <style:graphic-properties draw:stroke="none" draw:fill="solid" draw:fill-color="#90bbbb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6" style:family="graphic" style:parent-style-name="standard">
      <style:graphic-properties draw:stroke="none" draw:fill="solid" draw:fill-color="#92bdbd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7" style:family="graphic" style:parent-style-name="standard">
      <style:graphic-properties draw:stroke="none" draw:fill="solid" draw:fill-color="#93c0c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8" style:family="graphic" style:parent-style-name="standard">
      <style:graphic-properties draw:stroke="none" draw:fill="solid" draw:fill-color="#95c5c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79" style:family="graphic" style:parent-style-name="standard">
      <style:graphic-properties draw:stroke="none" draw:fill="solid" draw:fill-color="#97c7c7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80" style:family="graphic" style:parent-style-name="standard">
      <style:graphic-properties draw:stroke="none" draw:fill="solid" draw:fill-color="#9acaca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81" style:family="graphic" style:parent-style-name="standard">
      <style:graphic-properties draw:stroke="none" draw:fill="solid" draw:fill-color="#99cccc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82" style:family="graphic" style:parent-style-name="standard">
      <style:graphic-properties draw:stroke="none" draw:fill="solid" draw:fill-color="#006633" draw:textarea-horizontal-align="left" draw:textarea-vertical-align="top" draw:auto-grow-height="false" fo:min-height="0.031cm" fo:min-width="0cm" fo:padding-top="0.13cm" fo:padding-bottom="0.13cm" fo:padding-left="0.25cm" fo:padding-right="0.25cm" fo:wrap-option="wrap" draw:shadow-color="#5e574e" loext:decorative="false"/>
    </style:style>
    <style:style style:name="gr1083" style:family="graphic" style:parent-style-name="standard">
      <style:graphic-properties draw:stroke="none" draw:fill="solid" draw:fill-color="#003333" draw:textarea-horizontal-align="left" draw:textarea-vertical-align="top" draw:auto-grow-height="false" fo:min-height="0.092cm" fo:min-width="0cm" fo:padding-top="0.13cm" fo:padding-bottom="0.13cm" fo:padding-left="0.25cm" fo:padding-right="0.25cm" fo:wrap-option="wrap" draw:shadow-color="#5e574e" loext:decorative="false"/>
    </style:style>
    <style:style style:name="gr1084" style:family="graphic" style:parent-style-name="standard">
      <style:graphic-properties draw:stroke="none" draw:fill="solid" draw:fill-color="#00663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85" style:family="graphic" style:parent-style-name="standard">
      <style:graphic-properties draw:stroke="none" draw:fill="solid" draw:fill-color="#009933" draw:textarea-horizontal-align="left" draw:textarea-vertical-align="top" draw:auto-grow-height="false" fo:min-height="0.004cm" fo:min-width="0cm" fo:padding-top="0.13cm" fo:padding-bottom="0.13cm" fo:padding-left="0.25cm" fo:padding-right="0.25cm" fo:wrap-option="wrap" draw:shadow-color="#5e574e" loext:decorative="false"/>
    </style:style>
    <style:style style:name="gr1086" style:family="graphic" style:parent-style-name="standard">
      <style:graphic-properties draw:stroke="none" draw:fill="solid" draw:fill-color="#00333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087" style:family="graphic" style:parent-style-name="standard">
      <style:graphic-properties draw:stroke="none" draw:fill="solid" draw:fill-color="#999999" draw:textarea-horizontal-align="left" draw:textarea-vertical-align="top" draw:auto-grow-height="false" fo:min-height="0.067cm" fo:min-width="3.01cm" fo:padding-top="0.13cm" fo:padding-bottom="0.13cm" fo:padding-left="0.25cm" fo:padding-right="0.25cm" fo:wrap-option="wrap" draw:shadow-color="#5e574e" loext:decorative="false"/>
    </style:style>
    <style:style style:name="gr1088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629cm" fo:padding-top="0.13cm" fo:padding-bottom="0.13cm" fo:padding-left="0.25cm" fo:padding-right="0.25cm" fo:wrap-option="wrap" draw:shadow-color="#5e574e" loext:decorative="false"/>
    </style:style>
    <style:style style:name="gr1089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559cm" fo:padding-top="0.13cm" fo:padding-bottom="0.13cm" fo:padding-left="0.25cm" fo:padding-right="0.25cm" fo:wrap-option="wrap" draw:shadow-color="#5e574e" loext:decorative="false"/>
    </style:style>
    <style:style style:name="gr109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4.655cm" fo:padding-top="0.13cm" fo:padding-bottom="0.13cm" fo:padding-left="0.25cm" fo:padding-right="0.25cm" fo:wrap-option="wrap" draw:shadow-color="#5e574e" loext:decorative="false"/>
    </style:style>
    <style:style style:name="gr1091" style:family="graphic" style:parent-style-name="standard">
      <style:graphic-properties draw:stroke="none" draw:fill="solid" draw:fill-color="#b3b3b3" draw:textarea-horizontal-align="left" draw:textarea-vertical-align="top" draw:auto-grow-height="false" fo:min-height="0.181cm" fo:min-width="4.655cm" fo:padding-top="0.13cm" fo:padding-bottom="0.13cm" fo:padding-left="0.25cm" fo:padding-right="0.25cm" fo:wrap-option="wrap" draw:shadow-color="#5e574e" loext:decorative="false"/>
    </style:style>
    <style:style style:name="gr1092" style:family="graphic" style:parent-style-name="standard">
      <style:graphic-properties draw:stroke="none" draw:fill="solid" draw:fill-color="#b3b3b3" draw:textarea-horizontal-align="left" draw:textarea-vertical-align="top" draw:auto-grow-height="false" fo:min-height="0.172cm" fo:min-width="4.655cm" fo:padding-top="0.13cm" fo:padding-bottom="0.13cm" fo:padding-left="0.25cm" fo:padding-right="0.25cm" fo:wrap-option="wrap" draw:shadow-color="#5e574e" loext:decorative="false"/>
    </style:style>
    <style:style style:name="gr1093" style:family="graphic" style:parent-style-name="standard">
      <style:graphic-properties draw:stroke="none" draw:fill="solid" draw:fill-color="#000000" draw:textarea-horizontal-align="left" draw:textarea-vertical-align="top" draw:auto-grow-height="false" fo:min-height="0.005cm" fo:min-width="0.51cm" fo:padding-top="0.13cm" fo:padding-bottom="0.13cm" fo:padding-left="0.25cm" fo:padding-right="0.25cm" fo:wrap-option="wrap" draw:shadow-color="#5e574e" loext:decorative="false"/>
    </style:style>
    <style:style style:name="gr1094" style:family="graphic" style:parent-style-name="standard">
      <style:graphic-properties draw:stroke="none" draw:fill="solid" draw:fill-color="#000000" draw:textarea-horizontal-align="left" draw:textarea-vertical-align="top" draw:auto-grow-height="false" fo:min-height="0.005cm" fo:min-width="0.505cm" fo:padding-top="0.13cm" fo:padding-bottom="0.13cm" fo:padding-left="0.25cm" fo:padding-right="0.25cm" fo:wrap-option="wrap" draw:shadow-color="#5e574e" loext:decorative="false"/>
    </style:style>
    <style:style style:name="gr1095" style:family="graphic" style:parent-style-name="standard">
      <style:graphic-properties draw:stroke="none" draw:fill="solid" draw:fill-color="#000000" draw:textarea-horizontal-align="left" draw:textarea-vertical-align="top" draw:auto-grow-height="false" fo:min-height="0.005cm" fo:min-width="0.509cm" fo:padding-top="0.13cm" fo:padding-bottom="0.13cm" fo:padding-left="0.25cm" fo:padding-right="0.25cm" fo:wrap-option="wrap" draw:shadow-color="#5e574e" loext:decorative="false"/>
    </style:style>
    <style:style style:name="gr1096" style:family="graphic" style:parent-style-name="standard">
      <style:graphic-properties draw:stroke="none" draw:fill="solid" draw:fill-color="#000000" draw:textarea-horizontal-align="left" draw:textarea-vertical-align="top" draw:auto-grow-height="false" fo:min-height="0.009cm" fo:min-width="0.505cm" fo:padding-top="0.13cm" fo:padding-bottom="0.13cm" fo:padding-left="0.25cm" fo:padding-right="0.25cm" fo:wrap-option="wrap" draw:shadow-color="#5e574e" loext:decorative="false"/>
    </style:style>
    <style:style style:name="gr1097" style:family="graphic" style:parent-style-name="standard">
      <style:graphic-properties draw:stroke="none" draw:fill="solid" draw:fill-color="#000000" draw:textarea-horizontal-align="left" draw:textarea-vertical-align="top" draw:auto-grow-height="false" fo:min-height="0.009cm" fo:min-width="0.509cm" fo:padding-top="0.13cm" fo:padding-bottom="0.13cm" fo:padding-left="0.25cm" fo:padding-right="0.25cm" fo:wrap-option="wrap" draw:shadow-color="#5e574e" loext:decorative="false"/>
    </style:style>
    <style:style style:name="gr1098" style:family="graphic" style:parent-style-name="standard">
      <style:graphic-properties draw:stroke="none" draw:fill="solid" draw:fill-color="#000000" draw:textarea-horizontal-align="left" draw:textarea-vertical-align="top" draw:auto-grow-height="false" fo:min-height="0.004cm" fo:min-width="0.51cm" fo:padding-top="0.13cm" fo:padding-bottom="0.13cm" fo:padding-left="0.25cm" fo:padding-right="0.25cm" fo:wrap-option="wrap" draw:shadow-color="#5e574e" loext:decorative="false"/>
    </style:style>
    <style:style style:name="gr1099" style:family="graphic" style:parent-style-name="standard">
      <style:graphic-properties draw:stroke="none" draw:fill="solid" draw:fill-color="#000000" draw:textarea-horizontal-align="left" draw:textarea-vertical-align="top" draw:auto-grow-height="false" fo:min-height="0.004cm" fo:min-width="0.505cm" fo:padding-top="0.13cm" fo:padding-bottom="0.13cm" fo:padding-left="0.25cm" fo:padding-right="0.25cm" fo:wrap-option="wrap" draw:shadow-color="#5e574e" loext:decorative="false"/>
    </style:style>
    <style:style style:name="gr1100" style:family="graphic" style:parent-style-name="standard">
      <style:graphic-properties draw:stroke="none" draw:fill="solid" draw:fill-color="#000000" draw:textarea-horizontal-align="left" draw:textarea-vertical-align="top" draw:auto-grow-height="false" fo:min-height="0.004cm" fo:min-width="0.509cm" fo:padding-top="0.13cm" fo:padding-bottom="0.13cm" fo:padding-left="0.25cm" fo:padding-right="0.25cm" fo:wrap-option="wrap" draw:shadow-color="#5e574e" loext:decorative="false"/>
    </style:style>
    <style:style style:name="gr1101" style:family="graphic" style:parent-style-name="standard">
      <style:graphic-properties draw:stroke="none" draw:fill="solid" draw:fill-color="#000000" draw:textarea-horizontal-align="left" draw:textarea-vertical-align="top" draw:auto-grow-height="false" fo:min-height="0.009cm" fo:min-width="0.51cm" fo:padding-top="0.13cm" fo:padding-bottom="0.13cm" fo:padding-left="0.25cm" fo:padding-right="0.25cm" fo:wrap-option="wrap" draw:shadow-color="#5e574e" loext:decorative="false"/>
    </style:style>
    <style:style style:name="gr1102" style:family="graphic" style:parent-style-name="standard">
      <style:graphic-properties draw:stroke="solid" svg:stroke-width="0.035cm" svg:stroke-color="#dfe6e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1103" style:family="graphic" style:parent-style-name="standard">
      <style:graphic-properties draw:stroke="solid" svg:stroke-width="0.035cm" svg:stroke-color="#79808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gr1104" style:family="graphic" style:parent-style-name="standard">
      <style:graphic-properties draw:stroke="none" draw:fill="solid" draw:fill-color="#acb3b3" draw:textarea-horizontal-align="left" draw:textarea-vertical-align="top" draw:auto-grow-height="false" fo:min-height="0.565cm" fo:min-width="0cm" fo:padding-top="0.13cm" fo:padding-bottom="0.13cm" fo:padding-left="0.25cm" fo:padding-right="0.25cm" fo:wrap-option="wrap" draw:shadow-color="#5e574e" loext:decorative="false"/>
    </style:style>
    <style:style style:name="gr1105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503cm" fo:min-width="0cm" fo:padding-top="0.13cm" fo:padding-bottom="0.13cm" fo:padding-left="0.25cm" fo:padding-right="0.25cm" fo:wrap-option="wrap" draw:shadow-color="#5e574e" loext:decorative="false"/>
    </style:style>
    <style:style style:name="gr1106" style:family="graphic" style:parent-style-name="standard">
      <style:graphic-properties draw:stroke="none" draw:fill="solid" draw:fill-color="#acb3b3" draw:textarea-horizontal-align="left" draw:textarea-vertical-align="top" draw:auto-grow-height="false" fo:min-height="0.415cm" fo:min-width="0.179cm" fo:padding-top="0.13cm" fo:padding-bottom="0.13cm" fo:padding-left="0.25cm" fo:padding-right="0.25cm" fo:wrap-option="wrap" draw:shadow-color="#5e574e" loext:decorative="false"/>
    </style:style>
    <style:style style:name="gr1107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179cm" fo:padding-top="0.13cm" fo:padding-bottom="0.13cm" fo:padding-left="0.25cm" fo:padding-right="0.25cm" fo:wrap-option="wrap" draw:shadow-color="#5e574e" loext:decorative="false"/>
    </style:style>
    <style:style style:name="gr1108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175cm" fo:padding-top="0.13cm" fo:padding-bottom="0.13cm" fo:padding-left="0.25cm" fo:padding-right="0.25cm" fo:wrap-option="wrap" draw:shadow-color="#5e574e" loext:decorative="false"/>
    </style:style>
    <style:style style:name="gr1109" style:family="graphic" style:parent-style-name="standard">
      <style:graphic-properties draw:stroke="none" draw:fill="solid" draw:fill-color="#acb3b3" draw:textarea-horizontal-align="left" draw:textarea-vertical-align="top" draw:auto-grow-height="false" fo:min-height="0cm" fo:min-width="0.002cm" fo:padding-top="0.13cm" fo:padding-bottom="0.13cm" fo:padding-left="0.25cm" fo:padding-right="0.25cm" fo:wrap-option="wrap" draw:shadow-color="#5e574e" loext:decorative="false"/>
    </style:style>
    <style:style style:name="gr1110" style:family="graphic" style:parent-style-name="standard">
      <style:graphic-properties draw:stroke="none" draw:fill="solid" draw:fill-color="#acb3b3" draw:textarea-horizontal-align="left" draw:textarea-vertical-align="top" draw:auto-grow-height="false" fo:min-height="0cm" fo:min-width="0.003cm" fo:padding-top="0.13cm" fo:padding-bottom="0.13cm" fo:padding-left="0.25cm" fo:padding-right="0.25cm" fo:wrap-option="wrap" draw:shadow-color="#5e574e" loext:decorative="false"/>
    </style:style>
    <style:style style:name="gr1111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002cm" fo:padding-top="0.13cm" fo:padding-bottom="0.13cm" fo:padding-left="0.25cm" fo:padding-right="0.25cm" fo:wrap-option="wrap" draw:shadow-color="#5e574e" loext:decorative="false"/>
    </style:style>
    <style:style style:name="gr1112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003cm" fo:padding-top="0.13cm" fo:padding-bottom="0.13cm" fo:padding-left="0.25cm" fo:padding-right="0.25cm" fo:wrap-option="wrap" draw:shadow-color="#5e574e" loext:decorative="false"/>
    </style:style>
    <style:style style:name="gr1113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14" style:family="graphic" style:parent-style-name="standard">
      <style:graphic-properties draw:stroke="none" draw:fill="solid" draw:fill-color="#acb3b3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15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5e574e" loext:decorative="false"/>
    </style:style>
    <style:style style:name="gr1116" style:family="graphic" style:parent-style-name="standard">
      <style:graphic-properties draw:stroke="none" draw:fill="solid" draw:fill-color="#acb3b3" draw:textarea-horizontal-align="left" draw:textarea-vertical-align="top" draw:auto-grow-height="false" fo:min-height="0cm" fo:min-width="0.152cm" fo:padding-top="0.13cm" fo:padding-bottom="0.13cm" fo:padding-left="0.25cm" fo:padding-right="0.25cm" fo:wrap-option="wrap" draw:shadow-color="#5e574e" loext:decorative="false"/>
    </style:style>
    <style:style style:name="gr1117" style:family="graphic" style:parent-style-name="standard">
      <style:graphic-properties draw:stroke="none" draw:fill="solid" draw:fill-color="#acb3b3" draw:textarea-horizontal-align="left" draw:textarea-vertical-align="top" draw:auto-grow-height="false" fo:min-height="0cm" fo:min-width="0.153cm" fo:padding-top="0.13cm" fo:padding-bottom="0.13cm" fo:padding-left="0.25cm" fo:padding-right="0.25cm" fo:wrap-option="wrap" draw:shadow-color="#5e574e" loext:decorative="false"/>
    </style:style>
    <style:style style:name="gr1118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152cm" fo:padding-top="0.13cm" fo:padding-bottom="0.13cm" fo:padding-left="0.25cm" fo:padding-right="0.25cm" fo:wrap-option="wrap" draw:shadow-color="#5e574e" loext:decorative="false"/>
    </style:style>
    <style:style style:name="gr1119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153cm" fo:padding-top="0.13cm" fo:padding-bottom="0.13cm" fo:padding-left="0.25cm" fo:padding-right="0.25cm" fo:wrap-option="wrap" draw:shadow-color="#5e574e" loext:decorative="false"/>
    </style:style>
    <style:style style:name="gr1120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126cm" fo:padding-top="0.13cm" fo:padding-bottom="0.13cm" fo:padding-left="0.25cm" fo:padding-right="0.25cm" fo:wrap-option="wrap" draw:shadow-color="#5e574e" loext:decorative="false"/>
    </style:style>
    <style:style style:name="gr1121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54cm" fo:min-width="0.016cm" fo:padding-top="0.13cm" fo:padding-bottom="0.13cm" fo:padding-left="0.25cm" fo:padding-right="0.25cm" fo:wrap-option="wrap" draw:shadow-color="#5e574e" loext:decorative="false"/>
    </style:style>
    <style:style style:name="gr1122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154cm" fo:min-width="0.02cm" fo:padding-top="0.13cm" fo:padding-bottom="0.13cm" fo:padding-left="0.25cm" fo:padding-right="0.25cm" fo:wrap-option="wrap" draw:shadow-color="#5e574e" loext:decorative="false"/>
    </style:style>
    <style:style style:name="gr1123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503cm" fo:min-width="0cm" fo:padding-top="0.13cm" fo:padding-bottom="0.13cm" fo:padding-left="0.25cm" fo:padding-right="0.25cm" fo:wrap-option="wrap" draw:shadow-color="#5e574e" loext:decorative="false"/>
    </style:style>
    <style:style style:name="gr1124" style:family="graphic" style:parent-style-name="standard">
      <style:graphic-properties draw:stroke="none" draw:fill="solid" draw:fill-color="#acb3b3" draw:textarea-horizontal-align="left" draw:textarea-vertical-align="top" draw:auto-grow-height="false" fo:min-height="0.524cm" fo:min-width="1.047cm" fo:padding-top="0.13cm" fo:padding-bottom="0.13cm" fo:padding-left="0.25cm" fo:padding-right="0.25cm" fo:wrap-option="wrap" draw:shadow-color="#5e574e" loext:decorative="false"/>
    </style:style>
    <style:style style:name="gr1125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441cm" fo:min-width="1.047cm" fo:padding-top="0.13cm" fo:padding-bottom="0.13cm" fo:padding-left="0.25cm" fo:padding-right="0.25cm" fo:wrap-option="wrap" draw:shadow-color="#5e574e" loext:decorative="false"/>
    </style:style>
    <style:style style:name="gr1126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64cm" fo:min-width="1.047cm" fo:padding-top="0.13cm" fo:padding-bottom="0.13cm" fo:padding-left="0.25cm" fo:padding-right="0.25cm" fo:wrap-option="wrap" draw:shadow-color="#5e574e" loext:decorative="false"/>
    </style:style>
    <style:style style:name="gr1127" style:family="graphic" style:parent-style-name="standard">
      <style:graphic-properties draw:stroke="none" draw:fill="solid" draw:fill-color="#acb3b3" draw:textarea-horizontal-align="left" draw:textarea-vertical-align="top" draw:auto-grow-height="false" fo:min-height="0.511cm" fo:min-width="0.465cm" fo:padding-top="0.13cm" fo:padding-bottom="0.13cm" fo:padding-left="0.25cm" fo:padding-right="0.25cm" fo:wrap-option="wrap" draw:shadow-color="#5e574e" loext:decorative="false"/>
    </style:style>
    <style:style style:name="gr1128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511cm" fo:min-width="0.465cm" fo:padding-top="0.13cm" fo:padding-bottom="0.13cm" fo:padding-left="0.25cm" fo:padding-right="0.25cm" fo:wrap-option="wrap" draw:shadow-color="#5e574e" loext:decorative="false"/>
    </style:style>
    <style:style style:name="gr1129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449cm" fo:min-width="0.465cm" fo:padding-top="0.13cm" fo:padding-bottom="0.13cm" fo:padding-left="0.25cm" fo:padding-right="0.25cm" fo:wrap-option="wrap" draw:shadow-color="#5e574e" loext:decorative="false"/>
    </style:style>
    <style:style style:name="gr1130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445cm" fo:min-width="0.465cm" fo:padding-top="0.13cm" fo:padding-bottom="0.13cm" fo:padding-left="0.25cm" fo:padding-right="0.25cm" fo:wrap-option="wrap" draw:shadow-color="#5e574e" loext:decorative="false"/>
    </style:style>
    <style:style style:name="gr1131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17cm" fo:min-width="0.144cm" fo:padding-top="0.13cm" fo:padding-bottom="0.13cm" fo:padding-left="0.25cm" fo:padding-right="0.25cm" fo:wrap-option="wrap" draw:shadow-color="#5e574e" loext:decorative="false"/>
    </style:style>
    <style:style style:name="gr1132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.212cm" fo:min-width="0.144cm" fo:padding-top="0.13cm" fo:padding-bottom="0.13cm" fo:padding-left="0.25cm" fo:padding-right="0.25cm" fo:wrap-option="wrap" draw:shadow-color="#5e574e" loext:decorative="false"/>
    </style:style>
    <style:style style:name="gr1133" style:family="graphic" style:parent-style-name="standard">
      <style:graphic-properties draw:stroke="none" draw:fill="solid" draw:fill-color="#acb3b3" draw:textarea-horizontal-align="left" draw:textarea-vertical-align="top" draw:auto-grow-height="false" fo:min-height="1.345cm" fo:min-width="0.122cm" fo:padding-top="0.13cm" fo:padding-bottom="0.13cm" fo:padding-left="0.25cm" fo:padding-right="0.25cm" fo:wrap-option="wrap" draw:shadow-color="#5e574e" loext:decorative="false"/>
    </style:style>
    <style:style style:name="gr1134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323cm" fo:min-width="0.122cm" fo:padding-top="0.13cm" fo:padding-bottom="0.13cm" fo:padding-left="0.25cm" fo:padding-right="0.25cm" fo:wrap-option="wrap" draw:shadow-color="#5e574e" loext:decorative="false"/>
    </style:style>
    <style:style style:name="gr1135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1.318cm" fo:min-width="0.122cm" fo:padding-top="0.13cm" fo:padding-bottom="0.13cm" fo:padding-left="0.25cm" fo:padding-right="0.25cm" fo:wrap-option="wrap" draw:shadow-color="#5e574e" loext:decorative="false"/>
    </style:style>
    <style:style style:name="gr1136" style:family="graphic" style:parent-style-name="standard">
      <style:graphic-properties draw:stroke="none" draw:fill="solid" draw:fill-color="#acb3b3" draw:textarea-horizontal-align="left" draw:textarea-vertical-align="top" draw:auto-grow-height="false" fo:min-height="0cm" fo:min-width="1.048cm" fo:padding-top="0.13cm" fo:padding-bottom="0.13cm" fo:padding-left="0.25cm" fo:padding-right="0.25cm" fo:wrap-option="wrap" draw:shadow-color="#5e574e" loext:decorative="false"/>
    </style:style>
    <style:style style:name="gr1137" style:family="graphic" style:parent-style-name="standard">
      <style:graphic-properties draw:stroke="solid" svg:stroke-width="0.035cm" svg:stroke-color="#dfe6e6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0.942cm" fo:padding-top="0.13cm" fo:padding-bottom="0.13cm" fo:padding-left="0.25cm" fo:padding-right="0.25cm" fo:wrap-option="wrap" draw:shadow-color="#5e574e" loext:decorative="false"/>
    </style:style>
    <style:style style:name="gr1138" style:family="graphic" style:parent-style-name="standard">
      <style:graphic-properties draw:stroke="solid" svg:stroke-width="0.035cm" svg:stroke-color="#79808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false" fo:min-height="0cm" fo:min-width="1.048cm" fo:padding-top="0.13cm" fo:padding-bottom="0.13cm" fo:padding-left="0.25cm" fo:padding-right="0.25cm" fo:wrap-option="wrap" draw:shadow-color="#5e574e" loext:decorative="false"/>
    </style:style>
    <style:style style:name="gr1139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0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1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2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3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4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5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7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8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5e574e" loext:decorative="false"/>
      <style:paragraph-properties style:writing-mode="lr-tb"/>
    </style:style>
    <style:style style:name="gr1149" style:family="graphic" style:parent-style-name="standard">
      <style:graphic-properties draw:stroke="none" draw:fill="none" draw:fill-color="#618ffd" draw:textarea-horizontal-align="justify" draw:textarea-vertical-align="bottom" draw:auto-grow-height="false" draw:auto-grow-width="false" fo:min-height="1.011cm" fo:min-width="0cm" fo:padding-top="0.13cm" fo:padding-bottom="0.13cm" fo:padding-left="0.25cm" fo:padding-right="0.25cm" fo:wrap-option="wrap" draw:shadow-color="#919191" loext:decorative="false"/>
      <style:paragraph-properties style:writing-mode="lr-tb"/>
    </style:style>
    <style:style style:name="gr1150" style:family="graphic" style:parent-style-name="standard">
      <style:graphic-properties draw:stroke="none" draw:fill="none" draw:fill-color="#618ffd" draw:textarea-horizontal-align="justify" draw:textarea-vertical-align="top" draw:auto-grow-height="false" draw:auto-grow-width="false" fo:min-height="1.011cm" fo:min-width="0cm" fo:padding-top="0.13cm" fo:padding-bottom="0.13cm" fo:padding-left="0.25cm" fo:padding-right="0.25cm" fo:wrap-option="wrap" draw:shadow-color="#919191" loext:decorative="false"/>
      <style:paragraph-properties style:writing-mode="lr-tb"/>
    </style:style>
    <style:style style:name="gr1151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min-height="12.864cm" fo:min-width="11.353cm" fo:padding-top="0.13cm" fo:padding-bottom="0.13cm" fo:padding-left="0.25cm" fo:padding-right="0.25cm" fo:wrap-option="no-wrap" draw:shadow-color="#5e574e" loext:decorative="false"/>
    </style:style>
    <style:style style:name="gr1152" style:family="graphic" style:parent-style-name="standard">
      <style:graphic-properties draw:stroke="none" draw:fill="none" draw:fill-color="#ff6600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53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c0c0c0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5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017cm" fo:padding-bottom="0.017cm" fo:padding-left="0.034cm" fo:padding-right="0.034cm" fo:wrap-option="no-wrap" draw:shadow-color="#5e574e" loext:decorative="false"/>
    </style:style>
    <style:style style:name="gr1155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ff6600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5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ffffff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57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000000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58" style:family="graphic" style:parent-style-name="standard" style:list-style-name="L22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59" style:family="graphic" style:parent-style-name="standard" style:list-style-name="L22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0" style:family="graphic" style:parent-style-name="standard">
      <style:graphic-properties draw:stroke="solid" svg:stroke-width="0.035cm" svg:stroke-color="#808000" draw:stroke-linejoin="miter" draw:fill="none" draw:fill-color="#ffffff" draw:textarea-horizontal-align="left" draw:textarea-vertical-align="top" draw:auto-grow-height="true" fo:padding-top="0.017cm" fo:padding-bottom="0.017cm" fo:padding-left="0.034cm" fo:padding-right="0.034cm" fo:wrap-option="no-wrap" draw:shadow-color="#5e574e" loext:decorative="false"/>
    </style:style>
    <style:style style:name="gr1161" style:family="graphic" style:parent-style-name="standard" style:list-style-name="L22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2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3" style:family="graphic" style:parent-style-name="standard" style:list-style-name="L22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4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5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7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8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69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0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1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2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3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4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5" style:family="graphic" style:parent-style-name="standard">
      <style:graphic-properties draw:stroke="solid" svg:stroke-width="0.035cm" svg:stroke-color="#808000" svg:stroke-opacity="100%" draw:stroke-linejoin="round" svg:stroke-linecap="round" draw:fill="solid" draw:fill-color="#000000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76" style:family="graphic" style:parent-style-name="standard">
      <style:graphic-properties draw:stroke="none" draw:fill="solid" draw:fill-color="#000000" draw:textarea-horizontal-align="left" draw:textarea-vertical-align="top" draw:auto-grow-height="true" fo:min-height="0cm" fo:min-width="0cm" fo:padding-top="0.017cm" fo:padding-bottom="0.017cm" fo:padding-left="0.034cm" fo:padding-right="0.034cm" fo:wrap-option="no-wrap" draw:shadow-color="#5e574e" loext:decorative="false"/>
    </style:style>
    <style:style style:name="gr1177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8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79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0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1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2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3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4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5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6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7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8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89" style:family="graphic" style:parent-style-name="standard" style:list-style-name="L5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gr1190" style:family="graphic" style:parent-style-name="standard">
      <style:graphic-properties draw:stroke="none" draw:fill="none" draw:fill-color="#ff6600" draw:textarea-horizontal-align="justify" draw:textarea-vertical-align="top" draw:auto-grow-height="true" fo:min-height="0cm" fo:min-width="0cm" fo:padding-top="0.017cm" fo:padding-bottom="0.017cm" fo:padding-left="0.035cm" fo:padding-right="0.035cm" fo:wrap-option="no-wrap" draw:shadow-color="#5e574e" loext:decorative="false"/>
      <style:paragraph-properties style:writing-mode="lr-tb"/>
    </style:style>
    <style:style style:name="pr1" style:family="presentation" style:parent-style-name="Title1-title">
      <style:graphic-properties draw:stroke="none" draw:fill="none" draw:fill-color="#ff6600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6600" draw:textarea-horizontal-align="justify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6600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6600" draw:textarea-horizontal-align="justify" draw:textarea-vertical-align="top" draw:auto-grow-height="false" draw:auto-grow-width="false" draw:fit-to-size="false" style:shrink-to-fit="true" fo:min-height="11.3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6600" draw:textarea-horizontal-align="justify" draw:textarea-vertical-align="middle" draw:auto-grow-height="false" draw:auto-grow-width="false" fo:min-height="2.946cm" fo:min-width="0cm" fo:padding-top="0.115cm" fo:padding-bottom="0.115cm" fo:padding-left="0.234cm" fo:padding-right="0.234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2cm" fo:padding-bottom="0.132cm" fo:padding-left="0.26cm" fo:padding-right="0.26cm" fo:wrap-option="wrap" draw:shadow-color="#969696" loext:decorative="false"/>
      <style:paragraph-properties style:writing-mode="lr-tb"/>
    </style:style>
    <style:style style:name="pr9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61cm" fo:min-width="0cm" fo:padding-top="0.137cm" fo:padding-bottom="0.137cm" fo:padding-left="0.265cm" fo:padding-right="0.265cm" fo:wrap-option="wrap" draw:shadow-color="#969696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6600" draw:textarea-horizontal-align="justify" draw:textarea-vertical-align="top" draw:auto-grow-height="false" draw:auto-grow-width="false" draw:fit-to-size="false" style:shrink-to-fit="true" fo:min-height="8.026cm" fo:min-width="0cm" fo:padding-top="0.115cm" fo:padding-bottom="0.115cm" fo:padding-left="0.234cm" fo:padding-right="0.234cm" fo:wrap-option="wrap" draw:shadow-color="#808080" loext:decorative="false"/>
      <style:paragraph-properties style:writing-mode="lr-tb"/>
    </style:style>
    <style:style style:name="pr11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84cm" fo:min-width="0cm" fo:padding-top="0.128cm" fo:padding-bottom="0.128cm" fo:padding-left="0.256cm" fo:padding-right="0.256cm" fo:wrap-option="wrap" draw:shadow-color="#969696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6600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808080" loext:decorative="false"/>
      <style:paragraph-properties style:writing-mode="lr-tb"/>
    </style:style>
    <style:style style:name="pr13" style:family="presentation" style:parent-style-name="Default-notes">
      <style:graphic-properties draw:stroke="none" draw:fill="none" draw:fill-color="#618ffd" draw:textarea-horizontal-align="justify" draw:textarea-vertical-align="top" draw:auto-grow-height="false" draw:auto-grow-width="false" fo:min-height="11.179cm" fo:min-width="0cm" fo:padding-top="0.128cm" fo:padding-bottom="0.128cm" fo:padding-left="0.256cm" fo:padding-right="0.256cm" fo:wrap-option="wrap" draw:shadow-color="#919191" loext:decorative="false"/>
      <style:paragraph-properties style:writing-mode="lr-tb"/>
    </style:style>
    <style:style style:name="pr14" style:family="presentation" style:parent-style-name="Default-notes">
      <style:graphic-properties draw:stroke="none" draw:fill="none" draw:fill-color="#618ffd" draw:textarea-horizontal-align="justify" draw:textarea-vertical-align="top" draw:auto-grow-height="false" draw:auto-grow-width="false" fo:min-height="11.175cm" fo:min-width="0cm" fo:padding-top="0.13cm" fo:padding-bottom="0.13cm" fo:padding-left="0.25cm" fo:padding-right="0.25cm" fo:wrap-option="wrap" draw:shadow-color="#919191" loext:decorative="false"/>
      <style:paragraph-properties style:writing-mode="lr-tb"/>
    </style:style>
    <style:style style:name="pr15" style:family="presentation" style:parent-style-name="Default-notes">
      <style:graphic-properties draw:stroke="none" draw:fill="none" draw:fill-color="#00cc99" draw:textarea-horizontal-align="left" draw:textarea-vertical-align="top" fo:min-height="11.43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6600"/>
      <style:paragraph-properties style:font-independent-line-spacing="true"/>
    </style:style>
    <style:style style:name="P3" style:family="paragraph">
      <style:paragraph-properties fo:margin-left="0cm" fo:margin-right="0cm" fo:margin-top="0.176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85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00cc99"/>
      <style:paragraph-properties style:font-independent-line-spacing="true"/>
    </style:style>
    <style:style style:name="P6" style:family="paragraph">
      <style:paragraph-properties fo:margin-left="0cm" fo:margin-right="0cm" fo:margin-top="0.247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159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247cm" fo:margin-bottom="0cm" fo:line-height="14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19cm" fo:margin-bottom="0cm" fo:line-height="7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106cm" fo:margin-bottom="0cm" fo:line-height="7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1.27cm" fo:margin-right="0cm" fo:margin-top="0.106cm" fo:margin-bottom="0cm" fo:line-height="7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093cm" fo:margin-bottom="0cm" fo:line-height="7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808000"/>
      <style:paragraph-properties style:font-independent-line-spacing="true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6600"/>
      <style:paragraph-properties fo:text-align="center"/>
    </style:style>
    <style:style style:name="P16" style:family="paragraph">
      <loext:graphic-properties draw:fill="solid" draw:fill-color="#ffffff"/>
      <style:paragraph-properties style:font-independent-line-spacing="true"/>
    </style:style>
    <style:style style:name="P17" style:family="paragraph">
      <loext:graphic-properties draw:fill="solid" draw:fill-color="#ff6600"/>
      <style:paragraph-properties style:font-independent-line-spacing="true"/>
    </style:style>
    <style:style style:name="P18" style:family="paragraph">
      <style:paragraph-properties fo:margin-left="0cm" fo:margin-right="0cm" fo:margin-top="0.397cm" fo:margin-bottom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6600"/>
      <style:paragraph-properties fo:margin-left="0cm" fo:margin-right="0cm" fo:margin-top="0.397cm" fo:margin-bottom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6600"/>
      <style:paragraph-properties fo:margin-left="0cm" fo:margin-right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397cm" fo:margin-bottom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6600"/>
      <style:paragraph-properties fo:margin-left="0cm" fo:margin-right="0cm" fo:margin-top="0.397cm" fo:margin-bottom="0cm" fo:line-height="100%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159cm" fo:margin-bottom="0cm" fo:text-indent="0cm" loext:tab-stop-distance="0cm">
        <style:tab-stops>
          <style:tab-stop style:position="0cm"/>
          <style:tab-stop style:position="2.452cm"/>
          <style:tab-stop style:position="4.904cm"/>
          <style:tab-stop style:position="7.355cm"/>
          <style:tab-stop style:position="9.807cm"/>
          <style:tab-stop style:position="12.259cm"/>
          <style:tab-stop style:position="14.711cm"/>
          <style:tab-stop style:position="17.163cm"/>
          <style:tab-stop style:position="19.614cm"/>
          <style:tab-stop style:position="22.066cm"/>
          <style:tab-stop style:position="24.518cm"/>
          <style:tab-stop style:position="26.97cm"/>
          <style:tab-stop style:position="29.422cm"/>
        </style:tab-stops>
      </style:paragraph-properties>
    </style:style>
    <style:style style:name="P26" style:family="paragraph">
      <style:paragraph-properties fo:margin-left="0cm" fo:margin-right="0cm" fo:margin-top="0.353cm" fo:margin-bottom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6600"/>
      <style:paragraph-properties fo:margin-left="0cm" fo:margin-right="0cm" fo:margin-top="0.353cm" fo:margin-bottom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6600"/>
      <style:paragraph-properties fo:margin-left="0cm" fo:margin-right="0cm" fo:line-height="100%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gradient" draw:fill-color="#ffc62a" draw:fill-gradient-name="Gradient_20_1"/>
      <style:paragraph-properties style:font-independent-line-spacing="true"/>
    </style:style>
    <style:style style:name="P31" style:family="paragraph">
      <loext:graphic-properties draw:fill="solid" draw:fill-color="#c0c0c0"/>
      <style:paragraph-properties style:font-independent-line-spacing="true"/>
    </style:style>
    <style:style style:name="P32" style:family="paragraph">
      <loext:graphic-properties draw:fill="solid" draw:fill-color="#2a6bff"/>
      <style:paragraph-properties style:font-independent-line-spacing="true"/>
    </style:style>
    <style:style style:name="P33" style:family="paragraph">
      <loext:graphic-properties draw:fill="solid" draw:fill-color="#404040"/>
      <style:paragraph-properties style:font-independent-line-spacing="true"/>
    </style:style>
    <style:style style:name="P34" style:family="paragraph">
      <loext:graphic-properties draw:fill="solid" draw:fill-color="#e3e3e3"/>
      <style:paragraph-properties style:font-independent-line-spacing="true"/>
    </style:style>
    <style:style style:name="P35" style:family="paragraph">
      <loext:graphic-properties draw:fill="solid" draw:fill-color="#000000"/>
      <style:paragraph-properties style:font-independent-line-spacing="true"/>
    </style:style>
    <style:style style:name="P36" style:family="paragraph">
      <loext:graphic-properties draw:fill="solid" draw:fill-color="#808080"/>
      <style:paragraph-properties style:font-independent-line-spacing="true"/>
    </style:style>
    <style:style style:name="P37" style:family="paragraph">
      <loext:graphic-properties draw:fill="solid" draw:fill-color="#d5006c"/>
      <style:paragraph-properties style:font-independent-line-spacing="true"/>
    </style:style>
    <style:style style:name="P38" style:family="paragraph">
      <loext:graphic-properties draw:fill="none" draw:fill-color="#ff6600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margin-top="0.212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text-indent="0cm" loext:tab-stop-distance="0cm">
        <style:tab-stops>
          <style:tab-stop style:position="0cm"/>
          <style:tab-stop style:position="2.514cm"/>
          <style:tab-stop style:position="5.027cm"/>
          <style:tab-stop style:position="7.541cm"/>
          <style:tab-stop style:position="10.054cm"/>
          <style:tab-stop style:position="12.568cm"/>
          <style:tab-stop style:position="15.081cm"/>
          <style:tab-stop style:position="17.595cm"/>
          <style:tab-stop style:position="20.108cm"/>
          <style:tab-stop style:position="22.622cm"/>
          <style:tab-stop style:position="25.135cm"/>
          <style:tab-stop style:position="27.649cm"/>
          <style:tab-stop style:position="30.163cm"/>
        </style:tab-stops>
      </style:paragraph-properties>
    </style:style>
    <style:style style:name="P41" style:family="paragraph">
      <loext:graphic-properties draw:fill="solid" draw:fill-color="#3c0023"/>
      <style:paragraph-properties style:font-independent-line-spacing="true"/>
    </style:style>
    <style:style style:name="P42" style:family="paragraph">
      <loext:graphic-properties draw:fill="gradient" draw:fill-color="#6e0043" draw:fill-gradient-name="Gradient_20_2"/>
      <style:paragraph-properties style:font-independent-line-spacing="true"/>
    </style:style>
    <style:style style:name="P43" style:family="paragraph">
      <loext:graphic-properties draw:fill="gradient" draw:fill-color="#d93192" draw:fill-gradient-name="Gradient_20_3"/>
      <style:paragraph-properties style:font-independent-line-spacing="true"/>
    </style:style>
    <style:style style:name="P44" style:family="paragraph">
      <loext:graphic-properties draw:fill="gradient" draw:fill-color="#d93192" draw:fill-gradient-name="Gradient_20_4"/>
      <style:paragraph-properties style:font-independent-line-spacing="true"/>
    </style:style>
    <style:style style:name="P45" style:family="paragraph">
      <loext:graphic-properties draw:fill="solid" draw:fill-color="#5e574e"/>
      <style:paragraph-properties fo:margin-left="0cm" fo:margin-right="0cm" fo:line-height="100%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solid" draw:fill-color="#f0e0c0"/>
      <style:paragraph-properties style:font-independent-line-spacing="true"/>
    </style:style>
    <style:style style:name="P47" style:family="paragraph">
      <loext:graphic-properties draw:fill="solid" draw:fill-color="#a0a080"/>
      <style:paragraph-properties style:font-independent-line-spacing="true"/>
    </style:style>
    <style:style style:name="P48" style:family="paragraph">
      <loext:graphic-properties draw:fill="solid" draw:fill-color="#808060"/>
      <style:paragraph-properties style:font-independent-line-spacing="true"/>
    </style:style>
    <style:style style:name="P49" style:family="paragraph">
      <loext:graphic-properties draw:fill="solid" draw:fill-color="#505020"/>
      <style:paragraph-properties style:font-independent-line-spacing="true"/>
    </style:style>
    <style:style style:name="P50" style:family="paragraph">
      <loext:graphic-properties draw:fill="solid" draw:fill-color="#c0c080"/>
      <style:paragraph-properties style:font-independent-line-spacing="true"/>
    </style:style>
    <style:style style:name="P51" style:family="paragraph">
      <loext:graphic-properties draw:fill="solid" draw:fill-color="#00dfca"/>
      <style:paragraph-properties style:font-independent-line-spacing="true"/>
    </style:style>
    <style:style style:name="P52" style:family="paragraph">
      <loext:graphic-properties draw:fill="solid" draw:fill-color="#808050"/>
      <style:paragraph-properties style:font-independent-line-spacing="true"/>
    </style:style>
    <style:style style:name="P53" style:family="paragraph">
      <loext:graphic-properties draw:fill="solid" draw:fill-color="#a08060"/>
      <style:paragraph-properties style:font-independent-line-spacing="true"/>
    </style:style>
    <style:style style:name="P54" style:family="paragraph">
      <loext:graphic-properties draw:fill="solid" draw:fill-color="#404010"/>
      <style:paragraph-properties style:font-independent-line-spacing="true"/>
    </style:style>
    <style:style style:name="P55" style:family="paragraph">
      <loext:graphic-properties draw:fill="solid" draw:fill-color="#e0d0a0"/>
      <style:paragraph-properties style:font-independent-line-spacing="true"/>
    </style:style>
    <style:style style:name="P56" style:family="paragraph">
      <loext:graphic-properties draw:fill="solid" draw:fill-color="#e0e0b0"/>
      <style:paragraph-properties style:font-independent-line-spacing="true"/>
    </style:style>
    <style:style style:name="P57" style:family="paragraph">
      <loext:graphic-properties draw:fill="solid" draw:fill-color="#a0a070"/>
      <style:paragraph-properties style:font-independent-line-spacing="true"/>
    </style:style>
    <style:style style:name="P58" style:family="paragraph">
      <loext:graphic-properties draw:fill="solid" draw:fill-color="#a0ff00"/>
      <style:paragraph-properties style:font-independent-line-spacing="true"/>
    </style:style>
    <style:style style:name="P59" style:family="paragraph">
      <loext:graphic-properties draw:fill="solid" draw:fill-color="#706040"/>
      <style:paragraph-properties style:font-independent-line-spacing="true"/>
    </style:style>
    <style:style style:name="P60" style:family="paragraph">
      <loext:graphic-properties draw:fill="solid" draw:fill-color="#d0c0a0"/>
      <style:paragraph-properties style:font-independent-line-spacing="true"/>
    </style:style>
    <style:style style:name="P61" style:family="paragraph">
      <loext:graphic-properties draw:fill="solid" draw:fill-color="#ff6000"/>
      <style:paragraph-properties style:font-independent-line-spacing="true"/>
    </style:style>
    <style:style style:name="P62" style:family="paragraph">
      <loext:graphic-properties draw:fill="gradient" draw:fill-color="#dc0081" draw:fill-gradient-name="Gradient_20_5"/>
      <style:paragraph-properties style:font-independent-line-spacing="true"/>
    </style:style>
    <style:style style:name="P63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none" draw:fill-color="#ff6600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loext:graphic-properties draw:fill="none" draw:fill-color="#00cc99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gradient" draw:fill-color="#cbcbcb" draw:fill-gradient-name="Gradient_20_6"/>
      <style:paragraph-properties style:font-independent-line-spacing="true"/>
    </style:style>
    <style:style style:name="P67" style:family="paragraph">
      <style:paragraph-properties fo:margin-left="0cm" fo:margin-right="0cm" fo:line-height="9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loext:graphic-properties draw:fill="none" draw:fill-color="#ff6600"/>
      <style:paragraph-properties fo:margin-left="0cm" fo:margin-right="0cm" fo:line-height="9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loext:graphic-properties draw:fill="solid" draw:fill-color="#315faf"/>
      <style:paragraph-properties style:font-independent-line-spacing="true"/>
    </style:style>
    <style:style style:name="P70" style:family="paragraph">
      <loext:graphic-properties draw:fill="solid" draw:fill-color="#676767"/>
      <style:paragraph-properties style:font-independent-line-spacing="true"/>
    </style:style>
    <style:style style:name="P71" style:family="paragraph">
      <loext:graphic-properties draw:fill="solid" draw:fill-color="#5e574e"/>
      <style:paragraph-properties style:font-independent-line-spacing="true"/>
    </style:style>
    <style:style style:name="P72" style:family="paragraph">
      <loext:graphic-properties draw:fill="solid" draw:fill-color="#dadada"/>
      <style:paragraph-properties style:font-independent-line-spacing="true"/>
    </style:style>
    <style:style style:name="P73" style:family="paragraph">
      <loext:graphic-properties draw:fill="gradient" draw:fill-color="#114ffb" draw:fill-gradient-name="Gradient_20_7"/>
      <style:paragraph-properties style:font-independent-line-spacing="true"/>
    </style:style>
    <style:style style:name="P74" style:family="paragraph">
      <loext:graphic-properties draw:fill="solid" draw:fill-color="#919191"/>
      <style:paragraph-properties style:font-independent-line-spacing="true"/>
    </style:style>
    <style:style style:name="P75" style:family="paragraph">
      <loext:graphic-properties draw:fill="solid" draw:fill-color="#aaaaaa"/>
      <style:paragraph-properties style:font-independent-line-spacing="true"/>
    </style:style>
    <style:style style:name="P76" style:family="paragraph">
      <loext:graphic-properties draw:fill="solid" draw:fill-color="#fcfcfc"/>
      <style:paragraph-properties style:font-independent-line-spacing="true"/>
    </style:style>
    <style:style style:name="P77" style:family="paragraph">
      <loext:graphic-properties draw:fill="solid" draw:fill-color="#fdfdfd"/>
      <style:paragraph-properties style:font-independent-line-spacing="true"/>
    </style:style>
    <style:style style:name="P78" style:family="paragraph">
      <loext:graphic-properties draw:fill="solid" draw:fill-color="#fefefe"/>
      <style:paragraph-properties style:font-independent-line-spacing="true"/>
    </style:style>
    <style:style style:name="P79" style:family="paragraph">
      <loext:graphic-properties draw:fill="solid" draw:fill-color="#cecece"/>
      <style:paragraph-properties style:font-independent-line-spacing="true"/>
    </style:style>
    <style:style style:name="P80" style:family="paragraph">
      <loext:graphic-properties draw:fill="solid" draw:fill-color="#8e8e8e"/>
      <style:paragraph-properties style:font-independent-line-spacing="true"/>
    </style:style>
    <style:style style:name="P81" style:family="paragraph">
      <loext:graphic-properties draw:fill="solid" draw:fill-color="#c7c7c7"/>
      <style:paragraph-properties style:font-independent-line-spacing="true"/>
    </style:style>
    <style:style style:name="P82" style:family="paragraph">
      <loext:graphic-properties draw:fill="solid" draw:fill-color="#4000d5"/>
      <style:paragraph-properties style:font-independent-line-spacing="true"/>
    </style:style>
    <style:style style:name="P83" style:family="paragraph">
      <style:paragraph-properties fo:margin-left="0cm" fo:margin-right="0cm" fo:margin-top="0.309cm" fo:margin-bottom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loext:graphic-properties draw:fill="none" draw:fill-color="#ff6600"/>
      <style:paragraph-properties fo:margin-left="0cm" fo:margin-right="0cm" fo:margin-top="0.309cm" fo:margin-bottom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style:paragraph-properties fo:margin-left="0cm" fo:margin-right="0cm" fo:margin-top="0.309cm" fo:margin-bottom="0cm" fo:line-height="10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loext:graphic-properties draw:fill="none" draw:fill-color="#ff6600"/>
      <style:paragraph-properties fo:margin-left="0cm" fo:margin-right="0cm" fo:margin-top="0.309cm" fo:margin-bottom="0cm" fo:line-height="100%" fo:text-indent="0cm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loext:graphic-properties draw:fill="solid" draw:fill-color="#ff6600"/>
      <style:paragraph-properties fo:margin-left="0cm" fo:margin-right="0cm" fo:line-height="9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loext:graphic-properties draw:fill="none" draw:fill-color="#ff6600"/>
      <style:paragraph-properties fo:margin-left="0cm" fo:margin-right="0cm" fo:margin-top="0.176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9" style:family="paragraph">
      <loext:graphic-properties draw:fill="solid" draw:fill-color="#00b7a5"/>
      <style:paragraph-properties style:font-independent-line-spacing="true"/>
    </style:style>
    <style:style style:name="P90" style:family="paragraph">
      <loext:graphic-properties draw:fill="solid" draw:fill-color="#00ae00"/>
      <style:paragraph-properties style:font-independent-line-spacing="true"/>
    </style:style>
    <style:style style:name="P91" style:family="paragraph">
      <loext:graphic-properties draw:fill="solid" draw:fill-color="#fdc0e5"/>
      <style:paragraph-properties style:font-independent-line-spacing="true"/>
    </style:style>
    <style:style style:name="P92" style:family="paragraph">
      <loext:graphic-properties draw:fill="solid" draw:fill-color="#ff0000"/>
      <style:paragraph-properties style:font-independent-line-spacing="true"/>
    </style:style>
    <style:style style:name="P93" style:family="paragraph">
      <loext:graphic-properties draw:fill="solid" draw:fill-color="#008000"/>
      <style:paragraph-properties style:font-independent-line-spacing="true"/>
    </style:style>
    <style:style style:name="P94" style:family="paragraph">
      <loext:graphic-properties draw:fill="solid" draw:fill-color="#dbdbdb"/>
      <style:paragraph-properties style:font-independent-line-spacing="true"/>
    </style:style>
    <style:style style:name="P95" style:family="paragraph">
      <loext:graphic-properties draw:fill="solid" draw:fill-color="#474747"/>
      <style:paragraph-properties style:font-independent-line-spacing="true"/>
    </style:style>
    <style:style style:name="P96" style:family="paragraph">
      <loext:graphic-properties draw:fill="solid" draw:fill-color="#037c03"/>
      <style:paragraph-properties style:font-independent-line-spacing="true"/>
    </style:style>
    <style:style style:name="P97" style:family="paragraph">
      <loext:graphic-properties draw:fill="gradient" draw:fill-color="#618ffd" draw:fill-gradient-name="Gradient_20_8"/>
      <style:paragraph-properties style:font-independent-line-spacing="true"/>
    </style:style>
    <style:style style:name="P98" style:family="paragraph">
      <loext:graphic-properties draw:fill="gradient" draw:fill-color="#676767" draw:fill-gradient-name="Gradient_20_9"/>
      <style:paragraph-properties style:font-independent-line-spacing="true"/>
    </style:style>
    <style:style style:name="P99" style:family="paragraph">
      <style:paragraph-properties fo:margin-left="0cm" fo:margin-right="0cm" fo:line-height="140%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0" style:family="paragraph">
      <loext:graphic-properties draw:fill="none" draw:fill-color="#ff6600"/>
      <style:paragraph-properties fo:margin-left="0cm" fo:margin-right="0cm" fo:line-height="140%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1" style:family="paragraph">
      <style:paragraph-properties fo:margin-left="0cm" fo:margin-right="0cm" fo:margin-top="0.176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2" style:family="paragraph">
      <style:paragraph-properties fo:margin-left="0cm" fo:margin-right="0cm" fo:margin-top="0.159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3" style:family="paragraph">
      <loext:graphic-properties draw:fill="gradient" draw:fill-color="#414141" draw:fill-gradient-name="Gradient_20_10"/>
      <style:paragraph-properties style:font-independent-line-spacing="true"/>
    </style:style>
    <style:style style:name="P104" style:family="paragraph">
      <loext:graphic-properties draw:fill="gradient" draw:fill-color="#0066ff" draw:fill-gradient-name="Gradient_20_11"/>
      <style:paragraph-properties style:font-independent-line-spacing="true"/>
    </style:style>
    <style:style style:name="P105" style:family="paragraph">
      <loext:graphic-properties draw:fill="gradient" draw:fill-color="#ff9933" draw:fill-gradient-name="Gradient_20_12"/>
      <style:paragraph-properties style:font-independent-line-spacing="true"/>
    </style:style>
    <style:style style:name="P106" style:family="paragraph">
      <loext:graphic-properties draw:fill="gradient" draw:fill-color="#fc0128" draw:fill-gradient-name="Gradient_20_13"/>
      <style:paragraph-properties style:font-independent-line-spacing="true"/>
    </style:style>
    <style:style style:name="P107" style:family="paragraph">
      <loext:graphic-properties draw:fill="none" draw:fill-color="#00cc99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8" style:family="paragraph">
      <loext:graphic-properties draw:fill="solid" draw:fill-color="#00e0e0"/>
      <style:paragraph-properties style:font-independent-line-spacing="true"/>
    </style:style>
    <style:style style:name="P109" style:family="paragraph">
      <loext:graphic-properties draw:fill="solid" draw:fill-color="#80ffff"/>
      <style:paragraph-properties style:font-independent-line-spacing="true"/>
    </style:style>
    <style:style style:name="P110" style:family="paragraph">
      <loext:graphic-properties draw:fill="solid" draw:fill-color="#606060"/>
      <style:paragraph-properties style:font-independent-line-spacing="true"/>
    </style:style>
    <style:style style:name="P111" style:family="paragraph">
      <loext:graphic-properties draw:fill="solid" draw:fill-color="#c0c000"/>
      <style:paragraph-properties style:font-independent-line-spacing="true"/>
    </style:style>
    <style:style style:name="P112" style:family="paragraph">
      <loext:graphic-properties draw:fill="solid" draw:fill-color="#202020"/>
      <style:paragraph-properties style:font-independent-line-spacing="true"/>
    </style:style>
    <style:style style:name="P113" style:family="paragraph">
      <loext:graphic-properties draw:fill="solid" draw:fill-color="#a0a0a0"/>
      <style:paragraph-properties style:font-independent-line-spacing="true"/>
    </style:style>
    <style:style style:name="P114" style:family="paragraph">
      <loext:graphic-properties draw:fill="solid" draw:fill-color="#006000"/>
      <style:paragraph-properties style:font-independent-line-spacing="true"/>
    </style:style>
    <style:style style:name="P115" style:family="paragraph">
      <loext:graphic-properties draw:fill="solid" draw:fill-color="#e0e0e0"/>
      <style:paragraph-properties style:font-independent-line-spacing="true"/>
    </style:style>
    <style:style style:name="P116" style:family="paragraph">
      <loext:graphic-properties draw:fill="solid" draw:fill-color="#00a000"/>
      <style:paragraph-properties style:font-independent-line-spacing="true"/>
    </style:style>
    <style:style style:name="P117" style:family="paragraph">
      <loext:graphic-properties draw:fill="solid" draw:fill-color="#019700"/>
      <style:paragraph-properties style:font-independent-line-spacing="true"/>
    </style:style>
    <style:style style:name="P118" style:family="paragraph">
      <loext:graphic-properties draw:fill="solid" draw:fill-color="#ffa040"/>
      <style:paragraph-properties style:font-independent-line-spacing="true"/>
    </style:style>
    <style:style style:name="P119" style:family="paragraph">
      <loext:graphic-properties draw:fill="solid" draw:fill-color="#ffc080"/>
      <style:paragraph-properties style:font-independent-line-spacing="true"/>
    </style:style>
    <style:style style:name="P120" style:family="paragraph">
      <loext:graphic-properties draw:fill="solid" draw:fill-color="#ffe0c0"/>
      <style:paragraph-properties style:font-independent-line-spacing="true"/>
    </style:style>
    <style:style style:name="P121" style:family="paragraph">
      <loext:graphic-properties draw:fill="solid" draw:fill-color="#8080ff"/>
      <style:paragraph-properties style:font-independent-line-spacing="true"/>
    </style:style>
    <style:style style:name="P122" style:family="paragraph">
      <loext:graphic-properties draw:fill="solid" draw:fill-color="#e0e000"/>
      <style:paragraph-properties style:font-independent-line-spacing="true"/>
    </style:style>
    <style:style style:name="P123" style:family="paragraph">
      <loext:graphic-properties draw:fill="solid" draw:fill-color="#00ffff"/>
      <style:paragraph-properties style:font-independent-line-spacing="true"/>
    </style:style>
    <style:style style:name="P124" style:family="paragraph">
      <loext:graphic-properties draw:fill="solid" draw:fill-color="#c5ffff"/>
      <style:paragraph-properties style:font-independent-line-spacing="true"/>
    </style:style>
    <style:style style:name="P125" style:family="paragraph">
      <loext:graphic-properties draw:fill="solid" draw:fill-color="#00ff00"/>
      <style:paragraph-properties style:font-independent-line-spacing="true"/>
    </style:style>
    <style:style style:name="P126" style:family="paragraph">
      <loext:graphic-properties draw:fill="solid" draw:fill-color="#83ff83"/>
      <style:paragraph-properties style:font-independent-line-spacing="true"/>
    </style:style>
    <style:style style:name="P127" style:family="paragraph">
      <loext:graphic-properties draw:fill="solid" draw:fill-color="#99cccc"/>
      <style:paragraph-properties style:font-independent-line-spacing="true"/>
    </style:style>
    <style:style style:name="P128" style:family="paragraph">
      <loext:graphic-properties draw:fill="solid" draw:fill-color="#9ccfcf"/>
      <style:paragraph-properties style:font-independent-line-spacing="true"/>
    </style:style>
    <style:style style:name="P129" style:family="paragraph">
      <loext:graphic-properties draw:fill="solid" draw:fill-color="#9fcfcf"/>
      <style:paragraph-properties style:font-independent-line-spacing="true"/>
    </style:style>
    <style:style style:name="P130" style:family="paragraph">
      <loext:graphic-properties draw:fill="solid" draw:fill-color="#a2d2d2"/>
      <style:paragraph-properties style:font-independent-line-spacing="true"/>
    </style:style>
    <style:style style:name="P131" style:family="paragraph">
      <loext:graphic-properties draw:fill="solid" draw:fill-color="#a5d2d2"/>
      <style:paragraph-properties style:font-independent-line-spacing="true"/>
    </style:style>
    <style:style style:name="P132" style:family="paragraph">
      <loext:graphic-properties draw:fill="solid" draw:fill-color="#a9d4d4"/>
      <style:paragraph-properties style:font-independent-line-spacing="true"/>
    </style:style>
    <style:style style:name="P133" style:family="paragraph">
      <loext:graphic-properties draw:fill="solid" draw:fill-color="#afd7d7"/>
      <style:paragraph-properties style:font-independent-line-spacing="true"/>
    </style:style>
    <style:style style:name="P134" style:family="paragraph">
      <loext:graphic-properties draw:fill="solid" draw:fill-color="#b3d9d9"/>
      <style:paragraph-properties style:font-independent-line-spacing="true"/>
    </style:style>
    <style:style style:name="P135" style:family="paragraph">
      <loext:graphic-properties draw:fill="solid" draw:fill-color="#b6dcdc"/>
      <style:paragraph-properties style:font-independent-line-spacing="true"/>
    </style:style>
    <style:style style:name="P136" style:family="paragraph">
      <loext:graphic-properties draw:fill="solid" draw:fill-color="#bbdcdc"/>
      <style:paragraph-properties style:font-independent-line-spacing="true"/>
    </style:style>
    <style:style style:name="P137" style:family="paragraph">
      <loext:graphic-properties draw:fill="solid" draw:fill-color="#bddede"/>
      <style:paragraph-properties style:font-independent-line-spacing="true"/>
    </style:style>
    <style:style style:name="P138" style:family="paragraph">
      <loext:graphic-properties draw:fill="solid" draw:fill-color="#c0e1e1"/>
      <style:paragraph-properties style:font-independent-line-spacing="true"/>
    </style:style>
    <style:style style:name="P139" style:family="paragraph">
      <loext:graphic-properties draw:fill="solid" draw:fill-color="#c3e1e1"/>
      <style:paragraph-properties style:font-independent-line-spacing="true"/>
    </style:style>
    <style:style style:name="P140" style:family="paragraph">
      <loext:graphic-properties draw:fill="solid" draw:fill-color="#c5e1e1"/>
      <style:paragraph-properties style:font-independent-line-spacing="true"/>
    </style:style>
    <style:style style:name="P141" style:family="paragraph">
      <loext:graphic-properties draw:fill="solid" draw:fill-color="#c7e3e3"/>
      <style:paragraph-properties style:font-independent-line-spacing="true"/>
    </style:style>
    <style:style style:name="P142" style:family="paragraph">
      <loext:graphic-properties draw:fill="solid" draw:fill-color="#cae6e6"/>
      <style:paragraph-properties style:font-independent-line-spacing="true"/>
    </style:style>
    <style:style style:name="P143" style:family="paragraph">
      <loext:graphic-properties draw:fill="solid" draw:fill-color="#cde6e6"/>
      <style:paragraph-properties style:font-independent-line-spacing="true"/>
    </style:style>
    <style:style style:name="P144" style:family="paragraph">
      <loext:graphic-properties draw:fill="solid" draw:fill-color="#d0e9e9"/>
      <style:paragraph-properties style:font-independent-line-spacing="true"/>
    </style:style>
    <style:style style:name="P145" style:family="paragraph">
      <loext:graphic-properties draw:fill="solid" draw:fill-color="#d3e9e9"/>
      <style:paragraph-properties style:font-independent-line-spacing="true"/>
    </style:style>
    <style:style style:name="P146" style:family="paragraph">
      <loext:graphic-properties draw:fill="solid" draw:fill-color="#d5e9e9"/>
      <style:paragraph-properties style:font-independent-line-spacing="true"/>
    </style:style>
    <style:style style:name="P147" style:family="paragraph">
      <loext:graphic-properties draw:fill="solid" draw:fill-color="#d7ebeb"/>
      <style:paragraph-properties style:font-independent-line-spacing="true"/>
    </style:style>
    <style:style style:name="P148" style:family="paragraph">
      <loext:graphic-properties draw:fill="solid" draw:fill-color="#daeeee"/>
      <style:paragraph-properties style:font-independent-line-spacing="true"/>
    </style:style>
    <style:style style:name="P149" style:family="paragraph">
      <loext:graphic-properties draw:fill="solid" draw:fill-color="#ddeeee"/>
      <style:paragraph-properties style:font-independent-line-spacing="true"/>
    </style:style>
    <style:style style:name="P150" style:family="paragraph">
      <loext:graphic-properties draw:fill="solid" draw:fill-color="#dff0f0"/>
      <style:paragraph-properties style:font-independent-line-spacing="true"/>
    </style:style>
    <style:style style:name="P151" style:family="paragraph">
      <loext:graphic-properties draw:fill="solid" draw:fill-color="#e1f0f0"/>
      <style:paragraph-properties style:font-independent-line-spacing="true"/>
    </style:style>
    <style:style style:name="P152" style:family="paragraph">
      <loext:graphic-properties draw:fill="solid" draw:fill-color="#e4f3f3"/>
      <style:paragraph-properties style:font-independent-line-spacing="true"/>
    </style:style>
    <style:style style:name="P153" style:family="paragraph">
      <loext:graphic-properties draw:fill="solid" draw:fill-color="#e7f3f3"/>
      <style:paragraph-properties style:font-independent-line-spacing="true"/>
    </style:style>
    <style:style style:name="P154" style:family="paragraph">
      <loext:graphic-properties draw:fill="solid" draw:fill-color="#e9f5f5"/>
      <style:paragraph-properties style:font-independent-line-spacing="true"/>
    </style:style>
    <style:style style:name="P155" style:family="paragraph">
      <loext:graphic-properties draw:fill="solid" draw:fill-color="#ebf5f5"/>
      <style:paragraph-properties style:font-independent-line-spacing="true"/>
    </style:style>
    <style:style style:name="P156" style:family="paragraph">
      <loext:graphic-properties draw:fill="solid" draw:fill-color="#eef8f8"/>
      <style:paragraph-properties style:font-independent-line-spacing="true"/>
    </style:style>
    <style:style style:name="P157" style:family="paragraph">
      <loext:graphic-properties draw:fill="solid" draw:fill-color="#f1f8f8"/>
      <style:paragraph-properties style:font-independent-line-spacing="true"/>
    </style:style>
    <style:style style:name="P158" style:family="paragraph">
      <loext:graphic-properties draw:fill="solid" draw:fill-color="#f3fafa"/>
      <style:paragraph-properties style:font-independent-line-spacing="true"/>
    </style:style>
    <style:style style:name="P159" style:family="paragraph">
      <loext:graphic-properties draw:fill="solid" draw:fill-color="#f5fafa"/>
      <style:paragraph-properties style:font-independent-line-spacing="true"/>
    </style:style>
    <style:style style:name="P160" style:family="paragraph">
      <loext:graphic-properties draw:fill="solid" draw:fill-color="#f8fdfd"/>
      <style:paragraph-properties style:font-independent-line-spacing="true"/>
    </style:style>
    <style:style style:name="P161" style:family="paragraph">
      <loext:graphic-properties draw:fill="solid" draw:fill-color="#fbfdfd"/>
      <style:paragraph-properties style:font-independent-line-spacing="true"/>
    </style:style>
    <style:style style:name="P162" style:family="paragraph">
      <loext:graphic-properties draw:fill="solid" draw:fill-color="#fdffff"/>
      <style:paragraph-properties style:font-independent-line-spacing="true"/>
    </style:style>
    <style:style style:name="P163" style:family="paragraph">
      <loext:graphic-properties draw:fill="solid" draw:fill-color="#339966"/>
      <style:paragraph-properties style:font-independent-line-spacing="true"/>
    </style:style>
    <style:style style:name="P164" style:family="paragraph">
      <loext:graphic-properties draw:fill="solid" draw:fill-color="#b3b3b3"/>
      <style:paragraph-properties style:font-independent-line-spacing="true"/>
    </style:style>
    <style:style style:name="P165" style:family="paragraph">
      <loext:graphic-properties draw:fill="solid" draw:fill-color="#7d7d7d"/>
      <style:paragraph-properties style:font-independent-line-spacing="true"/>
    </style:style>
    <style:style style:name="P166" style:family="paragraph">
      <loext:graphic-properties draw:fill="solid" draw:fill-color="#7b7b7b"/>
      <style:paragraph-properties style:font-independent-line-spacing="true"/>
    </style:style>
    <style:style style:name="P167" style:family="paragraph">
      <loext:graphic-properties draw:fill="solid" draw:fill-color="#787878"/>
      <style:paragraph-properties style:font-independent-line-spacing="true"/>
    </style:style>
    <style:style style:name="P168" style:family="paragraph">
      <loext:graphic-properties draw:fill="solid" draw:fill-color="#767676"/>
      <style:paragraph-properties style:font-independent-line-spacing="true"/>
    </style:style>
    <style:style style:name="P169" style:family="paragraph">
      <loext:graphic-properties draw:fill="solid" draw:fill-color="#737373"/>
      <style:paragraph-properties style:font-independent-line-spacing="true"/>
    </style:style>
    <style:style style:name="P170" style:family="paragraph">
      <loext:graphic-properties draw:fill="solid" draw:fill-color="#717171"/>
      <style:paragraph-properties style:font-independent-line-spacing="true"/>
    </style:style>
    <style:style style:name="P171" style:family="paragraph">
      <loext:graphic-properties draw:fill="solid" draw:fill-color="#6e6e6e"/>
      <style:paragraph-properties style:font-independent-line-spacing="true"/>
    </style:style>
    <style:style style:name="P172" style:family="paragraph">
      <loext:graphic-properties draw:fill="solid" draw:fill-color="#6c6c6c"/>
      <style:paragraph-properties style:font-independent-line-spacing="true"/>
    </style:style>
    <style:style style:name="P173" style:family="paragraph">
      <loext:graphic-properties draw:fill="solid" draw:fill-color="#696969"/>
      <style:paragraph-properties style:font-independent-line-spacing="true"/>
    </style:style>
    <style:style style:name="P174" style:family="paragraph">
      <loext:graphic-properties draw:fill="solid" draw:fill-color="#666666"/>
      <style:paragraph-properties style:font-independent-line-spacing="true"/>
    </style:style>
    <style:style style:name="P175" style:family="paragraph">
      <loext:graphic-properties draw:fill="solid" draw:fill-color="#646464"/>
      <style:paragraph-properties style:font-independent-line-spacing="true"/>
    </style:style>
    <style:style style:name="P176" style:family="paragraph">
      <loext:graphic-properties draw:fill="solid" draw:fill-color="#616161"/>
      <style:paragraph-properties style:font-independent-line-spacing="true"/>
    </style:style>
    <style:style style:name="P177" style:family="paragraph">
      <loext:graphic-properties draw:fill="solid" draw:fill-color="#5f5f5f"/>
      <style:paragraph-properties style:font-independent-line-spacing="true"/>
    </style:style>
    <style:style style:name="P178" style:family="paragraph">
      <loext:graphic-properties draw:fill="solid" draw:fill-color="#5c5c5c"/>
      <style:paragraph-properties style:font-independent-line-spacing="true"/>
    </style:style>
    <style:style style:name="P179" style:family="paragraph">
      <loext:graphic-properties draw:fill="solid" draw:fill-color="#5a5a5a"/>
      <style:paragraph-properties style:font-independent-line-spacing="true"/>
    </style:style>
    <style:style style:name="P180" style:family="paragraph">
      <loext:graphic-properties draw:fill="solid" draw:fill-color="#575757"/>
      <style:paragraph-properties style:font-independent-line-spacing="true"/>
    </style:style>
    <style:style style:name="P181" style:family="paragraph">
      <loext:graphic-properties draw:fill="solid" draw:fill-color="#555555"/>
      <style:paragraph-properties style:font-independent-line-spacing="true"/>
    </style:style>
    <style:style style:name="P182" style:family="paragraph">
      <loext:graphic-properties draw:fill="solid" draw:fill-color="#525252"/>
      <style:paragraph-properties style:font-independent-line-spacing="true"/>
    </style:style>
    <style:style style:name="P183" style:family="paragraph">
      <loext:graphic-properties draw:fill="solid" draw:fill-color="#505050"/>
      <style:paragraph-properties style:font-independent-line-spacing="true"/>
    </style:style>
    <style:style style:name="P184" style:family="paragraph">
      <loext:graphic-properties draw:fill="solid" draw:fill-color="#4d4d4d"/>
      <style:paragraph-properties style:font-independent-line-spacing="true"/>
    </style:style>
    <style:style style:name="P185" style:family="paragraph">
      <loext:graphic-properties draw:fill="solid" draw:fill-color="#4a4a4a"/>
      <style:paragraph-properties style:font-independent-line-spacing="true"/>
    </style:style>
    <style:style style:name="P186" style:family="paragraph">
      <loext:graphic-properties draw:fill="solid" draw:fill-color="#484848"/>
      <style:paragraph-properties style:font-independent-line-spacing="true"/>
    </style:style>
    <style:style style:name="P187" style:family="paragraph">
      <loext:graphic-properties draw:fill="solid" draw:fill-color="#454545"/>
      <style:paragraph-properties style:font-independent-line-spacing="true"/>
    </style:style>
    <style:style style:name="P188" style:family="paragraph">
      <loext:graphic-properties draw:fill="solid" draw:fill-color="#434343"/>
      <style:paragraph-properties style:font-independent-line-spacing="true"/>
    </style:style>
    <style:style style:name="P189" style:family="paragraph">
      <loext:graphic-properties draw:fill="solid" draw:fill-color="#3e3e3e"/>
      <style:paragraph-properties style:font-independent-line-spacing="true"/>
    </style:style>
    <style:style style:name="P190" style:family="paragraph">
      <loext:graphic-properties draw:fill="solid" draw:fill-color="#3b3b3b"/>
      <style:paragraph-properties style:font-independent-line-spacing="true"/>
    </style:style>
    <style:style style:name="P191" style:family="paragraph">
      <loext:graphic-properties draw:fill="solid" draw:fill-color="#393939"/>
      <style:paragraph-properties style:font-independent-line-spacing="true"/>
    </style:style>
    <style:style style:name="P192" style:family="paragraph">
      <loext:graphic-properties draw:fill="solid" draw:fill-color="#363636"/>
      <style:paragraph-properties style:font-independent-line-spacing="true"/>
    </style:style>
    <style:style style:name="P193" style:family="paragraph">
      <loext:graphic-properties draw:fill="solid" draw:fill-color="#333333"/>
      <style:paragraph-properties style:font-independent-line-spacing="true"/>
    </style:style>
    <style:style style:name="P194" style:family="paragraph">
      <loext:graphic-properties draw:fill="solid" draw:fill-color="#cccccc"/>
      <style:paragraph-properties style:font-independent-line-spacing="true"/>
    </style:style>
    <style:style style:name="P195" style:family="paragraph">
      <loext:graphic-properties draw:fill="solid" draw:fill-color="#cacaca"/>
      <style:paragraph-properties style:font-independent-line-spacing="true"/>
    </style:style>
    <style:style style:name="P196" style:family="paragraph">
      <loext:graphic-properties draw:fill="solid" draw:fill-color="#c5c5c5"/>
      <style:paragraph-properties style:font-independent-line-spacing="true"/>
    </style:style>
    <style:style style:name="P197" style:family="paragraph">
      <loext:graphic-properties draw:fill="solid" draw:fill-color="#c2c2c2"/>
      <style:paragraph-properties style:font-independent-line-spacing="true"/>
    </style:style>
    <style:style style:name="P198" style:family="paragraph">
      <loext:graphic-properties draw:fill="solid" draw:fill-color="#bdbdbd"/>
      <style:paragraph-properties style:font-independent-line-spacing="true"/>
    </style:style>
    <style:style style:name="P199" style:family="paragraph">
      <loext:graphic-properties draw:fill="solid" draw:fill-color="#bbbbbb"/>
      <style:paragraph-properties style:font-independent-line-spacing="true"/>
    </style:style>
    <style:style style:name="P200" style:family="paragraph">
      <loext:graphic-properties draw:fill="solid" draw:fill-color="#b8b8b8"/>
      <style:paragraph-properties style:font-independent-line-spacing="true"/>
    </style:style>
    <style:style style:name="P201" style:family="paragraph">
      <loext:graphic-properties draw:fill="solid" draw:fill-color="#b6b6b6"/>
      <style:paragraph-properties style:font-independent-line-spacing="true"/>
    </style:style>
    <style:style style:name="P202" style:family="paragraph">
      <loext:graphic-properties draw:fill="solid" draw:fill-color="#b0b0b0"/>
      <style:paragraph-properties style:font-independent-line-spacing="true"/>
    </style:style>
    <style:style style:name="P203" style:family="paragraph">
      <loext:graphic-properties draw:fill="solid" draw:fill-color="#aeaeae"/>
      <style:paragraph-properties style:font-independent-line-spacing="true"/>
    </style:style>
    <style:style style:name="P204" style:family="paragraph">
      <loext:graphic-properties draw:fill="solid" draw:fill-color="#ababab"/>
      <style:paragraph-properties style:font-independent-line-spacing="true"/>
    </style:style>
    <style:style style:name="P205" style:family="paragraph">
      <loext:graphic-properties draw:fill="solid" draw:fill-color="#a9a9a9"/>
      <style:paragraph-properties style:font-independent-line-spacing="true"/>
    </style:style>
    <style:style style:name="P206" style:family="paragraph">
      <loext:graphic-properties draw:fill="solid" draw:fill-color="#a6a6a6"/>
      <style:paragraph-properties style:font-independent-line-spacing="true"/>
    </style:style>
    <style:style style:name="P207" style:family="paragraph">
      <loext:graphic-properties draw:fill="solid" draw:fill-color="#a4a4a4"/>
      <style:paragraph-properties style:font-independent-line-spacing="true"/>
    </style:style>
    <style:style style:name="P208" style:family="paragraph">
      <loext:graphic-properties draw:fill="solid" draw:fill-color="#a1a1a1"/>
      <style:paragraph-properties style:font-independent-line-spacing="true"/>
    </style:style>
    <style:style style:name="P209" style:family="paragraph">
      <loext:graphic-properties draw:fill="solid" draw:fill-color="#9f9f9f"/>
      <style:paragraph-properties style:font-independent-line-spacing="true"/>
    </style:style>
    <style:style style:name="P210" style:family="paragraph">
      <loext:graphic-properties draw:fill="solid" draw:fill-color="#9c9c9c"/>
      <style:paragraph-properties style:font-independent-line-spacing="true"/>
    </style:style>
    <style:style style:name="P211" style:family="paragraph">
      <loext:graphic-properties draw:fill="solid" draw:fill-color="#999999"/>
      <style:paragraph-properties style:font-independent-line-spacing="true"/>
    </style:style>
    <style:style style:name="P212" style:family="paragraph">
      <loext:graphic-properties draw:fill="solid" draw:fill-color="#979797"/>
      <style:paragraph-properties style:font-independent-line-spacing="true"/>
    </style:style>
    <style:style style:name="P213" style:family="paragraph">
      <loext:graphic-properties draw:fill="solid" draw:fill-color="#949494"/>
      <style:paragraph-properties style:font-independent-line-spacing="true"/>
    </style:style>
    <style:style style:name="P214" style:family="paragraph">
      <loext:graphic-properties draw:fill="solid" draw:fill-color="#929292"/>
      <style:paragraph-properties style:font-independent-line-spacing="true"/>
    </style:style>
    <style:style style:name="P215" style:family="paragraph">
      <loext:graphic-properties draw:fill="solid" draw:fill-color="#8f8f8f"/>
      <style:paragraph-properties style:font-independent-line-spacing="true"/>
    </style:style>
    <style:style style:name="P216" style:family="paragraph">
      <loext:graphic-properties draw:fill="solid" draw:fill-color="#8d8d8d"/>
      <style:paragraph-properties style:font-independent-line-spacing="true"/>
    </style:style>
    <style:style style:name="P217" style:family="paragraph">
      <loext:graphic-properties draw:fill="solid" draw:fill-color="#8a8a8a"/>
      <style:paragraph-properties style:font-independent-line-spacing="true"/>
    </style:style>
    <style:style style:name="P218" style:family="paragraph">
      <loext:graphic-properties draw:fill="solid" draw:fill-color="#888888"/>
      <style:paragraph-properties style:font-independent-line-spacing="true"/>
    </style:style>
    <style:style style:name="P219" style:family="paragraph">
      <loext:graphic-properties draw:fill="solid" draw:fill-color="#858585"/>
      <style:paragraph-properties style:font-independent-line-spacing="true"/>
    </style:style>
    <style:style style:name="P220" style:family="paragraph">
      <loext:graphic-properties draw:fill="solid" draw:fill-color="#838383"/>
      <style:paragraph-properties style:font-independent-line-spacing="true"/>
    </style:style>
    <style:style style:name="P221" style:family="paragraph">
      <loext:graphic-properties draw:fill="solid" draw:fill-color="#f5f5f5"/>
      <style:paragraph-properties style:font-independent-line-spacing="true"/>
    </style:style>
    <style:style style:name="P222" style:family="paragraph">
      <loext:graphic-properties draw:fill="solid" draw:fill-color="#e9e9e9"/>
      <style:paragraph-properties style:font-independent-line-spacing="true"/>
    </style:style>
    <style:style style:name="P223" style:family="paragraph">
      <loext:graphic-properties draw:fill="solid" draw:fill-color="#dedede"/>
      <style:paragraph-properties style:font-independent-line-spacing="true"/>
    </style:style>
    <style:style style:name="P224" style:family="paragraph">
      <loext:graphic-properties draw:fill="solid" draw:fill-color="#d4d4d4"/>
      <style:paragraph-properties style:font-independent-line-spacing="true"/>
    </style:style>
    <style:style style:name="P225" style:family="paragraph">
      <loext:graphic-properties draw:fill="solid" draw:fill-color="#313131"/>
      <style:paragraph-properties style:font-independent-line-spacing="true"/>
    </style:style>
    <style:style style:name="P226" style:family="paragraph">
      <loext:graphic-properties draw:fill="solid" draw:fill-color="#242424"/>
      <style:paragraph-properties style:font-independent-line-spacing="true"/>
    </style:style>
    <style:style style:name="P227" style:family="paragraph">
      <loext:graphic-properties draw:fill="solid" draw:fill-color="#1a1a1a"/>
      <style:paragraph-properties style:font-independent-line-spacing="true"/>
    </style:style>
    <style:style style:name="P228" style:family="paragraph">
      <loext:graphic-properties draw:fill="solid" draw:fill-color="#ebebeb"/>
      <style:paragraph-properties style:font-independent-line-spacing="true"/>
    </style:style>
    <style:style style:name="P229" style:family="paragraph">
      <loext:graphic-properties draw:fill="solid" draw:fill-color="#d9d9d9"/>
      <style:paragraph-properties style:font-independent-line-spacing="true"/>
    </style:style>
    <style:style style:name="P230" style:family="paragraph">
      <loext:graphic-properties draw:fill="solid" draw:fill-color="#cfcfcf"/>
      <style:paragraph-properties style:font-independent-line-spacing="true"/>
    </style:style>
    <style:style style:name="P231" style:family="paragraph">
      <loext:graphic-properties draw:fill="solid" draw:fill-color="#d2d2d2"/>
      <style:paragraph-properties style:font-independent-line-spacing="true"/>
    </style:style>
    <style:style style:name="P232" style:family="paragraph">
      <loext:graphic-properties draw:fill="solid" draw:fill-color="#d7d7d7"/>
      <style:paragraph-properties style:font-independent-line-spacing="true"/>
    </style:style>
    <style:style style:name="P233" style:family="paragraph">
      <loext:graphic-properties draw:fill="solid" draw:fill-color="#dcdcdc"/>
      <style:paragraph-properties style:font-independent-line-spacing="true"/>
    </style:style>
    <style:style style:name="P234" style:family="paragraph">
      <loext:graphic-properties draw:fill="solid" draw:fill-color="#e6e6e6"/>
      <style:paragraph-properties style:font-independent-line-spacing="true"/>
    </style:style>
    <style:style style:name="P235" style:family="paragraph">
      <loext:graphic-properties draw:fill="solid" draw:fill-color="#000066"/>
      <style:paragraph-properties style:font-independent-line-spacing="true"/>
    </style:style>
    <style:style style:name="P236" style:family="paragraph">
      <loext:graphic-properties draw:fill="solid" draw:fill-color="#990000"/>
      <style:paragraph-properties style:font-independent-line-spacing="true"/>
    </style:style>
    <style:style style:name="P237" style:family="paragraph">
      <loext:graphic-properties draw:fill="solid" draw:fill-color="#585f5f"/>
      <style:paragraph-properties style:font-independent-line-spacing="true"/>
    </style:style>
    <style:style style:name="P238" style:family="paragraph">
      <loext:graphic-properties draw:fill="solid" draw:fill-color="#5a6161"/>
      <style:paragraph-properties style:font-independent-line-spacing="true"/>
    </style:style>
    <style:style style:name="P239" style:family="paragraph">
      <loext:graphic-properties draw:fill="solid" draw:fill-color="#5a6464"/>
      <style:paragraph-properties style:font-independent-line-spacing="true"/>
    </style:style>
    <style:style style:name="P240" style:family="paragraph">
      <loext:graphic-properties draw:fill="solid" draw:fill-color="#5c6666"/>
      <style:paragraph-properties style:font-independent-line-spacing="true"/>
    </style:style>
    <style:style style:name="P241" style:family="paragraph">
      <loext:graphic-properties draw:fill="solid" draw:fill-color="#606c6c"/>
      <style:paragraph-properties style:font-independent-line-spacing="true"/>
    </style:style>
    <style:style style:name="P242" style:family="paragraph">
      <loext:graphic-properties draw:fill="solid" draw:fill-color="#626e6e"/>
      <style:paragraph-properties style:font-independent-line-spacing="true"/>
    </style:style>
    <style:style style:name="P243" style:family="paragraph">
      <loext:graphic-properties draw:fill="solid" draw:fill-color="#657171"/>
      <style:paragraph-properties style:font-independent-line-spacing="true"/>
    </style:style>
    <style:style style:name="P244" style:family="paragraph">
      <loext:graphic-properties draw:fill="solid" draw:fill-color="#657676"/>
      <style:paragraph-properties style:font-independent-line-spacing="true"/>
    </style:style>
    <style:style style:name="P245" style:family="paragraph">
      <loext:graphic-properties draw:fill="solid" draw:fill-color="#677878"/>
      <style:paragraph-properties style:font-independent-line-spacing="true"/>
    </style:style>
    <style:style style:name="P246" style:family="paragraph">
      <loext:graphic-properties draw:fill="solid" draw:fill-color="#6a7b7b"/>
      <style:paragraph-properties style:font-independent-line-spacing="true"/>
    </style:style>
    <style:style style:name="P247" style:family="paragraph">
      <loext:graphic-properties draw:fill="solid" draw:fill-color="#6c8080"/>
      <style:paragraph-properties style:font-independent-line-spacing="true"/>
    </style:style>
    <style:style style:name="P248" style:family="paragraph">
      <loext:graphic-properties draw:fill="solid" draw:fill-color="#6d8383"/>
      <style:paragraph-properties style:font-independent-line-spacing="true"/>
    </style:style>
    <style:style style:name="P249" style:family="paragraph">
      <loext:graphic-properties draw:fill="solid" draw:fill-color="#6f8585"/>
      <style:paragraph-properties style:font-independent-line-spacing="true"/>
    </style:style>
    <style:style style:name="P250" style:family="paragraph">
      <loext:graphic-properties draw:fill="solid" draw:fill-color="#728888"/>
      <style:paragraph-properties style:font-independent-line-spacing="true"/>
    </style:style>
    <style:style style:name="P251" style:family="paragraph">
      <loext:graphic-properties draw:fill="solid" draw:fill-color="#748d8d"/>
      <style:paragraph-properties style:font-independent-line-spacing="true"/>
    </style:style>
    <style:style style:name="P252" style:family="paragraph">
      <loext:graphic-properties draw:fill="solid" draw:fill-color="#768f8f"/>
      <style:paragraph-properties style:font-independent-line-spacing="true"/>
    </style:style>
    <style:style style:name="P253" style:family="paragraph">
      <loext:graphic-properties draw:fill="solid" draw:fill-color="#769292"/>
      <style:paragraph-properties style:font-independent-line-spacing="true"/>
    </style:style>
    <style:style style:name="P254" style:family="paragraph">
      <loext:graphic-properties draw:fill="solid" draw:fill-color="#799797"/>
      <style:paragraph-properties style:font-independent-line-spacing="true"/>
    </style:style>
    <style:style style:name="P255" style:family="paragraph">
      <loext:graphic-properties draw:fill="solid" draw:fill-color="#7b9999"/>
      <style:paragraph-properties style:font-independent-line-spacing="true"/>
    </style:style>
    <style:style style:name="P256" style:family="paragraph">
      <loext:graphic-properties draw:fill="solid" draw:fill-color="#7e9c9c"/>
      <style:paragraph-properties style:font-independent-line-spacing="true"/>
    </style:style>
    <style:style style:name="P257" style:family="paragraph">
      <loext:graphic-properties draw:fill="solid" draw:fill-color="#819f9f"/>
      <style:paragraph-properties style:font-independent-line-spacing="true"/>
    </style:style>
    <style:style style:name="P258" style:family="paragraph">
      <loext:graphic-properties draw:fill="solid" draw:fill-color="#81a4a4"/>
      <style:paragraph-properties style:font-independent-line-spacing="true"/>
    </style:style>
    <style:style style:name="P259" style:family="paragraph">
      <loext:graphic-properties draw:fill="solid" draw:fill-color="#83a6a6"/>
      <style:paragraph-properties style:font-independent-line-spacing="true"/>
    </style:style>
    <style:style style:name="P260" style:family="paragraph">
      <loext:graphic-properties draw:fill="solid" draw:fill-color="#86a9a9"/>
      <style:paragraph-properties style:font-independent-line-spacing="true"/>
    </style:style>
    <style:style style:name="P261" style:family="paragraph">
      <loext:graphic-properties draw:fill="solid" draw:fill-color="#88aeae"/>
      <style:paragraph-properties style:font-independent-line-spacing="true"/>
    </style:style>
    <style:style style:name="P262" style:family="paragraph">
      <loext:graphic-properties draw:fill="solid" draw:fill-color="#88b0b0"/>
      <style:paragraph-properties style:font-independent-line-spacing="true"/>
    </style:style>
    <style:style style:name="P263" style:family="paragraph">
      <loext:graphic-properties draw:fill="solid" draw:fill-color="#8bb3b3"/>
      <style:paragraph-properties style:font-independent-line-spacing="true"/>
    </style:style>
    <style:style style:name="P264" style:family="paragraph">
      <loext:graphic-properties draw:fill="solid" draw:fill-color="#8eb6b6"/>
      <style:paragraph-properties style:font-independent-line-spacing="true"/>
    </style:style>
    <style:style style:name="P265" style:family="paragraph">
      <loext:graphic-properties draw:fill="solid" draw:fill-color="#90bbbb"/>
      <style:paragraph-properties style:font-independent-line-spacing="true"/>
    </style:style>
    <style:style style:name="P266" style:family="paragraph">
      <loext:graphic-properties draw:fill="solid" draw:fill-color="#92bdbd"/>
      <style:paragraph-properties style:font-independent-line-spacing="true"/>
    </style:style>
    <style:style style:name="P267" style:family="paragraph">
      <loext:graphic-properties draw:fill="solid" draw:fill-color="#93c0c0"/>
      <style:paragraph-properties style:font-independent-line-spacing="true"/>
    </style:style>
    <style:style style:name="P268" style:family="paragraph">
      <loext:graphic-properties draw:fill="solid" draw:fill-color="#95c5c5"/>
      <style:paragraph-properties style:font-independent-line-spacing="true"/>
    </style:style>
    <style:style style:name="P269" style:family="paragraph">
      <loext:graphic-properties draw:fill="solid" draw:fill-color="#97c7c7"/>
      <style:paragraph-properties style:font-independent-line-spacing="true"/>
    </style:style>
    <style:style style:name="P270" style:family="paragraph">
      <loext:graphic-properties draw:fill="solid" draw:fill-color="#9acaca"/>
      <style:paragraph-properties style:font-independent-line-spacing="true"/>
    </style:style>
    <style:style style:name="P271" style:family="paragraph">
      <loext:graphic-properties draw:fill="solid" draw:fill-color="#006633"/>
      <style:paragraph-properties style:font-independent-line-spacing="true"/>
    </style:style>
    <style:style style:name="P272" style:family="paragraph">
      <loext:graphic-properties draw:fill="solid" draw:fill-color="#003333"/>
      <style:paragraph-properties style:font-independent-line-spacing="true"/>
    </style:style>
    <style:style style:name="P273" style:family="paragraph">
      <loext:graphic-properties draw:fill="solid" draw:fill-color="#009933"/>
      <style:paragraph-properties style:font-independent-line-spacing="true"/>
    </style:style>
    <style:style style:name="P274" style:family="paragraph">
      <loext:graphic-properties draw:fill="solid" draw:fill-color="#acb3b3"/>
      <style:paragraph-properties style:font-independent-line-spacing="true"/>
    </style:style>
    <style:style style:name="P275" style:family="paragraph">
      <loext:graphic-properties draw:fill="none" draw:fill-color="#618ffd"/>
      <style:paragraph-properties style:font-independent-line-spacing="true"/>
    </style:style>
    <style:style style:name="P276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77" style:family="paragraph">
      <loext:graphic-properties draw:fill="none" draw:fill-color="#ff6600"/>
      <style:paragraph-properties fo:margin-left="0cm" fo:margin-right="0cm" fo:line-height="100%" fo:text-indent="0cm" loext:tab-stop-distance="0cm" style:font-independent-line-spacing="true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78" style:family="paragraph">
      <style:paragraph-properties fo:margin-left="0cm" fo:margin-right="0cm" fo:line-height="100%" fo:text-align="center" fo:text-indent="0cm" loext:tab-stop-distance="0cm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79" style:family="paragraph">
      <loext:graphic-properties draw:fill="none" draw:fill-color="#ff6600"/>
      <style:paragraph-properties fo:margin-left="0cm" fo:margin-right="0cm" fo:line-height="100%" fo:text-align="center" fo:text-indent="0cm" loext:tab-stop-distance="0cm" style:font-independent-line-spacing="true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0" style:family="paragraph">
      <style:paragraph-properties fo:margin-left="0cm" fo:margin-right="0cm" fo:line-height="70%" fo:text-align="center" fo:text-indent="0cm" loext:tab-stop-distance="0cm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1" style:family="paragraph">
      <loext:graphic-properties draw:fill="none" draw:fill-color="#ff6600"/>
      <style:paragraph-properties fo:margin-left="0cm" fo:margin-right="0cm" fo:line-height="70%" fo:text-align="center" fo:text-indent="0cm" loext:tab-stop-distance="0cm" style:font-independent-line-spacing="true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2" style:family="paragraph">
      <style:paragraph-properties fo:margin-left="0cm" fo:margin-right="0cm" fo:line-height="130%" fo:text-indent="0cm" loext:tab-stop-distance="0cm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3" style:family="paragraph">
      <loext:graphic-properties draw:fill="none" draw:fill-color="#ff6600"/>
      <style:paragraph-properties fo:margin-left="0cm" fo:margin-right="0cm" fo:line-height="130%" fo:text-indent="0cm" loext:tab-stop-distance="0cm" style:font-independent-line-spacing="true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4" style:family="paragraph">
      <style:paragraph-properties fo:margin-left="0cm" fo:margin-right="0cm" fo:line-height="110%" fo:text-indent="0cm" loext:tab-stop-distance="0cm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5" style:family="paragraph">
      <loext:graphic-properties draw:fill="none" draw:fill-color="#ff6600"/>
      <style:paragraph-properties fo:margin-left="0cm" fo:margin-right="0cm" fo:line-height="110%" fo:text-indent="0cm" loext:tab-stop-distance="0cm" style:font-independent-line-spacing="true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6" style:family="paragraph">
      <style:paragraph-properties fo:margin-left="0cm" fo:margin-right="0cm" fo:text-indent="0cm" loext:tab-stop-distance="0cm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7" style:family="paragraph">
      <loext:graphic-properties draw:fill="none" draw:fill-color="#ff6600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394cm"/>
          <style:tab-stop style:position="4.789cm"/>
          <style:tab-stop style:position="7.183cm"/>
          <style:tab-stop style:position="9.578cm"/>
          <style:tab-stop style:position="11.972cm"/>
          <style:tab-stop style:position="14.367cm"/>
          <style:tab-stop style:position="16.761cm"/>
          <style:tab-stop style:position="19.156cm"/>
          <style:tab-stop style:position="21.55cm"/>
          <style:tab-stop style:position="23.945cm"/>
          <style:tab-stop style:position="26.339cm"/>
          <style:tab-stop style:position="28.734cm"/>
        </style:tab-stops>
      </style:paragraph-properties>
    </style:style>
    <style:style style:name="P288" style:family="paragraph">
      <style:paragraph-properties fo:margin-left="0cm" fo:margin-right="0cm" fo:margin-top="0.212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9" style:family="paragraph">
      <style:paragraph-properties fo:margin-left="0cm" fo:margin-right="0cm" fo:margin-top="0.247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0" style:family="paragraph">
      <loext:graphic-properties draw:fill="none" draw:fill-color="#00cc99"/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" style:family="text">
      <style:text-properties fo:font-size="31pt" style:font-size-asian="31pt" style:font-size-complex="31pt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7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8" style:family="text">
      <style:text-properties fo:color="#000000" loext:opacity="100%" fo:font-size="8pt" fo:language="en" fo:country="US" style:font-size-asian="8pt" style:language-asian="en" style:country-asian="US" style:font-size-complex="8pt" style:language-complex="en" style:country-complex="US"/>
    </style:style>
    <style:style style:name="T9" style:family="text">
      <style:text-properties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10" style:family="tex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T11" style:family="text">
      <style:text-properties fo:font-size="8pt" fo:language="en" fo:country="US" fo:font-style="italic" style:font-size-asian="8pt" style:language-asian="en" style:country-asian="US" style:font-style-asian="italic" style:font-size-complex="8pt" style:language-complex="en" style:country-complex="US" style:font-style-complex="italic"/>
    </style:style>
    <style:style style:name="T1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618ffd" loext:opacity="100%"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style:font-name="Book Antiqua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font-name="Book Antiqua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7" style:family="text">
      <style:text-properties style:font-name="Arial Narrow"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d0bd6e" loext:opacity="100%" style:font-name="Arial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color="#fc0128" loext:opacity="100%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618ffd" loext:opacity="100%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000000" loext:opacity="100%" style:font-name="Arial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24" style:family="text">
      <style:text-properties fo:color="#996633" loext:opacity="100%" style:font-name="Arial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25" style:family="text">
      <style:text-properties fo:color="#7b00e4" loext:opacity="100%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color="#996633" loext:opacity="100%" style:font-name="Arial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loext:opacity="100%" fo:font-size="24pt" style:font-size-asian="24pt" style:font-size-complex="24pt"/>
    </style:style>
    <style:style style:name="T29" style:family="text">
      <style:text-properties fo:color="#ffffff" loext:opacity="100%" style:font-name="Univers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000000" loext:opacity="100%" style:font-name="Univers" fo:font-size="16pt" fo:language="en" fo:country="US" fo:text-shadow="1pt 1pt" style:font-size-asian="16pt" style:language-asian="en" style:country-asian="US" style:font-size-complex="16pt" style:language-complex="en" style:country-complex="US"/>
    </style:style>
    <style:style style:name="T32" style:family="text">
      <style:text-properties fo:color="#fafd00" loext:opacity="100%" style:font-name="Univers" fo:font-size="16pt" fo:text-shadow="1pt 1pt" fo:font-weight="bold" style:font-size-asian="16pt" style:font-weight-asian="bold" style:font-size-complex="16pt" style:font-weight-complex="bold"/>
    </style:style>
    <style:style style:name="T33" style:family="text">
      <style:text-properties fo:color="#ffffff" loext:opacity="100%" style:font-name="Univers" fo:font-size="16pt" fo:text-shadow="1pt 1pt" fo:font-weight="bold" style:font-size-asian="16pt" style:font-weight-asian="bold" style:font-size-complex="16pt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6" style:family="text">
      <style:text-properties fo:color="#fafd00" loext:opacity="100%" style:font-name="Univers" fo:font-size="16pt" fo:language="en" fo:country="US" fo:text-shadow="1pt 1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7" style:family="text">
      <style:text-properties fo:color="#ffffff" loext:opacity="100%" style:font-name="Univers" fo:font-size="16pt" fo:language="en" fo:country="US" fo:text-shadow="1pt 1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8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9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ffff" loext:opacity="100%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T42" style:family="text">
      <style:text-properties style:font-name="Arial" fo:font-size="14pt" style:font-size-asian="14pt" style:font-size-complex="14pt"/>
    </style:style>
    <style:style style:name="T43" style:family="text">
      <style:text-properties style:font-name="Arial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style:font-name="Arial" fo:font-size="20pt" fo:text-shadow="1pt 1pt" fo:font-weight="bold" style:font-size-asian="20pt" style:font-weight-asian="bold" style:font-size-complex="20pt" style:font-weight-complex="bold"/>
    </style:style>
    <style:style style:name="T45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6" style:family="text">
      <style:text-properties style:font-name="Arial Narrow"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color="#5e574e" loext:opacity="100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49" style:family="text">
      <style:text-properties style:font-name="Tahoma" fo:font-style="italic" style:font-style-asian="italic" style:font-style-complex="italic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Arial" fo:font-size="10pt" style:font-size-asian="10pt" style:font-size-complex="10pt"/>
    </style:style>
    <style:style style:name="T54" style:family="text">
      <style:text-properties style:font-name="Arial" fo:font-size="12pt" style:font-size-asian="12pt" style:font-size-complex="12pt"/>
    </style:style>
    <style:style style:name="T55" style:family="text">
      <style:text-properties fo:color="#ffffff" loext:opacity="100%" style:font-name="Arial" fo:font-size="10pt" fo:font-weight="bold" style:font-size-asian="10pt" style:font-weight-asian="bold" style:font-size-complex="10pt" style:font-weight-complex="bold"/>
    </style:style>
    <style:style style:name="T56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ffffff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8" style:family="text">
      <style:text-properties fo:font-size="10pt" fo:font-style="italic" style:font-size-asian="10pt" style:font-style-asian="italic" style:font-size-complex="10pt" style:font-style-complex="italic"/>
    </style:style>
    <style:style style:name="T59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60" style:family="text">
      <style:text-properties fo:color="#5e574e" loext:opacity="100%" style:font-name="Arial" fo:font-size="23pt" fo:language="en" fo:country="US" fo:font-style="italic" style:font-size-asian="23pt" style:language-asian="en" style:country-asian="US" style:font-style-asian="italic" style:font-size-complex="23pt" style:language-complex="en" style:country-complex="US" style:font-style-complex="italic"/>
    </style:style>
    <style:style style:name="T61" style:family="text">
      <style:text-properties fo:color="#5e574e" loext:opacity="100%" style:font-name="Arial" fo:font-size="8pt" style:font-size-asian="8pt" style:font-size-complex="8pt"/>
    </style:style>
    <style:style style:name="T62" style:family="text">
      <style:text-properties fo:color="#5e574e" loext:opacity="100%" style:font-name="Arial" fo:font-size="23pt" fo:font-style="italic" style:font-size-asian="23pt" style:font-style-asian="italic" style:font-size-complex="23pt" style:font-style-complex="italic"/>
    </style:style>
    <style:style style:name="T63" style:family="text">
      <style:text-properties style:font-name="Arial" fo:font-size="15pt" fo:font-style="italic" style:font-size-asian="15pt" style:font-style-asian="italic" style:font-size-complex="15pt" style:font-style-complex="italic"/>
    </style:style>
    <style:style style:name="T64" style:family="text">
      <style:text-properties style:font-name="Arial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65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66" style:family="text">
      <style:text-properties style:font-name="Arial"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67" style:family="text">
      <style:text-properties fo:font-size="15pt" style:font-size-asian="15pt" style:font-size-complex="15pt"/>
    </style:style>
    <style:style style:name="T68" style:family="text">
      <style:text-properties fo:color="#000000" loext:opacity="100%"/>
    </style:style>
    <style:style style:name="T69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">
        <style:list-level-properties text:space-before="1.27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/>
        <style:text-properties style:font-name="Tahoma" fo:color="#ffcc00" fo:font-size="100%"/>
      </text:list-level-style-bullet>
      <text:list-level-style-bullet text:level="5" text:bullet-char="–">
        <style:list-level-properties text:space-before="5.08cm"/>
        <style:text-properties style:font-name="Tahoma" fo:color="#ffcc00" fo:font-size="100%"/>
      </text:list-level-style-bullet>
      <text:list-level-style-bullet text:level="6" text:bullet-char="–">
        <style:list-level-properties text:space-before="5.08cm"/>
        <style:text-properties style:font-name="Tahoma" fo:color="#000000" fo:font-size="100%"/>
      </text:list-level-style-bullet>
      <text:list-level-style-bullet text:level="7" text:bullet-char="–">
        <style:list-level-properties text:space-before="5.08cm"/>
        <style:text-properties style:font-name="Tahoma" fo:color="#000000" fo:font-size="100%"/>
      </text:list-level-style-bullet>
      <text:list-level-style-bullet text:level="8" text:bullet-char="–">
        <style:list-level-properties text:space-before="5.08cm"/>
        <style:text-properties style:font-name="Tahoma" fo:color="#000000" fo:font-size="100%"/>
      </text:list-level-style-bullet>
      <text:list-level-style-bullet text:level="9" text:bullet-char="–">
        <style:list-level-properties text:space-before="5.08cm"/>
        <style:text-properties style:font-name="Tahoma" fo:color="#000000" fo:font-size="100%"/>
      </text:list-level-style-bullet>
      <text:list-level-style-bullet text:level="10" text:bullet-char="–">
        <style:list-level-properties text:space-before="5.08cm"/>
        <style:text-properties style:font-name="Tahom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4">
      <text:list-level-style-bullet text:level="1" text:bullet-char="">
        <style:list-level-properties text:min-label-width="0.953cm"/>
        <style:text-properties fo:font-family="'Monotype Sorts'" style:font-pitch="variable" style:font-charset="x-symbol" fo:color="#ffcc00" fo:font-size="100%"/>
      </text:list-level-style-bullet>
      <text:list-level-style-bullet text:level="2" text:bullet-char="">
        <style:list-level-properties text:space-before="1.27cm" text:min-label-width="0.794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18ffd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d0bd6e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7b00e4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6633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afd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21">
      <text:list-level-style-bullet text:level="1" text:bullet-char="">
        <style:list-level-properties text:min-label-width="0.953cm"/>
        <style:text-properties fo:font-family="'Monotype Sorts'" style:font-pitch="variable" style:font-charset="x-symbol" fo:color="#ffcc00" fo:font-size="100%"/>
      </text:list-level-style-bullet>
      <text:list-level-style-bullet text:level="2" text:bullet-char="">
        <style:list-level-properties text:space-before="1.27cm" text:min-label-width="0.794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L23">
      <text:list-level-style-bullet text:level="1" text:bullet-char="">
        <style:list-level-properties text:min-label-width="0.953cm"/>
        <style:text-properties fo:font-family="'Monotype Sorts'" style:font-pitch="variable" style:font-charset="x-symbol" fo:color="#ffcc00" fo:font-size="100%"/>
      </text:list-level-style-bullet>
      <text:list-level-style-bullet text:level="2" text:bullet-char="">
        <style:list-level-properties text:space-before="1.27cm" text:min-label-width="0.794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ahoma" fo:color="#000000" fo:font-size="100%"/>
      </text:list-level-style-bullet>
    </text:list-style>
  </office:automatic-styles>
  <office:body>
    <office:presentation>
      <draw:page draw:name="IT Infrastructure:  Are We Building Chaos or Cosmos?" draw:style-name="dp1" draw:master-page-name="Title1" presentation:presentation-page-layout-name="AL1T0" xml:id="id1" draw:id="id1">
        <draw:frame presentation:style-name="pr1" draw:text-style-name="P2" draw:layer="layout" svg:width="21.449cm" svg:height="3.175cm" svg:x="2.539cm" svg:y="1.904cm" presentation:class="title" presentation:user-transformed="true">
          <draw:text-box>
            <text:list text:style-name="L1">
              <text:list-header>
                <text:p text:style-name="P1"><text:span text:style-name="T1">IT Infrastructure: </text:span><text:span text:style-name="T1"><text:line-break/></text:span><text:span text:style-name="T1">Are We Building Chaos or Cosmos?</text:span></text:p>
              </text:list-header>
            </text:list>
          </draw:text-box>
        </draw:frame>
        <draw:frame presentation:style-name="pr2" draw:text-style-name="P2" draw:layer="layout" svg:width="17.78cm" svg:height="4.921cm" svg:x="5.927cm" svg:y="10.794cm" presentation:class="subtitle" presentation:user-transformed="true">
          <draw:text-box>
            <text:list text:style-name="L2">
              <text:list-header>
                <text:p text:style-name="P3"><text:span text:style-name="T2">Peter S. Kastner</text:span><text:span text:style-name="T2"><text:line-break/></text:span><text:span text:style-name="T2">Chief Research Officer</text:span><text:span text:style-name="T2"><text:line-break/></text:span><text:span text:style-name="T2">Aberdeen Group, Inc.</text:span><text:span text:style-name="T2"><text:line-break/></text:span><text:span text:style-name="T2">One Boston Place</text:span><text:span text:style-name="T2"><text:line-break/></text:span><text:span text:style-name="T2">Boston, MA <text:s/>02108</text:span><text:span text:style-name="T2"><text:line-break/></text:span><text:span text:style-name="T2"><text:line-break/></text:span><text:span text:style-name="T2">(617) 723-7890</text:span><text:span text:style-name="T2"><text:line-break/></text:span><text:span text:style-name="T2">www.aberdeen.com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We all know chaos is …</text:span></text:p>
                  <text:p text:style-name="P4"><text:span text:style-name="T3">Cosmos is order and harmony in the universe. <text:s/>That is what all sensible managers want.</text:span></text:p>
                  <text:p text:style-name="P4"><text:span text:style-name="T3">As stated here today, without a well-defined and coordinated common infrastructure, we in IT are doomed to the business sins of over budget, poor quality, unreliability, lack of scalability and repeatability.</text:span></text:p>
                  <text:p text:style-name="P4"><text:span text:style-name="T3">The 50,000-foot view is that Is spends too much time and money on technology integration -- taking enormous business risks in doing so. <text:s/>A common computing infrastructure would dramatically reduce costs, improve quality, speed project delivery, and lower time-to-market risks.</text:span></text:p>
                </text:list-header>
              </text:list>
            </draw:text-box>
          </draw:frame>
        </presentation:notes>
      </draw:page>
      <draw:page draw:name="Agenda" draw:style-name="dp1" draw:master-page-name="Default" presentation:presentation-page-layout-name="AL2T1" xml:id="id2" draw:id="id2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Agenda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Change versus continuity: <text:s/>who cares?</text:p>
              </text:list-item>
              <text:list-item>
                <text:p text:style-name="P6">Fragmented IT infrastructure Issues</text:p>
              </text:list-item>
              <text:list-item>
                <text:p text:style-name="P6">Choosing an IT Infrastructure</text:p>
              </text:list-item>
              <text:list-item>
                <text:p text:style-name="P6">Options, Implications, and Conclusion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7"><text:span text:style-name="T4">Business imperatives are shaking up iT</text:span></text:p>
                  <text:p text:style-name="P7"><text:span text:style-name="T4"/></text:p>
                  <text:p text:style-name="P7"><text:span text:style-name="T4">Technology and business pressures are creating a dangerously fragmented IT infrastructure</text:span></text:p>
                  <text:p text:style-name="P7"><text:span text:style-name="T4">Examine six options for handling the infrastructure crisis</text:span></text:p>
                  <text:p text:style-name="P7"><text:span text:style-name="T4">Aberdeen’s conclusions</text:span></text:p>
                </text:list-header>
              </text:list>
            </draw:text-box>
          </draw:frame>
        </presentation:notes>
      </draw:page>
      <draw:page draw:name="IT Spending:  New Acquisition versus  Ongoing Operations" draw:style-name="dp1" draw:master-page-name="Default" presentation:presentation-page-layout-name="AL2T1" xml:id="id3" draw:id="id3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<text:span text:style-name="T5">IT Spending: <text:s/>New Acquisition versus </text:span><text:span text:style-name="T5"><text:line-break/></text:span><text:span text:style-name="T5">Ongoing Operations</text:span>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U.S. enterprises spend ~3% of revenue or value-added on IS</text:p>
              </text:list-item>
              <text:list-item>
                <text:p text:style-name="P6">~ 85% of IS spending is for on-going operations — ~15% for new application acquisitions</text:p>
              </text:list-item>
              <text:list-item>
                <text:p text:style-name="P6">CEO looks at 15% for new applications as incremental change &amp; business driver</text:p>
              </text:list-item>
              <text:list-item>
                <text:p text:style-name="P6">CFO and VP IS/CIO look at 85% for on-going operations as area to be closely managed and controlled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7">There is a huge dichotomy between the ongoing costs of IT operations on existing systems and the often-compelling needs to quickly deploy mission-critical systems to gain or defend against competitive advantage.</text:p>
                </text:list-header>
              </text:list>
            </draw:text-box>
          </draw:frame>
        </presentation:notes>
      </draw:page>
      <draw:page draw:name="IT-Driven Business Imperatives" draw:style-name="dp1" draw:master-page-name="Default" presentation:presentation-page-layout-name="AL2T1" xml:id="id4" draw:id="id4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IT-Driven Business Imperatives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8">Increase customer satisfaction</text:p>
              </text:list-item>
              <text:list-item>
                <text:p text:style-name="P8">Empower fewer users</text:p>
              </text:list-item>
              <text:list-item>
                <text:p text:style-name="P8">Increase line access to data</text:p>
              </text:list-item>
              <text:list-item>
                <text:p text:style-name="P8">Increase operational flexibility</text:p>
              </text:list-item>
              <text:list-item>
                <text:p text:style-name="P8">Shorten application development cycle time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9"><text:span text:style-name="T6">Customer satisfaction</text:span></text:p>
                  <text:p text:style-name="P10"><text:span text:style-name="T7">Fewer customer-supplier relationships</text:span></text:p>
                  <text:list>
                    <text:list-header>
                      <text:p text:style-name="P11"><text:span text:style-name="T8">Customer delight is critical</text:span></text:p>
                      <text:p text:style-name="P11"><text:span text:style-name="T8">Trusted-supplier partnerships</text:span></text:p>
                      <text:p text:style-name="P11"><text:span text:style-name="T8">Operate on a Virtual Company basis</text:span></text:p>
                    </text:list-header>
                  </text:list>
                  <text:p text:style-name="P10"><text:span text:style-name="T7">More revenues from existing customers</text:span></text:p>
                  <text:list>
                    <text:list-header>
                      <text:p text:style-name="P11"><text:span text:style-name="T8">Data mining</text:span></text:p>
                      <text:p text:style-name="P11"><text:span text:style-name="T8">Leverage existing relationships with new, often opportunistic products and services</text:span></text:p>
                    </text:list-header>
                  </text:list>
                  <text:p text:style-name="P10"><text:span text:style-name="T7">New customer capture tactics</text:span></text:p>
                  <text:list>
                    <text:list-header>
                      <text:p text:style-name="P11"><text:span text:style-name="T8">Target high probability prospects</text:span></text:p>
                      <text:p text:style-name="P11"><text:span text:style-name="T8">Add information value to differentiate product and</text:span></text:p>
                    </text:list-header>
                  </text:list>
                  <text:p text:style-name="P10"><text:span text:style-name="T9">Empower Fewer users</text:span></text:p>
                  <text:p text:style-name="P10"><text:span text:style-name="T7">Make data accessible to both line managers and staff</text:span></text:p>
                  <text:p text:style-name="P10"><text:span text:style-name="T7">Fewer managers and staff will be directly responsible for more of the financial results of the enterprise</text:span></text:p>
                  <text:p text:style-name="P10"><text:span text:style-name="T7">Non-programmatic problems must be solved relying on information that may reside anywhere in the enterprise</text:span></text:p>
                  <text:p text:style-name="P12"><text:span text:style-name="T7">Empowered end user model: </text:span><text:span text:style-name="T10">Review. Analyze, , decide, Report</text:span></text:p>
                  <text:p text:style-name="P10"><text:span text:style-name="T7">IT must facilitate — not constrain — the enterprise’s ability to function and transform itself</text:span></text:p>
                  <text:p text:style-name="P10"><text:span text:style-name="T7">New strategy, tactics, business policy implementations</text:span></text:p>
                  <text:p text:style-name="P10"><text:span text:style-name="T7">Acquisitions, divestitures, mergers — information is key component</text:span></text:p>
                  <text:p text:style-name="P10"><text:span text:style-name="T7">Business process reengineering</text:span></text:p>
                  <text:p text:style-name="P10"><text:span text:style-name="T7">Financial planning including items such as interest rate changes and derivative risks</text:span></text:p>
                  <text:p text:style-name="P10"><text:span text:style-name="T7">Government mandates</text:span></text:p>
                  <text:p text:style-name="P10"><text:span text:style-name="T7">Quick moving enterprises must have IS development tools that facilitate change — not delay it</text:span></text:p>
                  <text:p text:style-name="P10"><text:span text:style-name="T7">Multi-year, only 20% effective application, custom development efforts are not acceptable</text:span></text:p>
                  <text:p text:style-name="P10"><text:span text:style-name="T7">RAD means </text:span><text:span text:style-name="T11">now</text:span><text:span text:style-name="T7"> for minor modifications — nine months for major applications </text:span></text:p>
                  <text:p text:style-name="P10"><text:span text:style-name="T7">Server and client development options</text:span></text:p>
                  <text:p text:style-name="P10"><text:span text:style-name="T7">License the core multi-user ISV solution ASAP — modify the fat client when convenient</text:span></text:p>
                  <text:p text:style-name="P10"><text:span text:style-name="T7">Tradeoffs: functionality vs. time</text:span></text:p>
                  <text:p text:style-name="P10"><text:span text:style-name="T7"><text:s text:c="3"/></text:span><text:span text:style-name="T7">vs. resources vs. quality</text:span></text:p>
                  <text:list>
                    <text:list-header>
                      <text:p text:style-name="P11"><text:span text:style-name="T8"/></text:p>
                    </text:list-header>
                  </text:list>
                </text:list-header>
              </text:list>
            </draw:text-box>
          </draw:frame>
        </presentation:notes>
      </draw:page>
      <draw:page draw:name="Business Necessity Meets  IS Reality:  Insurance Industry" draw:style-name="dp1" draw:master-page-name="Default" presentation:presentation-page-layout-name="AL3T19" xml:id="id5" draw:id="id5">
        <draw:custom-shape draw:style-name="gr2" draw:text-style-name="P2" draw:layer="layout" svg:width="5.269cm" svg:height="1.27cm" svg:x="1.976cm" svg:y="17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02cm" svg:height="1.27cm" svg:x="8.749cm" svg:y="17.35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Business Necessity Meets <text:line-break/>IS Reality: <text:s/>Insurance Industry</text:p>
              </text:list-header>
            </text:list>
          </draw:text-box>
        </draw:frame>
        <draw:g draw:style-name="gr4">
          <draw:custom-shape draw:style-name="gr5" draw:text-style-name="P13" draw:layer="layout" svg:width="1.345cm" svg:height="2.028cm" svg:x="9.203cm" svg:y="10.17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1.345cm" svg:height="2.028cm" svg:x="12.365cm" svg:y="10.17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1.345cm" svg:height="2.028cm" svg:x="10.786cm" svg:y="10.17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1.345cm" svg:height="2.028cm" svg:x="13.948cm" svg:y="10.17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13" draw:layer="layout" svg:width="1.349cm" svg:height="2.028cm" svg:x="15.527cm" svg:y="10.17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13" draw:layer="layout" svg:width="1.349cm" svg:height="2.028cm" svg:x="17.11cm" svg:y="10.17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style-name="gr1">
            <draw:line draw:style-name="gr7" draw:text-style-name="P14" draw:layer="layout" svg:x1="9.582cm" svg:y1="10.72cm" svg:x2="9.582cm" svg:y2="11.28cm">
              <text:p/>
            </draw:line>
            <draw:line draw:style-name="gr7" draw:text-style-name="P14" draw:layer="layout" svg:x1="9.776cm" svg:y1="10.72cm" svg:x2="9.776cm" svg:y2="11.28cm">
              <text:p/>
            </draw:line>
            <draw:line draw:style-name="gr7" draw:text-style-name="P14" draw:layer="layout" svg:x1="9.979cm" svg:y1="10.72cm" svg:x2="9.979cm" svg:y2="11.28cm">
              <text:p/>
            </draw:line>
          </draw:g>
          <draw:g draw:style-name="gr1">
            <draw:line draw:style-name="gr7" draw:text-style-name="P14" draw:layer="layout" svg:x1="17.489cm" svg:y1="10.72cm" svg:x2="17.489cm" svg:y2="11.28cm">
              <text:p/>
            </draw:line>
            <draw:line draw:style-name="gr7" draw:text-style-name="P14" draw:layer="layout" svg:x1="17.683cm" svg:y1="10.72cm" svg:x2="17.683cm" svg:y2="11.28cm">
              <text:p/>
            </draw:line>
            <draw:line draw:style-name="gr7" draw:text-style-name="P14" draw:layer="layout" svg:x1="17.881cm" svg:y1="10.72cm" svg:x2="17.881cm" svg:y2="11.28cm">
              <text:p/>
            </draw:line>
            <draw:line draw:style-name="gr7" draw:text-style-name="P14" draw:layer="layout" svg:x1="17.881cm" svg:y1="10.72cm" svg:x2="17.881cm" svg:y2="11.28cm">
              <text:p/>
            </draw:line>
          </draw:g>
          <draw:line draw:style-name="gr7" draw:text-style-name="P14" draw:layer="layout" svg:x1="11.165cm" svg:y1="10.72cm" svg:x2="11.165cm" svg:y2="11.28cm">
            <text:p/>
          </draw:line>
          <draw:line draw:style-name="gr7" draw:text-style-name="P14" draw:layer="layout" svg:x1="11.165cm" svg:y1="10.72cm" svg:x2="11.165cm" svg:y2="11.28cm">
            <text:p/>
          </draw:line>
          <draw:line draw:style-name="gr7" draw:text-style-name="P14" draw:layer="layout" svg:x1="11.355cm" svg:y1="10.72cm" svg:x2="11.355cm" svg:y2="11.28cm">
            <text:p/>
          </draw:line>
          <draw:line draw:style-name="gr7" draw:text-style-name="P14" draw:layer="layout" svg:x1="11.558cm" svg:y1="10.72cm" svg:x2="11.558cm" svg:y2="11.28cm">
            <text:p/>
          </draw:line>
          <draw:line draw:style-name="gr7" draw:text-style-name="P14" draw:layer="layout" svg:x1="12.744cm" svg:y1="10.72cm" svg:x2="12.744cm" svg:y2="11.28cm">
            <text:p/>
          </draw:line>
          <draw:line draw:style-name="gr7" draw:text-style-name="P14" draw:layer="layout" svg:x1="12.744cm" svg:y1="10.72cm" svg:x2="12.744cm" svg:y2="11.28cm">
            <text:p/>
          </draw:line>
          <draw:line draw:style-name="gr7" draw:text-style-name="P14" draw:layer="layout" svg:x1="12.938cm" svg:y1="10.72cm" svg:x2="12.938cm" svg:y2="11.28cm">
            <text:p/>
          </draw:line>
          <draw:line draw:style-name="gr7" draw:text-style-name="P14" draw:layer="layout" svg:x1="13.141cm" svg:y1="10.72cm" svg:x2="13.141cm" svg:y2="11.28cm">
            <text:p/>
          </draw:line>
          <draw:line draw:style-name="gr7" draw:text-style-name="P14" draw:layer="layout" svg:x1="14.327cm" svg:y1="10.72cm" svg:x2="14.327cm" svg:y2="11.28cm">
            <text:p/>
          </draw:line>
          <draw:line draw:style-name="gr7" draw:text-style-name="P14" draw:layer="layout" svg:x1="14.327cm" svg:y1="10.72cm" svg:x2="14.327cm" svg:y2="11.28cm">
            <text:p/>
          </draw:line>
          <draw:line draw:style-name="gr7" draw:text-style-name="P14" draw:layer="layout" svg:x1="14.517cm" svg:y1="10.72cm" svg:x2="14.517cm" svg:y2="11.28cm">
            <text:p/>
          </draw:line>
          <draw:line draw:style-name="gr7" draw:text-style-name="P14" draw:layer="layout" svg:x1="14.72cm" svg:y1="10.72cm" svg:x2="14.72cm" svg:y2="11.28cm">
            <text:p/>
          </draw:line>
          <draw:g draw:style-name="gr1">
            <draw:line draw:style-name="gr7" draw:text-style-name="P14" draw:layer="layout" svg:x1="15.906cm" svg:y1="10.72cm" svg:x2="15.906cm" svg:y2="11.28cm">
              <text:p/>
            </draw:line>
            <draw:line draw:style-name="gr7" draw:text-style-name="P14" draw:layer="layout" svg:x1="16.1cm" svg:y1="10.72cm" svg:x2="16.1cm" svg:y2="11.28cm">
              <text:p/>
            </draw:line>
            <draw:line draw:style-name="gr7" draw:text-style-name="P14" draw:layer="layout" svg:x1="16.303cm" svg:y1="10.72cm" svg:x2="16.303cm" svg:y2="11.28cm">
              <text:p/>
            </draw:line>
            <draw:line draw:style-name="gr7" draw:text-style-name="P14" draw:layer="layout" svg:x1="16.303cm" svg:y1="10.72cm" svg:x2="16.303cm" svg:y2="11.28cm">
              <text:p/>
            </draw:line>
          </draw:g>
          <draw:custom-shape draw:style-name="gr8" draw:text-style-name="P13" draw:layer="layout" svg:width="0.362cm" svg:height="0.15cm" svg:x="9.397cm" svg:y="11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357cm" svg:height="0.15cm" svg:x="10.98cm" svg:y="11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361cm" svg:height="0.15cm" svg:x="12.559cm" svg:y="11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357cm" svg:height="0.15cm" svg:x="14.142cm" svg:y="11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361cm" svg:height="0.15cm" svg:x="15.721cm" svg:y="11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357cm" svg:height="0.15cm" svg:x="17.308cm" svg:y="11.681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g draw:style-name="gr1">
            <draw:frame draw:style-name="gr9" draw:text-style-name="P15" draw:layer="layout" svg:width="2.368cm" svg:height="1.645cm" svg:x="3.85cm" svg:y="14.098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372cm" svg:height="1.645cm" svg:x="4.639cm" svg:y="14.473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373cm" svg:height="1.645cm" svg:x="5.631cm" svg:y="14.852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</draw:g>
          <draw:g draw:style-name="gr1">
            <draw:frame draw:style-name="gr9" draw:text-style-name="P15" draw:layer="layout" svg:width="2.373cm" svg:height="1.645cm" svg:x="13.533cm" svg:y="13.908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373cm" svg:height="1.645cm" svg:x="12.938cm" svg:y="14.473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368cm" svg:height="1.645cm" svg:x="12.149cm" svg:y="14.852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</draw:g>
          <draw:g draw:style-name="gr4">
            <draw:custom-shape draw:style-name="gr10" draw:text-style-name="P16" draw:layer="layout" svg:width="0.723cm" svg:height="1.437cm" svg:x="9.397cm" svg:y="14.332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4" draw:layer="layout" svg:x1="9.379cm" svg:y1="14.314cm" svg:x2="9.843cm" svg:y2="14.098cm">
              <text:p/>
            </draw:line>
            <draw:line draw:style-name="gr7" draw:text-style-name="P14" draw:layer="layout" svg:x1="9.843cm" svg:y1="14.098cm" svg:x2="10.372cm" svg:y2="14.098cm">
              <text:p/>
            </draw:line>
            <draw:line draw:style-name="gr7" draw:text-style-name="P14" draw:layer="layout" svg:x1="10.372cm" svg:y1="14.098cm" svg:x2="10.372cm" svg:y2="15.368cm">
              <text:p/>
            </draw:line>
            <draw:line draw:style-name="gr7" draw:text-style-name="P14" draw:layer="layout" svg:x1="10.138cm" svg:y1="15.786cm" svg:x2="10.372cm" svg:y2="15.367cm">
              <text:p/>
            </draw:line>
            <draw:line draw:style-name="gr7" draw:text-style-name="P14" draw:layer="layout" svg:x1="10.372cm" svg:y1="14.098cm" svg:x2="10.138cm" svg:y2="14.314cm">
              <text:p/>
            </draw:line>
            <draw:g draw:style-name="gr1">
              <draw:line draw:style-name="gr7" draw:text-style-name="P14" draw:layer="layout" svg:x1="9.759cm" svg:y1="14.526cm" svg:x2="9.759cm" svg:y2="15.046cm">
                <text:p/>
              </draw:line>
              <draw:line draw:style-name="gr7" draw:text-style-name="P14" draw:layer="layout" svg:x1="9.843cm" svg:y1="14.526cm" svg:x2="9.843cm" svg:y2="15.046cm">
                <text:p/>
              </draw:line>
              <draw:line draw:style-name="gr7" draw:text-style-name="P14" draw:layer="layout" svg:x1="9.913cm" svg:y1="14.526cm" svg:x2="9.913cm" svg:y2="15.046cm">
                <text:p/>
              </draw:line>
              <draw:line draw:style-name="gr7" draw:text-style-name="P14" draw:layer="layout" svg:x1="9.997cm" svg:y1="14.526cm" svg:x2="9.997cm" svg:y2="15.046cm">
                <text:p/>
              </draw:line>
            </draw:g>
            <draw:custom-shape draw:style-name="gr11" draw:text-style-name="P16" draw:layer="layout" svg:width="0.274cm" svg:height="0.066cm" svg:x="9.551cm" svg:y="15.3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2" draw:text-style-name="P17" draw:layer="layout" svg:width="2.73cm" svg:height="2.263cm" svg:x="16.32cm" svg:y="5.62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style-name="gr1">
            <draw:line draw:style-name="gr7" draw:text-style-name="P14" draw:layer="layout" svg:x1="16.991cm" svg:y1="6.262cm" svg:x2="16.991cm" svg:y2="7.135cm">
              <text:p/>
            </draw:line>
            <draw:line draw:style-name="gr7" draw:text-style-name="P14" draw:layer="layout" svg:x1="17.335cm" svg:y1="6.262cm" svg:x2="17.335cm" svg:y2="7.135cm">
              <text:p/>
            </draw:line>
            <draw:line draw:style-name="gr7" draw:text-style-name="P14" draw:layer="layout" svg:x1="17.683cm" svg:y1="6.262cm" svg:x2="17.683cm" svg:y2="7.135cm">
              <text:p/>
            </draw:line>
            <draw:line draw:style-name="gr7" draw:text-style-name="P14" draw:layer="layout" svg:x1="18.027cm" svg:y1="6.262cm" svg:x2="18.027cm" svg:y2="7.135cm">
              <text:p/>
            </draw:line>
          </draw:g>
          <draw:custom-shape draw:style-name="gr13" draw:text-style-name="P17" draw:layer="layout" svg:width="1.168cm" svg:height="0.177cm" svg:x="16.497cm" svg:y="7.37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14" draw:text-style-name="P13" draw:layer="layout" svg:width="2.985cm" svg:height="3.669cm" svg:x="4.723cm" svg:y="5.5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9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style-name="gr1">
            <draw:line draw:style-name="gr7" draw:text-style-name="P14" draw:layer="layout" svg:x1="5.459cm" svg:y1="6.566cm" svg:x2="5.459cm" svg:y2="7.973cm">
              <text:p/>
            </draw:line>
            <draw:line draw:style-name="gr7" draw:text-style-name="P14" draw:layer="layout" svg:x1="5.843cm" svg:y1="6.566cm" svg:x2="5.843cm" svg:y2="7.973cm">
              <text:p/>
            </draw:line>
            <draw:line draw:style-name="gr7" draw:text-style-name="P14" draw:layer="layout" svg:x1="6.213cm" svg:y1="6.566cm" svg:x2="6.213cm" svg:y2="7.973cm">
              <text:p/>
            </draw:line>
            <draw:line draw:style-name="gr7" draw:text-style-name="P14" draw:layer="layout" svg:x1="6.584cm" svg:y1="6.566cm" svg:x2="6.584cm" svg:y2="7.973cm">
              <text:p/>
            </draw:line>
          </draw:g>
          <draw:custom-shape draw:style-name="gr15" draw:text-style-name="P13" draw:layer="layout" svg:width="1.284cm" svg:height="0.322cm" svg:x="4.912cm" svg:y="8.34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3" draw:layer="layout" svg:width="2.143cm" svg:height="0.736cm" svg:x="8.405cm" svg:y="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17" draw:text-style-name="P2" draw:layer="layout" svg:width="2.319cm" svg:height="0.925cm" svg:x="8.246cm" svg:y="5.953cm">
            <text:p/>
            <draw:enhanced-geometry svg:viewBox="0 0 21600 21600" draw:type="mso-spt100" draw:modifiers="0 90 0 0" draw:enhanced-path="V 0 0 21600 21600 ?f3 ?f1 ?f7 ?f5 S L 10800 10800 Z N V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8" draw:text-style-name="P2" draw:layer="layout" svg:width="2.327cm" svg:height="0.925cm" svg:x="8.392cm" svg:y="5.953cm">
            <text:p/>
            <draw:enhanced-geometry svg:viewBox="0 0 21600 21600" draw:type="mso-spt100" draw:modifiers="90 180 21600 0" draw:enhanced-path="V 0 0 21600 21600 ?f3 ?f1 ?f7 ?f5 S L 10800 10800 Z N V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7" draw:text-style-name="P14" draw:layer="layout" svg:x1="8.387cm" svg:y1="5.177cm" svg:x2="8.387cm" svg:y2="6.416cm">
          <text:p/>
        </draw:line>
        <draw:line draw:style-name="gr7" draw:text-style-name="P14" draw:layer="layout" svg:x1="10.566cm" svg:y1="5.177cm" svg:x2="10.566cm" svg:y2="6.416cm">
          <text:p/>
        </draw:line>
        <draw:g draw:style-name="gr4">
          <draw:custom-shape draw:style-name="gr19" draw:text-style-name="P2" draw:layer="layout" svg:width="2.319cm" svg:height="0.934cm" svg:x="8.246cm" svg:y="5.486cm">
            <text:p/>
            <draw:enhanced-geometry svg:viewBox="0 0 21600 21600" draw:type="mso-spt100" draw:modifiers="359.456924438477 90 0 205" draw:enhanced-path="V 0 0 21600 21600 ?f3 ?f1 ?f7 ?f5 S L 10800 10800 Z N V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0" draw:text-style-name="P2" draw:layer="layout" svg:width="2.327cm" svg:height="0.934cm" svg:x="8.392cm" svg:y="5.486cm">
            <text:p/>
            <draw:enhanced-geometry svg:viewBox="0 0 21600 21600" draw:type="mso-spt100" draw:modifiers="90 180.543075561523 21600 205" draw:enhanced-path="V 0 0 21600 21600 ?f3 ?f1 ?f7 ?f5 S L 10800 10800 Z N V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draw:style-name="gr4">
          <draw:custom-shape draw:style-name="gr17" draw:text-style-name="P2" draw:layer="layout" svg:width="2.319cm" svg:height="0.925cm" svg:x="8.246cm" svg:y="5.177cm">
            <text:p/>
            <draw:enhanced-geometry svg:viewBox="0 0 21600 21600" draw:type="mso-spt100" draw:modifiers="0 90 0 0" draw:enhanced-path="V 0 0 21600 21600 ?f3 ?f1 ?f7 ?f5 S L 10800 10800 Z N V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8" draw:text-style-name="P2" draw:layer="layout" svg:width="2.327cm" svg:height="0.925cm" svg:x="8.392cm" svg:y="5.177cm">
            <text:p/>
            <draw:enhanced-geometry svg:viewBox="0 0 21600 21600" draw:type="mso-spt100" draw:modifiers="90 180 21600 0" draw:enhanced-path="V 0 0 21600 21600 ?f3 ?f1 ?f7 ?f5 S L 10800 10800 Z N V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21" draw:text-style-name="P14" draw:layer="layout" svg:x1="7.726cm" svg:y1="5.794cm" svg:x2="8.387cm" svg:y2="5.794cm">
          <text:p/>
        </draw:line>
        <draw:custom-shape draw:style-name="gr22" draw:text-style-name="P19" draw:layer="layout" svg:width="4.727cm" svg:height="1.781cm" svg:x="7.907cm" svg:y="7.153cm">
          <text:list text:style-name="L5">
            <text:list-header>
              <text:p text:style-name="P18"><text:span text:style-name="T12">Unix or NT 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8.546cm" svg:height="1.019cm" svg:x="15.258cm" svg:y="8.18cm">
          <text:list text:style-name="L5">
            <text:list-header>
              <text:p text:style-name="P18"><text:span text:style-name="T12">Highly Parallel, Scale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0.896cm" svg:height="1.781cm" svg:x="9.212cm" svg:y="12.316cm">
          <text:list text:style-name="L6">
            <text:list-header>
              <text:p text:style-name="P18"><text:span text:style-name="T13">8,000 users at 50 offices and headquarter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8.004cm" svg:y1="15.972cm" svg:x2="8.987cm" svg:y2="15.602cm">
          <text:p/>
        </draw:line>
        <draw:line draw:style-name="gr25" draw:text-style-name="P14" draw:layer="layout" svg:x1="10.769cm" svg:y1="15.222cm" svg:x2="12.347cm" svg:y2="15.602cm">
          <text:p/>
        </draw:line>
        <draw:line draw:style-name="gr25" draw:text-style-name="P14" draw:layer="layout" svg:x1="8.987cm" svg:y1="14.852cm" svg:x2="7.801cm" svg:y2="15.222cm">
          <text:p/>
        </draw:line>
        <draw:line draw:style-name="gr25" draw:text-style-name="P14" draw:layer="layout" svg:x1="8.004cm" svg:y1="15.602cm" svg:x2="8.987cm" svg:y2="15.222cm">
          <text:p/>
        </draw:line>
        <draw:line draw:style-name="gr25" draw:text-style-name="P14" draw:layer="layout" svg:x1="10.963cm" svg:y1="14.852cm" svg:x2="12.541cm" svg:y2="15.222cm">
          <text:p/>
        </draw:line>
        <draw:line draw:style-name="gr25" draw:text-style-name="P14" draw:layer="layout" svg:x1="10.769cm" svg:y1="15.602cm" svg:x2="12.149cm" svg:y2="15.972cm">
          <text:p/>
        </draw:line>
        <draw:custom-shape draw:style-name="gr26" draw:text-style-name="P21" draw:layer="layout" svg:width="8.652cm" svg:height="3.305cm" svg:x="15.884cm" svg:y="14.257cm">
          <text:list text:style-name="L5">
            <text:list-header>
              <text:p text:style-name="P20"><text:span text:style-name="T14">Local transaction processing </text:span><text:span text:style-name="T14"><text:line-break/></text:span><text:span text:style-name="T14">against a replicated databa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5.721cm" svg:height="1.104cm" svg:x="19.23cm" svg:y="6.416cm">
          <text:list text:style-name="L7">
            <text:list-header>
              <text:p text:style-name="P20"><text:span text:style-name="T15">Data Warehou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2.875cm" svg:height="1.104cm" svg:x="4.911cm" svg:y="17.304cm">
          <text:list text:style-name="L7">
            <text:list-header>
              <text:p text:style-name="P20"><text:span text:style-name="T16">PC desktops and Intel/Risc Office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7.902cm" svg:y1="9.684cm" svg:x2="18.005cm" svg:y2="9.684cm">
          <text:p/>
        </draw:line>
        <draw:line draw:style-name="gr29" draw:text-style-name="P14" draw:layer="layout" svg:x1="7.285cm" svg:y1="8.894cm" svg:x2="7.902cm" svg:y2="9.684cm">
          <text:p/>
        </draw:line>
        <draw:line draw:style-name="gr29" draw:text-style-name="P14" draw:layer="layout" svg:x1="18.005cm" svg:y1="9.683cm" svg:x2="18.419cm" svg:y2="9.092cm">
          <text:p/>
        </draw:line>
        <draw:custom-shape draw:style-name="gr30" draw:text-style-name="P23" draw:layer="layout" svg:width="6.53cm" svg:height="2.543cm" svg:x="2.611cm" svg:y="10.746cm">
          <text:list text:style-name="L5">
            <text:list-header>
              <text:p text:style-name="P22"><text:span text:style-name="T12">Economical, Scaleable</text:span><text:span text:style-name="T12"><text:line-break/></text:span><text:span text:style-name="T12">15-500 Use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501cm" svg:height="1.781cm" svg:x="3.603cm" svg:y="4.035cm">
          <text:list text:style-name="L6">
            <text:list-header>
              <text:p text:style-name="P18"><text:span text:style-name="T13">5,000 Use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4.959cm" svg:height="2.798cm" svg:x="0.169cm" svg:y="6.65cm">
          <text:list text:style-name="L8">
            <text:list-header>
              <text:p text:style-name="P20"><text:span text:style-name="T17">OLTP Production</text:span><text:span text:style-name="T17"><text:line-break/></text:span><text:span text:style-name="T17">System &amp;</text:span><text:span text:style-name="T17"><text:line-break/></text:span><text:span text:style-name="T17">Administratio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fadeOverColor" smil:fadeColor="#000000"/>
          </anim:par>
        </anim:par>
        <presentation:notes draw:style-name="dp3">
          <draw:frame draw:style-name="gr33" draw:text-style-name="P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33" draw:text-style-name="P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frame presentation:style-name="pr8" draw:text-style-name="P5" draw:layer="layout" svg:width="13.97cm" svg:height="11.434cm" svg:x="2.54cm" svg:y="12.061cm" presentation:class="notes" presentation:user-transformed="true">
            <draw:text-box>
              <text:list text:style-name="L3">
                <text:list-header>
                  <text:p text:style-name="P25">A real-world insurance company (and Aberdeen client) is planning a next-generation claims processing system. <text:s/>Any customer can stop in any office for complete support. <text:s/>Claims can be updated from any of 50 local offices.</text:p>
                  <text:p text:style-name="P25">A server at HQ will manage 3,500 HQ users, systems management, and batch.</text:p>
                  <text:p text:style-name="P25">Business drivers: <text:s/>cut costs &amp; increase customer satisfaction. <text:s/>Implementation costs are over $175 million.</text:p>
                  <text:p text:style-name="P25">.</text:p>
                </text:list-header>
              </text:list>
            </draw:text-box>
          </draw:frame>
          <draw:page-thumbnail draw:style-name="gr1" draw:layer="layout" svg:width="12.692cm" svg:height="9.517cm" svg:x="3.179cm" svg:y="1.909cm" draw:page-number="5" presentation:class="page"/>
        </presentation:notes>
      </draw:page>
      <draw:page draw:name="IS Reality: Enormous Complexity" draw:style-name="dp1" draw:master-page-name="Default" presentation:presentation-page-layout-name="AL3T19" xml:id="id6" draw:id="id6">
        <draw:custom-shape draw:style-name="gr2" draw:text-style-name="P2" draw:layer="layout" svg:width="5.269cm" svg:height="1.27cm" svg:x="1.976cm" svg:y="17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02cm" svg:height="1.27cm" svg:x="8.749cm" svg:y="17.35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IS Reality:<text:line-break/><text:span text:style-name="T19">Enormous Complexity</text:span></text:p>
              </text:list-header>
            </text:list>
          </draw:text-box>
        </draw:frame>
        <draw:g draw:style-name="gr4">
          <draw:g draw:style-name="gr1">
            <draw:frame draw:style-name="gr9" draw:text-style-name="P15" draw:layer="layout" svg:width="2.434cm" svg:height="1.759cm" svg:x="3.457cm" svg:y="15.734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434cm" svg:height="1.76cm" svg:x="4.269cm" svg:y="16.135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434cm" svg:height="1.759cm" svg:x="5.287cm" svg:y="16.541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</draw:g>
          <draw:g draw:style-name="gr1">
            <draw:frame draw:style-name="gr9" draw:text-style-name="P15" draw:layer="layout" svg:width="2.434cm" svg:height="1.76cm" svg:x="13.401cm" svg:y="15.531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434cm" svg:height="1.76cm" svg:x="12.788cm" svg:y="16.135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  <draw:frame draw:style-name="gr9" draw:text-style-name="P15" draw:layer="layout" svg:width="2.434cm" svg:height="1.759cm" svg:x="11.977cm" svg:y="16.541cm">
              <draw:image xlink:href="Pictures/10003228000069F200005440CB18D39C.wmf" xlink:type="simple" xlink:show="embed" xlink:actuate="onLoad" draw:mime-type="image/x-wmf">
                <text:p/>
              </draw:image>
              <draw:image xlink:href="Pictures/100000010000031900000277B02CD1C4.png" xlink:type="simple" xlink:show="embed" xlink:actuate="onLoad" draw:mime-type="image/png"/>
            </draw:frame>
          </draw:g>
          <draw:g draw:style-name="gr4">
            <draw:custom-shape draw:style-name="gr35" draw:text-style-name="P16" draw:layer="layout" svg:width="0.74cm" svg:height="1.543cm" svg:x="9.155cm" svg:y="15.981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4" draw:layer="layout" svg:x1="9.137cm" svg:y1="15.962cm" svg:x2="9.609cm" svg:y2="15.733cm">
              <text:p/>
            </draw:line>
            <draw:line draw:style-name="gr7" draw:text-style-name="P14" draw:layer="layout" svg:x1="9.609cm" svg:y1="15.734cm" svg:x2="10.156cm" svg:y2="15.734cm">
              <text:p/>
            </draw:line>
            <draw:line draw:style-name="gr7" draw:text-style-name="P14" draw:layer="layout" svg:x1="10.156cm" svg:y1="15.734cm" svg:x2="10.156cm" svg:y2="17.092cm">
              <text:p/>
            </draw:line>
            <draw:line draw:style-name="gr7" draw:text-style-name="P14" draw:layer="layout" svg:x1="9.913cm" svg:y1="17.542cm" svg:x2="10.156cm" svg:y2="17.092cm">
              <text:p/>
            </draw:line>
            <draw:line draw:style-name="gr7" draw:text-style-name="P14" draw:layer="layout" svg:x1="10.155cm" svg:y1="15.734cm" svg:x2="9.912cm" svg:y2="15.963cm">
              <text:p/>
            </draw:line>
            <draw:g draw:style-name="gr1">
              <draw:line draw:style-name="gr7" draw:text-style-name="P14" draw:layer="layout" svg:x1="9.525cm" svg:y1="16.188cm" svg:x2="9.525cm" svg:y2="16.748cm">
                <text:p/>
              </draw:line>
              <draw:line draw:style-name="gr7" draw:text-style-name="P14" draw:layer="layout" svg:x1="9.609cm" svg:y1="16.188cm" svg:x2="9.609cm" svg:y2="16.748cm">
                <text:p/>
              </draw:line>
              <draw:line draw:style-name="gr7" draw:text-style-name="P14" draw:layer="layout" svg:x1="9.684cm" svg:y1="16.188cm" svg:x2="9.684cm" svg:y2="16.748cm">
                <text:p/>
              </draw:line>
              <draw:line draw:style-name="gr7" draw:text-style-name="P14" draw:layer="layout" svg:x1="9.768cm" svg:y1="16.188cm" svg:x2="9.768cm" svg:y2="16.748cm">
                <text:p/>
              </draw:line>
            </draw:g>
            <draw:custom-shape draw:style-name="gr11" draw:text-style-name="P16" draw:layer="layout" svg:width="0.278cm" svg:height="0.075cm" svg:x="9.313cm" svg:y="17.11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1" draw:text-style-name="P14" draw:layer="layout" svg:x1="7.439cm" svg:y1="6.839cm" svg:x2="8.118cm" svg:y2="6.839cm">
          <text:p/>
        </draw:line>
        <draw:custom-shape draw:style-name="gr36" draw:text-style-name="P27" draw:layer="layout" svg:width="5.834cm" svg:height="2.288cm" svg:x="15.756cm" svg:y="5.715cm">
          <text:list text:style-name="L10">
            <text:list-header>
              <text:p text:style-name="P26"><text:span text:style-name="T20">Data Warehouse Transformation &amp; Re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7.721cm" svg:y1="17.739cm" svg:x2="8.731cm" svg:y2="17.342cm">
          <text:p/>
        </draw:line>
        <draw:line draw:style-name="gr25" draw:text-style-name="P14" draw:layer="layout" svg:x1="10.561cm" svg:y1="16.938cm" svg:x2="12.184cm" svg:y2="17.343cm">
          <text:p/>
        </draw:line>
        <draw:line draw:style-name="gr25" draw:text-style-name="P14" draw:layer="layout" svg:x1="8.73cm" svg:y1="16.541cm" svg:x2="7.513cm" svg:y2="16.938cm">
          <text:p/>
        </draw:line>
        <draw:line draw:style-name="gr25" draw:text-style-name="P14" draw:layer="layout" svg:x1="7.721cm" svg:y1="17.342cm" svg:x2="8.731cm" svg:y2="16.937cm">
          <text:p/>
        </draw:line>
        <draw:line draw:style-name="gr25" draw:text-style-name="P14" draw:layer="layout" svg:x1="10.76cm" svg:y1="16.541cm" svg:x2="12.383cm" svg:y2="16.938cm">
          <text:p/>
        </draw:line>
        <draw:line draw:style-name="gr25" draw:text-style-name="P14" draw:layer="layout" svg:x1="10.561cm" svg:y1="17.343cm" svg:x2="11.977cm" svg:y2="17.74cm">
          <text:p/>
        </draw:line>
        <draw:line draw:style-name="gr37" draw:text-style-name="P14" draw:layer="layout" svg:x1="5.08cm" svg:y1="15.875cm" svg:x2="9.102cm" svg:y2="13.123cm">
          <text:p/>
        </draw:line>
        <draw:line draw:style-name="gr38" draw:text-style-name="P14" draw:layer="layout" svg:x1="8.7cm" svg:y1="12.487cm" svg:x2="6.632cm" svg:y2="10.794cm">
          <text:p/>
        </draw:line>
        <draw:line draw:style-name="gr39" draw:text-style-name="P14" draw:layer="layout" svg:x1="7.386cm" svg:y1="9.948cm" svg:x2="9.644cm" svg:y2="11.43cm">
          <text:p/>
        </draw:line>
        <draw:line draw:style-name="gr40" draw:text-style-name="P14" draw:layer="layout" svg:x1="11.408cm" svg:y1="6.773cm" svg:x2="15.924cm" svg:y2="6.773cm">
          <text:p/>
        </draw:line>
        <draw:line draw:style-name="gr41" draw:text-style-name="P14" draw:layer="layout" svg:x1="7.571cm" svg:y1="9.737cm" svg:x2="11.337cm" svg:y2="11.43cm">
          <text:p/>
        </draw:line>
        <draw:line draw:style-name="gr42" draw:text-style-name="P14" draw:layer="layout" svg:x1="7.571cm" svg:y1="9.525cm" svg:x2="13.031cm" svg:y2="11.43cm">
          <text:p/>
        </draw:line>
        <draw:line draw:style-name="gr43" draw:text-style-name="P14" draw:layer="layout" svg:x1="7.571cm" svg:y1="9.313cm" svg:x2="14.534cm" svg:y2="11.43cm">
          <text:p/>
        </draw:line>
        <draw:line draw:style-name="gr44" draw:text-style-name="P14" draw:layer="layout" svg:x1="7.571cm" svg:y1="8.89cm" svg:x2="16.417cm" svg:y2="11.43cm">
          <text:p/>
        </draw:line>
        <draw:line draw:style-name="gr45" draw:text-style-name="P14" draw:layer="layout" svg:x1="7.571cm" svg:y1="8.678cm" svg:x2="18.111cm" svg:y2="11.43cm">
          <text:p/>
        </draw:line>
        <draw:custom-shape draw:style-name="gr46" draw:text-style-name="P29" draw:layer="layout" svg:width="4.891cm" svg:height="0.934cm" svg:x="2.886cm" svg:y="11.849cm">
          <text:list text:style-name="L11">
            <text:list-header>
              <text:p text:style-name="P28"><text:span text:style-name="T21">Transaction P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7.52cm" svg:height="0.934cm" svg:x="14.939cm" svg:y="9.521cm">
          <text:list text:style-name="L6">
            <text:list-header>
              <text:p text:style-name="P28"><text:span text:style-name="T22">Replication to every off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5.234cm" svg:height="0.934cm" svg:x="17.762cm" svg:y="10.579cm">
          <text:list text:style-name="L11">
            <text:list-header>
              <text:p text:style-name="P28"><text:span text:style-name="T21">Transaction Pus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3.858cm" svg:height="3.642cm" svg:x="0.348cm" svg:y="6.346cm">
          <text:list text:style-name="L5">
            <text:list-header>
              <text:p text:style-name="P28"><text:span text:style-name="T23">Database of </text:span><text:span text:style-name="T23"><text:line-break/></text:span><text:span text:style-name="T23">Record</text:span><text:span text:style-name="T23"><text:line-break/></text:span><text:span text:style-name="T23"><text:line-break/></text:span><text:span text:style-name="T24">Enterprise </text:span><text:span text:style-name="T24"><text:line-break/></text:span><text:span text:style-name="T24">Superserv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2.416cm" svg:height="2.223cm" svg:x="21.467cm" svg:y="15.835cm">
          <draw:image xlink:href="Pictures/100016AE000069FE0000618B074D62E5.wmf" xlink:type="simple" xlink:show="embed" xlink:actuate="onLoad" draw:mime-type="image/x-wmf">
            <text:p/>
          </draw:image>
          <draw:image xlink:href="Pictures/10000001000002E1000002A6C98D981B.png" xlink:type="simple" xlink:show="embed" xlink:actuate="onLoad" draw:mime-type="image/png"/>
        </draw:frame>
        <draw:custom-shape draw:style-name="gr50" draw:text-style-name="P29" draw:layer="layout" svg:width="4.205cm" svg:height="1.611cm" svg:x="20.424cm" svg:y="13.754cm">
          <text:list text:style-name="L12">
            <text:list-header>
              <text:p text:style-name="P28"><text:span text:style-name="T25">Java &amp; HTML </text:span><text:span text:style-name="T25"><text:line-break/></text:span><text:span text:style-name="T25">to Supplier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1" draw:text-style-name="P14" draw:layer="layout" svg:x1="17.145cm" svg:y1="13.758cm" svg:x2="21.215cm" svg:y2="17.357cm">
          <text:p/>
        </draw:line>
        <draw:g draw:style-name="gr4">
          <draw:custom-shape draw:style-name="gr52" draw:text-style-name="P30" draw:layer="layout" svg:width="3.127cm" svg:height="1.05cm" svg:x="8.096cm" svg:y="6.222cm">
            <text:p/>
            <draw:enhanced-geometry svg:viewBox="0 0 709 238" draw:type="non-primitive" draw:enhanced-path="M 0 0  L 708 0  L 708 237  L 0 237  L 0 0  N"/>
          </draw:custom-shape>
          <draw:custom-shape draw:style-name="gr53" draw:text-style-name="P17" draw:layer="layout" svg:width="3.122cm" svg:height="0.56cm" svg:x="8.096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30" draw:layer="layout" svg:width="3.122cm" svg:height="0.56cm" svg:x="8.096cm" svg:y="7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5" draw:layer="layout" svg:width="1.949cm" svg:height="2.593cm" svg:x="21.59cm" svg:y="5.08cm">
          <draw:image xlink:href="Pictures/1000093E00006A3100008D4E88A7A992.wmf" xlink:type="simple" xlink:show="embed" xlink:actuate="onLoad" draw:mime-type="image/x-wmf">
            <text:p/>
          </draw:image>
          <draw:image xlink:href="Pictures/100000010000026500000330206F0A73.png" xlink:type="simple" xlink:show="embed" xlink:actuate="onLoad" draw:mime-type="image/png"/>
        </draw:frame>
        <draw:g draw:style-name="gr1">
          <draw:frame draw:style-name="gr9" draw:text-style-name="P15" draw:layer="layout" svg:width="1.949cm" svg:height="2.593cm" svg:x="9.177cm" svg:y="11.8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  <draw:frame draw:style-name="gr9" draw:text-style-name="P15" draw:layer="layout" svg:width="1.949cm" svg:height="2.593cm" svg:x="9.6cm" svg:y="12.224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</draw:g>
        <draw:g draw:style-name="gr1">
          <draw:frame draw:style-name="gr9" draw:text-style-name="P15" draw:layer="layout" svg:width="1.949cm" svg:height="2.593cm" svg:x="12.14cm" svg:y="11.8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  <draw:frame draw:style-name="gr9" draw:text-style-name="P15" draw:layer="layout" svg:width="1.949cm" svg:height="2.593cm" svg:x="12.563cm" svg:y="12.224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</draw:g>
        <draw:g draw:style-name="gr1">
          <draw:frame draw:style-name="gr9" draw:text-style-name="P15" draw:layer="layout" svg:width="1.949cm" svg:height="2.593cm" svg:x="14.892cm" svg:y="11.8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  <draw:frame draw:style-name="gr9" draw:text-style-name="P15" draw:layer="layout" svg:width="1.949cm" svg:height="2.593cm" svg:x="15.315cm" svg:y="12.224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</draw:g>
        <draw:custom-shape draw:style-name="gr55" draw:text-style-name="P29" draw:layer="layout" svg:width="4.696cm" svg:height="1.27cm" svg:x="9.569cm" svg:y="14.561cm">
          <text:list text:style-name="L13">
            <text:list-header>
              <text:p text:style-name="P28"><text:span text:style-name="T26">Classic 2-Tier Client-Server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1">
          <draw:frame draw:style-name="gr9" draw:text-style-name="P15" draw:layer="layout" svg:width="1.949cm" svg:height="2.593cm" svg:x="18.067cm" svg:y="11.589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  <draw:frame draw:style-name="gr9" draw:text-style-name="P15" draw:layer="layout" svg:width="1.949cm" svg:height="2.593cm" svg:x="18.49cm" svg:y="12.012cm">
            <draw:image xlink:href="Pictures/1000093E00006A3100008D4E88A7A992.wmf" xlink:type="simple" xlink:show="embed" xlink:actuate="onLoad" draw:mime-type="image/x-wmf">
              <text:p/>
            </draw:image>
            <draw:image xlink:href="Pictures/100000010000026500000330206F0A73.png" xlink:type="simple" xlink:show="embed" xlink:actuate="onLoad" draw:mime-type="image/png"/>
          </draw:frame>
        </draw:g>
        <draw:g draw:style-name="gr4">
          <draw:custom-shape draw:style-name="gr56" draw:text-style-name="P31" draw:layer="layout" svg:width="1.001cm" svg:height="4.524cm" svg:x="4.273cm" svg:y="5.852cm">
            <text:p/>
            <draw:enhanced-geometry svg:viewBox="0 0 227 1026" draw:type="non-primitive" draw:enhanced-path="M 0 0  L 226 45  L 226 1025  L 0 933  L 0 0  N"/>
          </draw:custom-shape>
          <draw:custom-shape draw:style-name="gr57" draw:text-style-name="P32" draw:layer="layout" svg:width="2.566cm" svg:height="4.732cm" svg:x="5.27cm" svg:y="5.644cm">
            <text:p/>
            <draw:enhanced-geometry svg:viewBox="0 0 582 1073" draw:type="non-primitive" draw:enhanced-path="M 0 91  L 581 0  L 581 916  L 0 1072  L 0 91  N"/>
          </draw:custom-shape>
          <draw:custom-shape draw:style-name="gr58" draw:text-style-name="P33" draw:layer="layout" svg:width="3.563cm" svg:height="0.552cm" svg:x="4.273cm" svg:y="5.503cm">
            <text:p/>
            <draw:enhanced-geometry svg:viewBox="0 0 808 125" draw:type="non-primitive" draw:enhanced-path="M 0 78  L 582 0  L 807 32  L 225 124  L 0 78  N"/>
          </draw:custom-shape>
          <draw:custom-shape draw:style-name="gr59" draw:text-style-name="P34" draw:layer="layout" svg:width="0.105cm" svg:height="4.326cm" svg:x="5.27cm" svg:y="6.05cm">
            <text:p/>
            <draw:enhanced-geometry svg:viewBox="0 0 24 981" draw:type="non-primitive" draw:enhanced-path="M 0 0  L 23 0  L 23 980  L 0 980  L 0 0  N"/>
          </draw:custom-shape>
          <draw:line draw:style-name="gr60" draw:text-style-name="P14" draw:layer="layout" svg:x1="4.366cm" svg:y1="7.461cm" svg:x2="4.661cm" svg:y2="7.532cm">
            <text:p/>
          </draw:line>
          <draw:line draw:style-name="gr7" draw:text-style-name="P14" draw:layer="layout" svg:x1="4.366cm" svg:y1="7.461cm" svg:x2="4.661cm" svg:y2="7.532cm">
            <text:p/>
          </draw:line>
          <draw:line draw:style-name="gr60" draw:text-style-name="P14" draw:layer="layout" svg:x1="4.366cm" svg:y1="6.05cm" svg:x2="4.661cm" svg:y2="6.112cm">
            <text:p/>
          </draw:line>
          <draw:line draw:style-name="gr7" draw:text-style-name="P14" draw:layer="layout" svg:x1="4.366cm" svg:y1="6.05cm" svg:x2="4.661cm" svg:y2="6.112cm">
            <text:p/>
          </draw:line>
          <draw:custom-shape draw:style-name="gr61" draw:text-style-name="P2" draw:layer="layout" svg:width="0.22cm" svg:height="1.376cm" svg:x="4.366cm" svg:y="6.05cm">
            <text:p/>
            <draw:enhanced-geometry svg:viewBox="0 0 50 312" draw:type="non-primitive" draw:enhanced-path="M 0 0  L 49 13  L 49 311  L 0 295  L 0 0  N"/>
          </draw:custom-shape>
          <draw:custom-shape draw:style-name="gr62" draw:text-style-name="P2" draw:layer="layout" svg:width="0.299cm" svg:height="1.486cm" svg:x="4.366cm" svg:y="6.05cm">
            <text:p/>
            <draw:enhanced-geometry svg:viewBox="0 0 68 337" draw:type="non-primitive" draw:enhanced-path="M 0 0  L 67 13  L 67 336  L 0 318  L 0 0  N"/>
          </draw:custom-shape>
          <draw:line draw:style-name="gr60" draw:text-style-name="P14" draw:layer="layout" svg:x1="4.366cm" svg:y1="6.112cm" svg:x2="4.661cm" svg:y2="6.174cm">
            <text:p/>
          </draw:line>
          <draw:line draw:style-name="gr7" draw:text-style-name="P14" draw:layer="layout" svg:x1="4.366cm" svg:y1="6.112cm" svg:x2="4.661cm" svg:y2="6.174cm">
            <text:p/>
          </draw:line>
          <draw:line draw:style-name="gr60" draw:text-style-name="P14" draw:layer="layout" svg:x1="4.366cm" svg:y1="6.174cm" svg:x2="4.661cm" svg:y2="6.253cm">
            <text:p/>
          </draw:line>
          <draw:line draw:style-name="gr7" draw:text-style-name="P14" draw:layer="layout" svg:x1="4.366cm" svg:y1="6.174cm" svg:x2="4.661cm" svg:y2="6.253cm">
            <text:p/>
          </draw:line>
          <draw:line draw:style-name="gr60" draw:text-style-name="P14" draw:layer="layout" svg:x1="4.366cm" svg:y1="6.253cm" svg:x2="4.661cm" svg:y2="6.306cm">
            <text:p/>
          </draw:line>
          <draw:line draw:style-name="gr7" draw:text-style-name="P14" draw:layer="layout" svg:x1="4.366cm" svg:y1="6.253cm" svg:x2="4.661cm" svg:y2="6.306cm">
            <text:p/>
          </draw:line>
          <draw:line draw:style-name="gr60" draw:text-style-name="P14" draw:layer="layout" svg:x1="4.366cm" svg:y1="6.306cm" svg:x2="4.661cm" svg:y2="6.372cm">
            <text:p/>
          </draw:line>
          <draw:line draw:style-name="gr7" draw:text-style-name="P14" draw:layer="layout" svg:x1="4.366cm" svg:y1="6.306cm" svg:x2="4.661cm" svg:y2="6.372cm">
            <text:p/>
          </draw:line>
          <draw:line draw:style-name="gr60" draw:text-style-name="P14" draw:layer="layout" svg:x1="4.366cm" svg:y1="6.372cm" svg:x2="4.661cm" svg:y2="6.372cm">
            <text:p/>
          </draw:line>
          <draw:line draw:style-name="gr7" draw:text-style-name="P14" draw:layer="layout" svg:x1="4.366cm" svg:y1="6.372cm" svg:x2="4.661cm" svg:y2="6.372cm">
            <text:p/>
          </draw:line>
          <draw:line draw:style-name="gr60" draw:text-style-name="P14" draw:layer="layout" svg:x1="4.366cm" svg:y1="6.456cm" svg:x2="4.661cm" svg:y2="6.456cm">
            <text:p/>
          </draw:line>
          <draw:line draw:style-name="gr7" draw:text-style-name="P14" draw:layer="layout" svg:x1="4.366cm" svg:y1="6.456cm" svg:x2="4.661cm" svg:y2="6.456cm">
            <text:p/>
          </draw:line>
          <draw:line draw:style-name="gr60" draw:text-style-name="P14" draw:layer="layout" svg:x1="4.366cm" svg:y1="6.456cm" svg:x2="4.661cm" svg:y2="6.518cm">
            <text:p/>
          </draw:line>
          <draw:line draw:style-name="gr7" draw:text-style-name="P14" draw:layer="layout" svg:x1="4.366cm" svg:y1="6.456cm" svg:x2="4.661cm" svg:y2="6.518cm">
            <text:p/>
          </draw:line>
          <draw:line draw:style-name="gr60" draw:text-style-name="P14" draw:layer="layout" svg:x1="4.366cm" svg:y1="6.518cm" svg:x2="4.661cm" svg:y2="6.579cm">
            <text:p/>
          </draw:line>
          <draw:line draw:style-name="gr7" draw:text-style-name="P14" draw:layer="layout" svg:x1="4.366cm" svg:y1="6.518cm" svg:x2="4.661cm" svg:y2="6.579cm">
            <text:p/>
          </draw:line>
          <draw:line draw:style-name="gr60" draw:text-style-name="P14" draw:layer="layout" svg:x1="4.366cm" svg:y1="6.579cm" svg:x2="4.661cm" svg:y2="6.65cm">
            <text:p/>
          </draw:line>
          <draw:line draw:style-name="gr7" draw:text-style-name="P14" draw:layer="layout" svg:x1="4.366cm" svg:y1="6.579cm" svg:x2="4.661cm" svg:y2="6.65cm">
            <text:p/>
          </draw:line>
          <draw:line draw:style-name="gr60" draw:text-style-name="P14" draw:layer="layout" svg:x1="4.366cm" svg:y1="6.65cm" svg:x2="4.661cm" svg:y2="6.72cm">
            <text:p/>
          </draw:line>
          <draw:line draw:style-name="gr7" draw:text-style-name="P14" draw:layer="layout" svg:x1="4.366cm" svg:y1="6.65cm" svg:x2="4.661cm" svg:y2="6.72cm">
            <text:p/>
          </draw:line>
          <draw:line draw:style-name="gr60" draw:text-style-name="P14" draw:layer="layout" svg:x1="4.366cm" svg:y1="6.72cm" svg:x2="4.661cm" svg:y2="6.778cm">
            <text:p/>
          </draw:line>
          <draw:line draw:style-name="gr7" draw:text-style-name="P14" draw:layer="layout" svg:x1="4.366cm" svg:y1="6.72cm" svg:x2="4.661cm" svg:y2="6.778cm">
            <text:p/>
          </draw:line>
          <draw:line draw:style-name="gr60" draw:text-style-name="P14" draw:layer="layout" svg:x1="4.366cm" svg:y1="6.778cm" svg:x2="4.661cm" svg:y2="6.844cm">
            <text:p/>
          </draw:line>
          <draw:line draw:style-name="gr7" draw:text-style-name="P14" draw:layer="layout" svg:x1="4.366cm" svg:y1="6.778cm" svg:x2="4.661cm" svg:y2="6.844cm">
            <text:p/>
          </draw:line>
          <draw:line draw:style-name="gr60" draw:text-style-name="P14" draw:layer="layout" svg:x1="4.366cm" svg:y1="6.844cm" svg:x2="4.661cm" svg:y2="6.932cm">
            <text:p/>
          </draw:line>
          <draw:line draw:style-name="gr7" draw:text-style-name="P14" draw:layer="layout" svg:x1="4.366cm" svg:y1="6.844cm" svg:x2="4.661cm" svg:y2="6.932cm">
            <text:p/>
          </draw:line>
          <draw:line draw:style-name="gr60" draw:text-style-name="P14" draw:layer="layout" svg:x1="4.366cm" svg:y1="6.932cm" svg:x2="4.661cm" svg:y2="6.985cm">
            <text:p/>
          </draw:line>
          <draw:line draw:style-name="gr7" draw:text-style-name="P14" draw:layer="layout" svg:x1="4.366cm" svg:y1="6.932cm" svg:x2="4.661cm" svg:y2="6.985cm">
            <text:p/>
          </draw:line>
          <draw:line draw:style-name="gr60" draw:text-style-name="P14" draw:layer="layout" svg:x1="4.366cm" svg:y1="6.985cm" svg:x2="4.661cm" svg:y2="7.056cm">
            <text:p/>
          </draw:line>
          <draw:line draw:style-name="gr7" draw:text-style-name="P14" draw:layer="layout" svg:x1="4.366cm" svg:y1="6.985cm" svg:x2="4.661cm" svg:y2="7.056cm">
            <text:p/>
          </draw:line>
          <draw:line draw:style-name="gr60" draw:text-style-name="P14" draw:layer="layout" svg:x1="4.366cm" svg:y1="7.056cm" svg:x2="4.661cm" svg:y2="7.126cm">
            <text:p/>
          </draw:line>
          <draw:line draw:style-name="gr7" draw:text-style-name="P14" draw:layer="layout" svg:x1="4.366cm" svg:y1="7.056cm" svg:x2="4.661cm" svg:y2="7.126cm">
            <text:p/>
          </draw:line>
          <draw:line draw:style-name="gr60" draw:text-style-name="P14" draw:layer="layout" svg:x1="4.366cm" svg:y1="7.126cm" svg:x2="4.661cm" svg:y2="7.188cm">
            <text:p/>
          </draw:line>
          <draw:line draw:style-name="gr7" draw:text-style-name="P14" draw:layer="layout" svg:x1="4.366cm" svg:y1="7.126cm" svg:x2="4.661cm" svg:y2="7.188cm">
            <text:p/>
          </draw:line>
          <draw:line draw:style-name="gr60" draw:text-style-name="P14" draw:layer="layout" svg:x1="4.366cm" svg:y1="7.188cm" svg:x2="4.661cm" svg:y2="7.25cm">
            <text:p/>
          </draw:line>
          <draw:line draw:style-name="gr7" draw:text-style-name="P14" draw:layer="layout" svg:x1="4.366cm" svg:y1="7.188cm" svg:x2="4.661cm" svg:y2="7.25cm">
            <text:p/>
          </draw:line>
          <draw:line draw:style-name="gr60" draw:text-style-name="P14" draw:layer="layout" svg:x1="4.366cm" svg:y1="7.25cm" svg:x2="4.661cm" svg:y2="7.338cm">
            <text:p/>
          </draw:line>
          <draw:line draw:style-name="gr7" draw:text-style-name="P14" draw:layer="layout" svg:x1="4.366cm" svg:y1="7.25cm" svg:x2="4.661cm" svg:y2="7.338cm">
            <text:p/>
          </draw:line>
          <draw:line draw:style-name="gr60" draw:text-style-name="P14" draw:layer="layout" svg:x1="4.366cm" svg:y1="7.338cm" svg:x2="4.661cm" svg:y2="7.338cm">
            <text:p/>
          </draw:line>
          <draw:line draw:style-name="gr7" draw:text-style-name="P14" draw:layer="layout" svg:x1="4.366cm" svg:y1="7.338cm" svg:x2="4.661cm" svg:y2="7.338cm">
            <text:p/>
          </draw:line>
          <draw:line draw:style-name="gr60" draw:text-style-name="P14" draw:layer="layout" svg:x1="4.366cm" svg:y1="7.4cm" svg:x2="4.661cm" svg:y2="7.4cm">
            <text:p/>
          </draw:line>
          <draw:line draw:style-name="gr7" draw:text-style-name="P14" draw:layer="layout" svg:x1="4.366cm" svg:y1="7.4cm" svg:x2="4.661cm" svg:y2="7.4cm">
            <text:p/>
          </draw:line>
          <draw:line draw:style-name="gr60" draw:text-style-name="P14" draw:layer="layout" svg:x1="4.366cm" svg:y1="7.4cm" svg:x2="4.661cm" svg:y2="7.461cm">
            <text:p/>
          </draw:line>
          <draw:line draw:style-name="gr7" draw:text-style-name="P14" draw:layer="layout" svg:x1="4.366cm" svg:y1="7.4cm" svg:x2="4.661cm" svg:y2="7.461cm">
            <text:p/>
          </draw:line>
          <draw:custom-shape draw:style-name="gr63" draw:text-style-name="P35" draw:layer="layout" svg:width="0.52cm" svg:height="1.292cm" svg:x="6.985cm" svg:y="6.985cm">
            <text:p/>
            <draw:enhanced-geometry svg:viewBox="0 0 118 293" draw:type="non-primitive" draw:enhanced-path="M 0 14  L 117 0  L 117 259  L 0 292  L 0 14  N"/>
          </draw:custom-shape>
          <draw:line draw:style-name="gr7" draw:text-style-name="P14" draw:layer="layout" svg:x1="7.029cm" svg:y1="7.126cm" svg:x2="7.408cm" svg:y2="7.056cm">
            <text:p/>
          </draw:line>
          <draw:custom-shape draw:style-name="gr64" draw:text-style-name="P36" draw:layer="layout" svg:width="0.335cm" svg:height="0.199cm" svg:x="7.029cm" svg:y="7.126cm">
            <text:p/>
            <draw:enhanced-geometry svg:viewBox="0 0 76 45" draw:type="non-primitive" draw:enhanced-path="M 0 22  L 75 0  L 75 22  L 0 44  L 0 22  N"/>
          </draw:custom-shape>
          <draw:custom-shape draw:style-name="gr64" draw:text-style-name="P36" draw:layer="layout" svg:width="0.282cm" svg:height="0.207cm" svg:x="7.029cm" svg:y="7.25cm">
            <text:p/>
            <draw:enhanced-geometry svg:viewBox="0 0 64 47" draw:type="non-primitive" draw:enhanced-path="M 0 0  L 0 46  L 63 46  L 63 0  L 0 0  N"/>
          </draw:custom-shape>
          <draw:custom-shape draw:style-name="gr65" draw:text-style-name="P37" draw:layer="layout" svg:width="0.092cm" svg:height="0.198cm" svg:x="7.219cm" svg:y="7.4cm">
            <text:p/>
            <draw:enhanced-geometry svg:viewBox="0 0 21 45" draw:type="non-primitive" draw:enhanced-path="M 0 0  L 0 44  L 20 19  L 20 0  L 0 0  N"/>
          </draw:custom-shape>
          <draw:custom-shape draw:style-name="gr66" draw:text-style-name="P37" draw:layer="layout" svg:width="0.097cm" svg:height="4.115cm" svg:x="7.739cm" svg:y="5.644cm">
            <text:p/>
            <draw:enhanced-geometry svg:viewBox="0 0 22 933" draw:type="non-primitive" draw:enhanced-path="M 0 13  L 21 0  L 21 914  L 0 932  L 0 13  N"/>
          </draw:custom-shape>
          <draw:custom-shape draw:style-name="gr65" draw:text-style-name="P37" draw:layer="layout" svg:width="0.101cm" svg:height="0.203cm" svg:x="7.598cm" svg:y="5.852cm">
            <text:p/>
            <draw:enhanced-geometry svg:viewBox="0 0 23 46" draw:type="non-primitive" draw:enhanced-path="M 0 0  L 22 0  L 22 45  L 0 45  L 0 0  N"/>
          </draw:custom-shape>
          <draw:custom-shape draw:style-name="gr67" draw:text-style-name="P37" draw:layer="layout" svg:width="0.093cm" svg:height="4.176cm" svg:x="6.601cm" svg:y="5.852cm">
            <text:p/>
            <draw:enhanced-geometry svg:viewBox="0 0 21 947" draw:type="non-primitive" draw:enhanced-path="M 0 0  L 20 0  L 20 946  L 0 946  L 0 0  N"/>
          </draw:custom-shape>
        </draw:g>
        <draw:frame draw:style-name="gr9" draw:text-style-name="P15" draw:layer="layout" svg:width="1.949cm" svg:height="2.593cm" svg:x="23.451cm" svg:y="5.08cm">
          <draw:image xlink:href="Pictures/1000093E00006A3100008D4E88A7A992.wmf" xlink:type="simple" xlink:show="embed" xlink:actuate="onLoad" draw:mime-type="image/x-wmf">
            <text:p/>
          </draw:image>
          <draw:image xlink:href="Pictures/100000010000026500000330206F0A73.png" xlink:type="simple" xlink:show="embed" xlink:actuate="onLoad" draw:mime-type="image/png"/>
        </draw:frame>
        <anim:par presentation:node-type="timing-root">
          <anim:par smil:begin="id6.begin">
            <anim:transitionFilter smil:dur="1s" smil:type="fade" smil:subtype="fadeOverColor" smil:fadeColor="#000000"/>
          </anim:par>
        </anim:par>
        <presentation:notes draw:style-name="dp3">
          <draw:frame draw:style-name="gr33" draw:text-style-name="P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33" draw:text-style-name="P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frame presentation:style-name="pr8" draw:text-style-name="P5" draw:layer="layout" svg:width="13.97cm" svg:height="11.434cm" svg:x="2.54cm" svg:y="12.061cm" presentation:class="notes" presentation:user-transformed="true">
            <draw:text-box>
              <text:list text:style-name="L3">
                <text:list-header>
                  <text:p text:style-name="P25">Local servers in 50 offices are desired for fast, local response time. <text:s/>Each office will have a complete copy of the active claims database. <text:s/>Replication or transaction queuing will be used to pull every transaction from the local office to an “enterprise super-server” at headquarters which will serve as the database of record. <text:s/>This super-server will service 3,500 HQ users, replicate (“push”) all transactions out to all offices, and drive data transformation onto a data warehouse server.</text:p>
                  <text:p text:style-name="P25">Supporting transactions from 5,000 remote users and 3,500 local users as well as push replication, batch, and data warehouse transformation duties demands considerable computing capacity — beyond traditional SMP architectures and even many clusters.</text:p>
                  <text:p text:style-name="P25">What computing infrastructure can handle this workload and still be able to grow with the projected 15%-20% annual business volume, be highly available, and flexible enough to support other applications in the future?</text:p>
                  <text:p text:style-name="P25">This application screams for an overriding common infrastructure which will support the application through its estimated 15 year life.</text:p>
                </text:list-header>
              </text:list>
            </draw:text-box>
          </draw:frame>
          <draw:page-thumbnail draw:style-name="gr1" draw:layer="layout" svg:width="12.692cm" svg:height="9.517cm" svg:x="3.179cm" svg:y="1.909cm" draw:page-number="6" presentation:class="page"/>
        </presentation:notes>
      </draw:page>
      <draw:page draw:name="IT Infrastructure Fragments" draw:style-name="dp1" draw:master-page-name="Default" presentation:presentation-page-layout-name="AL2T1" xml:id="id7" draw:id="id7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IT Infrastructure Fragments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Enterprise mainframe </text:p>
              </text:list-item>
              <text:list-item>
                <text:p text:style-name="P6">Geographical islands of automation</text:p>
              </text:list-item>
              <text:list-item>
                <text:p text:style-name="P6">LANs become Intranets</text:p>
              </text:list-item>
              <text:list-item>
                <text:p text:style-name="P6">Data warehousing</text:p>
              </text:list-item>
              <text:list-item>
                <text:p text:style-name="P6">Client-server meets the Web</text:p>
              </text:list-item>
              <text:list-item>
                <text:p text:style-name="P6">E-business is the tip of an iceberg</text:p>
              </text:list-item>
            </text:list>
          </draw:text-box>
        </draw:frame>
        <draw:custom-shape draw:style-name="gr68" draw:text-style-name="P38" draw:layer="layout" svg:width="15.314cm" svg:height="1.277cm" svg:x="4.986cm" svg:y="15.24cm">
          <text:list text:style-name="L3">
            <text:list-header>
              <text:p text:style-name="P1"><text:span text:style-name="T27">The Devil is in the Technology Detail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7"><text:span text:style-name="T4">-- Transition --</text:span></text:p>
                  <text:p text:style-name="P7"><text:span text:style-name="T4">Let’s look at six different ways technology is wacking us on the side of the head.</text:span></text:p>
                  <text:p text:style-name="P7"><text:span text:style-name="T4">Failure to pay attention to technology details is the bane of most projects.</text:span></text:p>
                </text:list-header>
              </text:list>
            </draw:text-box>
          </draw:frame>
        </presentation:notes>
      </draw:page>
      <draw:page draw:name="What Happened to the Mainframe Data Center?" draw:style-name="dp1" draw:master-page-name="Default" presentation:presentation-page-layout-name="AL4T13" xml:id="id8" draw:id="id8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What Happened to the Mainframe Data Center?</text:p>
              </text:list-header>
            </text:list>
          </draw:text-box>
        </draw:frame>
        <draw:g draw:style-name="gr4">
          <draw:custom-shape draw:style-name="gr69" draw:text-style-name="P31" draw:layer="layout" svg:width="2.023cm" svg:height="6.92cm" svg:x="2.54cm" svg:y="7.093cm">
            <text:p/>
            <draw:enhanced-geometry svg:viewBox="0 0 308 990" draw:type="non-primitive" draw:enhanced-path="M 0 0  L 307 44  L 307 989  L 0 900  L 0 0  N"/>
          </draw:custom-shape>
          <draw:custom-shape draw:style-name="gr70" draw:text-style-name="P32" draw:layer="layout" svg:width="5.18cm" svg:height="7.242cm" svg:x="4.556cm" svg:y="6.771cm">
            <text:p/>
            <draw:enhanced-geometry svg:viewBox="0 0 789 1036" draw:type="non-primitive" draw:enhanced-path="M 0 88  L 788 0  L 788 884  L 0 1035  L 0 88  N"/>
          </draw:custom-shape>
          <draw:custom-shape draw:style-name="gr71" draw:text-style-name="P33" draw:layer="layout" svg:width="7.196cm" svg:height="0.838cm" svg:x="2.54cm" svg:y="6.562cm">
            <text:p/>
            <draw:enhanced-geometry svg:viewBox="0 0 1096 120" draw:type="non-primitive" draw:enhanced-path="M 0 74  L 790 0  L 1095 30  L 306 119  L 0 74  N"/>
          </draw:custom-shape>
          <draw:custom-shape draw:style-name="gr72" draw:text-style-name="P34" draw:layer="layout" svg:width="0.217cm" svg:height="6.62cm" svg:x="4.556cm" svg:y="7.392cm">
            <text:p/>
            <draw:enhanced-geometry svg:viewBox="0 0 33 947" draw:type="non-primitive" draw:enhanced-path="M 0 0  L 32 0  L 32 946  L 0 946  L 0 0  N"/>
          </draw:custom-shape>
          <draw:line draw:style-name="gr60" draw:text-style-name="P14" draw:layer="layout" svg:x1="2.73cm" svg:y1="9.56cm" svg:x2="3.315cm" svg:y2="9.666cm">
            <text:p/>
          </draw:line>
          <draw:line draw:style-name="gr7" draw:text-style-name="P14" draw:layer="layout" svg:x1="2.73cm" svg:y1="9.56cm" svg:x2="3.315cm" svg:y2="9.666cm">
            <text:p/>
          </draw:line>
          <draw:line draw:style-name="gr60" draw:text-style-name="P14" draw:layer="layout" svg:x1="2.73cm" svg:y1="7.392cm" svg:x2="3.315cm" svg:y2="7.49cm">
            <text:p/>
          </draw:line>
          <draw:line draw:style-name="gr7" draw:text-style-name="P14" draw:layer="layout" svg:x1="2.73cm" svg:y1="7.392cm" svg:x2="3.315cm" svg:y2="7.49cm">
            <text:p/>
          </draw:line>
          <draw:custom-shape draw:style-name="gr73" draw:text-style-name="P2" draw:layer="layout" svg:width="0.44cm" svg:height="2.111cm" svg:x="2.73cm" svg:y="7.392cm">
            <text:p/>
            <draw:enhanced-geometry svg:viewBox="0 0 67 302" draw:type="non-primitive" draw:enhanced-path="M 0 0  L 66 13  L 66 301  L 0 285  L 0 0  N"/>
          </draw:custom-shape>
          <draw:custom-shape draw:style-name="gr74" draw:text-style-name="P2" draw:layer="layout" svg:width="0.591cm" svg:height="2.279cm" svg:x="2.73cm" svg:y="7.392cm">
            <text:p/>
            <draw:enhanced-geometry svg:viewBox="0 0 90 326" draw:type="non-primitive" draw:enhanced-path="M 0 0  L 89 13  L 89 325  L 0 307  L 0 0  N"/>
          </draw:custom-shape>
          <draw:line draw:style-name="gr60" draw:text-style-name="P14" draw:layer="layout" svg:x1="2.73cm" svg:y1="7.491cm" svg:x2="3.315cm" svg:y2="7.581cm">
            <text:p/>
          </draw:line>
          <draw:line draw:style-name="gr7" draw:text-style-name="P14" draw:layer="layout" svg:x1="2.73cm" svg:y1="7.491cm" svg:x2="3.315cm" svg:y2="7.581cm">
            <text:p/>
          </draw:line>
          <draw:line draw:style-name="gr60" draw:text-style-name="P14" draw:layer="layout" svg:x1="2.73cm" svg:y1="7.581cm" svg:x2="3.315cm" svg:y2="7.699cm">
            <text:p/>
          </draw:line>
          <draw:line draw:style-name="gr7" draw:text-style-name="P14" draw:layer="layout" svg:x1="2.73cm" svg:y1="7.581cm" svg:x2="3.315cm" svg:y2="7.699cm">
            <text:p/>
          </draw:line>
          <draw:line draw:style-name="gr60" draw:text-style-name="P14" draw:layer="layout" svg:x1="2.73cm" svg:y1="7.7cm" svg:x2="3.315cm" svg:y2="7.791cm">
            <text:p/>
          </draw:line>
          <draw:line draw:style-name="gr7" draw:text-style-name="P14" draw:layer="layout" svg:x1="2.73cm" svg:y1="7.7cm" svg:x2="3.315cm" svg:y2="7.791cm">
            <text:p/>
          </draw:line>
          <draw:line draw:style-name="gr60" draw:text-style-name="P14" draw:layer="layout" svg:x1="2.73cm" svg:y1="7.792cm" svg:x2="3.315cm" svg:y2="7.888cm">
            <text:p/>
          </draw:line>
          <draw:line draw:style-name="gr7" draw:text-style-name="P14" draw:layer="layout" svg:x1="2.73cm" svg:y1="7.792cm" svg:x2="3.315cm" svg:y2="7.888cm">
            <text:p/>
          </draw:line>
          <draw:line draw:style-name="gr60" draw:text-style-name="P14" draw:layer="layout" svg:x1="2.73cm" svg:y1="7.888cm" svg:x2="3.315cm" svg:y2="7.888cm">
            <text:p/>
          </draw:line>
          <draw:line draw:style-name="gr7" draw:text-style-name="P14" draw:layer="layout" svg:x1="2.73cm" svg:y1="7.888cm" svg:x2="3.315cm" svg:y2="7.888cm">
            <text:p/>
          </draw:line>
          <draw:line draw:style-name="gr60" draw:text-style-name="P14" draw:layer="layout" svg:x1="2.73cm" svg:y1="8.022cm" svg:x2="3.315cm" svg:y2="8.022cm">
            <text:p/>
          </draw:line>
          <draw:line draw:style-name="gr7" draw:text-style-name="P14" draw:layer="layout" svg:x1="2.73cm" svg:y1="8.022cm" svg:x2="3.315cm" svg:y2="8.022cm">
            <text:p/>
          </draw:line>
          <draw:line draw:style-name="gr60" draw:text-style-name="P14" draw:layer="layout" svg:x1="2.73cm" svg:y1="8.022cm" svg:x2="3.315cm" svg:y2="8.113cm">
            <text:p/>
          </draw:line>
          <draw:line draw:style-name="gr7" draw:text-style-name="P14" draw:layer="layout" svg:x1="2.73cm" svg:y1="8.022cm" svg:x2="3.315cm" svg:y2="8.113cm">
            <text:p/>
          </draw:line>
          <draw:line draw:style-name="gr60" draw:text-style-name="P14" draw:layer="layout" svg:x1="2.73cm" svg:y1="8.114cm" svg:x2="3.315cm" svg:y2="8.21cm">
            <text:p/>
          </draw:line>
          <draw:line draw:style-name="gr7" draw:text-style-name="P14" draw:layer="layout" svg:x1="2.73cm" svg:y1="8.114cm" svg:x2="3.315cm" svg:y2="8.21cm">
            <text:p/>
          </draw:line>
          <draw:line draw:style-name="gr60" draw:text-style-name="P14" draw:layer="layout" svg:x1="2.73cm" svg:y1="8.21cm" svg:x2="3.315cm" svg:y2="8.301cm">
            <text:p/>
          </draw:line>
          <draw:line draw:style-name="gr7" draw:text-style-name="P14" draw:layer="layout" svg:x1="2.73cm" svg:y1="8.21cm" svg:x2="3.315cm" svg:y2="8.301cm">
            <text:p/>
          </draw:line>
          <draw:line draw:style-name="gr60" draw:text-style-name="P14" draw:layer="layout" svg:x1="2.73cm" svg:y1="8.302cm" svg:x2="3.315cm" svg:y2="8.42cm">
            <text:p/>
          </draw:line>
          <draw:line draw:style-name="gr7" draw:text-style-name="P14" draw:layer="layout" svg:x1="2.73cm" svg:y1="8.302cm" svg:x2="3.315cm" svg:y2="8.42cm">
            <text:p/>
          </draw:line>
          <draw:line draw:style-name="gr60" draw:text-style-name="P14" draw:layer="layout" svg:x1="2.73cm" svg:y1="8.421cm" svg:x2="3.315cm" svg:y2="8.511cm">
            <text:p/>
          </draw:line>
          <draw:line draw:style-name="gr7" draw:text-style-name="P14" draw:layer="layout" svg:x1="2.73cm" svg:y1="8.421cm" svg:x2="3.315cm" svg:y2="8.511cm">
            <text:p/>
          </draw:line>
          <draw:line draw:style-name="gr60" draw:text-style-name="P14" draw:layer="layout" svg:x1="2.73cm" svg:y1="8.512cm" svg:x2="3.315cm" svg:y2="8.61cm">
            <text:p/>
          </draw:line>
          <draw:line draw:style-name="gr7" draw:text-style-name="P14" draw:layer="layout" svg:x1="2.73cm" svg:y1="8.512cm" svg:x2="3.315cm" svg:y2="8.61cm">
            <text:p/>
          </draw:line>
          <draw:line draw:style-name="gr60" draw:text-style-name="P14" draw:layer="layout" svg:x1="2.73cm" svg:y1="8.61cm" svg:x2="3.315cm" svg:y2="8.735cm">
            <text:p/>
          </draw:line>
          <draw:line draw:style-name="gr7" draw:text-style-name="P14" draw:layer="layout" svg:x1="2.73cm" svg:y1="8.61cm" svg:x2="3.315cm" svg:y2="8.735cm">
            <text:p/>
          </draw:line>
          <draw:line draw:style-name="gr60" draw:text-style-name="P14" draw:layer="layout" svg:x1="2.73cm" svg:y1="8.735cm" svg:x2="3.315cm" svg:y2="8.833cm">
            <text:p/>
          </draw:line>
          <draw:line draw:style-name="gr7" draw:text-style-name="P14" draw:layer="layout" svg:x1="2.73cm" svg:y1="8.735cm" svg:x2="3.315cm" svg:y2="8.833cm">
            <text:p/>
          </draw:line>
          <draw:line draw:style-name="gr60" draw:text-style-name="P14" draw:layer="layout" svg:x1="2.73cm" svg:y1="8.833cm" svg:x2="3.315cm" svg:y2="8.923cm">
            <text:p/>
          </draw:line>
          <draw:line draw:style-name="gr7" draw:text-style-name="P14" draw:layer="layout" svg:x1="2.73cm" svg:y1="8.833cm" svg:x2="3.315cm" svg:y2="8.923cm">
            <text:p/>
          </draw:line>
          <draw:line draw:style-name="gr60" draw:text-style-name="P14" draw:layer="layout" svg:x1="2.73cm" svg:y1="8.924cm" svg:x2="3.315cm" svg:y2="9.042cm">
            <text:p/>
          </draw:line>
          <draw:line draw:style-name="gr7" draw:text-style-name="P14" draw:layer="layout" svg:x1="2.73cm" svg:y1="8.924cm" svg:x2="3.315cm" svg:y2="9.042cm">
            <text:p/>
          </draw:line>
          <draw:line draw:style-name="gr60" draw:text-style-name="P14" draw:layer="layout" svg:x1="2.73cm" svg:y1="9.043cm" svg:x2="3.315cm" svg:y2="9.133cm">
            <text:p/>
          </draw:line>
          <draw:line draw:style-name="gr7" draw:text-style-name="P14" draw:layer="layout" svg:x1="2.73cm" svg:y1="9.043cm" svg:x2="3.315cm" svg:y2="9.133cm">
            <text:p/>
          </draw:line>
          <draw:line draw:style-name="gr60" draw:text-style-name="P14" draw:layer="layout" svg:x1="2.73cm" svg:y1="9.133cm" svg:x2="3.315cm" svg:y2="9.231cm">
            <text:p/>
          </draw:line>
          <draw:line draw:style-name="gr7" draw:text-style-name="P14" draw:layer="layout" svg:x1="2.73cm" svg:y1="9.133cm" svg:x2="3.315cm" svg:y2="9.231cm">
            <text:p/>
          </draw:line>
          <draw:line draw:style-name="gr60" draw:text-style-name="P14" draw:layer="layout" svg:x1="2.73cm" svg:y1="9.231cm" svg:x2="3.315cm" svg:y2="9.364cm">
            <text:p/>
          </draw:line>
          <draw:line draw:style-name="gr7" draw:text-style-name="P14" draw:layer="layout" svg:x1="2.73cm" svg:y1="9.231cm" svg:x2="3.315cm" svg:y2="9.364cm">
            <text:p/>
          </draw:line>
          <draw:line draw:style-name="gr60" draw:text-style-name="P14" draw:layer="layout" svg:x1="2.73cm" svg:y1="9.365cm" svg:x2="3.315cm" svg:y2="9.365cm">
            <text:p/>
          </draw:line>
          <draw:line draw:style-name="gr7" draw:text-style-name="P14" draw:layer="layout" svg:x1="2.73cm" svg:y1="9.365cm" svg:x2="3.315cm" svg:y2="9.365cm">
            <text:p/>
          </draw:line>
          <draw:line draw:style-name="gr60" draw:text-style-name="P14" draw:layer="layout" svg:x1="2.73cm" svg:y1="9.455cm" svg:x2="3.315cm" svg:y2="9.455cm">
            <text:p/>
          </draw:line>
          <draw:line draw:style-name="gr7" draw:text-style-name="P14" draw:layer="layout" svg:x1="2.73cm" svg:y1="9.455cm" svg:x2="3.315cm" svg:y2="9.455cm">
            <text:p/>
          </draw:line>
          <draw:line draw:style-name="gr60" draw:text-style-name="P14" draw:layer="layout" svg:x1="2.73cm" svg:y1="9.455cm" svg:x2="3.315cm" svg:y2="9.559cm">
            <text:p/>
          </draw:line>
          <draw:line draw:style-name="gr7" draw:text-style-name="P14" draw:layer="layout" svg:x1="2.73cm" svg:y1="9.455cm" svg:x2="3.315cm" svg:y2="9.559cm">
            <text:p/>
          </draw:line>
          <draw:custom-shape draw:style-name="gr75" draw:text-style-name="P35" draw:layer="layout" svg:width="1.045cm" svg:height="1.957cm" svg:x="8.022cm" svg:y="8.833cm">
            <text:p/>
            <draw:enhanced-geometry svg:viewBox="0 0 159 280" draw:type="non-primitive" draw:enhanced-path="M 0 13  L 158 0  L 158 248  L 0 279  L 0 13  N"/>
          </draw:custom-shape>
          <draw:line draw:style-name="gr7" draw:text-style-name="P14" draw:layer="layout" svg:x1="8.101cm" svg:y1="9.042cm" svg:x2="8.882cm" svg:y2="8.924cm">
            <text:p/>
          </draw:line>
          <draw:custom-shape draw:style-name="gr76" draw:text-style-name="P36" draw:layer="layout" svg:width="0.677cm" svg:height="0.315cm" svg:x="8.101cm" svg:y="9.043cm">
            <text:p/>
            <draw:enhanced-geometry svg:viewBox="0 0 103 45" draw:type="non-primitive" draw:enhanced-path="M 0 22  L 102 0  L 102 22  L 0 44  L 0 22  N"/>
          </draw:custom-shape>
          <draw:custom-shape draw:style-name="gr77" draw:text-style-name="P36" draw:layer="layout" svg:width="0.577cm" svg:height="0.315cm" svg:x="8.101cm" svg:y="9.231cm">
            <text:p/>
            <draw:enhanced-geometry svg:viewBox="0 0 88 45" draw:type="non-primitive" draw:enhanced-path="M 0 0  L 0 44  L 87 44  L 87 0  L 0 0  N"/>
          </draw:custom-shape>
          <draw:custom-shape draw:style-name="gr78" draw:text-style-name="P37" draw:layer="layout" svg:width="0.189cm" svg:height="0.315cm" svg:x="8.49cm" svg:y="9.455cm">
            <text:p/>
            <draw:enhanced-geometry svg:viewBox="0 0 29 45" draw:type="non-primitive" draw:enhanced-path="M 0 0  L 0 44  L 28 19  L 28 0  L 0 0  N"/>
          </draw:custom-shape>
          <draw:custom-shape draw:style-name="gr79" draw:text-style-name="P37" draw:layer="layout" svg:width="0.189cm" svg:height="6.292cm" svg:x="9.547cm" svg:y="6.771cm">
            <text:p/>
            <draw:enhanced-geometry svg:viewBox="0 0 29 900" draw:type="non-primitive" draw:enhanced-path="M 0 13  L 28 0  L 28 881  L 0 899  L 0 13  N"/>
          </draw:custom-shape>
          <draw:custom-shape draw:style-name="gr80" draw:text-style-name="P37" draw:layer="layout" svg:width="0.196cm" svg:height="0.307cm" svg:x="9.258cm" svg:y="7.093cm">
            <text:p/>
            <draw:enhanced-geometry svg:viewBox="0 0 30 44" draw:type="non-primitive" draw:enhanced-path="M 0 0  L 29 0  L 29 43  L 0 43  L 0 0  N"/>
          </draw:custom-shape>
          <draw:custom-shape draw:style-name="gr81" draw:text-style-name="P37" draw:layer="layout" svg:width="0.19cm" svg:height="6.389cm" svg:x="7.242cm" svg:y="7.093cm">
            <text:p/>
            <draw:enhanced-geometry svg:viewBox="0 0 29 914" draw:type="non-primitive" draw:enhanced-path="M 0 0  L 28 0  L 28 913  L 0 913  L 0 0  N"/>
          </draw:custom-shape>
        </draw:g>
        <draw:frame presentation:style-name="pr5" draw:text-style-name="P2" draw:layer="layout" svg:width="11.148cm" svg:height="11.589cm" svg:x="12.841cm" svg:y="5.238cm" presentation:class="outline" presentation:user-transformed="true">
          <draw:text-box>
            <text:list text:style-name="L4">
              <text:list-item>
                <text:p text:style-name="P39"><text:span text:style-name="T28">Thoroughly understood</text:span></text:p>
              </text:list-item>
              <text:list-item>
                <text:p text:style-name="P39"><text:span text:style-name="T28">Predictable reliability</text:span></text:p>
              </text:list-item>
              <text:list-item>
                <text:p text:style-name="P39"><text:span text:style-name="T28">Outstanding operational efficiency, productivity, and manageability</text:span></text:p>
              </text:list-item>
              <text:list-item>
                <text:p text:style-name="P39"><text:span text:style-name="T28">But …</text:span></text:p>
              </text:list-item>
              <text:list-item>
                <text:p text:style-name="P39"><text:span text:style-name="T28">Hasn’t seen a new ISV application in 7 years</text:span></text:p>
              </text:list-item>
              <text:list-item>
                <text:p text:style-name="P39"><text:span text:style-name="T28">Is being surrounded or supplanted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7">The mainframe has been and will be the workhorse for most large enterprises. <text:s/>Unfortunately, the mainframe has not been the platform-of-choice for NEW applications. <text:s/>This has led to a proliferation of platforms, Operating Systems, systems management and other infrastructure costs, personnel and knowledge burdens.</text:p>
                </text:list-header>
              </text:list>
            </draw:text-box>
          </draw:frame>
        </presentation:notes>
      </draw:page>
      <draw:page draw:name="New-Breed Enterprise Mainframe" draw:style-name="dp1" draw:master-page-name="Default" presentation:presentation-page-layout-name="AL3T19" xml:id="id9" draw:id="id9"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40">New-Breed Enterprise Mainframe</text:p>
              </text:list-header>
            </text:list>
          </draw:text-box>
        </draw:frame>
        <draw:line draw:style-name="gr82" draw:text-style-name="P14" draw:layer="layout" svg:x1="0.212cm" svg:y1="8.89cm" svg:x2="25.396cm" svg:y2="8.89cm">
          <text:p/>
        </draw:line>
        <draw:g draw:style-name="gr4">
          <draw:line draw:style-name="gr7" draw:text-style-name="P14" draw:layer="layout" svg:x1="13.264cm" svg:y1="10.954cm" svg:x2="16.228cm" svg:y2="9.684cm">
            <text:p/>
          </draw:line>
          <draw:g draw:style-name="gr4">
            <draw:line draw:style-name="gr7" draw:text-style-name="P14" draw:layer="layout" svg:x1="11.099cm" svg:y1="8.255cm" svg:x2="12.651cm" svg:y2="8.255cm">
              <text:p/>
            </draw:line>
            <draw:frame draw:style-name="gr9" draw:text-style-name="P15" draw:layer="layout" svg:width="0.331cm" svg:height="0.07cm" svg:x="12.709cm" svg:y="10.019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83" draw:text-style-name="P41" draw:layer="layout" svg:width="1.318cm" svg:height="0.415cm" svg:x="10.266cm" svg:y="8.4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4" draw:text-style-name="P42" draw:layer="layout" svg:width="0.979cm" svg:height="1.075cm" svg:x="10.363cm" svg:y="7.766cm">
                <text:p/>
                <draw:enhanced-geometry svg:viewBox="0 0 222 244" draw:type="non-primitive" draw:enhanced-path="M 0 0  L 221 0  L 221 197  L 220 201  L 218 206  L 214 211  L 210 215  L 204 219  L 198 223  L 191 226  L 183 230  L 174 232  L 163 235  L 153 237  L 142 239  L 130 241  L 118 242  L 106 242  L 92 243  L 86 243  L 79 242  L 73 242  L 66 242  L 60 241  L 54 240  L 48 240  L 41 239  L 36 238  L 31 236  L 25 235  L 19 234  L 15 232  L 9 231  L 5 229  L 0 227  L 0 0  N"/>
              </draw:custom-shape>
              <draw:custom-shape draw:style-name="gr85" draw:text-style-name="P43" draw:layer="layout" svg:width="0.141cm" svg:height="1.009cm" svg:x="10.213cm" svg:y="7.766cm">
                <text:p/>
                <draw:enhanced-geometry svg:viewBox="0 0 32 229" draw:type="non-primitive" draw:enhanced-path="M 30 0  L 31 228  L 23 225  L 17 221  L 12 218  L 7 214  L 5 210  L 1 206  L 0 202  L 0 197  L 0 0  L 30 0  N"/>
              </draw:custom-shape>
              <draw:custom-shape draw:style-name="gr86" draw:text-style-name="P44" draw:layer="layout" svg:width="1.129cm" svg:height="0.402cm" svg:x="10.213cm" svg:y="7.571cm">
                <text:p/>
                <draw:enhanced-geometry svg:viewBox="0 0 256 91" draw:type="non-primitive" draw:enhanced-path="M 127 0  L 140 0  L 153 1  L 165 2  L 176 3  L 188 5  L 198 8  L 207 10  L 217 13  L 225 17  L 232 20  L 239 24  L 245 28  L 249 32  L 252 36  L 254 41  L 255 45  L 254 50  L 252 54  L 249 59  L 245 63  L 239 67  L 232 71  L 225 74  L 217 77  L 207 80  L 198 83  L 188 85  L 176 87  L 165 88  L 153 89  L 140 90  L 127 90  L 114 90  L 102 89  L 89 88  L 78 87  L 66 85  L 55 83  L 46 80  L 37 77  L 29 74  L 21 71  L 15 67  L 9 63  L 5 59  L 2 54  L 0 50  L 0 45  L 0 41  L 2 36  L 5 32  L 9 28  L 15 24  L 21 20  L 29 17  L 37 13  L 46 10  L 55 8  L 66 5  L 78 3  L 89 2  L 102 1  L 114 0  L 127 0  N"/>
              </draw:custom-shape>
              <draw:frame draw:style-name="gr9" draw:text-style-name="P15" draw:layer="layout" svg:width="0.269cm" svg:height="0.07cm" svg:x="10.314cm" svg:y="9.402cm">
                <draw:image xlink:href="Pictures/10000000000000DB000000289DFEB865.png" xlink:type="simple" xlink:show="embed" xlink:actuate="onLoad" draw:mime-type="image/png">
                  <text:p/>
                </draw:image>
              </draw:frame>
            </draw:g>
            <draw:frame draw:style-name="gr9" draw:text-style-name="P15" draw:layer="layout" svg:width="2.125cm" svg:height="4.516cm" svg:x="11.968cm" svg:y="4.599cm">
              <draw:image xlink:href="Pictures/100058E8000062640000B8CC65540C2D.wmf" xlink:type="simple" xlink:show="embed" xlink:actuate="onLoad" draw:mime-type="image/x-wmf">
                <text:p/>
              </draw:image>
              <draw:image xlink:href="Pictures/1000000100000204000003C9AB1219BB.png" xlink:type="simple" xlink:show="embed" xlink:actuate="onLoad" draw:mime-type="image/png"/>
            </draw:frame>
          </draw:g>
          <draw:custom-shape draw:style-name="gr87" draw:text-style-name="P45" draw:layer="layout" svg:width="4.299cm" svg:height="0.85cm" svg:x="10.897cm" svg:y="9.11cm">
            <text:list text:style-name="L14">
              <text:list-header>
                <text:p text:style-name="P28"><text:span text:style-name="T29">Symmetry SE7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29" draw:layer="layout" svg:width="4.189cm" svg:height="1.443cm" svg:x="10.936cm" svg:y="12.285cm">
            <text:list text:style-name="L15">
              <text:list-header>
                <text:p text:style-name="P28"><text:span text:style-name="T30">Message &amp;</text:span></text:p>
                <text:p text:style-name="P28"><text:span text:style-name="T30">Enqueue 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style-name="gr4">
            <draw:line draw:style-name="gr7" draw:text-style-name="P14" draw:layer="layout" svg:x1="9.737cm" svg:y1="9.737cm" svg:x2="12.7cm" svg:y2="10.954cm">
              <text:p/>
            </draw:line>
            <draw:custom-shape draw:style-name="gr89" draw:text-style-name="P2" draw:layer="layout" svg:width="6.778cm" svg:height="1.91cm" svg:x="5.221cm" svg:y="12.435cm">
              <text:p/>
              <draw:enhanced-geometry svg:viewBox="0 0 1537 433" draw:type="non-primitive" draw:enhanced-path="M 0 0  L 0 432  L 1536 432  N"/>
            </draw:custom-shape>
            <draw:custom-shape draw:style-name="gr90" draw:text-style-name="P2" draw:layer="layout" svg:width="8.987cm" svg:height="3.021cm" svg:x="3.294cm" svg:y="11.562cm">
              <text:p/>
              <draw:enhanced-geometry svg:viewBox="0 0 2038 685" draw:type="non-primitive" draw:enhanced-path="M 0 0  L 0 684  L 2037 684  N"/>
            </draw:custom-shape>
            <draw:custom-shape draw:style-name="gr91" draw:text-style-name="P2" draw:layer="layout" svg:width="7.721cm" svg:height="3.021cm" svg:x="4.326cm" svg:y="11.443cm">
              <text:p/>
              <draw:enhanced-geometry svg:viewBox="0 0 1751 685" draw:type="non-primitive" draw:enhanced-path="M 0 0  L 0 684  L 1750 684  N"/>
            </draw:custom-shape>
            <draw:custom-shape draw:style-name="gr92" draw:text-style-name="P2" draw:layer="layout" svg:width="9.507cm" svg:height="3.55cm" svg:x="2.399cm" svg:y="11.165cm">
              <text:p/>
              <draw:enhanced-geometry svg:viewBox="0 0 2156 805" draw:type="non-primitive" draw:enhanced-path="M 0 0  L 0 804  L 2155 804  N"/>
            </draw:custom-shape>
            <draw:custom-shape draw:style-name="gr93" draw:text-style-name="P21" draw:layer="layout" svg:width="6.813cm" svg:height="0.934cm" svg:x="3.869cm" svg:y="14.777cm">
              <text:list text:style-name="L15">
                <text:list-header>
                  <text:p text:style-name="P20"><text:span text:style-name="T31">Compaq ProLiant 4000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4" draw:text-style-name="P2" draw:layer="layout" svg:width="0.816cm" svg:height="2.689cm" svg:x="10.548cm" svg:y="10.941cm">
              <text:p/>
              <draw:enhanced-geometry svg:viewBox="0 0 185 610" draw:type="non-primitive" draw:enhanced-path="M 0 0  L 0 609  L 184 609  N"/>
            </draw:custom-shape>
            <draw:custom-shape draw:style-name="gr95" draw:text-style-name="P2" draw:layer="layout" svg:width="4.238cm" svg:height="1.328cm" svg:x="7.148cm" svg:y="12.779cm">
              <text:p/>
              <draw:enhanced-geometry svg:viewBox="0 0 961 301" draw:type="non-primitive" draw:enhanced-path="M 0 0  L 0 300  L 960 300  N"/>
            </draw:custom-shape>
            <draw:custom-shape draw:style-name="gr96" draw:text-style-name="P2" draw:layer="layout" svg:width="2.169cm" svg:height="1.963cm" svg:x="8.983cm" svg:y="11.906cm">
              <text:p/>
              <draw:enhanced-geometry svg:viewBox="0 0 492 445" draw:type="non-primitive" draw:enhanced-path="M 0 0  L 0 444  L 491 444  N"/>
            </draw:custom-shape>
            <draw:custom-shape draw:style-name="gr97" draw:text-style-name="P2" draw:layer="layout" svg:width="3.153cm" svg:height="1.804cm" svg:x="8.092cm" svg:y="12.184cm">
              <text:p/>
              <draw:enhanced-geometry svg:viewBox="0 0 715 409" draw:type="non-primitive" draw:enhanced-path="M 0 0  L 0 408  L 714 408  N"/>
            </draw:custom-shape>
            <draw:custom-shape draw:style-name="gr98" draw:text-style-name="P2" draw:layer="layout" svg:width="1.46cm" svg:height="2.439cm" svg:x="9.785cm" svg:y="11.311cm">
              <text:p/>
              <draw:enhanced-geometry svg:viewBox="0 0 331 553" draw:type="non-primitive" draw:enhanced-path="M 0 0  L 0 552  L 330 552  N"/>
            </draw:custom-shape>
            <draw:custom-shape draw:style-name="gr99" draw:text-style-name="P2" draw:layer="layout" svg:width="7.651cm" svg:height="2.822cm" svg:x="2.641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4">
              <draw:custom-shape draw:style-name="gr100" draw:text-style-name="P46" draw:layer="layout" svg:width="0.551cm" svg:height="1.015cm" svg:x="2.143cm" svg:y="10.217cm">
                <text:p/>
                <draw:enhanced-geometry svg:viewBox="0 0 125 230" draw:type="non-primitive" draw:enhanced-path="M 2 0  L 121 0  L 122 0  L 124 2  L 124 3  L 124 226  L 124 227  L 122 228  L 121 229  L 2 229  L 0 228  L 0 227  L 0 226  L 0 3  L 0 2  L 0 0  L 2 0  N"/>
              </draw:custom-shape>
              <draw:custom-shape draw:style-name="gr101" draw:text-style-name="P47" draw:layer="layout" svg:width="0.551cm" svg:height="0.075cm" svg:x="2.143cm" svg:y="11.086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1.055cm">
                <text:p/>
                <draw:enhanced-geometry svg:viewBox="0 0 125 17" draw:type="non-primitive" draw:enhanced-path="M 0 0  L 124 0  L 124 16  L 0 16  L 0 0  N"/>
              </draw:custom-shape>
              <draw:custom-shape draw:style-name="gr102" draw:text-style-name="P33" draw:layer="layout" svg:width="0.551cm" svg:height="0.075cm" svg:x="2.143cm" svg:y="11.024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1.024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98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958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927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89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861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835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795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76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733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70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667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636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2.143cm" svg:y="10.605cm">
                <text:p/>
                <draw:enhanced-geometry svg:viewBox="0 0 125 17" draw:type="non-primitive" draw:enhanced-path="M 0 0  L 124 0  L 124 16  L 0 16  L 0 0  N"/>
              </draw:custom-shape>
              <draw:custom-shape draw:style-name="gr103" draw:text-style-name="P48" draw:layer="layout" svg:width="0.392cm" svg:height="0.075cm" svg:x="2.02cm" svg:y="11.187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2.439cm" svg:y="11.187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04" draw:text-style-name="P2" draw:layer="layout" svg:width="0.379cm" svg:height="0.358cm" svg:x="2.245cm" svg:y="10.874cm">
                <text:p/>
                <draw:enhanced-geometry svg:viewBox="0 0 86 81" draw:type="non-primitive" draw:enhanced-path="M 0 1  L 0 80  L 85 80  L 85 0  N"/>
              </draw:custom-shape>
              <draw:custom-shape draw:style-name="gr105" draw:text-style-name="P46" draw:layer="layout" svg:width="0.551cm" svg:height="0.754cm" svg:x="2.143cm" svg:y="9.384cm">
                <text:p/>
  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  </draw:custom-shape>
              <draw:custom-shape draw:style-name="gr106" draw:text-style-name="P46" draw:layer="layout" svg:width="0.441cm" svg:height="0.463cm" svg:x="2.2cm" svg:y="9.604cm">
                <text:p/>
  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2.214cm" svg:y="9.737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2.214cm" svg:y="9.873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2.205cm" svg:y="9.622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2.324cm" svg:y="9.626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5cm" svg:x="2.553cm" svg:y="9.626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5cm" svg:x="2.553cm" svg:y="9.626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3cm" svg:height="0.005cm" svg:x="2.231cm" svg:y="9.657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5cm" svg:x="2.214cm" svg:y="9.745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8cm" svg:x="2.324cm" svg:y="9.763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5cm" svg:x="2.509cm" svg:y="9.829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5cm" svg:x="2.509cm" svg:y="9.829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2.311cm" svg:y="9.776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9cm" svg:height="0.075cm" svg:x="2.214cm" svg:y="9.904cm">
                <text:p/>
                <draw:enhanced-geometry svg:viewBox="0 0 95 17" draw:type="non-primitive" draw:enhanced-path="M 0 16  L 94 16  L 94 0  L 0 0  L 0 16  N"/>
              </draw:custom-shape>
              <draw:custom-shape draw:style-name="gr114" draw:text-style-name="P35" draw:layer="layout" svg:width="0.419cm" svg:height="0.075cm" svg:x="2.214cm" svg:y="9.891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2.628cm" svg:y="9.904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8cm" svg:height="0.075cm" svg:x="2.205cm" svg:y="9.904cm">
                <text:p/>
                <draw:enhanced-geometry svg:viewBox="0 0 97 17" draw:type="non-primitive" draw:enhanced-path="M 0 16  L 0 0  L 96 0  L 96 16  L 0 16  L 0 16  L 0 0  L 0 0  L 0 16  N"/>
              </draw:custom-shape>
              <draw:custom-shape draw:style-name="gr114" draw:text-style-name="P35" draw:layer="layout" svg:width="0.075cm" svg:height="0.075cm" svg:x="2.187cm" svg:y="9.904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2.214cm" svg:y="9.922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2.315cm" svg:y="9.944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2cm" svg:height="0.084cm" svg:x="2.342cm" svg:y="9.948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2.214cm" svg:y="9.887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cm" svg:height="0.005cm" svg:x="2.2cm" svg:y="9.56cm">
                <text:p/>
                <draw:enhanced-geometry svg:viewBox="0 0 102 1" draw:type="non-primitive" draw:enhanced-path="M 1 0  L 99 0  L 100 0  L 101 0  L 101 0  L 99 0  L 1 0  L 0 0  L 0 0  L 0 0  L 1 0  N"/>
              </draw:custom-shape>
              <draw:custom-shape draw:style-name="gr117" draw:text-style-name="P56" draw:layer="layout" svg:width="0.075cm" svg:height="0.075cm" svg:x="2.231cm" svg:y="9.662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2.315cm" svg:y="9.662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24cm" svg:height="0.075cm" svg:x="2.5cm" svg:y="9.662cm">
                <text:p/>
                <draw:enhanced-geometry svg:viewBox="0 0 28 17" draw:type="non-primitive" draw:enhanced-path="M 0 16  L 26 16  L 27 10  L 26 0  L 0 0  L 0 10  L 0 16  N"/>
              </draw:custom-shape>
              <draw:custom-shape draw:style-name="gr109" draw:text-style-name="P51" draw:layer="layout" svg:width="0.154cm" svg:height="0.075cm" svg:x="2.324cm" svg:y="9.688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2.558cm" svg:y="9.604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2.527cm" svg:y="9.626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2.324cm" svg:y="9.688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2.324cm" svg:y="9.684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2.315cm" svg:y="9.679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2.262cm" svg:y="9.56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2.262cm" svg:y="9.56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2.267cm" svg:y1="9.574cm" svg:x2="2.275cm" svg:y2="9.574cm">
                <text:p/>
              </draw:line>
              <draw:custom-shape draw:style-name="gr119" draw:text-style-name="P57" draw:layer="layout" svg:width="0.005cm" svg:height="0.075cm" svg:x="2.553cm" svg:y="9.56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2.549cm" svg:y="9.56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2.531cm" svg:y="9.551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2.324cm" svg:y="9.829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2.324cm" svg:y="9.825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2.315cm" svg:y="9.82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2.236cm" svg:y="10.045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2.245cm" svg:y1="10.063cm" svg:x2="2.258cm" svg:y2="10.063cm">
                <text:p/>
              </draw:line>
              <draw:line draw:style-name="gr60" draw:text-style-name="P14" draw:layer="layout" svg:x1="2.245cm" svg:y1="10.063cm" svg:x2="2.258cm" svg:y2="10.063cm">
                <text:p/>
              </draw:line>
              <draw:line draw:style-name="gr60" draw:text-style-name="P14" draw:layer="layout" svg:x1="2.245cm" svg:y1="10.063cm" svg:x2="2.258cm" svg:y2="10.063cm">
                <text:p/>
              </draw:line>
              <draw:line draw:style-name="gr60" draw:text-style-name="P14" draw:layer="layout" svg:x1="2.245cm" svg:y1="10.063cm" svg:x2="2.258cm" svg:y2="10.063cm">
                <text:p/>
              </draw:line>
              <draw:line draw:style-name="gr60" draw:text-style-name="P14" draw:layer="layout" svg:x1="2.245cm" svg:y1="10.063cm" svg:x2="2.258cm" svg:y2="10.063cm">
                <text:p/>
              </draw:line>
              <draw:line draw:style-name="gr60" draw:text-style-name="P14" draw:layer="layout" svg:x1="2.245cm" svg:y1="10.063cm" svg:x2="2.258cm" svg:y2="10.063cm">
                <text:p/>
              </draw:line>
              <draw:line draw:style-name="gr60" draw:text-style-name="P14" draw:layer="layout" svg:x1="2.245cm" svg:y1="10.063cm" svg:x2="2.258cm" svg:y2="10.063cm">
                <text:p/>
              </draw:line>
              <draw:custom-shape draw:style-name="gr120" draw:text-style-name="P58" draw:layer="layout" svg:width="0.075cm" svg:height="0.075cm" svg:x="2.236cm" svg:y="10.041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custom-shape draw:style-name="gr120" draw:text-style-name="P58" draw:layer="layout" svg:width="0.075cm" svg:height="0.075cm" svg:x="2.236cm" svg:y="10.041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line draw:style-name="gr60" draw:text-style-name="P14" draw:layer="layout" svg:x1="2.245cm" svg:y1="10.059cm" svg:x2="2.258cm" svg:y2="10.059cm">
                <text:p/>
              </draw:line>
              <draw:custom-shape draw:style-name="gr120" draw:text-style-name="P58" draw:layer="layout" svg:width="0.075cm" svg:height="0.075cm" svg:x="2.236cm" svg:y="10.03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2.245cm" svg:y1="10.054cm" svg:x2="2.258cm" svg:y2="10.054cm">
                <text:p/>
              </draw:line>
              <draw:custom-shape draw:style-name="gr121" draw:text-style-name="P16" draw:layer="layout" svg:width="0.075cm" svg:height="0.075cm" svg:x="2.231cm" svg:y="10.041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79cm" svg:height="0.075cm" svg:x="2.236cm" svg:y="9.648cm">
                <text:p/>
                <draw:enhanced-geometry svg:viewBox="0 0 86 17" draw:type="non-primitive" draw:enhanced-path="M 0 16  L 0 0  L 85 0  L 85 16  L 0 16  N"/>
              </draw:custom-shape>
              <draw:custom-shape draw:style-name="gr117" draw:text-style-name="P56" draw:layer="layout" svg:width="0.075cm" svg:height="0.075cm" svg:x="2.311cm" svg:y="9.635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2.311cm" svg:y="9.679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2cm" svg:height="0.075cm" svg:x="2.342cm" svg:y="9.957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4cm" svg:height="0.075cm" svg:x="2.315cm" svg:y="10.05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2.381cm" svg:y="9.997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6cm" svg:height="0.075cm" svg:x="2.487cm" svg:y="10.006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2.324cm" svg:y1="9.798cm" svg:x2="2.324cm" svg:y2="9.856cm">
                <text:p/>
              </draw:line>
              <draw:line draw:style-name="gr60" draw:text-style-name="P14" draw:layer="layout" svg:x1="2.324cm" svg:y1="9.776cm" svg:x2="2.324cm" svg:y2="9.781cm">
                <text:p/>
              </draw:line>
              <draw:custom-shape draw:style-name="gr118" draw:text-style-name="P46" draw:layer="layout" svg:width="0.075cm" svg:height="0.075cm" svg:x="2.289cm" svg:y="9.776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2.386cm" svg:y="9.763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2.386cm" svg:y="9.78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2.491cm" svg:y="9.781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2.311cm" svg:y="9.803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2.324cm" svg:y="9.838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2.474cm" svg:y="9.803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2.491cm" svg:y="9.768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2.553cm" svg:y="9.776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5cm" svg:x="2.324cm" svg:y="9.763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2.293cm" svg:y="9.776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2.311cm" svg:y="9.763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2.315cm" svg:y1="9.781cm" svg:x2="2.408cm" svg:y2="9.781cm">
                <text:p/>
              </draw:line>
              <draw:line draw:style-name="gr60" draw:text-style-name="P14" draw:layer="layout" svg:x1="2.408cm" svg:y1="9.798cm" svg:x2="2.408cm" svg:y2="9.807cm">
                <text:p/>
              </draw:line>
              <draw:custom-shape draw:style-name="gr122" draw:text-style-name="P59" draw:layer="layout" svg:width="0.075cm" svg:height="0.075cm" svg:x="2.408cm" svg:y="9.78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2.469cm" svg:y="9.78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2.469cm" svg:y="9.768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2.408cm" svg:y="9.759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2.518cm" svg:y="9.812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2.324cm" svg:y="9.613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2.474cm" svg:y="9.626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2.474cm" svg:y="9.688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2.324cm" svg:y="9.693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2.214cm" svg:y="9.657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2.342cm" svg:y="10.028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2.646cm" svg:y1="9.957cm" svg:x2="2.646cm" svg:y2="10.019cm">
                <text:p/>
              </draw:line>
              <draw:custom-shape draw:style-name="gr122" draw:text-style-name="P59" draw:layer="layout" svg:width="0.282cm" svg:height="0.075cm" svg:x="2.342cm" svg:y="9.931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2.324cm" svg:y="9.957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2cm" svg:height="0.075cm" svg:x="2.342cm" svg:y="9.992cm">
                <text:p/>
                <draw:enhanced-geometry svg:viewBox="0 0 64 17" draw:type="non-primitive" draw:enhanced-path="M 0 0  L 0 16  L 63 16  L 63 0  L 0 0  N"/>
              </draw:custom-shape>
              <draw:custom-shape draw:style-name="gr123" draw:text-style-name="P60" draw:layer="layout" svg:width="0.551cm" svg:height="0.075cm" svg:x="2.143cm" svg:y="10.134cm">
                <text:p/>
                <draw:enhanced-geometry svg:viewBox="0 0 125 17" draw:type="non-primitive" draw:enhanced-path="M 0 0  L 0 16  L 124 16  L 124 0  L 0 0  N"/>
              </draw:custom-shape>
              <draw:custom-shape draw:style-name="gr124" draw:text-style-name="P33" draw:layer="layout" svg:width="0.38cm" svg:height="0.075cm" svg:x="2.231cm" svg:y="10.142cm">
                <text:p/>
                <draw:enhanced-geometry svg:viewBox="0 0 86 17" draw:type="non-primitive" draw:enhanced-path="M 1 16  L 83 16  L 84 16  L 84 14  L 85 3  L 84 1  L 83 1  L 1 0  L 0 1  L 0 3  L 0 12  L 0 14  L 1 16  N"/>
              </draw:custom-shape>
              <draw:custom-shape draw:style-name="gr108" draw:text-style-name="P50" draw:layer="layout" svg:width="0.075cm" svg:height="0.075cm" svg:x="2.408cm" svg:y="9.446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4cm" svg:height="0.075cm" svg:x="2.417cm" svg:y="9.463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cm" svg:height="0.075cm" svg:x="2.2cm" svg:y="9.428cm">
                <text:p/>
  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  </draw:custom-shape>
              <draw:custom-shape draw:style-name="gr126" draw:text-style-name="P2" draw:layer="layout" svg:width="0.468cm" svg:height="0.084cm" svg:x="2.2cm" svg:y="9.428cm">
                <text:p/>
  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  </draw:custom-shape>
              <draw:custom-shape draw:style-name="gr118" draw:text-style-name="P46" draw:layer="layout" svg:width="0.238cm" svg:height="0.075cm" svg:x="2.205cm" svg:y="9.432cm">
                <text:p/>
  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  </draw:custom-shape>
              <draw:custom-shape draw:style-name="gr127" draw:text-style-name="P2" draw:layer="layout" svg:width="0.251cm" svg:height="0.075cm" svg:x="2.205cm" svg:y="9.432cm">
                <text:p/>
  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2.408cm" svg:y="9.446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9cm" svg:height="0.075cm" svg:x="2.223cm" svg:y="9.454cm">
                <text:p/>
                <draw:enhanced-geometry svg:viewBox="0 0 43 17" draw:type="non-primitive" draw:enhanced-path="M 0 16  L 42 16  L 41 0  L 0 0  L 0 16  N"/>
              </draw:custom-shape>
              <draw:custom-shape draw:style-name="gr108" draw:text-style-name="P50" draw:layer="layout" svg:width="0.004cm" svg:height="0.075cm" svg:x="2.386cm" svg:y="9.446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2.381cm" svg:y="9.446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2.359cm" svg:y="9.446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2.342cm" svg:y="9.446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2.324cm" svg:y="9.446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5cm" svg:x="2.549cm" svg:y="9.432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2.558cm" svg:y="9.428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2.558cm" svg:y="9.432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2.562cm" svg:y="9.432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2.58cm" svg:y="9.441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4cm" svg:height="0.075cm" svg:x="2.589cm" svg:y="9.454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2.619cm" svg:y1="9.454cm" svg:x2="2.619cm" svg:y2="9.472cm">
                <text:p/>
              </draw:line>
              <draw:custom-shape draw:style-name="gr103" draw:text-style-name="P48" draw:layer="layout" svg:width="0.203cm" svg:height="0.075cm" svg:x="2.421cm" svg:y="9.41cm">
                <text:p/>
                <draw:enhanced-geometry svg:viewBox="0 0 46 17" draw:type="non-primitive" draw:enhanced-path="M 0 16  L 45 16  L 45 0  L 0 0  L 0 16  N"/>
              </draw:custom-shape>
              <draw:custom-shape draw:style-name="gr103" draw:text-style-name="P48" draw:layer="layout" svg:width="0.075cm" svg:height="0.005cm" svg:x="2.421cm" svg:y="9.485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2.633cm" svg:y="9.428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2.461cm" svg:y="9.428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5cm" svg:height="0.075cm" svg:x="2.5cm" svg:y="9.4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5cm" svg:height="0.075cm" svg:x="2.522cm" svg:y="9.428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2.522cm" svg:y="9.45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5cm" svg:height="0.075cm" svg:x="2.522cm" svg:y="9.472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5cm" svg:height="0.075cm" svg:x="2.5cm" svg:y="9.485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2.461cm" svg:y="9.485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2.443cm" svg:y="9.428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2.461cm" svg:y="9.4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2.491cm" svg:y="9.441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2.509cm" svg:y="9.441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2.522cm" svg:y="9.472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2.469cm" svg:y="9.432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2.452cm" svg:y="9.441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2.465cm" svg:y="9.441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69cm" svg:height="0.07cm" svg:x="2.2cm" svg:y="9.446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30" draw:text-style-name="P46" draw:layer="layout" svg:width="0.547cm" svg:height="1.014cm" svg:x="3.038cm" svg:y="10.888cm">
                <text:p/>
                <draw:enhanced-geometry svg:viewBox="0 0 124 230" draw:type="non-primitive" draw:enhanced-path="M 2 0  L 120 0  L 121 0  L 123 2  L 123 3  L 123 226  L 123 227  L 121 228  L 120 229  L 2 229  L 0 228  L 0 227  L 0 226  L 0 3  L 0 2  L 0 0  L 2 0  N"/>
              </draw:custom-shape>
              <draw:custom-shape draw:style-name="gr131" draw:text-style-name="P47" draw:layer="layout" svg:width="0.547cm" svg:height="0.075cm" svg:x="3.038cm" svg:y="11.75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725cm">
                <text:p/>
                <draw:enhanced-geometry svg:viewBox="0 0 124 17" draw:type="non-primitive" draw:enhanced-path="M 0 0  L 123 0  L 123 16  L 0 16  L 0 0  N"/>
              </draw:custom-shape>
              <draw:custom-shape draw:style-name="gr132" draw:text-style-name="P33" draw:layer="layout" svg:width="0.547cm" svg:height="0.075cm" svg:x="3.038cm" svg:y="11.69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69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65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62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59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56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531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50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46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43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40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37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33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4cm" svg:x="3.038cm" svg:y="11.30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3.038cm" svg:y="11.276cm">
                <text:p/>
                <draw:enhanced-geometry svg:viewBox="0 0 124 17" draw:type="non-primitive" draw:enhanced-path="M 0 0  L 123 0  L 123 16  L 0 16  L 0 0  N"/>
              </draw:custom-shape>
              <draw:custom-shape draw:style-name="gr103" draw:text-style-name="P48" draw:layer="layout" svg:width="0.393cm" svg:height="0.075cm" svg:x="2.91cm" svg:y="11.858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3.334cm" svg:y="11.858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75cm" svg:height="0.357cm" svg:x="3.14cm" svg:y="11.545cm">
                <text:p/>
                <draw:enhanced-geometry svg:viewBox="0 0 85 81" draw:type="non-primitive" draw:enhanced-path="M 0 1  L 0 80  L 84 80  L 84 0  N"/>
              </draw:custom-shape>
              <draw:custom-shape draw:style-name="gr134" draw:text-style-name="P46" draw:layer="layout" svg:width="0.547cm" svg:height="0.754cm" svg:x="3.038cm" svg:y="10.054cm">
                <text:p/>
  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  </draw:custom-shape>
              <draw:custom-shape draw:style-name="gr106" draw:text-style-name="P46" draw:layer="layout" svg:width="0.446cm" svg:height="0.463cm" svg:x="3.091cm" svg:y="10.275cm">
                <text:p/>
  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3.109cm" svg:y="10.407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3.109cm" svg:y="10.544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3.1cm" svg:y="10.292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3.219cm" svg:y="10.297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4cm" svg:x="3.444cm" svg:y="10.29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4cm" svg:x="3.444cm" svg:y="10.29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3cm" svg:height="0.004cm" svg:x="3.122cm" svg:y="10.328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4cm" svg:x="3.109cm" svg:y="10.416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8cm" svg:x="3.219cm" svg:y="10.433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4cm" svg:x="3.404cm" svg:y="10.5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4cm" svg:x="3.404cm" svg:y="10.5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3.201cm" svg:y="10.447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4cm" svg:height="0.074cm" svg:x="3.109cm" svg:y="10.575cm">
                <text:p/>
                <draw:enhanced-geometry svg:viewBox="0 0 94 17" draw:type="non-primitive" draw:enhanced-path="M 0 16  L 93 16  L 93 0  L 0 0  L 0 16  N"/>
              </draw:custom-shape>
              <draw:custom-shape draw:style-name="gr114" draw:text-style-name="P35" draw:layer="layout" svg:width="0.419cm" svg:height="0.075cm" svg:x="3.109cm" svg:y="10.561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4cm" svg:x="3.523cm" svg:y="10.575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3cm" svg:height="0.074cm" svg:x="3.1cm" svg:y="10.575cm">
                <text:p/>
                <draw:enhanced-geometry svg:viewBox="0 0 96 17" draw:type="non-primitive" draw:enhanced-path="M 0 16  L 0 0  L 95 0  L 95 16  L 0 16  L 0 16  L 0 0  L 0 0  L 0 16  N"/>
              </draw:custom-shape>
              <draw:custom-shape draw:style-name="gr114" draw:text-style-name="P35" draw:layer="layout" svg:width="0.075cm" svg:height="0.074cm" svg:x="3.082cm" svg:y="10.575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3.109cm" svg:y="10.592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3.21cm" svg:y="10.614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3cm" svg:height="0.083cm" svg:x="3.232cm" svg:y="10.619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3.109cm" svg:y="10.557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4cm" svg:height="0.004cm" svg:x="3.091cm" svg:y="10.231cm">
                <text:p/>
                <draw:enhanced-geometry svg:viewBox="0 0 103 1" draw:type="non-primitive" draw:enhanced-path="M 1 0  L 100 0  L 101 0  L 102 0  L 102 0  L 100 0  L 1 0  L 0 0  L 0 0  L 0 0  L 1 0  N"/>
              </draw:custom-shape>
              <draw:custom-shape draw:style-name="gr117" draw:text-style-name="P56" draw:layer="layout" svg:width="0.075cm" svg:height="0.075cm" svg:x="3.122cm" svg:y="10.332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3.21cm" svg:y="10.332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2cm" svg:height="0.075cm" svg:x="3.395cm" svg:y="10.332cm">
                <text:p/>
                <draw:enhanced-geometry svg:viewBox="0 0 27 17" draw:type="non-primitive" draw:enhanced-path="M 0 16  L 25 16  L 26 10  L 25 0  L 0 0  L 0 10  L 0 16  N"/>
              </draw:custom-shape>
              <draw:custom-shape draw:style-name="gr109" draw:text-style-name="P51" draw:layer="layout" svg:width="0.154cm" svg:height="0.075cm" svg:x="3.219cm" svg:y="10.358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3.453cm" svg:y="10.275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3.422cm" svg:y="10.297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3.219cm" svg:y="10.358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3.219cm" svg:y="10.354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3.21cm" svg:y="10.35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3.157cm" svg:y="10.231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3.157cm" svg:y="10.231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3.157cm" svg:y1="10.244cm" svg:x2="3.166cm" svg:y2="10.244cm">
                <text:p/>
              </draw:line>
              <draw:custom-shape draw:style-name="gr119" draw:text-style-name="P57" draw:layer="layout" svg:width="0.004cm" svg:height="0.075cm" svg:x="3.444cm" svg:y="10.231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3.44cm" svg:y="10.231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3.426cm" svg:y="10.222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3.219cm" svg:y="10.5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3.219cm" svg:y="10.495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3.21cm" svg:y="10.491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3.126cm" svg:y="10.716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3.14cm" svg:y1="10.733cm" svg:x2="3.153cm" svg:y2="10.733cm">
                <text:p/>
              </draw:line>
              <draw:line draw:style-name="gr60" draw:text-style-name="P14" draw:layer="layout" svg:x1="3.14cm" svg:y1="10.733cm" svg:x2="3.153cm" svg:y2="10.733cm">
                <text:p/>
              </draw:line>
              <draw:line draw:style-name="gr60" draw:text-style-name="P14" draw:layer="layout" svg:x1="3.14cm" svg:y1="10.733cm" svg:x2="3.153cm" svg:y2="10.733cm">
                <text:p/>
              </draw:line>
              <draw:line draw:style-name="gr60" draw:text-style-name="P14" draw:layer="layout" svg:x1="3.14cm" svg:y1="10.733cm" svg:x2="3.153cm" svg:y2="10.733cm">
                <text:p/>
              </draw:line>
              <draw:line draw:style-name="gr60" draw:text-style-name="P14" draw:layer="layout" svg:x1="3.14cm" svg:y1="10.733cm" svg:x2="3.153cm" svg:y2="10.733cm">
                <text:p/>
              </draw:line>
              <draw:line draw:style-name="gr60" draw:text-style-name="P14" draw:layer="layout" svg:x1="3.14cm" svg:y1="10.733cm" svg:x2="3.153cm" svg:y2="10.733cm">
                <text:p/>
              </draw:line>
              <draw:line draw:style-name="gr60" draw:text-style-name="P14" draw:layer="layout" svg:x1="3.14cm" svg:y1="10.733cm" svg:x2="3.153cm" svg:y2="10.733cm">
                <text:p/>
              </draw:line>
              <draw:custom-shape draw:style-name="gr120" draw:text-style-name="P58" draw:layer="layout" svg:width="0.075cm" svg:height="0.075cm" svg:x="3.126cm" svg:y="10.711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custom-shape draw:style-name="gr120" draw:text-style-name="P58" draw:layer="layout" svg:width="0.075cm" svg:height="0.075cm" svg:x="3.126cm" svg:y="10.711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line draw:style-name="gr60" draw:text-style-name="P14" draw:layer="layout" svg:x1="3.14cm" svg:y1="10.729cm" svg:x2="3.153cm" svg:y2="10.729cm">
                <text:p/>
              </draw:line>
              <draw:custom-shape draw:style-name="gr120" draw:text-style-name="P58" draw:layer="layout" svg:width="0.075cm" svg:height="0.075cm" svg:x="3.126cm" svg:y="10.70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3.14cm" svg:y1="10.724cm" svg:x2="3.153cm" svg:y2="10.724cm">
                <text:p/>
              </draw:line>
              <draw:custom-shape draw:style-name="gr121" draw:text-style-name="P16" draw:layer="layout" svg:width="0.075cm" svg:height="0.075cm" svg:x="3.122cm" svg:y="10.711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84cm" svg:height="0.075cm" svg:x="3.126cm" svg:y="10.319cm">
                <text:p/>
                <draw:enhanced-geometry svg:viewBox="0 0 87 17" draw:type="non-primitive" draw:enhanced-path="M 0 16  L 0 0  L 86 0  L 86 16  L 0 16  N"/>
              </draw:custom-shape>
              <draw:custom-shape draw:style-name="gr117" draw:text-style-name="P56" draw:layer="layout" svg:width="0.075cm" svg:height="0.074cm" svg:x="3.201cm" svg:y="10.306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3.201cm" svg:y="10.35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3cm" svg:height="0.075cm" svg:x="3.232cm" svg:y="10.627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5cm" svg:height="0.075cm" svg:x="3.21cm" svg:y="10.72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3.276cm" svg:y="10.667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5cm" svg:height="0.075cm" svg:x="3.378cm" svg:y="10.676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3.219cm" svg:y1="10.469cm" svg:x2="3.219cm" svg:y2="10.526cm">
                <text:p/>
              </draw:line>
              <draw:line draw:style-name="gr60" draw:text-style-name="P14" draw:layer="layout" svg:x1="3.219cm" svg:y1="10.447cm" svg:x2="3.219cm" svg:y2="10.451cm">
                <text:p/>
              </draw:line>
              <draw:custom-shape draw:style-name="gr118" draw:text-style-name="P46" draw:layer="layout" svg:width="0.075cm" svg:height="0.075cm" svg:x="3.184cm" svg:y="10.44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3.281cm" svg:y="10.433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3.281cm" svg:y="10.45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3.387cm" svg:y="10.451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3.201cm" svg:y="10.473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3.219cm" svg:y="10.508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3.369cm" svg:y="10.473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3.387cm" svg:y="10.438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3.444cm" svg:y="10.447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5cm" svg:x="3.219cm" svg:y="10.433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3.188cm" svg:y="10.44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3.201cm" svg:y="10.433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3.21cm" svg:y1="10.451cm" svg:x2="3.298cm" svg:y2="10.451cm">
                <text:p/>
              </draw:line>
              <draw:line draw:style-name="gr60" draw:text-style-name="P14" draw:layer="layout" svg:x1="3.298cm" svg:y1="10.469cm" svg:x2="3.298cm" svg:y2="10.478cm">
                <text:p/>
              </draw:line>
              <draw:custom-shape draw:style-name="gr122" draw:text-style-name="P59" draw:layer="layout" svg:width="0.075cm" svg:height="0.075cm" svg:x="3.298cm" svg:y="10.45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3.365cm" svg:y="10.45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3.365cm" svg:y="10.438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3.298cm" svg:y="10.429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3.409cm" svg:y="10.482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3.219cm" svg:y="10.283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3.369cm" svg:y="10.297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3.369cm" svg:y="10.358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3.219cm" svg:y="10.363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3.109cm" svg:y="10.328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3.232cm" svg:y="10.698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3.541cm" svg:y1="10.627cm" svg:x2="3.541cm" svg:y2="10.689cm">
                <text:p/>
              </draw:line>
              <draw:custom-shape draw:style-name="gr122" draw:text-style-name="P59" draw:layer="layout" svg:width="0.283cm" svg:height="0.075cm" svg:x="3.232cm" svg:y="10.601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3.219cm" svg:y="10.627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3cm" svg:height="0.075cm" svg:x="3.232cm" svg:y="10.663cm">
                <text:p/>
                <draw:enhanced-geometry svg:viewBox="0 0 64 17" draw:type="non-primitive" draw:enhanced-path="M 0 0  L 0 16  L 63 16  L 63 0  L 0 0  N"/>
              </draw:custom-shape>
              <draw:custom-shape draw:style-name="gr135" draw:text-style-name="P60" draw:layer="layout" svg:width="0.547cm" svg:height="0.075cm" svg:x="3.038cm" svg:y="10.804cm">
                <text:p/>
                <draw:enhanced-geometry svg:viewBox="0 0 124 17" draw:type="non-primitive" draw:enhanced-path="M 0 0  L 0 16  L 123 16  L 123 0  L 0 0  N"/>
              </draw:custom-shape>
              <draw:custom-shape draw:style-name="gr124" draw:text-style-name="P33" draw:layer="layout" svg:width="0.384cm" svg:height="0.075cm" svg:x="3.122cm" svg:y="10.813cm">
                <text:p/>
                <draw:enhanced-geometry svg:viewBox="0 0 87 17" draw:type="non-primitive" draw:enhanced-path="M 1 16  L 84 16  L 85 16  L 85 14  L 86 3  L 85 1  L 84 1  L 1 0  L 0 1  L 0 3  L 0 12  L 0 14  L 1 16  N"/>
              </draw:custom-shape>
              <draw:custom-shape draw:style-name="gr108" draw:text-style-name="P50" draw:layer="layout" svg:width="0.075cm" svg:height="0.075cm" svg:x="3.298cm" svg:y="10.116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3.307cm" svg:y="10.134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4cm" svg:height="0.075cm" svg:x="3.091cm" svg:y="10.098cm">
                <text:p/>
  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  </draw:custom-shape>
              <draw:custom-shape draw:style-name="gr126" draw:text-style-name="P2" draw:layer="layout" svg:width="0.472cm" svg:height="0.084cm" svg:x="3.091cm" svg:y="10.098cm">
                <text:p/>
  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  </draw:custom-shape>
              <draw:custom-shape draw:style-name="gr118" draw:text-style-name="P46" draw:layer="layout" svg:width="0.242cm" svg:height="0.075cm" svg:x="3.096cm" svg:y="10.103cm">
                <text:p/>
  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  </draw:custom-shape>
              <draw:custom-shape draw:style-name="gr127" draw:text-style-name="P2" draw:layer="layout" svg:width="0.255cm" svg:height="0.075cm" svg:x="3.096cm" svg:y="10.103cm">
                <text:p/>
  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3.298cm" svg:y="10.116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5cm" svg:height="0.075cm" svg:x="3.118cm" svg:y="10.125cm">
                <text:p/>
                <draw:enhanced-geometry svg:viewBox="0 0 42 17" draw:type="non-primitive" draw:enhanced-path="M 0 16  L 41 16  L 40 0  L 0 0  L 0 16  N"/>
              </draw:custom-shape>
              <draw:custom-shape draw:style-name="gr108" draw:text-style-name="P50" draw:layer="layout" svg:width="0.004cm" svg:height="0.075cm" svg:x="3.281cm" svg:y="10.116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3.272cm" svg:y="10.116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3.254cm" svg:y="10.116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3.232cm" svg:y="10.116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3.219cm" svg:y="10.116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5cm" svg:x="3.44cm" svg:y="10.103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3.453cm" svg:y="10.098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3.453cm" svg:y="10.10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3.457cm" svg:y="10.10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3.475cm" svg:y="10.111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3.479cm" svg:y="10.125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3.51cm" svg:y1="10.125cm" svg:x2="3.51cm" svg:y2="10.142cm">
                <text:p/>
              </draw:line>
              <draw:custom-shape draw:style-name="gr103" draw:text-style-name="P48" draw:layer="layout" svg:width="0.199cm" svg:height="0.075cm" svg:x="3.316cm" svg:y="10.081cm">
                <text:p/>
                <draw:enhanced-geometry svg:viewBox="0 0 45 17" draw:type="non-primitive" draw:enhanced-path="M 0 16  L 44 16  L 44 0  L 0 0  L 0 16  N"/>
              </draw:custom-shape>
              <draw:custom-shape draw:style-name="gr103" draw:text-style-name="P48" draw:layer="layout" svg:width="0.075cm" svg:height="0.004cm" svg:x="3.316cm" svg:y="10.156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3.528cm" svg:y="10.098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3.356cm" svg:y="10.098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5cm" svg:height="0.075cm" svg:x="3.395cm" svg:y="10.08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4cm" svg:height="0.075cm" svg:x="3.418cm" svg:y="10.098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3.418cm" svg:y="10.12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4cm" svg:height="0.075cm" svg:x="3.418cm" svg:y="10.142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5cm" svg:height="0.075cm" svg:x="3.395cm" svg:y="10.156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3.356cm" svg:y="10.156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3.334cm" svg:y="10.098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3.356cm" svg:y="10.08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3.387cm" svg:y="10.111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3.404cm" svg:y="10.111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3.413cm" svg:y="10.142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3.365cm" svg:y="10.103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3.343cm" svg:y="10.111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3.36cm" svg:y="10.111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74cm" svg:height="0.07cm" svg:x="3.091cm" svg:y="10.116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30" draw:text-style-name="P46" draw:layer="layout" svg:width="0.547cm" svg:height="1.014cm" svg:x="4.026cm" svg:y="11.258cm">
                <text:p/>
                <draw:enhanced-geometry svg:viewBox="0 0 124 230" draw:type="non-primitive" draw:enhanced-path="M 2 0  L 120 0  L 121 0  L 123 2  L 123 3  L 123 226  L 123 227  L 121 228  L 120 229  L 2 229  L 0 228  L 0 227  L 0 226  L 0 3  L 0 2  L 0 0  L 2 0  N"/>
              </draw:custom-shape>
              <draw:custom-shape draw:style-name="gr131" draw:text-style-name="P47" draw:layer="layout" svg:width="0.547cm" svg:height="0.075cm" svg:x="4.026cm" svg:y="12.12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2.096cm">
                <text:p/>
                <draw:enhanced-geometry svg:viewBox="0 0 124 17" draw:type="non-primitive" draw:enhanced-path="M 0 0  L 123 0  L 123 16  L 0 16  L 0 0  N"/>
              </draw:custom-shape>
              <draw:custom-shape draw:style-name="gr132" draw:text-style-name="P33" draw:layer="layout" svg:width="0.547cm" svg:height="0.075cm" svg:x="4.026cm" svg:y="12.06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2.06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2.0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99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96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93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90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87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83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80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77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74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70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67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4.026cm" svg:y="11.646cm">
                <text:p/>
                <draw:enhanced-geometry svg:viewBox="0 0 124 17" draw:type="non-primitive" draw:enhanced-path="M 0 0  L 123 0  L 123 16  L 0 16  L 0 0  N"/>
              </draw:custom-shape>
              <draw:custom-shape draw:style-name="gr103" draw:text-style-name="P48" draw:layer="layout" svg:width="0.393cm" svg:height="0.075cm" svg:x="3.898cm" svg:y="12.228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4.322cm" svg:y="12.228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74cm" svg:height="0.357cm" svg:x="4.128cm" svg:y="11.915cm">
                <text:p/>
                <draw:enhanced-geometry svg:viewBox="0 0 85 81" draw:type="non-primitive" draw:enhanced-path="M 0 1  L 0 80  L 84 80  L 84 0  N"/>
              </draw:custom-shape>
              <draw:custom-shape draw:style-name="gr134" draw:text-style-name="P46" draw:layer="layout" svg:width="0.547cm" svg:height="0.754cm" svg:x="4.026cm" svg:y="10.425cm">
                <text:p/>
  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  </draw:custom-shape>
              <draw:custom-shape draw:style-name="gr106" draw:text-style-name="P46" draw:layer="layout" svg:width="0.445cm" svg:height="0.463cm" svg:x="4.079cm" svg:y="10.645cm">
                <text:p/>
  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4.097cm" svg:y="10.777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4.097cm" svg:y="10.914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4.088cm" svg:y="10.663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4.207cm" svg:y="10.667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5cm" svg:x="4.432cm" svg:y="10.66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5cm" svg:x="4.432cm" svg:y="10.66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2cm" svg:height="0.004cm" svg:x="4.11cm" svg:y="10.698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5cm" svg:x="4.097cm" svg:y="10.786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79cm" svg:x="4.207cm" svg:y="10.804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4cm" svg:x="4.392cm" svg:y="10.87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4cm" svg:x="4.392cm" svg:y="10.87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4.189cm" svg:y="10.817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4cm" svg:height="0.075cm" svg:x="4.097cm" svg:y="10.945cm">
                <text:p/>
                <draw:enhanced-geometry svg:viewBox="0 0 94 17" draw:type="non-primitive" draw:enhanced-path="M 0 16  L 93 16  L 93 0  L 0 0  L 0 16  N"/>
              </draw:custom-shape>
              <draw:custom-shape draw:style-name="gr114" draw:text-style-name="P35" draw:layer="layout" svg:width="0.419cm" svg:height="0.075cm" svg:x="4.097cm" svg:y="10.932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4.511cm" svg:y="10.945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3cm" svg:height="0.075cm" svg:x="4.088cm" svg:y="10.945cm">
                <text:p/>
                <draw:enhanced-geometry svg:viewBox="0 0 96 17" draw:type="non-primitive" draw:enhanced-path="M 0 16  L 0 0  L 95 0  L 95 16  L 0 16  L 0 16  L 0 0  L 0 0  L 0 16  N"/>
              </draw:custom-shape>
              <draw:custom-shape draw:style-name="gr114" draw:text-style-name="P35" draw:layer="layout" svg:width="0.075cm" svg:height="0.075cm" svg:x="4.07cm" svg:y="10.945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4.097cm" svg:y="10.963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4.198cm" svg:y="10.985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2cm" svg:height="0.084cm" svg:x="4.22cm" svg:y="10.989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4.097cm" svg:y="10.927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4cm" svg:height="0.004cm" svg:x="4.079cm" svg:y="10.601cm">
                <text:p/>
                <draw:enhanced-geometry svg:viewBox="0 0 103 1" draw:type="non-primitive" draw:enhanced-path="M 1 0  L 100 0  L 101 0  L 102 0  L 102 0  L 100 0  L 1 0  L 0 0  L 0 0  L 0 0  L 1 0  N"/>
              </draw:custom-shape>
              <draw:custom-shape draw:style-name="gr117" draw:text-style-name="P56" draw:layer="layout" svg:width="0.075cm" svg:height="0.075cm" svg:x="4.11cm" svg:y="10.702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4.198cm" svg:y="10.702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19cm" svg:height="0.075cm" svg:x="4.383cm" svg:y="10.702cm">
                <text:p/>
                <draw:enhanced-geometry svg:viewBox="0 0 27 17" draw:type="non-primitive" draw:enhanced-path="M 0 16  L 25 16  L 26 10  L 25 0  L 0 0  L 0 10  L 0 16  N"/>
              </draw:custom-shape>
              <draw:custom-shape draw:style-name="gr109" draw:text-style-name="P51" draw:layer="layout" svg:width="0.154cm" svg:height="0.075cm" svg:x="4.207cm" svg:y="10.729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4.441cm" svg:y="10.645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4.41cm" svg:y="10.667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4.207cm" svg:y="10.729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4.207cm" svg:y="10.724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4.198cm" svg:y="10.72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4.145cm" svg:y="10.601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4.145cm" svg:y="10.601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4.145cm" svg:y1="10.614cm" svg:x2="4.154cm" svg:y2="10.614cm">
                <text:p/>
              </draw:line>
              <draw:custom-shape draw:style-name="gr119" draw:text-style-name="P57" draw:layer="layout" svg:width="0.004cm" svg:height="0.075cm" svg:x="4.432cm" svg:y="10.601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4.427cm" svg:y="10.601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4.414cm" svg:y="10.592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4.207cm" svg:y="10.87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4.207cm" svg:y="10.866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4.198cm" svg:y="10.861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4.114cm" svg:y="11.086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4.128cm" svg:y1="11.104cm" svg:x2="4.141cm" svg:y2="11.104cm">
                <text:p/>
              </draw:line>
              <draw:line draw:style-name="gr60" draw:text-style-name="P14" draw:layer="layout" svg:x1="4.128cm" svg:y1="11.104cm" svg:x2="4.141cm" svg:y2="11.104cm">
                <text:p/>
              </draw:line>
              <draw:line draw:style-name="gr60" draw:text-style-name="P14" draw:layer="layout" svg:x1="4.128cm" svg:y1="11.104cm" svg:x2="4.141cm" svg:y2="11.104cm">
                <text:p/>
              </draw:line>
              <draw:line draw:style-name="gr60" draw:text-style-name="P14" draw:layer="layout" svg:x1="4.128cm" svg:y1="11.104cm" svg:x2="4.141cm" svg:y2="11.104cm">
                <text:p/>
              </draw:line>
              <draw:line draw:style-name="gr60" draw:text-style-name="P14" draw:layer="layout" svg:x1="4.128cm" svg:y1="11.104cm" svg:x2="4.141cm" svg:y2="11.104cm">
                <text:p/>
              </draw:line>
              <draw:line draw:style-name="gr60" draw:text-style-name="P14" draw:layer="layout" svg:x1="4.128cm" svg:y1="11.104cm" svg:x2="4.141cm" svg:y2="11.104cm">
                <text:p/>
              </draw:line>
              <draw:line draw:style-name="gr60" draw:text-style-name="P14" draw:layer="layout" svg:x1="4.128cm" svg:y1="11.104cm" svg:x2="4.141cm" svg:y2="11.104cm">
                <text:p/>
              </draw:line>
              <draw:custom-shape draw:style-name="gr120" draw:text-style-name="P58" draw:layer="layout" svg:width="0.075cm" svg:height="0.075cm" svg:x="4.114cm" svg:y="11.08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custom-shape draw:style-name="gr120" draw:text-style-name="P58" draw:layer="layout" svg:width="0.075cm" svg:height="0.075cm" svg:x="4.114cm" svg:y="11.08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line draw:style-name="gr60" draw:text-style-name="P14" draw:layer="layout" svg:x1="4.128cm" svg:y1="11.099cm" svg:x2="4.141cm" svg:y2="11.099cm">
                <text:p/>
              </draw:line>
              <draw:custom-shape draw:style-name="gr120" draw:text-style-name="P58" draw:layer="layout" svg:width="0.075cm" svg:height="0.075cm" svg:x="4.114cm" svg:y="11.073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4.128cm" svg:y1="11.095cm" svg:x2="4.141cm" svg:y2="11.095cm">
                <text:p/>
              </draw:line>
              <draw:custom-shape draw:style-name="gr121" draw:text-style-name="P16" draw:layer="layout" svg:width="0.075cm" svg:height="0.075cm" svg:x="4.11cm" svg:y="11.082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84cm" svg:height="0.075cm" svg:x="4.114cm" svg:y="10.689cm">
                <text:p/>
                <draw:enhanced-geometry svg:viewBox="0 0 87 17" draw:type="non-primitive" draw:enhanced-path="M 0 16  L 0 0  L 86 0  L 86 16  L 0 16  N"/>
              </draw:custom-shape>
              <draw:custom-shape draw:style-name="gr117" draw:text-style-name="P56" draw:layer="layout" svg:width="0.075cm" svg:height="0.075cm" svg:x="4.189cm" svg:y="10.676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4.189cm" svg:y="10.72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2cm" svg:height="0.075cm" svg:x="4.22cm" svg:y="10.998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4cm" svg:height="0.075cm" svg:x="4.198cm" svg:y="11.09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4.264cm" svg:y="11.038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5cm" svg:height="0.075cm" svg:x="4.366cm" svg:y="11.046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4.207cm" svg:y1="10.839cm" svg:x2="4.207cm" svg:y2="10.896cm">
                <text:p/>
              </draw:line>
              <draw:line draw:style-name="gr60" draw:text-style-name="P14" draw:layer="layout" svg:x1="4.207cm" svg:y1="10.817cm" svg:x2="4.207cm" svg:y2="10.821cm">
                <text:p/>
              </draw:line>
              <draw:custom-shape draw:style-name="gr118" draw:text-style-name="P46" draw:layer="layout" svg:width="0.075cm" svg:height="0.075cm" svg:x="4.172cm" svg:y="10.81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4.269cm" svg:y="10.804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4.269cm" svg:y="10.82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4.374cm" svg:y="10.821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4cm" svg:x="4.189cm" svg:y="10.844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4.207cm" svg:y="10.879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4cm" svg:x="4.357cm" svg:y="10.844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4.374cm" svg:y="10.808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4.432cm" svg:y="10.817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4cm" svg:x="4.207cm" svg:y="10.804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4.176cm" svg:y="10.81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4.189cm" svg:y="10.804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4.198cm" svg:y1="10.821cm" svg:x2="4.286cm" svg:y2="10.821cm">
                <text:p/>
              </draw:line>
              <draw:line draw:style-name="gr60" draw:text-style-name="P14" draw:layer="layout" svg:x1="4.286cm" svg:y1="10.839cm" svg:x2="4.286cm" svg:y2="10.848cm">
                <text:p/>
              </draw:line>
              <draw:custom-shape draw:style-name="gr122" draw:text-style-name="P59" draw:layer="layout" svg:width="0.075cm" svg:height="0.075cm" svg:x="4.286cm" svg:y="10.82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4.352cm" svg:y="10.82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4.352cm" svg:y="10.808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4.286cm" svg:y="10.799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4.396cm" svg:y="10.852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4.207cm" svg:y="10.654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4.357cm" svg:y="10.667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4.357cm" svg:y="10.729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4.207cm" svg:y="10.733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4.097cm" svg:y="10.698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4.22cm" svg:y="11.068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4.529cm" svg:y1="10.998cm" svg:x2="4.529cm" svg:y2="11.06cm">
                <text:p/>
              </draw:line>
              <draw:custom-shape draw:style-name="gr122" draw:text-style-name="P59" draw:layer="layout" svg:width="0.282cm" svg:height="0.075cm" svg:x="4.22cm" svg:y="10.971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4.207cm" svg:y="10.998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2cm" svg:height="0.075cm" svg:x="4.22cm" svg:y="11.033cm">
                <text:p/>
                <draw:enhanced-geometry svg:viewBox="0 0 64 17" draw:type="non-primitive" draw:enhanced-path="M 0 0  L 0 16  L 63 16  L 63 0  L 0 0  N"/>
              </draw:custom-shape>
              <draw:custom-shape draw:style-name="gr135" draw:text-style-name="P60" draw:layer="layout" svg:width="0.547cm" svg:height="0.075cm" svg:x="4.026cm" svg:y="11.174cm">
                <text:p/>
                <draw:enhanced-geometry svg:viewBox="0 0 124 17" draw:type="non-primitive" draw:enhanced-path="M 0 0  L 0 16  L 123 16  L 123 0  L 0 0  N"/>
              </draw:custom-shape>
              <draw:custom-shape draw:style-name="gr124" draw:text-style-name="P33" draw:layer="layout" svg:width="0.384cm" svg:height="0.075cm" svg:x="4.11cm" svg:y="11.183cm">
                <text:p/>
                <draw:enhanced-geometry svg:viewBox="0 0 87 17" draw:type="non-primitive" draw:enhanced-path="M 1 16  L 84 16  L 85 16  L 85 14  L 86 3  L 85 1  L 84 1  L 1 0  L 0 1  L 0 3  L 0 12  L 0 14  L 1 16  N"/>
              </draw:custom-shape>
              <draw:custom-shape draw:style-name="gr108" draw:text-style-name="P50" draw:layer="layout" svg:width="0.075cm" svg:height="0.075cm" svg:x="4.286cm" svg:y="10.486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4.295cm" svg:y="10.504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4cm" svg:height="0.075cm" svg:x="4.079cm" svg:y="10.469cm">
                <text:p/>
  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  </draw:custom-shape>
              <draw:custom-shape draw:style-name="gr126" draw:text-style-name="P2" draw:layer="layout" svg:width="0.472cm" svg:height="0.083cm" svg:x="4.079cm" svg:y="10.469cm">
                <text:p/>
  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  </draw:custom-shape>
              <draw:custom-shape draw:style-name="gr118" draw:text-style-name="P46" draw:layer="layout" svg:width="0.243cm" svg:height="0.075cm" svg:x="4.083cm" svg:y="10.473cm">
                <text:p/>
  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  </draw:custom-shape>
              <draw:custom-shape draw:style-name="gr127" draw:text-style-name="P2" draw:layer="layout" svg:width="0.256cm" svg:height="0.075cm" svg:x="4.083cm" svg:y="10.473cm">
                <text:p/>
  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4.286cm" svg:y="10.486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6cm" svg:height="0.075cm" svg:x="4.105cm" svg:y="10.495cm">
                <text:p/>
                <draw:enhanced-geometry svg:viewBox="0 0 42 17" draw:type="non-primitive" draw:enhanced-path="M 0 16  L 41 16  L 40 0  L 0 0  L 0 16  N"/>
              </draw:custom-shape>
              <draw:custom-shape draw:style-name="gr108" draw:text-style-name="P50" draw:layer="layout" svg:width="0.004cm" svg:height="0.075cm" svg:x="4.269cm" svg:y="10.486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4.26cm" svg:y="10.486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4.242cm" svg:y="10.486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4.22cm" svg:y="10.486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4.207cm" svg:y="10.486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5cm" svg:height="0.075cm" svg:x="4.427cm" svg:y="10.473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4.441cm" svg:y="10.469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4.441cm" svg:y="10.47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4.445cm" svg:y="10.47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4.463cm" svg:y="10.482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4.467cm" svg:y="10.495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4.498cm" svg:y1="10.495cm" svg:x2="4.498cm" svg:y2="10.513cm">
                <text:p/>
              </draw:line>
              <draw:custom-shape draw:style-name="gr103" draw:text-style-name="P48" draw:layer="layout" svg:width="0.198cm" svg:height="0.075cm" svg:x="4.304cm" svg:y="10.451cm">
                <text:p/>
                <draw:enhanced-geometry svg:viewBox="0 0 45 17" draw:type="non-primitive" draw:enhanced-path="M 0 16  L 44 16  L 44 0  L 0 0  L 0 16  N"/>
              </draw:custom-shape>
              <draw:custom-shape draw:style-name="gr103" draw:text-style-name="P48" draw:layer="layout" svg:width="0.075cm" svg:height="0.004cm" svg:x="4.304cm" svg:y="10.526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4.516cm" svg:y="10.469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4.344cm" svg:y="10.469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5cm" svg:height="0.075cm" svg:x="4.383cm" svg:y="10.45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5cm" svg:height="0.075cm" svg:x="4.405cm" svg:y="10.469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4.405cm" svg:y="10.491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5cm" svg:height="0.075cm" svg:x="4.405cm" svg:y="10.513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5cm" svg:height="0.075cm" svg:x="4.383cm" svg:y="10.526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4.344cm" svg:y="10.526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4cm" svg:height="0.075cm" svg:x="4.322cm" svg:y="10.469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4.344cm" svg:y="10.45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4.374cm" svg:y="10.482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4.392cm" svg:y="10.482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4.401cm" svg:y="10.513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4.352cm" svg:y="10.473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4.33cm" svg:y="10.482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4.348cm" svg:y="10.482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73cm" svg:height="0.071cm" svg:x="4.079cm" svg:y="10.486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36" draw:text-style-name="P46" draw:layer="layout" svg:width="0.552cm" svg:height="1.015cm" svg:x="4.965cm" svg:y="11.628cm">
                <text:p/>
                <draw:enhanced-geometry svg:viewBox="0 0 125 230" draw:type="non-primitive" draw:enhanced-path="M 2 0  L 121 0  L 122 0  L 124 2  L 124 3  L 124 226  L 124 227  L 122 228  L 121 229  L 2 229  L 0 228  L 0 227  L 0 226  L 0 3  L 0 2  L 0 0  L 2 0  N"/>
              </draw:custom-shape>
              <draw:custom-shape draw:style-name="gr137" draw:text-style-name="P47" draw:layer="layout" svg:width="0.552cm" svg:height="0.075cm" svg:x="4.965cm" svg:y="12.497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466cm">
                <text:p/>
                <draw:enhanced-geometry svg:viewBox="0 0 125 17" draw:type="non-primitive" draw:enhanced-path="M 0 0  L 124 0  L 124 16  L 0 16  L 0 0  N"/>
              </draw:custom-shape>
              <draw:custom-shape draw:style-name="gr138" draw:text-style-name="P33" draw:layer="layout" svg:width="0.552cm" svg:height="0.075cm" svg:x="4.965cm" svg:y="12.435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435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4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369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338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303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272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246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206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18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144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4cm" svg:x="4.965cm" svg:y="12.114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078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047cm">
                <text:p/>
                <draw:enhanced-geometry svg:viewBox="0 0 125 17" draw:type="non-primitive" draw:enhanced-path="M 0 0  L 124 0  L 124 16  L 0 16  L 0 0  N"/>
              </draw:custom-shape>
              <draw:custom-shape draw:style-name="gr137" draw:text-style-name="P47" draw:layer="layout" svg:width="0.552cm" svg:height="0.075cm" svg:x="4.965cm" svg:y="12.016cm">
                <text:p/>
                <draw:enhanced-geometry svg:viewBox="0 0 125 17" draw:type="non-primitive" draw:enhanced-path="M 0 0  L 124 0  L 124 16  L 0 16  L 0 0  N"/>
              </draw:custom-shape>
              <draw:custom-shape draw:style-name="gr103" draw:text-style-name="P48" draw:layer="layout" svg:width="0.392cm" svg:height="0.075cm" svg:x="4.842cm" svg:y="12.599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5.261cm" svg:y="12.599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04" draw:text-style-name="P2" draw:layer="layout" svg:width="0.379cm" svg:height="0.358cm" svg:x="5.067cm" svg:y="12.285cm">
                <text:p/>
                <draw:enhanced-geometry svg:viewBox="0 0 86 81" draw:type="non-primitive" draw:enhanced-path="M 0 1  L 0 80  L 85 80  L 85 0  N"/>
              </draw:custom-shape>
              <draw:custom-shape draw:style-name="gr139" draw:text-style-name="P46" draw:layer="layout" svg:width="0.552cm" svg:height="0.754cm" svg:x="4.965cm" svg:y="10.795cm">
                <text:p/>
  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  </draw:custom-shape>
              <draw:custom-shape draw:style-name="gr140" draw:text-style-name="P46" draw:layer="layout" svg:width="0.441cm" svg:height="0.464cm" svg:x="5.023cm" svg:y="11.015cm">
                <text:p/>
  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5.036cm" svg:y="11.148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5.036cm" svg:y="11.284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5.027cm" svg:y="11.033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5.146cm" svg:y="11.038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4cm" svg:x="5.375cm" svg:y="11.038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4cm" svg:x="5.375cm" svg:y="11.038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2cm" svg:height="0.005cm" svg:x="5.054cm" svg:y="11.068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4cm" svg:x="5.036cm" svg:y="11.157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8cm" svg:x="5.146cm" svg:y="11.174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5cm" svg:x="5.331cm" svg:y="11.2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5cm" svg:x="5.331cm" svg:y="11.2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5.133cm" svg:y="11.187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9cm" svg:height="0.075cm" svg:x="5.036cm" svg:y="11.315cm">
                <text:p/>
                <draw:enhanced-geometry svg:viewBox="0 0 95 17" draw:type="non-primitive" draw:enhanced-path="M 0 16  L 94 16  L 94 0  L 0 0  L 0 16  N"/>
              </draw:custom-shape>
              <draw:custom-shape draw:style-name="gr114" draw:text-style-name="P35" draw:layer="layout" svg:width="0.419cm" svg:height="0.075cm" svg:x="5.036cm" svg:y="11.302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5.45cm" svg:y="11.315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8cm" svg:height="0.075cm" svg:x="5.027cm" svg:y="11.315cm">
                <text:p/>
                <draw:enhanced-geometry svg:viewBox="0 0 97 17" draw:type="non-primitive" draw:enhanced-path="M 0 16  L 0 0  L 96 0  L 96 16  L 0 16  L 0 16  L 0 0  L 0 0  L 0 16  N"/>
              </draw:custom-shape>
              <draw:custom-shape draw:style-name="gr114" draw:text-style-name="P35" draw:layer="layout" svg:width="0.075cm" svg:height="0.075cm" svg:x="5.009cm" svg:y="11.315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5.036cm" svg:y="11.333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5.137cm" svg:y="11.355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2cm" svg:height="0.084cm" svg:x="5.164cm" svg:y="11.359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5.036cm" svg:y="11.298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49cm" svg:height="0.005cm" svg:x="5.023cm" svg:y="10.971cm">
                <text:p/>
                <draw:enhanced-geometry svg:viewBox="0 0 102 1" draw:type="non-primitive" draw:enhanced-path="M 1 0  L 99 0  L 100 0  L 101 0  L 101 0  L 99 0  L 1 0  L 0 0  L 0 0  L 0 0  L 1 0  N"/>
              </draw:custom-shape>
              <draw:custom-shape draw:style-name="gr117" draw:text-style-name="P56" draw:layer="layout" svg:width="0.075cm" svg:height="0.075cm" svg:x="5.054cm" svg:y="11.073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5.137cm" svg:y="11.073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23cm" svg:height="0.075cm" svg:x="5.323cm" svg:y="11.073cm">
                <text:p/>
                <draw:enhanced-geometry svg:viewBox="0 0 28 17" draw:type="non-primitive" draw:enhanced-path="M 0 16  L 26 16  L 27 10  L 26 0  L 0 0  L 0 10  L 0 16  N"/>
              </draw:custom-shape>
              <draw:custom-shape draw:style-name="gr109" draw:text-style-name="P51" draw:layer="layout" svg:width="0.154cm" svg:height="0.075cm" svg:x="5.146cm" svg:y="11.099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5.38cm" svg:y="11.015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5.349cm" svg:y="11.038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5.146cm" svg:y="11.099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5.146cm" svg:y="11.095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5.137cm" svg:y="11.09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5.084cm" svg:y="10.971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5.084cm" svg:y="10.971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5.089cm" svg:y1="10.985cm" svg:x2="5.098cm" svg:y2="10.985cm">
                <text:p/>
              </draw:line>
              <draw:custom-shape draw:style-name="gr119" draw:text-style-name="P57" draw:layer="layout" svg:width="0.005cm" svg:height="0.075cm" svg:x="5.375cm" svg:y="10.971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5.371cm" svg:y="10.971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5.353cm" svg:y="10.963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5.146cm" svg:y="11.24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5.146cm" svg:y="11.236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5.137cm" svg:y="11.232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5.058cm" svg:y="11.456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5.067cm" svg:y1="11.474cm" svg:x2="5.08cm" svg:y2="11.474cm">
                <text:p/>
              </draw:line>
              <draw:line draw:style-name="gr60" draw:text-style-name="P14" draw:layer="layout" svg:x1="5.067cm" svg:y1="11.474cm" svg:x2="5.08cm" svg:y2="11.474cm">
                <text:p/>
              </draw:line>
              <draw:line draw:style-name="gr60" draw:text-style-name="P14" draw:layer="layout" svg:x1="5.067cm" svg:y1="11.474cm" svg:x2="5.08cm" svg:y2="11.474cm">
                <text:p/>
              </draw:line>
              <draw:line draw:style-name="gr60" draw:text-style-name="P14" draw:layer="layout" svg:x1="5.067cm" svg:y1="11.474cm" svg:x2="5.08cm" svg:y2="11.474cm">
                <text:p/>
              </draw:line>
              <draw:line draw:style-name="gr60" draw:text-style-name="P14" draw:layer="layout" svg:x1="5.067cm" svg:y1="11.474cm" svg:x2="5.08cm" svg:y2="11.474cm">
                <text:p/>
              </draw:line>
              <draw:line draw:style-name="gr60" draw:text-style-name="P14" draw:layer="layout" svg:x1="5.067cm" svg:y1="11.474cm" svg:x2="5.08cm" svg:y2="11.474cm">
                <text:p/>
              </draw:line>
              <draw:line draw:style-name="gr60" draw:text-style-name="P14" draw:layer="layout" svg:x1="5.067cm" svg:y1="11.474cm" svg:x2="5.08cm" svg:y2="11.474cm">
                <text:p/>
              </draw:line>
              <draw:custom-shape draw:style-name="gr120" draw:text-style-name="P58" draw:layer="layout" svg:width="0.075cm" svg:height="0.075cm" svg:x="5.058cm" svg:y="11.45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custom-shape draw:style-name="gr120" draw:text-style-name="P58" draw:layer="layout" svg:width="0.075cm" svg:height="0.075cm" svg:x="5.058cm" svg:y="11.45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line draw:style-name="gr60" draw:text-style-name="P14" draw:layer="layout" svg:x1="5.067cm" svg:y1="11.47cm" svg:x2="5.08cm" svg:y2="11.47cm">
                <text:p/>
              </draw:line>
              <draw:custom-shape draw:style-name="gr120" draw:text-style-name="P58" draw:layer="layout" svg:width="0.075cm" svg:height="0.075cm" svg:x="5.058cm" svg:y="11.443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5.067cm" svg:y1="11.465cm" svg:x2="5.08cm" svg:y2="11.465cm">
                <text:p/>
              </draw:line>
              <draw:custom-shape draw:style-name="gr121" draw:text-style-name="P16" draw:layer="layout" svg:width="0.075cm" svg:height="0.075cm" svg:x="5.054cm" svg:y="11.452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79cm" svg:height="0.075cm" svg:x="5.058cm" svg:y="11.06cm">
                <text:p/>
                <draw:enhanced-geometry svg:viewBox="0 0 86 17" draw:type="non-primitive" draw:enhanced-path="M 0 16  L 0 0  L 85 0  L 85 16  L 0 16  N"/>
              </draw:custom-shape>
              <draw:custom-shape draw:style-name="gr117" draw:text-style-name="P56" draw:layer="layout" svg:width="0.075cm" svg:height="0.075cm" svg:x="5.133cm" svg:y="11.046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5.133cm" svg:y="11.09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2cm" svg:height="0.075cm" svg:x="5.164cm" svg:y="11.368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5cm" svg:height="0.075cm" svg:x="5.137cm" svg:y="11.461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5.203cm" svg:y="11.408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6cm" svg:height="0.075cm" svg:x="5.309cm" svg:y="11.417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5.146cm" svg:y1="11.21cm" svg:x2="5.146cm" svg:y2="11.267cm">
                <text:p/>
              </draw:line>
              <draw:line draw:style-name="gr60" draw:text-style-name="P14" draw:layer="layout" svg:x1="5.146cm" svg:y1="11.187cm" svg:x2="5.146cm" svg:y2="11.192cm">
                <text:p/>
              </draw:line>
              <draw:custom-shape draw:style-name="gr118" draw:text-style-name="P46" draw:layer="layout" svg:width="0.075cm" svg:height="0.075cm" svg:x="5.111cm" svg:y="11.18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5.208cm" svg:y="11.174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5.208cm" svg:y="11.192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5.314cm" svg:y="11.192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5.133cm" svg:y="11.214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5.146cm" svg:y="11.249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5.296cm" svg:y="11.214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5.314cm" svg:y="11.179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5.375cm" svg:y="11.187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5cm" svg:x="5.146cm" svg:y="11.174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5.115cm" svg:y="11.18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5.133cm" svg:y="11.174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5.137cm" svg:y1="11.192cm" svg:x2="5.23cm" svg:y2="11.192cm">
                <text:p/>
              </draw:line>
              <draw:line draw:style-name="gr60" draw:text-style-name="P14" draw:layer="layout" svg:x1="5.23cm" svg:y1="11.21cm" svg:x2="5.23cm" svg:y2="11.218cm">
                <text:p/>
              </draw:line>
              <draw:custom-shape draw:style-name="gr122" draw:text-style-name="P59" draw:layer="layout" svg:width="0.075cm" svg:height="0.075cm" svg:x="5.23cm" svg:y="11.192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5.292cm" svg:y="11.192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5.292cm" svg:y="11.179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5.23cm" svg:y="11.17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5.34cm" svg:y="11.223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5.146cm" svg:y="11.024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5.296cm" svg:y="11.038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5.296cm" svg:y="11.099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5.146cm" svg:y="11.104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5.036cm" svg:y="11.068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5.164cm" svg:y="11.439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5.468cm" svg:y1="11.368cm" svg:x2="5.468cm" svg:y2="11.43cm">
                <text:p/>
              </draw:line>
              <draw:custom-shape draw:style-name="gr122" draw:text-style-name="P59" draw:layer="layout" svg:width="0.282cm" svg:height="0.075cm" svg:x="5.164cm" svg:y="11.342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5.146cm" svg:y="11.368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2cm" svg:height="0.075cm" svg:x="5.164cm" svg:y="11.404cm">
                <text:p/>
                <draw:enhanced-geometry svg:viewBox="0 0 64 17" draw:type="non-primitive" draw:enhanced-path="M 0 0  L 0 16  L 63 16  L 63 0  L 0 0  N"/>
              </draw:custom-shape>
              <draw:custom-shape draw:style-name="gr141" draw:text-style-name="P60" draw:layer="layout" svg:width="0.552cm" svg:height="0.075cm" svg:x="4.965cm" svg:y="11.545cm">
                <text:p/>
                <draw:enhanced-geometry svg:viewBox="0 0 125 17" draw:type="non-primitive" draw:enhanced-path="M 0 0  L 0 16  L 124 16  L 124 0  L 0 0  N"/>
              </draw:custom-shape>
              <draw:custom-shape draw:style-name="gr124" draw:text-style-name="P33" draw:layer="layout" svg:width="0.379cm" svg:height="0.075cm" svg:x="5.054cm" svg:y="11.553cm">
                <text:p/>
                <draw:enhanced-geometry svg:viewBox="0 0 86 17" draw:type="non-primitive" draw:enhanced-path="M 1 16  L 83 16  L 84 16  L 84 14  L 85 3  L 84 1  L 83 1  L 1 0  L 0 1  L 0 3  L 0 12  L 0 14  L 1 16  N"/>
              </draw:custom-shape>
              <draw:custom-shape draw:style-name="gr108" draw:text-style-name="P50" draw:layer="layout" svg:width="0.075cm" svg:height="0.075cm" svg:x="5.23cm" svg:y="10.857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5.239cm" svg:y="10.874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49cm" svg:height="0.075cm" svg:x="5.023cm" svg:y="10.839cm">
                <text:p/>
  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  </draw:custom-shape>
              <draw:custom-shape draw:style-name="gr126" draw:text-style-name="P2" draw:layer="layout" svg:width="0.467cm" svg:height="0.084cm" svg:x="5.023cm" svg:y="10.839cm">
                <text:p/>
  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  </draw:custom-shape>
              <draw:custom-shape draw:style-name="gr118" draw:text-style-name="P46" draw:layer="layout" svg:width="0.238cm" svg:height="0.074cm" svg:x="5.027cm" svg:y="10.844cm">
                <text:p/>
  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  </draw:custom-shape>
              <draw:custom-shape draw:style-name="gr127" draw:text-style-name="P2" draw:layer="layout" svg:width="0.251cm" svg:height="0.074cm" svg:x="5.027cm" svg:y="10.844cm">
                <text:p/>
  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5.23cm" svg:y="10.857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9cm" svg:height="0.075cm" svg:x="5.045cm" svg:y="10.866cm">
                <text:p/>
                <draw:enhanced-geometry svg:viewBox="0 0 43 17" draw:type="non-primitive" draw:enhanced-path="M 0 16  L 42 16  L 41 0  L 0 0  L 0 16  N"/>
              </draw:custom-shape>
              <draw:custom-shape draw:style-name="gr108" draw:text-style-name="P50" draw:layer="layout" svg:width="0.004cm" svg:height="0.075cm" svg:x="5.208cm" svg:y="10.857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5.203cm" svg:y="10.857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5.181cm" svg:y="10.857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5.164cm" svg:y="10.857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5.146cm" svg:y="10.857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4cm" svg:x="5.371cm" svg:y="10.844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5.38cm" svg:y="10.839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4cm" svg:x="5.38cm" svg:y="10.844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4cm" svg:x="5.384cm" svg:y="10.844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5.402cm" svg:y="10.852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5.411cm" svg:y="10.866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5.442cm" svg:y1="10.866cm" svg:x2="5.442cm" svg:y2="10.883cm">
                <text:p/>
              </draw:line>
              <draw:custom-shape draw:style-name="gr103" draw:text-style-name="P48" draw:layer="layout" svg:width="0.203cm" svg:height="0.075cm" svg:x="5.243cm" svg:y="10.821cm">
                <text:p/>
                <draw:enhanced-geometry svg:viewBox="0 0 46 17" draw:type="non-primitive" draw:enhanced-path="M 0 16  L 45 16  L 45 0  L 0 0  L 0 16  N"/>
              </draw:custom-shape>
              <draw:custom-shape draw:style-name="gr103" draw:text-style-name="P48" draw:layer="layout" svg:width="0.075cm" svg:height="0.005cm" svg:x="5.243cm" svg:y="10.896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5.455cm" svg:y="10.839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5.283cm" svg:y="10.839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4cm" svg:height="0.075cm" svg:x="5.323cm" svg:y="10.82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4cm" svg:height="0.075cm" svg:x="5.345cm" svg:y="10.839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5.345cm" svg:y="10.861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4cm" svg:height="0.075cm" svg:x="5.345cm" svg:y="10.883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4cm" svg:height="0.075cm" svg:x="5.323cm" svg:y="10.896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5.283cm" svg:y="10.896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5.265cm" svg:y="10.839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5.283cm" svg:y="10.82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5.314cm" svg:y="10.852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5.331cm" svg:y="10.852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5.345cm" svg:y="10.883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4cm" svg:x="5.292cm" svg:y="10.844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5.274cm" svg:y="10.852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5.287cm" svg:y="10.852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69cm" svg:height="0.07cm" svg:x="5.023cm" svg:y="10.857cm">
              <draw:image xlink:href="Pictures/10000000000000DB000000289DFEB865.png" xlink:type="simple" xlink:show="embed" xlink:actuate="onLoad" draw:mime-type="image/png">
                <text:p/>
              </draw:image>
            </draw:frame>
            <draw:frame draw:style-name="gr9" draw:text-style-name="P15" draw:layer="layout" svg:width="0.269cm" svg:height="0.071cm" svg:x="6.01cm" svg:y="11.28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30" draw:text-style-name="P46" draw:layer="layout" svg:width="0.547cm" svg:height="1.014cm" svg:x="6.897cm" svg:y="12.052cm">
                <text:p/>
                <draw:enhanced-geometry svg:viewBox="0 0 124 230" draw:type="non-primitive" draw:enhanced-path="M 2 0  L 120 0  L 121 0  L 123 2  L 123 3  L 123 226  L 123 227  L 121 228  L 120 229  L 2 229  L 0 228  L 0 227  L 0 226  L 0 3  L 0 2  L 0 0  L 2 0  N"/>
              </draw:custom-shape>
              <draw:custom-shape draw:style-name="gr131" draw:text-style-name="P47" draw:layer="layout" svg:width="0.547cm" svg:height="0.075cm" svg:x="6.897cm" svg:y="12.9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89cm">
                <text:p/>
                <draw:enhanced-geometry svg:viewBox="0 0 124 17" draw:type="non-primitive" draw:enhanced-path="M 0 0  L 123 0  L 123 16  L 0 16  L 0 0  N"/>
              </draw:custom-shape>
              <draw:custom-shape draw:style-name="gr132" draw:text-style-name="P33" draw:layer="layout" svg:width="0.547cm" svg:height="0.075cm" svg:x="6.897cm" svg:y="12.85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85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82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79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76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72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69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66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62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60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56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53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50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471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6.897cm" svg:y="12.44cm">
                <text:p/>
                <draw:enhanced-geometry svg:viewBox="0 0 124 17" draw:type="non-primitive" draw:enhanced-path="M 0 0  L 123 0  L 123 16  L 0 16  L 0 0  N"/>
              </draw:custom-shape>
              <draw:custom-shape draw:style-name="gr103" draw:text-style-name="P48" draw:layer="layout" svg:width="0.392cm" svg:height="0.075cm" svg:x="6.769cm" svg:y="13.022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7.188cm" svg:y="13.022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75cm" svg:height="0.357cm" svg:x="6.998cm" svg:y="12.709cm">
                <text:p/>
                <draw:enhanced-geometry svg:viewBox="0 0 85 81" draw:type="non-primitive" draw:enhanced-path="M 0 1  L 0 80  L 84 80  L 84 0  N"/>
              </draw:custom-shape>
              <draw:custom-shape draw:style-name="gr134" draw:text-style-name="P46" draw:layer="layout" svg:width="0.547cm" svg:height="0.754cm" svg:x="6.897cm" svg:y="11.218cm">
                <text:p/>
  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  </draw:custom-shape>
              <draw:custom-shape draw:style-name="gr106" draw:text-style-name="P46" draw:layer="layout" svg:width="0.445cm" svg:height="0.463cm" svg:x="6.95cm" svg:y="11.439cm">
                <text:p/>
  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  </draw:custom-shape>
              <draw:custom-shape draw:style-name="gr107" draw:text-style-name="P49" draw:layer="layout" svg:width="0.433cm" svg:height="0.075cm" svg:x="6.967cm" svg:y="11.571cm">
                <text:p/>
                <draw:enhanced-geometry svg:viewBox="0 0 98 17" draw:type="non-primitive" draw:enhanced-path="M 0 0  L 97 0  L 97 16  L 0 16  L 0 0  N"/>
              </draw:custom-shape>
              <draw:custom-shape draw:style-name="gr107" draw:text-style-name="P49" draw:layer="layout" svg:width="0.437cm" svg:height="0.075cm" svg:x="6.967cm" svg:y="11.708cm">
                <text:p/>
                <draw:enhanced-geometry svg:viewBox="0 0 99 17" draw:type="non-primitive" draw:enhanced-path="M 0 0  L 98 0  L 98 16  L 0 16  L 0 0  N"/>
              </draw:custom-shape>
              <draw:custom-shape draw:style-name="gr108" draw:text-style-name="P50" draw:layer="layout" svg:width="0.427cm" svg:height="0.106cm" svg:x="6.959cm" svg:y="11.456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5cm" svg:height="0.075cm" svg:x="7.073cm" svg:y="11.461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4cm" svg:height="0.004cm" svg:x="7.303cm" svg:y="11.461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4cm" svg:height="0.004cm" svg:x="7.303cm" svg:y="11.461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2cm" svg:height="0.004cm" svg:x="6.981cm" svg:y="11.492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5cm" svg:x="6.967cm" svg:y="11.58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5cm" svg:height="0.079cm" svg:x="7.073cm" svg:y="11.598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4cm" svg:x="7.258cm" svg:y="11.66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4cm" svg:x="7.258cm" svg:y="11.66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7.06cm" svg:y="11.611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5cm" svg:height="0.075cm" svg:x="6.967cm" svg:y="11.739cm">
                <text:p/>
                <draw:enhanced-geometry svg:viewBox="0 0 94 17" draw:type="non-primitive" draw:enhanced-path="M 0 16  L 93 16  L 93 0  L 0 0  L 0 16  N"/>
              </draw:custom-shape>
              <draw:custom-shape draw:style-name="gr114" draw:text-style-name="P35" draw:layer="layout" svg:width="0.419cm" svg:height="0.075cm" svg:x="6.967cm" svg:y="11.725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7.382cm" svg:y="11.739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3cm" svg:height="0.075cm" svg:x="6.959cm" svg:y="11.739cm">
                <text:p/>
                <draw:enhanced-geometry svg:viewBox="0 0 96 17" draw:type="non-primitive" draw:enhanced-path="M 0 16  L 0 0  L 95 0  L 95 16  L 0 16  L 0 16  L 0 0  L 0 0  L 0 16  N"/>
              </draw:custom-shape>
              <draw:custom-shape draw:style-name="gr114" draw:text-style-name="P35" draw:layer="layout" svg:width="0.075cm" svg:height="0.075cm" svg:x="6.936cm" svg:y="11.739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6.967cm" svg:y="11.756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4cm" svg:height="0.111cm" svg:x="7.069cm" svg:y="11.778cm">
                <text:p/>
                <draw:enhanced-geometry svg:viewBox="0 0 35 25" draw:type="non-primitive" draw:enhanced-path="M 1 0  L 32 0  L 32 0  L 33 1  L 33 1  L 34 2  L 34 3  L 34 22  L 33 23  L 33 23  L 33 24  L 32 24  L 32 24  L 1 24  L 1 24  L 0 23  L 0 23  L 0 22  L 0 3  L 0 2  L 0 1  L 0 1  L 1 0  L 1 0  N"/>
              </draw:custom-shape>
              <draw:custom-shape draw:style-name="gr115" draw:text-style-name="P54" draw:layer="layout" svg:width="0.282cm" svg:height="0.084cm" svg:x="7.091cm" svg:y="11.783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6.967cm" svg:y="11.721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cm" svg:height="0.004cm" svg:x="6.95cm" svg:y="11.395cm">
                <text:p/>
                <draw:enhanced-geometry svg:viewBox="0 0 102 1" draw:type="non-primitive" draw:enhanced-path="M 1 0  L 99 0  L 100 0  L 101 0  L 101 0  L 99 0  L 1 0  L 0 0  L 0 0  L 0 0  L 1 0  N"/>
              </draw:custom-shape>
              <draw:custom-shape draw:style-name="gr117" draw:text-style-name="P56" draw:layer="layout" svg:width="0.075cm" svg:height="0.075cm" svg:x="6.981cm" svg:y="11.496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59cm" svg:height="0.075cm" svg:x="7.069cm" svg:y="11.496cm">
                <text:p/>
                <draw:enhanced-geometry svg:viewBox="0 0 36 17" draw:type="non-primitive" draw:enhanced-path="M 0 16  L 35 16  L 0 0  L 0 16  N"/>
              </draw:custom-shape>
              <draw:custom-shape draw:style-name="gr117" draw:text-style-name="P56" draw:layer="layout" svg:width="0.123cm" svg:height="0.075cm" svg:x="7.25cm" svg:y="11.496cm">
                <text:p/>
                <draw:enhanced-geometry svg:viewBox="0 0 28 17" draw:type="non-primitive" draw:enhanced-path="M 0 16  L 26 16  L 27 10  L 26 0  L 0 0  L 0 10  L 0 16  N"/>
              </draw:custom-shape>
              <draw:custom-shape draw:style-name="gr109" draw:text-style-name="P51" draw:layer="layout" svg:width="0.155cm" svg:height="0.075cm" svg:x="7.073cm" svg:y="11.523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7.311cm" svg:y="11.439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7.28cm" svg:y="11.461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7.073cm" svg:y="11.523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7.073cm" svg:y="11.518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7.069cm" svg:y="11.514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7.011cm" svg:y="11.395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7.011cm" svg:y="11.395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7.016cm" svg:y1="11.408cm" svg:x2="7.025cm" svg:y2="11.408cm">
                <text:p/>
              </draw:line>
              <draw:custom-shape draw:style-name="gr119" draw:text-style-name="P57" draw:layer="layout" svg:width="0.004cm" svg:height="0.075cm" svg:x="7.303cm" svg:y="11.395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7.298cm" svg:y="11.395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7.285cm" svg:y="11.386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7.073cm" svg:y="11.664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7.073cm" svg:y="11.659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7.069cm" svg:y="11.655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6.985cm" svg:y="11.88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6.998cm" svg:y1="11.897cm" svg:x2="7.007cm" svg:y2="11.897cm">
                <text:p/>
              </draw:line>
              <draw:line draw:style-name="gr60" draw:text-style-name="P14" draw:layer="layout" svg:x1="6.998cm" svg:y1="11.897cm" svg:x2="7.007cm" svg:y2="11.897cm">
                <text:p/>
              </draw:line>
              <draw:line draw:style-name="gr60" draw:text-style-name="P14" draw:layer="layout" svg:x1="6.998cm" svg:y1="11.897cm" svg:x2="7.007cm" svg:y2="11.897cm">
                <text:p/>
              </draw:line>
              <draw:line draw:style-name="gr60" draw:text-style-name="P14" draw:layer="layout" svg:x1="6.998cm" svg:y1="11.897cm" svg:x2="7.007cm" svg:y2="11.897cm">
                <text:p/>
              </draw:line>
              <draw:line draw:style-name="gr60" draw:text-style-name="P14" draw:layer="layout" svg:x1="6.998cm" svg:y1="11.897cm" svg:x2="7.007cm" svg:y2="11.897cm">
                <text:p/>
              </draw:line>
              <draw:line draw:style-name="gr60" draw:text-style-name="P14" draw:layer="layout" svg:x1="6.998cm" svg:y1="11.897cm" svg:x2="7.007cm" svg:y2="11.897cm">
                <text:p/>
              </draw:line>
              <draw:line draw:style-name="gr60" draw:text-style-name="P14" draw:layer="layout" svg:x1="6.998cm" svg:y1="11.897cm" svg:x2="7.007cm" svg:y2="11.897cm">
                <text:p/>
              </draw:line>
              <draw:custom-shape draw:style-name="gr120" draw:text-style-name="P58" draw:layer="layout" svg:width="0.075cm" svg:height="0.075cm" svg:x="6.985cm" svg:y="11.875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custom-shape draw:style-name="gr120" draw:text-style-name="P58" draw:layer="layout" svg:width="0.075cm" svg:height="0.075cm" svg:x="6.985cm" svg:y="11.875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line draw:style-name="gr60" draw:text-style-name="P14" draw:layer="layout" svg:x1="6.998cm" svg:y1="11.893cm" svg:x2="7.007cm" svg:y2="11.893cm">
                <text:p/>
              </draw:line>
              <draw:custom-shape draw:style-name="gr120" draw:text-style-name="P58" draw:layer="layout" svg:width="0.075cm" svg:height="0.075cm" svg:x="6.985cm" svg:y="11.867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6.998cm" svg:y1="11.889cm" svg:x2="7.007cm" svg:y2="11.889cm">
                <text:p/>
              </draw:line>
              <draw:custom-shape draw:style-name="gr121" draw:text-style-name="P16" draw:layer="layout" svg:width="0.075cm" svg:height="0.075cm" svg:x="6.981cm" svg:y="11.875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79cm" svg:height="0.075cm" svg:x="6.985cm" svg:y="11.483cm">
                <text:p/>
                <draw:enhanced-geometry svg:viewBox="0 0 86 17" draw:type="non-primitive" draw:enhanced-path="M 0 16  L 0 0  L 85 0  L 85 16  L 0 16  N"/>
              </draw:custom-shape>
              <draw:custom-shape draw:style-name="gr117" draw:text-style-name="P56" draw:layer="layout" svg:width="0.075cm" svg:height="0.075cm" svg:x="7.06cm" svg:y="11.47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7.06cm" svg:y="11.514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2cm" svg:height="0.075cm" svg:x="7.091cm" svg:y="11.792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cm" svg:height="0.075cm" svg:x="7.069cm" svg:y="11.884cm">
                <text:p/>
                <draw:enhanced-geometry svg:viewBox="0 0 34 17" draw:type="non-primitive" draw:enhanced-path="M 0 16  L 32 16  L 33 5  L 0 0  L 0 5  L 0 16  N"/>
              </draw:custom-shape>
              <draw:custom-shape draw:style-name="gr117" draw:text-style-name="P56" draw:layer="layout" svg:width="0.088cm" svg:height="0.075cm" svg:x="7.135cm" svg:y="11.831cm">
                <text:p/>
                <draw:enhanced-geometry svg:viewBox="0 0 20 17" draw:type="non-primitive" draw:enhanced-path="M 0 16  L 0 0  L 19 0  L 19 16  L 0 16  N"/>
              </draw:custom-shape>
              <draw:custom-shape draw:style-name="gr117" draw:text-style-name="P56" draw:layer="layout" svg:width="0.146cm" svg:height="0.075cm" svg:x="7.236cm" svg:y="11.84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7.073cm" svg:y1="11.633cm" svg:x2="7.073cm" svg:y2="11.69cm">
                <text:p/>
              </draw:line>
              <draw:line draw:style-name="gr60" draw:text-style-name="P14" draw:layer="layout" svg:x1="7.073cm" svg:y1="11.611cm" svg:x2="7.073cm" svg:y2="11.615cm">
                <text:p/>
              </draw:line>
              <draw:custom-shape draw:style-name="gr118" draw:text-style-name="P46" draw:layer="layout" svg:width="0.075cm" svg:height="0.075cm" svg:x="7.038cm" svg:y="11.61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7.139cm" svg:y="11.598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7.139cm" svg:y="11.615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7.245cm" svg:y="11.615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7.06cm" svg:y="11.637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7.073cm" svg:y="11.673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7.223cm" svg:y="11.637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7.245cm" svg:y="11.602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4cm" svg:height="0.075cm" svg:x="7.303cm" svg:y="11.611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5cm" svg:height="0.004cm" svg:x="7.073cm" svg:y="11.598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7.042cm" svg:y="11.61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7.06cm" svg:y="11.598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7.069cm" svg:y1="11.615cm" svg:x2="7.157cm" svg:y2="11.615cm">
                <text:p/>
              </draw:line>
              <draw:line draw:style-name="gr60" draw:text-style-name="P14" draw:layer="layout" svg:x1="7.157cm" svg:y1="11.633cm" svg:x2="7.157cm" svg:y2="11.642cm">
                <text:p/>
              </draw:line>
              <draw:custom-shape draw:style-name="gr122" draw:text-style-name="P59" draw:layer="layout" svg:width="0.075cm" svg:height="0.075cm" svg:x="7.157cm" svg:y="11.615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7.219cm" svg:y="11.615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7.219cm" svg:y="11.602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7.157cm" svg:y="11.593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7.267cm" svg:y="11.646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7.073cm" svg:y="11.448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7.223cm" svg:y="11.461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7.223cm" svg:y="11.523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7.073cm" svg:y="11.527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6.967cm" svg:y="11.492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7.091cm" svg:y="11.862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7.395cm" svg:y1="11.792cm" svg:x2="7.395cm" svg:y2="11.853cm">
                <text:p/>
              </draw:line>
              <draw:custom-shape draw:style-name="gr122" draw:text-style-name="P59" draw:layer="layout" svg:width="0.282cm" svg:height="0.075cm" svg:x="7.091cm" svg:y="11.765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7.073cm" svg:y="11.792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2cm" svg:height="0.075cm" svg:x="7.091cm" svg:y="11.827cm">
                <text:p/>
                <draw:enhanced-geometry svg:viewBox="0 0 64 17" draw:type="non-primitive" draw:enhanced-path="M 0 0  L 0 16  L 63 16  L 63 0  L 0 0  N"/>
              </draw:custom-shape>
              <draw:custom-shape draw:style-name="gr135" draw:text-style-name="P60" draw:layer="layout" svg:width="0.547cm" svg:height="0.075cm" svg:x="6.897cm" svg:y="11.968cm">
                <text:p/>
                <draw:enhanced-geometry svg:viewBox="0 0 124 17" draw:type="non-primitive" draw:enhanced-path="M 0 0  L 0 16  L 123 16  L 123 0  L 0 0  N"/>
              </draw:custom-shape>
              <draw:custom-shape draw:style-name="gr124" draw:text-style-name="P33" draw:layer="layout" svg:width="0.379cm" svg:height="0.075cm" svg:x="6.981cm" svg:y="11.977cm">
                <text:p/>
                <draw:enhanced-geometry svg:viewBox="0 0 86 17" draw:type="non-primitive" draw:enhanced-path="M 1 16  L 83 16  L 84 16  L 84 14  L 85 3  L 84 1  L 83 1  L 1 0  L 0 1  L 0 3  L 0 12  L 0 14  L 1 16  N"/>
              </draw:custom-shape>
              <draw:custom-shape draw:style-name="gr108" draw:text-style-name="P50" draw:layer="layout" svg:width="0.075cm" svg:height="0.075cm" svg:x="7.157cm" svg:y="11.28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7.166cm" svg:y="11.298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cm" svg:height="0.075cm" svg:x="6.95cm" svg:y="11.262cm">
                <text:p/>
  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  </draw:custom-shape>
              <draw:custom-shape draw:style-name="gr126" draw:text-style-name="P2" draw:layer="layout" svg:width="0.472cm" svg:height="0.084cm" svg:x="6.95cm" svg:y="11.262cm">
                <text:p/>
  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  </draw:custom-shape>
              <draw:custom-shape draw:style-name="gr118" draw:text-style-name="P46" draw:layer="layout" svg:width="0.238cm" svg:height="0.075cm" svg:x="6.954cm" svg:y="11.267cm">
                <text:p/>
  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  </draw:custom-shape>
              <draw:custom-shape draw:style-name="gr127" draw:text-style-name="P2" draw:layer="layout" svg:width="0.256cm" svg:height="0.075cm" svg:x="6.954cm" svg:y="11.267cm">
                <text:p/>
  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7.157cm" svg:y="11.28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9cm" svg:height="0.075cm" svg:x="6.972cm" svg:y="11.289cm">
                <text:p/>
                <draw:enhanced-geometry svg:viewBox="0 0 43 17" draw:type="non-primitive" draw:enhanced-path="M 0 16  L 42 16  L 41 0  L 0 0  L 0 16  N"/>
              </draw:custom-shape>
              <draw:custom-shape draw:style-name="gr108" draw:text-style-name="P50" draw:layer="layout" svg:width="0.005cm" svg:height="0.075cm" svg:x="7.139cm" svg:y="11.28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4cm" svg:height="0.075cm" svg:x="7.131cm" svg:y="11.28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7.108cm" svg:y="11.28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7.091cm" svg:y="11.28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7.073cm" svg:y="11.28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5cm" svg:height="0.075cm" svg:x="7.298cm" svg:y="11.267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7.311cm" svg:y="11.262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7.311cm" svg:y="11.267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7.316cm" svg:y="11.267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7.329cm" svg:y="11.276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7.338cm" svg:y="11.289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7.369cm" svg:y1="11.289cm" svg:x2="7.369cm" svg:y2="11.307cm">
                <text:p/>
              </draw:line>
              <draw:custom-shape draw:style-name="gr103" draw:text-style-name="P48" draw:layer="layout" svg:width="0.198cm" svg:height="0.075cm" svg:x="7.175cm" svg:y="11.245cm">
                <text:p/>
                <draw:enhanced-geometry svg:viewBox="0 0 45 17" draw:type="non-primitive" draw:enhanced-path="M 0 16  L 44 16  L 44 0  L 0 0  L 0 16  N"/>
              </draw:custom-shape>
              <draw:custom-shape draw:style-name="gr103" draw:text-style-name="P48" draw:layer="layout" svg:width="0.075cm" svg:height="0.004cm" svg:x="7.175cm" svg:y="11.32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7.386cm" svg:y="11.262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7.214cm" svg:y="11.262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4cm" svg:height="0.075cm" svg:x="7.25cm" svg:y="11.245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4cm" svg:height="0.075cm" svg:x="7.276cm" svg:y="11.262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7.276cm" svg:y="11.284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4cm" svg:height="0.074cm" svg:x="7.276cm" svg:y="11.307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4cm" svg:height="0.075cm" svg:x="7.25cm" svg:y="11.32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7.214cm" svg:y="11.32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7.192cm" svg:y="11.262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7.214cm" svg:y="11.245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7.245cm" svg:y="11.276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7.258cm" svg:y="11.276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4cm" svg:x="7.272cm" svg:y="11.307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7.219cm" svg:y="11.267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7.201cm" svg:y="11.276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7.214cm" svg:y="11.276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69cm" svg:height="0.071cm" svg:x="6.95cm" svg:y="11.28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42" draw:text-style-name="P46" draw:layer="layout" svg:width="0.547cm" svg:height="1.015cm" svg:x="7.836cm" svg:y="11.628cm">
                <text:p/>
                <draw:enhanced-geometry svg:viewBox="0 0 124 230" draw:type="non-primitive" draw:enhanced-path="M 2 0  L 120 0  L 121 0  L 123 2  L 123 3  L 123 226  L 123 227  L 121 228  L 120 229  L 2 229  L 0 228  L 0 227  L 0 226  L 0 3  L 0 2  L 0 0  L 2 0  N"/>
              </draw:custom-shape>
              <draw:custom-shape draw:style-name="gr131" draw:text-style-name="P47" draw:layer="layout" svg:width="0.547cm" svg:height="0.075cm" svg:x="7.836cm" svg:y="12.49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466cm">
                <text:p/>
                <draw:enhanced-geometry svg:viewBox="0 0 124 17" draw:type="non-primitive" draw:enhanced-path="M 0 0  L 123 0  L 123 16  L 0 16  L 0 0  N"/>
              </draw:custom-shape>
              <draw:custom-shape draw:style-name="gr132" draw:text-style-name="P33" draw:layer="layout" svg:width="0.547cm" svg:height="0.075cm" svg:x="7.836cm" svg:y="12.43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43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36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33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30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27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24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20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1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14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4cm" svg:x="7.836cm" svg:y="12.11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07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04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7.836cm" svg:y="12.016cm">
                <text:p/>
                <draw:enhanced-geometry svg:viewBox="0 0 124 17" draw:type="non-primitive" draw:enhanced-path="M 0 0  L 123 0  L 123 16  L 0 16  L 0 0  N"/>
              </draw:custom-shape>
              <draw:custom-shape draw:style-name="gr103" draw:text-style-name="P48" draw:layer="layout" svg:width="0.393cm" svg:height="0.075cm" svg:x="7.708cm" svg:y="12.599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8.132cm" svg:y="12.599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04" draw:text-style-name="P2" draw:layer="layout" svg:width="0.374cm" svg:height="0.358cm" svg:x="7.938cm" svg:y="12.285cm">
                <text:p/>
                <draw:enhanced-geometry svg:viewBox="0 0 85 81" draw:type="non-primitive" draw:enhanced-path="M 0 1  L 0 80  L 84 80  L 84 0  N"/>
              </draw:custom-shape>
              <draw:custom-shape draw:style-name="gr134" draw:text-style-name="P46" draw:layer="layout" svg:width="0.547cm" svg:height="0.754cm" svg:x="7.836cm" svg:y="10.795cm">
                <text:p/>
  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  </draw:custom-shape>
              <draw:custom-shape draw:style-name="gr140" draw:text-style-name="P46" draw:layer="layout" svg:width="0.445cm" svg:height="0.464cm" svg:x="7.889cm" svg:y="11.015cm">
                <text:p/>
  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7.907cm" svg:y="11.148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7.907cm" svg:y="11.284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7.898cm" svg:y="11.033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8.017cm" svg:y="11.038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4cm" svg:x="8.242cm" svg:y="11.038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4cm" svg:x="8.242cm" svg:y="11.038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2cm" svg:height="0.005cm" svg:x="7.92cm" svg:y="11.068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4cm" svg:x="7.907cm" svg:y="11.157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8cm" svg:x="8.017cm" svg:y="11.174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5cm" svg:x="8.202cm" svg:y="11.2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5cm" svg:x="8.202cm" svg:y="11.2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7.999cm" svg:y="11.187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4cm" svg:height="0.075cm" svg:x="7.907cm" svg:y="11.315cm">
                <text:p/>
                <draw:enhanced-geometry svg:viewBox="0 0 94 17" draw:type="non-primitive" draw:enhanced-path="M 0 16  L 93 16  L 93 0  L 0 0  L 0 16  N"/>
              </draw:custom-shape>
              <draw:custom-shape draw:style-name="gr114" draw:text-style-name="P35" draw:layer="layout" svg:width="0.419cm" svg:height="0.075cm" svg:x="7.907cm" svg:y="11.302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8.321cm" svg:y="11.315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3cm" svg:height="0.075cm" svg:x="7.898cm" svg:y="11.315cm">
                <text:p/>
                <draw:enhanced-geometry svg:viewBox="0 0 96 17" draw:type="non-primitive" draw:enhanced-path="M 0 16  L 0 0  L 95 0  L 95 16  L 0 16  L 0 16  L 0 0  L 0 0  L 0 16  N"/>
              </draw:custom-shape>
              <draw:custom-shape draw:style-name="gr114" draw:text-style-name="P35" draw:layer="layout" svg:width="0.075cm" svg:height="0.075cm" svg:x="7.88cm" svg:y="11.315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7.907cm" svg:y="11.333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8.008cm" svg:y="11.355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2cm" svg:height="0.084cm" svg:x="8.03cm" svg:y="11.359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7.907cm" svg:y="11.298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4cm" svg:height="0.005cm" svg:x="7.889cm" svg:y="10.971cm">
                <text:p/>
                <draw:enhanced-geometry svg:viewBox="0 0 103 1" draw:type="non-primitive" draw:enhanced-path="M 1 0  L 100 0  L 101 0  L 102 0  L 102 0  L 100 0  L 1 0  L 0 0  L 0 0  L 0 0  L 1 0  N"/>
              </draw:custom-shape>
              <draw:custom-shape draw:style-name="gr117" draw:text-style-name="P56" draw:layer="layout" svg:width="0.075cm" svg:height="0.075cm" svg:x="7.92cm" svg:y="11.073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8.008cm" svg:y="11.073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19cm" svg:height="0.075cm" svg:x="8.193cm" svg:y="11.073cm">
                <text:p/>
                <draw:enhanced-geometry svg:viewBox="0 0 27 17" draw:type="non-primitive" draw:enhanced-path="M 0 16  L 25 16  L 26 10  L 25 0  L 0 0  L 0 10  L 0 16  N"/>
              </draw:custom-shape>
              <draw:custom-shape draw:style-name="gr109" draw:text-style-name="P51" draw:layer="layout" svg:width="0.154cm" svg:height="0.075cm" svg:x="8.017cm" svg:y="11.099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8.251cm" svg:y="11.015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8.22cm" svg:y="11.038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8.017cm" svg:y="11.099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8.017cm" svg:y="11.095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8.008cm" svg:y="11.09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7.955cm" svg:y="10.971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7.955cm" svg:y="10.971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7.955cm" svg:y1="10.985cm" svg:x2="7.964cm" svg:y2="10.985cm">
                <text:p/>
              </draw:line>
              <draw:custom-shape draw:style-name="gr119" draw:text-style-name="P57" draw:layer="layout" svg:width="0.004cm" svg:height="0.075cm" svg:x="8.242cm" svg:y="10.971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8.237cm" svg:y="10.971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8.224cm" svg:y="10.963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8.017cm" svg:y="11.24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8.017cm" svg:y="11.236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8.008cm" svg:y="11.232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7.924cm" svg:y="11.456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7.938cm" svg:y1="11.474cm" svg:x2="7.951cm" svg:y2="11.474cm">
                <text:p/>
              </draw:line>
              <draw:line draw:style-name="gr60" draw:text-style-name="P14" draw:layer="layout" svg:x1="7.938cm" svg:y1="11.474cm" svg:x2="7.951cm" svg:y2="11.474cm">
                <text:p/>
              </draw:line>
              <draw:line draw:style-name="gr60" draw:text-style-name="P14" draw:layer="layout" svg:x1="7.938cm" svg:y1="11.474cm" svg:x2="7.951cm" svg:y2="11.474cm">
                <text:p/>
              </draw:line>
              <draw:line draw:style-name="gr60" draw:text-style-name="P14" draw:layer="layout" svg:x1="7.938cm" svg:y1="11.474cm" svg:x2="7.951cm" svg:y2="11.474cm">
                <text:p/>
              </draw:line>
              <draw:line draw:style-name="gr60" draw:text-style-name="P14" draw:layer="layout" svg:x1="7.938cm" svg:y1="11.474cm" svg:x2="7.951cm" svg:y2="11.474cm">
                <text:p/>
              </draw:line>
              <draw:line draw:style-name="gr60" draw:text-style-name="P14" draw:layer="layout" svg:x1="7.938cm" svg:y1="11.474cm" svg:x2="7.951cm" svg:y2="11.474cm">
                <text:p/>
              </draw:line>
              <draw:line draw:style-name="gr60" draw:text-style-name="P14" draw:layer="layout" svg:x1="7.938cm" svg:y1="11.474cm" svg:x2="7.951cm" svg:y2="11.474cm">
                <text:p/>
              </draw:line>
              <draw:custom-shape draw:style-name="gr120" draw:text-style-name="P58" draw:layer="layout" svg:width="0.075cm" svg:height="0.075cm" svg:x="7.924cm" svg:y="11.45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custom-shape draw:style-name="gr120" draw:text-style-name="P58" draw:layer="layout" svg:width="0.075cm" svg:height="0.075cm" svg:x="7.924cm" svg:y="11.45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line draw:style-name="gr60" draw:text-style-name="P14" draw:layer="layout" svg:x1="7.938cm" svg:y1="11.47cm" svg:x2="7.951cm" svg:y2="11.47cm">
                <text:p/>
              </draw:line>
              <draw:custom-shape draw:style-name="gr120" draw:text-style-name="P58" draw:layer="layout" svg:width="0.075cm" svg:height="0.075cm" svg:x="7.924cm" svg:y="11.443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7.938cm" svg:y1="11.465cm" svg:x2="7.951cm" svg:y2="11.465cm">
                <text:p/>
              </draw:line>
              <draw:custom-shape draw:style-name="gr121" draw:text-style-name="P16" draw:layer="layout" svg:width="0.075cm" svg:height="0.075cm" svg:x="7.92cm" svg:y="11.452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84cm" svg:height="0.075cm" svg:x="7.924cm" svg:y="11.06cm">
                <text:p/>
                <draw:enhanced-geometry svg:viewBox="0 0 87 17" draw:type="non-primitive" draw:enhanced-path="M 0 16  L 0 0  L 86 0  L 86 16  L 0 16  N"/>
              </draw:custom-shape>
              <draw:custom-shape draw:style-name="gr117" draw:text-style-name="P56" draw:layer="layout" svg:width="0.075cm" svg:height="0.075cm" svg:x="7.999cm" svg:y="11.046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7.999cm" svg:y="11.09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2cm" svg:height="0.075cm" svg:x="8.03cm" svg:y="11.368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4cm" svg:height="0.075cm" svg:x="8.008cm" svg:y="11.461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8.074cm" svg:y="11.408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5cm" svg:height="0.075cm" svg:x="8.176cm" svg:y="11.417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8.017cm" svg:y1="11.21cm" svg:x2="8.017cm" svg:y2="11.267cm">
                <text:p/>
              </draw:line>
              <draw:line draw:style-name="gr60" draw:text-style-name="P14" draw:layer="layout" svg:x1="8.017cm" svg:y1="11.187cm" svg:x2="8.017cm" svg:y2="11.192cm">
                <text:p/>
              </draw:line>
              <draw:custom-shape draw:style-name="gr118" draw:text-style-name="P46" draw:layer="layout" svg:width="0.075cm" svg:height="0.075cm" svg:x="7.982cm" svg:y="11.18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8.079cm" svg:y="11.174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8.079cm" svg:y="11.192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8.184cm" svg:y="11.192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7.999cm" svg:y="11.214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8.017cm" svg:y="11.249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8.167cm" svg:y="11.214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8.184cm" svg:y="11.179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8.242cm" svg:y="11.187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5cm" svg:x="8.017cm" svg:y="11.174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7.986cm" svg:y="11.18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7.999cm" svg:y="11.174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8.008cm" svg:y1="11.192cm" svg:x2="8.096cm" svg:y2="11.192cm">
                <text:p/>
              </draw:line>
              <draw:line draw:style-name="gr60" draw:text-style-name="P14" draw:layer="layout" svg:x1="8.096cm" svg:y1="11.21cm" svg:x2="8.096cm" svg:y2="11.218cm">
                <text:p/>
              </draw:line>
              <draw:custom-shape draw:style-name="gr122" draw:text-style-name="P59" draw:layer="layout" svg:width="0.075cm" svg:height="0.075cm" svg:x="8.096cm" svg:y="11.192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8.162cm" svg:y="11.192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8.162cm" svg:y="11.179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8.096cm" svg:y="11.17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8.206cm" svg:y="11.223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8.017cm" svg:y="11.024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8.167cm" svg:y="11.038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8.167cm" svg:y="11.099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8.017cm" svg:y="11.104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7.907cm" svg:y="11.068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8.03cm" svg:y="11.439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8.339cm" svg:y1="11.368cm" svg:x2="8.339cm" svg:y2="11.43cm">
                <text:p/>
              </draw:line>
              <draw:custom-shape draw:style-name="gr122" draw:text-style-name="P59" draw:layer="layout" svg:width="0.282cm" svg:height="0.075cm" svg:x="8.03cm" svg:y="11.342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8.017cm" svg:y="11.368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2cm" svg:height="0.075cm" svg:x="8.03cm" svg:y="11.404cm">
                <text:p/>
                <draw:enhanced-geometry svg:viewBox="0 0 64 17" draw:type="non-primitive" draw:enhanced-path="M 0 0  L 0 16  L 63 16  L 63 0  L 0 0  N"/>
              </draw:custom-shape>
              <draw:custom-shape draw:style-name="gr135" draw:text-style-name="P60" draw:layer="layout" svg:width="0.547cm" svg:height="0.075cm" svg:x="7.836cm" svg:y="11.545cm">
                <text:p/>
                <draw:enhanced-geometry svg:viewBox="0 0 124 17" draw:type="non-primitive" draw:enhanced-path="M 0 0  L 0 16  L 123 16  L 123 0  L 0 0  N"/>
              </draw:custom-shape>
              <draw:custom-shape draw:style-name="gr124" draw:text-style-name="P33" draw:layer="layout" svg:width="0.384cm" svg:height="0.075cm" svg:x="7.92cm" svg:y="11.553cm">
                <text:p/>
                <draw:enhanced-geometry svg:viewBox="0 0 87 17" draw:type="non-primitive" draw:enhanced-path="M 1 16  L 84 16  L 85 16  L 85 14  L 86 3  L 85 1  L 84 1  L 1 0  L 0 1  L 0 3  L 0 12  L 0 14  L 1 16  N"/>
              </draw:custom-shape>
              <draw:custom-shape draw:style-name="gr108" draw:text-style-name="P50" draw:layer="layout" svg:width="0.075cm" svg:height="0.075cm" svg:x="8.096cm" svg:y="10.857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8.105cm" svg:y="10.874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4cm" svg:height="0.075cm" svg:x="7.889cm" svg:y="10.839cm">
                <text:p/>
  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  </draw:custom-shape>
              <draw:custom-shape draw:style-name="gr126" draw:text-style-name="P2" draw:layer="layout" svg:width="0.472cm" svg:height="0.084cm" svg:x="7.889cm" svg:y="10.839cm">
                <text:p/>
  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  </draw:custom-shape>
              <draw:custom-shape draw:style-name="gr118" draw:text-style-name="P46" draw:layer="layout" svg:width="0.243cm" svg:height="0.074cm" svg:x="7.893cm" svg:y="10.844cm">
                <text:p/>
  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  </draw:custom-shape>
              <draw:custom-shape draw:style-name="gr127" draw:text-style-name="P2" draw:layer="layout" svg:width="0.256cm" svg:height="0.074cm" svg:x="7.893cm" svg:y="10.844cm">
                <text:p/>
  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8.096cm" svg:y="10.857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6cm" svg:height="0.075cm" svg:x="7.915cm" svg:y="10.866cm">
                <text:p/>
                <draw:enhanced-geometry svg:viewBox="0 0 42 17" draw:type="non-primitive" draw:enhanced-path="M 0 16  L 41 16  L 40 0  L 0 0  L 0 16  N"/>
              </draw:custom-shape>
              <draw:custom-shape draw:style-name="gr108" draw:text-style-name="P50" draw:layer="layout" svg:width="0.004cm" svg:height="0.075cm" svg:x="8.079cm" svg:y="10.857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8.07cm" svg:y="10.857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8.052cm" svg:y="10.857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8.03cm" svg:y="10.857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8.017cm" svg:y="10.857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5cm" svg:height="0.074cm" svg:x="8.237cm" svg:y="10.844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8.251cm" svg:y="10.839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4cm" svg:x="8.251cm" svg:y="10.844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4cm" svg:x="8.255cm" svg:y="10.844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8.273cm" svg:y="10.852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8.277cm" svg:y="10.866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8.308cm" svg:y1="10.866cm" svg:x2="8.308cm" svg:y2="10.883cm">
                <text:p/>
              </draw:line>
              <draw:custom-shape draw:style-name="gr103" draw:text-style-name="P48" draw:layer="layout" svg:width="0.198cm" svg:height="0.075cm" svg:x="8.114cm" svg:y="10.821cm">
                <text:p/>
                <draw:enhanced-geometry svg:viewBox="0 0 45 17" draw:type="non-primitive" draw:enhanced-path="M 0 16  L 44 16  L 44 0  L 0 0  L 0 16  N"/>
              </draw:custom-shape>
              <draw:custom-shape draw:style-name="gr103" draw:text-style-name="P48" draw:layer="layout" svg:width="0.075cm" svg:height="0.005cm" svg:x="8.114cm" svg:y="10.896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8.326cm" svg:y="10.839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8.154cm" svg:y="10.839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5cm" svg:height="0.075cm" svg:x="8.193cm" svg:y="10.82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5cm" svg:height="0.075cm" svg:x="8.215cm" svg:y="10.839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8.215cm" svg:y="10.861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5cm" svg:height="0.075cm" svg:x="8.215cm" svg:y="10.883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5cm" svg:height="0.075cm" svg:x="8.193cm" svg:y="10.896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8.154cm" svg:y="10.896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4cm" svg:height="0.075cm" svg:x="8.132cm" svg:y="10.839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8.154cm" svg:y="10.82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8.184cm" svg:y="10.852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8.202cm" svg:y="10.852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8.211cm" svg:y="10.883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4cm" svg:x="8.162cm" svg:y="10.844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8.14cm" svg:y="10.852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8.158cm" svg:y="10.852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73cm" svg:height="0.07cm" svg:x="7.889cm" svg:y="10.857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30" draw:text-style-name="P46" draw:layer="layout" svg:width="0.547cm" svg:height="1.014cm" svg:x="8.731cm" svg:y="11.258cm">
                <text:p/>
                <draw:enhanced-geometry svg:viewBox="0 0 124 230" draw:type="non-primitive" draw:enhanced-path="M 2 0  L 120 0  L 121 0  L 123 2  L 123 3  L 123 226  L 123 227  L 121 228  L 120 229  L 2 229  L 0 228  L 0 227  L 0 226  L 0 3  L 0 2  L 0 0  L 2 0  N"/>
              </draw:custom-shape>
              <draw:custom-shape draw:style-name="gr131" draw:text-style-name="P47" draw:layer="layout" svg:width="0.547cm" svg:height="0.075cm" svg:x="8.731cm" svg:y="12.12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2.096cm">
                <text:p/>
                <draw:enhanced-geometry svg:viewBox="0 0 124 17" draw:type="non-primitive" draw:enhanced-path="M 0 0  L 123 0  L 123 16  L 0 16  L 0 0  N"/>
              </draw:custom-shape>
              <draw:custom-shape draw:style-name="gr132" draw:text-style-name="P33" draw:layer="layout" svg:width="0.547cm" svg:height="0.075cm" svg:x="8.731cm" svg:y="12.06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2.06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2.0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99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96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93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90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87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83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80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77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74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70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67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8.731cm" svg:y="11.646cm">
                <text:p/>
                <draw:enhanced-geometry svg:viewBox="0 0 124 17" draw:type="non-primitive" draw:enhanced-path="M 0 0  L 123 0  L 123 16  L 0 16  L 0 0  N"/>
              </draw:custom-shape>
              <draw:custom-shape draw:style-name="gr103" draw:text-style-name="P48" draw:layer="layout" svg:width="0.393cm" svg:height="0.075cm" svg:x="8.603cm" svg:y="12.228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9.022cm" svg:y="12.228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75cm" svg:height="0.357cm" svg:x="8.833cm" svg:y="11.915cm">
                <text:p/>
                <draw:enhanced-geometry svg:viewBox="0 0 85 81" draw:type="non-primitive" draw:enhanced-path="M 0 1  L 0 80  L 84 80  L 84 0  N"/>
              </draw:custom-shape>
              <draw:custom-shape draw:style-name="gr134" draw:text-style-name="P46" draw:layer="layout" svg:width="0.547cm" svg:height="0.754cm" svg:x="8.731cm" svg:y="10.425cm">
                <text:p/>
  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  </draw:custom-shape>
              <draw:custom-shape draw:style-name="gr106" draw:text-style-name="P46" draw:layer="layout" svg:width="0.446cm" svg:height="0.463cm" svg:x="8.784cm" svg:y="10.645cm">
                <text:p/>
  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  </draw:custom-shape>
              <draw:custom-shape draw:style-name="gr107" draw:text-style-name="P49" draw:layer="layout" svg:width="0.432cm" svg:height="0.075cm" svg:x="8.802cm" svg:y="10.777cm">
                <text:p/>
                <draw:enhanced-geometry svg:viewBox="0 0 98 17" draw:type="non-primitive" draw:enhanced-path="M 0 0  L 97 0  L 97 16  L 0 16  L 0 0  N"/>
              </draw:custom-shape>
              <draw:custom-shape draw:style-name="gr107" draw:text-style-name="P49" draw:layer="layout" svg:width="0.436cm" svg:height="0.075cm" svg:x="8.802cm" svg:y="10.914cm">
                <text:p/>
                <draw:enhanced-geometry svg:viewBox="0 0 99 17" draw:type="non-primitive" draw:enhanced-path="M 0 0  L 98 0  L 98 16  L 0 16  L 0 0  N"/>
              </draw:custom-shape>
              <draw:custom-shape draw:style-name="gr108" draw:text-style-name="P50" draw:layer="layout" svg:width="0.428cm" svg:height="0.106cm" svg:x="8.793cm" svg:y="10.663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8.908cm" svg:y="10.667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5cm" svg:x="9.137cm" svg:y="10.66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5cm" svg:x="9.137cm" svg:y="10.66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3cm" svg:height="0.004cm" svg:x="8.815cm" svg:y="10.698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5cm" svg:x="8.802cm" svg:y="10.786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79cm" svg:x="8.908cm" svg:y="10.804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4cm" svg:x="9.093cm" svg:y="10.87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4cm" svg:x="9.093cm" svg:y="10.87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8.894cm" svg:y="10.817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4cm" svg:height="0.075cm" svg:x="8.802cm" svg:y="10.945cm">
                <text:p/>
                <draw:enhanced-geometry svg:viewBox="0 0 94 17" draw:type="non-primitive" draw:enhanced-path="M 0 16  L 93 16  L 93 0  L 0 0  L 0 16  N"/>
              </draw:custom-shape>
              <draw:custom-shape draw:style-name="gr114" draw:text-style-name="P35" draw:layer="layout" svg:width="0.419cm" svg:height="0.075cm" svg:x="8.802cm" svg:y="10.932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9.216cm" svg:y="10.945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3cm" svg:height="0.075cm" svg:x="8.793cm" svg:y="10.945cm">
                <text:p/>
                <draw:enhanced-geometry svg:viewBox="0 0 96 17" draw:type="non-primitive" draw:enhanced-path="M 0 16  L 0 0  L 95 0  L 95 16  L 0 16  L 0 16  L 0 0  L 0 0  L 0 16  N"/>
              </draw:custom-shape>
              <draw:custom-shape draw:style-name="gr114" draw:text-style-name="P35" draw:layer="layout" svg:width="0.075cm" svg:height="0.075cm" svg:x="8.771cm" svg:y="10.945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8.802cm" svg:y="10.963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5cm" svg:height="0.11cm" svg:x="8.903cm" svg:y="10.985cm">
                <text:p/>
                <draw:enhanced-geometry svg:viewBox="0 0 35 25" draw:type="non-primitive" draw:enhanced-path="M 1 0  L 32 0  L 32 0  L 33 1  L 33 1  L 34 2  L 34 3  L 34 22  L 33 23  L 33 23  L 33 24  L 32 24  L 32 24  L 1 24  L 1 24  L 0 23  L 0 23  L 0 22  L 0 3  L 0 2  L 0 1  L 0 1  L 1 0  L 1 0  N"/>
              </draw:custom-shape>
              <draw:custom-shape draw:style-name="gr115" draw:text-style-name="P54" draw:layer="layout" svg:width="0.283cm" svg:height="0.084cm" svg:x="8.925cm" svg:y="10.989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8.802cm" svg:y="10.927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cm" svg:height="0.004cm" svg:x="8.784cm" svg:y="10.601cm">
                <text:p/>
                <draw:enhanced-geometry svg:viewBox="0 0 102 1" draw:type="non-primitive" draw:enhanced-path="M 1 0  L 99 0  L 100 0  L 101 0  L 101 0  L 99 0  L 1 0  L 0 0  L 0 0  L 0 0  L 1 0  N"/>
              </draw:custom-shape>
              <draw:custom-shape draw:style-name="gr117" draw:text-style-name="P56" draw:layer="layout" svg:width="0.075cm" svg:height="0.075cm" svg:x="8.815cm" svg:y="10.702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59cm" svg:height="0.075cm" svg:x="8.903cm" svg:y="10.702cm">
                <text:p/>
                <draw:enhanced-geometry svg:viewBox="0 0 36 17" draw:type="non-primitive" draw:enhanced-path="M 0 16  L 35 16  L 0 0  L 0 16  N"/>
              </draw:custom-shape>
              <draw:custom-shape draw:style-name="gr117" draw:text-style-name="P56" draw:layer="layout" svg:width="0.124cm" svg:height="0.075cm" svg:x="9.084cm" svg:y="10.702cm">
                <text:p/>
                <draw:enhanced-geometry svg:viewBox="0 0 28 17" draw:type="non-primitive" draw:enhanced-path="M 0 16  L 26 16  L 27 10  L 26 0  L 0 0  L 0 10  L 0 16  N"/>
              </draw:custom-shape>
              <draw:custom-shape draw:style-name="gr109" draw:text-style-name="P51" draw:layer="layout" svg:width="0.154cm" svg:height="0.075cm" svg:x="8.908cm" svg:y="10.729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9.146cm" svg:y="10.645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9.115cm" svg:y="10.667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8.908cm" svg:y="10.729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8.908cm" svg:y="10.724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8.903cm" svg:y="10.72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8.846cm" svg:y="10.601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4cm" svg:height="0.075cm" svg:x="8.846cm" svg:y="10.601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8.85cm" svg:y1="10.614cm" svg:x2="8.859cm" svg:y2="10.614cm">
                <text:p/>
              </draw:line>
              <draw:custom-shape draw:style-name="gr119" draw:text-style-name="P57" draw:layer="layout" svg:width="0.004cm" svg:height="0.075cm" svg:x="9.137cm" svg:y="10.601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9.133cm" svg:y="10.601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9.119cm" svg:y="10.592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8.908cm" svg:y="10.87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8.908cm" svg:y="10.866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8.903cm" svg:y="10.861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8.819cm" svg:y="11.086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8.833cm" svg:y1="11.104cm" svg:x2="8.841cm" svg:y2="11.104cm">
                <text:p/>
              </draw:line>
              <draw:line draw:style-name="gr60" draw:text-style-name="P14" draw:layer="layout" svg:x1="8.833cm" svg:y1="11.104cm" svg:x2="8.841cm" svg:y2="11.104cm">
                <text:p/>
              </draw:line>
              <draw:line draw:style-name="gr60" draw:text-style-name="P14" draw:layer="layout" svg:x1="8.833cm" svg:y1="11.104cm" svg:x2="8.841cm" svg:y2="11.104cm">
                <text:p/>
              </draw:line>
              <draw:line draw:style-name="gr60" draw:text-style-name="P14" draw:layer="layout" svg:x1="8.833cm" svg:y1="11.104cm" svg:x2="8.841cm" svg:y2="11.104cm">
                <text:p/>
              </draw:line>
              <draw:line draw:style-name="gr60" draw:text-style-name="P14" draw:layer="layout" svg:x1="8.833cm" svg:y1="11.104cm" svg:x2="8.841cm" svg:y2="11.104cm">
                <text:p/>
              </draw:line>
              <draw:line draw:style-name="gr60" draw:text-style-name="P14" draw:layer="layout" svg:x1="8.833cm" svg:y1="11.104cm" svg:x2="8.841cm" svg:y2="11.104cm">
                <text:p/>
              </draw:line>
              <draw:line draw:style-name="gr60" draw:text-style-name="P14" draw:layer="layout" svg:x1="8.833cm" svg:y1="11.104cm" svg:x2="8.841cm" svg:y2="11.104cm">
                <text:p/>
              </draw:line>
              <draw:custom-shape draw:style-name="gr120" draw:text-style-name="P58" draw:layer="layout" svg:width="0.075cm" svg:height="0.075cm" svg:x="8.819cm" svg:y="11.08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custom-shape draw:style-name="gr120" draw:text-style-name="P58" draw:layer="layout" svg:width="0.075cm" svg:height="0.075cm" svg:x="8.819cm" svg:y="11.08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line draw:style-name="gr60" draw:text-style-name="P14" draw:layer="layout" svg:x1="8.833cm" svg:y1="11.099cm" svg:x2="8.841cm" svg:y2="11.099cm">
                <text:p/>
              </draw:line>
              <draw:custom-shape draw:style-name="gr120" draw:text-style-name="P58" draw:layer="layout" svg:width="0.075cm" svg:height="0.075cm" svg:x="8.819cm" svg:y="11.073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8.833cm" svg:y1="11.095cm" svg:x2="8.841cm" svg:y2="11.095cm">
                <text:p/>
              </draw:line>
              <draw:custom-shape draw:style-name="gr121" draw:text-style-name="P16" draw:layer="layout" svg:width="0.075cm" svg:height="0.075cm" svg:x="8.815cm" svg:y="11.082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8cm" svg:height="0.075cm" svg:x="8.819cm" svg:y="10.689cm">
                <text:p/>
                <draw:enhanced-geometry svg:viewBox="0 0 86 17" draw:type="non-primitive" draw:enhanced-path="M 0 16  L 0 0  L 85 0  L 85 16  L 0 16  N"/>
              </draw:custom-shape>
              <draw:custom-shape draw:style-name="gr117" draw:text-style-name="P56" draw:layer="layout" svg:width="0.075cm" svg:height="0.075cm" svg:x="8.894cm" svg:y="10.676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8.894cm" svg:y="10.72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3cm" svg:height="0.075cm" svg:x="8.925cm" svg:y="10.998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cm" svg:height="0.075cm" svg:x="8.903cm" svg:y="11.09cm">
                <text:p/>
                <draw:enhanced-geometry svg:viewBox="0 0 34 17" draw:type="non-primitive" draw:enhanced-path="M 0 16  L 32 16  L 33 5  L 0 0  L 0 5  L 0 16  N"/>
              </draw:custom-shape>
              <draw:custom-shape draw:style-name="gr117" draw:text-style-name="P56" draw:layer="layout" svg:width="0.089cm" svg:height="0.075cm" svg:x="8.969cm" svg:y="11.038cm">
                <text:p/>
                <draw:enhanced-geometry svg:viewBox="0 0 20 17" draw:type="non-primitive" draw:enhanced-path="M 0 16  L 0 0  L 19 0  L 19 16  L 0 16  N"/>
              </draw:custom-shape>
              <draw:custom-shape draw:style-name="gr117" draw:text-style-name="P56" draw:layer="layout" svg:width="0.145cm" svg:height="0.075cm" svg:x="9.071cm" svg:y="11.046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8.908cm" svg:y1="10.839cm" svg:x2="8.908cm" svg:y2="10.896cm">
                <text:p/>
              </draw:line>
              <draw:line draw:style-name="gr60" draw:text-style-name="P14" draw:layer="layout" svg:x1="8.908cm" svg:y1="10.817cm" svg:x2="8.908cm" svg:y2="10.821cm">
                <text:p/>
              </draw:line>
              <draw:custom-shape draw:style-name="gr118" draw:text-style-name="P46" draw:layer="layout" svg:width="0.075cm" svg:height="0.075cm" svg:x="8.872cm" svg:y="10.81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8.974cm" svg:y="10.804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8.974cm" svg:y="10.82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9.08cm" svg:y="10.821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4cm" svg:x="8.894cm" svg:y="10.844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8.908cm" svg:y="10.879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4cm" svg:x="9.058cm" svg:y="10.844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9.08cm" svg:y="10.808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9.137cm" svg:y="10.817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4cm" svg:x="8.908cm" svg:y="10.804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8.877cm" svg:y="10.81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8.894cm" svg:y="10.804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8.903cm" svg:y1="10.821cm" svg:x2="8.991cm" svg:y2="10.821cm">
                <text:p/>
              </draw:line>
              <draw:line draw:style-name="gr60" draw:text-style-name="P14" draw:layer="layout" svg:x1="8.991cm" svg:y1="10.839cm" svg:x2="8.991cm" svg:y2="10.848cm">
                <text:p/>
              </draw:line>
              <draw:custom-shape draw:style-name="gr122" draw:text-style-name="P59" draw:layer="layout" svg:width="0.075cm" svg:height="0.075cm" svg:x="8.991cm" svg:y="10.82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9.053cm" svg:y="10.82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9.053cm" svg:y="10.808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8.991cm" svg:y="10.799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9.102cm" svg:y="10.852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8.908cm" svg:y="10.654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9.058cm" svg:y="10.667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9.058cm" svg:y="10.729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8.908cm" svg:y="10.733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8.802cm" svg:y="10.698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8.925cm" svg:y="11.068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9.23cm" svg:y1="10.998cm" svg:x2="9.23cm" svg:y2="11.06cm">
                <text:p/>
              </draw:line>
              <draw:custom-shape draw:style-name="gr122" draw:text-style-name="P59" draw:layer="layout" svg:width="0.283cm" svg:height="0.075cm" svg:x="8.925cm" svg:y="10.971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8.908cm" svg:y="10.998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3cm" svg:height="0.075cm" svg:x="8.925cm" svg:y="11.033cm">
                <text:p/>
                <draw:enhanced-geometry svg:viewBox="0 0 64 17" draw:type="non-primitive" draw:enhanced-path="M 0 0  L 0 16  L 63 16  L 63 0  L 0 0  N"/>
              </draw:custom-shape>
              <draw:custom-shape draw:style-name="gr135" draw:text-style-name="P60" draw:layer="layout" svg:width="0.547cm" svg:height="0.075cm" svg:x="8.731cm" svg:y="11.174cm">
                <text:p/>
                <draw:enhanced-geometry svg:viewBox="0 0 124 17" draw:type="non-primitive" draw:enhanced-path="M 0 0  L 0 16  L 123 16  L 123 0  L 0 0  N"/>
              </draw:custom-shape>
              <draw:custom-shape draw:style-name="gr124" draw:text-style-name="P33" draw:layer="layout" svg:width="0.379cm" svg:height="0.075cm" svg:x="8.815cm" svg:y="11.183cm">
                <text:p/>
                <draw:enhanced-geometry svg:viewBox="0 0 86 17" draw:type="non-primitive" draw:enhanced-path="M 1 16  L 83 16  L 84 16  L 84 14  L 85 3  L 84 1  L 83 1  L 1 0  L 0 1  L 0 3  L 0 12  L 0 14  L 1 16  N"/>
              </draw:custom-shape>
              <draw:custom-shape draw:style-name="gr108" draw:text-style-name="P50" draw:layer="layout" svg:width="0.075cm" svg:height="0.075cm" svg:x="8.991cm" svg:y="10.486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9cm" svg:y="10.504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cm" svg:height="0.075cm" svg:x="8.784cm" svg:y="10.469cm">
                <text:p/>
  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  </draw:custom-shape>
              <draw:custom-shape draw:style-name="gr126" draw:text-style-name="P2" draw:layer="layout" svg:width="0.472cm" svg:height="0.083cm" svg:x="8.784cm" svg:y="10.469cm">
                <text:p/>
  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  </draw:custom-shape>
              <draw:custom-shape draw:style-name="gr118" draw:text-style-name="P46" draw:layer="layout" svg:width="0.238cm" svg:height="0.075cm" svg:x="8.789cm" svg:y="10.473cm">
                <text:p/>
  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  </draw:custom-shape>
              <draw:custom-shape draw:style-name="gr127" draw:text-style-name="P2" draw:layer="layout" svg:width="0.255cm" svg:height="0.075cm" svg:x="8.789cm" svg:y="10.473cm">
                <text:p/>
  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8.991cm" svg:y="10.486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9cm" svg:height="0.075cm" svg:x="8.806cm" svg:y="10.495cm">
                <text:p/>
                <draw:enhanced-geometry svg:viewBox="0 0 43 17" draw:type="non-primitive" draw:enhanced-path="M 0 16  L 42 16  L 41 0  L 0 0  L 0 16  N"/>
              </draw:custom-shape>
              <draw:custom-shape draw:style-name="gr108" draw:text-style-name="P50" draw:layer="layout" svg:width="0.004cm" svg:height="0.075cm" svg:x="8.974cm" svg:y="10.486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8.965cm" svg:y="10.486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4cm" svg:height="0.075cm" svg:x="8.943cm" svg:y="10.486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8.925cm" svg:y="10.486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8.908cm" svg:y="10.486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5cm" svg:x="9.133cm" svg:y="10.473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9.146cm" svg:y="10.469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9.146cm" svg:y="10.47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9.15cm" svg:y="10.47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9.163cm" svg:y="10.482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9.172cm" svg:y="10.495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9.203cm" svg:y1="10.495cm" svg:x2="9.203cm" svg:y2="10.513cm">
                <text:p/>
              </draw:line>
              <draw:custom-shape draw:style-name="gr103" draw:text-style-name="P48" draw:layer="layout" svg:width="0.199cm" svg:height="0.075cm" svg:x="9.009cm" svg:y="10.451cm">
                <text:p/>
                <draw:enhanced-geometry svg:viewBox="0 0 45 17" draw:type="non-primitive" draw:enhanced-path="M 0 16  L 44 16  L 44 0  L 0 0  L 0 16  N"/>
              </draw:custom-shape>
              <draw:custom-shape draw:style-name="gr103" draw:text-style-name="P48" draw:layer="layout" svg:width="0.075cm" svg:height="0.004cm" svg:x="9.009cm" svg:y="10.526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9.221cm" svg:y="10.469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9.049cm" svg:y="10.469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4cm" svg:height="0.075cm" svg:x="9.084cm" svg:y="10.45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5cm" svg:height="0.075cm" svg:x="9.11cm" svg:y="10.469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9.11cm" svg:y="10.491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5cm" svg:height="0.075cm" svg:x="9.11cm" svg:y="10.513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4cm" svg:height="0.075cm" svg:x="9.084cm" svg:y="10.526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9.049cm" svg:y="10.526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9.027cm" svg:y="10.469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9.049cm" svg:y="10.45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9.08cm" svg:y="10.482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9.093cm" svg:y="10.482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9.106cm" svg:y="10.513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9.053cm" svg:y="10.473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4cm" svg:height="0.075cm" svg:x="9.036cm" svg:y="10.482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9.049cm" svg:y="10.482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69cm" svg:height="0.071cm" svg:x="8.784cm" svg:y="10.486cm">
              <draw:image xlink:href="Pictures/10000000000000DB000000289DFEB865.png" xlink:type="simple" xlink:show="embed" xlink:actuate="onLoad" draw:mime-type="image/png">
                <text:p/>
              </draw:image>
            </draw:frame>
            <draw:g draw:style-name="gr4">
              <draw:custom-shape draw:style-name="gr130" draw:text-style-name="P46" draw:layer="layout" svg:width="0.547cm" svg:height="1.014cm" svg:x="9.529cm" svg:y="10.888cm">
                <text:p/>
                <draw:enhanced-geometry svg:viewBox="0 0 124 230" draw:type="non-primitive" draw:enhanced-path="M 2 0  L 120 0  L 121 0  L 123 2  L 123 3  L 123 226  L 123 227  L 121 228  L 120 229  L 2 229  L 0 228  L 0 227  L 0 226  L 0 3  L 0 2  L 0 0  L 2 0  N"/>
              </draw:custom-shape>
              <draw:custom-shape draw:style-name="gr131" draw:text-style-name="P47" draw:layer="layout" svg:width="0.547cm" svg:height="0.075cm" svg:x="9.529cm" svg:y="11.756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725cm">
                <text:p/>
                <draw:enhanced-geometry svg:viewBox="0 0 124 17" draw:type="non-primitive" draw:enhanced-path="M 0 0  L 123 0  L 123 16  L 0 16  L 0 0  N"/>
              </draw:custom-shape>
              <draw:custom-shape draw:style-name="gr132" draw:text-style-name="P33" draw:layer="layout" svg:width="0.547cm" svg:height="0.075cm" svg:x="9.529cm" svg:y="11.69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69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65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62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598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562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531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50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465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439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404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373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33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4cm" svg:x="9.529cm" svg:y="11.307cm">
                <text:p/>
                <draw:enhanced-geometry svg:viewBox="0 0 124 17" draw:type="non-primitive" draw:enhanced-path="M 0 0  L 123 0  L 123 16  L 0 16  L 0 0  N"/>
              </draw:custom-shape>
              <draw:custom-shape draw:style-name="gr131" draw:text-style-name="P47" draw:layer="layout" svg:width="0.547cm" svg:height="0.075cm" svg:x="9.529cm" svg:y="11.276cm">
                <text:p/>
                <draw:enhanced-geometry svg:viewBox="0 0 124 17" draw:type="non-primitive" draw:enhanced-path="M 0 0  L 123 0  L 123 16  L 0 16  L 0 0  N"/>
              </draw:custom-shape>
              <draw:custom-shape draw:style-name="gr103" draw:text-style-name="P48" draw:layer="layout" svg:width="0.392cm" svg:height="0.075cm" svg:x="9.402cm" svg:y="11.858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9.825cm" svg:y="11.858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75cm" svg:height="0.357cm" svg:x="9.631cm" svg:y="11.545cm">
                <text:p/>
                <draw:enhanced-geometry svg:viewBox="0 0 85 81" draw:type="non-primitive" draw:enhanced-path="M 0 1  L 0 80  L 84 80  L 84 0  N"/>
              </draw:custom-shape>
              <draw:custom-shape draw:style-name="gr134" draw:text-style-name="P46" draw:layer="layout" svg:width="0.547cm" svg:height="0.754cm" svg:x="9.529cm" svg:y="10.054cm">
                <text:p/>
  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  </draw:custom-shape>
              <draw:custom-shape draw:style-name="gr106" draw:text-style-name="P46" draw:layer="layout" svg:width="0.446cm" svg:height="0.463cm" svg:x="9.582cm" svg:y="10.275cm">
                <text:p/>
  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  </draw:custom-shape>
              <draw:custom-shape draw:style-name="gr107" draw:text-style-name="P49" draw:layer="layout" svg:width="0.437cm" svg:height="0.075cm" svg:x="9.6cm" svg:y="10.407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9.6cm" svg:y="10.544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9.591cm" svg:y="10.292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5cm" svg:height="0.075cm" svg:x="9.71cm" svg:y="10.297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4cm" svg:x="9.935cm" svg:y="10.29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4cm" svg:x="9.935cm" svg:y="10.297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3cm" svg:height="0.004cm" svg:x="9.613cm" svg:y="10.328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4cm" svg:x="9.6cm" svg:y="10.416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5cm" svg:height="0.08cm" svg:x="9.71cm" svg:y="10.433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4cm" svg:x="9.895cm" svg:y="10.5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4cm" svg:x="9.895cm" svg:y="10.5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9.693cm" svg:y="10.447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4cm" svg:height="0.074cm" svg:x="9.6cm" svg:y="10.575cm">
                <text:p/>
                <draw:enhanced-geometry svg:viewBox="0 0 94 17" draw:type="non-primitive" draw:enhanced-path="M 0 16  L 93 16  L 93 0  L 0 0  L 0 16  N"/>
              </draw:custom-shape>
              <draw:custom-shape draw:style-name="gr114" draw:text-style-name="P35" draw:layer="layout" svg:width="0.419cm" svg:height="0.075cm" svg:x="9.6cm" svg:y="10.561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4cm" svg:x="10.014cm" svg:y="10.575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3cm" svg:height="0.074cm" svg:x="9.591cm" svg:y="10.575cm">
                <text:p/>
                <draw:enhanced-geometry svg:viewBox="0 0 96 17" draw:type="non-primitive" draw:enhanced-path="M 0 16  L 0 0  L 95 0  L 95 16  L 0 16  L 0 16  L 0 0  L 0 0  L 0 16  N"/>
              </draw:custom-shape>
              <draw:custom-shape draw:style-name="gr114" draw:text-style-name="P35" draw:layer="layout" svg:width="0.074cm" svg:height="0.074cm" svg:x="9.574cm" svg:y="10.575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9.6cm" svg:y="10.592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9.701cm" svg:y="10.614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3cm" svg:height="0.083cm" svg:x="9.723cm" svg:y="10.619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9.6cm" svg:y="10.557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5cm" svg:height="0.004cm" svg:x="9.582cm" svg:y="10.231cm">
                <text:p/>
                <draw:enhanced-geometry svg:viewBox="0 0 103 1" draw:type="non-primitive" draw:enhanced-path="M 1 0  L 100 0  L 101 0  L 102 0  L 102 0  L 100 0  L 1 0  L 0 0  L 0 0  L 0 0  L 1 0  N"/>
              </draw:custom-shape>
              <draw:custom-shape draw:style-name="gr117" draw:text-style-name="P56" draw:layer="layout" svg:width="0.075cm" svg:height="0.075cm" svg:x="9.613cm" svg:y="10.332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4cm" svg:height="0.075cm" svg:x="9.701cm" svg:y="10.332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19cm" svg:height="0.075cm" svg:x="9.887cm" svg:y="10.332cm">
                <text:p/>
                <draw:enhanced-geometry svg:viewBox="0 0 27 17" draw:type="non-primitive" draw:enhanced-path="M 0 16  L 25 16  L 26 10  L 25 0  L 0 0  L 0 10  L 0 16  N"/>
              </draw:custom-shape>
              <draw:custom-shape draw:style-name="gr109" draw:text-style-name="P51" draw:layer="layout" svg:width="0.155cm" svg:height="0.075cm" svg:x="9.71cm" svg:y="10.358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9.944cm" svg:y="10.275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9.913cm" svg:y="10.297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9.71cm" svg:y="10.358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9.71cm" svg:y="10.354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9.701cm" svg:y="10.35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9.648cm" svg:y="10.231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9.648cm" svg:y="10.231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9.648cm" svg:y1="10.244cm" svg:x2="9.657cm" svg:y2="10.244cm">
                <text:p/>
              </draw:line>
              <draw:custom-shape draw:style-name="gr119" draw:text-style-name="P57" draw:layer="layout" svg:width="0.005cm" svg:height="0.075cm" svg:x="9.935cm" svg:y="10.231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9.931cm" svg:y="10.231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9.917cm" svg:y="10.222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9.71cm" svg:y="10.5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9.71cm" svg:y="10.495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9.701cm" svg:y="10.491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9.618cm" svg:y="10.716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9.631cm" svg:y1="10.733cm" svg:x2="9.644cm" svg:y2="10.733cm">
                <text:p/>
              </draw:line>
              <draw:line draw:style-name="gr60" draw:text-style-name="P14" draw:layer="layout" svg:x1="9.631cm" svg:y1="10.733cm" svg:x2="9.644cm" svg:y2="10.733cm">
                <text:p/>
              </draw:line>
              <draw:line draw:style-name="gr60" draw:text-style-name="P14" draw:layer="layout" svg:x1="9.631cm" svg:y1="10.733cm" svg:x2="9.644cm" svg:y2="10.733cm">
                <text:p/>
              </draw:line>
              <draw:line draw:style-name="gr60" draw:text-style-name="P14" draw:layer="layout" svg:x1="9.631cm" svg:y1="10.733cm" svg:x2="9.644cm" svg:y2="10.733cm">
                <text:p/>
              </draw:line>
              <draw:line draw:style-name="gr60" draw:text-style-name="P14" draw:layer="layout" svg:x1="9.631cm" svg:y1="10.733cm" svg:x2="9.644cm" svg:y2="10.733cm">
                <text:p/>
              </draw:line>
              <draw:line draw:style-name="gr60" draw:text-style-name="P14" draw:layer="layout" svg:x1="9.631cm" svg:y1="10.733cm" svg:x2="9.644cm" svg:y2="10.733cm">
                <text:p/>
              </draw:line>
              <draw:line draw:style-name="gr60" draw:text-style-name="P14" draw:layer="layout" svg:x1="9.631cm" svg:y1="10.733cm" svg:x2="9.644cm" svg:y2="10.733cm">
                <text:p/>
              </draw:line>
              <draw:custom-shape draw:style-name="gr120" draw:text-style-name="P58" draw:layer="layout" svg:width="0.075cm" svg:height="0.075cm" svg:x="9.618cm" svg:y="10.711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custom-shape draw:style-name="gr120" draw:text-style-name="P58" draw:layer="layout" svg:width="0.075cm" svg:height="0.075cm" svg:x="9.618cm" svg:y="10.711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line draw:style-name="gr60" draw:text-style-name="P14" draw:layer="layout" svg:x1="9.631cm" svg:y1="10.729cm" svg:x2="9.644cm" svg:y2="10.729cm">
                <text:p/>
              </draw:line>
              <draw:custom-shape draw:style-name="gr120" draw:text-style-name="P58" draw:layer="layout" svg:width="0.075cm" svg:height="0.075cm" svg:x="9.618cm" svg:y="10.702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9.631cm" svg:y1="10.724cm" svg:x2="9.644cm" svg:y2="10.724cm">
                <text:p/>
              </draw:line>
              <draw:custom-shape draw:style-name="gr121" draw:text-style-name="P16" draw:layer="layout" svg:width="0.075cm" svg:height="0.075cm" svg:x="9.613cm" svg:y="10.711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83cm" svg:height="0.075cm" svg:x="9.618cm" svg:y="10.319cm">
                <text:p/>
                <draw:enhanced-geometry svg:viewBox="0 0 87 17" draw:type="non-primitive" draw:enhanced-path="M 0 16  L 0 0  L 86 0  L 86 16  L 0 16  N"/>
              </draw:custom-shape>
              <draw:custom-shape draw:style-name="gr117" draw:text-style-name="P56" draw:layer="layout" svg:width="0.075cm" svg:height="0.074cm" svg:x="9.693cm" svg:y="10.306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9.693cm" svg:y="10.35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3cm" svg:height="0.075cm" svg:x="9.723cm" svg:y="10.627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5cm" svg:height="0.075cm" svg:x="9.701cm" svg:y="10.72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2cm" svg:height="0.075cm" svg:x="9.768cm" svg:y="10.667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5cm" svg:height="0.075cm" svg:x="9.869cm" svg:y="10.676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9.71cm" svg:y1="10.469cm" svg:x2="9.71cm" svg:y2="10.526cm">
                <text:p/>
              </draw:line>
              <draw:line draw:style-name="gr60" draw:text-style-name="P14" draw:layer="layout" svg:x1="9.71cm" svg:y1="10.447cm" svg:x2="9.71cm" svg:y2="10.451cm">
                <text:p/>
              </draw:line>
              <draw:custom-shape draw:style-name="gr118" draw:text-style-name="P46" draw:layer="layout" svg:width="0.075cm" svg:height="0.075cm" svg:x="9.675cm" svg:y="10.44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9.772cm" svg:y="10.433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9.772cm" svg:y="10.45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9.878cm" svg:y="10.451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9.693cm" svg:y="10.473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9.71cm" svg:y="10.508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9.86cm" svg:y="10.473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9.878cm" svg:y="10.438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9.935cm" svg:y="10.447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5cm" svg:height="0.005cm" svg:x="9.71cm" svg:y="10.433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9.679cm" svg:y="10.44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9.693cm" svg:y="10.433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9.701cm" svg:y1="10.451cm" svg:x2="9.79cm" svg:y2="10.451cm">
                <text:p/>
              </draw:line>
              <draw:line draw:style-name="gr60" draw:text-style-name="P14" draw:layer="layout" svg:x1="9.79cm" svg:y1="10.469cm" svg:x2="9.79cm" svg:y2="10.478cm">
                <text:p/>
              </draw:line>
              <draw:custom-shape draw:style-name="gr122" draw:text-style-name="P59" draw:layer="layout" svg:width="0.075cm" svg:height="0.075cm" svg:x="9.79cm" svg:y="10.45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9.856cm" svg:y="10.451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9.856cm" svg:y="10.438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9.79cm" svg:y="10.429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9.9cm" svg:y="10.482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9.71cm" svg:y="10.283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9.86cm" svg:y="10.297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9.86cm" svg:y="10.358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9.71cm" svg:y="10.363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9.6cm" svg:y="10.328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9.723cm" svg:y="10.698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10.032cm" svg:y1="10.627cm" svg:x2="10.032cm" svg:y2="10.689cm">
                <text:p/>
              </draw:line>
              <draw:custom-shape draw:style-name="gr122" draw:text-style-name="P59" draw:layer="layout" svg:width="0.283cm" svg:height="0.075cm" svg:x="9.723cm" svg:y="10.601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9.71cm" svg:y="10.627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3cm" svg:height="0.075cm" svg:x="9.723cm" svg:y="10.663cm">
                <text:p/>
                <draw:enhanced-geometry svg:viewBox="0 0 64 17" draw:type="non-primitive" draw:enhanced-path="M 0 0  L 0 16  L 63 16  L 63 0  L 0 0  N"/>
              </draw:custom-shape>
              <draw:custom-shape draw:style-name="gr135" draw:text-style-name="P60" draw:layer="layout" svg:width="0.547cm" svg:height="0.075cm" svg:x="9.529cm" svg:y="10.804cm">
                <text:p/>
                <draw:enhanced-geometry svg:viewBox="0 0 124 17" draw:type="non-primitive" draw:enhanced-path="M 0 0  L 0 16  L 123 16  L 123 0  L 0 0  N"/>
              </draw:custom-shape>
              <draw:custom-shape draw:style-name="gr124" draw:text-style-name="P33" draw:layer="layout" svg:width="0.384cm" svg:height="0.075cm" svg:x="9.613cm" svg:y="10.813cm">
                <text:p/>
                <draw:enhanced-geometry svg:viewBox="0 0 87 17" draw:type="non-primitive" draw:enhanced-path="M 1 16  L 84 16  L 85 16  L 85 14  L 86 3  L 85 1  L 84 1  L 1 0  L 0 1  L 0 3  L 0 12  L 0 14  L 1 16  N"/>
              </draw:custom-shape>
              <draw:custom-shape draw:style-name="gr108" draw:text-style-name="P50" draw:layer="layout" svg:width="0.075cm" svg:height="0.075cm" svg:x="9.79cm" svg:y="10.116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9.798cm" svg:y="10.134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5cm" svg:height="0.075cm" svg:x="9.582cm" svg:y="10.098cm">
                <text:p/>
  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  </draw:custom-shape>
              <draw:custom-shape draw:style-name="gr126" draw:text-style-name="P2" draw:layer="layout" svg:width="0.472cm" svg:height="0.084cm" svg:x="9.582cm" svg:y="10.098cm">
                <text:p/>
  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  </draw:custom-shape>
              <draw:custom-shape draw:style-name="gr118" draw:text-style-name="P46" draw:layer="layout" svg:width="0.242cm" svg:height="0.075cm" svg:x="9.587cm" svg:y="10.103cm">
                <text:p/>
  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  </draw:custom-shape>
              <draw:custom-shape draw:style-name="gr127" draw:text-style-name="P2" draw:layer="layout" svg:width="0.256cm" svg:height="0.075cm" svg:x="9.587cm" svg:y="10.103cm">
                <text:p/>
  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9.79cm" svg:y="10.116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5cm" svg:height="0.075cm" svg:x="9.609cm" svg:y="10.125cm">
                <text:p/>
                <draw:enhanced-geometry svg:viewBox="0 0 42 17" draw:type="non-primitive" draw:enhanced-path="M 0 16  L 41 16  L 40 0  L 0 0  L 0 16  N"/>
              </draw:custom-shape>
              <draw:custom-shape draw:style-name="gr108" draw:text-style-name="P50" draw:layer="layout" svg:width="0.004cm" svg:height="0.075cm" svg:x="9.772cm" svg:y="10.116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9.763cm" svg:y="10.116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9.745cm" svg:y="10.116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9.723cm" svg:y="10.116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9.71cm" svg:y="10.116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5cm" svg:x="9.931cm" svg:y="10.103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9.944cm" svg:y="10.098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9.944cm" svg:y="10.10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9.948cm" svg:y="10.103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9.966cm" svg:y="10.111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9.97cm" svg:y="10.125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10.001cm" svg:y1="10.125cm" svg:x2="10.001cm" svg:y2="10.142cm">
                <text:p/>
              </draw:line>
              <draw:custom-shape draw:style-name="gr103" draw:text-style-name="P48" draw:layer="layout" svg:width="0.199cm" svg:height="0.075cm" svg:x="9.807cm" svg:y="10.081cm">
                <text:p/>
                <draw:enhanced-geometry svg:viewBox="0 0 45 17" draw:type="non-primitive" draw:enhanced-path="M 0 16  L 44 16  L 44 0  L 0 0  L 0 16  N"/>
              </draw:custom-shape>
              <draw:custom-shape draw:style-name="gr103" draw:text-style-name="P48" draw:layer="layout" svg:width="0.075cm" svg:height="0.004cm" svg:x="9.807cm" svg:y="10.156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10.019cm" svg:y="10.098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9.847cm" svg:y="10.098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4cm" svg:height="0.075cm" svg:x="9.887cm" svg:y="10.081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4cm" svg:height="0.075cm" svg:x="9.909cm" svg:y="10.098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9.909cm" svg:y="10.12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4cm" svg:height="0.075cm" svg:x="9.909cm" svg:y="10.142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4cm" svg:height="0.075cm" svg:x="9.887cm" svg:y="10.156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9.847cm" svg:y="10.156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9.825cm" svg:y="10.098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9.847cm" svg:y="10.081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9.878cm" svg:y="10.111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9.895cm" svg:y="10.111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9.904cm" svg:y="10.142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9.856cm" svg:y="10.103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9.834cm" svg:y="10.111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9.851cm" svg:y="10.111cm">
                <text:p/>
                <draw:enhanced-geometry svg:viewBox="0 0 17 17" draw:type="non-primitive" draw:enhanced-path="M 9 0  L 0 12  L 0 16  L 9 16  L 9 14  L 16 0  L 9 0  N"/>
              </draw:custom-shape>
            </draw:g>
            <draw:frame draw:style-name="gr9" draw:text-style-name="P15" draw:layer="layout" svg:width="0.274cm" svg:height="0.07cm" svg:x="9.582cm" svg:y="10.116cm">
              <draw:image xlink:href="Pictures/10000000000000DB000000289DFEB865.png" xlink:type="simple" xlink:show="embed" xlink:actuate="onLoad" draw:mime-type="image/png">
                <text:p/>
              </draw:image>
            </draw:frame>
            <draw:custom-shape draw:style-name="gr143" draw:text-style-name="P21" draw:layer="layout" svg:width="5.018cm" svg:height="0.934cm" svg:x="4.474cm" svg:y="9.415cm">
              <text:list text:style-name="L16">
                <text:list-header>
                  <text:p text:style-name="P20"><text:span text:style-name="T32">FDDI Ring No. 1 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4" draw:text-style-name="P2" draw:layer="layout" svg:width="5.04cm" svg:height="1.433cm" svg:x="6.231cm" svg:y="12.793cm">
              <text:p/>
              <draw:enhanced-geometry svg:viewBox="0 0 1143 325" draw:type="non-primitive" draw:enhanced-path="M 0 0  L 0 324  L 1142 324  N"/>
            </draw:custom-shape>
            <draw:g draw:style-name="gr4">
              <draw:custom-shape draw:style-name="gr145" draw:text-style-name="P46" draw:layer="layout" svg:width="0.551cm" svg:height="1.014cm" svg:x="10.257cm" svg:y="10.173cm">
                <text:p/>
                <draw:enhanced-geometry svg:viewBox="0 0 125 230" draw:type="non-primitive" draw:enhanced-path="M 2 0  L 121 0  L 122 0  L 124 2  L 124 3  L 124 226  L 124 227  L 122 228  L 121 229  L 2 229  L 0 228  L 0 227  L 0 226  L 0 3  L 0 2  L 0 0  L 2 0  N"/>
              </draw:custom-shape>
              <draw:custom-shape draw:style-name="gr101" draw:text-style-name="P47" draw:layer="layout" svg:width="0.551cm" svg:height="0.075cm" svg:x="10.257cm" svg:y="11.04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1.011cm">
                <text:p/>
                <draw:enhanced-geometry svg:viewBox="0 0 125 17" draw:type="non-primitive" draw:enhanced-path="M 0 0  L 124 0  L 124 16  L 0 16  L 0 0  N"/>
              </draw:custom-shape>
              <draw:custom-shape draw:style-name="gr102" draw:text-style-name="P33" draw:layer="layout" svg:width="0.551cm" svg:height="0.075cm" svg:x="10.257cm" svg:y="10.98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98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945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914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883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848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817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791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751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724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68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658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623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59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10.257cm" svg:y="10.561cm">
                <text:p/>
                <draw:enhanced-geometry svg:viewBox="0 0 125 17" draw:type="non-primitive" draw:enhanced-path="M 0 0  L 124 0  L 124 16  L 0 16  L 0 0  N"/>
              </draw:custom-shape>
              <draw:custom-shape draw:style-name="gr103" draw:text-style-name="P48" draw:layer="layout" svg:width="0.392cm" svg:height="0.075cm" svg:x="10.134cm" svg:y="11.143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9cm" svg:height="0.075cm" svg:x="10.552cm" svg:y="11.143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8cm" svg:height="0.357cm" svg:x="10.358cm" svg:y="10.83cm">
                <text:p/>
                <draw:enhanced-geometry svg:viewBox="0 0 86 81" draw:type="non-primitive" draw:enhanced-path="M 0 1  L 0 80  L 85 80  L 85 0  N"/>
              </draw:custom-shape>
              <draw:custom-shape draw:style-name="gr105" draw:text-style-name="P46" draw:layer="layout" svg:width="0.551cm" svg:height="0.754cm" svg:x="10.257cm" svg:y="9.34cm">
                <text:p/>
  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  </draw:custom-shape>
              <draw:custom-shape draw:style-name="gr106" draw:text-style-name="P46" draw:layer="layout" svg:width="0.441cm" svg:height="0.463cm" svg:x="10.314cm" svg:y="9.56cm">
                <text:p/>
  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10.328cm" svg:y="9.693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10.328cm" svg:y="9.829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7cm" svg:height="0.106cm" svg:x="10.319cm" svg:y="9.578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10.438cm" svg:y="9.582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5cm" svg:x="10.667cm" svg:y="9.582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5cm" svg:x="10.667cm" svg:y="9.582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3cm" svg:height="0.005cm" svg:x="10.345cm" svg:y="9.613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8cm" svg:height="0.115cm" svg:x="10.328cm" svg:y="9.701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79cm" svg:x="10.438cm" svg:y="9.719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5cm" svg:x="10.623cm" svg:y="9.785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5cm" svg:x="10.623cm" svg:y="9.785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10.425cm" svg:y="9.732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8cm" svg:height="0.075cm" svg:x="10.328cm" svg:y="9.86cm">
                <text:p/>
                <draw:enhanced-geometry svg:viewBox="0 0 95 17" draw:type="non-primitive" draw:enhanced-path="M 0 16  L 94 16  L 94 0  L 0 0  L 0 16  N"/>
              </draw:custom-shape>
              <draw:custom-shape draw:style-name="gr114" draw:text-style-name="P35" draw:layer="layout" svg:width="0.418cm" svg:height="0.075cm" svg:x="10.328cm" svg:y="9.847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10.742cm" svg:y="9.86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7cm" svg:height="0.075cm" svg:x="10.319cm" svg:y="9.86cm">
                <text:p/>
                <draw:enhanced-geometry svg:viewBox="0 0 97 17" draw:type="non-primitive" draw:enhanced-path="M 0 16  L 0 0  L 96 0  L 96 16  L 0 16  L 0 16  L 0 0  L 0 0  L 0 16  N"/>
              </draw:custom-shape>
              <draw:custom-shape draw:style-name="gr114" draw:text-style-name="P35" draw:layer="layout" svg:width="0.075cm" svg:height="0.075cm" svg:x="10.301cm" svg:y="9.86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8cm" svg:height="0.141cm" svg:x="10.328cm" svg:y="9.878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cm" svg:x="10.429cm" svg:y="9.9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3cm" svg:height="0.084cm" svg:x="10.455cm" svg:y="9.904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8cm" svg:height="0.074cm" svg:x="10.328cm" svg:y="9.843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cm" svg:height="0.005cm" svg:x="10.314cm" svg:y="9.516cm">
                <text:p/>
                <draw:enhanced-geometry svg:viewBox="0 0 102 1" draw:type="non-primitive" draw:enhanced-path="M 1 0  L 99 0  L 100 0  L 101 0  L 101 0  L 99 0  L 1 0  L 0 0  L 0 0  L 0 0  L 1 0  N"/>
              </draw:custom-shape>
              <draw:custom-shape draw:style-name="gr117" draw:text-style-name="P56" draw:layer="layout" svg:width="0.075cm" svg:height="0.075cm" svg:x="10.345cm" svg:y="9.618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10.429cm" svg:y="9.618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24cm" svg:height="0.075cm" svg:x="10.614cm" svg:y="9.618cm">
                <text:p/>
                <draw:enhanced-geometry svg:viewBox="0 0 28 17" draw:type="non-primitive" draw:enhanced-path="M 0 16  L 26 16  L 27 10  L 26 0  L 0 0  L 0 10  L 0 16  N"/>
              </draw:custom-shape>
              <draw:custom-shape draw:style-name="gr109" draw:text-style-name="P51" draw:layer="layout" svg:width="0.154cm" svg:height="0.075cm" svg:x="10.438cm" svg:y="9.644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4cm" svg:height="0.075cm" svg:x="10.672cm" svg:y="9.56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10.641cm" svg:y="9.582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10.438cm" svg:y="9.644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10.438cm" svg:y="9.64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10.429cm" svg:y="9.635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10.376cm" svg:y="9.516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4cm" svg:height="0.075cm" svg:x="10.376cm" svg:y="9.516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10.38cm" svg:y1="9.529cm" svg:x2="10.389cm" svg:y2="9.529cm">
                <text:p/>
              </draw:line>
              <draw:custom-shape draw:style-name="gr119" draw:text-style-name="P57" draw:layer="layout" svg:width="0.005cm" svg:height="0.075cm" svg:x="10.667cm" svg:y="9.516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10.663cm" svg:y="9.516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10.645cm" svg:y="9.507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10.438cm" svg:y="9.785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10.438cm" svg:y="9.781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10.429cm" svg:y="9.776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10.35cm" svg:y="10.001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10.358cm" svg:y1="10.019cm" svg:x2="10.372cm" svg:y2="10.019cm">
                <text:p/>
              </draw:line>
              <draw:line draw:style-name="gr60" draw:text-style-name="P14" draw:layer="layout" svg:x1="10.358cm" svg:y1="10.019cm" svg:x2="10.372cm" svg:y2="10.019cm">
                <text:p/>
              </draw:line>
              <draw:line draw:style-name="gr60" draw:text-style-name="P14" draw:layer="layout" svg:x1="10.358cm" svg:y1="10.019cm" svg:x2="10.372cm" svg:y2="10.019cm">
                <text:p/>
              </draw:line>
              <draw:line draw:style-name="gr60" draw:text-style-name="P14" draw:layer="layout" svg:x1="10.358cm" svg:y1="10.019cm" svg:x2="10.372cm" svg:y2="10.019cm">
                <text:p/>
              </draw:line>
              <draw:line draw:style-name="gr60" draw:text-style-name="P14" draw:layer="layout" svg:x1="10.358cm" svg:y1="10.019cm" svg:x2="10.372cm" svg:y2="10.019cm">
                <text:p/>
              </draw:line>
              <draw:line draw:style-name="gr60" draw:text-style-name="P14" draw:layer="layout" svg:x1="10.358cm" svg:y1="10.019cm" svg:x2="10.372cm" svg:y2="10.019cm">
                <text:p/>
              </draw:line>
              <draw:line draw:style-name="gr60" draw:text-style-name="P14" draw:layer="layout" svg:x1="10.358cm" svg:y1="10.019cm" svg:x2="10.372cm" svg:y2="10.019cm">
                <text:p/>
              </draw:line>
              <draw:custom-shape draw:style-name="gr120" draw:text-style-name="P58" draw:layer="layout" svg:width="0.075cm" svg:height="0.075cm" svg:x="10.35cm" svg:y="9.997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custom-shape draw:style-name="gr120" draw:text-style-name="P58" draw:layer="layout" svg:width="0.075cm" svg:height="0.075cm" svg:x="10.35cm" svg:y="9.997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line draw:style-name="gr60" draw:text-style-name="P14" draw:layer="layout" svg:x1="10.358cm" svg:y1="10.014cm" svg:x2="10.372cm" svg:y2="10.014cm">
                <text:p/>
              </draw:line>
              <draw:custom-shape draw:style-name="gr120" draw:text-style-name="P58" draw:layer="layout" svg:width="0.075cm" svg:height="0.075cm" svg:x="10.35cm" svg:y="9.988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10.358cm" svg:y1="10.01cm" svg:x2="10.372cm" svg:y2="10.01cm">
                <text:p/>
              </draw:line>
              <draw:custom-shape draw:style-name="gr121" draw:text-style-name="P16" draw:layer="layout" svg:width="0.075cm" svg:height="0.075cm" svg:x="10.345cm" svg:y="9.997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79cm" svg:height="0.075cm" svg:x="10.35cm" svg:y="9.604cm">
                <text:p/>
                <draw:enhanced-geometry svg:viewBox="0 0 86 17" draw:type="non-primitive" draw:enhanced-path="M 0 16  L 0 0  L 85 0  L 85 16  L 0 16  N"/>
              </draw:custom-shape>
              <draw:custom-shape draw:style-name="gr117" draw:text-style-name="P56" draw:layer="layout" svg:width="0.075cm" svg:height="0.075cm" svg:x="10.425cm" svg:y="9.591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10.425cm" svg:y="9.635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3cm" svg:height="0.075cm" svg:x="10.455cm" svg:y="9.913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4cm" svg:height="0.075cm" svg:x="10.429cm" svg:y="10.006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10.495cm" svg:y="9.953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5cm" svg:height="0.075cm" svg:x="10.601cm" svg:y="9.962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10.438cm" svg:y1="9.754cm" svg:x2="10.438cm" svg:y2="9.812cm">
                <text:p/>
              </draw:line>
              <draw:line draw:style-name="gr60" draw:text-style-name="P14" draw:layer="layout" svg:x1="10.438cm" svg:y1="9.732cm" svg:x2="10.438cm" svg:y2="9.737cm">
                <text:p/>
              </draw:line>
              <draw:custom-shape draw:style-name="gr118" draw:text-style-name="P46" draw:layer="layout" svg:width="0.075cm" svg:height="0.075cm" svg:x="10.403cm" svg:y="9.732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10.5cm" svg:y="9.719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10.5cm" svg:y="9.737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10.605cm" svg:y="9.737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10.425cm" svg:y="9.759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10.438cm" svg:y="9.794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10.588cm" svg:y="9.759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10.605cm" svg:y="9.723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10.667cm" svg:y="9.732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4cm" svg:x="10.438cm" svg:y="9.719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10.407cm" svg:y="9.732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10.425cm" svg:y="9.719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10.429cm" svg:y1="9.737cm" svg:x2="10.522cm" svg:y2="9.737cm">
                <text:p/>
              </draw:line>
              <draw:line draw:style-name="gr60" draw:text-style-name="P14" draw:layer="layout" svg:x1="10.522cm" svg:y1="9.754cm" svg:x2="10.522cm" svg:y2="9.763cm">
                <text:p/>
              </draw:line>
              <draw:custom-shape draw:style-name="gr122" draw:text-style-name="P59" draw:layer="layout" svg:width="0.075cm" svg:height="0.075cm" svg:x="10.522cm" svg:y="9.737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10.583cm" svg:y="9.737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10.583cm" svg:y="9.723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10.522cm" svg:y="9.715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10.632cm" svg:y="9.768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10.438cm" svg:y="9.569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10.588cm" svg:y="9.582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10.588cm" svg:y="9.644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10.438cm" svg:y="9.648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10.328cm" svg:y="9.613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10.455cm" svg:y="9.984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10.76cm" svg:y1="9.913cm" svg:x2="10.76cm" svg:y2="9.975cm">
                <text:p/>
              </draw:line>
              <draw:custom-shape draw:style-name="gr122" draw:text-style-name="P59" draw:layer="layout" svg:width="0.283cm" svg:height="0.075cm" svg:x="10.455cm" svg:y="9.887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10.438cm" svg:y="9.913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3cm" svg:height="0.075cm" svg:x="10.455cm" svg:y="9.948cm">
                <text:p/>
                <draw:enhanced-geometry svg:viewBox="0 0 64 17" draw:type="non-primitive" draw:enhanced-path="M 0 0  L 0 16  L 63 16  L 63 0  L 0 0  N"/>
              </draw:custom-shape>
              <draw:custom-shape draw:style-name="gr123" draw:text-style-name="P60" draw:layer="layout" svg:width="0.551cm" svg:height="0.075cm" svg:x="10.257cm" svg:y="10.089cm">
                <text:p/>
                <draw:enhanced-geometry svg:viewBox="0 0 125 17" draw:type="non-primitive" draw:enhanced-path="M 0 0  L 0 16  L 124 16  L 124 0  L 0 0  N"/>
              </draw:custom-shape>
              <draw:custom-shape draw:style-name="gr124" draw:text-style-name="P33" draw:layer="layout" svg:width="0.379cm" svg:height="0.075cm" svg:x="10.345cm" svg:y="10.098cm">
                <text:p/>
                <draw:enhanced-geometry svg:viewBox="0 0 86 17" draw:type="non-primitive" draw:enhanced-path="M 1 16  L 83 16  L 84 16  L 84 14  L 85 3  L 84 1  L 83 1  L 1 0  L 0 1  L 0 3  L 0 12  L 0 14  L 1 16  N"/>
              </draw:custom-shape>
              <draw:custom-shape draw:style-name="gr108" draw:text-style-name="P50" draw:layer="layout" svg:width="0.075cm" svg:height="0.074cm" svg:x="10.522cm" svg:y="9.402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5cm" svg:height="0.075cm" svg:x="10.53cm" svg:y="9.419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cm" svg:height="0.075cm" svg:x="10.314cm" svg:y="9.384cm">
                <text:p/>
  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  </draw:custom-shape>
              <draw:custom-shape draw:style-name="gr126" draw:text-style-name="P2" draw:layer="layout" svg:width="0.468cm" svg:height="0.084cm" svg:x="10.314cm" svg:y="9.384cm">
                <text:p/>
  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  </draw:custom-shape>
              <draw:custom-shape draw:style-name="gr118" draw:text-style-name="P46" draw:layer="layout" svg:width="0.238cm" svg:height="0.075cm" svg:x="10.319cm" svg:y="9.388cm">
                <text:p/>
  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  </draw:custom-shape>
              <draw:custom-shape draw:style-name="gr127" draw:text-style-name="P2" draw:layer="layout" svg:width="0.251cm" svg:height="0.075cm" svg:x="10.319cm" svg:y="9.388cm">
                <text:p/>
  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4cm" svg:x="10.522cm" svg:y="9.402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9cm" svg:height="0.075cm" svg:x="10.336cm" svg:y="9.41cm">
                <text:p/>
                <draw:enhanced-geometry svg:viewBox="0 0 43 17" draw:type="non-primitive" draw:enhanced-path="M 0 16  L 42 16  L 41 0  L 0 0  L 0 16  N"/>
              </draw:custom-shape>
              <draw:custom-shape draw:style-name="gr108" draw:text-style-name="P50" draw:layer="layout" svg:width="0.004cm" svg:height="0.074cm" svg:x="10.5cm" svg:y="9.402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4cm" svg:x="10.495cm" svg:y="9.402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4cm" svg:x="10.473cm" svg:y="9.402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4cm" svg:x="10.455cm" svg:y="9.402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4cm" svg:x="10.438cm" svg:y="9.402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5cm" svg:x="10.663cm" svg:y="9.388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4cm" svg:height="0.075cm" svg:x="10.672cm" svg:y="9.384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4cm" svg:height="0.075cm" svg:x="10.672cm" svg:y="9.388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10.676cm" svg:y="9.388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10.694cm" svg:y="9.397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5cm" svg:height="0.075cm" svg:x="10.702cm" svg:y="9.41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10.733cm" svg:y1="9.41cm" svg:x2="10.733cm" svg:y2="9.428cm">
                <text:p/>
              </draw:line>
              <draw:custom-shape draw:style-name="gr103" draw:text-style-name="P48" draw:layer="layout" svg:width="0.203cm" svg:height="0.075cm" svg:x="10.535cm" svg:y="9.366cm">
                <text:p/>
                <draw:enhanced-geometry svg:viewBox="0 0 46 17" draw:type="non-primitive" draw:enhanced-path="M 0 16  L 45 16  L 45 0  L 0 0  L 0 16  N"/>
              </draw:custom-shape>
              <draw:custom-shape draw:style-name="gr103" draw:text-style-name="P48" draw:layer="layout" svg:width="0.075cm" svg:height="0.005cm" svg:x="10.535cm" svg:y="9.441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10.746cm" svg:y="9.384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4cm" svg:height="0.075cm" svg:x="10.575cm" svg:y="9.384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5cm" svg:height="0.075cm" svg:x="10.614cm" svg:y="9.366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5cm" svg:height="0.075cm" svg:x="10.636cm" svg:y="9.384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10.636cm" svg:y="9.406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5cm" svg:height="0.075cm" svg:x="10.636cm" svg:y="9.428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5cm" svg:height="0.075cm" svg:x="10.614cm" svg:y="9.441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4cm" svg:height="0.075cm" svg:x="10.575cm" svg:y="9.441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10.557cm" svg:y="9.384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4cm" svg:height="0.075cm" svg:x="10.575cm" svg:y="9.366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10.605cm" svg:y="9.397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10.623cm" svg:y="9.397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5cm" svg:x="10.636cm" svg:y="9.428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10.583cm" svg:y="9.388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10.566cm" svg:y="9.397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10.579cm" svg:y="9.397cm">
                <text:p/>
                <draw:enhanced-geometry svg:viewBox="0 0 17 17" draw:type="non-primitive" draw:enhanced-path="M 9 0  L 0 12  L 0 16  L 9 16  L 9 14  L 16 0  L 9 0  N"/>
              </draw:custom-shape>
            </draw:g>
            <draw:g draw:style-name="gr4">
              <draw:custom-shape draw:style-name="gr145" draw:text-style-name="P46" draw:layer="layout" svg:width="0.551cm" svg:height="1.014cm" svg:x="5.953cm" svg:y="12.052cm">
                <text:p/>
                <draw:enhanced-geometry svg:viewBox="0 0 125 230" draw:type="non-primitive" draw:enhanced-path="M 2 0  L 121 0  L 122 0  L 124 2  L 124 3  L 124 226  L 124 227  L 122 228  L 121 229  L 2 229  L 0 228  L 0 227  L 0 226  L 0 3  L 0 2  L 0 0  L 2 0  N"/>
              </draw:custom-shape>
              <draw:custom-shape draw:style-name="gr101" draw:text-style-name="P47" draw:layer="layout" svg:width="0.551cm" svg:height="0.075cm" svg:x="5.953cm" svg:y="12.9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89cm">
                <text:p/>
                <draw:enhanced-geometry svg:viewBox="0 0 125 17" draw:type="non-primitive" draw:enhanced-path="M 0 0  L 124 0  L 124 16  L 0 16  L 0 0  N"/>
              </draw:custom-shape>
              <draw:custom-shape draw:style-name="gr102" draw:text-style-name="P33" draw:layer="layout" svg:width="0.551cm" svg:height="0.075cm" svg:x="5.953cm" svg:y="12.85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85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823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793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76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726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696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66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629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603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568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537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502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471cm">
                <text:p/>
                <draw:enhanced-geometry svg:viewBox="0 0 125 17" draw:type="non-primitive" draw:enhanced-path="M 0 0  L 124 0  L 124 16  L 0 16  L 0 0  N"/>
              </draw:custom-shape>
              <draw:custom-shape draw:style-name="gr101" draw:text-style-name="P47" draw:layer="layout" svg:width="0.551cm" svg:height="0.075cm" svg:x="5.953cm" svg:y="12.44cm">
                <text:p/>
                <draw:enhanced-geometry svg:viewBox="0 0 125 17" draw:type="non-primitive" draw:enhanced-path="M 0 0  L 124 0  L 124 16  L 0 16  L 0 0  N"/>
              </draw:custom-shape>
              <draw:custom-shape draw:style-name="gr103" draw:text-style-name="P48" draw:layer="layout" svg:width="0.392cm" svg:height="0.075cm" svg:x="5.83cm" svg:y="13.022cm">
                <text:p/>
                <draw:enhanced-geometry svg:viewBox="0 0 89 17" draw:type="non-primitive" draw:enhanced-path="M 28 0  L 24 0  L 24 7  L 0 14  L 0 16  L 88 16  L 88 11  L 28 11  L 28 0  N"/>
              </draw:custom-shape>
              <draw:custom-shape draw:style-name="gr103" draw:text-style-name="P48" draw:layer="layout" svg:width="0.388cm" svg:height="0.075cm" svg:x="6.249cm" svg:y="13.022cm">
                <text:p/>
                <draw:enhanced-geometry svg:viewBox="0 0 88 17" draw:type="non-primitive" draw:enhanced-path="M 58 0  L 63 0  L 63 7  L 87 14  L 87 16  L 0 16  L 0 11  L 58 11  L 58 0  N"/>
              </draw:custom-shape>
              <draw:custom-shape draw:style-name="gr133" draw:text-style-name="P2" draw:layer="layout" svg:width="0.379cm" svg:height="0.357cm" svg:x="6.055cm" svg:y="12.709cm">
                <text:p/>
                <draw:enhanced-geometry svg:viewBox="0 0 86 81" draw:type="non-primitive" draw:enhanced-path="M 0 1  L 0 80  L 85 80  L 85 0  N"/>
              </draw:custom-shape>
              <draw:custom-shape draw:style-name="gr105" draw:text-style-name="P46" draw:layer="layout" svg:width="0.551cm" svg:height="0.754cm" svg:x="5.953cm" svg:y="11.218cm">
                <text:p/>
  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  </draw:custom-shape>
              <draw:custom-shape draw:style-name="gr106" draw:text-style-name="P46" draw:layer="layout" svg:width="0.441cm" svg:height="0.463cm" svg:x="6.01cm" svg:y="11.439cm">
                <text:p/>
  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  </draw:custom-shape>
              <draw:custom-shape draw:style-name="gr107" draw:text-style-name="P49" draw:layer="layout" svg:width="0.436cm" svg:height="0.075cm" svg:x="6.024cm" svg:y="11.571cm">
                <text:p/>
                <draw:enhanced-geometry svg:viewBox="0 0 99 17" draw:type="non-primitive" draw:enhanced-path="M 0 0  L 98 0  L 98 16  L 0 16  L 0 0  N"/>
              </draw:custom-shape>
              <draw:custom-shape draw:style-name="gr107" draw:text-style-name="P49" draw:layer="layout" svg:width="0.441cm" svg:height="0.075cm" svg:x="6.024cm" svg:y="11.708cm">
                <text:p/>
                <draw:enhanced-geometry svg:viewBox="0 0 100 17" draw:type="non-primitive" draw:enhanced-path="M 0 0  L 99 0  L 99 16  L 0 16  L 0 0  N"/>
              </draw:custom-shape>
              <draw:custom-shape draw:style-name="gr108" draw:text-style-name="P50" draw:layer="layout" svg:width="0.428cm" svg:height="0.106cm" svg:x="6.015cm" svg:y="11.456cm">
                <text:p/>
                <draw:enhanced-geometry svg:viewBox="0 0 97 24" draw:type="non-primitive" draw:enhanced-path="M 2 23  L 94 23  L 95 23  L 96 22  L 96 2  L 96 1  L 94 0  L 2 0  L 0 1  L 0 1  L 0 22  L 0 22  L 1 23  L 2 23  N"/>
              </draw:custom-shape>
              <draw:custom-shape draw:style-name="gr109" draw:text-style-name="P51" draw:layer="layout" svg:width="0.154cm" svg:height="0.075cm" svg:x="6.134cm" svg:y="11.461cm">
                <text:p/>
                <draw:enhanced-geometry svg:viewBox="0 0 35 17" draw:type="non-primitive" draw:enhanced-path="M 1 0  L 32 0  L 33 0  L 34 1  L 34 14  L 33 16  L 32 16  L 1 16  L 0 16  L 0 14  L 0 1  L 0 0  L 1 0  N"/>
              </draw:custom-shape>
              <draw:custom-shape draw:style-name="gr110" draw:text-style-name="P52" draw:layer="layout" svg:width="0.075cm" svg:height="0.004cm" svg:x="6.363cm" svg:y="11.461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08" draw:text-style-name="P50" draw:layer="layout" svg:width="0.075cm" svg:height="0.004cm" svg:x="6.363cm" svg:y="11.461cm">
                <text:p/>
                <draw:enhanced-geometry svg:viewBox="0 0 17 1" draw:type="non-primitive" draw:enhanced-path="M 2 0  L 13 0  L 16 0  L 16 0  L 13 0  L 2 0  L 0 0  L 0 0  L 2 0  N"/>
              </draw:custom-shape>
              <draw:custom-shape draw:style-name="gr111" draw:text-style-name="P47" draw:layer="layout" svg:width="0.393cm" svg:height="0.004cm" svg:x="6.041cm" svg:y="11.492cm">
                <text:p/>
                <draw:enhanced-geometry svg:viewBox="0 0 89 1" draw:type="non-primitive" draw:enhanced-path="M 1 0  L 86 0  L 88 0  L 88 0  L 88 0  L 88 0  L 86 0  L 1 0  L 0 0  L 0 0  L 0 0  L 0 0  L 1 0  N"/>
              </draw:custom-shape>
              <draw:custom-shape draw:style-name="gr108" draw:text-style-name="P50" draw:layer="layout" svg:width="0.419cm" svg:height="0.115cm" svg:x="6.024cm" svg:y="11.58cm">
                <text:p/>
                <draw:enhanced-geometry svg:viewBox="0 0 95 26" draw:type="non-primitive" draw:enhanced-path="M 0 25  L 92 25  L 94 25  L 94 24  L 94 2  L 93 1  L 92 0  L 0 0  L 0 1  L 0 2  L 0 24  L 0 25  L 0 25  N"/>
              </draw:custom-shape>
              <draw:custom-shape draw:style-name="gr109" draw:text-style-name="P51" draw:layer="layout" svg:width="0.154cm" svg:height="0.079cm" svg:x="6.134cm" svg:y="11.598cm">
                <text:p/>
                <draw:enhanced-geometry svg:viewBox="0 0 35 18" draw:type="non-primitive" draw:enhanced-path="M 1 0  L 32 0  L 33 0  L 34 1  L 34 2  L 34 15  L 34 16  L 32 17  L 32 17  L 1 17  L 0 17  L 0 16  L 0 15  L 0 2  L 0 1  L 1 0  L 1 0  N"/>
              </draw:custom-shape>
              <draw:custom-shape draw:style-name="gr110" draw:text-style-name="P52" draw:layer="layout" svg:width="0.075cm" svg:height="0.004cm" svg:x="6.319cm" svg:y="11.66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08" draw:text-style-name="P50" draw:layer="layout" svg:width="0.075cm" svg:height="0.004cm" svg:x="6.319cm" svg:y="11.664cm">
                <text:p/>
                <draw:enhanced-geometry svg:viewBox="0 0 17 1" draw:type="non-primitive" draw:enhanced-path="M 1 0  L 12 0  L 14 0  L 16 0  L 16 0  L 14 0  L 14 0  L 1 0  L 1 0  L 0 0  L 0 0  L 1 0  L 1 0  N"/>
              </draw:custom-shape>
              <draw:custom-shape draw:style-name="gr112" draw:text-style-name="P53" draw:layer="layout" svg:width="0.247cm" svg:height="0.075cm" svg:x="6.121cm" svg:y="11.611cm">
                <text:p/>
                <draw:enhanced-geometry svg:viewBox="0 0 56 17" draw:type="non-primitive" draw:enhanced-path="M 0 16  L 19 16  L 19 16  L 37 16  L 37 16  L 55 16  L 55 0  L 37 0  L 37 0  L 20 0  L 20 0  L 0 0  L 0 16  N"/>
              </draw:custom-shape>
              <draw:custom-shape draw:style-name="gr113" draw:text-style-name="P49" draw:layer="layout" svg:width="0.419cm" svg:height="0.075cm" svg:x="6.024cm" svg:y="11.739cm">
                <text:p/>
                <draw:enhanced-geometry svg:viewBox="0 0 95 17" draw:type="non-primitive" draw:enhanced-path="M 0 16  L 94 16  L 94 0  L 0 0  L 0 16  N"/>
              </draw:custom-shape>
              <draw:custom-shape draw:style-name="gr114" draw:text-style-name="P35" draw:layer="layout" svg:width="0.419cm" svg:height="0.075cm" svg:x="6.024cm" svg:y="11.725cm">
                <text:p/>
                <draw:enhanced-geometry svg:viewBox="0 0 95 17" draw:type="non-primitive" draw:enhanced-path="M 94 16  L 93 16  L 0 16  L 0 0  L 93 0  L 92 16  L 94 16  L 93 16  L 94 16  N"/>
              </draw:custom-shape>
              <draw:custom-shape draw:style-name="gr114" draw:text-style-name="P35" draw:layer="layout" svg:width="0.075cm" svg:height="0.075cm" svg:x="6.438cm" svg:y="11.739cm">
                <text:p/>
                <draw:enhanced-geometry svg:viewBox="0 0 17 17" draw:type="non-primitive" draw:enhanced-path="M 8 0  L 0 0  L 0 16  L 16 16  L 16 0  L 8 0  L 8 0  L 0 0  L 0 0  L 8 0  N"/>
              </draw:custom-shape>
              <draw:custom-shape draw:style-name="gr114" draw:text-style-name="P35" draw:layer="layout" svg:width="0.428cm" svg:height="0.075cm" svg:x="6.015cm" svg:y="11.739cm">
                <text:p/>
                <draw:enhanced-geometry svg:viewBox="0 0 97 17" draw:type="non-primitive" draw:enhanced-path="M 0 16  L 0 0  L 96 0  L 96 16  L 0 16  L 0 16  L 0 0  L 0 0  L 0 16  N"/>
              </draw:custom-shape>
              <draw:custom-shape draw:style-name="gr114" draw:text-style-name="P35" draw:layer="layout" svg:width="0.075cm" svg:height="0.075cm" svg:x="5.997cm" svg:y="11.739cm">
                <text:p/>
                <draw:enhanced-geometry svg:viewBox="0 0 17 17" draw:type="non-primitive" draw:enhanced-path="M 0 16  L 16 16  L 16 0  L 0 0  L 0 16  L 0 16  L 0 16  L 16 16  L 0 16  N"/>
              </draw:custom-shape>
              <draw:custom-shape draw:style-name="gr108" draw:text-style-name="P50" draw:layer="layout" svg:width="0.419cm" svg:height="0.141cm" svg:x="6.024cm" svg:y="11.756cm">
                <text:p/>
  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  </draw:custom-shape>
              <draw:custom-shape draw:style-name="gr109" draw:text-style-name="P51" draw:layer="layout" svg:width="0.159cm" svg:height="0.111cm" svg:x="6.125cm" svg:y="11.778cm">
                <text:p/>
  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  </draw:custom-shape>
              <draw:custom-shape draw:style-name="gr115" draw:text-style-name="P54" draw:layer="layout" svg:width="0.282cm" svg:height="0.084cm" svg:x="6.152cm" svg:y="11.783cm">
                <text:p/>
                <draw:enhanced-geometry svg:viewBox="0 0 64 19" draw:type="non-primitive" draw:enhanced-path="M 0 0  L 63 0  L 63 12  L 8 12  L 8 18  L 0 18  L 0 0  N"/>
              </draw:custom-shape>
              <draw:custom-shape draw:style-name="gr108" draw:text-style-name="P50" draw:layer="layout" svg:width="0.419cm" svg:height="0.075cm" svg:x="6.024cm" svg:y="11.721cm">
                <text:p/>
                <draw:enhanced-geometry svg:viewBox="0 0 95 17" draw:type="non-primitive" draw:enhanced-path="M 0 16  L 94 16  L 94 0  L 0 0  L 0 16  N"/>
              </draw:custom-shape>
              <draw:custom-shape draw:style-name="gr116" draw:text-style-name="P55" draw:layer="layout" svg:width="0.45cm" svg:height="0.004cm" svg:x="6.01cm" svg:y="11.395cm">
                <text:p/>
                <draw:enhanced-geometry svg:viewBox="0 0 102 1" draw:type="non-primitive" draw:enhanced-path="M 1 0  L 99 0  L 100 0  L 101 0  L 101 0  L 99 0  L 1 0  L 0 0  L 0 0  L 0 0  L 1 0  N"/>
              </draw:custom-shape>
              <draw:custom-shape draw:style-name="gr117" draw:text-style-name="P56" draw:layer="layout" svg:width="0.075cm" svg:height="0.075cm" svg:x="6.041cm" svg:y="11.496cm">
                <text:p/>
                <draw:enhanced-geometry svg:viewBox="0 0 17 17" draw:type="non-primitive" draw:enhanced-path="M 1 16  L 16 16  L 16 10  L 16 0  L 1 0  L 0 5  L 0 16  L 1 16  N"/>
              </draw:custom-shape>
              <draw:custom-shape draw:style-name="gr117" draw:text-style-name="P56" draw:layer="layout" svg:width="0.163cm" svg:height="0.075cm" svg:x="6.125cm" svg:y="11.496cm">
                <text:p/>
                <draw:enhanced-geometry svg:viewBox="0 0 37 17" draw:type="non-primitive" draw:enhanced-path="M 0 16  L 36 16  L 0 0  L 0 16  N"/>
              </draw:custom-shape>
              <draw:custom-shape draw:style-name="gr117" draw:text-style-name="P56" draw:layer="layout" svg:width="0.124cm" svg:height="0.075cm" svg:x="6.31cm" svg:y="11.496cm">
                <text:p/>
                <draw:enhanced-geometry svg:viewBox="0 0 28 17" draw:type="non-primitive" draw:enhanced-path="M 0 16  L 26 16  L 27 10  L 26 0  L 0 0  L 0 10  L 0 16  N"/>
              </draw:custom-shape>
              <draw:custom-shape draw:style-name="gr109" draw:text-style-name="P51" draw:layer="layout" svg:width="0.154cm" svg:height="0.075cm" svg:x="6.134cm" svg:y="11.523cm">
                <text:p/>
                <draw:enhanced-geometry svg:viewBox="0 0 35 17" draw:type="non-primitive" draw:enhanced-path="M 0 0  L 33 0  L 34 0  L 34 16  L 33 16  L 0 16  L 0 16  L 0 0  L 0 0  N"/>
              </draw:custom-shape>
              <draw:custom-shape draw:style-name="gr118" draw:text-style-name="P46" draw:layer="layout" svg:width="0.075cm" svg:height="0.075cm" svg:x="6.368cm" svg:y="11.439cm">
                <text:p/>
                <draw:enhanced-geometry svg:viewBox="0 0 17 17" draw:type="non-primitive" draw:enhanced-path="M 0 16  L 16 16  L 16 0  L 0 0  L 0 16  N"/>
              </draw:custom-shape>
              <draw:custom-shape draw:style-name="gr103" draw:text-style-name="P48" draw:layer="layout" svg:width="0.075cm" svg:height="0.075cm" svg:x="6.337cm" svg:y="11.461cm">
                <text:p/>
                <draw:enhanced-geometry svg:viewBox="0 0 17 17" draw:type="non-primitive" draw:enhanced-path="M 3 0  L 0 12  L 0 16  L 12 16  L 16 6  L 4 6  L 3 0  N"/>
              </draw:custom-shape>
              <draw:custom-shape draw:style-name="gr119" draw:text-style-name="P57" draw:layer="layout" svg:width="0.075cm" svg:height="0.075cm" svg:x="6.134cm" svg:y="11.523cm">
                <text:p/>
                <draw:enhanced-geometry svg:viewBox="0 0 17 17" draw:type="non-primitive" draw:enhanced-path="M 16 16  L 0 16  L 0 16  L 0 16  L 0 0  L 0 0  L 16 0  L 16 0  L 16 16  L 16 16  L 16 16  N"/>
              </draw:custom-shape>
              <draw:custom-shape draw:style-name="gr120" draw:text-style-name="P58" draw:layer="layout" svg:width="0.075cm" svg:height="0.075cm" svg:x="6.134cm" svg:y="11.518cm">
                <text:p/>
                <draw:enhanced-geometry svg:viewBox="0 0 17 17" draw:type="non-primitive" draw:enhanced-path="M 16 16  L 0 16  L 0 16  L 0 8  L 0 0  L 16 0  L 16 0  L 16 0  L 16 8  L 16 8  L 16 16  L 16 16  N"/>
              </draw:custom-shape>
              <draw:custom-shape draw:style-name="gr121" draw:text-style-name="P16" draw:layer="layout" svg:width="0.075cm" svg:height="0.075cm" svg:x="6.125cm" svg:y="11.514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5cm" svg:height="0.075cm" svg:x="6.072cm" svg:y="11.395cm">
                <text:p/>
                <draw:enhanced-geometry svg:viewBox="0 0 1 17" draw:type="non-primitive" draw:enhanced-path="M 0 16  L 0 16  L 0 16  L 0 10  L 0 5  L 0 0  L 0 0  L 0 5  L 0 10  L 0 16  L 0 16  N"/>
              </draw:custom-shape>
              <draw:custom-shape draw:style-name="gr120" draw:text-style-name="P58" draw:layer="layout" svg:width="0.005cm" svg:height="0.075cm" svg:x="6.072cm" svg:y="11.395cm">
                <text:p/>
                <draw:enhanced-geometry svg:viewBox="0 0 1 17" draw:type="non-primitive" draw:enhanced-path="M 0 16  L 0 16  L 0 10  L 0 5  L 0 5  L 0 0  L 0 0  L 0 5  L 0 5  L 0 10  L 0 10  L 0 16  N"/>
              </draw:custom-shape>
              <draw:line draw:style-name="gr60" draw:text-style-name="P14" draw:layer="layout" svg:x1="6.077cm" svg:y1="11.408cm" svg:x2="6.085cm" svg:y2="11.408cm">
                <text:p/>
              </draw:line>
              <draw:custom-shape draw:style-name="gr119" draw:text-style-name="P57" draw:layer="layout" svg:width="0.005cm" svg:height="0.075cm" svg:x="6.363cm" svg:y="11.395cm">
                <text:p/>
                <draw:enhanced-geometry svg:viewBox="0 0 1 17" draw:type="non-primitive" draw:enhanced-path="M 0 16  L 0 16  L 0 16  L 0 10  L 0 5  L 0 0  L 0 0  L 0 5  L 0 5  L 0 10  L 0 16  N"/>
              </draw:custom-shape>
              <draw:custom-shape draw:style-name="gr120" draw:text-style-name="P58" draw:layer="layout" svg:width="0.075cm" svg:height="0.075cm" svg:x="6.359cm" svg:y="11.395cm">
                <text:p/>
                <draw:enhanced-geometry svg:viewBox="0 0 17 17" draw:type="non-primitive" draw:enhanced-path="M 16 16  L 0 16  L 0 16  L 0 5  L 0 0  L 0 0  L 16 0  L 16 5  L 16 16  N"/>
              </draw:custom-shape>
              <draw:custom-shape draw:style-name="gr121" draw:text-style-name="P16" draw:layer="layout" svg:width="0.075cm" svg:height="0.075cm" svg:x="6.341cm" svg:y="11.386cm">
                <text:p/>
                <draw:enhanced-geometry svg:viewBox="0 0 17 17" draw:type="non-primitive" draw:enhanced-path="M 16 16  L 0 16  L 0 0  L 16 0  L 16 16  N"/>
              </draw:custom-shape>
              <draw:custom-shape draw:style-name="gr119" draw:text-style-name="P57" draw:layer="layout" svg:width="0.075cm" svg:height="0.075cm" svg:x="6.134cm" svg:y="11.664cm">
                <text:p/>
                <draw:enhanced-geometry svg:viewBox="0 0 17 17" draw:type="non-primitive" draw:enhanced-path="M 16 16  L 0 16  L 0 16  L 0 0  L 0 0  L 0 0  L 16 0  L 16 0  L 16 0  L 16 0  L 16 16  L 16 16  L 16 16  N"/>
              </draw:custom-shape>
              <draw:custom-shape draw:style-name="gr120" draw:text-style-name="P58" draw:layer="layout" svg:width="0.075cm" svg:height="0.075cm" svg:x="6.134cm" svg:y="11.659cm">
                <text:p/>
                <draw:enhanced-geometry svg:viewBox="0 0 17 17" draw:type="non-primitive" draw:enhanced-path="M 16 16  L 0 16  L 0 16  L 0 5  L 0 0  L 16 0  L 16 0  L 16 0  L 16 5  L 16 16  L 16 16  N"/>
              </draw:custom-shape>
              <draw:custom-shape draw:style-name="gr121" draw:text-style-name="P16" draw:layer="layout" svg:width="0.075cm" svg:height="0.075cm" svg:x="6.125cm" svg:y="11.655cm">
                <text:p/>
                <draw:enhanced-geometry svg:viewBox="0 0 17 17" draw:type="non-primitive" draw:enhanced-path="M 0 16  L 0 0  L 16 0  L 0 16  N"/>
              </draw:custom-shape>
              <draw:custom-shape draw:style-name="gr119" draw:text-style-name="P57" draw:layer="layout" svg:width="0.004cm" svg:height="0.075cm" svg:x="6.046cm" svg:y="11.88cm">
                <text:p/>
                <draw:enhanced-geometry svg:viewBox="0 0 1 17" draw:type="non-primitive" draw:enhanced-path="M 0 16  L 0 16  L 0 8  L 0 8  L 0 8  L 0 0  L 0 0  L 0 0  L 0 0  L 0 0  L 0 0  L 0 8  L 0 8  L 0 16  L 0 16  N"/>
              </draw:custom-shape>
              <draw:line draw:style-name="gr60" draw:text-style-name="P14" draw:layer="layout" svg:x1="6.055cm" svg:y1="11.897cm" svg:x2="6.068cm" svg:y2="11.897cm">
                <text:p/>
              </draw:line>
              <draw:line draw:style-name="gr60" draw:text-style-name="P14" draw:layer="layout" svg:x1="6.055cm" svg:y1="11.897cm" svg:x2="6.068cm" svg:y2="11.897cm">
                <text:p/>
              </draw:line>
              <draw:line draw:style-name="gr60" draw:text-style-name="P14" draw:layer="layout" svg:x1="6.055cm" svg:y1="11.897cm" svg:x2="6.068cm" svg:y2="11.897cm">
                <text:p/>
              </draw:line>
              <draw:line draw:style-name="gr60" draw:text-style-name="P14" draw:layer="layout" svg:x1="6.055cm" svg:y1="11.897cm" svg:x2="6.068cm" svg:y2="11.897cm">
                <text:p/>
              </draw:line>
              <draw:line draw:style-name="gr60" draw:text-style-name="P14" draw:layer="layout" svg:x1="6.055cm" svg:y1="11.897cm" svg:x2="6.068cm" svg:y2="11.897cm">
                <text:p/>
              </draw:line>
              <draw:line draw:style-name="gr60" draw:text-style-name="P14" draw:layer="layout" svg:x1="6.055cm" svg:y1="11.897cm" svg:x2="6.068cm" svg:y2="11.897cm">
                <text:p/>
              </draw:line>
              <draw:line draw:style-name="gr60" draw:text-style-name="P14" draw:layer="layout" svg:x1="6.055cm" svg:y1="11.897cm" svg:x2="6.068cm" svg:y2="11.897cm">
                <text:p/>
              </draw:line>
              <draw:custom-shape draw:style-name="gr120" draw:text-style-name="P58" draw:layer="layout" svg:width="0.075cm" svg:height="0.075cm" svg:x="6.046cm" svg:y="11.875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custom-shape draw:style-name="gr120" draw:text-style-name="P58" draw:layer="layout" svg:width="0.075cm" svg:height="0.075cm" svg:x="6.046cm" svg:y="11.875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line draw:style-name="gr60" draw:text-style-name="P14" draw:layer="layout" svg:x1="6.055cm" svg:y1="11.893cm" svg:x2="6.068cm" svg:y2="11.893cm">
                <text:p/>
              </draw:line>
              <draw:custom-shape draw:style-name="gr120" draw:text-style-name="P58" draw:layer="layout" svg:width="0.075cm" svg:height="0.075cm" svg:x="6.046cm" svg:y="11.867cm">
                <text:p/>
                <draw:enhanced-geometry svg:viewBox="0 0 17 17" draw:type="non-primitive" draw:enhanced-path="M 16 16  L 16 0  L 0 0  L 16 16  N"/>
              </draw:custom-shape>
              <draw:line draw:style-name="gr60" draw:text-style-name="P14" draw:layer="layout" svg:x1="6.055cm" svg:y1="11.889cm" svg:x2="6.068cm" svg:y2="11.889cm">
                <text:p/>
              </draw:line>
              <draw:custom-shape draw:style-name="gr121" draw:text-style-name="P16" draw:layer="layout" svg:width="0.075cm" svg:height="0.075cm" svg:x="6.041cm" svg:y="11.875cm">
                <text:p/>
                <draw:enhanced-geometry svg:viewBox="0 0 17 17" draw:type="non-primitive" draw:enhanced-path="M 16 16  L 0 16  L 16 0  L 16 16  N"/>
              </draw:custom-shape>
              <draw:custom-shape draw:style-name="gr113" draw:text-style-name="P49" draw:layer="layout" svg:width="0.379cm" svg:height="0.075cm" svg:x="6.046cm" svg:y="11.483cm">
                <text:p/>
                <draw:enhanced-geometry svg:viewBox="0 0 86 17" draw:type="non-primitive" draw:enhanced-path="M 0 16  L 0 0  L 85 0  L 85 16  L 0 16  N"/>
              </draw:custom-shape>
              <draw:custom-shape draw:style-name="gr117" draw:text-style-name="P56" draw:layer="layout" svg:width="0.075cm" svg:height="0.075cm" svg:x="6.121cm" svg:y="11.47cm">
                <text:p/>
                <draw:enhanced-geometry svg:viewBox="0 0 17 17" draw:type="non-primitive" draw:enhanced-path="M 8 0  L 0 0  L 0 16  L 8 16  L 16 0  L 8 0  N"/>
              </draw:custom-shape>
              <draw:custom-shape draw:style-name="gr117" draw:text-style-name="P56" draw:layer="layout" svg:width="0.075cm" svg:height="0.075cm" svg:x="6.121cm" svg:y="11.514cm">
                <text:p/>
                <draw:enhanced-geometry svg:viewBox="0 0 17 17" draw:type="non-primitive" draw:enhanced-path="M 8 0  L 0 0  L 0 16  L 8 16  L 16 16  L 16 0  L 8 0  N"/>
              </draw:custom-shape>
              <draw:custom-shape draw:style-name="gr111" draw:text-style-name="P47" draw:layer="layout" svg:width="0.282cm" svg:height="0.075cm" svg:x="6.152cm" svg:y="11.792cm">
                <text:p/>
                <draw:enhanced-geometry svg:viewBox="0 0 64 17" draw:type="non-primitive" draw:enhanced-path="M 0 0  L 0 16  L 63 16  L 63 0  L 0 0  N"/>
              </draw:custom-shape>
              <draw:custom-shape draw:style-name="gr117" draw:text-style-name="P56" draw:layer="layout" svg:width="0.154cm" svg:height="0.075cm" svg:x="6.125cm" svg:y="11.884cm">
                <text:p/>
                <draw:enhanced-geometry svg:viewBox="0 0 35 17" draw:type="non-primitive" draw:enhanced-path="M 0 16  L 33 16  L 34 5  L 0 0  L 0 5  L 0 16  N"/>
              </draw:custom-shape>
              <draw:custom-shape draw:style-name="gr117" draw:text-style-name="P56" draw:layer="layout" svg:width="0.093cm" svg:height="0.075cm" svg:x="6.191cm" svg:y="11.831cm">
                <text:p/>
                <draw:enhanced-geometry svg:viewBox="0 0 21 17" draw:type="non-primitive" draw:enhanced-path="M 0 16  L 0 0  L 20 0  L 20 16  L 0 16  N"/>
              </draw:custom-shape>
              <draw:custom-shape draw:style-name="gr117" draw:text-style-name="P56" draw:layer="layout" svg:width="0.146cm" svg:height="0.075cm" svg:x="6.297cm" svg:y="11.84cm">
                <text:p/>
                <draw:enhanced-geometry svg:viewBox="0 0 33 17" draw:type="non-primitive" draw:enhanced-path="M 1 16  L 31 16  L 32 10  L 31 0  L 1 0  L 0 10  L 1 16  N"/>
              </draw:custom-shape>
              <draw:line draw:style-name="gr60" draw:text-style-name="P14" draw:layer="layout" svg:x1="6.134cm" svg:y1="11.633cm" svg:x2="6.134cm" svg:y2="11.69cm">
                <text:p/>
              </draw:line>
              <draw:line draw:style-name="gr60" draw:text-style-name="P14" draw:layer="layout" svg:x1="6.134cm" svg:y1="11.611cm" svg:x2="6.134cm" svg:y2="11.615cm">
                <text:p/>
              </draw:line>
              <draw:custom-shape draw:style-name="gr118" draw:text-style-name="P46" draw:layer="layout" svg:width="0.075cm" svg:height="0.075cm" svg:x="6.099cm" svg:y="11.61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6.196cm" svg:y="11.598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6.196cm" svg:y="11.615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6.301cm" svg:y="11.615cm">
                <text:p/>
                <draw:enhanced-geometry svg:viewBox="0 0 17 17" draw:type="non-primitive" draw:enhanced-path="M 0 16  L 16 16  L 16 0  L 0 0  L 0 16  N"/>
              </draw:custom-shape>
              <draw:custom-shape draw:style-name="gr118" draw:text-style-name="P46" draw:layer="layout" svg:width="0.075cm" svg:height="0.075cm" svg:x="6.121cm" svg:y="11.637cm">
                <text:p/>
                <draw:enhanced-geometry svg:viewBox="0 0 17 17" draw:type="non-primitive" draw:enhanced-path="M 16 0  L 16 16  L 0 16  L 0 0  L 16 0  N"/>
              </draw:custom-shape>
              <draw:custom-shape draw:style-name="gr118" draw:text-style-name="P46" draw:layer="layout" svg:width="0.15cm" svg:height="0.075cm" svg:x="6.134cm" svg:y="11.673cm">
                <text:p/>
                <draw:enhanced-geometry svg:viewBox="0 0 34 17" draw:type="non-primitive" draw:enhanced-path="M 0 16  L 32 16  L 33 0  L 0 0  L 0 16  N"/>
              </draw:custom-shape>
              <draw:custom-shape draw:style-name="gr110" draw:text-style-name="P52" draw:layer="layout" svg:width="0.075cm" svg:height="0.075cm" svg:x="6.284cm" svg:y="11.637cm">
                <text:p/>
                <draw:enhanced-geometry svg:viewBox="0 0 17 17" draw:type="non-primitive" draw:enhanced-path="M 0 0  L 0 14  L 6 16  L 6 16  L 16 16  L 6 14  L 6 0  L 0 0  N"/>
              </draw:custom-shape>
              <draw:custom-shape draw:style-name="gr122" draw:text-style-name="P59" draw:layer="layout" svg:width="0.075cm" svg:height="0.075cm" svg:x="6.301cm" svg:y="11.602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6.363cm" svg:y="11.611cm">
                <text:p/>
                <draw:enhanced-geometry svg:viewBox="0 0 17 17" draw:type="non-primitive" draw:enhanced-path="M 16 16  L 16 0  L 0 0  L 0 16  L 16 16  N"/>
              </draw:custom-shape>
              <draw:custom-shape draw:style-name="gr110" draw:text-style-name="P52" draw:layer="layout" svg:width="0.154cm" svg:height="0.004cm" svg:x="6.134cm" svg:y="11.598cm">
                <text:p/>
                <draw:enhanced-geometry svg:viewBox="0 0 35 1" draw:type="non-primitive" draw:enhanced-path="M 0 0  L 1 0  L 32 0  L 33 0  L 34 0  L 34 0  L 33 0  L 32 0  L 1 0  L 0 0  L 0 0  N"/>
              </draw:custom-shape>
              <draw:custom-shape draw:style-name="gr122" draw:text-style-name="P59" draw:layer="layout" svg:width="0.075cm" svg:height="0.075cm" svg:x="6.103cm" svg:y="11.611cm">
                <text:p/>
                <draw:enhanced-geometry svg:viewBox="0 0 17 17" draw:type="non-primitive" draw:enhanced-path="M 16 16  L 16 0  L 0 0  L 0 16  L 16 16  N"/>
              </draw:custom-shape>
              <draw:custom-shape draw:style-name="gr118" draw:text-style-name="P46" draw:layer="layout" svg:width="0.075cm" svg:height="0.075cm" svg:x="6.121cm" svg:y="11.598cm">
                <text:p/>
                <draw:enhanced-geometry svg:viewBox="0 0 17 17" draw:type="non-primitive" draw:enhanced-path="M 16 16  L 16 0  L 0 16  L 16 16  N"/>
              </draw:custom-shape>
              <draw:line draw:style-name="gr60" draw:text-style-name="P14" draw:layer="layout" svg:x1="6.125cm" svg:y1="11.615cm" svg:x2="6.218cm" svg:y2="11.615cm">
                <text:p/>
              </draw:line>
              <draw:line draw:style-name="gr60" draw:text-style-name="P14" draw:layer="layout" svg:x1="6.218cm" svg:y1="11.633cm" svg:x2="6.218cm" svg:y2="11.642cm">
                <text:p/>
              </draw:line>
              <draw:custom-shape draw:style-name="gr122" draw:text-style-name="P59" draw:layer="layout" svg:width="0.075cm" svg:height="0.075cm" svg:x="6.218cm" svg:y="11.615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6.279cm" svg:y="11.615cm">
                <text:p/>
                <draw:enhanced-geometry svg:viewBox="0 0 17 17" draw:type="non-primitive" draw:enhanced-path="M 0 16  L 0 0  L 16 0  L 16 16  L 0 16  N"/>
              </draw:custom-shape>
              <draw:custom-shape draw:style-name="gr122" draw:text-style-name="P59" draw:layer="layout" svg:width="0.075cm" svg:height="0.075cm" svg:x="6.279cm" svg:y="11.602cm">
                <text:p/>
                <draw:enhanced-geometry svg:viewBox="0 0 17 17" draw:type="non-primitive" draw:enhanced-path="M 16 16  L 16 0  L 0 0  L 0 16  L 16 16  N"/>
              </draw:custom-shape>
              <draw:custom-shape draw:style-name="gr122" draw:text-style-name="P59" draw:layer="layout" svg:width="0.075cm" svg:height="0.075cm" svg:x="6.218cm" svg:y="11.593cm">
                <text:p/>
                <draw:enhanced-geometry svg:viewBox="0 0 17 17" draw:type="non-primitive" draw:enhanced-path="M 0 16  L 0 0  L 16 0  L 16 16  L 0 16  N"/>
              </draw:custom-shape>
              <draw:custom-shape draw:style-name="gr118" draw:text-style-name="P46" draw:layer="layout" svg:width="0.075cm" svg:height="0.075cm" svg:x="6.328cm" svg:y="11.646cm">
                <text:p/>
                <draw:enhanced-geometry svg:viewBox="0 0 17 17" draw:type="non-primitive" draw:enhanced-path="M 0 16  L 16 16  L 0 0  L 0 16  N"/>
              </draw:custom-shape>
              <draw:custom-shape draw:style-name="gr122" draw:text-style-name="P59" draw:layer="layout" svg:width="0.15cm" svg:height="0.075cm" svg:x="6.134cm" svg:y="11.448cm">
                <text:p/>
                <draw:enhanced-geometry svg:viewBox="0 0 34 17" draw:type="non-primitive" draw:enhanced-path="M 0 16  L 0 0  L 33 0  L 33 16  L 0 16  N"/>
              </draw:custom-shape>
              <draw:custom-shape draw:style-name="gr122" draw:text-style-name="P59" draw:layer="layout" svg:width="0.075cm" svg:height="0.075cm" svg:x="6.284cm" svg:y="11.461cm">
                <text:p/>
                <draw:enhanced-geometry svg:viewBox="0 0 17 17" draw:type="non-primitive" draw:enhanced-path="M 16 0  L 0 16  L 16 16  L 16 0  L 16 0  N"/>
              </draw:custom-shape>
              <draw:custom-shape draw:style-name="gr122" draw:text-style-name="P59" draw:layer="layout" svg:width="0.075cm" svg:height="0.075cm" svg:x="6.284cm" svg:y="11.523cm">
                <text:p/>
                <draw:enhanced-geometry svg:viewBox="0 0 17 17" draw:type="non-primitive" draw:enhanced-path="M 0 0  L 16 0  L 16 16  L 0 16  L 0 0  N"/>
              </draw:custom-shape>
              <draw:custom-shape draw:style-name="gr117" draw:text-style-name="P56" draw:layer="layout" svg:width="0.15cm" svg:height="0.075cm" svg:x="6.134cm" svg:y="11.527cm">
                <text:p/>
                <draw:enhanced-geometry svg:viewBox="0 0 34 17" draw:type="non-primitive" draw:enhanced-path="M 0 16  L 33 16  L 33 0  L 0 0  L 0 16  N"/>
              </draw:custom-shape>
              <draw:custom-shape draw:style-name="gr118" draw:text-style-name="P46" draw:layer="layout" svg:width="0.075cm" svg:height="0.075cm" svg:x="6.024cm" svg:y="11.492cm">
                <text:p/>
                <draw:enhanced-geometry svg:viewBox="0 0 17 17" draw:type="non-primitive" draw:enhanced-path="M 4 0  L 16 16  L 4 16  L 0 16  L 4 16  L 12 16  L 12 0  L 4 0  N"/>
              </draw:custom-shape>
              <draw:custom-shape draw:style-name="gr118" draw:text-style-name="P46" draw:layer="layout" svg:width="0.075cm" svg:height="0.075cm" svg:x="6.152cm" svg:y="11.862cm">
                <text:p/>
                <draw:enhanced-geometry svg:viewBox="0 0 17 17" draw:type="non-primitive" draw:enhanced-path="M 0 16  L 0 0  L 16 0  L 16 16  L 0 16  N"/>
              </draw:custom-shape>
              <draw:line draw:style-name="gr60" draw:text-style-name="P14" draw:layer="layout" svg:x1="6.456cm" svg:y1="11.792cm" svg:x2="6.456cm" svg:y2="11.853cm">
                <text:p/>
              </draw:line>
              <draw:custom-shape draw:style-name="gr122" draw:text-style-name="P59" draw:layer="layout" svg:width="0.282cm" svg:height="0.075cm" svg:x="6.152cm" svg:y="11.765cm">
                <text:p/>
                <draw:enhanced-geometry svg:viewBox="0 0 64 17" draw:type="non-primitive" draw:enhanced-path="M 0 16  L 0 0  L 63 0  L 63 16  L 0 16  N"/>
              </draw:custom-shape>
              <draw:custom-shape draw:style-name="gr122" draw:text-style-name="P59" draw:layer="layout" svg:width="0.075cm" svg:height="0.075cm" svg:x="6.134cm" svg:y="11.792cm">
                <text:p/>
                <draw:enhanced-geometry svg:viewBox="0 0 17 17" draw:type="non-primitive" draw:enhanced-path="M 16 0  L 16 16  L 0 16  L 0 0  L 16 0  N"/>
              </draw:custom-shape>
              <draw:custom-shape draw:style-name="gr122" draw:text-style-name="P59" draw:layer="layout" svg:width="0.282cm" svg:height="0.075cm" svg:x="6.152cm" svg:y="11.827cm">
                <text:p/>
                <draw:enhanced-geometry svg:viewBox="0 0 64 17" draw:type="non-primitive" draw:enhanced-path="M 0 0  L 0 16  L 63 16  L 63 0  L 0 0  N"/>
              </draw:custom-shape>
              <draw:custom-shape draw:style-name="gr123" draw:text-style-name="P60" draw:layer="layout" svg:width="0.551cm" svg:height="0.075cm" svg:x="5.953cm" svg:y="11.968cm">
                <text:p/>
                <draw:enhanced-geometry svg:viewBox="0 0 125 17" draw:type="non-primitive" draw:enhanced-path="M 0 0  L 0 16  L 124 16  L 124 0  L 0 0  N"/>
              </draw:custom-shape>
              <draw:custom-shape draw:style-name="gr124" draw:text-style-name="P33" draw:layer="layout" svg:width="0.38cm" svg:height="0.075cm" svg:x="6.041cm" svg:y="11.977cm">
                <text:p/>
                <draw:enhanced-geometry svg:viewBox="0 0 86 17" draw:type="non-primitive" draw:enhanced-path="M 1 16  L 83 16  L 84 16  L 84 14  L 85 3  L 84 1  L 83 1  L 1 0  L 0 1  L 0 3  L 0 12  L 0 14  L 1 16  N"/>
              </draw:custom-shape>
              <draw:custom-shape draw:style-name="gr108" draw:text-style-name="P50" draw:layer="layout" svg:width="0.075cm" svg:height="0.075cm" svg:x="6.218cm" svg:y="11.28cm">
                <text:p/>
                <draw:enhanced-geometry svg:viewBox="0 0 17 17" draw:type="non-primitive" draw:enhanced-path="M 8 16  L 0 16  L 0 0  L 16 0  L 8 16  N"/>
              </draw:custom-shape>
              <draw:custom-shape draw:style-name="gr125" draw:text-style-name="P2" draw:layer="layout" svg:width="0.074cm" svg:height="0.075cm" svg:x="6.227cm" svg:y="11.298cm">
                <text:p/>
                <draw:enhanced-geometry svg:viewBox="0 0 17 17" draw:type="non-primitive" draw:enhanced-path="M 10 0  L 16 0  L 16 16  L 0 16  L 10 0  N"/>
              </draw:custom-shape>
              <draw:custom-shape draw:style-name="gr118" draw:text-style-name="P46" draw:layer="layout" svg:width="0.45cm" svg:height="0.075cm" svg:x="6.01cm" svg:y="11.262cm">
                <text:p/>
  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  </draw:custom-shape>
              <draw:custom-shape draw:style-name="gr126" draw:text-style-name="P2" draw:layer="layout" svg:width="0.468cm" svg:height="0.084cm" svg:x="6.01cm" svg:y="11.262cm">
                <text:p/>
  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  </draw:custom-shape>
              <draw:custom-shape draw:style-name="gr118" draw:text-style-name="P46" draw:layer="layout" svg:width="0.238cm" svg:height="0.075cm" svg:x="6.015cm" svg:y="11.267cm">
                <text:p/>
  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  </draw:custom-shape>
              <draw:custom-shape draw:style-name="gr127" draw:text-style-name="P2" draw:layer="layout" svg:width="0.251cm" svg:height="0.075cm" svg:x="6.015cm" svg:y="11.267cm">
                <text:p/>
  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  </draw:custom-shape>
              <draw:custom-shape draw:style-name="gr108" draw:text-style-name="P50" draw:layer="layout" svg:width="0.075cm" svg:height="0.075cm" svg:x="6.218cm" svg:y="11.28cm">
                <text:p/>
                <draw:enhanced-geometry svg:viewBox="0 0 17 17" draw:type="non-primitive" draw:enhanced-path="M 8 16  L 0 16  L 0 16  L 0 8  L 8 0  L 8 0  L 8 0  L 16 0  L 16 0  L 16 8  L 16 16  L 8 16  L 8 0  L 16 0  L 8 8  L 8 8  L 8 0  L 8 16  N"/>
              </draw:custom-shape>
              <draw:custom-shape draw:style-name="gr128" draw:text-style-name="P61" draw:layer="layout" svg:width="0.189cm" svg:height="0.075cm" svg:x="6.033cm" svg:y="11.289cm">
                <text:p/>
                <draw:enhanced-geometry svg:viewBox="0 0 43 17" draw:type="non-primitive" draw:enhanced-path="M 0 16  L 42 16  L 41 0  L 0 0  L 0 16  N"/>
              </draw:custom-shape>
              <draw:custom-shape draw:style-name="gr108" draw:text-style-name="P50" draw:layer="layout" svg:width="0.004cm" svg:height="0.075cm" svg:x="6.196cm" svg:y="11.28cm">
                <text:p/>
                <draw:enhanced-geometry svg:viewBox="0 0 1 17" draw:type="non-primitive" draw:enhanced-path="M 0 0  L 0 16  L 0 16  L 0 0  L 0 0  L 0 0  L 0 0  L 0 8  L 0 8  L 0 0  L 0 0  N"/>
              </draw:custom-shape>
              <draw:custom-shape draw:style-name="gr108" draw:text-style-name="P50" draw:layer="layout" svg:width="0.075cm" svg:height="0.075cm" svg:x="6.191cm" svg:y="11.28cm">
                <text:p/>
                <draw:enhanced-geometry svg:viewBox="0 0 17 17" draw:type="non-primitive" draw:enhanced-path="M 16 0  L 16 8  L 0 16  L 0 16  L 0 8  L 0 8  L 0 8  L 0 0  L 0 0  L 16 0  L 0 8  L 0 8  L 0 8  L 16 0  L 16 0  N"/>
              </draw:custom-shape>
              <draw:custom-shape draw:style-name="gr108" draw:text-style-name="P50" draw:layer="layout" svg:width="0.005cm" svg:height="0.075cm" svg:x="6.169cm" svg:y="11.28cm">
                <text:p/>
                <draw:enhanced-geometry svg:viewBox="0 0 1 17" draw:type="non-primitive" draw:enhanced-path="M 0 0  L 0 8  L 0 16  L 0 16  L 0 16  L 0 8  L 0 0  L 0 0  L 0 8  L 0 8  L 0 0  L 0 0  L 0 8  L 0 8  L 0 0  L 0 0  N"/>
              </draw:custom-shape>
              <draw:custom-shape draw:style-name="gr108" draw:text-style-name="P50" draw:layer="layout" svg:width="0.075cm" svg:height="0.075cm" svg:x="6.152cm" svg:y="11.28cm">
                <text:p/>
                <draw:enhanced-geometry svg:viewBox="0 0 17 17" draw:type="non-primitive" draw:enhanced-path="M 8 16  L 0 16  L 0 16  L 0 8  L 0 0  L 8 0  L 8 0  L 16 0  L 16 0  L 16 0  L 16 8  L 8 16  L 8 0  L 16 0  L 8 8  L 0 8  L 8 0  L 8 16  N"/>
              </draw:custom-shape>
              <draw:custom-shape draw:style-name="gr108" draw:text-style-name="P50" draw:layer="layout" svg:width="0.075cm" svg:height="0.075cm" svg:x="6.134cm" svg:y="11.28cm">
                <text:p/>
                <draw:enhanced-geometry svg:viewBox="0 0 17 17" draw:type="non-primitive" draw:enhanced-path="M 0 16  L 0 16  L 16 16  L 16 8  L 16 0  L 16 0  L 16 0  L 0 0  L 0 0  L 16 0  L 0 8  L 0 8  L 0 16  N"/>
              </draw:custom-shape>
              <draw:custom-shape draw:style-name="gr119" draw:text-style-name="P57" draw:layer="layout" svg:width="0.004cm" svg:height="0.075cm" svg:x="6.359cm" svg:y="11.267cm">
                <text:p/>
                <draw:enhanced-geometry svg:viewBox="0 0 1 17" draw:type="non-primitive" draw:enhanced-path="M 0 0  L 0 0  L 0 2  L 0 13  L 0 14  L 0 16  L 0 14  L 0 13  L 0 2  L 0 1  L 0 1  L 0 0  N"/>
              </draw:custom-shape>
              <draw:custom-shape draw:style-name="gr113" draw:text-style-name="P49" draw:layer="layout" svg:width="0.075cm" svg:height="0.075cm" svg:x="6.368cm" svg:y="11.262cm">
                <text:p/>
  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  </draw:custom-shape>
              <draw:custom-shape draw:style-name="gr122" draw:text-style-name="P59" draw:layer="layout" svg:width="0.075cm" svg:height="0.075cm" svg:x="6.368cm" svg:y="11.267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3" draw:text-style-name="P48" draw:layer="layout" svg:width="0.075cm" svg:height="0.075cm" svg:x="6.372cm" svg:y="11.267cm">
                <text:p/>
                <draw:enhanced-geometry svg:viewBox="0 0 17 17" draw:type="non-primitive" draw:enhanced-path="M 1 0  L 0 1  L 0 14  L 1 16  L 14 16  L 16 14  L 16 1  L 14 0  L 1 0  N"/>
              </draw:custom-shape>
              <draw:custom-shape draw:style-name="gr108" draw:text-style-name="P50" draw:layer="layout" svg:width="0.075cm" svg:height="0.075cm" svg:x="6.39cm" svg:y="11.276cm">
                <text:p/>
                <draw:enhanced-geometry svg:viewBox="0 0 17 17" draw:type="non-primitive" draw:enhanced-path="M 2 0  L 0 0  L 0 16  L 2 16  L 14 16  L 16 16  L 16 3  L 14 0  L 2 0  N"/>
              </draw:custom-shape>
              <draw:custom-shape draw:style-name="gr125" draw:text-style-name="P2" draw:layer="layout" svg:width="0.074cm" svg:height="0.075cm" svg:x="6.399cm" svg:y="11.289cm">
                <text:p/>
                <draw:enhanced-geometry svg:viewBox="0 0 17 17" draw:type="non-primitive" draw:enhanced-path="M 10 0  L 10 4  L 10 4  L 16 8  L 16 8  L 10 12  L 10 16  L 5 16  L 0 12  L 0 8  L 0 8  L 0 4  L 5 4  L 10 0  N"/>
              </draw:custom-shape>
              <draw:line draw:style-name="gr7" draw:text-style-name="P14" draw:layer="layout" svg:x1="6.429cm" svg:y1="11.289cm" svg:x2="6.429cm" svg:y2="11.307cm">
                <text:p/>
              </draw:line>
              <draw:custom-shape draw:style-name="gr103" draw:text-style-name="P48" draw:layer="layout" svg:width="0.203cm" svg:height="0.075cm" svg:x="6.231cm" svg:y="11.245cm">
                <text:p/>
                <draw:enhanced-geometry svg:viewBox="0 0 46 17" draw:type="non-primitive" draw:enhanced-path="M 0 16  L 45 16  L 45 0  L 0 0  L 0 16  N"/>
              </draw:custom-shape>
              <draw:custom-shape draw:style-name="gr103" draw:text-style-name="P48" draw:layer="layout" svg:width="0.075cm" svg:height="0.004cm" svg:x="6.231cm" svg:y="11.32cm">
                <text:p/>
                <draw:enhanced-geometry svg:viewBox="0 0 17 1" draw:type="non-primitive" draw:enhanced-path="M 0 0  L 0 0  L 0 0  L 16 0  L 16 0  L 16 0  L 16 0  L 16 0  L 0 0  L 0 0  L 0 0  N"/>
              </draw:custom-shape>
              <draw:custom-shape draw:style-name="gr103" draw:text-style-name="P48" draw:layer="layout" svg:width="0.075cm" svg:height="0.075cm" svg:x="6.443cm" svg:y="11.262cm">
                <text:p/>
  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  </draw:custom-shape>
              <draw:custom-shape draw:style-name="gr108" draw:text-style-name="P50" draw:layer="layout" svg:width="0.075cm" svg:height="0.075cm" svg:x="6.271cm" svg:y="11.262cm">
                <text:p/>
                <draw:enhanced-geometry svg:viewBox="0 0 17 17" draw:type="non-primitive" draw:enhanced-path="M 8 0  L 12 0  L 13 1  L 15 1  L 15 2  L 15 5  L 16 6  L 16 6  L 16 9  L 16 10  L 15 12  L 15 13  L 14 14  L 13 16  L 13 16  L 12 16  L 0 16  L 8 0  N"/>
              </draw:custom-shape>
              <draw:custom-shape draw:style-name="gr110" draw:text-style-name="P52" draw:layer="layout" svg:width="0.005cm" svg:height="0.075cm" svg:x="6.31cm" svg:y="11.245cm">
                <text:p/>
                <draw:enhanced-geometry svg:viewBox="0 0 1 17" draw:type="non-primitive" draw:enhanced-path="M 0 16  L 0 16  L 0 0  L 0 16  N"/>
              </draw:custom-shape>
              <draw:custom-shape draw:style-name="gr110" draw:text-style-name="P52" draw:layer="layout" svg:width="0.005cm" svg:height="0.075cm" svg:x="6.332cm" svg:y="11.262cm">
                <text:p/>
  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  </draw:custom-shape>
              <draw:custom-shape draw:style-name="gr110" draw:text-style-name="P52" draw:layer="layout" svg:width="0.075cm" svg:height="0.075cm" svg:x="6.332cm" svg:y="11.284cm">
                <text:p/>
                <draw:enhanced-geometry svg:viewBox="0 0 17 17" draw:type="non-primitive" draw:enhanced-path="M 0 0  L 0 16  L 16 16  L 16 0  L 0 0  N"/>
              </draw:custom-shape>
              <draw:custom-shape draw:style-name="gr110" draw:text-style-name="P52" draw:layer="layout" svg:width="0.005cm" svg:height="0.074cm" svg:x="6.332cm" svg:y="11.307cm">
                <text:p/>
  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  </draw:custom-shape>
              <draw:custom-shape draw:style-name="gr110" draw:text-style-name="P52" draw:layer="layout" svg:width="0.005cm" svg:height="0.075cm" svg:x="6.31cm" svg:y="11.32cm">
                <text:p/>
                <draw:enhanced-geometry svg:viewBox="0 0 1 17" draw:type="non-primitive" draw:enhanced-path="M 0 0  L 0 0  L 0 16  L 0 16  L 0 0  N"/>
              </draw:custom-shape>
              <draw:custom-shape draw:style-name="gr110" draw:text-style-name="P52" draw:layer="layout" svg:width="0.075cm" svg:height="0.075cm" svg:x="6.271cm" svg:y="11.32cm">
                <text:p/>
                <draw:enhanced-geometry svg:viewBox="0 0 17 17" draw:type="non-primitive" draw:enhanced-path="M 0 16  L 0 0  L 16 0  L 16 16  L 0 16  L 0 16  L 0 16  L 0 0  L 0 16  N"/>
              </draw:custom-shape>
              <draw:custom-shape draw:style-name="gr110" draw:text-style-name="P52" draw:layer="layout" svg:width="0.075cm" svg:height="0.075cm" svg:x="6.253cm" svg:y="11.262cm">
                <text:p/>
                <draw:enhanced-geometry svg:viewBox="0 0 17 17" draw:type="non-primitive" draw:enhanced-path="M 5 0  L 16 0  L 5 16  L 0 16  L 5 0  L 5 1  L 5 0  L 16 0  L 5 0  N"/>
              </draw:custom-shape>
              <draw:custom-shape draw:style-name="gr110" draw:text-style-name="P52" draw:layer="layout" svg:width="0.075cm" svg:height="0.075cm" svg:x="6.271cm" svg:y="11.245cm">
                <text:p/>
                <draw:enhanced-geometry svg:viewBox="0 0 17 17" draw:type="non-primitive" draw:enhanced-path="M 16 16  L 0 16  L 16 0  L 16 16  N"/>
              </draw:custom-shape>
              <draw:custom-shape draw:style-name="gr117" draw:text-style-name="P56" draw:layer="layout" svg:width="0.075cm" svg:height="0.075cm" svg:x="6.301cm" svg:y="11.276cm">
                <text:p/>
                <draw:enhanced-geometry svg:viewBox="0 0 17 17" draw:type="non-primitive" draw:enhanced-path="M 8 0  L 0 14  L 0 16  L 4 16  L 4 14  L 16 0  L 8 0  N"/>
              </draw:custom-shape>
              <draw:custom-shape draw:style-name="gr117" draw:text-style-name="P56" draw:layer="layout" svg:width="0.075cm" svg:height="0.075cm" svg:x="6.319cm" svg:y="11.276cm">
                <text:p/>
                <draw:enhanced-geometry svg:viewBox="0 0 17 17" draw:type="non-primitive" draw:enhanced-path="M 10 0  L 0 14  L 0 16  L 10 16  L 10 14  L 16 5  L 16 5  L 16 3  L 16 1  L 10 0  N"/>
              </draw:custom-shape>
              <draw:custom-shape draw:style-name="gr129" draw:text-style-name="P2" draw:layer="layout" svg:width="0.075cm" svg:height="0.074cm" svg:x="6.332cm" svg:y="11.307cm">
                <text:p/>
                <draw:enhanced-geometry svg:viewBox="0 0 17 17" draw:type="non-primitive" draw:enhanced-path="M 16 0  L 16 5  L 16 5  L 13 10  L 11 13  L 4 16  L 0 16  N"/>
              </draw:custom-shape>
              <draw:custom-shape draw:style-name="gr129" draw:text-style-name="P2" draw:layer="layout" svg:width="0.075cm" svg:height="0.075cm" svg:x="6.279cm" svg:y="11.267cm">
                <text:p/>
                <draw:enhanced-geometry svg:viewBox="0 0 17 17" draw:type="non-primitive" draw:enhanced-path="M 0 0  L 12 0  L 14 0  L 16 16  N"/>
              </draw:custom-shape>
              <draw:custom-shape draw:style-name="gr122" draw:text-style-name="P59" draw:layer="layout" svg:width="0.075cm" svg:height="0.075cm" svg:x="6.262cm" svg:y="11.276cm">
                <text:p/>
                <draw:enhanced-geometry svg:viewBox="0 0 17 17" draw:type="non-primitive" draw:enhanced-path="M 8 0  L 0 1  L 0 8  L 0 14  L 8 16  L 16 10  L 16 8  L 16 1  L 8 1  L 8 0  N"/>
              </draw:custom-shape>
              <draw:custom-shape draw:style-name="gr117" draw:text-style-name="P56" draw:layer="layout" svg:width="0.075cm" svg:height="0.075cm" svg:x="6.275cm" svg:y="11.276cm">
                <text:p/>
                <draw:enhanced-geometry svg:viewBox="0 0 17 17" draw:type="non-primitive" draw:enhanced-path="M 9 0  L 0 12  L 0 16  L 9 16  L 9 14  L 16 0  L 9 0  N"/>
              </draw:custom-shape>
            </draw:g>
          </draw:g>
          <draw:g draw:style-name="gr4">
            <draw:custom-shape draw:style-name="gr146" draw:text-style-name="P2" draw:layer="layout" svg:width="2.166cm" svg:height="1.963cm" svg:x="15.147cm" svg:y="11.906cm">
              <text:p/>
              <draw:enhanced-geometry svg:viewBox="0 0 491 445" draw:type="non-primitive" draw:enhanced-path="M 490 0  L 490 444  L 0 444  N"/>
            </draw:custom-shape>
            <draw:custom-shape draw:style-name="gr147" draw:text-style-name="P2" draw:layer="layout" svg:width="0.41cm" svg:height="2.689cm" svg:x="15.064cm" svg:y="10.941cm">
              <text:p/>
              <draw:enhanced-geometry svg:viewBox="0 0 93 610" draw:type="non-primitive" draw:enhanced-path="M 92 0  L 92 609  L 0 609  N"/>
            </draw:custom-shape>
            <draw:custom-shape draw:style-name="gr148" draw:text-style-name="P2" draw:layer="layout" svg:width="1.464cm" svg:height="2.135cm" svg:x="14.887cm" svg:y="11.615cm">
              <text:p/>
              <draw:enhanced-geometry svg:viewBox="0 0 332 484" draw:type="non-primitive" draw:enhanced-path="M 331 0  L 331 483  L 0 483  N"/>
            </draw:custom-shape>
            <draw:g draw:style-name="gr4">
              <draw:custom-shape draw:style-name="gr149" draw:text-style-name="P2" draw:layer="layout" svg:width="7.39cm" svg:height="2.439cm" svg:x="14.676cm" svg:y="12.025cm">
                <text:p/>
                <draw:enhanced-geometry svg:viewBox="0 0 1676 553" draw:type="non-primitive" draw:enhanced-path="M 1675 0  L 1675 552  L 0 552  N"/>
              </draw:custom-shape>
              <draw:custom-shape draw:style-name="gr95" draw:text-style-name="P2" draw:layer="layout" svg:width="4.238cm" svg:height="1.328cm" svg:x="15.006cm" svg:y="12.779cm">
                <text:p/>
                <draw:enhanced-geometry svg:viewBox="0 0 961 301" draw:type="non-primitive" draw:enhanced-path="M 960 0  L 960 300  L 0 300  N"/>
              </draw:custom-shape>
              <draw:custom-shape draw:style-name="gr150" draw:text-style-name="P2" draw:layer="layout" svg:width="3.157cm" svg:height="1.579cm" svg:x="15.064cm" svg:y="12.409cm">
                <text:p/>
                <draw:enhanced-geometry svg:viewBox="0 0 716 358" draw:type="non-primitive" draw:enhanced-path="M 715 0  L 715 357  L 0 357  N"/>
              </draw:custom-shape>
              <draw:custom-shape draw:style-name="gr151" draw:text-style-name="P2" draw:layer="layout" svg:width="5.459cm" svg:height="1.433cm" svg:x="14.711cm" svg:y="12.793cm">
                <text:p/>
                <draw:enhanced-geometry svg:viewBox="0 0 1238 325" draw:type="non-primitive" draw:enhanced-path="M 1237 0  L 1237 324  L 0 324  N"/>
              </draw:custom-shape>
              <draw:custom-shape draw:style-name="gr152" draw:text-style-name="P2" draw:layer="layout" svg:width="6.355cm" svg:height="2.174cm" svg:x="14.781cm" svg:y="12.171cm">
                <text:p/>
                <draw:enhanced-geometry svg:viewBox="0 0 1441 493" draw:type="non-primitive" draw:enhanced-path="M 1440 0  L 1440 492  L 0 492  N"/>
              </draw:custom-shape>
              <draw:custom-shape draw:style-name="gr153" draw:text-style-name="P2" draw:layer="layout" svg:width="8.096cm" svg:height="3.179cm" svg:x="14.768cm" svg:y="11.404cm">
                <text:p/>
                <draw:enhanced-geometry svg:viewBox="0 0 1836 721" draw:type="non-primitive" draw:enhanced-path="M 1835 0  L 1835 720  L 0 720  N"/>
              </draw:custom-shape>
              <draw:custom-shape draw:style-name="gr154" draw:text-style-name="P21" draw:layer="layout" svg:width="6.813cm" svg:height="0.934cm" svg:x="16.327cm" svg:y="14.777cm">
                <text:list text:style-name="L15">
                  <text:list-header>
                    <text:p text:style-name="P20"><text:span text:style-name="T31">Compaq ProLiant 4000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55" draw:text-style-name="P21" draw:layer="layout" svg:width="0.836cm" svg:height="0.934cm" svg:x="21cm" svg:y="9.384cm">
                <text:list text:style-name="L16">
                  <text:list-header>
                    <text:p text:style-name="P20"><text:span text:style-name="T32">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frame draw:style-name="gr9" draw:text-style-name="P15" draw:layer="layout" svg:width="8.304cm" svg:height="3.995cm" svg:x="15.028cm" svg:y="9.075cm">
                <draw:image xlink:href="Pictures/1003B36A000069E600002D79F3B5F317.wmf" xlink:type="simple" xlink:show="embed" xlink:actuate="onLoad" draw:mime-type="image/x-wmf">
                  <text:p/>
                </draw:image>
                <draw:image xlink:href="Pictures/1000000100000401000001B87491DE35.png" xlink:type="simple" xlink:show="embed" xlink:actuate="onLoad" draw:mime-type="image/png"/>
              </draw:frame>
            </draw:g>
          </draw:g>
          <draw:g draw:style-name="gr4">
            <draw:custom-shape draw:style-name="gr156" draw:text-style-name="P62" draw:layer="layout" svg:width="4.137cm" svg:height="1.217cm" svg:x="11.09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157" draw:text-style-name="P21" draw:layer="layout" svg:width="2.935cm" svg:height="0.934cm" svg:x="11.722cm" svg:y="13.741cm">
              <text:list text:style-name="L14">
                <text:list-header>
                  <text:p text:style-name="P20"><text:span text:style-name="T33">10base 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frame draw:style-name="gr9" draw:text-style-name="P15" draw:layer="layout" svg:width="1.557cm" svg:height="1.61cm" svg:x="10.72cm" svg:y="15.253cm">
              <draw:image xlink:href="Pictures/100016C2000069FE0000618B4635E028.wmf" xlink:type="simple" xlink:show="embed" xlink:actuate="onLoad" draw:mime-type="image/x-wmf">
                <text:p/>
              </draw:image>
              <draw:image xlink:href="Pictures/10000001000002E1000002A6C98D981B.png" xlink:type="simple" xlink:show="embed" xlink:actuate="onLoad" draw:mime-type="image/png"/>
            </draw:frame>
            <draw:frame draw:style-name="gr9" draw:text-style-name="P15" draw:layer="layout" svg:width="1.556cm" svg:height="1.61cm" svg:x="12.365cm" svg:y="15.253cm">
              <draw:image xlink:href="Pictures/100016C2000069FE0000618B4635E028.wmf" xlink:type="simple" xlink:show="embed" xlink:actuate="onLoad" draw:mime-type="image/x-wmf">
                <text:p/>
              </draw:image>
              <draw:image xlink:href="Pictures/10000001000002E1000002A6C98D981B.png" xlink:type="simple" xlink:show="embed" xlink:actuate="onLoad" draw:mime-type="image/png"/>
            </draw:frame>
            <draw:frame draw:style-name="gr9" draw:text-style-name="P15" draw:layer="layout" svg:width="1.556cm" svg:height="1.61cm" svg:x="14.107cm" svg:y="15.306cm">
              <draw:image xlink:href="Pictures/100016C2000069FE0000618B4635E028.wmf" xlink:type="simple" xlink:show="embed" xlink:actuate="onLoad" draw:mime-type="image/x-wmf">
                <text:p/>
              </draw:image>
              <draw:image xlink:href="Pictures/10000001000002E1000002A6C98D981B.png" xlink:type="simple" xlink:show="embed" xlink:actuate="onLoad" draw:mime-type="image/png"/>
            </draw:frame>
          </draw:g>
          <draw:g draw:style-name="gr4">
            <draw:custom-shape draw:style-name="gr158" draw:text-style-name="P46" draw:layer="layout" svg:width="0.684cm" svg:height="1.265cm" svg:x="12.638cm" svg:y="10.985cm">
              <text:p/>
              <draw:enhanced-geometry svg:viewBox="0 0 155 287" draw:type="non-primitive" draw:enhanced-path="M 2 0  L 151 0  L 152 0  L 154 2  L 154 4  L 154 282  L 154 284  L 152 285  L 151 286  L 2 286  L 0 285  L 0 284  L 0 282  L 0 4  L 0 2  L 0 0  L 2 0  N"/>
            </draw:custom-shape>
            <draw:custom-shape draw:style-name="gr159" draw:text-style-name="P47" draw:layer="layout" svg:width="0.684cm" svg:height="0.075cm" svg:x="12.638cm" svg:y="12.069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2.034cm">
              <text:p/>
              <draw:enhanced-geometry svg:viewBox="0 0 155 17" draw:type="non-primitive" draw:enhanced-path="M 0 0  L 154 0  L 154 16  L 0 16  L 0 0  N"/>
            </draw:custom-shape>
            <draw:custom-shape draw:style-name="gr160" draw:text-style-name="P33" draw:layer="layout" svg:width="0.684cm" svg:height="0.075cm" svg:x="12.638cm" svg:y="11.994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994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95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911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871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827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792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756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708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673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628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593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545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509cm">
              <text:p/>
              <draw:enhanced-geometry svg:viewBox="0 0 155 17" draw:type="non-primitive" draw:enhanced-path="M 0 0  L 154 0  L 154 16  L 0 16  L 0 0  N"/>
            </draw:custom-shape>
            <draw:custom-shape draw:style-name="gr159" draw:text-style-name="P47" draw:layer="layout" svg:width="0.684cm" svg:height="0.075cm" svg:x="12.638cm" svg:y="11.47cm">
              <text:p/>
              <draw:enhanced-geometry svg:viewBox="0 0 155 17" draw:type="non-primitive" draw:enhanced-path="M 0 0  L 154 0  L 154 16  L 0 16  L 0 0  N"/>
            </draw:custom-shape>
            <draw:custom-shape draw:style-name="gr103" draw:text-style-name="P48" draw:layer="layout" svg:width="0.489cm" svg:height="0.093cm" svg:x="12.48cm" svg:y="12.197cm">
              <text:p/>
              <draw:enhanced-geometry svg:viewBox="0 0 111 21" draw:type="non-primitive" draw:enhanced-path="M 35 0  L 31 0  L 31 9  L 0 17  L 0 20  L 110 20  L 110 14  L 35 14  L 35 0  N"/>
            </draw:custom-shape>
            <draw:custom-shape draw:style-name="gr103" draw:text-style-name="P48" draw:layer="layout" svg:width="0.489cm" svg:height="0.093cm" svg:x="13cm" svg:y="12.197cm">
              <text:p/>
              <draw:enhanced-geometry svg:viewBox="0 0 111 21" draw:type="non-primitive" draw:enhanced-path="M 74 0  L 79 0  L 79 9  L 110 17  L 110 20  L 0 20  L 0 14  L 74 14  L 74 0  N"/>
            </draw:custom-shape>
            <draw:custom-shape draw:style-name="gr161" draw:text-style-name="P2" draw:layer="layout" svg:width="0.468cm" svg:height="0.445cm" svg:x="12.766cm" svg:y="11.805cm">
              <text:p/>
              <draw:enhanced-geometry svg:viewBox="0 0 106 101" draw:type="non-primitive" draw:enhanced-path="M 0 1  L 0 100  L 105 100  L 105 0  N"/>
            </draw:custom-shape>
            <draw:custom-shape draw:style-name="gr162" draw:text-style-name="P46" draw:layer="layout" svg:width="0.684cm" svg:height="0.939cm" svg:x="12.638cm" svg:y="9.944cm">
              <text:p/>
              <draw:enhanced-geometry svg:viewBox="0 0 155 213" draw:type="non-primitive" draw:enhanced-path="M 3 212  L 150 212  L 152 212  L 153 210  L 154 208  L 154 5  L 153 3  L 152 1  L 151 1  L 3 0  L 1 1  L 0 2  L 0 5  L 0 208  L 0 210  L 1 212  L 3 212  N"/>
            </draw:custom-shape>
            <draw:custom-shape draw:style-name="gr163" draw:text-style-name="P46" draw:layer="layout" svg:width="0.547cm" svg:height="0.577cm" svg:x="12.709cm" svg:y="10.222cm">
              <text:p/>
              <draw:enhanced-geometry svg:viewBox="0 0 124 131" draw:type="non-primitive" draw:enhanced-path="M 5 130  L 118 130  L 119 130  L 121 129  L 122 128  L 123 126  L 123 124  L 123 6  L 123 4  L 122 2  L 121 0  L 119 0  L 118 0  L 5 0  L 3 0  L 2 0  L 1 2  L 0 4  L 0 6  L 0 124  L 0 126  L 0 127  L 2 129  L 3 130  L 5 130  N"/>
            </draw:custom-shape>
            <draw:custom-shape draw:style-name="gr164" draw:text-style-name="P49" draw:layer="layout" svg:width="0.547cm" svg:height="0.075cm" svg:x="12.722cm" svg:y="10.385cm">
              <text:p/>
              <draw:enhanced-geometry svg:viewBox="0 0 124 17" draw:type="non-primitive" draw:enhanced-path="M 0 0  L 123 0  L 123 16  L 0 16  L 0 0  N"/>
            </draw:custom-shape>
            <draw:custom-shape draw:style-name="gr165" draw:text-style-name="P49" draw:layer="layout" svg:width="0.551cm" svg:height="0.075cm" svg:x="12.722cm" svg:y="10.557cm">
              <text:p/>
              <draw:enhanced-geometry svg:viewBox="0 0 125 17" draw:type="non-primitive" draw:enhanced-path="M 0 0  L 124 0  L 124 16  L 0 16  L 0 0  N"/>
            </draw:custom-shape>
            <draw:custom-shape draw:style-name="gr166" draw:text-style-name="P50" draw:layer="layout" svg:width="0.533cm" svg:height="0.133cm" svg:x="12.718cm" svg:y="10.239cm">
              <text:p/>
              <draw:enhanced-geometry svg:viewBox="0 0 121 30" draw:type="non-primitive" draw:enhanced-path="M 2 29  L 118 29  L 119 29  L 120 27  L 120 3  L 120 1  L 118 0  L 2 0  L 0 1  L 0 2  L 0 27  L 0 28  L 1 29  L 2 29  N"/>
            </draw:custom-shape>
            <draw:custom-shape draw:style-name="gr109" draw:text-style-name="P51" draw:layer="layout" svg:width="0.194cm" svg:height="0.088cm" svg:x="12.859cm" svg:y="10.248cm">
              <text:p/>
              <draw:enhanced-geometry svg:viewBox="0 0 44 20" draw:type="non-primitive" draw:enhanced-path="M 1 0  L 41 0  L 42 0  L 43 2  L 43 17  L 42 19  L 41 19  L 1 19  L 0 19  L 0 17  L 0 2  L 0 0  L 1 0  N"/>
            </draw:custom-shape>
            <draw:custom-shape draw:style-name="gr110" draw:text-style-name="P52" draw:layer="layout" svg:width="0.075cm" svg:height="0.005cm" svg:x="13.145cm" svg:y="10.248cm">
              <text:p/>
              <draw:enhanced-geometry svg:viewBox="0 0 17 1" draw:type="non-primitive" draw:enhanced-path="M 1 0  L 14 0  L 14 0  L 16 0  L 14 0  L 1 0  L 1 0  L 0 0  L 1 0  N"/>
            </draw:custom-shape>
            <draw:custom-shape draw:style-name="gr108" draw:text-style-name="P50" draw:layer="layout" svg:width="0.075cm" svg:height="0.005cm" svg:x="13.145cm" svg:y="10.248cm">
              <text:p/>
              <draw:enhanced-geometry svg:viewBox="0 0 17 1" draw:type="non-primitive" draw:enhanced-path="M 1 0  L 14 0  L 16 0  L 16 0  L 14 0  L 1 0  L 0 0  L 0 0  L 1 0  N"/>
            </draw:custom-shape>
            <draw:custom-shape draw:style-name="gr111" draw:text-style-name="P47" draw:layer="layout" svg:width="0.49cm" svg:height="0.004cm" svg:x="12.744cm" svg:y="10.288cm">
              <text:p/>
              <draw:enhanced-geometry svg:viewBox="0 0 111 1" draw:type="non-primitive" draw:enhanced-path="M 1 0  L 108 0  L 110 0  L 110 0  L 110 0  L 110 0  L 108 0  L 1 0  L 0 0  L 0 0  L 0 0  L 0 0  L 1 0  N"/>
            </draw:custom-shape>
            <draw:custom-shape draw:style-name="gr167" draw:text-style-name="P50" draw:layer="layout" svg:width="0.529cm" svg:height="0.141cm" svg:x="12.722cm" svg:y="10.398cm">
              <text:p/>
              <draw:enhanced-geometry svg:viewBox="0 0 120 32" draw:type="non-primitive" draw:enhanced-path="M 0 31  L 117 31  L 119 31  L 119 29  L 119 3  L 118 1  L 117 0  L 0 0  L 0 1  L 0 3  L 0 29  L 0 31  L 0 31  N"/>
            </draw:custom-shape>
            <draw:custom-shape draw:style-name="gr109" draw:text-style-name="P51" draw:layer="layout" svg:width="0.194cm" svg:height="0.101cm" svg:x="12.859cm" svg:y="10.416cm">
              <text:p/>
              <draw:enhanced-geometry svg:viewBox="0 0 44 23" draw:type="non-primitive" draw:enhanced-path="M 2 0  L 40 0  L 42 0  L 43 2  L 43 3  L 43 19  L 43 21  L 41 22  L 40 22  L 2 22  L 0 22  L 0 21  L 0 19  L 0 3  L 0 1  L 1 0  L 2 0  N"/>
            </draw:custom-shape>
            <draw:custom-shape draw:style-name="gr110" draw:text-style-name="P52" draw:layer="layout" svg:width="0.075cm" svg:height="0.004cm" svg:x="13.092cm" svg:y="10.5cm">
              <text:p/>
              <draw:enhanced-geometry svg:viewBox="0 0 17 1" draw:type="non-primitive" draw:enhanced-path="M 2 0  L 13 0  L 13 0  L 16 0  L 16 0  L 14 0  L 13 0  L 2 0  L 1 0  L 0 0  L 0 0  L 1 0  L 2 0  N"/>
            </draw:custom-shape>
            <draw:custom-shape draw:style-name="gr108" draw:text-style-name="P50" draw:layer="layout" svg:width="0.075cm" svg:height="0.004cm" svg:x="13.092cm" svg:y="10.5cm">
              <text:p/>
              <draw:enhanced-geometry svg:viewBox="0 0 17 1" draw:type="non-primitive" draw:enhanced-path="M 2 0  L 13 0  L 13 0  L 16 0  L 16 0  L 14 0  L 13 0  L 2 0  L 1 0  L 0 0  L 0 0  L 1 0  L 2 0  N"/>
            </draw:custom-shape>
            <draw:custom-shape draw:style-name="gr112" draw:text-style-name="P53" draw:layer="layout" svg:width="0.304cm" svg:height="0.075cm" svg:x="12.846cm" svg:y="10.433cm">
              <text:p/>
              <draw:enhanced-geometry svg:viewBox="0 0 69 17" draw:type="non-primitive" draw:enhanced-path="M 0 16  L 23 16  L 23 16  L 46 16  L 46 16  L 68 16  L 68 8  L 46 8  L 46 0  L 24 0  L 24 0  L 0 0  L 0 16  N"/>
            </draw:custom-shape>
            <draw:custom-shape draw:style-name="gr168" draw:text-style-name="P49" draw:layer="layout" svg:width="0.525cm" svg:height="0.075cm" svg:x="12.722cm" svg:y="10.597cm">
              <text:p/>
              <draw:enhanced-geometry svg:viewBox="0 0 119 17" draw:type="non-primitive" draw:enhanced-path="M 0 16  L 118 16  L 118 0  L 0 0  L 0 16  N"/>
            </draw:custom-shape>
            <draw:custom-shape draw:style-name="gr169" draw:text-style-name="P35" draw:layer="layout" svg:width="0.529cm" svg:height="0.075cm" svg:x="12.722cm" svg:y="10.579cm">
              <text:p/>
              <draw:enhanced-geometry svg:viewBox="0 0 120 17" draw:type="non-primitive" draw:enhanced-path="M 119 16  L 118 16  L 0 16  L 0 0  L 118 0  L 117 16  L 119 16  L 118 16  L 119 16  N"/>
            </draw:custom-shape>
            <draw:custom-shape draw:style-name="gr114" draw:text-style-name="P35" draw:layer="layout" svg:width="0.075cm" svg:height="0.075cm" svg:x="13.247cm" svg:y="10.597cm">
              <text:p/>
              <draw:enhanced-geometry svg:viewBox="0 0 17 17" draw:type="non-primitive" draw:enhanced-path="M 6 0  L 0 0  L 0 16  L 16 16  L 16 0  L 6 0  L 6 0  L 0 0  L 0 0  L 6 0  N"/>
            </draw:custom-shape>
            <draw:custom-shape draw:style-name="gr169" draw:text-style-name="P35" draw:layer="layout" svg:width="0.529cm" svg:height="0.075cm" svg:x="12.718cm" svg:y="10.597cm">
              <text:p/>
              <draw:enhanced-geometry svg:viewBox="0 0 120 17" draw:type="non-primitive" draw:enhanced-path="M 0 16  L 0 0  L 119 0  L 119 16  L 0 16  L 0 16  L 0 0  L 0 0  L 0 16  N"/>
            </draw:custom-shape>
            <draw:custom-shape draw:style-name="gr114" draw:text-style-name="P35" draw:layer="layout" svg:width="0.075cm" svg:height="0.075cm" svg:x="12.691cm" svg:y="10.597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67" draw:text-style-name="P50" draw:layer="layout" svg:width="0.529cm" svg:height="0.172cm" svg:x="12.722cm" svg:y="10.619cm">
              <text:p/>
              <draw:enhanced-geometry svg:viewBox="0 0 120 39" draw:type="non-primitive" draw:enhanced-path="M 1 0  L 117 0  L 118 0  L 119 1  L 119 2  L 119 35  L 119 36  L 119 37  L 118 37  L 118 38  L 117 38  L 1 38  L 0 38  L 0 38  L 0 37  L 0 36  L 0 35  L 0 2  L 0 1  L 0 0  L 1 0  N"/>
            </draw:custom-shape>
            <draw:custom-shape draw:style-name="gr109" draw:text-style-name="P51" draw:layer="layout" svg:width="0.19cm" svg:height="0.137cm" svg:x="12.854cm" svg:y="10.645cm">
              <text:p/>
              <draw:enhanced-geometry svg:viewBox="0 0 43 31" draw:type="non-primitive" draw:enhanced-path="M 2 0  L 39 0  L 40 0  L 41 1  L 41 2  L 42 3  L 42 3  L 42 27  L 41 28  L 41 29  L 41 30  L 40 30  L 39 30  L 2 30  L 1 30  L 0 29  L 0 28  L 0 27  L 0 3  L 0 3  L 0 2  L 0 1  L 1 0  L 2 0  N"/>
            </draw:custom-shape>
            <draw:custom-shape draw:style-name="gr115" draw:text-style-name="P54" draw:layer="layout" svg:width="0.353cm" svg:height="0.106cm" svg:x="12.881cm" svg:y="10.649cm">
              <text:p/>
              <draw:enhanced-geometry svg:viewBox="0 0 80 24" draw:type="non-primitive" draw:enhanced-path="M 0 0  L 79 0  L 79 16  L 10 16  L 10 23  L 0 23  L 0 0  N"/>
            </draw:custom-shape>
            <draw:custom-shape draw:style-name="gr167" draw:text-style-name="P50" draw:layer="layout" svg:width="0.529cm" svg:height="0.075cm" svg:x="12.722cm" svg:y="10.57cm">
              <text:p/>
              <draw:enhanced-geometry svg:viewBox="0 0 120 17" draw:type="non-primitive" draw:enhanced-path="M 0 16  L 119 16  L 119 0  L 0 0  L 0 16  N"/>
            </draw:custom-shape>
            <draw:custom-shape draw:style-name="gr170" draw:text-style-name="P55" draw:layer="layout" svg:width="0.56cm" svg:height="0.005cm" svg:x="12.709cm" svg:y="10.164cm">
              <text:p/>
              <draw:enhanced-geometry svg:viewBox="0 0 127 1" draw:type="non-primitive" draw:enhanced-path="M 1 0  L 124 0  L 125 0  L 126 0  L 126 0  L 124 0  L 1 0  L 0 0  L 0 0  L 0 0  L 1 0  N"/>
            </draw:custom-shape>
            <draw:custom-shape draw:style-name="gr117" draw:text-style-name="P56" draw:layer="layout" svg:width="0.084cm" svg:height="0.075cm" svg:x="12.744cm" svg:y="10.292cm">
              <text:p/>
              <draw:enhanced-geometry svg:viewBox="0 0 19 17" draw:type="non-primitive" draw:enhanced-path="M 0 16  L 18 16  L 18 12  L 18 0  L 0 0  L 0 4  L 0 16  L 0 16  N"/>
            </draw:custom-shape>
            <draw:custom-shape draw:style-name="gr117" draw:text-style-name="P56" draw:layer="layout" svg:width="0.199cm" svg:height="0.075cm" svg:x="12.854cm" svg:y="10.292cm">
              <text:p/>
              <draw:enhanced-geometry svg:viewBox="0 0 45 17" draw:type="non-primitive" draw:enhanced-path="M 0 16  L 44 16  L 0 0  L 0 16  N"/>
            </draw:custom-shape>
            <draw:custom-shape draw:style-name="gr117" draw:text-style-name="P56" draw:layer="layout" svg:width="0.155cm" svg:height="0.075cm" svg:x="13.079cm" svg:y="10.292cm">
              <text:p/>
              <draw:enhanced-geometry svg:viewBox="0 0 35 17" draw:type="non-primitive" draw:enhanced-path="M 0 16  L 33 16  L 34 12  L 33 0  L 0 0  L 0 12  L 0 16  N"/>
            </draw:custom-shape>
            <draw:custom-shape draw:style-name="gr109" draw:text-style-name="P51" draw:layer="layout" svg:width="0.194cm" svg:height="0.075cm" svg:x="12.859cm" svg:y="10.323cm">
              <text:p/>
              <draw:enhanced-geometry svg:viewBox="0 0 44 17" draw:type="non-primitive" draw:enhanced-path="M 0 0  L 42 0  L 43 0  L 43 16  L 42 16  L 0 16  L 0 16  L 0 0  L 0 0  N"/>
            </draw:custom-shape>
            <draw:custom-shape draw:style-name="gr118" draw:text-style-name="P46" draw:layer="layout" svg:width="0.075cm" svg:height="0.075cm" svg:x="13.154cm" svg:y="10.222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74cm" svg:height="0.075cm" svg:x="13.115cm" svg:y="10.248cm">
              <text:p/>
              <draw:enhanced-geometry svg:viewBox="0 0 17 17" draw:type="non-primitive" draw:enhanced-path="M 4 0  L 0 13  L 0 16  L 13 16  L 16 8  L 5 8  L 4 0  N"/>
            </draw:custom-shape>
            <draw:custom-shape draw:style-name="gr119" draw:text-style-name="P57" draw:layer="layout" svg:width="0.075cm" svg:height="0.075cm" svg:x="12.863cm" svg:y="10.323cm">
              <text:p/>
              <draw:enhanced-geometry svg:viewBox="0 0 17 17" draw:type="non-primitive" draw:enhanced-path="M 16 16  L 0 16  L 0 16  L 0 8  L 0 8  L 0 0  L 16 0  L 16 8  L 16 8  L 16 16  L 16 16  N"/>
            </draw:custom-shape>
            <draw:custom-shape draw:style-name="gr120" draw:text-style-name="P58" draw:layer="layout" svg:width="0.075cm" svg:height="0.075cm" svg:x="12.863cm" svg:y="10.319cm">
              <text:p/>
              <draw:enhanced-geometry svg:viewBox="0 0 17 17" draw:type="non-primitive" draw:enhanced-path="M 16 16  L 0 16  L 0 16  L 0 5  L 0 0  L 16 0  L 16 0  L 16 0  L 16 5  L 16 5  L 16 16  L 16 16  N"/>
            </draw:custom-shape>
            <draw:custom-shape draw:style-name="gr121" draw:text-style-name="P16" draw:layer="layout" svg:width="0.075cm" svg:height="0.075cm" svg:x="12.854cm" svg:y="10.314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5cm" svg:height="0.075cm" svg:x="12.788cm" svg:y="10.164cm">
              <text:p/>
              <draw:enhanced-geometry svg:viewBox="0 0 1 17" draw:type="non-primitive" draw:enhanced-path="M 0 16  L 0 16  L 0 16  L 0 12  L 0 4  L 0 0  L 0 0  L 0 4  L 0 12  L 0 16  L 0 16  N"/>
            </draw:custom-shape>
            <draw:custom-shape draw:style-name="gr120" draw:text-style-name="P58" draw:layer="layout" svg:width="0.005cm" svg:height="0.075cm" svg:x="12.788cm" svg:y="10.164cm">
              <text:p/>
              <draw:enhanced-geometry svg:viewBox="0 0 1 17" draw:type="non-primitive" draw:enhanced-path="M 0 16  L 0 16  L 0 12  L 0 4  L 0 4  L 0 0  L 0 0  L 0 4  L 0 4  L 0 12  L 0 12  L 0 16  N"/>
            </draw:custom-shape>
            <draw:line draw:style-name="gr60" draw:text-style-name="P14" draw:layer="layout" svg:x1="12.788cm" svg:y1="10.182cm" svg:x2="12.797cm" svg:y2="10.182cm">
              <text:p/>
            </draw:line>
            <draw:custom-shape draw:style-name="gr119" draw:text-style-name="P57" draw:layer="layout" svg:width="0.005cm" svg:height="0.075cm" svg:x="13.145cm" svg:y="10.164cm">
              <text:p/>
              <draw:enhanced-geometry svg:viewBox="0 0 1 17" draw:type="non-primitive" draw:enhanced-path="M 0 16  L 0 16  L 0 16  L 0 12  L 0 4  L 0 0  L 0 0  L 0 4  L 0 4  L 0 12  L 0 16  N"/>
            </draw:custom-shape>
            <draw:custom-shape draw:style-name="gr120" draw:text-style-name="P58" draw:layer="layout" svg:width="0.075cm" svg:height="0.075cm" svg:x="13.141cm" svg:y="10.164cm">
              <text:p/>
              <draw:enhanced-geometry svg:viewBox="0 0 17 17" draw:type="non-primitive" draw:enhanced-path="M 16 16  L 0 16  L 0 16  L 0 8  L 0 0  L 0 0  L 16 0  L 16 8  L 16 16  N"/>
            </draw:custom-shape>
            <draw:custom-shape draw:style-name="gr121" draw:text-style-name="P16" draw:layer="layout" svg:width="0.075cm" svg:height="0.075cm" svg:x="13.123cm" svg:y="10.156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75cm" svg:height="0.075cm" svg:x="12.863cm" svg:y="10.5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75cm" svg:height="0.075cm" svg:x="12.863cm" svg:y="10.495cm">
              <text:p/>
              <draw:enhanced-geometry svg:viewBox="0 0 17 17" draw:type="non-primitive" draw:enhanced-path="M 16 16  L 0 16  L 0 16  L 0 8  L 0 0  L 16 0  L 16 0  L 16 0  L 16 8  L 16 16  L 16 16  N"/>
            </draw:custom-shape>
            <draw:custom-shape draw:style-name="gr121" draw:text-style-name="P16" draw:layer="layout" svg:width="0.075cm" svg:height="0.075cm" svg:x="12.854cm" svg:y="10.491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4cm" svg:height="0.075cm" svg:x="12.753cm" svg:y="10.769cm">
              <text:p/>
              <draw:enhanced-geometry svg:viewBox="0 0 1 17" draw:type="non-primitive" draw:enhanced-path="M 0 16  L 0 16  L 0 10  L 0 10  L 0 5  L 0 5  L 0 0  L 0 0  L 0 0  L 0 5  L 0 5  L 0 5  L 0 10  L 0 16  L 0 16  N"/>
            </draw:custom-shape>
            <draw:line draw:style-name="gr60" draw:text-style-name="P14" draw:layer="layout" svg:x1="12.762cm" svg:y1="10.791cm" svg:x2="12.779cm" svg:y2="10.791cm">
              <text:p/>
            </draw:line>
            <draw:line draw:style-name="gr60" draw:text-style-name="P14" draw:layer="layout" svg:x1="12.762cm" svg:y1="10.791cm" svg:x2="12.779cm" svg:y2="10.791cm">
              <text:p/>
            </draw:line>
            <draw:line draw:style-name="gr60" draw:text-style-name="P14" draw:layer="layout" svg:x1="12.762cm" svg:y1="10.791cm" svg:x2="12.779cm" svg:y2="10.791cm">
              <text:p/>
            </draw:line>
            <draw:line draw:style-name="gr60" draw:text-style-name="P14" draw:layer="layout" svg:x1="12.762cm" svg:y1="10.791cm" svg:x2="12.779cm" svg:y2="10.791cm">
              <text:p/>
            </draw:line>
            <draw:line draw:style-name="gr60" draw:text-style-name="P14" draw:layer="layout" svg:x1="12.762cm" svg:y1="10.791cm" svg:x2="12.779cm" svg:y2="10.791cm">
              <text:p/>
            </draw:line>
            <draw:line draw:style-name="gr60" draw:text-style-name="P14" draw:layer="layout" svg:x1="12.762cm" svg:y1="10.791cm" svg:x2="12.779cm" svg:y2="10.791cm">
              <text:p/>
            </draw:line>
            <draw:line draw:style-name="gr60" draw:text-style-name="P14" draw:layer="layout" svg:x1="12.762cm" svg:y1="10.791cm" svg:x2="12.779cm" svg:y2="10.791cm">
              <text:p/>
            </draw:line>
            <draw:custom-shape draw:style-name="gr120" draw:text-style-name="P58" draw:layer="layout" svg:width="0.075cm" svg:height="0.075cm" svg:x="12.753cm" svg:y="10.764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custom-shape draw:style-name="gr120" draw:text-style-name="P58" draw:layer="layout" svg:width="0.075cm" svg:height="0.075cm" svg:x="12.753cm" svg:y="10.764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line draw:style-name="gr60" draw:text-style-name="P14" draw:layer="layout" svg:x1="12.762cm" svg:y1="10.786cm" svg:x2="12.779cm" svg:y2="10.786cm">
              <text:p/>
            </draw:line>
            <draw:custom-shape draw:style-name="gr120" draw:text-style-name="P58" draw:layer="layout" svg:width="0.075cm" svg:height="0.075cm" svg:x="12.753cm" svg:y="10.755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12.762cm" svg:y1="10.782cm" svg:x2="12.779cm" svg:y2="10.782cm">
              <text:p/>
            </draw:line>
            <draw:custom-shape draw:style-name="gr121" draw:text-style-name="P16" draw:layer="layout" svg:width="0.075cm" svg:height="0.075cm" svg:x="12.744cm" svg:y="10.764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472cm" svg:height="0.075cm" svg:x="12.753cm" svg:y="10.275cm">
              <text:p/>
              <draw:enhanced-geometry svg:viewBox="0 0 107 17" draw:type="non-primitive" draw:enhanced-path="M 0 16  L 0 0  L 106 0  L 106 16  L 0 16  N"/>
            </draw:custom-shape>
            <draw:custom-shape draw:style-name="gr117" draw:text-style-name="P56" draw:layer="layout" svg:width="0.075cm" svg:height="0.075cm" svg:x="12.841cm" svg:y="10.257cm">
              <text:p/>
              <draw:enhanced-geometry svg:viewBox="0 0 17 17" draw:type="non-primitive" draw:enhanced-path="M 6 0  L 0 0  L 0 16  L 6 16  L 16 0  L 6 0  N"/>
            </draw:custom-shape>
            <draw:custom-shape draw:style-name="gr117" draw:text-style-name="P56" draw:layer="layout" svg:width="0.075cm" svg:height="0.075cm" svg:x="12.841cm" svg:y="10.314cm">
              <text:p/>
              <draw:enhanced-geometry svg:viewBox="0 0 17 17" draw:type="non-primitive" draw:enhanced-path="M 6 0  L 0 0  L 0 16  L 6 16  L 16 16  L 16 0  L 6 0  N"/>
            </draw:custom-shape>
            <draw:custom-shape draw:style-name="gr111" draw:text-style-name="P47" draw:layer="layout" svg:width="0.353cm" svg:height="0.075cm" svg:x="12.881cm" svg:y="10.658cm">
              <text:p/>
              <draw:enhanced-geometry svg:viewBox="0 0 80 17" draw:type="non-primitive" draw:enhanced-path="M 0 0  L 0 16  L 79 16  L 79 0  L 0 0  N"/>
            </draw:custom-shape>
            <draw:custom-shape draw:style-name="gr117" draw:text-style-name="P56" draw:layer="layout" svg:width="0.186cm" svg:height="0.075cm" svg:x="12.854cm" svg:y="10.777cm">
              <text:p/>
              <draw:enhanced-geometry svg:viewBox="0 0 42 17" draw:type="non-primitive" draw:enhanced-path="M 0 16  L 40 16  L 41 5  L 0 0  L 0 5  L 0 16  N"/>
            </draw:custom-shape>
            <draw:custom-shape draw:style-name="gr117" draw:text-style-name="P56" draw:layer="layout" svg:width="0.11cm" svg:height="0.075cm" svg:x="12.934cm" svg:y="10.711cm">
              <text:p/>
              <draw:enhanced-geometry svg:viewBox="0 0 25 17" draw:type="non-primitive" draw:enhanced-path="M 0 16  L 0 0  L 24 0  L 24 16  L 0 16  N"/>
            </draw:custom-shape>
            <draw:custom-shape draw:style-name="gr117" draw:text-style-name="P56" draw:layer="layout" svg:width="0.181cm" svg:height="0.075cm" svg:x="13.066cm" svg:y="10.72cm">
              <text:p/>
              <draw:enhanced-geometry svg:viewBox="0 0 41 17" draw:type="non-primitive" draw:enhanced-path="M 1 16  L 39 16  L 40 12  L 39 0  L 1 0  L 0 12  L 1 16  N"/>
            </draw:custom-shape>
            <draw:line draw:style-name="gr60" draw:text-style-name="P14" draw:layer="layout" svg:x1="12.859cm" svg:y1="10.464cm" svg:x2="12.859cm" svg:y2="10.535cm">
              <text:p/>
            </draw:line>
            <draw:line draw:style-name="gr60" draw:text-style-name="P14" draw:layer="layout" svg:x1="12.859cm" svg:y1="10.433cm" svg:x2="12.859cm" svg:y2="10.442cm">
              <text:p/>
            </draw:line>
            <draw:custom-shape draw:style-name="gr118" draw:text-style-name="P46" draw:layer="layout" svg:width="0.075cm" svg:height="0.075cm" svg:x="12.819cm" svg:y="10.433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75cm" svg:height="0.075cm" svg:x="12.943cm" svg:y="10.41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75cm" svg:height="0.075cm" svg:x="12.943cm" svg:y="10.44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8cm" svg:height="0.075cm" svg:x="13.07cm" svg:y="10.442cm">
              <text:p/>
              <draw:enhanced-geometry svg:viewBox="0 0 18 17" draw:type="non-primitive" draw:enhanced-path="M 0 16  L 17 16  L 17 0  L 0 0  L 0 16  N"/>
            </draw:custom-shape>
            <draw:custom-shape draw:style-name="gr118" draw:text-style-name="P46" draw:layer="layout" svg:width="0.075cm" svg:height="0.075cm" svg:x="12.841cm" svg:y="10.469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185cm" svg:height="0.075cm" svg:x="12.859cm" svg:y="10.513cm">
              <text:p/>
              <draw:enhanced-geometry svg:viewBox="0 0 42 17" draw:type="non-primitive" draw:enhanced-path="M 0 16  L 40 16  L 41 0  L 0 0  L 0 16  N"/>
            </draw:custom-shape>
            <draw:custom-shape draw:style-name="gr110" draw:text-style-name="P52" draw:layer="layout" svg:width="0.075cm" svg:height="0.075cm" svg:x="13.048cm" svg:y="10.469cm">
              <text:p/>
              <draw:enhanced-geometry svg:viewBox="0 0 17 17" draw:type="non-primitive" draw:enhanced-path="M 0 0  L 0 12  L 8 14  L 8 16  L 16 14  L 8 12  L 8 0  L 0 0  N"/>
            </draw:custom-shape>
            <draw:custom-shape draw:style-name="gr122" draw:text-style-name="P59" draw:layer="layout" svg:width="0.08cm" svg:height="0.075cm" svg:x="13.07cm" svg:y="10.425cm">
              <text:p/>
              <draw:enhanced-geometry svg:viewBox="0 0 18 17" draw:type="non-primitive" draw:enhanced-path="M 0 16  L 0 0  L 17 0  L 17 16  L 0 16  N"/>
            </draw:custom-shape>
            <draw:custom-shape draw:style-name="gr122" draw:text-style-name="P59" draw:layer="layout" svg:width="0.075cm" svg:height="0.075cm" svg:x="13.145cm" svg:y="10.433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194cm" svg:height="0.004cm" svg:x="12.859cm" svg:y="10.416cm">
              <text:p/>
              <draw:enhanced-geometry svg:viewBox="0 0 44 1" draw:type="non-primitive" draw:enhanced-path="M 0 0  L 1 0  L 40 0  L 42 0  L 43 0  L 43 0  L 42 0  L 41 0  L 1 0  L 0 0  L 0 0  N"/>
            </draw:custom-shape>
            <draw:custom-shape draw:style-name="gr122" draw:text-style-name="P59" draw:layer="layout" svg:width="0.075cm" svg:height="0.075cm" svg:x="12.823cm" svg:y="10.433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75cm" svg:height="0.075cm" svg:x="12.841cm" svg:y="10.416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12.854cm" svg:y1="10.442cm" svg:x2="12.965cm" svg:y2="10.442cm">
              <text:p/>
            </draw:line>
            <draw:line draw:style-name="gr60" draw:text-style-name="P14" draw:layer="layout" svg:x1="12.965cm" svg:y1="10.464cm" svg:x2="12.965cm" svg:y2="10.473cm">
              <text:p/>
            </draw:line>
            <draw:custom-shape draw:style-name="gr122" draw:text-style-name="P59" draw:layer="layout" svg:width="0.079cm" svg:height="0.075cm" svg:x="12.965cm" svg:y="10.442cm">
              <text:p/>
              <draw:enhanced-geometry svg:viewBox="0 0 18 17" draw:type="non-primitive" draw:enhanced-path="M 0 16  L 0 0  L 17 0  L 17 16  L 0 16  N"/>
            </draw:custom-shape>
            <draw:custom-shape draw:style-name="gr122" draw:text-style-name="P59" draw:layer="layout" svg:width="0.075cm" svg:height="0.075cm" svg:x="13.04cm" svg:y="10.44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75cm" svg:height="0.075cm" svg:x="13.04cm" svg:y="10.425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79cm" svg:height="0.075cm" svg:x="12.965cm" svg:y="10.411cm">
              <text:p/>
              <draw:enhanced-geometry svg:viewBox="0 0 18 17" draw:type="non-primitive" draw:enhanced-path="M 0 16  L 0 0  L 17 0  L 17 16  L 0 16  N"/>
            </draw:custom-shape>
            <draw:custom-shape draw:style-name="gr118" draw:text-style-name="P46" draw:layer="layout" svg:width="0.075cm" svg:height="0.074cm" svg:x="13.106cm" svg:y="10.478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185cm" svg:height="0.075cm" svg:x="12.859cm" svg:y="10.231cm">
              <text:p/>
              <draw:enhanced-geometry svg:viewBox="0 0 42 17" draw:type="non-primitive" draw:enhanced-path="M 0 16  L 0 0  L 41 0  L 41 16  L 0 16  N"/>
            </draw:custom-shape>
            <draw:custom-shape draw:style-name="gr122" draw:text-style-name="P59" draw:layer="layout" svg:width="0.075cm" svg:height="0.075cm" svg:x="13.048cm" svg:y="10.248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75cm" svg:height="0.075cm" svg:x="13.048cm" svg:y="10.323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181cm" svg:height="0.075cm" svg:x="12.863cm" svg:y="10.332cm">
              <text:p/>
              <draw:enhanced-geometry svg:viewBox="0 0 41 17" draw:type="non-primitive" draw:enhanced-path="M 0 16  L 40 16  L 40 0  L 0 0  L 0 16  N"/>
            </draw:custom-shape>
            <draw:custom-shape draw:style-name="gr118" draw:text-style-name="P46" draw:layer="layout" svg:width="0.075cm" svg:height="0.075cm" svg:x="12.726cm" svg:y="10.288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75cm" svg:height="0.075cm" svg:x="12.881cm" svg:y="10.751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13.264cm" svg:y1="10.658cm" svg:x2="13.264cm" svg:y2="10.738cm">
              <text:p/>
            </draw:line>
            <draw:custom-shape draw:style-name="gr122" draw:text-style-name="P59" draw:layer="layout" svg:width="0.353cm" svg:height="0.075cm" svg:x="12.881cm" svg:y="10.627cm">
              <text:p/>
              <draw:enhanced-geometry svg:viewBox="0 0 80 17" draw:type="non-primitive" draw:enhanced-path="M 0 16  L 0 0  L 79 0  L 79 16  L 0 16  N"/>
            </draw:custom-shape>
            <draw:custom-shape draw:style-name="gr122" draw:text-style-name="P59" draw:layer="layout" svg:width="0.075cm" svg:height="0.093cm" svg:x="12.859cm" svg:y="10.658cm">
              <text:p/>
              <draw:enhanced-geometry svg:viewBox="0 0 17 21" draw:type="non-primitive" draw:enhanced-path="M 16 0  L 16 20  L 0 20  L 0 0  L 16 0  N"/>
            </draw:custom-shape>
            <draw:custom-shape draw:style-name="gr122" draw:text-style-name="P59" draw:layer="layout" svg:width="0.353cm" svg:height="0.075cm" svg:x="12.881cm" svg:y="10.702cm">
              <text:p/>
              <draw:enhanced-geometry svg:viewBox="0 0 80 17" draw:type="non-primitive" draw:enhanced-path="M 0 0  L 0 16  L 79 16  L 79 0  L 0 0  N"/>
            </draw:custom-shape>
            <draw:custom-shape draw:style-name="gr171" draw:text-style-name="P60" draw:layer="layout" svg:width="0.684cm" svg:height="0.088cm" svg:x="12.638cm" svg:y="10.879cm">
              <text:p/>
              <draw:enhanced-geometry svg:viewBox="0 0 155 20" draw:type="non-primitive" draw:enhanced-path="M 0 0  L 0 19  L 154 19  L 154 0  L 0 0  N"/>
            </draw:custom-shape>
            <draw:custom-shape draw:style-name="gr124" draw:text-style-name="P33" draw:layer="layout" svg:width="0.472cm" svg:height="0.075cm" svg:x="12.744cm" svg:y="10.892cm">
              <text:p/>
              <draw:enhanced-geometry svg:viewBox="0 0 107 17" draw:type="non-primitive" draw:enhanced-path="M 1 16  L 104 16  L 105 16  L 105 14  L 106 4  L 105 1  L 104 1  L 1 0  L 0 1  L 0 2  L 0 13  L 0 14  L 1 16  N"/>
            </draw:custom-shape>
            <draw:custom-shape draw:style-name="gr108" draw:text-style-name="P50" draw:layer="layout" svg:width="0.075cm" svg:height="0.075cm" svg:x="12.965cm" svg:y="10.023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75cm" svg:height="0.075cm" svg:x="12.973cm" svg:y="10.041cm">
              <text:p/>
              <draw:enhanced-geometry svg:viewBox="0 0 17 17" draw:type="non-primitive" draw:enhanced-path="M 12 0  L 16 0  L 16 16  L 0 16  L 12 0  N"/>
            </draw:custom-shape>
            <draw:custom-shape draw:style-name="gr172" draw:text-style-name="P46" draw:layer="layout" svg:width="0.56cm" svg:height="0.079cm" svg:x="12.709cm" svg:y="9.997cm">
              <text:p/>
              <draw:enhanced-geometry svg:viewBox="0 0 127 18" draw:type="non-primitive" draw:enhanced-path="M 9 0  L 118 0  L 119 1  L 121 1  L 123 2  L 124 3  L 125 5  L 126 5  L 126 7  L 126 10  L 126 12  L 125 12  L 124 14  L 123 15  L 121 16  L 119 17  L 118 17  L 116 17  L 9 17  L 7 17  L 6 17  L 3 16  L 2 15  L 0 13  L 0 12  L 0 11  L 0 10  L 0 7  L 0 6  L 0 5  L 0 4  L 1 2  L 3 1  L 6 1  L 9 0  N"/>
            </draw:custom-shape>
            <draw:custom-shape draw:style-name="gr173" draw:text-style-name="P2" draw:layer="layout" svg:width="0.582cm" svg:height="0.106cm" svg:x="12.709cm" svg:y="9.997cm">
              <text:p/>
              <draw:enhanced-geometry svg:viewBox="0 0 132 24" draw:type="non-primitive" draw:enhanced-path="M 9 0  L 123 0  L 124 1  L 125 1  L 128 3  L 129 4  L 130 6  L 131 7  L 131 9  L 131 14  L 131 16  L 130 17  L 129 19  L 128 21  L 125 22  L 124 23  L 123 23  L 9 23  L 7 23  L 6 23  L 4 22  L 2 21  L 0 18  L 0 16  L 0 15  L 0 9  L 0 8  L 0 7  L 0 5  L 1 3  L 4 1  L 6 1  L 9 0  N"/>
            </draw:custom-shape>
            <draw:custom-shape draw:style-name="gr118" draw:text-style-name="P46" draw:layer="layout" svg:width="0.291cm" svg:height="0.075cm" svg:x="12.713cm" svg:y="10.006cm">
              <text:p/>
              <draw:enhanced-geometry svg:viewBox="0 0 66 17" draw:type="non-primitive" draw:enhanced-path="M 10 0  L 54 0  L 56 0  L 59 1  L 61 1  L 62 1  L 64 2  L 64 3  L 65 4  L 65 4  L 65 6  L 65 9  L 65 11  L 64 13  L 63 14  L 61 14  L 59 16  L 55 16  L 54 16  L 10 16  L 8 16  L 6 16  L 4 14  L 2 14  L 1 13  L 0 11  L 0 11  L 0 9  L 0 6  L 0 4  L 0 4  L 0 3  L 0 2  L 1 2  L 2 1  L 3 1  L 6 0  L 10 0  N"/>
            </draw:custom-shape>
            <draw:custom-shape draw:style-name="gr127" draw:text-style-name="P2" draw:layer="layout" svg:width="0.313cm" svg:height="0.088cm" svg:x="12.713cm" svg:y="10.006cm">
              <text:p/>
              <draw:enhanced-geometry svg:viewBox="0 0 71 20" draw:type="non-primitive" draw:enhanced-path="M 10 0  L 59 0  L 61 0  L 63 1  L 65 1  L 67 2  L 69 3  L 69 4  L 70 5  L 70 6  L 70 7  L 70 12  L 70 14  L 69 16  L 68 17  L 65 18  L 63 19  L 60 19  L 10 19  L 8 19  L 7 19  L 5 18  L 2 17  L 1 16  L 0 14  L 0 13  L 0 7  L 0 6  L 0 5  L 0 4  L 0 3  L 1 3  L 2 2  L 4 1  L 10 0  N"/>
            </draw:custom-shape>
            <draw:custom-shape draw:style-name="gr108" draw:text-style-name="P50" draw:layer="layout" svg:width="0.075cm" svg:height="0.075cm" svg:x="12.965cm" svg:y="10.023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234cm" svg:height="0.075cm" svg:x="12.735cm" svg:y="10.032cm">
              <text:p/>
              <draw:enhanced-geometry svg:viewBox="0 0 53 17" draw:type="non-primitive" draw:enhanced-path="M 0 16  L 52 16  L 51 0  L 0 0  L 0 16  N"/>
            </draw:custom-shape>
            <draw:custom-shape draw:style-name="gr108" draw:text-style-name="P50" draw:layer="layout" svg:width="0.004cm" svg:height="0.075cm" svg:x="12.943cm" svg:y="10.023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75cm" svg:height="0.075cm" svg:x="12.929cm" svg:y="10.023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5cm" svg:height="0.075cm" svg:x="12.907cm" svg:y="10.023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75cm" svg:height="0.075cm" svg:x="12.885cm" svg:y="10.023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75cm" svg:height="0.075cm" svg:x="12.863cm" svg:y="10.023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4cm" svg:height="0.075cm" svg:x="13.141cm" svg:y="10.006cm">
              <text:p/>
              <draw:enhanced-geometry svg:viewBox="0 0 1 17" draw:type="non-primitive" draw:enhanced-path="M 0 0  L 0 0  L 0 2  L 0 13  L 0 14  L 0 16  L 0 14  L 0 12  L 0 3  L 0 1  L 0 1  L 0 0  N"/>
            </draw:custom-shape>
            <draw:custom-shape draw:style-name="gr113" draw:text-style-name="P49" draw:layer="layout" svg:width="0.08cm" svg:height="0.075cm" svg:x="13.154cm" svg:y="10.001cm">
              <text:p/>
              <draw:enhanced-geometry svg:viewBox="0 0 18 17" draw:type="non-primitive" draw:enhanced-path="M 2 16  L 14 16  L 15 16  L 15 14  L 16 14  L 16 13  L 17 13  L 17 12  L 17 11  L 17 4  L 17 4  L 16 2  L 16 1  L 15 1  L 14 0  L 2 0  L 1 1  L 0 1  L 0 2  L 0 4  L 0 4  L 0 11  L 0 12  L 0 13  L 0 13  L 0 14  L 1 14  L 2 16  N"/>
            </draw:custom-shape>
            <draw:custom-shape draw:style-name="gr122" draw:text-style-name="P59" draw:layer="layout" svg:width="0.08cm" svg:height="0.075cm" svg:x="13.154cm" svg:y="10.006cm">
              <text:p/>
              <draw:enhanced-geometry svg:viewBox="0 0 18 17" draw:type="non-primitive" draw:enhanced-path="M 1 0  L 0 1  L 0 14  L 0 16  L 16 16  L 17 14  L 17 1  L 16 0  L 1 0  N"/>
            </draw:custom-shape>
            <draw:custom-shape draw:style-name="gr103" draw:text-style-name="P48" draw:layer="layout" svg:width="0.075cm" svg:height="0.075cm" svg:x="13.159cm" svg:y="10.006cm">
              <text:p/>
              <draw:enhanced-geometry svg:viewBox="0 0 17 17" draw:type="non-primitive" draw:enhanced-path="M 1 0  L 0 1  L 0 13  L 0 16  L 15 16  L 16 13  L 16 2  L 15 0  L 1 0  N"/>
            </draw:custom-shape>
            <draw:custom-shape draw:style-name="gr108" draw:text-style-name="P50" draw:layer="layout" svg:width="0.075cm" svg:height="0.075cm" svg:x="13.176cm" svg:y="10.014cm">
              <text:p/>
              <draw:enhanced-geometry svg:viewBox="0 0 17 17" draw:type="non-primitive" draw:enhanced-path="M 1 0  L 0 0  L 0 16  L 1 16  L 14 16  L 16 16  L 16 2  L 14 0  L 1 0  N"/>
            </draw:custom-shape>
            <draw:custom-shape draw:style-name="gr125" draw:text-style-name="P2" draw:layer="layout" svg:width="0.075cm" svg:height="0.075cm" svg:x="13.189cm" svg:y="10.032cm">
              <text:p/>
              <draw:enhanced-geometry svg:viewBox="0 0 17 17" draw:type="non-primitive" draw:enhanced-path="M 8 0  L 8 3  L 12 3  L 16 6  L 16 9  L 12 12  L 8 16  L 4 16  L 0 12  L 0 9  L 0 6  L 0 3  L 4 3  L 8 0  N"/>
            </draw:custom-shape>
            <draw:line draw:style-name="gr7" draw:text-style-name="P14" draw:layer="layout" svg:x1="13.229cm" svg:y1="10.032cm" svg:x2="13.229cm" svg:y2="10.054cm">
              <text:p/>
            </draw:line>
            <draw:custom-shape draw:style-name="gr103" draw:text-style-name="P48" draw:layer="layout" svg:width="0.252cm" svg:height="0.075cm" svg:x="12.982cm" svg:y="9.979cm">
              <text:p/>
              <draw:enhanced-geometry svg:viewBox="0 0 57 17" draw:type="non-primitive" draw:enhanced-path="M 0 16  L 56 16  L 56 0  L 0 0  L 0 16  N"/>
            </draw:custom-shape>
            <draw:custom-shape draw:style-name="gr103" draw:text-style-name="P48" draw:layer="layout" svg:width="0.075cm" svg:height="0.004cm" svg:x="12.982cm" svg:y="10.072cm">
              <text:p/>
              <draw:enhanced-geometry svg:viewBox="0 0 17 1" draw:type="non-primitive" draw:enhanced-path="M 0 0  L 0 0  L 8 0  L 8 0  L 8 0  L 16 0  L 16 0  L 16 0  L 8 0  L 8 0  L 0 0  N"/>
            </draw:custom-shape>
            <draw:custom-shape draw:style-name="gr103" draw:text-style-name="P48" draw:layer="layout" svg:width="0.075cm" svg:height="0.075cm" svg:x="13.247cm" svg:y="9.997cm">
              <text:p/>
              <draw:enhanced-geometry svg:viewBox="0 0 17 17" draw:type="non-primitive" draw:enhanced-path="M 8 16  L 12 14  L 12 14  L 16 12  L 16 11  L 16 8  L 16 5  L 16 5  L 12 3  L 12 2  L 8 1  L 4 1  L 0 0  L 0 2  L 4 2  L 8 3  L 12 5  L 12 5  L 12 7  L 12 8  L 12 10  L 12 11  L 12 12  L 12 14  L 8 16  N"/>
            </draw:custom-shape>
            <draw:custom-shape draw:style-name="gr108" draw:text-style-name="P50" draw:layer="layout" svg:width="0.08cm" svg:height="0.075cm" svg:x="13.035cm" svg:y="10.001cm">
              <text:p/>
              <draw:enhanced-geometry svg:viewBox="0 0 18 17" draw:type="non-primitive" draw:enhanced-path="M 8 0  L 12 0  L 14 1  L 15 1  L 16 3  L 16 4  L 17 6  L 17 6  L 17 9  L 17 11  L 16 12  L 16 13  L 15 14  L 14 16  L 13 16  L 12 16  L 0 16  L 8 0  N"/>
            </draw:custom-shape>
            <draw:custom-shape draw:style-name="gr110" draw:text-style-name="P52" draw:layer="layout" svg:width="0.004cm" svg:height="0.075cm" svg:x="13.084cm" svg:y="9.979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5cm" svg:height="0.075cm" svg:x="13.11cm" svg:y="10.001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75cm" svg:height="0.075cm" svg:x="13.11cm" svg:y="10.028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5cm" svg:height="0.075cm" svg:x="13.11cm" svg:y="10.054cm">
              <text:p/>
              <draw:enhanced-geometry svg:viewBox="0 0 1 17" draw:type="non-primitive" draw:enhanced-path="M 0 16  L 0 16  L 0 16  L 0 16  L 0 16  L 0 12  L 0 12  L 0 8  L 0 8  L 0 0  L 0 0  L 0 0  L 0 0  L 0 4  L 0 8  L 0 8  L 0 12  L 0 12  L 0 12  L 0 12  L 0 16  L 0 16  L 0 16  L 0 16  N"/>
            </draw:custom-shape>
            <draw:custom-shape draw:style-name="gr110" draw:text-style-name="P52" draw:layer="layout" svg:width="0.004cm" svg:height="0.075cm" svg:x="13.084cm" svg:y="10.072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75cm" svg:height="0.075cm" svg:x="13.035cm" svg:y="10.072cm">
              <text:p/>
              <draw:enhanced-geometry svg:viewBox="0 0 17 17" draw:type="non-primitive" draw:enhanced-path="M 0 16  L 0 0  L 16 0  L 16 16  L 0 16  L 2 16  L 0 16  L 0 0  L 0 16  N"/>
            </draw:custom-shape>
            <draw:custom-shape draw:style-name="gr110" draw:text-style-name="P52" draw:layer="layout" svg:width="0.075cm" svg:height="0.075cm" svg:x="13.009cm" svg:y="10.001cm">
              <text:p/>
              <draw:enhanced-geometry svg:viewBox="0 0 17 17" draw:type="non-primitive" draw:enhanced-path="M 8 0  L 16 0  L 8 16  L 0 16  L 8 0  L 8 1  L 8 0  L 16 0  L 8 0  N"/>
            </draw:custom-shape>
            <draw:custom-shape draw:style-name="gr110" draw:text-style-name="P52" draw:layer="layout" svg:width="0.075cm" svg:height="0.075cm" svg:x="13.035cm" svg:y="9.979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75cm" svg:height="0.075cm" svg:x="13.07cm" svg:y="10.014cm">
              <text:p/>
              <draw:enhanced-geometry svg:viewBox="0 0 17 17" draw:type="non-primitive" draw:enhanced-path="M 9 0  L 0 14  L 0 16  L 6 16  L 6 14  L 16 0  L 9 0  N"/>
            </draw:custom-shape>
            <draw:custom-shape draw:style-name="gr117" draw:text-style-name="P56" draw:layer="layout" svg:width="0.075cm" svg:height="0.075cm" svg:x="13.092cm" svg:y="10.014cm">
              <text:p/>
              <draw:enhanced-geometry svg:viewBox="0 0 17 17" draw:type="non-primitive" draw:enhanced-path="M 12 0  L 0 14  L 0 16  L 8 16  L 8 14  L 16 5  L 16 4  L 16 2  L 16 1  L 12 0  N"/>
            </draw:custom-shape>
            <draw:custom-shape draw:style-name="gr129" draw:text-style-name="P2" draw:layer="layout" svg:width="0.075cm" svg:height="0.075cm" svg:x="13.106cm" svg:y="10.054cm">
              <text:p/>
              <draw:enhanced-geometry svg:viewBox="0 0 17 17" draw:type="non-primitive" draw:enhanced-path="M 16 0  L 16 4  L 16 6  L 14 10  L 10 14  L 6 16  L 0 16  N"/>
            </draw:custom-shape>
            <draw:custom-shape draw:style-name="gr129" draw:text-style-name="P2" draw:layer="layout" svg:width="0.088cm" svg:height="0.075cm" svg:x="13.04cm" svg:y="10.006cm">
              <text:p/>
              <draw:enhanced-geometry svg:viewBox="0 0 20 17" draw:type="non-primitive" draw:enhanced-path="M 0 0  L 14 0  L 16 0  L 19 16  N"/>
            </draw:custom-shape>
            <draw:custom-shape draw:style-name="gr122" draw:text-style-name="P59" draw:layer="layout" svg:width="0.074cm" svg:height="0.075cm" svg:x="13.018cm" svg:y="10.014cm">
              <text:p/>
              <draw:enhanced-geometry svg:viewBox="0 0 17 17" draw:type="non-primitive" draw:enhanced-path="M 6 0  L 0 1  L 0 8  L 0 14  L 6 16  L 16 11  L 16 8  L 16 1  L 6 1  L 6 0  N"/>
            </draw:custom-shape>
            <draw:custom-shape draw:style-name="gr117" draw:text-style-name="P56" draw:layer="layout" svg:width="0.075cm" svg:height="0.075cm" svg:x="13.035cm" svg:y="10.014cm">
              <text:p/>
              <draw:enhanced-geometry svg:viewBox="0 0 17 17" draw:type="non-primitive" draw:enhanced-path="M 9 0  L 0 13  L 2 16  L 9 16  L 9 14  L 16 0  L 9 0  N"/>
            </draw:custom-shape>
          </draw:g>
          <draw:custom-shape draw:style-name="gr174" draw:text-style-name="P38" draw:layer="layout" svg:width="2.14cm" svg:height="1.019cm" svg:x="12.001cm" svg:y="17.079cm">
            <text:list text:style-name="L3">
              <text:list-header>
                <text:p text:style-name="P1"><text:span text:style-name="T34">LAN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4" draw:text-style-name="P64" draw:layer="layout" svg:width="5.704cm" svg:height="1.781cm" svg:x="14.443cm" svg:y="5.226cm">
            <text:list text:style-name="L3">
              <text:list-header>
                <text:p text:style-name="P63"><text:span text:style-name="T34">Enterprise-class </text:span><text:span text:style-name="T34"><text:line-break/></text:span><text:span text:style-name="T34">UNIX 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9.begin">
            <anim:transitionFilter smil:dur="1s" smil:type="fade" smil:subtype="fadeOverColor" smil:fadeColor="#000000"/>
          </anim:par>
        </anim:par>
        <presentation:notes draw:style-name="dp3">
          <draw:frame draw:style-name="gr33" draw:text-style-name="P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33" draw:text-style-name="P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page-thumbnail draw:style-name="gr1" draw:layer="layout" svg:width="14.12cm" svg:height="10.592cm" svg:x="2.465cm" svg:y="1.367cm" draw:page-number="9" presentation:class="page"/>
          <draw:custom-shape draw:style-name="gr175" draw:text-style-name="P65" draw:layer="layout" svg:width="15.708cm" svg:height="3.226cm" svg:x="3.02cm" svg:y="13.176cm">
            <text:list text:style-name="L3">
              <text:list-header>
                <text:p text:style-name="P1"><text:span text:style-name="T35">For some enterprises, the traditional mainframe has given way to</text:span></text:p>
                <text:p text:style-name="P1"><text:span text:style-name="T35">a complicated but less costly N-tier architecture. <text:s/>Any guesses</text:span><text:span text:style-name="T35"><text:line-break/></text:span><text:span text:style-name="T35">as to which Fortune 250 company uses this?</text:span><text:span text:style-name="T35"><text:line-break/></text:span><text:span text:style-name="T35"><text:line-break/></text:span><text:span text:style-name="T35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4T13" xml:id="id10" draw:id="id10">
        <draw:g draw:style-name="gr4">
          <draw:custom-shape draw:style-name="gr176" draw:text-style-name="P2" draw:layer="layout" svg:width="0.924cm" svg:height="1.273cm" svg:x="7.512cm" svg:y="10.665cm">
            <text:p/>
            <draw:enhanced-geometry svg:viewBox="0 0 491 445" draw:type="non-primitive" draw:enhanced-path="M 490 0  L 490 444  L 0 444  N"/>
          </draw:custom-shape>
          <draw:custom-shape draw:style-name="gr177" draw:text-style-name="P2" draw:layer="layout" svg:width="0.175cm" svg:height="1.745cm" svg:x="7.476cm" svg:y="10.038cm">
            <text:p/>
            <draw:enhanced-geometry svg:viewBox="0 0 93 610" draw:type="non-primitive" draw:enhanced-path="M 92 0  L 92 609  L 0 609  N"/>
          </draw:custom-shape>
          <draw:custom-shape draw:style-name="gr178" draw:text-style-name="P2" draw:layer="layout" svg:width="0.625cm" svg:height="1.385cm" svg:x="7.401cm" svg:y="10.476cm">
            <text:p/>
            <draw:enhanced-geometry svg:viewBox="0 0 332 484" draw:type="non-primitive" draw:enhanced-path="M 331 0  L 331 483  L 0 483  N"/>
          </draw:custom-shape>
          <draw:g draw:style-name="gr4">
            <draw:custom-shape draw:style-name="gr179" draw:text-style-name="P2" draw:layer="layout" svg:width="3.155cm" svg:height="1.582cm" svg:x="7.311cm" svg:y="10.742cm">
              <text:p/>
              <draw:enhanced-geometry svg:viewBox="0 0 1676 553" draw:type="non-primitive" draw:enhanced-path="M 1675 0  L 1675 552  L 0 552  N"/>
            </draw:custom-shape>
            <draw:custom-shape draw:style-name="gr180" draw:text-style-name="P2" draw:layer="layout" svg:width="1.809cm" svg:height="0.861cm" svg:x="7.451cm" svg:y="11.231cm">
              <text:p/>
              <draw:enhanced-geometry svg:viewBox="0 0 961 301" draw:type="non-primitive" draw:enhanced-path="M 960 0  L 960 300  L 0 300  N"/>
            </draw:custom-shape>
            <draw:custom-shape draw:style-name="gr181" draw:text-style-name="P2" draw:layer="layout" svg:width="1.348cm" svg:height="1.024cm" svg:x="7.476cm" svg:y="10.991cm">
              <text:p/>
              <draw:enhanced-geometry svg:viewBox="0 0 716 358" draw:type="non-primitive" draw:enhanced-path="M 715 0  L 715 357  L 0 357  N"/>
            </draw:custom-shape>
            <draw:custom-shape draw:style-name="gr182" draw:text-style-name="P2" draw:layer="layout" svg:width="2.331cm" svg:height="0.929cm" svg:x="7.325cm" svg:y="11.24cm">
              <text:p/>
              <draw:enhanced-geometry svg:viewBox="0 0 1238 325" draw:type="non-primitive" draw:enhanced-path="M 1237 0  L 1237 324  L 0 324  N"/>
            </draw:custom-shape>
            <draw:custom-shape draw:style-name="gr183" draw:text-style-name="P2" draw:layer="layout" svg:width="2.713cm" svg:height="1.41cm" svg:x="7.355cm" svg:y="10.837cm">
              <text:p/>
              <draw:enhanced-geometry svg:viewBox="0 0 1441 493" draw:type="non-primitive" draw:enhanced-path="M 1440 0  L 1440 492  L 0 492  N"/>
            </draw:custom-shape>
            <draw:custom-shape draw:style-name="gr184" draw:text-style-name="P2" draw:layer="layout" svg:width="3.457cm" svg:height="2.063cm" svg:x="7.35cm" svg:y="10.339cm">
              <text:p/>
              <draw:enhanced-geometry svg:viewBox="0 0 1836 721" draw:type="non-primitive" draw:enhanced-path="M 1835 0  L 1835 720  L 0 720  N"/>
            </draw:custom-shape>
            <draw:custom-shape draw:style-name="gr185" draw:text-style-name="P21" draw:layer="layout" svg:width="0.512cm" svg:height="0.932cm" svg:x="8.016cm" svg:y="12.525cm">
              <text:list text:style-name="L15">
                <text:list-header>
                  <text:p text:style-name="P20"><text:span text:style-name="T31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86" draw:text-style-name="P21" draw:layer="layout" svg:width="0.836cm" svg:height="0.934cm" svg:x="9.927cm" svg:y="9.025cm">
              <text:list text:style-name="L16">
                <text:list-header>
                  <text:p text:style-name="P20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frame draw:style-name="gr9" draw:text-style-name="P15" draw:layer="layout" svg:width="3.546cm" svg:height="2.592cm" svg:x="7.461cm" svg:y="8.828cm">
              <draw:image xlink:href="Pictures/1003B36A000069E600002D79F3B5F317.wmf" xlink:type="simple" xlink:show="embed" xlink:actuate="onLoad" draw:mime-type="image/x-wmf">
                <text:p/>
              </draw:image>
              <draw:image xlink:href="Pictures/1000000100000401000001B87491DE35.png" xlink:type="simple" xlink:show="embed" xlink:actuate="onLoad" draw:mime-type="image/png"/>
            </draw:frame>
          </draw:g>
        </draw:g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New-Breed Enterprise Mainframe</text:p>
              </text:list-header>
            </text:list>
          </draw:text-box>
        </draw:frame>
        <draw:frame presentation:style-name="pr5" draw:text-style-name="P2" draw:layer="layout" svg:width="11.148cm" svg:height="11.589cm" svg:x="12.841cm" svg:y="5.238cm" presentation:class="outline" presentation:user-transformed="true">
          <draw:text-box>
            <text:list text:style-name="L4">
              <text:list-item>
                <text:p text:style-name="P39"><text:span text:style-name="T28">N-Tier architecture</text:span></text:p>
              </text:list-item>
              <text:list-item>
                <text:p text:style-name="P39"><text:span text:style-name="T28">Reliability, operability, manageability constraints</text:span></text:p>
              </text:list-item>
              <text:list-item>
                <text:p text:style-name="P39"><text:span text:style-name="T28">Multi-vendor control issues</text:span></text:p>
              </text:list-item>
              <text:list-item>
                <text:p text:style-name="P39"><text:span text:style-name="T28">But …</text:span></text:p>
              </text:list-item>
              <text:list-item>
                <text:p text:style-name="P39"><text:span text:style-name="T28">Running today’s mission- critical enterprise applications: a paradox</text:span></text:p>
              </text:list-item>
            </text:list>
          </draw:text-box>
        </draw:frame>
        <draw:line draw:style-name="gr7" draw:text-style-name="P14" draw:layer="layout" svg:x1="6.707cm" svg:y1="10.049cm" svg:x2="7.973cm" svg:y2="9.224cm">
          <text:p/>
        </draw:line>
        <draw:g draw:style-name="gr4">
          <draw:line draw:style-name="gr7" draw:text-style-name="P14" draw:layer="layout" svg:x1="5.78cm" svg:y1="8.296cm" svg:x2="6.443cm" svg:y2="8.296cm">
            <text:p/>
          </draw:line>
          <draw:frame draw:style-name="gr9" draw:text-style-name="P15" draw:layer="layout" svg:width="0.141cm" svg:height="0.045cm" svg:x="6.468cm" svg:y="9.439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187" draw:text-style-name="P41" draw:layer="layout" svg:width="0.563cm" svg:height="0.269cm" svg:x="5.424cm" svg:y="8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42" draw:layer="layout" svg:width="0.418cm" svg:height="0.696cm" svg:x="5.466cm" svg:y="7.979cm">
              <text:p/>
              <draw:enhanced-geometry svg:viewBox="0 0 222 244" draw:type="non-primitive" draw:enhanced-path="M 0 0  L 221 0  L 221 197  L 220 201  L 218 206  L 214 211  L 210 215  L 204 219  L 198 223  L 191 226  L 183 230  L 174 232  L 163 235  L 153 237  L 142 239  L 130 241  L 118 242  L 106 242  L 92 243  L 86 243  L 79 242  L 73 242  L 66 242  L 60 241  L 54 240  L 48 240  L 41 239  L 36 238  L 31 236  L 25 235  L 19 234  L 15 232  L 9 231  L 5 229  L 0 227  L 0 0  N"/>
            </draw:custom-shape>
            <draw:custom-shape draw:style-name="gr189" draw:text-style-name="P43" draw:layer="layout" svg:width="0.06cm" svg:height="0.654cm" svg:x="5.402cm" svg:y="7.979cm">
              <text:p/>
              <draw:enhanced-geometry svg:viewBox="0 0 32 229" draw:type="non-primitive" draw:enhanced-path="M 30 0  L 31 228  L 23 225  L 17 221  L 12 218  L 7 214  L 5 210  L 1 206  L 0 202  L 0 197  L 0 0  L 30 0  N"/>
            </draw:custom-shape>
            <draw:custom-shape draw:style-name="gr190" draw:text-style-name="P44" draw:layer="layout" svg:width="0.483cm" svg:height="0.26cm" svg:x="5.402cm" svg:y="7.853cm">
              <text:p/>
              <draw:enhanced-geometry svg:viewBox="0 0 256 91" draw:type="non-primitive" draw:enhanced-path="M 127 0  L 140 0  L 153 1  L 165 2  L 176 3  L 188 5  L 198 8  L 207 10  L 217 13  L 225 17  L 232 20  L 239 24  L 245 28  L 249 32  L 252 36  L 254 41  L 255 45  L 254 50  L 252 54  L 249 59  L 245 63  L 239 67  L 232 71  L 225 74  L 217 77  L 207 80  L 198 83  L 188 85  L 176 87  L 165 88  L 153 89  L 140 90  L 127 90  L 114 90  L 102 89  L 89 88  L 78 87  L 66 85  L 55 83  L 46 80  L 37 77  L 29 74  L 21 71  L 15 67  L 9 63  L 5 59  L 2 54  L 0 50  L 0 45  L 0 41  L 2 36  L 5 32  L 9 28  L 15 24  L 21 20  L 29 17  L 37 13  L 46 10  L 55 8  L 66 5  L 78 3  L 89 2  L 102 1  L 114 0  L 127 0  N"/>
            </draw:custom-shape>
            <draw:frame draw:style-name="gr9" draw:text-style-name="P15" draw:layer="layout" svg:width="0.115cm" svg:height="0.045cm" svg:x="5.445cm" svg:y="9.039cm">
              <draw:image xlink:href="Pictures/10000000000000DB000000289DFEB865.png" xlink:type="simple" xlink:show="embed" xlink:actuate="onLoad" draw:mime-type="image/png">
                <text:p/>
              </draw:image>
            </draw:frame>
          </draw:g>
          <draw:frame draw:style-name="gr9" draw:text-style-name="P15" draw:layer="layout" svg:width="0.908cm" svg:height="2.927cm" svg:x="6.152cm" svg:y="5.927cm">
            <draw:image xlink:href="Pictures/100058E8000062640000B8CC65540C2D.wmf" xlink:type="simple" xlink:show="embed" xlink:actuate="onLoad" draw:mime-type="image/x-wmf">
              <text:p/>
            </draw:image>
            <draw:image xlink:href="Pictures/1000000100000204000003C9AB1219BB.png" xlink:type="simple" xlink:show="embed" xlink:actuate="onLoad" draw:mime-type="image/png"/>
          </draw:frame>
        </draw:g>
        <draw:g draw:style-name="gr4">
          <draw:line draw:style-name="gr7" draw:text-style-name="P14" draw:layer="layout" svg:x1="5.2cm" svg:y1="9.26cm" svg:x2="6.465cm" svg:y2="10.049cm">
            <text:p/>
          </draw:line>
          <draw:custom-shape draw:style-name="gr191" draw:text-style-name="P2" draw:layer="layout" svg:width="2.894cm" svg:height="1.238cm" svg:x="3.271cm" svg:y="11.009cm">
            <text:p/>
            <draw:enhanced-geometry svg:viewBox="0 0 1537 433" draw:type="non-primitive" draw:enhanced-path="M 0 0  L 0 432  L 1536 432  N"/>
          </draw:custom-shape>
          <draw:custom-shape draw:style-name="gr192" draw:text-style-name="P2" draw:layer="layout" svg:width="3.837cm" svg:height="1.958cm" svg:x="2.449cm" svg:y="10.443cm">
            <text:p/>
            <draw:enhanced-geometry svg:viewBox="0 0 2038 685" draw:type="non-primitive" draw:enhanced-path="M 0 0  L 0 684  L 2037 684  N"/>
          </draw:custom-shape>
          <draw:custom-shape draw:style-name="gr193" draw:text-style-name="P2" draw:layer="layout" svg:width="3.297cm" svg:height="1.958cm" svg:x="2.889cm" svg:y="10.366cm">
            <text:p/>
            <draw:enhanced-geometry svg:viewBox="0 0 1751 685" draw:type="non-primitive" draw:enhanced-path="M 0 0  L 0 684  L 1750 684  N"/>
          </draw:custom-shape>
          <draw:custom-shape draw:style-name="gr194" draw:text-style-name="P2" draw:layer="layout" svg:width="4.059cm" svg:height="2.301cm" svg:x="2.066cm" svg:y="10.186cm">
            <text:p/>
            <draw:enhanced-geometry svg:viewBox="0 0 2156 805" draw:type="non-primitive" draw:enhanced-path="M 0 0  L 0 804  L 2155 804  N"/>
          </draw:custom-shape>
          <draw:custom-shape draw:style-name="gr195" draw:text-style-name="P21" draw:layer="layout" svg:width="0.512cm" svg:height="0.935cm" svg:x="2.693cm" svg:y="12.528cm">
            <text:list text:style-name="L15">
              <text:list-header>
                <text:p text:style-name="P20"><text:span text:style-name="T3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6" draw:text-style-name="P2" draw:layer="layout" svg:width="0.348cm" svg:height="1.743cm" svg:x="5.546cm" svg:y="10.04cm">
            <text:p/>
            <draw:enhanced-geometry svg:viewBox="0 0 185 610" draw:type="non-primitive" draw:enhanced-path="M 0 0  L 0 609  L 184 609  N"/>
          </draw:custom-shape>
          <draw:custom-shape draw:style-name="gr180" draw:text-style-name="P2" draw:layer="layout" svg:width="1.809cm" svg:height="0.861cm" svg:x="4.094cm" svg:y="11.232cm">
            <text:p/>
            <draw:enhanced-geometry svg:viewBox="0 0 961 301" draw:type="non-primitive" draw:enhanced-path="M 0 0  L 0 300  L 960 300  N"/>
          </draw:custom-shape>
          <draw:custom-shape draw:style-name="gr197" draw:text-style-name="P2" draw:layer="layout" svg:width="0.926cm" svg:height="1.272cm" svg:x="4.878cm" svg:y="10.666cm">
            <text:p/>
            <draw:enhanced-geometry svg:viewBox="0 0 492 445" draw:type="non-primitive" draw:enhanced-path="M 0 0  L 0 444  L 491 444  N"/>
          </draw:custom-shape>
          <draw:custom-shape draw:style-name="gr198" draw:text-style-name="P2" draw:layer="layout" svg:width="1.346cm" svg:height="1.169cm" svg:x="4.497cm" svg:y="10.846cm">
            <text:p/>
            <draw:enhanced-geometry svg:viewBox="0 0 715 409" draw:type="non-primitive" draw:enhanced-path="M 0 0  L 0 408  L 714 408  N"/>
          </draw:custom-shape>
          <draw:custom-shape draw:style-name="gr199" draw:text-style-name="P2" draw:layer="layout" svg:width="0.623cm" svg:height="1.581cm" svg:x="5.22cm" svg:y="10.28cm">
            <text:p/>
            <draw:enhanced-geometry svg:viewBox="0 0 331 553" draw:type="non-primitive" draw:enhanced-path="M 0 0  L 0 552  L 330 552  N"/>
          </draw:custom-shape>
          <draw:custom-shape draw:style-name="gr200" draw:text-style-name="P2" draw:layer="layout" svg:width="3.267cm" svg:height="1.829cm" svg:x="2.17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custom-shape draw:style-name="gr201" draw:text-style-name="P46" draw:layer="layout" svg:width="0.235cm" svg:height="0.657cm" svg:x="1.957cm" svg:y="9.57cm">
              <text:p/>
              <draw:enhanced-geometry svg:viewBox="0 0 125 230" draw:type="non-primitive" draw:enhanced-path="M 2 0  L 121 0  L 122 0  L 124 2  L 124 3  L 124 226  L 124 227  L 122 228  L 121 229  L 2 229  L 0 228  L 0 227  L 0 226  L 0 3  L 0 2  L 0 0  L 2 0  N"/>
            </draw:custom-shape>
            <draw:custom-shape draw:style-name="gr111" draw:text-style-name="P47" draw:layer="layout" svg:width="0.235cm" svg:height="0.048cm" svg:x="1.957cm" svg:y="10.13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10.114cm">
              <text:p/>
              <draw:enhanced-geometry svg:viewBox="0 0 125 17" draw:type="non-primitive" draw:enhanced-path="M 0 0  L 124 0  L 124 16  L 0 16  L 0 0  N"/>
            </draw:custom-shape>
            <draw:custom-shape draw:style-name="gr124" draw:text-style-name="P33" draw:layer="layout" svg:width="0.235cm" svg:height="0.048cm" svg:x="1.957cm" svg:y="10.09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10.09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10.07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10.05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10.03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10.008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988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97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94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928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90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88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86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84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1.957cm" svg:y="9.822cm">
              <text:p/>
              <draw:enhanced-geometry svg:viewBox="0 0 125 17" draw:type="non-primitive" draw:enhanced-path="M 0 0  L 124 0  L 124 16  L 0 16  L 0 0  N"/>
            </draw:custom-shape>
            <draw:custom-shape draw:style-name="gr103" draw:text-style-name="P48" draw:layer="layout" svg:width="0.167cm" svg:height="0.048cm" svg:x="1.905cm" svg:y="10.199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2.083cm" svg:y="10.199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1cm" svg:height="0.232cm" svg:x="2.001cm" svg:y="9.996cm">
              <text:p/>
              <draw:enhanced-geometry svg:viewBox="0 0 86 81" draw:type="non-primitive" draw:enhanced-path="M 0 1  L 0 80  L 85 80  L 85 0  N"/>
            </draw:custom-shape>
            <draw:custom-shape draw:style-name="gr203" draw:text-style-name="P46" draw:layer="layout" svg:width="0.235cm" svg:height="0.488cm" svg:x="1.957cm" svg:y="9.031cm">
              <text:p/>
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</draw:custom-shape>
            <draw:custom-shape draw:style-name="gr204" draw:text-style-name="P46" draw:layer="layout" svg:width="0.188cm" svg:height="0.3cm" svg:x="1.981cm" svg:y="9.173cm">
              <text:p/>
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1.987cm" svg:y="9.259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1.987cm" svg:y="9.347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1.983cm" svg:y="9.185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2.034cm" svg:y="9.187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3cm" svg:x="2.132cm" svg:y="9.187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3cm" svg:x="2.132cm" svg:y="9.187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3cm" svg:x="1.995cm" svg:y="9.207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4cm" svg:x="1.987cm" svg:y="9.265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2.034cm" svg:y="9.276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3cm" svg:x="2.113cm" svg:y="9.31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3cm" svg:x="2.113cm" svg:y="9.31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2.029cm" svg:y="9.285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8cm" svg:height="0.048cm" svg:x="1.987cm" svg:y="9.368cm">
              <text:p/>
              <draw:enhanced-geometry svg:viewBox="0 0 95 17" draw:type="non-primitive" draw:enhanced-path="M 0 16  L 94 16  L 94 0  L 0 0  L 0 16  N"/>
            </draw:custom-shape>
            <draw:custom-shape draw:style-name="gr114" draw:text-style-name="P35" draw:layer="layout" svg:width="0.178cm" svg:height="0.048cm" svg:x="1.987cm" svg:y="9.359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2.164cm" svg:y="9.368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2cm" svg:height="0.048cm" svg:x="1.983cm" svg:y="9.368cm">
              <text:p/>
              <draw:enhanced-geometry svg:viewBox="0 0 97 17" draw:type="non-primitive" draw:enhanced-path="M 0 16  L 0 0  L 96 0  L 96 16  L 0 16  L 0 16  L 0 0  L 0 0  L 0 16  N"/>
            </draw:custom-shape>
            <draw:custom-shape draw:style-name="gr114" draw:text-style-name="P35" draw:layer="layout" svg:width="0.032cm" svg:height="0.048cm" svg:x="1.976cm" svg:y="9.368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1.987cm" svg:y="9.379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2.03cm" svg:y="9.394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4cm" svg:x="2.042cm" svg:y="9.396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1.987cm" svg:y="9.357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2cm" svg:height="0.003cm" svg:x="1.981cm" svg:y="9.145cm">
              <text:p/>
              <draw:enhanced-geometry svg:viewBox="0 0 102 1" draw:type="non-primitive" draw:enhanced-path="M 1 0  L 99 0  L 100 0  L 101 0  L 101 0  L 99 0  L 1 0  L 0 0  L 0 0  L 0 0  L 1 0  N"/>
            </draw:custom-shape>
            <draw:custom-shape draw:style-name="gr117" draw:text-style-name="P56" draw:layer="layout" svg:width="0.032cm" svg:height="0.048cm" svg:x="1.995cm" svg:y="9.211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2.03cm" svg:y="9.211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2cm" svg:height="0.048cm" svg:x="2.109cm" svg:y="9.211cm">
              <text:p/>
              <draw:enhanced-geometry svg:viewBox="0 0 28 17" draw:type="non-primitive" draw:enhanced-path="M 0 16  L 26 16  L 27 10  L 26 0  L 0 0  L 0 10  L 0 16  N"/>
            </draw:custom-shape>
            <draw:custom-shape draw:style-name="gr109" draw:text-style-name="P51" draw:layer="layout" svg:width="0.065cm" svg:height="0.048cm" svg:x="2.034cm" svg:y="9.228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2.134cm" svg:y="9.173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2.121cm" svg:y="9.187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2.034cm" svg:y="9.228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2.034cm" svg:y="9.225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2.03cm" svg:y="9.222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2.008cm" svg:y="9.145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2.008cm" svg:y="9.145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2.01cm" svg:y1="9.154cm" svg:x2="2.013cm" svg:y2="9.154cm">
              <text:p/>
            </draw:line>
            <draw:custom-shape draw:style-name="gr119" draw:text-style-name="P57" draw:layer="layout" svg:width="0.002cm" svg:height="0.048cm" svg:x="2.132cm" svg:y="9.145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2.13cm" svg:y="9.145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2.123cm" svg:y="9.139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2.034cm" svg:y="9.319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2.034cm" svg:y="9.316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2.03cm" svg:y="9.313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1.997cm" svg:y="9.459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2.001cm" svg:y1="9.471cm" svg:x2="2.006cm" svg:y2="9.471cm">
              <text:p/>
            </draw:line>
            <draw:line draw:style-name="gr60" draw:text-style-name="P14" draw:layer="layout" svg:x1="2.001cm" svg:y1="9.471cm" svg:x2="2.006cm" svg:y2="9.471cm">
              <text:p/>
            </draw:line>
            <draw:line draw:style-name="gr60" draw:text-style-name="P14" draw:layer="layout" svg:x1="2.001cm" svg:y1="9.471cm" svg:x2="2.006cm" svg:y2="9.471cm">
              <text:p/>
            </draw:line>
            <draw:line draw:style-name="gr60" draw:text-style-name="P14" draw:layer="layout" svg:x1="2.001cm" svg:y1="9.471cm" svg:x2="2.006cm" svg:y2="9.471cm">
              <text:p/>
            </draw:line>
            <draw:line draw:style-name="gr60" draw:text-style-name="P14" draw:layer="layout" svg:x1="2.001cm" svg:y1="9.471cm" svg:x2="2.006cm" svg:y2="9.471cm">
              <text:p/>
            </draw:line>
            <draw:line draw:style-name="gr60" draw:text-style-name="P14" draw:layer="layout" svg:x1="2.001cm" svg:y1="9.471cm" svg:x2="2.006cm" svg:y2="9.471cm">
              <text:p/>
            </draw:line>
            <draw:line draw:style-name="gr60" draw:text-style-name="P14" draw:layer="layout" svg:x1="2.001cm" svg:y1="9.471cm" svg:x2="2.006cm" svg:y2="9.471cm">
              <text:p/>
            </draw:line>
            <draw:custom-shape draw:style-name="gr120" draw:text-style-name="P58" draw:layer="layout" svg:width="0.032cm" svg:height="0.048cm" svg:x="1.997cm" svg:y="9.45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custom-shape draw:style-name="gr120" draw:text-style-name="P58" draw:layer="layout" svg:width="0.032cm" svg:height="0.048cm" svg:x="1.997cm" svg:y="9.45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line draw:style-name="gr60" draw:text-style-name="P14" draw:layer="layout" svg:x1="2.001cm" svg:y1="9.468cm" svg:x2="2.006cm" svg:y2="9.468cm">
              <text:p/>
            </draw:line>
            <draw:custom-shape draw:style-name="gr120" draw:text-style-name="P58" draw:layer="layout" svg:width="0.032cm" svg:height="0.048cm" svg:x="1.997cm" svg:y="9.45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001cm" svg:y1="9.465cm" svg:x2="2.006cm" svg:y2="9.465cm">
              <text:p/>
            </draw:line>
            <draw:custom-shape draw:style-name="gr121" draw:text-style-name="P16" draw:layer="layout" svg:width="0.032cm" svg:height="0.048cm" svg:x="1.995cm" svg:y="9.456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1cm" svg:height="0.048cm" svg:x="1.997cm" svg:y="9.202cm">
              <text:p/>
              <draw:enhanced-geometry svg:viewBox="0 0 86 17" draw:type="non-primitive" draw:enhanced-path="M 0 16  L 0 0  L 85 0  L 85 16  L 0 16  N"/>
            </draw:custom-shape>
            <draw:custom-shape draw:style-name="gr117" draw:text-style-name="P56" draw:layer="layout" svg:width="0.032cm" svg:height="0.048cm" svg:x="2.029cm" svg:y="9.193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2.029cm" svg:y="9.222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2.042cm" svg:y="9.402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5cm" svg:height="0.048cm" svg:x="2.03cm" svg:y="9.462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2.059cm" svg:y="9.428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2cm" svg:height="0.048cm" svg:x="2.104cm" svg:y="9.434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2.034cm" svg:y1="9.299cm" svg:x2="2.034cm" svg:y2="9.336cm">
              <text:p/>
            </draw:line>
            <draw:line draw:style-name="gr60" draw:text-style-name="P14" draw:layer="layout" svg:x1="2.034cm" svg:y1="9.285cm" svg:x2="2.034cm" svg:y2="9.288cm">
              <text:p/>
            </draw:line>
            <draw:custom-shape draw:style-name="gr118" draw:text-style-name="P46" draw:layer="layout" svg:width="0.032cm" svg:height="0.048cm" svg:x="2.019cm" svg:y="9.285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061cm" svg:y="9.27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061cm" svg:y="9.288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106cm" svg:y="9.288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2.029cm" svg:y="9.302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2.034cm" svg:y="9.325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2.098cm" svg:y="9.302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2.106cm" svg:y="9.279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132cm" svg:y="9.285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3cm" svg:x="2.034cm" svg:y="9.276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2.021cm" svg:y="9.285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029cm" svg:y="9.276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2.03cm" svg:y1="9.288cm" svg:x2="2.069cm" svg:y2="9.288cm">
              <text:p/>
            </draw:line>
            <draw:line draw:style-name="gr60" draw:text-style-name="P14" draw:layer="layout" svg:x1="2.07cm" svg:y1="9.299cm" svg:x2="2.07cm" svg:y2="9.304cm">
              <text:p/>
            </draw:line>
            <draw:custom-shape draw:style-name="gr122" draw:text-style-name="P59" draw:layer="layout" svg:width="0.032cm" svg:height="0.048cm" svg:x="2.07cm" svg:y="9.288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096cm" svg:y="9.288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096cm" svg:y="9.279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2.07cm" svg:y="9.274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2.117cm" svg:y="9.308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2.034cm" svg:y="9.179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2.098cm" svg:y="9.187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2.098cm" svg:y="9.228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2.034cm" svg:y="9.231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1.987cm" svg:y="9.207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2.042cm" svg:y="9.448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2.172cm" svg:y1="9.402cm" svg:x2="2.172cm" svg:y2="9.442cm">
              <text:p/>
            </draw:line>
            <draw:custom-shape draw:style-name="gr122" draw:text-style-name="P59" draw:layer="layout" svg:width="0.12cm" svg:height="0.048cm" svg:x="2.042cm" svg:y="9.385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2.034cm" svg:y="9.402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2.042cm" svg:y="9.425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5cm" svg:height="0.048cm" svg:x="1.957cm" svg:y="9.517cm">
              <text:p/>
              <draw:enhanced-geometry svg:viewBox="0 0 125 17" draw:type="non-primitive" draw:enhanced-path="M 0 0  L 0 16  L 124 16  L 124 0  L 0 0  N"/>
            </draw:custom-shape>
            <draw:custom-shape draw:style-name="gr124" draw:text-style-name="P33" draw:layer="layout" svg:width="0.162cm" svg:height="0.048cm" svg:x="1.995cm" svg:y="9.522cm">
              <text:p/>
              <draw:enhanced-geometry svg:viewBox="0 0 86 17" draw:type="non-primitive" draw:enhanced-path="M 1 16  L 83 16  L 84 16  L 84 14  L 85 3  L 84 1  L 83 1  L 1 0  L 0 1  L 0 3  L 0 12  L 0 14  L 1 16  N"/>
            </draw:custom-shape>
            <draw:custom-shape draw:style-name="gr108" draw:text-style-name="P50" draw:layer="layout" svg:width="0.032cm" svg:height="0.048cm" svg:x="2.07cm" svg:y="9.071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1cm" svg:height="0.048cm" svg:x="2.074cm" svg:y="9.082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2cm" svg:height="0.048cm" svg:x="1.981cm" svg:y="9.059cm">
              <text:p/>
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</draw:custom-shape>
            <draw:custom-shape draw:style-name="gr126" draw:text-style-name="P2" draw:layer="layout" svg:width="0.199cm" svg:height="0.054cm" svg:x="1.981cm" svg:y="9.059cm">
              <text:p/>
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</draw:custom-shape>
            <draw:custom-shape draw:style-name="gr118" draw:text-style-name="P46" draw:layer="layout" svg:width="0.101cm" svg:height="0.048cm" svg:x="1.983cm" svg:y="9.062cm">
              <text:p/>
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</draw:custom-shape>
            <draw:custom-shape draw:style-name="gr127" draw:text-style-name="P2" draw:layer="layout" svg:width="0.107cm" svg:height="0.048cm" svg:x="1.983cm" svg:y="9.062cm">
              <text:p/>
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2.07cm" svg:y="9.071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8cm" svg:height="0.048cm" svg:x="1.991cm" svg:y="9.076cm">
              <text:p/>
              <draw:enhanced-geometry svg:viewBox="0 0 43 17" draw:type="non-primitive" draw:enhanced-path="M 0 16  L 42 16  L 41 0  L 0 0  L 0 16  N"/>
            </draw:custom-shape>
            <draw:custom-shape draw:style-name="gr108" draw:text-style-name="P50" draw:layer="layout" svg:width="0.001cm" svg:height="0.048cm" svg:x="2.061cm" svg:y="9.071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2.059cm" svg:y="9.071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2.049cm" svg:y="9.071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2.042cm" svg:y="9.071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2.034cm" svg:y="9.071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8cm" svg:x="2.13cm" svg:y="9.062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2.134cm" svg:y="9.059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2.134cm" svg:y="9.062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2.136cm" svg:y="9.062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2.144cm" svg:y="9.067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1cm" svg:height="0.048cm" svg:x="2.147cm" svg:y="9.076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2.16cm" svg:y1="9.076cm" svg:x2="2.16cm" svg:y2="9.087cm">
              <text:p/>
            </draw:line>
            <draw:custom-shape draw:style-name="gr103" draw:text-style-name="P48" draw:layer="layout" svg:width="0.086cm" svg:height="0.048cm" svg:x="2.076cm" svg:y="9.047cm">
              <text:p/>
              <draw:enhanced-geometry svg:viewBox="0 0 46 17" draw:type="non-primitive" draw:enhanced-path="M 0 16  L 45 16  L 45 0  L 0 0  L 0 16  N"/>
            </draw:custom-shape>
            <draw:custom-shape draw:style-name="gr103" draw:text-style-name="P48" draw:layer="layout" svg:width="0.032cm" svg:height="0.003cm" svg:x="2.076cm" svg:y="9.096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2.166cm" svg:y="9.059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2.093cm" svg:y="9.059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2cm" svg:height="0.048cm" svg:x="2.109cm" svg:y="9.047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2cm" svg:height="0.048cm" svg:x="2.119cm" svg:y="9.059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2.119cm" svg:y="9.073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2cm" svg:height="0.048cm" svg:x="2.119cm" svg:y="9.088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2cm" svg:height="0.048cm" svg:x="2.109cm" svg:y="9.096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2.093cm" svg:y="9.096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2.085cm" svg:y="9.059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2.093cm" svg:y="9.047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2.106cm" svg:y="9.067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2.113cm" svg:y="9.067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2.119cm" svg:y="9.088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2.096cm" svg:y="9.062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2.089cm" svg:y="9.067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2.095cm" svg:y="9.067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4cm" svg:height="0.045cm" svg:x="1.981cm" svg:y="9.071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1" draw:text-style-name="P46" draw:layer="layout" svg:width="0.233cm" svg:height="0.657cm" svg:x="2.339cm" svg:y="10.005cm">
              <text:p/>
              <draw:enhanced-geometry svg:viewBox="0 0 124 230" draw:type="non-primitive" draw:enhanced-path="M 2 0  L 120 0  L 121 0  L 123 2  L 123 3  L 123 226  L 123 227  L 121 228  L 120 229  L 2 229  L 0 228  L 0 227  L 0 226  L 0 3  L 0 2  L 0 0  L 2 0  N"/>
            </draw:custom-shape>
            <draw:custom-shape draw:style-name="gr111" draw:text-style-name="P47" draw:layer="layout" svg:width="0.233cm" svg:height="0.048cm" svg:x="2.339cm" svg:y="10.568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548cm">
              <text:p/>
              <draw:enhanced-geometry svg:viewBox="0 0 124 17" draw:type="non-primitive" draw:enhanced-path="M 0 0  L 123 0  L 123 16  L 0 16  L 0 0  N"/>
            </draw:custom-shape>
            <draw:custom-shape draw:style-name="gr124" draw:text-style-name="P33" draw:layer="layout" svg:width="0.233cm" svg:height="0.048cm" svg:x="2.339cm" svg:y="10.52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52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50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48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46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44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42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40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37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36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34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3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29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7cm" svg:x="2.339cm" svg:y="10.27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339cm" svg:y="10.257cm">
              <text:p/>
              <draw:enhanced-geometry svg:viewBox="0 0 124 17" draw:type="non-primitive" draw:enhanced-path="M 0 0  L 123 0  L 123 16  L 0 16  L 0 0  N"/>
            </draw:custom-shape>
            <draw:custom-shape draw:style-name="gr103" draw:text-style-name="P48" draw:layer="layout" svg:width="0.167cm" svg:height="0.048cm" svg:x="2.285cm" svg:y="10.634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2.465cm" svg:y="10.634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cm" svg:height="0.231cm" svg:x="2.383cm" svg:y="10.431cm">
              <text:p/>
              <draw:enhanced-geometry svg:viewBox="0 0 85 81" draw:type="non-primitive" draw:enhanced-path="M 0 1  L 0 80  L 84 80  L 84 0  N"/>
            </draw:custom-shape>
            <draw:custom-shape draw:style-name="gr203" draw:text-style-name="P46" draw:layer="layout" svg:width="0.233cm" svg:height="0.488cm" svg:x="2.339cm" svg:y="9.465cm">
              <text:p/>
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</draw:custom-shape>
            <draw:custom-shape draw:style-name="gr204" draw:text-style-name="P46" draw:layer="layout" svg:width="0.19cm" svg:height="0.3cm" svg:x="2.362cm" svg:y="9.608cm">
              <text:p/>
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2.369cm" svg:y="9.693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2.369cm" svg:y="9.782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2.366cm" svg:y="9.619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2.416cm" svg:y="9.622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2cm" svg:x="2.512cm" svg:y="9.62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2cm" svg:x="2.512cm" svg:y="9.62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2cm" svg:x="2.375cm" svg:y="9.642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3cm" svg:x="2.369cm" svg:y="9.699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2.416cm" svg:y="9.71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2cm" svg:x="2.495cm" svg:y="9.75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2cm" svg:x="2.495cm" svg:y="9.75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2.409cm" svg:y="9.719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6cm" svg:height="0.047cm" svg:x="2.369cm" svg:y="9.802cm">
              <text:p/>
              <draw:enhanced-geometry svg:viewBox="0 0 94 17" draw:type="non-primitive" draw:enhanced-path="M 0 16  L 93 16  L 93 0  L 0 0  L 0 16  N"/>
            </draw:custom-shape>
            <draw:custom-shape draw:style-name="gr114" draw:text-style-name="P35" draw:layer="layout" svg:width="0.178cm" svg:height="0.048cm" svg:x="2.369cm" svg:y="9.793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7cm" svg:x="2.546cm" svg:y="9.802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cm" svg:height="0.047cm" svg:x="2.366cm" svg:y="9.802cm">
              <text:p/>
              <draw:enhanced-geometry svg:viewBox="0 0 96 17" draw:type="non-primitive" draw:enhanced-path="M 0 16  L 0 0  L 95 0  L 95 16  L 0 16  L 0 16  L 0 0  L 0 0  L 0 16  N"/>
            </draw:custom-shape>
            <draw:custom-shape draw:style-name="gr114" draw:text-style-name="P35" draw:layer="layout" svg:width="0.032cm" svg:height="0.047cm" svg:x="2.358cm" svg:y="9.802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2.369cm" svg:y="9.813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2.413cm" svg:y="9.828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3cm" svg:x="2.422cm" svg:y="9.831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2.369cm" svg:y="9.791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3cm" svg:height="0.002cm" svg:x="2.362cm" svg:y="9.579cm">
              <text:p/>
              <draw:enhanced-geometry svg:viewBox="0 0 103 1" draw:type="non-primitive" draw:enhanced-path="M 1 0  L 100 0  L 101 0  L 102 0  L 102 0  L 100 0  L 1 0  L 0 0  L 0 0  L 0 0  L 1 0  N"/>
            </draw:custom-shape>
            <draw:custom-shape draw:style-name="gr117" draw:text-style-name="P56" draw:layer="layout" svg:width="0.032cm" svg:height="0.048cm" svg:x="2.375cm" svg:y="9.645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2.413cm" svg:y="9.645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1cm" svg:height="0.048cm" svg:x="2.492cm" svg:y="9.645cm">
              <text:p/>
              <draw:enhanced-geometry svg:viewBox="0 0 27 17" draw:type="non-primitive" draw:enhanced-path="M 0 16  L 25 16  L 26 10  L 25 0  L 0 0  L 0 10  L 0 16  N"/>
            </draw:custom-shape>
            <draw:custom-shape draw:style-name="gr109" draw:text-style-name="P51" draw:layer="layout" svg:width="0.065cm" svg:height="0.048cm" svg:x="2.416cm" svg:y="9.662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2.516cm" svg:y="9.608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2.503cm" svg:y="9.622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2.416cm" svg:y="9.662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2.416cm" svg:y="9.659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2.413cm" svg:y="9.656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2.39cm" svg:y="9.579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2.39cm" svg:y="9.579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2.39cm" svg:y1="9.588cm" svg:x2="2.393cm" svg:y2="9.588cm">
              <text:p/>
            </draw:line>
            <draw:custom-shape draw:style-name="gr119" draw:text-style-name="P57" draw:layer="layout" svg:width="0.001cm" svg:height="0.048cm" svg:x="2.512cm" svg:y="9.579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2.511cm" svg:y="9.579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2.505cm" svg:y="9.573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2.416cm" svg:y="9.754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2.416cm" svg:y="9.75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2.413cm" svg:y="9.748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2.377cm" svg:y="9.894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2.383cm" svg:y1="9.905cm" svg:x2="2.388cm" svg:y2="9.905cm">
              <text:p/>
            </draw:line>
            <draw:line draw:style-name="gr60" draw:text-style-name="P14" draw:layer="layout" svg:x1="2.383cm" svg:y1="9.905cm" svg:x2="2.388cm" svg:y2="9.905cm">
              <text:p/>
            </draw:line>
            <draw:line draw:style-name="gr60" draw:text-style-name="P14" draw:layer="layout" svg:x1="2.383cm" svg:y1="9.905cm" svg:x2="2.388cm" svg:y2="9.905cm">
              <text:p/>
            </draw:line>
            <draw:line draw:style-name="gr60" draw:text-style-name="P14" draw:layer="layout" svg:x1="2.383cm" svg:y1="9.905cm" svg:x2="2.388cm" svg:y2="9.905cm">
              <text:p/>
            </draw:line>
            <draw:line draw:style-name="gr60" draw:text-style-name="P14" draw:layer="layout" svg:x1="2.383cm" svg:y1="9.905cm" svg:x2="2.388cm" svg:y2="9.905cm">
              <text:p/>
            </draw:line>
            <draw:line draw:style-name="gr60" draw:text-style-name="P14" draw:layer="layout" svg:x1="2.383cm" svg:y1="9.905cm" svg:x2="2.388cm" svg:y2="9.905cm">
              <text:p/>
            </draw:line>
            <draw:line draw:style-name="gr60" draw:text-style-name="P14" draw:layer="layout" svg:x1="2.383cm" svg:y1="9.905cm" svg:x2="2.388cm" svg:y2="9.905cm">
              <text:p/>
            </draw:line>
            <draw:custom-shape draw:style-name="gr120" draw:text-style-name="P58" draw:layer="layout" svg:width="0.032cm" svg:height="0.048cm" svg:x="2.377cm" svg:y="9.89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custom-shape draw:style-name="gr120" draw:text-style-name="P58" draw:layer="layout" svg:width="0.032cm" svg:height="0.048cm" svg:x="2.377cm" svg:y="9.89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line draw:style-name="gr60" draw:text-style-name="P14" draw:layer="layout" svg:x1="2.383cm" svg:y1="9.902cm" svg:x2="2.388cm" svg:y2="9.902cm">
              <text:p/>
            </draw:line>
            <draw:custom-shape draw:style-name="gr120" draw:text-style-name="P58" draw:layer="layout" svg:width="0.032cm" svg:height="0.048cm" svg:x="2.377cm" svg:y="9.885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383cm" svg:y1="9.899cm" svg:x2="2.388cm" svg:y2="9.899cm">
              <text:p/>
            </draw:line>
            <draw:custom-shape draw:style-name="gr121" draw:text-style-name="P16" draw:layer="layout" svg:width="0.032cm" svg:height="0.048cm" svg:x="2.375cm" svg:y="9.891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3cm" svg:height="0.048cm" svg:x="2.377cm" svg:y="9.636cm">
              <text:p/>
              <draw:enhanced-geometry svg:viewBox="0 0 87 17" draw:type="non-primitive" draw:enhanced-path="M 0 16  L 0 0  L 86 0  L 86 16  L 0 16  N"/>
            </draw:custom-shape>
            <draw:custom-shape draw:style-name="gr117" draw:text-style-name="P56" draw:layer="layout" svg:width="0.032cm" svg:height="0.047cm" svg:x="2.409cm" svg:y="9.628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2.409cm" svg:y="9.656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2.422cm" svg:y="9.836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6cm" svg:height="0.048cm" svg:x="2.413cm" svg:y="9.896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2.441cm" svg:y="9.862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1cm" svg:height="0.048cm" svg:x="2.484cm" svg:y="9.868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2.416cm" svg:y1="9.734cm" svg:x2="2.416cm" svg:y2="9.77cm">
              <text:p/>
            </draw:line>
            <draw:line draw:style-name="gr60" draw:text-style-name="P14" draw:layer="layout" svg:x1="2.416cm" svg:y1="9.719cm" svg:x2="2.416cm" svg:y2="9.721cm">
              <text:p/>
            </draw:line>
            <draw:custom-shape draw:style-name="gr118" draw:text-style-name="P46" draw:layer="layout" svg:width="0.032cm" svg:height="0.048cm" svg:x="2.401cm" svg:y="9.719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443cm" svg:y="9.71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443cm" svg:y="9.72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488cm" svg:y="9.722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2.409cm" svg:y="9.736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2.416cm" svg:y="9.759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2.48cm" svg:y="9.736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2.488cm" svg:y="9.713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512cm" svg:y="9.719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3cm" svg:x="2.416cm" svg:y="9.71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2.403cm" svg:y="9.719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409cm" svg:y="9.71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2.413cm" svg:y1="9.722cm" svg:x2="2.45cm" svg:y2="9.722cm">
              <text:p/>
            </draw:line>
            <draw:line draw:style-name="gr60" draw:text-style-name="P14" draw:layer="layout" svg:x1="2.45cm" svg:y1="9.734cm" svg:x2="2.45cm" svg:y2="9.739cm">
              <text:p/>
            </draw:line>
            <draw:custom-shape draw:style-name="gr122" draw:text-style-name="P59" draw:layer="layout" svg:width="0.032cm" svg:height="0.048cm" svg:x="2.45cm" svg:y="9.72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479cm" svg:y="9.72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479cm" svg:y="9.713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2.45cm" svg:y="9.708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2.497cm" svg:y="9.742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2.416cm" svg:y="9.613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2.48cm" svg:y="9.622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2.48cm" svg:y="9.662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2.416cm" svg:y="9.665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2.369cm" svg:y="9.642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2.422cm" svg:y="9.882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2.554cm" svg:y1="9.836cm" svg:x2="2.554cm" svg:y2="9.876cm">
              <text:p/>
            </draw:line>
            <draw:custom-shape draw:style-name="gr122" draw:text-style-name="P59" draw:layer="layout" svg:width="0.12cm" svg:height="0.048cm" svg:x="2.422cm" svg:y="9.819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2.416cm" svg:y="9.836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2.422cm" svg:y="9.859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3cm" svg:height="0.048cm" svg:x="2.339cm" svg:y="9.951cm">
              <text:p/>
              <draw:enhanced-geometry svg:viewBox="0 0 124 17" draw:type="non-primitive" draw:enhanced-path="M 0 0  L 0 16  L 123 16  L 123 0  L 0 0  N"/>
            </draw:custom-shape>
            <draw:custom-shape draw:style-name="gr124" draw:text-style-name="P33" draw:layer="layout" svg:width="0.163cm" svg:height="0.048cm" svg:x="2.375cm" svg:y="9.957cm">
              <text:p/>
              <draw:enhanced-geometry svg:viewBox="0 0 87 17" draw:type="non-primitive" draw:enhanced-path="M 1 16  L 84 16  L 85 16  L 85 14  L 86 3  L 85 1  L 84 1  L 1 0  L 0 1  L 0 3  L 0 12  L 0 14  L 1 16  N"/>
            </draw:custom-shape>
            <draw:custom-shape draw:style-name="gr108" draw:text-style-name="P50" draw:layer="layout" svg:width="0.032cm" svg:height="0.048cm" svg:x="2.45cm" svg:y="9.505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2.454cm" svg:y="9.516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3cm" svg:height="0.048cm" svg:x="2.362cm" svg:y="9.493cm">
              <text:p/>
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</draw:custom-shape>
            <draw:custom-shape draw:style-name="gr126" draw:text-style-name="P2" draw:layer="layout" svg:width="0.201cm" svg:height="0.054cm" svg:x="2.362cm" svg:y="9.493cm">
              <text:p/>
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</draw:custom-shape>
            <draw:custom-shape draw:style-name="gr118" draw:text-style-name="P46" draw:layer="layout" svg:width="0.103cm" svg:height="0.048cm" svg:x="2.364cm" svg:y="9.496cm">
              <text:p/>
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</draw:custom-shape>
            <draw:custom-shape draw:style-name="gr127" draw:text-style-name="P2" draw:layer="layout" svg:width="0.108cm" svg:height="0.048cm" svg:x="2.364cm" svg:y="9.496cm">
              <text:p/>
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2.45cm" svg:y="9.505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78cm" svg:height="0.048cm" svg:x="2.373cm" svg:y="9.511cm">
              <text:p/>
              <draw:enhanced-geometry svg:viewBox="0 0 42 17" draw:type="non-primitive" draw:enhanced-path="M 0 16  L 41 16  L 40 0  L 0 0  L 0 16  N"/>
            </draw:custom-shape>
            <draw:custom-shape draw:style-name="gr108" draw:text-style-name="P50" draw:layer="layout" svg:width="0.001cm" svg:height="0.048cm" svg:x="2.443cm" svg:y="9.505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2.439cm" svg:y="9.505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2.431cm" svg:y="9.505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2.422cm" svg:y="9.505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2.416cm" svg:y="9.505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8cm" svg:x="2.511cm" svg:y="9.496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2.516cm" svg:y="9.493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2.516cm" svg:y="9.496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2.518cm" svg:y="9.496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2.526cm" svg:y="9.501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2.527cm" svg:y="9.511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2.541cm" svg:y1="9.511cm" svg:x2="2.541cm" svg:y2="9.522cm">
              <text:p/>
            </draw:line>
            <draw:custom-shape draw:style-name="gr103" draw:text-style-name="P48" draw:layer="layout" svg:width="0.084cm" svg:height="0.048cm" svg:x="2.458cm" svg:y="9.482cm">
              <text:p/>
              <draw:enhanced-geometry svg:viewBox="0 0 45 17" draw:type="non-primitive" draw:enhanced-path="M 0 16  L 44 16  L 44 0  L 0 0  L 0 16  N"/>
            </draw:custom-shape>
            <draw:custom-shape draw:style-name="gr103" draw:text-style-name="P48" draw:layer="layout" svg:width="0.032cm" svg:height="0.002cm" svg:x="2.458cm" svg:y="9.531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2.548cm" svg:y="9.493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2.475cm" svg:y="9.493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2cm" svg:height="0.048cm" svg:x="2.492cm" svg:y="9.482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1cm" svg:height="0.048cm" svg:x="2.501cm" svg:y="9.493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2.501cm" svg:y="9.507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1cm" svg:height="0.048cm" svg:x="2.501cm" svg:y="9.522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2cm" svg:height="0.048cm" svg:x="2.492cm" svg:y="9.531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2.475cm" svg:y="9.531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2.465cm" svg:y="9.493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2.475cm" svg:y="9.482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2.488cm" svg:y="9.501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2.495cm" svg:y="9.501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2.499cm" svg:y="9.522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2.479cm" svg:y="9.496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2.469cm" svg:y="9.501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2.477cm" svg:y="9.501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7cm" svg:height="0.045cm" svg:x="2.362cm" svg:y="9.505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1" draw:text-style-name="P46" draw:layer="layout" svg:width="0.233cm" svg:height="0.657cm" svg:x="2.76cm" svg:y="10.245cm">
              <text:p/>
              <draw:enhanced-geometry svg:viewBox="0 0 124 230" draw:type="non-primitive" draw:enhanced-path="M 2 0  L 120 0  L 121 0  L 123 2  L 123 3  L 123 226  L 123 227  L 121 228  L 120 229  L 2 229  L 0 228  L 0 227  L 0 226  L 0 3  L 0 2  L 0 0  L 2 0  N"/>
            </draw:custom-shape>
            <draw:custom-shape draw:style-name="gr111" draw:text-style-name="P47" draw:layer="layout" svg:width="0.233cm" svg:height="0.048cm" svg:x="2.76cm" svg:y="10.80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789cm">
              <text:p/>
              <draw:enhanced-geometry svg:viewBox="0 0 124 17" draw:type="non-primitive" draw:enhanced-path="M 0 0  L 123 0  L 123 16  L 0 16  L 0 0  N"/>
            </draw:custom-shape>
            <draw:custom-shape draw:style-name="gr124" draw:text-style-name="P33" draw:layer="layout" svg:width="0.233cm" svg:height="0.048cm" svg:x="2.76cm" svg:y="10.76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76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74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72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70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68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66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64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6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60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58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5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53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51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2.76cm" svg:y="10.497cm">
              <text:p/>
              <draw:enhanced-geometry svg:viewBox="0 0 124 17" draw:type="non-primitive" draw:enhanced-path="M 0 0  L 123 0  L 123 16  L 0 16  L 0 0  N"/>
            </draw:custom-shape>
            <draw:custom-shape draw:style-name="gr103" draw:text-style-name="P48" draw:layer="layout" svg:width="0.167cm" svg:height="0.048cm" svg:x="2.706cm" svg:y="10.874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2.886cm" svg:y="10.874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59cm" svg:height="0.231cm" svg:x="2.804cm" svg:y="10.671cm">
              <text:p/>
              <draw:enhanced-geometry svg:viewBox="0 0 85 81" draw:type="non-primitive" draw:enhanced-path="M 0 1  L 0 80  L 84 80  L 84 0  N"/>
            </draw:custom-shape>
            <draw:custom-shape draw:style-name="gr203" draw:text-style-name="P46" draw:layer="layout" svg:width="0.233cm" svg:height="0.488cm" svg:x="2.76cm" svg:y="9.706cm">
              <text:p/>
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</draw:custom-shape>
            <draw:custom-shape draw:style-name="gr204" draw:text-style-name="P46" draw:layer="layout" svg:width="0.189cm" svg:height="0.3cm" svg:x="2.783cm" svg:y="9.848cm">
              <text:p/>
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2.79cm" svg:y="9.934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2.79cm" svg:y="10.022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2.787cm" svg:y="9.86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2.837cm" svg:y="9.862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3cm" svg:x="2.933cm" svg:y="9.86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3cm" svg:x="2.933cm" svg:y="9.86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2cm" svg:x="2.796cm" svg:y="9.882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4cm" svg:x="2.79cm" svg:y="9.94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2.837cm" svg:y="9.951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2cm" svg:x="2.916cm" svg:y="9.99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2cm" svg:x="2.916cm" svg:y="9.99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2.83cm" svg:y="9.96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6cm" svg:height="0.048cm" svg:x="2.79cm" svg:y="10.043cm">
              <text:p/>
              <draw:enhanced-geometry svg:viewBox="0 0 94 17" draw:type="non-primitive" draw:enhanced-path="M 0 16  L 93 16  L 93 0  L 0 0  L 0 16  N"/>
            </draw:custom-shape>
            <draw:custom-shape draw:style-name="gr114" draw:text-style-name="P35" draw:layer="layout" svg:width="0.178cm" svg:height="0.048cm" svg:x="2.79cm" svg:y="10.034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2.967cm" svg:y="10.043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cm" svg:height="0.048cm" svg:x="2.787cm" svg:y="10.043cm">
              <text:p/>
              <draw:enhanced-geometry svg:viewBox="0 0 96 17" draw:type="non-primitive" draw:enhanced-path="M 0 16  L 0 0  L 95 0  L 95 16  L 0 16  L 0 16  L 0 0  L 0 0  L 0 16  N"/>
            </draw:custom-shape>
            <draw:custom-shape draw:style-name="gr114" draw:text-style-name="P35" draw:layer="layout" svg:width="0.032cm" svg:height="0.048cm" svg:x="2.779cm" svg:y="10.043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2.79cm" svg:y="10.054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2.834cm" svg:y="10.069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4cm" svg:x="2.843cm" svg:y="10.071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2.79cm" svg:y="10.031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3cm" svg:height="0.002cm" svg:x="2.783cm" svg:y="9.82cm">
              <text:p/>
              <draw:enhanced-geometry svg:viewBox="0 0 103 1" draw:type="non-primitive" draw:enhanced-path="M 1 0  L 100 0  L 101 0  L 102 0  L 102 0  L 100 0  L 1 0  L 0 0  L 0 0  L 0 0  L 1 0  N"/>
            </draw:custom-shape>
            <draw:custom-shape draw:style-name="gr117" draw:text-style-name="P56" draw:layer="layout" svg:width="0.032cm" svg:height="0.048cm" svg:x="2.796cm" svg:y="9.885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2.834cm" svg:y="9.885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cm" svg:height="0.048cm" svg:x="2.913cm" svg:y="9.885cm">
              <text:p/>
              <draw:enhanced-geometry svg:viewBox="0 0 27 17" draw:type="non-primitive" draw:enhanced-path="M 0 16  L 25 16  L 26 10  L 25 0  L 0 0  L 0 10  L 0 16  N"/>
            </draw:custom-shape>
            <draw:custom-shape draw:style-name="gr109" draw:text-style-name="P51" draw:layer="layout" svg:width="0.065cm" svg:height="0.048cm" svg:x="2.837cm" svg:y="9.903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2.937cm" svg:y="9.848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2.924cm" svg:y="9.862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2.837cm" svg:y="9.903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2.837cm" svg:y="9.899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2.834cm" svg:y="9.897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2.811cm" svg:y="9.82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2.811cm" svg:y="9.82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2.811cm" svg:y1="9.828cm" svg:x2="2.814cm" svg:y2="9.828cm">
              <text:p/>
            </draw:line>
            <draw:custom-shape draw:style-name="gr119" draw:text-style-name="P57" draw:layer="layout" svg:width="0.001cm" svg:height="0.048cm" svg:x="2.933cm" svg:y="9.82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2.931cm" svg:y="9.82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2.926cm" svg:y="9.814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2.837cm" svg:y="9.994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2.837cm" svg:y="9.991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2.834cm" svg:y="9.988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2.798cm" svg:y="10.134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2.804cm" svg:y1="10.146cm" svg:x2="2.809cm" svg:y2="10.146cm">
              <text:p/>
            </draw:line>
            <draw:line draw:style-name="gr60" draw:text-style-name="P14" draw:layer="layout" svg:x1="2.804cm" svg:y1="10.146cm" svg:x2="2.809cm" svg:y2="10.146cm">
              <text:p/>
            </draw:line>
            <draw:line draw:style-name="gr60" draw:text-style-name="P14" draw:layer="layout" svg:x1="2.804cm" svg:y1="10.146cm" svg:x2="2.809cm" svg:y2="10.146cm">
              <text:p/>
            </draw:line>
            <draw:line draw:style-name="gr60" draw:text-style-name="P14" draw:layer="layout" svg:x1="2.804cm" svg:y1="10.146cm" svg:x2="2.809cm" svg:y2="10.146cm">
              <text:p/>
            </draw:line>
            <draw:line draw:style-name="gr60" draw:text-style-name="P14" draw:layer="layout" svg:x1="2.804cm" svg:y1="10.146cm" svg:x2="2.809cm" svg:y2="10.146cm">
              <text:p/>
            </draw:line>
            <draw:line draw:style-name="gr60" draw:text-style-name="P14" draw:layer="layout" svg:x1="2.804cm" svg:y1="10.146cm" svg:x2="2.809cm" svg:y2="10.146cm">
              <text:p/>
            </draw:line>
            <draw:line draw:style-name="gr60" draw:text-style-name="P14" draw:layer="layout" svg:x1="2.804cm" svg:y1="10.146cm" svg:x2="2.809cm" svg:y2="10.146cm">
              <text:p/>
            </draw:line>
            <draw:custom-shape draw:style-name="gr120" draw:text-style-name="P58" draw:layer="layout" svg:width="0.032cm" svg:height="0.048cm" svg:x="2.798cm" svg:y="10.13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custom-shape draw:style-name="gr120" draw:text-style-name="P58" draw:layer="layout" svg:width="0.032cm" svg:height="0.048cm" svg:x="2.798cm" svg:y="10.13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line draw:style-name="gr60" draw:text-style-name="P14" draw:layer="layout" svg:x1="2.804cm" svg:y1="10.142cm" svg:x2="2.809cm" svg:y2="10.142cm">
              <text:p/>
            </draw:line>
            <draw:custom-shape draw:style-name="gr120" draw:text-style-name="P58" draw:layer="layout" svg:width="0.032cm" svg:height="0.048cm" svg:x="2.798cm" svg:y="10.12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2.804cm" svg:y1="10.14cm" svg:x2="2.809cm" svg:y2="10.14cm">
              <text:p/>
            </draw:line>
            <draw:custom-shape draw:style-name="gr121" draw:text-style-name="P16" draw:layer="layout" svg:width="0.032cm" svg:height="0.048cm" svg:x="2.796cm" svg:y="10.131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3cm" svg:height="0.048cm" svg:x="2.798cm" svg:y="9.877cm">
              <text:p/>
              <draw:enhanced-geometry svg:viewBox="0 0 87 17" draw:type="non-primitive" draw:enhanced-path="M 0 16  L 0 0  L 86 0  L 86 16  L 0 16  N"/>
            </draw:custom-shape>
            <draw:custom-shape draw:style-name="gr117" draw:text-style-name="P56" draw:layer="layout" svg:width="0.032cm" svg:height="0.048cm" svg:x="2.83cm" svg:y="9.868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2.83cm" svg:y="9.897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2.843cm" svg:y="10.077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5cm" svg:height="0.048cm" svg:x="2.834cm" svg:y="10.137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2.862cm" svg:y="10.103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1cm" svg:height="0.048cm" svg:x="2.905cm" svg:y="10.108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2.837cm" svg:y1="9.974cm" svg:x2="2.837cm" svg:y2="10.01cm">
              <text:p/>
            </draw:line>
            <draw:line draw:style-name="gr60" draw:text-style-name="P14" draw:layer="layout" svg:x1="2.837cm" svg:y1="9.96cm" svg:x2="2.837cm" svg:y2="9.962cm">
              <text:p/>
            </draw:line>
            <draw:custom-shape draw:style-name="gr118" draw:text-style-name="P46" draw:layer="layout" svg:width="0.032cm" svg:height="0.048cm" svg:x="2.822cm" svg:y="9.9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864cm" svg:y="9.951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864cm" svg:y="9.96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909cm" svg:y="9.962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7cm" svg:x="2.83cm" svg:y="9.977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2.837cm" svg:y="10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7cm" svg:x="2.901cm" svg:y="9.977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2.909cm" svg:y="9.954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933cm" svg:y="9.96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2cm" svg:x="2.837cm" svg:y="9.951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2.824cm" svg:y="9.9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2.83cm" svg:y="9.951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2.834cm" svg:y1="9.962cm" svg:x2="2.871cm" svg:y2="9.962cm">
              <text:p/>
            </draw:line>
            <draw:line draw:style-name="gr60" draw:text-style-name="P14" draw:layer="layout" svg:x1="2.871cm" svg:y1="9.974cm" svg:x2="2.871cm" svg:y2="9.979cm">
              <text:p/>
            </draw:line>
            <draw:custom-shape draw:style-name="gr122" draw:text-style-name="P59" draw:layer="layout" svg:width="0.032cm" svg:height="0.048cm" svg:x="2.871cm" svg:y="9.96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899cm" svg:y="9.96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2.899cm" svg:y="9.954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2.871cm" svg:y="9.948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2.918cm" svg:y="9.982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2.837cm" svg:y="9.854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2.901cm" svg:y="9.862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2.901cm" svg:y="9.903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2.837cm" svg:y="9.905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2.79cm" svg:y="9.882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2.843cm" svg:y="10.122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2.975cm" svg:y1="10.077cm" svg:x2="2.975cm" svg:y2="10.117cm">
              <text:p/>
            </draw:line>
            <draw:custom-shape draw:style-name="gr122" draw:text-style-name="P59" draw:layer="layout" svg:width="0.12cm" svg:height="0.048cm" svg:x="2.843cm" svg:y="10.059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2.837cm" svg:y="10.077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2.843cm" svg:y="10.1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3cm" svg:height="0.048cm" svg:x="2.76cm" svg:y="10.191cm">
              <text:p/>
              <draw:enhanced-geometry svg:viewBox="0 0 124 17" draw:type="non-primitive" draw:enhanced-path="M 0 0  L 0 16  L 123 16  L 123 0  L 0 0  N"/>
            </draw:custom-shape>
            <draw:custom-shape draw:style-name="gr124" draw:text-style-name="P33" draw:layer="layout" svg:width="0.163cm" svg:height="0.048cm" svg:x="2.796cm" svg:y="10.197cm">
              <text:p/>
              <draw:enhanced-geometry svg:viewBox="0 0 87 17" draw:type="non-primitive" draw:enhanced-path="M 1 16  L 84 16  L 85 16  L 85 14  L 86 3  L 85 1  L 84 1  L 1 0  L 0 1  L 0 3  L 0 12  L 0 14  L 1 16  N"/>
            </draw:custom-shape>
            <draw:custom-shape draw:style-name="gr108" draw:text-style-name="P50" draw:layer="layout" svg:width="0.032cm" svg:height="0.048cm" svg:x="2.871cm" svg:y="9.745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2.875cm" svg:y="9.757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3cm" svg:height="0.048cm" svg:x="2.783cm" svg:y="9.734cm">
              <text:p/>
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</draw:custom-shape>
            <draw:custom-shape draw:style-name="gr126" draw:text-style-name="P2" draw:layer="layout" svg:width="0.201cm" svg:height="0.053cm" svg:x="2.783cm" svg:y="9.734cm">
              <text:p/>
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</draw:custom-shape>
            <draw:custom-shape draw:style-name="gr118" draw:text-style-name="P46" draw:layer="layout" svg:width="0.103cm" svg:height="0.048cm" svg:x="2.784cm" svg:y="9.737cm">
              <text:p/>
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</draw:custom-shape>
            <draw:custom-shape draw:style-name="gr127" draw:text-style-name="P2" draw:layer="layout" svg:width="0.109cm" svg:height="0.048cm" svg:x="2.784cm" svg:y="9.737cm">
              <text:p/>
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2.871cm" svg:y="9.745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79cm" svg:height="0.048cm" svg:x="2.794cm" svg:y="9.751cm">
              <text:p/>
              <draw:enhanced-geometry svg:viewBox="0 0 42 17" draw:type="non-primitive" draw:enhanced-path="M 0 16  L 41 16  L 40 0  L 0 0  L 0 16  N"/>
            </draw:custom-shape>
            <draw:custom-shape draw:style-name="gr108" draw:text-style-name="P50" draw:layer="layout" svg:width="0.001cm" svg:height="0.048cm" svg:x="2.864cm" svg:y="9.745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2.86cm" svg:y="9.745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2.852cm" svg:y="9.745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2.843cm" svg:y="9.745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2.837cm" svg:y="9.745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2cm" svg:height="0.048cm" svg:x="2.931cm" svg:y="9.737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2.937cm" svg:y="9.734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2.937cm" svg:y="9.73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2.939cm" svg:y="9.73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2.947cm" svg:y="9.742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2.948cm" svg:y="9.751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2.962cm" svg:y1="9.751cm" svg:x2="2.962cm" svg:y2="9.762cm">
              <text:p/>
            </draw:line>
            <draw:custom-shape draw:style-name="gr103" draw:text-style-name="P48" draw:layer="layout" svg:width="0.084cm" svg:height="0.048cm" svg:x="2.879cm" svg:y="9.722cm">
              <text:p/>
              <draw:enhanced-geometry svg:viewBox="0 0 45 17" draw:type="non-primitive" draw:enhanced-path="M 0 16  L 44 16  L 44 0  L 0 0  L 0 16  N"/>
            </draw:custom-shape>
            <draw:custom-shape draw:style-name="gr103" draw:text-style-name="P48" draw:layer="layout" svg:width="0.032cm" svg:height="0.002cm" svg:x="2.879cm" svg:y="9.771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2.969cm" svg:y="9.734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2.896cm" svg:y="9.734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2cm" svg:height="0.048cm" svg:x="2.913cm" svg:y="9.722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2cm" svg:height="0.048cm" svg:x="2.922cm" svg:y="9.734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2.922cm" svg:y="9.748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2cm" svg:height="0.048cm" svg:x="2.922cm" svg:y="9.763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2cm" svg:height="0.048cm" svg:x="2.913cm" svg:y="9.771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2.896cm" svg:y="9.771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1cm" svg:height="0.048cm" svg:x="2.886cm" svg:y="9.734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2.896cm" svg:y="9.722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2.909cm" svg:y="9.742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2.916cm" svg:y="9.742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2.92cm" svg:y="9.763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2.899cm" svg:y="9.737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2.89cm" svg:y="9.742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2.898cm" svg:y="9.742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6cm" svg:height="0.046cm" svg:x="2.784cm" svg:y="9.745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6" draw:text-style-name="P46" draw:layer="layout" svg:width="0.235cm" svg:height="0.658cm" svg:x="3.162cm" svg:y="10.486cm">
              <text:p/>
              <draw:enhanced-geometry svg:viewBox="0 0 125 230" draw:type="non-primitive" draw:enhanced-path="M 2 0  L 121 0  L 122 0  L 124 2  L 124 3  L 124 226  L 124 227  L 122 228  L 121 229  L 2 229  L 0 228  L 0 227  L 0 226  L 0 3  L 0 2  L 0 0  L 2 0  N"/>
            </draw:custom-shape>
            <draw:custom-shape draw:style-name="gr111" draw:text-style-name="P47" draw:layer="layout" svg:width="0.235cm" svg:height="0.048cm" svg:x="3.162cm" svg:y="11.049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1.029cm">
              <text:p/>
              <draw:enhanced-geometry svg:viewBox="0 0 125 17" draw:type="non-primitive" draw:enhanced-path="M 0 0  L 124 0  L 124 16  L 0 16  L 0 0  N"/>
            </draw:custom-shape>
            <draw:custom-shape draw:style-name="gr124" draw:text-style-name="P33" draw:layer="layout" svg:width="0.235cm" svg:height="0.048cm" svg:x="3.162cm" svg:y="11.009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1.009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98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96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94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923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903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88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8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84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8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7cm" svg:x="3.162cm" svg:y="10.80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777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757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162cm" svg:y="10.737cm">
              <text:p/>
              <draw:enhanced-geometry svg:viewBox="0 0 125 17" draw:type="non-primitive" draw:enhanced-path="M 0 0  L 124 0  L 124 16  L 0 16  L 0 0  N"/>
            </draw:custom-shape>
            <draw:custom-shape draw:style-name="gr103" draw:text-style-name="P48" draw:layer="layout" svg:width="0.167cm" svg:height="0.048cm" svg:x="3.11cm" svg:y="11.115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3.288cm" svg:y="11.115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1cm" svg:height="0.232cm" svg:x="3.206cm" svg:y="10.912cm">
              <text:p/>
              <draw:enhanced-geometry svg:viewBox="0 0 86 81" draw:type="non-primitive" draw:enhanced-path="M 0 1  L 0 80  L 85 80  L 85 0  N"/>
            </draw:custom-shape>
            <draw:custom-shape draw:style-name="gr203" draw:text-style-name="P46" draw:layer="layout" svg:width="0.235cm" svg:height="0.488cm" svg:x="3.162cm" svg:y="9.946cm">
              <text:p/>
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</draw:custom-shape>
            <draw:custom-shape draw:style-name="gr204" draw:text-style-name="P46" draw:layer="layout" svg:width="0.188cm" svg:height="0.3cm" svg:x="3.187cm" svg:y="10.088cm">
              <text:p/>
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3.192cm" svg:y="10.174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3.192cm" svg:y="10.263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3.188cm" svg:y="10.1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3.239cm" svg:y="10.103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2cm" svg:x="3.337cm" svg:y="10.103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2cm" svg:x="3.337cm" svg:y="10.103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3cm" svg:x="3.2cm" svg:y="10.123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3cm" svg:x="3.192cm" svg:y="10.18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3.239cm" svg:y="10.191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3cm" svg:x="3.318cm" svg:y="10.23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3cm" svg:x="3.318cm" svg:y="10.23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3.234cm" svg:y="10.2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8cm" svg:height="0.048cm" svg:x="3.192cm" svg:y="10.283cm">
              <text:p/>
              <draw:enhanced-geometry svg:viewBox="0 0 95 17" draw:type="non-primitive" draw:enhanced-path="M 0 16  L 94 16  L 94 0  L 0 0  L 0 16  N"/>
            </draw:custom-shape>
            <draw:custom-shape draw:style-name="gr114" draw:text-style-name="P35" draw:layer="layout" svg:width="0.178cm" svg:height="0.048cm" svg:x="3.192cm" svg:y="10.274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3.369cm" svg:y="10.283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2cm" svg:height="0.048cm" svg:x="3.188cm" svg:y="10.283cm">
              <text:p/>
              <draw:enhanced-geometry svg:viewBox="0 0 97 17" draw:type="non-primitive" draw:enhanced-path="M 0 16  L 0 0  L 96 0  L 96 16  L 0 16  L 0 16  L 0 0  L 0 0  L 0 16  N"/>
            </draw:custom-shape>
            <draw:custom-shape draw:style-name="gr114" draw:text-style-name="P35" draw:layer="layout" svg:width="0.032cm" svg:height="0.048cm" svg:x="3.181cm" svg:y="10.283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3.192cm" svg:y="10.294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3.235cm" svg:y="10.309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4cm" svg:x="3.247cm" svg:y="10.311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3.192cm" svg:y="10.272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1cm" svg:height="0.003cm" svg:x="3.187cm" svg:y="10.06cm">
              <text:p/>
              <draw:enhanced-geometry svg:viewBox="0 0 102 1" draw:type="non-primitive" draw:enhanced-path="M 1 0  L 99 0  L 100 0  L 101 0  L 101 0  L 99 0  L 1 0  L 0 0  L 0 0  L 0 0  L 1 0  N"/>
            </draw:custom-shape>
            <draw:custom-shape draw:style-name="gr117" draw:text-style-name="P56" draw:layer="layout" svg:width="0.032cm" svg:height="0.048cm" svg:x="3.2cm" svg:y="10.126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3.235cm" svg:y="10.126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2cm" svg:height="0.048cm" svg:x="3.315cm" svg:y="10.126cm">
              <text:p/>
              <draw:enhanced-geometry svg:viewBox="0 0 28 17" draw:type="non-primitive" draw:enhanced-path="M 0 16  L 26 16  L 27 10  L 26 0  L 0 0  L 0 10  L 0 16  N"/>
            </draw:custom-shape>
            <draw:custom-shape draw:style-name="gr109" draw:text-style-name="P51" draw:layer="layout" svg:width="0.065cm" svg:height="0.048cm" svg:x="3.239cm" svg:y="10.143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3.339cm" svg:y="10.088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3.326cm" svg:y="10.103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3.239cm" svg:y="10.143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3.239cm" svg:y="10.14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3.235cm" svg:y="10.137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3.213cm" svg:y="10.06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3.213cm" svg:y="10.06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3.215cm" svg:y1="10.069cm" svg:x2="3.218cm" svg:y2="10.069cm">
              <text:p/>
            </draw:line>
            <draw:custom-shape draw:style-name="gr119" draw:text-style-name="P57" draw:layer="layout" svg:width="0.002cm" svg:height="0.048cm" svg:x="3.337cm" svg:y="10.06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3.335cm" svg:y="10.06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3.328cm" svg:y="10.054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3.239cm" svg:y="10.234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3.239cm" svg:y="10.231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3.235cm" svg:y="10.229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3.202cm" svg:y="10.374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3.206cm" svg:y1="10.386cm" svg:x2="3.211cm" svg:y2="10.386cm">
              <text:p/>
            </draw:line>
            <draw:line draw:style-name="gr60" draw:text-style-name="P14" draw:layer="layout" svg:x1="3.206cm" svg:y1="10.386cm" svg:x2="3.211cm" svg:y2="10.386cm">
              <text:p/>
            </draw:line>
            <draw:line draw:style-name="gr60" draw:text-style-name="P14" draw:layer="layout" svg:x1="3.206cm" svg:y1="10.386cm" svg:x2="3.211cm" svg:y2="10.386cm">
              <text:p/>
            </draw:line>
            <draw:line draw:style-name="gr60" draw:text-style-name="P14" draw:layer="layout" svg:x1="3.206cm" svg:y1="10.386cm" svg:x2="3.211cm" svg:y2="10.386cm">
              <text:p/>
            </draw:line>
            <draw:line draw:style-name="gr60" draw:text-style-name="P14" draw:layer="layout" svg:x1="3.206cm" svg:y1="10.386cm" svg:x2="3.211cm" svg:y2="10.386cm">
              <text:p/>
            </draw:line>
            <draw:line draw:style-name="gr60" draw:text-style-name="P14" draw:layer="layout" svg:x1="3.206cm" svg:y1="10.386cm" svg:x2="3.211cm" svg:y2="10.386cm">
              <text:p/>
            </draw:line>
            <draw:line draw:style-name="gr60" draw:text-style-name="P14" draw:layer="layout" svg:x1="3.206cm" svg:y1="10.386cm" svg:x2="3.211cm" svg:y2="10.386cm">
              <text:p/>
            </draw:line>
            <draw:custom-shape draw:style-name="gr120" draw:text-style-name="P58" draw:layer="layout" svg:width="0.032cm" svg:height="0.048cm" svg:x="3.202cm" svg:y="10.372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custom-shape draw:style-name="gr120" draw:text-style-name="P58" draw:layer="layout" svg:width="0.032cm" svg:height="0.048cm" svg:x="3.202cm" svg:y="10.372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line draw:style-name="gr60" draw:text-style-name="P14" draw:layer="layout" svg:x1="3.206cm" svg:y1="10.383cm" svg:x2="3.211cm" svg:y2="10.383cm">
              <text:p/>
            </draw:line>
            <draw:custom-shape draw:style-name="gr120" draw:text-style-name="P58" draw:layer="layout" svg:width="0.032cm" svg:height="0.048cm" svg:x="3.202cm" svg:y="10.36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3.206cm" svg:y1="10.38cm" svg:x2="3.211cm" svg:y2="10.38cm">
              <text:p/>
            </draw:line>
            <draw:custom-shape draw:style-name="gr121" draw:text-style-name="P16" draw:layer="layout" svg:width="0.032cm" svg:height="0.048cm" svg:x="3.2cm" svg:y="10.372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1cm" svg:height="0.048cm" svg:x="3.202cm" svg:y="10.117cm">
              <text:p/>
              <draw:enhanced-geometry svg:viewBox="0 0 86 17" draw:type="non-primitive" draw:enhanced-path="M 0 16  L 0 0  L 85 0  L 85 16  L 0 16  N"/>
            </draw:custom-shape>
            <draw:custom-shape draw:style-name="gr117" draw:text-style-name="P56" draw:layer="layout" svg:width="0.032cm" svg:height="0.048cm" svg:x="3.234cm" svg:y="10.108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3.234cm" svg:y="10.137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3.247cm" svg:y="10.317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6cm" svg:height="0.048cm" svg:x="3.235cm" svg:y="10.377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3.264cm" svg:y="10.343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2cm" svg:height="0.048cm" svg:x="3.309cm" svg:y="10.349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3.239cm" svg:y1="10.215cm" svg:x2="3.239cm" svg:y2="10.251cm">
              <text:p/>
            </draw:line>
            <draw:line draw:style-name="gr60" draw:text-style-name="P14" draw:layer="layout" svg:x1="3.239cm" svg:y1="10.2cm" svg:x2="3.239cm" svg:y2="10.203cm">
              <text:p/>
            </draw:line>
            <draw:custom-shape draw:style-name="gr118" draw:text-style-name="P46" draw:layer="layout" svg:width="0.032cm" svg:height="0.048cm" svg:x="3.224cm" svg:y="10.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266cm" svg:y="10.191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266cm" svg:y="10.203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311cm" svg:y="10.203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3.234cm" svg:y="10.217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3.239cm" svg:y="10.24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3.303cm" svg:y="10.217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3.311cm" svg:y="10.194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3.337cm" svg:y="10.2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3cm" svg:x="3.239cm" svg:y="10.191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3.226cm" svg:y="10.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234cm" svg:y="10.191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3.235cm" svg:y1="10.203cm" svg:x2="3.274cm" svg:y2="10.203cm">
              <text:p/>
            </draw:line>
            <draw:line draw:style-name="gr60" draw:text-style-name="P14" draw:layer="layout" svg:x1="3.275cm" svg:y1="10.215cm" svg:x2="3.275cm" svg:y2="10.22cm">
              <text:p/>
            </draw:line>
            <draw:custom-shape draw:style-name="gr122" draw:text-style-name="P59" draw:layer="layout" svg:width="0.032cm" svg:height="0.048cm" svg:x="3.275cm" svg:y="10.203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3.302cm" svg:y="10.203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3.302cm" svg:y="10.194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3.275cm" svg:y="10.189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3.322cm" svg:y="10.223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3.239cm" svg:y="10.094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3.303cm" svg:y="10.103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3.303cm" svg:y="10.143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3.239cm" svg:y="10.146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3.192cm" svg:y="10.123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3.247cm" svg:y="10.363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3.377cm" svg:y1="10.317cm" svg:x2="3.377cm" svg:y2="10.357cm">
              <text:p/>
            </draw:line>
            <draw:custom-shape draw:style-name="gr122" draw:text-style-name="P59" draw:layer="layout" svg:width="0.12cm" svg:height="0.048cm" svg:x="3.247cm" svg:y="10.3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3.239cm" svg:y="10.317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3.247cm" svg:y="10.34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5cm" svg:height="0.048cm" svg:x="3.162cm" svg:y="10.432cm">
              <text:p/>
              <draw:enhanced-geometry svg:viewBox="0 0 125 17" draw:type="non-primitive" draw:enhanced-path="M 0 0  L 0 16  L 124 16  L 124 0  L 0 0  N"/>
            </draw:custom-shape>
            <draw:custom-shape draw:style-name="gr124" draw:text-style-name="P33" draw:layer="layout" svg:width="0.161cm" svg:height="0.048cm" svg:x="3.2cm" svg:y="10.437cm">
              <text:p/>
              <draw:enhanced-geometry svg:viewBox="0 0 86 17" draw:type="non-primitive" draw:enhanced-path="M 1 16  L 83 16  L 84 16  L 84 14  L 85 3  L 84 1  L 83 1  L 1 0  L 0 1  L 0 3  L 0 12  L 0 14  L 1 16  N"/>
            </draw:custom-shape>
            <draw:custom-shape draw:style-name="gr108" draw:text-style-name="P50" draw:layer="layout" svg:width="0.032cm" svg:height="0.048cm" svg:x="3.275cm" svg:y="9.986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3.279cm" svg:y="9.997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1cm" svg:height="0.048cm" svg:x="3.187cm" svg:y="9.974cm">
              <text:p/>
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</draw:custom-shape>
            <draw:custom-shape draw:style-name="gr126" draw:text-style-name="P2" draw:layer="layout" svg:width="0.199cm" svg:height="0.054cm" svg:x="3.187cm" svg:y="9.974cm">
              <text:p/>
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</draw:custom-shape>
            <draw:custom-shape draw:style-name="gr118" draw:text-style-name="P46" draw:layer="layout" svg:width="0.101cm" svg:height="0.047cm" svg:x="3.188cm" svg:y="9.977cm">
              <text:p/>
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</draw:custom-shape>
            <draw:custom-shape draw:style-name="gr127" draw:text-style-name="P2" draw:layer="layout" svg:width="0.107cm" svg:height="0.047cm" svg:x="3.188cm" svg:y="9.977cm">
              <text:p/>
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3.275cm" svg:y="9.986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8cm" svg:height="0.048cm" svg:x="3.196cm" svg:y="9.992cm">
              <text:p/>
              <draw:enhanced-geometry svg:viewBox="0 0 43 17" draw:type="non-primitive" draw:enhanced-path="M 0 16  L 42 16  L 41 0  L 0 0  L 0 16  N"/>
            </draw:custom-shape>
            <draw:custom-shape draw:style-name="gr108" draw:text-style-name="P50" draw:layer="layout" svg:width="0.001cm" svg:height="0.048cm" svg:x="3.266cm" svg:y="9.986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3.264cm" svg:y="9.986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3.254cm" svg:y="9.986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3.247cm" svg:y="9.986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3.239cm" svg:y="9.986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7cm" svg:x="3.335cm" svg:y="9.977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3.339cm" svg:y="9.974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7cm" svg:x="3.339cm" svg:y="9.97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7cm" svg:x="3.341cm" svg:y="9.97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3.349cm" svg:y="9.982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3.352cm" svg:y="9.992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3.366cm" svg:y1="9.992cm" svg:x2="3.366cm" svg:y2="10.003cm">
              <text:p/>
            </draw:line>
            <draw:custom-shape draw:style-name="gr103" draw:text-style-name="P48" draw:layer="layout" svg:width="0.086cm" svg:height="0.048cm" svg:x="3.281cm" svg:y="9.962cm">
              <text:p/>
              <draw:enhanced-geometry svg:viewBox="0 0 46 17" draw:type="non-primitive" draw:enhanced-path="M 0 16  L 45 16  L 45 0  L 0 0  L 0 16  N"/>
            </draw:custom-shape>
            <draw:custom-shape draw:style-name="gr103" draw:text-style-name="P48" draw:layer="layout" svg:width="0.032cm" svg:height="0.003cm" svg:x="3.281cm" svg:y="10.011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3.371cm" svg:y="9.974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3.298cm" svg:y="9.974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1cm" svg:height="0.048cm" svg:x="3.315cm" svg:y="9.962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1cm" svg:height="0.048cm" svg:x="3.324cm" svg:y="9.974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3.324cm" svg:y="9.988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1cm" svg:height="0.048cm" svg:x="3.324cm" svg:y="10.003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1cm" svg:height="0.048cm" svg:x="3.315cm" svg:y="10.011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3.298cm" svg:y="10.011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3.29cm" svg:y="9.974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3.298cm" svg:y="9.962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3.311cm" svg:y="9.982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3.318cm" svg:y="9.982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3.324cm" svg:y="10.003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7cm" svg:x="3.302cm" svg:y="9.977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3.294cm" svg:y="9.982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3.3cm" svg:y="9.982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4cm" svg:height="0.045cm" svg:x="3.187cm" svg:y="9.986cm">
            <draw:image xlink:href="Pictures/10000000000000DB000000289DFEB865.png" xlink:type="simple" xlink:show="embed" xlink:actuate="onLoad" draw:mime-type="image/png">
              <text:p/>
            </draw:image>
          </draw:frame>
          <draw:frame draw:style-name="gr9" draw:text-style-name="P15" draw:layer="layout" svg:width="0.114cm" svg:height="0.046cm" svg:x="3.608cm" svg:y="10.26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1" draw:text-style-name="P46" draw:layer="layout" svg:width="0.233cm" svg:height="0.657cm" svg:x="3.986cm" svg:y="10.76cm">
              <text:p/>
              <draw:enhanced-geometry svg:viewBox="0 0 124 230" draw:type="non-primitive" draw:enhanced-path="M 2 0  L 120 0  L 121 0  L 123 2  L 123 3  L 123 226  L 123 227  L 121 228  L 120 229  L 2 229  L 0 228  L 0 227  L 0 226  L 0 3  L 0 2  L 0 0  L 2 0  N"/>
            </draw:custom-shape>
            <draw:custom-shape draw:style-name="gr111" draw:text-style-name="P47" draw:layer="layout" svg:width="0.233cm" svg:height="0.048cm" svg:x="3.986cm" svg:y="11.32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304cm">
              <text:p/>
              <draw:enhanced-geometry svg:viewBox="0 0 124 17" draw:type="non-primitive" draw:enhanced-path="M 0 0  L 123 0  L 123 16  L 0 16  L 0 0  N"/>
            </draw:custom-shape>
            <draw:custom-shape draw:style-name="gr124" draw:text-style-name="P33" draw:layer="layout" svg:width="0.233cm" svg:height="0.048cm" svg:x="3.986cm" svg:y="11.284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284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2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241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221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19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178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1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134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118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09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07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05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03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3.986cm" svg:y="11.012cm">
              <text:p/>
              <draw:enhanced-geometry svg:viewBox="0 0 124 17" draw:type="non-primitive" draw:enhanced-path="M 0 0  L 123 0  L 123 16  L 0 16  L 0 0  N"/>
            </draw:custom-shape>
            <draw:custom-shape draw:style-name="gr103" draw:text-style-name="P48" draw:layer="layout" svg:width="0.167cm" svg:height="0.048cm" svg:x="3.932cm" svg:y="11.389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4.11cm" svg:y="11.389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cm" svg:height="0.231cm" svg:x="4.029cm" svg:y="11.186cm">
              <text:p/>
              <draw:enhanced-geometry svg:viewBox="0 0 85 81" draw:type="non-primitive" draw:enhanced-path="M 0 1  L 0 80  L 84 80  L 84 0  N"/>
            </draw:custom-shape>
            <draw:custom-shape draw:style-name="gr203" draw:text-style-name="P46" draw:layer="layout" svg:width="0.233cm" svg:height="0.488cm" svg:x="3.986cm" svg:y="10.22cm">
              <text:p/>
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</draw:custom-shape>
            <draw:custom-shape draw:style-name="gr204" draw:text-style-name="P46" draw:layer="layout" svg:width="0.19cm" svg:height="0.3cm" svg:x="4.009cm" svg:y="10.363cm">
              <text:p/>
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</draw:custom-shape>
            <draw:custom-shape draw:style-name="gr107" draw:text-style-name="P49" draw:layer="layout" svg:width="0.184cm" svg:height="0.048cm" svg:x="4.016cm" svg:y="10.448cm">
              <text:p/>
              <draw:enhanced-geometry svg:viewBox="0 0 98 17" draw:type="non-primitive" draw:enhanced-path="M 0 0  L 97 0  L 97 16  L 0 16  L 0 0  N"/>
            </draw:custom-shape>
            <draw:custom-shape draw:style-name="gr107" draw:text-style-name="P49" draw:layer="layout" svg:width="0.186cm" svg:height="0.048cm" svg:x="4.016cm" svg:y="10.537cm">
              <text:p/>
              <draw:enhanced-geometry svg:viewBox="0 0 99 17" draw:type="non-primitive" draw:enhanced-path="M 0 0  L 98 0  L 98 16  L 0 16  L 0 0  N"/>
            </draw:custom-shape>
            <draw:custom-shape draw:style-name="gr108" draw:text-style-name="P50" draw:layer="layout" svg:width="0.182cm" svg:height="0.068cm" svg:x="4.013cm" svg:y="10.374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6cm" svg:height="0.048cm" svg:x="4.061cm" svg:y="10.377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1cm" svg:height="0.002cm" svg:x="4.16cm" svg:y="10.377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1cm" svg:height="0.002cm" svg:x="4.16cm" svg:y="10.377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2cm" svg:x="4.022cm" svg:y="10.397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4cm" svg:x="4.016cm" svg:y="10.454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6cm" svg:height="0.051cm" svg:x="4.061cm" svg:y="10.466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2cm" svg:x="4.14cm" svg:y="10.50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2cm" svg:x="4.14cm" svg:y="10.50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4.056cm" svg:y="10.474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7cm" svg:height="0.048cm" svg:x="4.016cm" svg:y="10.557cm">
              <text:p/>
              <draw:enhanced-geometry svg:viewBox="0 0 94 17" draw:type="non-primitive" draw:enhanced-path="M 0 16  L 93 16  L 93 0  L 0 0  L 0 16  N"/>
            </draw:custom-shape>
            <draw:custom-shape draw:style-name="gr114" draw:text-style-name="P35" draw:layer="layout" svg:width="0.178cm" svg:height="0.048cm" svg:x="4.016cm" svg:y="10.548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4.193cm" svg:y="10.557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cm" svg:height="0.048cm" svg:x="4.013cm" svg:y="10.557cm">
              <text:p/>
              <draw:enhanced-geometry svg:viewBox="0 0 96 17" draw:type="non-primitive" draw:enhanced-path="M 0 16  L 0 0  L 95 0  L 95 16  L 0 16  L 0 16  L 0 0  L 0 0  L 0 16  N"/>
            </draw:custom-shape>
            <draw:custom-shape draw:style-name="gr114" draw:text-style-name="P35" draw:layer="layout" svg:width="0.032cm" svg:height="0.048cm" svg:x="4.003cm" svg:y="10.557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4.016cm" svg:y="10.568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5cm" svg:height="0.071cm" svg:x="4.06cm" svg:y="10.583cm">
              <text:p/>
              <draw:enhanced-geometry svg:viewBox="0 0 35 25" draw:type="non-primitive" draw:enhanced-path="M 1 0  L 32 0  L 32 0  L 33 1  L 33 1  L 34 2  L 34 3  L 34 22  L 33 23  L 33 23  L 33 24  L 32 24  L 32 24  L 1 24  L 1 24  L 0 23  L 0 23  L 0 22  L 0 3  L 0 2  L 0 1  L 0 1  L 1 0  L 1 0  N"/>
            </draw:custom-shape>
            <draw:custom-shape draw:style-name="gr115" draw:text-style-name="P54" draw:layer="layout" svg:width="0.12cm" svg:height="0.054cm" svg:x="4.069cm" svg:y="10.586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4.016cm" svg:y="10.546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2cm" svg:height="0.002cm" svg:x="4.009cm" svg:y="10.334cm">
              <text:p/>
              <draw:enhanced-geometry svg:viewBox="0 0 102 1" draw:type="non-primitive" draw:enhanced-path="M 1 0  L 99 0  L 100 0  L 101 0  L 101 0  L 99 0  L 1 0  L 0 0  L 0 0  L 0 0  L 1 0  N"/>
            </draw:custom-shape>
            <draw:custom-shape draw:style-name="gr117" draw:text-style-name="P56" draw:layer="layout" svg:width="0.032cm" svg:height="0.048cm" svg:x="4.022cm" svg:y="10.4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7cm" svg:height="0.048cm" svg:x="4.06cm" svg:y="10.4cm">
              <text:p/>
              <draw:enhanced-geometry svg:viewBox="0 0 36 17" draw:type="non-primitive" draw:enhanced-path="M 0 16  L 35 16  L 0 0  L 0 16  N"/>
            </draw:custom-shape>
            <draw:custom-shape draw:style-name="gr117" draw:text-style-name="P56" draw:layer="layout" svg:width="0.052cm" svg:height="0.048cm" svg:x="4.137cm" svg:y="10.4cm">
              <text:p/>
              <draw:enhanced-geometry svg:viewBox="0 0 28 17" draw:type="non-primitive" draw:enhanced-path="M 0 16  L 26 16  L 27 10  L 26 0  L 0 0  L 0 10  L 0 16  N"/>
            </draw:custom-shape>
            <draw:custom-shape draw:style-name="gr109" draw:text-style-name="P51" draw:layer="layout" svg:width="0.066cm" svg:height="0.048cm" svg:x="4.061cm" svg:y="10.417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4.163cm" svg:y="10.363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4.15cm" svg:y="10.377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4.061cm" svg:y="10.417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4.061cm" svg:y="10.414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4.06cm" svg:y="10.411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4.035cm" svg:y="10.334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4.035cm" svg:y="10.334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4.037cm" svg:y1="10.343cm" svg:x2="4.04cm" svg:y2="10.343cm">
              <text:p/>
            </draw:line>
            <draw:custom-shape draw:style-name="gr119" draw:text-style-name="P57" draw:layer="layout" svg:width="0.001cm" svg:height="0.048cm" svg:x="4.16cm" svg:y="10.334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4.157cm" svg:y="10.334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4.152cm" svg:y="10.328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4.061cm" svg:y="10.509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4.061cm" svg:y="10.505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4.06cm" svg:y="10.503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4.024cm" svg:y="10.649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4.029cm" svg:y1="10.66cm" svg:x2="4.032cm" svg:y2="10.66cm">
              <text:p/>
            </draw:line>
            <draw:line draw:style-name="gr60" draw:text-style-name="P14" draw:layer="layout" svg:x1="4.029cm" svg:y1="10.66cm" svg:x2="4.032cm" svg:y2="10.66cm">
              <text:p/>
            </draw:line>
            <draw:line draw:style-name="gr60" draw:text-style-name="P14" draw:layer="layout" svg:x1="4.029cm" svg:y1="10.66cm" svg:x2="4.032cm" svg:y2="10.66cm">
              <text:p/>
            </draw:line>
            <draw:line draw:style-name="gr60" draw:text-style-name="P14" draw:layer="layout" svg:x1="4.029cm" svg:y1="10.66cm" svg:x2="4.032cm" svg:y2="10.66cm">
              <text:p/>
            </draw:line>
            <draw:line draw:style-name="gr60" draw:text-style-name="P14" draw:layer="layout" svg:x1="4.029cm" svg:y1="10.66cm" svg:x2="4.032cm" svg:y2="10.66cm">
              <text:p/>
            </draw:line>
            <draw:line draw:style-name="gr60" draw:text-style-name="P14" draw:layer="layout" svg:x1="4.029cm" svg:y1="10.66cm" svg:x2="4.032cm" svg:y2="10.66cm">
              <text:p/>
            </draw:line>
            <draw:line draw:style-name="gr60" draw:text-style-name="P14" draw:layer="layout" svg:x1="4.029cm" svg:y1="10.66cm" svg:x2="4.032cm" svg:y2="10.66cm">
              <text:p/>
            </draw:line>
            <draw:custom-shape draw:style-name="gr120" draw:text-style-name="P58" draw:layer="layout" svg:width="0.032cm" svg:height="0.048cm" svg:x="4.024cm" svg:y="10.64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custom-shape draw:style-name="gr120" draw:text-style-name="P58" draw:layer="layout" svg:width="0.032cm" svg:height="0.048cm" svg:x="4.024cm" svg:y="10.64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line draw:style-name="gr60" draw:text-style-name="P14" draw:layer="layout" svg:x1="4.029cm" svg:y1="10.657cm" svg:x2="4.032cm" svg:y2="10.657cm">
              <text:p/>
            </draw:line>
            <draw:custom-shape draw:style-name="gr120" draw:text-style-name="P58" draw:layer="layout" svg:width="0.032cm" svg:height="0.048cm" svg:x="4.024cm" svg:y="10.64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029cm" svg:y1="10.655cm" svg:x2="4.032cm" svg:y2="10.655cm">
              <text:p/>
            </draw:line>
            <draw:custom-shape draw:style-name="gr121" draw:text-style-name="P16" draw:layer="layout" svg:width="0.032cm" svg:height="0.048cm" svg:x="4.022cm" svg:y="10.646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1cm" svg:height="0.048cm" svg:x="4.024cm" svg:y="10.391cm">
              <text:p/>
              <draw:enhanced-geometry svg:viewBox="0 0 86 17" draw:type="non-primitive" draw:enhanced-path="M 0 16  L 0 0  L 85 0  L 85 16  L 0 16  N"/>
            </draw:custom-shape>
            <draw:custom-shape draw:style-name="gr117" draw:text-style-name="P56" draw:layer="layout" svg:width="0.032cm" svg:height="0.048cm" svg:x="4.056cm" svg:y="10.383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4.056cm" svg:y="10.411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4.069cm" svg:y="10.592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4cm" svg:height="0.048cm" svg:x="4.06cm" svg:y="10.651cm">
              <text:p/>
              <draw:enhanced-geometry svg:viewBox="0 0 34 17" draw:type="non-primitive" draw:enhanced-path="M 0 16  L 32 16  L 33 5  L 0 0  L 0 5  L 0 16  N"/>
            </draw:custom-shape>
            <draw:custom-shape draw:style-name="gr117" draw:text-style-name="P56" draw:layer="layout" svg:width="0.037cm" svg:height="0.048cm" svg:x="4.088cm" svg:y="10.617cm">
              <text:p/>
              <draw:enhanced-geometry svg:viewBox="0 0 20 17" draw:type="non-primitive" draw:enhanced-path="M 0 16  L 0 0  L 19 0  L 19 16  L 0 16  N"/>
            </draw:custom-shape>
            <draw:custom-shape draw:style-name="gr117" draw:text-style-name="P56" draw:layer="layout" svg:width="0.062cm" svg:height="0.048cm" svg:x="4.131cm" svg:y="10.623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4.061cm" svg:y1="10.489cm" svg:x2="4.061cm" svg:y2="10.525cm">
              <text:p/>
            </draw:line>
            <draw:line draw:style-name="gr60" draw:text-style-name="P14" draw:layer="layout" svg:x1="4.061cm" svg:y1="10.474cm" svg:x2="4.061cm" svg:y2="10.476cm">
              <text:p/>
            </draw:line>
            <draw:custom-shape draw:style-name="gr118" draw:text-style-name="P46" draw:layer="layout" svg:width="0.032cm" svg:height="0.048cm" svg:x="4.046cm" svg:y="10.474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089cm" svg:y="10.46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089cm" svg:y="10.477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135cm" svg:y="10.477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4.056cm" svg:y="10.491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4.061cm" svg:y="10.515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4.125cm" svg:y="10.491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4.135cm" svg:y="10.468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1cm" svg:height="0.048cm" svg:x="4.16cm" svg:y="10.474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6cm" svg:height="0.002cm" svg:x="4.061cm" svg:y="10.466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4.048cm" svg:y="10.474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056cm" svg:y="10.466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4.06cm" svg:y1="10.477cm" svg:x2="4.097cm" svg:y2="10.477cm">
              <text:p/>
            </draw:line>
            <draw:line draw:style-name="gr60" draw:text-style-name="P14" draw:layer="layout" svg:x1="4.097cm" svg:y1="10.489cm" svg:x2="4.097cm" svg:y2="10.494cm">
              <text:p/>
            </draw:line>
            <draw:custom-shape draw:style-name="gr122" draw:text-style-name="P59" draw:layer="layout" svg:width="0.032cm" svg:height="0.048cm" svg:x="4.097cm" svg:y="10.477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124cm" svg:y="10.477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124cm" svg:y="10.468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4.097cm" svg:y="10.463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4.144cm" svg:y="10.497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4.061cm" svg:y="10.369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4.125cm" svg:y="10.377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4.125cm" svg:y="10.417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4.061cm" svg:y="10.42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4.016cm" svg:y="10.397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4.069cm" svg:y="10.637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4.199cm" svg:y1="10.592cm" svg:x2="4.199cm" svg:y2="10.631cm">
              <text:p/>
            </draw:line>
            <draw:custom-shape draw:style-name="gr122" draw:text-style-name="P59" draw:layer="layout" svg:width="0.12cm" svg:height="0.048cm" svg:x="4.069cm" svg:y="10.574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4.061cm" svg:y="10.592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4.069cm" svg:y="10.614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3cm" svg:height="0.048cm" svg:x="3.986cm" svg:y="10.706cm">
              <text:p/>
              <draw:enhanced-geometry svg:viewBox="0 0 124 17" draw:type="non-primitive" draw:enhanced-path="M 0 0  L 0 16  L 123 16  L 123 0  L 0 0  N"/>
            </draw:custom-shape>
            <draw:custom-shape draw:style-name="gr124" draw:text-style-name="P33" draw:layer="layout" svg:width="0.161cm" svg:height="0.048cm" svg:x="4.022cm" svg:y="10.712cm">
              <text:p/>
              <draw:enhanced-geometry svg:viewBox="0 0 86 17" draw:type="non-primitive" draw:enhanced-path="M 1 16  L 83 16  L 84 16  L 84 14  L 85 3  L 84 1  L 83 1  L 1 0  L 0 1  L 0 3  L 0 12  L 0 14  L 1 16  N"/>
            </draw:custom-shape>
            <draw:custom-shape draw:style-name="gr108" draw:text-style-name="P50" draw:layer="layout" svg:width="0.032cm" svg:height="0.048cm" svg:x="4.097cm" svg:y="10.26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4.101cm" svg:y="10.271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2cm" svg:height="0.048cm" svg:x="4.009cm" svg:y="10.248cm">
              <text:p/>
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</draw:custom-shape>
            <draw:custom-shape draw:style-name="gr126" draw:text-style-name="P2" draw:layer="layout" svg:width="0.201cm" svg:height="0.054cm" svg:x="4.009cm" svg:y="10.248cm">
              <text:p/>
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</draw:custom-shape>
            <draw:custom-shape draw:style-name="gr118" draw:text-style-name="P46" draw:layer="layout" svg:width="0.101cm" svg:height="0.048cm" svg:x="4.01cm" svg:y="10.251cm">
              <text:p/>
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</draw:custom-shape>
            <draw:custom-shape draw:style-name="gr127" draw:text-style-name="P2" draw:layer="layout" svg:width="0.109cm" svg:height="0.048cm" svg:x="4.01cm" svg:y="10.251cm">
              <text:p/>
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4.097cm" svg:y="10.26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8cm" svg:height="0.048cm" svg:x="4.018cm" svg:y="10.266cm">
              <text:p/>
              <draw:enhanced-geometry svg:viewBox="0 0 43 17" draw:type="non-primitive" draw:enhanced-path="M 0 16  L 42 16  L 41 0  L 0 0  L 0 16  N"/>
            </draw:custom-shape>
            <draw:custom-shape draw:style-name="gr108" draw:text-style-name="P50" draw:layer="layout" svg:width="0.002cm" svg:height="0.048cm" svg:x="4.089cm" svg:y="10.26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1cm" svg:height="0.048cm" svg:x="4.086cm" svg:y="10.26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4.076cm" svg:y="10.26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4.069cm" svg:y="10.26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4.061cm" svg:y="10.26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2cm" svg:height="0.048cm" svg:x="4.157cm" svg:y="10.251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4.163cm" svg:y="10.248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4.163cm" svg:y="10.251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4.165cm" svg:y="10.251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4.171cm" svg:y="10.257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4.174cm" svg:y="10.266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4.188cm" svg:y1="10.266cm" svg:x2="4.188cm" svg:y2="10.277cm">
              <text:p/>
            </draw:line>
            <draw:custom-shape draw:style-name="gr103" draw:text-style-name="P48" draw:layer="layout" svg:width="0.084cm" svg:height="0.048cm" svg:x="4.105cm" svg:y="10.237cm">
              <text:p/>
              <draw:enhanced-geometry svg:viewBox="0 0 45 17" draw:type="non-primitive" draw:enhanced-path="M 0 16  L 44 16  L 44 0  L 0 0  L 0 16  N"/>
            </draw:custom-shape>
            <draw:custom-shape draw:style-name="gr103" draw:text-style-name="P48" draw:layer="layout" svg:width="0.032cm" svg:height="0.002cm" svg:x="4.105cm" svg:y="10.286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4.195cm" svg:y="10.248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4.122cm" svg:y="10.248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1cm" svg:height="0.048cm" svg:x="4.137cm" svg:y="10.237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1cm" svg:height="0.048cm" svg:x="4.148cm" svg:y="10.248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4.148cm" svg:y="10.262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1cm" svg:height="0.047cm" svg:x="4.148cm" svg:y="10.277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1cm" svg:height="0.048cm" svg:x="4.137cm" svg:y="10.286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4.122cm" svg:y="10.286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4.112cm" svg:y="10.248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4.122cm" svg:y="10.237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4.135cm" svg:y="10.257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4.14cm" svg:y="10.257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7cm" svg:x="4.146cm" svg:y="10.277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4.124cm" svg:y="10.251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4.116cm" svg:y="10.257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4.122cm" svg:y="10.257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4cm" svg:height="0.046cm" svg:x="4.01cm" svg:y="10.26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6" draw:text-style-name="P46" draw:layer="layout" svg:width="0.233cm" svg:height="0.658cm" svg:x="4.387cm" svg:y="10.486cm">
              <text:p/>
              <draw:enhanced-geometry svg:viewBox="0 0 124 230" draw:type="non-primitive" draw:enhanced-path="M 2 0  L 120 0  L 121 0  L 123 2  L 123 3  L 123 226  L 123 227  L 121 228  L 120 229  L 2 229  L 0 228  L 0 227  L 0 226  L 0 3  L 0 2  L 0 0  L 2 0  N"/>
            </draw:custom-shape>
            <draw:custom-shape draw:style-name="gr111" draw:text-style-name="P47" draw:layer="layout" svg:width="0.233cm" svg:height="0.048cm" svg:x="4.387cm" svg:y="11.04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1.029cm">
              <text:p/>
              <draw:enhanced-geometry svg:viewBox="0 0 124 17" draw:type="non-primitive" draw:enhanced-path="M 0 0  L 123 0  L 123 16  L 0 16  L 0 0  N"/>
            </draw:custom-shape>
            <draw:custom-shape draw:style-name="gr124" draw:text-style-name="P33" draw:layer="layout" svg:width="0.233cm" svg:height="0.048cm" svg:x="4.387cm" svg:y="11.00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1.00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98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96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94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92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90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88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8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844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8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7cm" svg:x="4.387cm" svg:y="10.801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77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75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387cm" svg:y="10.737cm">
              <text:p/>
              <draw:enhanced-geometry svg:viewBox="0 0 124 17" draw:type="non-primitive" draw:enhanced-path="M 0 0  L 123 0  L 123 16  L 0 16  L 0 0  N"/>
            </draw:custom-shape>
            <draw:custom-shape draw:style-name="gr103" draw:text-style-name="P48" draw:layer="layout" svg:width="0.167cm" svg:height="0.048cm" svg:x="4.333cm" svg:y="11.115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4.513cm" svg:y="11.115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59cm" svg:height="0.232cm" svg:x="4.431cm" svg:y="10.912cm">
              <text:p/>
              <draw:enhanced-geometry svg:viewBox="0 0 85 81" draw:type="non-primitive" draw:enhanced-path="M 0 1  L 0 80  L 84 80  L 84 0  N"/>
            </draw:custom-shape>
            <draw:custom-shape draw:style-name="gr203" draw:text-style-name="P46" draw:layer="layout" svg:width="0.233cm" svg:height="0.488cm" svg:x="4.387cm" svg:y="9.946cm">
              <text:p/>
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</draw:custom-shape>
            <draw:custom-shape draw:style-name="gr204" draw:text-style-name="P46" draw:layer="layout" svg:width="0.189cm" svg:height="0.3cm" svg:x="4.41cm" svg:y="10.088cm">
              <text:p/>
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4.417cm" svg:y="10.174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4.417cm" svg:y="10.263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4.414cm" svg:y="10.1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4.464cm" svg:y="10.103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2cm" svg:x="4.56cm" svg:y="10.103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2cm" svg:x="4.56cm" svg:y="10.103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3cm" svg:x="4.423cm" svg:y="10.123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3cm" svg:x="4.417cm" svg:y="10.18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4.464cm" svg:y="10.191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3cm" svg:x="4.543cm" svg:y="10.23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3cm" svg:x="4.543cm" svg:y="10.23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4.457cm" svg:y="10.2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6cm" svg:height="0.048cm" svg:x="4.417cm" svg:y="10.283cm">
              <text:p/>
              <draw:enhanced-geometry svg:viewBox="0 0 94 17" draw:type="non-primitive" draw:enhanced-path="M 0 16  L 93 16  L 93 0  L 0 0  L 0 16  N"/>
            </draw:custom-shape>
            <draw:custom-shape draw:style-name="gr114" draw:text-style-name="P35" draw:layer="layout" svg:width="0.178cm" svg:height="0.048cm" svg:x="4.417cm" svg:y="10.274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4.594cm" svg:y="10.283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cm" svg:height="0.048cm" svg:x="4.414cm" svg:y="10.283cm">
              <text:p/>
              <draw:enhanced-geometry svg:viewBox="0 0 96 17" draw:type="non-primitive" draw:enhanced-path="M 0 16  L 0 0  L 95 0  L 95 16  L 0 16  L 0 16  L 0 0  L 0 0  L 0 16  N"/>
            </draw:custom-shape>
            <draw:custom-shape draw:style-name="gr114" draw:text-style-name="P35" draw:layer="layout" svg:width="0.032cm" svg:height="0.048cm" svg:x="4.406cm" svg:y="10.283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4.417cm" svg:y="10.294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4.461cm" svg:y="10.309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4cm" svg:x="4.47cm" svg:y="10.311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4.417cm" svg:y="10.272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3cm" svg:height="0.003cm" svg:x="4.41cm" svg:y="10.06cm">
              <text:p/>
              <draw:enhanced-geometry svg:viewBox="0 0 103 1" draw:type="non-primitive" draw:enhanced-path="M 1 0  L 100 0  L 101 0  L 102 0  L 102 0  L 100 0  L 1 0  L 0 0  L 0 0  L 0 0  L 1 0  N"/>
            </draw:custom-shape>
            <draw:custom-shape draw:style-name="gr117" draw:text-style-name="P56" draw:layer="layout" svg:width="0.032cm" svg:height="0.048cm" svg:x="4.423cm" svg:y="10.126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4.461cm" svg:y="10.126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cm" svg:height="0.048cm" svg:x="4.54cm" svg:y="10.126cm">
              <text:p/>
              <draw:enhanced-geometry svg:viewBox="0 0 27 17" draw:type="non-primitive" draw:enhanced-path="M 0 16  L 25 16  L 26 10  L 25 0  L 0 0  L 0 10  L 0 16  N"/>
            </draw:custom-shape>
            <draw:custom-shape draw:style-name="gr109" draw:text-style-name="P51" draw:layer="layout" svg:width="0.065cm" svg:height="0.048cm" svg:x="4.464cm" svg:y="10.143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4.564cm" svg:y="10.088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4.551cm" svg:y="10.103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4.464cm" svg:y="10.143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4.464cm" svg:y="10.14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4.461cm" svg:y="10.137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4.438cm" svg:y="10.06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4.438cm" svg:y="10.06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4.438cm" svg:y1="10.069cm" svg:x2="4.441cm" svg:y2="10.069cm">
              <text:p/>
            </draw:line>
            <draw:custom-shape draw:style-name="gr119" draw:text-style-name="P57" draw:layer="layout" svg:width="0.001cm" svg:height="0.048cm" svg:x="4.56cm" svg:y="10.06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4.558cm" svg:y="10.06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4.553cm" svg:y="10.054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4.464cm" svg:y="10.234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4.464cm" svg:y="10.231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4.461cm" svg:y="10.229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4.425cm" svg:y="10.374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4.431cm" svg:y1="10.386cm" svg:x2="4.436cm" svg:y2="10.386cm">
              <text:p/>
            </draw:line>
            <draw:line draw:style-name="gr60" draw:text-style-name="P14" draw:layer="layout" svg:x1="4.431cm" svg:y1="10.386cm" svg:x2="4.436cm" svg:y2="10.386cm">
              <text:p/>
            </draw:line>
            <draw:line draw:style-name="gr60" draw:text-style-name="P14" draw:layer="layout" svg:x1="4.431cm" svg:y1="10.386cm" svg:x2="4.436cm" svg:y2="10.386cm">
              <text:p/>
            </draw:line>
            <draw:line draw:style-name="gr60" draw:text-style-name="P14" draw:layer="layout" svg:x1="4.431cm" svg:y1="10.386cm" svg:x2="4.436cm" svg:y2="10.386cm">
              <text:p/>
            </draw:line>
            <draw:line draw:style-name="gr60" draw:text-style-name="P14" draw:layer="layout" svg:x1="4.431cm" svg:y1="10.386cm" svg:x2="4.436cm" svg:y2="10.386cm">
              <text:p/>
            </draw:line>
            <draw:line draw:style-name="gr60" draw:text-style-name="P14" draw:layer="layout" svg:x1="4.431cm" svg:y1="10.386cm" svg:x2="4.436cm" svg:y2="10.386cm">
              <text:p/>
            </draw:line>
            <draw:line draw:style-name="gr60" draw:text-style-name="P14" draw:layer="layout" svg:x1="4.431cm" svg:y1="10.386cm" svg:x2="4.436cm" svg:y2="10.386cm">
              <text:p/>
            </draw:line>
            <draw:custom-shape draw:style-name="gr120" draw:text-style-name="P58" draw:layer="layout" svg:width="0.032cm" svg:height="0.048cm" svg:x="4.425cm" svg:y="10.372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custom-shape draw:style-name="gr120" draw:text-style-name="P58" draw:layer="layout" svg:width="0.032cm" svg:height="0.048cm" svg:x="4.425cm" svg:y="10.372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line draw:style-name="gr60" draw:text-style-name="P14" draw:layer="layout" svg:x1="4.431cm" svg:y1="10.383cm" svg:x2="4.436cm" svg:y2="10.383cm">
              <text:p/>
            </draw:line>
            <draw:custom-shape draw:style-name="gr120" draw:text-style-name="P58" draw:layer="layout" svg:width="0.032cm" svg:height="0.048cm" svg:x="4.425cm" svg:y="10.36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431cm" svg:y1="10.38cm" svg:x2="4.436cm" svg:y2="10.38cm">
              <text:p/>
            </draw:line>
            <draw:custom-shape draw:style-name="gr121" draw:text-style-name="P16" draw:layer="layout" svg:width="0.032cm" svg:height="0.048cm" svg:x="4.423cm" svg:y="10.372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3cm" svg:height="0.048cm" svg:x="4.425cm" svg:y="10.117cm">
              <text:p/>
              <draw:enhanced-geometry svg:viewBox="0 0 87 17" draw:type="non-primitive" draw:enhanced-path="M 0 16  L 0 0  L 86 0  L 86 16  L 0 16  N"/>
            </draw:custom-shape>
            <draw:custom-shape draw:style-name="gr117" draw:text-style-name="P56" draw:layer="layout" svg:width="0.032cm" svg:height="0.048cm" svg:x="4.457cm" svg:y="10.108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4.457cm" svg:y="10.137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4.47cm" svg:y="10.317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5cm" svg:height="0.048cm" svg:x="4.461cm" svg:y="10.377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4.489cm" svg:y="10.343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1cm" svg:height="0.048cm" svg:x="4.532cm" svg:y="10.349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4.464cm" svg:y1="10.215cm" svg:x2="4.464cm" svg:y2="10.251cm">
              <text:p/>
            </draw:line>
            <draw:line draw:style-name="gr60" draw:text-style-name="P14" draw:layer="layout" svg:x1="4.464cm" svg:y1="10.2cm" svg:x2="4.464cm" svg:y2="10.203cm">
              <text:p/>
            </draw:line>
            <draw:custom-shape draw:style-name="gr118" draw:text-style-name="P46" draw:layer="layout" svg:width="0.032cm" svg:height="0.048cm" svg:x="4.449cm" svg:y="10.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491cm" svg:y="10.191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491cm" svg:y="10.203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536cm" svg:y="10.203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4.457cm" svg:y="10.217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4.464cm" svg:y="10.24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4.528cm" svg:y="10.217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4.536cm" svg:y="10.194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56cm" svg:y="10.2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3cm" svg:x="4.464cm" svg:y="10.191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4.451cm" svg:y="10.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457cm" svg:y="10.191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4.461cm" svg:y1="10.203cm" svg:x2="4.498cm" svg:y2="10.203cm">
              <text:p/>
            </draw:line>
            <draw:line draw:style-name="gr60" draw:text-style-name="P14" draw:layer="layout" svg:x1="4.498cm" svg:y1="10.215cm" svg:x2="4.498cm" svg:y2="10.22cm">
              <text:p/>
            </draw:line>
            <draw:custom-shape draw:style-name="gr122" draw:text-style-name="P59" draw:layer="layout" svg:width="0.032cm" svg:height="0.048cm" svg:x="4.498cm" svg:y="10.203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526cm" svg:y="10.203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526cm" svg:y="10.194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4.498cm" svg:y="10.189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4.545cm" svg:y="10.223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4.464cm" svg:y="10.094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4.528cm" svg:y="10.103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4.528cm" svg:y="10.143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4.464cm" svg:y="10.146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4.417cm" svg:y="10.123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4.47cm" svg:y="10.363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4.602cm" svg:y1="10.317cm" svg:x2="4.602cm" svg:y2="10.357cm">
              <text:p/>
            </draw:line>
            <draw:custom-shape draw:style-name="gr122" draw:text-style-name="P59" draw:layer="layout" svg:width="0.12cm" svg:height="0.048cm" svg:x="4.47cm" svg:y="10.3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4.464cm" svg:y="10.317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4.47cm" svg:y="10.34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3cm" svg:height="0.048cm" svg:x="4.387cm" svg:y="10.432cm">
              <text:p/>
              <draw:enhanced-geometry svg:viewBox="0 0 124 17" draw:type="non-primitive" draw:enhanced-path="M 0 0  L 0 16  L 123 16  L 123 0  L 0 0  N"/>
            </draw:custom-shape>
            <draw:custom-shape draw:style-name="gr124" draw:text-style-name="P33" draw:layer="layout" svg:width="0.163cm" svg:height="0.048cm" svg:x="4.423cm" svg:y="10.437cm">
              <text:p/>
              <draw:enhanced-geometry svg:viewBox="0 0 87 17" draw:type="non-primitive" draw:enhanced-path="M 1 16  L 84 16  L 85 16  L 85 14  L 86 3  L 85 1  L 84 1  L 1 0  L 0 1  L 0 3  L 0 12  L 0 14  L 1 16  N"/>
            </draw:custom-shape>
            <draw:custom-shape draw:style-name="gr108" draw:text-style-name="P50" draw:layer="layout" svg:width="0.032cm" svg:height="0.048cm" svg:x="4.498cm" svg:y="9.986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4.502cm" svg:y="9.997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3cm" svg:height="0.048cm" svg:x="4.41cm" svg:y="9.974cm">
              <text:p/>
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</draw:custom-shape>
            <draw:custom-shape draw:style-name="gr126" draw:text-style-name="P2" draw:layer="layout" svg:width="0.201cm" svg:height="0.054cm" svg:x="4.41cm" svg:y="9.974cm">
              <text:p/>
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</draw:custom-shape>
            <draw:custom-shape draw:style-name="gr118" draw:text-style-name="P46" draw:layer="layout" svg:width="0.103cm" svg:height="0.047cm" svg:x="4.411cm" svg:y="9.977cm">
              <text:p/>
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</draw:custom-shape>
            <draw:custom-shape draw:style-name="gr127" draw:text-style-name="P2" draw:layer="layout" svg:width="0.109cm" svg:height="0.047cm" svg:x="4.411cm" svg:y="9.977cm">
              <text:p/>
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4.498cm" svg:y="9.986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79cm" svg:height="0.048cm" svg:x="4.421cm" svg:y="9.992cm">
              <text:p/>
              <draw:enhanced-geometry svg:viewBox="0 0 42 17" draw:type="non-primitive" draw:enhanced-path="M 0 16  L 41 16  L 40 0  L 0 0  L 0 16  N"/>
            </draw:custom-shape>
            <draw:custom-shape draw:style-name="gr108" draw:text-style-name="P50" draw:layer="layout" svg:width="0.001cm" svg:height="0.048cm" svg:x="4.491cm" svg:y="9.986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4.487cm" svg:y="9.986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4.479cm" svg:y="9.986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4.47cm" svg:y="9.986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4.464cm" svg:y="9.986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2cm" svg:height="0.047cm" svg:x="4.558cm" svg:y="9.977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4.564cm" svg:y="9.974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7cm" svg:x="4.564cm" svg:y="9.97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7cm" svg:x="4.566cm" svg:y="9.97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4.574cm" svg:y="9.982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4.575cm" svg:y="9.992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4.589cm" svg:y1="9.992cm" svg:x2="4.589cm" svg:y2="10.003cm">
              <text:p/>
            </draw:line>
            <draw:custom-shape draw:style-name="gr103" draw:text-style-name="P48" draw:layer="layout" svg:width="0.084cm" svg:height="0.048cm" svg:x="4.506cm" svg:y="9.962cm">
              <text:p/>
              <draw:enhanced-geometry svg:viewBox="0 0 45 17" draw:type="non-primitive" draw:enhanced-path="M 0 16  L 44 16  L 44 0  L 0 0  L 0 16  N"/>
            </draw:custom-shape>
            <draw:custom-shape draw:style-name="gr103" draw:text-style-name="P48" draw:layer="layout" svg:width="0.032cm" svg:height="0.003cm" svg:x="4.506cm" svg:y="10.011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4.596cm" svg:y="9.974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4.523cm" svg:y="9.974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2cm" svg:height="0.048cm" svg:x="4.54cm" svg:y="9.962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2cm" svg:height="0.048cm" svg:x="4.549cm" svg:y="9.974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4.549cm" svg:y="9.988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2cm" svg:height="0.048cm" svg:x="4.549cm" svg:y="10.003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2cm" svg:height="0.048cm" svg:x="4.54cm" svg:y="10.011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4.523cm" svg:y="10.011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1cm" svg:height="0.048cm" svg:x="4.513cm" svg:y="9.974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4.523cm" svg:y="9.962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4.536cm" svg:y="9.982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4.543cm" svg:y="9.982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4.547cm" svg:y="10.003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7cm" svg:x="4.526cm" svg:y="9.977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4.517cm" svg:y="9.982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4.525cm" svg:y="9.982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6cm" svg:height="0.045cm" svg:x="4.411cm" svg:y="9.986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1" draw:text-style-name="P46" draw:layer="layout" svg:width="0.233cm" svg:height="0.657cm" svg:x="4.77cm" svg:y="10.245cm">
              <text:p/>
              <draw:enhanced-geometry svg:viewBox="0 0 124 230" draw:type="non-primitive" draw:enhanced-path="M 2 0  L 120 0  L 121 0  L 123 2  L 123 3  L 123 226  L 123 227  L 121 228  L 120 229  L 2 229  L 0 228  L 0 227  L 0 226  L 0 3  L 0 2  L 0 0  L 2 0  N"/>
            </draw:custom-shape>
            <draw:custom-shape draw:style-name="gr111" draw:text-style-name="P47" draw:layer="layout" svg:width="0.233cm" svg:height="0.048cm" svg:x="4.77cm" svg:y="10.80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789cm">
              <text:p/>
              <draw:enhanced-geometry svg:viewBox="0 0 124 17" draw:type="non-primitive" draw:enhanced-path="M 0 0  L 123 0  L 123 16  L 0 16  L 0 0  N"/>
            </draw:custom-shape>
            <draw:custom-shape draw:style-name="gr124" draw:text-style-name="P33" draw:layer="layout" svg:width="0.233cm" svg:height="0.048cm" svg:x="4.77cm" svg:y="10.76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76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74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72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70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68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66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64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6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60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58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5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53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51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4.77cm" svg:y="10.497cm">
              <text:p/>
              <draw:enhanced-geometry svg:viewBox="0 0 124 17" draw:type="non-primitive" draw:enhanced-path="M 0 0  L 123 0  L 123 16  L 0 16  L 0 0  N"/>
            </draw:custom-shape>
            <draw:custom-shape draw:style-name="gr103" draw:text-style-name="P48" draw:layer="layout" svg:width="0.167cm" svg:height="0.048cm" svg:x="4.716cm" svg:y="10.874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4.894cm" svg:y="10.874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cm" svg:height="0.231cm" svg:x="4.814cm" svg:y="10.671cm">
              <text:p/>
              <draw:enhanced-geometry svg:viewBox="0 0 85 81" draw:type="non-primitive" draw:enhanced-path="M 0 1  L 0 80  L 84 80  L 84 0  N"/>
            </draw:custom-shape>
            <draw:custom-shape draw:style-name="gr203" draw:text-style-name="P46" draw:layer="layout" svg:width="0.233cm" svg:height="0.488cm" svg:x="4.77cm" svg:y="9.706cm">
              <text:p/>
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</draw:custom-shape>
            <draw:custom-shape draw:style-name="gr204" draw:text-style-name="P46" draw:layer="layout" svg:width="0.19cm" svg:height="0.3cm" svg:x="4.793cm" svg:y="9.848cm">
              <text:p/>
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</draw:custom-shape>
            <draw:custom-shape draw:style-name="gr107" draw:text-style-name="P49" draw:layer="layout" svg:width="0.184cm" svg:height="0.048cm" svg:x="4.8cm" svg:y="9.934cm">
              <text:p/>
              <draw:enhanced-geometry svg:viewBox="0 0 98 17" draw:type="non-primitive" draw:enhanced-path="M 0 0  L 97 0  L 97 16  L 0 16  L 0 0  N"/>
            </draw:custom-shape>
            <draw:custom-shape draw:style-name="gr107" draw:text-style-name="P49" draw:layer="layout" svg:width="0.186cm" svg:height="0.048cm" svg:x="4.8cm" svg:y="10.022cm">
              <text:p/>
              <draw:enhanced-geometry svg:viewBox="0 0 99 17" draw:type="non-primitive" draw:enhanced-path="M 0 0  L 98 0  L 98 16  L 0 16  L 0 0  N"/>
            </draw:custom-shape>
            <draw:custom-shape draw:style-name="gr108" draw:text-style-name="P50" draw:layer="layout" svg:width="0.182cm" svg:height="0.068cm" svg:x="4.797cm" svg:y="9.86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4.846cm" svg:y="9.862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3cm" svg:x="4.944cm" svg:y="9.86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3cm" svg:x="4.944cm" svg:y="9.86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2cm" svg:x="4.806cm" svg:y="9.882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4cm" svg:x="4.8cm" svg:y="9.94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4.846cm" svg:y="9.951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2cm" svg:x="4.925cm" svg:y="9.99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2cm" svg:x="4.925cm" svg:y="9.99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4.84cm" svg:y="9.96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6cm" svg:height="0.048cm" svg:x="4.8cm" svg:y="10.043cm">
              <text:p/>
              <draw:enhanced-geometry svg:viewBox="0 0 94 17" draw:type="non-primitive" draw:enhanced-path="M 0 16  L 93 16  L 93 0  L 0 0  L 0 16  N"/>
            </draw:custom-shape>
            <draw:custom-shape draw:style-name="gr114" draw:text-style-name="P35" draw:layer="layout" svg:width="0.178cm" svg:height="0.048cm" svg:x="4.8cm" svg:y="10.034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4.977cm" svg:y="10.043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cm" svg:height="0.048cm" svg:x="4.797cm" svg:y="10.043cm">
              <text:p/>
              <draw:enhanced-geometry svg:viewBox="0 0 96 17" draw:type="non-primitive" draw:enhanced-path="M 0 16  L 0 0  L 95 0  L 95 16  L 0 16  L 0 16  L 0 0  L 0 0  L 0 16  N"/>
            </draw:custom-shape>
            <draw:custom-shape draw:style-name="gr114" draw:text-style-name="P35" draw:layer="layout" svg:width="0.032cm" svg:height="0.048cm" svg:x="4.787cm" svg:y="10.043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4.8cm" svg:y="10.054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6cm" svg:height="0.071cm" svg:x="4.844cm" svg:y="10.069cm">
              <text:p/>
              <draw:enhanced-geometry svg:viewBox="0 0 35 25" draw:type="non-primitive" draw:enhanced-path="M 1 0  L 32 0  L 32 0  L 33 1  L 33 1  L 34 2  L 34 3  L 34 22  L 33 23  L 33 23  L 33 24  L 32 24  L 32 24  L 1 24  L 1 24  L 0 23  L 0 23  L 0 22  L 0 3  L 0 2  L 0 1  L 0 1  L 1 0  L 1 0  N"/>
            </draw:custom-shape>
            <draw:custom-shape draw:style-name="gr115" draw:text-style-name="P54" draw:layer="layout" svg:width="0.12cm" svg:height="0.054cm" svg:x="4.853cm" svg:y="10.071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4.8cm" svg:y="10.031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2cm" svg:height="0.002cm" svg:x="4.793cm" svg:y="9.82cm">
              <text:p/>
              <draw:enhanced-geometry svg:viewBox="0 0 102 1" draw:type="non-primitive" draw:enhanced-path="M 1 0  L 99 0  L 100 0  L 101 0  L 101 0  L 99 0  L 1 0  L 0 0  L 0 0  L 0 0  L 1 0  N"/>
            </draw:custom-shape>
            <draw:custom-shape draw:style-name="gr117" draw:text-style-name="P56" draw:layer="layout" svg:width="0.032cm" svg:height="0.048cm" svg:x="4.806cm" svg:y="9.885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7cm" svg:height="0.048cm" svg:x="4.844cm" svg:y="9.885cm">
              <text:p/>
              <draw:enhanced-geometry svg:viewBox="0 0 36 17" draw:type="non-primitive" draw:enhanced-path="M 0 16  L 35 16  L 0 0  L 0 16  N"/>
            </draw:custom-shape>
            <draw:custom-shape draw:style-name="gr117" draw:text-style-name="P56" draw:layer="layout" svg:width="0.052cm" svg:height="0.048cm" svg:x="4.921cm" svg:y="9.885cm">
              <text:p/>
              <draw:enhanced-geometry svg:viewBox="0 0 28 17" draw:type="non-primitive" draw:enhanced-path="M 0 16  L 26 16  L 27 10  L 26 0  L 0 0  L 0 10  L 0 16  N"/>
            </draw:custom-shape>
            <draw:custom-shape draw:style-name="gr109" draw:text-style-name="P51" draw:layer="layout" svg:width="0.065cm" svg:height="0.048cm" svg:x="4.846cm" svg:y="9.903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4.947cm" svg:y="9.848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4.934cm" svg:y="9.862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4.846cm" svg:y="9.903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4.846cm" svg:y="9.899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4.844cm" svg:y="9.897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4.819cm" svg:y="9.82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1cm" svg:height="0.048cm" svg:x="4.819cm" svg:y="9.82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4.821cm" svg:y1="9.828cm" svg:x2="4.824cm" svg:y2="9.828cm">
              <text:p/>
            </draw:line>
            <draw:custom-shape draw:style-name="gr119" draw:text-style-name="P57" draw:layer="layout" svg:width="0.001cm" svg:height="0.048cm" svg:x="4.944cm" svg:y="9.82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4.942cm" svg:y="9.82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4.936cm" svg:y="9.814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4.846cm" svg:y="9.994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4.846cm" svg:y="9.991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4.844cm" svg:y="9.988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4.808cm" svg:y="10.134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4.814cm" svg:y1="10.146cm" svg:x2="4.817cm" svg:y2="10.146cm">
              <text:p/>
            </draw:line>
            <draw:line draw:style-name="gr60" draw:text-style-name="P14" draw:layer="layout" svg:x1="4.814cm" svg:y1="10.146cm" svg:x2="4.817cm" svg:y2="10.146cm">
              <text:p/>
            </draw:line>
            <draw:line draw:style-name="gr60" draw:text-style-name="P14" draw:layer="layout" svg:x1="4.814cm" svg:y1="10.146cm" svg:x2="4.817cm" svg:y2="10.146cm">
              <text:p/>
            </draw:line>
            <draw:line draw:style-name="gr60" draw:text-style-name="P14" draw:layer="layout" svg:x1="4.814cm" svg:y1="10.146cm" svg:x2="4.817cm" svg:y2="10.146cm">
              <text:p/>
            </draw:line>
            <draw:line draw:style-name="gr60" draw:text-style-name="P14" draw:layer="layout" svg:x1="4.814cm" svg:y1="10.146cm" svg:x2="4.817cm" svg:y2="10.146cm">
              <text:p/>
            </draw:line>
            <draw:line draw:style-name="gr60" draw:text-style-name="P14" draw:layer="layout" svg:x1="4.814cm" svg:y1="10.146cm" svg:x2="4.817cm" svg:y2="10.146cm">
              <text:p/>
            </draw:line>
            <draw:line draw:style-name="gr60" draw:text-style-name="P14" draw:layer="layout" svg:x1="4.814cm" svg:y1="10.146cm" svg:x2="4.817cm" svg:y2="10.146cm">
              <text:p/>
            </draw:line>
            <draw:custom-shape draw:style-name="gr120" draw:text-style-name="P58" draw:layer="layout" svg:width="0.032cm" svg:height="0.048cm" svg:x="4.808cm" svg:y="10.13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custom-shape draw:style-name="gr120" draw:text-style-name="P58" draw:layer="layout" svg:width="0.032cm" svg:height="0.048cm" svg:x="4.808cm" svg:y="10.13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line draw:style-name="gr60" draw:text-style-name="P14" draw:layer="layout" svg:x1="4.814cm" svg:y1="10.142cm" svg:x2="4.817cm" svg:y2="10.142cm">
              <text:p/>
            </draw:line>
            <draw:custom-shape draw:style-name="gr120" draw:text-style-name="P58" draw:layer="layout" svg:width="0.032cm" svg:height="0.048cm" svg:x="4.808cm" svg:y="10.12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4.814cm" svg:y1="10.14cm" svg:x2="4.817cm" svg:y2="10.14cm">
              <text:p/>
            </draw:line>
            <draw:custom-shape draw:style-name="gr121" draw:text-style-name="P16" draw:layer="layout" svg:width="0.032cm" svg:height="0.048cm" svg:x="4.806cm" svg:y="10.131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2cm" svg:height="0.048cm" svg:x="4.808cm" svg:y="9.877cm">
              <text:p/>
              <draw:enhanced-geometry svg:viewBox="0 0 86 17" draw:type="non-primitive" draw:enhanced-path="M 0 16  L 0 0  L 85 0  L 85 16  L 0 16  N"/>
            </draw:custom-shape>
            <draw:custom-shape draw:style-name="gr117" draw:text-style-name="P56" draw:layer="layout" svg:width="0.032cm" svg:height="0.048cm" svg:x="4.84cm" svg:y="9.868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4.84cm" svg:y="9.897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4.853cm" svg:y="10.077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4cm" svg:height="0.048cm" svg:x="4.844cm" svg:y="10.137cm">
              <text:p/>
              <draw:enhanced-geometry svg:viewBox="0 0 34 17" draw:type="non-primitive" draw:enhanced-path="M 0 16  L 32 16  L 33 5  L 0 0  L 0 5  L 0 16  N"/>
            </draw:custom-shape>
            <draw:custom-shape draw:style-name="gr117" draw:text-style-name="P56" draw:layer="layout" svg:width="0.038cm" svg:height="0.048cm" svg:x="4.872cm" svg:y="10.103cm">
              <text:p/>
              <draw:enhanced-geometry svg:viewBox="0 0 20 17" draw:type="non-primitive" draw:enhanced-path="M 0 16  L 0 0  L 19 0  L 19 16  L 0 16  N"/>
            </draw:custom-shape>
            <draw:custom-shape draw:style-name="gr117" draw:text-style-name="P56" draw:layer="layout" svg:width="0.061cm" svg:height="0.048cm" svg:x="4.915cm" svg:y="10.108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4.846cm" svg:y1="9.974cm" svg:x2="4.846cm" svg:y2="10.01cm">
              <text:p/>
            </draw:line>
            <draw:line draw:style-name="gr60" draw:text-style-name="P14" draw:layer="layout" svg:x1="4.846cm" svg:y1="9.96cm" svg:x2="4.846cm" svg:y2="9.962cm">
              <text:p/>
            </draw:line>
            <draw:custom-shape draw:style-name="gr118" draw:text-style-name="P46" draw:layer="layout" svg:width="0.032cm" svg:height="0.048cm" svg:x="4.83cm" svg:y="9.9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874cm" svg:y="9.951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874cm" svg:y="9.96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919cm" svg:y="9.962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7cm" svg:x="4.84cm" svg:y="9.977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4.846cm" svg:y="10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7cm" svg:x="4.91cm" svg:y="9.977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4.919cm" svg:y="9.954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944cm" svg:y="9.96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2cm" svg:x="4.846cm" svg:y="9.951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4.832cm" svg:y="9.9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4.84cm" svg:y="9.951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4.844cm" svg:y1="9.962cm" svg:x2="4.881cm" svg:y2="9.962cm">
              <text:p/>
            </draw:line>
            <draw:line draw:style-name="gr60" draw:text-style-name="P14" draw:layer="layout" svg:x1="4.881cm" svg:y1="9.974cm" svg:x2="4.881cm" svg:y2="9.979cm">
              <text:p/>
            </draw:line>
            <draw:custom-shape draw:style-name="gr122" draw:text-style-name="P59" draw:layer="layout" svg:width="0.032cm" svg:height="0.048cm" svg:x="4.881cm" svg:y="9.96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908cm" svg:y="9.96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4.908cm" svg:y="9.954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4.881cm" svg:y="9.948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4.929cm" svg:y="9.982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4.846cm" svg:y="9.854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4.91cm" svg:y="9.862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4.91cm" svg:y="9.903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4.846cm" svg:y="9.905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4.8cm" svg:y="9.882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4.853cm" svg:y="10.122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4.983cm" svg:y1="10.077cm" svg:x2="4.983cm" svg:y2="10.117cm">
              <text:p/>
            </draw:line>
            <draw:custom-shape draw:style-name="gr122" draw:text-style-name="P59" draw:layer="layout" svg:width="0.12cm" svg:height="0.048cm" svg:x="4.853cm" svg:y="10.059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4.846cm" svg:y="10.077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4.853cm" svg:y="10.1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3cm" svg:height="0.048cm" svg:x="4.77cm" svg:y="10.191cm">
              <text:p/>
              <draw:enhanced-geometry svg:viewBox="0 0 124 17" draw:type="non-primitive" draw:enhanced-path="M 0 0  L 0 16  L 123 16  L 123 0  L 0 0  N"/>
            </draw:custom-shape>
            <draw:custom-shape draw:style-name="gr124" draw:text-style-name="P33" draw:layer="layout" svg:width="0.161cm" svg:height="0.048cm" svg:x="4.806cm" svg:y="10.197cm">
              <text:p/>
              <draw:enhanced-geometry svg:viewBox="0 0 86 17" draw:type="non-primitive" draw:enhanced-path="M 1 16  L 83 16  L 84 16  L 84 14  L 85 3  L 84 1  L 83 1  L 1 0  L 0 1  L 0 3  L 0 12  L 0 14  L 1 16  N"/>
            </draw:custom-shape>
            <draw:custom-shape draw:style-name="gr108" draw:text-style-name="P50" draw:layer="layout" svg:width="0.032cm" svg:height="0.048cm" svg:x="4.881cm" svg:y="9.745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4.885cm" svg:y="9.757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2cm" svg:height="0.048cm" svg:x="4.793cm" svg:y="9.734cm">
              <text:p/>
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</draw:custom-shape>
            <draw:custom-shape draw:style-name="gr126" draw:text-style-name="P2" draw:layer="layout" svg:width="0.201cm" svg:height="0.053cm" svg:x="4.793cm" svg:y="9.734cm">
              <text:p/>
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</draw:custom-shape>
            <draw:custom-shape draw:style-name="gr118" draw:text-style-name="P46" draw:layer="layout" svg:width="0.101cm" svg:height="0.048cm" svg:x="4.795cm" svg:y="9.737cm">
              <text:p/>
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</draw:custom-shape>
            <draw:custom-shape draw:style-name="gr127" draw:text-style-name="P2" draw:layer="layout" svg:width="0.108cm" svg:height="0.048cm" svg:x="4.795cm" svg:y="9.737cm">
              <text:p/>
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4.881cm" svg:y="9.745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81cm" svg:height="0.048cm" svg:x="4.802cm" svg:y="9.751cm">
              <text:p/>
              <draw:enhanced-geometry svg:viewBox="0 0 43 17" draw:type="non-primitive" draw:enhanced-path="M 0 16  L 42 16  L 41 0  L 0 0  L 0 16  N"/>
            </draw:custom-shape>
            <draw:custom-shape draw:style-name="gr108" draw:text-style-name="P50" draw:layer="layout" svg:width="0.001cm" svg:height="0.048cm" svg:x="4.874cm" svg:y="9.745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4.87cm" svg:y="9.745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1cm" svg:height="0.048cm" svg:x="4.861cm" svg:y="9.745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4.853cm" svg:y="9.745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4.846cm" svg:y="9.745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8cm" svg:x="4.942cm" svg:y="9.737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4.947cm" svg:y="9.734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4.947cm" svg:y="9.73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4.949cm" svg:y="9.737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4.955cm" svg:y="9.742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4.958cm" svg:y="9.751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4.972cm" svg:y1="9.751cm" svg:x2="4.972cm" svg:y2="9.762cm">
              <text:p/>
            </draw:line>
            <draw:custom-shape draw:style-name="gr103" draw:text-style-name="P48" draw:layer="layout" svg:width="0.084cm" svg:height="0.048cm" svg:x="4.889cm" svg:y="9.722cm">
              <text:p/>
              <draw:enhanced-geometry svg:viewBox="0 0 45 17" draw:type="non-primitive" draw:enhanced-path="M 0 16  L 44 16  L 44 0  L 0 0  L 0 16  N"/>
            </draw:custom-shape>
            <draw:custom-shape draw:style-name="gr103" draw:text-style-name="P48" draw:layer="layout" svg:width="0.032cm" svg:height="0.002cm" svg:x="4.889cm" svg:y="9.771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4.979cm" svg:y="9.734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4.906cm" svg:y="9.734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1cm" svg:height="0.048cm" svg:x="4.921cm" svg:y="9.722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2cm" svg:height="0.048cm" svg:x="4.932cm" svg:y="9.734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4.932cm" svg:y="9.748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2cm" svg:height="0.048cm" svg:x="4.932cm" svg:y="9.763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1cm" svg:height="0.048cm" svg:x="4.921cm" svg:y="9.771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4.906cm" svg:y="9.771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4.897cm" svg:y="9.734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4.906cm" svg:y="9.722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4.919cm" svg:y="9.742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4.925cm" svg:y="9.742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4.93cm" svg:y="9.763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4.908cm" svg:y="9.737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1cm" svg:height="0.048cm" svg:x="4.9cm" svg:y="9.742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4.906cm" svg:y="9.742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4cm" svg:height="0.046cm" svg:x="4.793cm" svg:y="9.745cm">
            <draw:image xlink:href="Pictures/10000000000000DB000000289DFEB865.png" xlink:type="simple" xlink:show="embed" xlink:actuate="onLoad" draw:mime-type="image/png">
              <text:p/>
            </draw:image>
          </draw:frame>
          <draw:g draw:style-name="gr4">
            <draw:custom-shape draw:style-name="gr201" draw:text-style-name="P46" draw:layer="layout" svg:width="0.233cm" svg:height="0.657cm" svg:x="5.111cm" svg:y="10.005cm">
              <text:p/>
              <draw:enhanced-geometry svg:viewBox="0 0 124 230" draw:type="non-primitive" draw:enhanced-path="M 2 0  L 120 0  L 121 0  L 123 2  L 123 3  L 123 226  L 123 227  L 121 228  L 120 229  L 2 229  L 0 228  L 0 227  L 0 226  L 0 3  L 0 2  L 0 0  L 2 0  N"/>
            </draw:custom-shape>
            <draw:custom-shape draw:style-name="gr111" draw:text-style-name="P47" draw:layer="layout" svg:width="0.233cm" svg:height="0.048cm" svg:x="5.111cm" svg:y="10.568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548cm">
              <text:p/>
              <draw:enhanced-geometry svg:viewBox="0 0 124 17" draw:type="non-primitive" draw:enhanced-path="M 0 0  L 123 0  L 123 16  L 0 16  L 0 0  N"/>
            </draw:custom-shape>
            <draw:custom-shape draw:style-name="gr124" draw:text-style-name="P33" draw:layer="layout" svg:width="0.233cm" svg:height="0.048cm" svg:x="5.111cm" svg:y="10.52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52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50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48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46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44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42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405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379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363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34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32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296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7cm" svg:x="5.111cm" svg:y="10.277cm">
              <text:p/>
              <draw:enhanced-geometry svg:viewBox="0 0 124 17" draw:type="non-primitive" draw:enhanced-path="M 0 0  L 123 0  L 123 16  L 0 16  L 0 0  N"/>
            </draw:custom-shape>
            <draw:custom-shape draw:style-name="gr111" draw:text-style-name="P47" draw:layer="layout" svg:width="0.233cm" svg:height="0.048cm" svg:x="5.111cm" svg:y="10.257cm">
              <text:p/>
              <draw:enhanced-geometry svg:viewBox="0 0 124 17" draw:type="non-primitive" draw:enhanced-path="M 0 0  L 123 0  L 123 16  L 0 16  L 0 0  N"/>
            </draw:custom-shape>
            <draw:custom-shape draw:style-name="gr103" draw:text-style-name="P48" draw:layer="layout" svg:width="0.167cm" svg:height="0.048cm" svg:x="5.057cm" svg:y="10.634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5.237cm" svg:y="10.634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cm" svg:height="0.231cm" svg:x="5.154cm" svg:y="10.431cm">
              <text:p/>
              <draw:enhanced-geometry svg:viewBox="0 0 85 81" draw:type="non-primitive" draw:enhanced-path="M 0 1  L 0 80  L 84 80  L 84 0  N"/>
            </draw:custom-shape>
            <draw:custom-shape draw:style-name="gr203" draw:text-style-name="P46" draw:layer="layout" svg:width="0.233cm" svg:height="0.488cm" svg:x="5.111cm" svg:y="9.465cm">
              <text:p/>
              <draw:enhanced-geometry svg:viewBox="0 0 124 171" draw:type="non-primitive" draw:enhanced-path="M 3 170  L 119 170  L 121 170  L 122 168  L 123 167  L 123 4  L 122 2  L 121 1  L 120 1  L 3 0  L 1 1  L 0 2  L 0 4  L 0 167  L 0 168  L 1 170  L 3 170  N"/>
            </draw:custom-shape>
            <draw:custom-shape draw:style-name="gr204" draw:text-style-name="P46" draw:layer="layout" svg:width="0.19cm" svg:height="0.3cm" svg:x="5.133cm" svg:y="9.608cm">
              <text:p/>
              <draw:enhanced-geometry svg:viewBox="0 0 101 105" draw:type="non-primitive" draw:enhanced-path="M 4 104  L 96 104  L 97 104  L 98 103  L 99 102  L 100 101  L 100 99  L 100 5  L 100 3  L 99 2  L 98 0  L 97 0  L 96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5.141cm" svg:y="9.693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5.141cm" svg:y="9.782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5.137cm" svg:y="9.619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6cm" svg:height="0.048cm" svg:x="5.188cm" svg:y="9.622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2cm" svg:x="5.284cm" svg:y="9.62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2cm" svg:x="5.284cm" svg:y="9.622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2cm" svg:x="5.147cm" svg:y="9.642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9cm" svg:height="0.073cm" svg:x="5.141cm" svg:y="9.699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6cm" svg:height="0.051cm" svg:x="5.188cm" svg:y="9.71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2cm" svg:x="5.267cm" svg:y="9.75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2cm" svg:x="5.267cm" svg:y="9.754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5.181cm" svg:y="9.719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6cm" svg:height="0.047cm" svg:x="5.141cm" svg:y="9.802cm">
              <text:p/>
              <draw:enhanced-geometry svg:viewBox="0 0 94 17" draw:type="non-primitive" draw:enhanced-path="M 0 16  L 93 16  L 93 0  L 0 0  L 0 16  N"/>
            </draw:custom-shape>
            <draw:custom-shape draw:style-name="gr114" draw:text-style-name="P35" draw:layer="layout" svg:width="0.179cm" svg:height="0.048cm" svg:x="5.141cm" svg:y="9.793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7cm" svg:x="5.318cm" svg:y="9.802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cm" svg:height="0.047cm" svg:x="5.137cm" svg:y="9.802cm">
              <text:p/>
              <draw:enhanced-geometry svg:viewBox="0 0 96 17" draw:type="non-primitive" draw:enhanced-path="M 0 16  L 0 0  L 95 0  L 95 16  L 0 16  L 0 16  L 0 0  L 0 0  L 0 16  N"/>
            </draw:custom-shape>
            <draw:custom-shape draw:style-name="gr114" draw:text-style-name="P35" draw:layer="layout" svg:width="0.031cm" svg:height="0.047cm" svg:x="5.13cm" svg:y="9.802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9cm" svg:height="0.091cm" svg:x="5.141cm" svg:y="9.813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5.184cm" svg:y="9.828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3cm" svg:x="5.194cm" svg:y="9.831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9cm" svg:height="0.048cm" svg:x="5.141cm" svg:y="9.791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4cm" svg:height="0.002cm" svg:x="5.133cm" svg:y="9.579cm">
              <text:p/>
              <draw:enhanced-geometry svg:viewBox="0 0 103 1" draw:type="non-primitive" draw:enhanced-path="M 1 0  L 100 0  L 101 0  L 102 0  L 102 0  L 100 0  L 1 0  L 0 0  L 0 0  L 0 0  L 1 0  N"/>
            </draw:custom-shape>
            <draw:custom-shape draw:style-name="gr117" draw:text-style-name="P56" draw:layer="layout" svg:width="0.032cm" svg:height="0.048cm" svg:x="5.147cm" svg:y="9.645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7cm" svg:height="0.048cm" svg:x="5.184cm" svg:y="9.645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cm" svg:height="0.048cm" svg:x="5.264cm" svg:y="9.645cm">
              <text:p/>
              <draw:enhanced-geometry svg:viewBox="0 0 27 17" draw:type="non-primitive" draw:enhanced-path="M 0 16  L 25 16  L 26 10  L 25 0  L 0 0  L 0 10  L 0 16  N"/>
            </draw:custom-shape>
            <draw:custom-shape draw:style-name="gr109" draw:text-style-name="P51" draw:layer="layout" svg:width="0.066cm" svg:height="0.048cm" svg:x="5.188cm" svg:y="9.662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5.288cm" svg:y="9.608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5.275cm" svg:y="9.622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5.188cm" svg:y="9.662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5.188cm" svg:y="9.659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5.184cm" svg:y="9.656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5.162cm" svg:y="9.579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5.162cm" svg:y="9.579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5.162cm" svg:y1="9.588cm" svg:x2="5.165cm" svg:y2="9.588cm">
              <text:p/>
            </draw:line>
            <draw:custom-shape draw:style-name="gr119" draw:text-style-name="P57" draw:layer="layout" svg:width="0.002cm" svg:height="0.048cm" svg:x="5.284cm" svg:y="9.579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5.283cm" svg:y="9.579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5.277cm" svg:y="9.573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5.188cm" svg:y="9.754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5.188cm" svg:y="9.75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5.184cm" svg:y="9.748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5.149cm" svg:y="9.894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5.154cm" svg:y1="9.905cm" svg:x2="5.159cm" svg:y2="9.905cm">
              <text:p/>
            </draw:line>
            <draw:line draw:style-name="gr60" draw:text-style-name="P14" draw:layer="layout" svg:x1="5.154cm" svg:y1="9.905cm" svg:x2="5.159cm" svg:y2="9.905cm">
              <text:p/>
            </draw:line>
            <draw:line draw:style-name="gr60" draw:text-style-name="P14" draw:layer="layout" svg:x1="5.154cm" svg:y1="9.905cm" svg:x2="5.159cm" svg:y2="9.905cm">
              <text:p/>
            </draw:line>
            <draw:line draw:style-name="gr60" draw:text-style-name="P14" draw:layer="layout" svg:x1="5.154cm" svg:y1="9.905cm" svg:x2="5.159cm" svg:y2="9.905cm">
              <text:p/>
            </draw:line>
            <draw:line draw:style-name="gr60" draw:text-style-name="P14" draw:layer="layout" svg:x1="5.154cm" svg:y1="9.905cm" svg:x2="5.159cm" svg:y2="9.905cm">
              <text:p/>
            </draw:line>
            <draw:line draw:style-name="gr60" draw:text-style-name="P14" draw:layer="layout" svg:x1="5.154cm" svg:y1="9.905cm" svg:x2="5.159cm" svg:y2="9.905cm">
              <text:p/>
            </draw:line>
            <draw:line draw:style-name="gr60" draw:text-style-name="P14" draw:layer="layout" svg:x1="5.154cm" svg:y1="9.905cm" svg:x2="5.159cm" svg:y2="9.905cm">
              <text:p/>
            </draw:line>
            <draw:custom-shape draw:style-name="gr120" draw:text-style-name="P58" draw:layer="layout" svg:width="0.032cm" svg:height="0.048cm" svg:x="5.149cm" svg:y="9.89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custom-shape draw:style-name="gr120" draw:text-style-name="P58" draw:layer="layout" svg:width="0.032cm" svg:height="0.048cm" svg:x="5.149cm" svg:y="9.891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line draw:style-name="gr60" draw:text-style-name="P14" draw:layer="layout" svg:x1="5.154cm" svg:y1="9.902cm" svg:x2="5.159cm" svg:y2="9.902cm">
              <text:p/>
            </draw:line>
            <draw:custom-shape draw:style-name="gr120" draw:text-style-name="P58" draw:layer="layout" svg:width="0.032cm" svg:height="0.048cm" svg:x="5.149cm" svg:y="9.885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5.154cm" svg:y1="9.899cm" svg:x2="5.159cm" svg:y2="9.899cm">
              <text:p/>
            </draw:line>
            <draw:custom-shape draw:style-name="gr121" draw:text-style-name="P16" draw:layer="layout" svg:width="0.032cm" svg:height="0.048cm" svg:x="5.147cm" svg:y="9.891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3cm" svg:height="0.048cm" svg:x="5.149cm" svg:y="9.636cm">
              <text:p/>
              <draw:enhanced-geometry svg:viewBox="0 0 87 17" draw:type="non-primitive" draw:enhanced-path="M 0 16  L 0 0  L 86 0  L 86 16  L 0 16  N"/>
            </draw:custom-shape>
            <draw:custom-shape draw:style-name="gr117" draw:text-style-name="P56" draw:layer="layout" svg:width="0.032cm" svg:height="0.047cm" svg:x="5.181cm" svg:y="9.628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5.181cm" svg:y="9.656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5.194cm" svg:y="9.836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6cm" svg:height="0.048cm" svg:x="5.184cm" svg:y="9.896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5.213cm" svg:y="9.862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1cm" svg:height="0.048cm" svg:x="5.256cm" svg:y="9.868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5.188cm" svg:y1="9.734cm" svg:x2="5.188cm" svg:y2="9.77cm">
              <text:p/>
            </draw:line>
            <draw:line draw:style-name="gr60" draw:text-style-name="P14" draw:layer="layout" svg:x1="5.188cm" svg:y1="9.719cm" svg:x2="5.188cm" svg:y2="9.721cm">
              <text:p/>
            </draw:line>
            <draw:custom-shape draw:style-name="gr118" draw:text-style-name="P46" draw:layer="layout" svg:width="0.032cm" svg:height="0.048cm" svg:x="5.173cm" svg:y="9.719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215cm" svg:y="9.71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215cm" svg:y="9.722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26cm" svg:y="9.722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5.181cm" svg:y="9.736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5.188cm" svg:y="9.759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5.252cm" svg:y="9.736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5.26cm" svg:y="9.713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5.284cm" svg:y="9.719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6cm" svg:height="0.003cm" svg:x="5.188cm" svg:y="9.71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5.175cm" svg:y="9.719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181cm" svg:y="9.71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5.184cm" svg:y1="9.722cm" svg:x2="5.222cm" svg:y2="9.722cm">
              <text:p/>
            </draw:line>
            <draw:line draw:style-name="gr60" draw:text-style-name="P14" draw:layer="layout" svg:x1="5.222cm" svg:y1="9.734cm" svg:x2="5.222cm" svg:y2="9.739cm">
              <text:p/>
            </draw:line>
            <draw:custom-shape draw:style-name="gr122" draw:text-style-name="P59" draw:layer="layout" svg:width="0.032cm" svg:height="0.048cm" svg:x="5.222cm" svg:y="9.72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5.251cm" svg:y="9.722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5.251cm" svg:y="9.713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5.222cm" svg:y="9.708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5.269cm" svg:y="9.742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5.188cm" svg:y="9.613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5.252cm" svg:y="9.622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5.252cm" svg:y="9.662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5.188cm" svg:y="9.665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5.141cm" svg:y="9.642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5.194cm" svg:y="9.882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5.326cm" svg:y1="9.836cm" svg:x2="5.326cm" svg:y2="9.876cm">
              <text:p/>
            </draw:line>
            <draw:custom-shape draw:style-name="gr122" draw:text-style-name="P59" draw:layer="layout" svg:width="0.12cm" svg:height="0.048cm" svg:x="5.194cm" svg:y="9.819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5.188cm" svg:y="9.836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5.194cm" svg:y="9.859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3cm" svg:height="0.048cm" svg:x="5.111cm" svg:y="9.951cm">
              <text:p/>
              <draw:enhanced-geometry svg:viewBox="0 0 124 17" draw:type="non-primitive" draw:enhanced-path="M 0 0  L 0 16  L 123 16  L 123 0  L 0 0  N"/>
            </draw:custom-shape>
            <draw:custom-shape draw:style-name="gr124" draw:text-style-name="P33" draw:layer="layout" svg:width="0.164cm" svg:height="0.048cm" svg:x="5.147cm" svg:y="9.957cm">
              <text:p/>
              <draw:enhanced-geometry svg:viewBox="0 0 87 17" draw:type="non-primitive" draw:enhanced-path="M 1 16  L 84 16  L 85 16  L 85 14  L 86 3  L 85 1  L 84 1  L 1 0  L 0 1  L 0 3  L 0 12  L 0 14  L 1 16  N"/>
            </draw:custom-shape>
            <draw:custom-shape draw:style-name="gr108" draw:text-style-name="P50" draw:layer="layout" svg:width="0.032cm" svg:height="0.048cm" svg:x="5.222cm" svg:y="9.505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5.226cm" svg:y="9.516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4cm" svg:height="0.048cm" svg:x="5.133cm" svg:y="9.493cm">
              <text:p/>
              <draw:enhanced-geometry svg:viewBox="0 0 103 17" draw:type="non-primitive" draw:enhanced-path="M 8 0  L 95 0  L 97 1  L 98 1  L 99 2  L 100 2  L 101 4  L 102 4  L 102 6  L 102 9  L 102 11  L 101 11  L 100 13  L 99 14  L 98 14  L 97 16  L 95 16  L 93 16  L 8 16  L 6 16  L 4 16  L 3 14  L 2 14  L 0 12  L 0 11  L 0 9  L 0 9  L 0 6  L 0 6  L 0 4  L 0 3  L 1 2  L 3 1  L 4 1  L 8 0  N"/>
            </draw:custom-shape>
            <draw:custom-shape draw:style-name="gr126" draw:text-style-name="P2" draw:layer="layout" svg:width="0.201cm" svg:height="0.054cm" svg:x="5.133cm" svg:y="9.493cm">
              <text:p/>
              <draw:enhanced-geometry svg:viewBox="0 0 107 19" draw:type="non-primitive" draw:enhanced-path="M 8 0  L 99 0  L 101 1  L 101 1  L 103 2  L 104 3  L 105 5  L 106 6  L 106 7  L 106 11  L 106 12  L 105 13  L 104 15  L 103 16  L 101 17  L 101 18  L 99 18  L 8 18  L 6 18  L 4 18  L 3 17  L 2 16  L 0 14  L 0 12  L 0 11  L 0 7  L 0 7  L 0 6  L 0 4  L 1 2  L 3 1  L 4 1  L 8 0  N"/>
            </draw:custom-shape>
            <draw:custom-shape draw:style-name="gr118" draw:text-style-name="P46" draw:layer="layout" svg:width="0.103cm" svg:height="0.048cm" svg:x="5.136cm" svg:y="9.496cm">
              <text:p/>
              <draw:enhanced-geometry svg:viewBox="0 0 55 17" draw:type="non-primitive" draw:enhanced-path="M 8 0  L 45 0  L 46 0  L 49 1  L 51 1  L 51 1  L 53 2  L 53 2  L 54 4  L 54 5  L 54 5  L 54 10  L 54 11  L 53 13  L 52 14  L 51 14  L 49 16  L 45 16  L 45 16  L 8 16  L 7 16  L 5 16  L 3 14  L 2 14  L 1 13  L 0 11  L 0 10  L 0 10  L 0 5  L 0 5  L 0 4  L 0 2  L 0 2  L 1 2  L 2 1  L 2 1  L 5 0  L 8 0  N"/>
            </draw:custom-shape>
            <draw:custom-shape draw:style-name="gr127" draw:text-style-name="P2" draw:layer="layout" svg:width="0.109cm" svg:height="0.048cm" svg:x="5.136cm" svg:y="9.496cm">
              <text:p/>
              <draw:enhanced-geometry svg:viewBox="0 0 58 17" draw:type="non-primitive" draw:enhanced-path="M 8 0  L 48 0  L 49 0  L 52 1  L 53 1  L 54 2  L 56 3  L 56 3  L 57 4  L 57 5  L 57 6  L 57 9  L 57 11  L 56 13  L 55 13  L 53 14  L 52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5.222cm" svg:y="9.505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79cm" svg:height="0.048cm" svg:x="5.145cm" svg:y="9.511cm">
              <text:p/>
              <draw:enhanced-geometry svg:viewBox="0 0 42 17" draw:type="non-primitive" draw:enhanced-path="M 0 16  L 41 16  L 40 0  L 0 0  L 0 16  N"/>
            </draw:custom-shape>
            <draw:custom-shape draw:style-name="gr108" draw:text-style-name="P50" draw:layer="layout" svg:width="0.001cm" svg:height="0.048cm" svg:x="5.215cm" svg:y="9.505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5.211cm" svg:y="9.505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5.203cm" svg:y="9.505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5.194cm" svg:y="9.505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5.188cm" svg:y="9.505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8cm" svg:x="5.283cm" svg:y="9.496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5.288cm" svg:y="9.493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5.288cm" svg:y="9.496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5.29cm" svg:y="9.496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5.298cm" svg:y="9.501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5.299cm" svg:y="9.511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5.312cm" svg:y1="9.511cm" svg:x2="5.312cm" svg:y2="9.522cm">
              <text:p/>
            </draw:line>
            <draw:custom-shape draw:style-name="gr103" draw:text-style-name="P48" draw:layer="layout" svg:width="0.085cm" svg:height="0.048cm" svg:x="5.23cm" svg:y="9.482cm">
              <text:p/>
              <draw:enhanced-geometry svg:viewBox="0 0 45 17" draw:type="non-primitive" draw:enhanced-path="M 0 16  L 44 16  L 44 0  L 0 0  L 0 16  N"/>
            </draw:custom-shape>
            <draw:custom-shape draw:style-name="gr103" draw:text-style-name="P48" draw:layer="layout" svg:width="0.032cm" svg:height="0.002cm" svg:x="5.23cm" svg:y="9.531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5.32cm" svg:y="9.493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5.247cm" svg:y="9.493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1cm" svg:height="0.048cm" svg:x="5.264cm" svg:y="9.482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1cm" svg:height="0.048cm" svg:x="5.273cm" svg:y="9.493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5.273cm" svg:y="9.507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1cm" svg:height="0.048cm" svg:x="5.273cm" svg:y="9.522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1cm" svg:height="0.048cm" svg:x="5.264cm" svg:y="9.531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5.247cm" svg:y="9.531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5.237cm" svg:y="9.493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5.247cm" svg:y="9.482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5.26cm" svg:y="9.501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5.267cm" svg:y="9.501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5.271cm" svg:y="9.522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5.251cm" svg:y="9.496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5.241cm" svg:y="9.501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5.248cm" svg:y="9.501cm">
              <text:p/>
              <draw:enhanced-geometry svg:viewBox="0 0 17 17" draw:type="non-primitive" draw:enhanced-path="M 9 0  L 0 12  L 0 16  L 9 16  L 9 14  L 16 0  L 9 0  N"/>
            </draw:custom-shape>
          </draw:g>
          <draw:frame draw:style-name="gr9" draw:text-style-name="P15" draw:layer="layout" svg:width="0.117cm" svg:height="0.045cm" svg:x="5.134cm" svg:y="9.505cm">
            <draw:image xlink:href="Pictures/10000000000000DB000000289DFEB865.png" xlink:type="simple" xlink:show="embed" xlink:actuate="onLoad" draw:mime-type="image/png">
              <text:p/>
            </draw:image>
          </draw:frame>
          <draw:custom-shape draw:style-name="gr207" draw:text-style-name="P21" draw:layer="layout" svg:width="0.511cm" svg:height="0.935cm" svg:x="2.976cm" svg:y="9.054cm">
            <text:list text:style-name="L16">
              <text:list-header>
                <text:p text:style-name="P20"><text:span text:style-name="T3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8" draw:text-style-name="P2" draw:layer="layout" svg:width="2.152cm" svg:height="0.929cm" svg:x="3.703cm" svg:y="11.241cm">
            <text:p/>
            <draw:enhanced-geometry svg:viewBox="0 0 1143 325" draw:type="non-primitive" draw:enhanced-path="M 0 0  L 0 324  L 1142 324  N"/>
          </draw:custom-shape>
          <draw:g draw:style-name="gr4">
            <draw:custom-shape draw:style-name="gr201" draw:text-style-name="P46" draw:layer="layout" svg:width="0.235cm" svg:height="0.657cm" svg:x="5.421cm" svg:y="9.541cm">
              <text:p/>
              <draw:enhanced-geometry svg:viewBox="0 0 125 230" draw:type="non-primitive" draw:enhanced-path="M 2 0  L 121 0  L 122 0  L 124 2  L 124 3  L 124 226  L 124 227  L 122 228  L 121 229  L 2 229  L 0 228  L 0 227  L 0 226  L 0 3  L 0 2  L 0 0  L 2 0  N"/>
            </draw:custom-shape>
            <draw:custom-shape draw:style-name="gr111" draw:text-style-name="P47" draw:layer="layout" svg:width="0.235cm" svg:height="0.048cm" svg:x="5.421cm" svg:y="10.10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10.085cm">
              <text:p/>
              <draw:enhanced-geometry svg:viewBox="0 0 125 17" draw:type="non-primitive" draw:enhanced-path="M 0 0  L 124 0  L 124 16  L 0 16  L 0 0  N"/>
            </draw:custom-shape>
            <draw:custom-shape draw:style-name="gr124" draw:text-style-name="P33" draw:layer="layout" svg:width="0.235cm" svg:height="0.048cm" svg:x="5.421cm" svg:y="10.06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10.06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10.04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10.02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10.00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979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959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94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91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899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87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85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833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813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5.421cm" svg:y="9.793cm">
              <text:p/>
              <draw:enhanced-geometry svg:viewBox="0 0 125 17" draw:type="non-primitive" draw:enhanced-path="M 0 0  L 124 0  L 124 16  L 0 16  L 0 0  N"/>
            </draw:custom-shape>
            <draw:custom-shape draw:style-name="gr103" draw:text-style-name="P48" draw:layer="layout" svg:width="0.167cm" svg:height="0.048cm" svg:x="5.369cm" svg:y="10.17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6cm" svg:height="0.048cm" svg:x="5.547cm" svg:y="10.17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2cm" svg:height="0.231cm" svg:x="5.464cm" svg:y="9.967cm">
              <text:p/>
              <draw:enhanced-geometry svg:viewBox="0 0 86 81" draw:type="non-primitive" draw:enhanced-path="M 0 1  L 0 80  L 85 80  L 85 0  N"/>
            </draw:custom-shape>
            <draw:custom-shape draw:style-name="gr203" draw:text-style-name="P46" draw:layer="layout" svg:width="0.235cm" svg:height="0.488cm" svg:x="5.421cm" svg:y="9.002cm">
              <text:p/>
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</draw:custom-shape>
            <draw:custom-shape draw:style-name="gr204" draw:text-style-name="P46" draw:layer="layout" svg:width="0.188cm" svg:height="0.3cm" svg:x="5.445cm" svg:y="9.144cm">
              <text:p/>
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5.451cm" svg:y="9.23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5.451cm" svg:y="9.318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5.447cm" svg:y="9.156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5.498cm" svg:y="9.158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3cm" svg:x="5.596cm" svg:y="9.158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3cm" svg:x="5.596cm" svg:y="9.158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3cm" svg:x="5.459cm" svg:y="9.178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4cm" svg:x="5.451cm" svg:y="9.236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5.498cm" svg:y="9.247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3cm" svg:x="5.577cm" svg:y="9.2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3cm" svg:x="5.577cm" svg:y="9.2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5.493cm" svg:y="9.256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8cm" svg:height="0.048cm" svg:x="5.451cm" svg:y="9.339cm">
              <text:p/>
              <draw:enhanced-geometry svg:viewBox="0 0 95 17" draw:type="non-primitive" draw:enhanced-path="M 0 16  L 94 16  L 94 0  L 0 0  L 0 16  N"/>
            </draw:custom-shape>
            <draw:custom-shape draw:style-name="gr114" draw:text-style-name="P35" draw:layer="layout" svg:width="0.178cm" svg:height="0.048cm" svg:x="5.451cm" svg:y="9.33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5.628cm" svg:y="9.339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2cm" svg:height="0.048cm" svg:x="5.447cm" svg:y="9.339cm">
              <text:p/>
              <draw:enhanced-geometry svg:viewBox="0 0 97 17" draw:type="non-primitive" draw:enhanced-path="M 0 16  L 0 0  L 96 0  L 96 16  L 0 16  L 0 16  L 0 0  L 0 0  L 0 16  N"/>
            </draw:custom-shape>
            <draw:custom-shape draw:style-name="gr114" draw:text-style-name="P35" draw:layer="layout" svg:width="0.032cm" svg:height="0.048cm" svg:x="5.44cm" svg:y="9.339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5.451cm" svg:y="9.35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5.494cm" svg:y="9.365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4cm" svg:x="5.506cm" svg:y="9.367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7cm" svg:x="5.451cm" svg:y="9.328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2cm" svg:height="0.003cm" svg:x="5.445cm" svg:y="9.116cm">
              <text:p/>
              <draw:enhanced-geometry svg:viewBox="0 0 102 1" draw:type="non-primitive" draw:enhanced-path="M 1 0  L 99 0  L 100 0  L 101 0  L 101 0  L 99 0  L 1 0  L 0 0  L 0 0  L 0 0  L 1 0  N"/>
            </draw:custom-shape>
            <draw:custom-shape draw:style-name="gr117" draw:text-style-name="P56" draw:layer="layout" svg:width="0.032cm" svg:height="0.048cm" svg:x="5.459cm" svg:y="9.182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5.494cm" svg:y="9.182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2cm" svg:height="0.048cm" svg:x="5.573cm" svg:y="9.182cm">
              <text:p/>
              <draw:enhanced-geometry svg:viewBox="0 0 28 17" draw:type="non-primitive" draw:enhanced-path="M 0 16  L 26 16  L 27 10  L 26 0  L 0 0  L 0 10  L 0 16  N"/>
            </draw:custom-shape>
            <draw:custom-shape draw:style-name="gr109" draw:text-style-name="P51" draw:layer="layout" svg:width="0.065cm" svg:height="0.048cm" svg:x="5.498cm" svg:y="9.199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1cm" svg:height="0.048cm" svg:x="5.598cm" svg:y="9.144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5.585cm" svg:y="9.158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5.498cm" svg:y="9.199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5.498cm" svg:y="9.196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5.494cm" svg:y="9.193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5.472cm" svg:y="9.116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1cm" svg:height="0.048cm" svg:x="5.472cm" svg:y="9.116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5.474cm" svg:y1="9.124cm" svg:x2="5.477cm" svg:y2="9.124cm">
              <text:p/>
            </draw:line>
            <draw:custom-shape draw:style-name="gr119" draw:text-style-name="P57" draw:layer="layout" svg:width="0.002cm" svg:height="0.048cm" svg:x="5.596cm" svg:y="9.116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5.594cm" svg:y="9.116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5.587cm" svg:y="9.11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5.498cm" svg:y="9.29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5.498cm" svg:y="9.287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5.494cm" svg:y="9.284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5.461cm" svg:y="9.43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5.464cm" svg:y1="9.442cm" svg:x2="5.469cm" svg:y2="9.442cm">
              <text:p/>
            </draw:line>
            <draw:line draw:style-name="gr60" draw:text-style-name="P14" draw:layer="layout" svg:x1="5.464cm" svg:y1="9.442cm" svg:x2="5.469cm" svg:y2="9.442cm">
              <text:p/>
            </draw:line>
            <draw:line draw:style-name="gr60" draw:text-style-name="P14" draw:layer="layout" svg:x1="5.464cm" svg:y1="9.442cm" svg:x2="5.469cm" svg:y2="9.442cm">
              <text:p/>
            </draw:line>
            <draw:line draw:style-name="gr60" draw:text-style-name="P14" draw:layer="layout" svg:x1="5.464cm" svg:y1="9.442cm" svg:x2="5.469cm" svg:y2="9.442cm">
              <text:p/>
            </draw:line>
            <draw:line draw:style-name="gr60" draw:text-style-name="P14" draw:layer="layout" svg:x1="5.464cm" svg:y1="9.442cm" svg:x2="5.469cm" svg:y2="9.442cm">
              <text:p/>
            </draw:line>
            <draw:line draw:style-name="gr60" draw:text-style-name="P14" draw:layer="layout" svg:x1="5.464cm" svg:y1="9.442cm" svg:x2="5.469cm" svg:y2="9.442cm">
              <text:p/>
            </draw:line>
            <draw:line draw:style-name="gr60" draw:text-style-name="P14" draw:layer="layout" svg:x1="5.464cm" svg:y1="9.442cm" svg:x2="5.469cm" svg:y2="9.442cm">
              <text:p/>
            </draw:line>
            <draw:custom-shape draw:style-name="gr120" draw:text-style-name="P58" draw:layer="layout" svg:width="0.032cm" svg:height="0.048cm" svg:x="5.461cm" svg:y="9.427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custom-shape draw:style-name="gr120" draw:text-style-name="P58" draw:layer="layout" svg:width="0.032cm" svg:height="0.048cm" svg:x="5.461cm" svg:y="9.427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line draw:style-name="gr60" draw:text-style-name="P14" draw:layer="layout" svg:x1="5.464cm" svg:y1="9.438cm" svg:x2="5.469cm" svg:y2="9.438cm">
              <text:p/>
            </draw:line>
            <draw:custom-shape draw:style-name="gr120" draw:text-style-name="P58" draw:layer="layout" svg:width="0.032cm" svg:height="0.048cm" svg:x="5.461cm" svg:y="9.422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5.464cm" svg:y1="9.436cm" svg:x2="5.469cm" svg:y2="9.436cm">
              <text:p/>
            </draw:line>
            <draw:custom-shape draw:style-name="gr121" draw:text-style-name="P16" draw:layer="layout" svg:width="0.032cm" svg:height="0.048cm" svg:x="5.459cm" svg:y="9.427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1cm" svg:height="0.048cm" svg:x="5.461cm" svg:y="9.173cm">
              <text:p/>
              <draw:enhanced-geometry svg:viewBox="0 0 86 17" draw:type="non-primitive" draw:enhanced-path="M 0 16  L 0 0  L 85 0  L 85 16  L 0 16  N"/>
            </draw:custom-shape>
            <draw:custom-shape draw:style-name="gr117" draw:text-style-name="P56" draw:layer="layout" svg:width="0.032cm" svg:height="0.048cm" svg:x="5.493cm" svg:y="9.164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5.493cm" svg:y="9.193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5.506cm" svg:y="9.373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5cm" svg:height="0.048cm" svg:x="5.494cm" svg:y="9.433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5.523cm" svg:y="9.399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1cm" svg:height="0.048cm" svg:x="5.568cm" svg:y="9.405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5.498cm" svg:y1="9.27cm" svg:x2="5.498cm" svg:y2="9.307cm">
              <text:p/>
            </draw:line>
            <draw:line draw:style-name="gr60" draw:text-style-name="P14" draw:layer="layout" svg:x1="5.498cm" svg:y1="9.256cm" svg:x2="5.498cm" svg:y2="9.259cm">
              <text:p/>
            </draw:line>
            <draw:custom-shape draw:style-name="gr118" draw:text-style-name="P46" draw:layer="layout" svg:width="0.032cm" svg:height="0.048cm" svg:x="5.483cm" svg:y="9.25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525cm" svg:y="9.247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525cm" svg:y="9.259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57cm" svg:y="9.259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5.493cm" svg:y="9.273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5.498cm" svg:y="9.296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5.562cm" svg:y="9.273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5.57cm" svg:y="9.25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5.596cm" svg:y="9.256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2cm" svg:x="5.498cm" svg:y="9.247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5.485cm" svg:y="9.25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5.493cm" svg:y="9.247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5.494cm" svg:y1="9.259cm" svg:x2="5.533cm" svg:y2="9.259cm">
              <text:p/>
            </draw:line>
            <draw:line draw:style-name="gr60" draw:text-style-name="P14" draw:layer="layout" svg:x1="5.534cm" svg:y1="9.27cm" svg:x2="5.534cm" svg:y2="9.275cm">
              <text:p/>
            </draw:line>
            <draw:custom-shape draw:style-name="gr122" draw:text-style-name="P59" draw:layer="layout" svg:width="0.032cm" svg:height="0.048cm" svg:x="5.534cm" svg:y="9.259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5.56cm" svg:y="9.259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5.56cm" svg:y="9.25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5.534cm" svg:y="9.245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5.581cm" svg:y="9.279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5.498cm" svg:y="9.15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5.562cm" svg:y="9.158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5.562cm" svg:y="9.199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5.498cm" svg:y="9.201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5.451cm" svg:y="9.178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5.506cm" svg:y="9.419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5.636cm" svg:y1="9.373cm" svg:x2="5.636cm" svg:y2="9.413cm">
              <text:p/>
            </draw:line>
            <draw:custom-shape draw:style-name="gr122" draw:text-style-name="P59" draw:layer="layout" svg:width="0.12cm" svg:height="0.048cm" svg:x="5.506cm" svg:y="9.356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5.498cm" svg:y="9.373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5.506cm" svg:y="9.396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5cm" svg:height="0.048cm" svg:x="5.421cm" svg:y="9.487cm">
              <text:p/>
              <draw:enhanced-geometry svg:viewBox="0 0 125 17" draw:type="non-primitive" draw:enhanced-path="M 0 0  L 0 16  L 124 16  L 124 0  L 0 0  N"/>
            </draw:custom-shape>
            <draw:custom-shape draw:style-name="gr124" draw:text-style-name="P33" draw:layer="layout" svg:width="0.161cm" svg:height="0.048cm" svg:x="5.459cm" svg:y="9.493cm">
              <text:p/>
              <draw:enhanced-geometry svg:viewBox="0 0 86 17" draw:type="non-primitive" draw:enhanced-path="M 1 16  L 83 16  L 84 16  L 84 14  L 85 3  L 84 1  L 83 1  L 1 0  L 0 1  L 0 3  L 0 12  L 0 14  L 1 16  N"/>
            </draw:custom-shape>
            <draw:custom-shape draw:style-name="gr108" draw:text-style-name="P50" draw:layer="layout" svg:width="0.032cm" svg:height="0.047cm" svg:x="5.534cm" svg:y="9.042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2cm" svg:height="0.048cm" svg:x="5.538cm" svg:y="9.053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2cm" svg:height="0.048cm" svg:x="5.445cm" svg:y="9.03cm">
              <text:p/>
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</draw:custom-shape>
            <draw:custom-shape draw:style-name="gr126" draw:text-style-name="P2" draw:layer="layout" svg:width="0.199cm" svg:height="0.054cm" svg:x="5.445cm" svg:y="9.03cm">
              <text:p/>
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</draw:custom-shape>
            <draw:custom-shape draw:style-name="gr118" draw:text-style-name="P46" draw:layer="layout" svg:width="0.101cm" svg:height="0.048cm" svg:x="5.447cm" svg:y="9.033cm">
              <text:p/>
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</draw:custom-shape>
            <draw:custom-shape draw:style-name="gr127" draw:text-style-name="P2" draw:layer="layout" svg:width="0.107cm" svg:height="0.048cm" svg:x="5.447cm" svg:y="9.033cm">
              <text:p/>
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7cm" svg:x="5.534cm" svg:y="9.042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81cm" svg:height="0.048cm" svg:x="5.455cm" svg:y="9.047cm">
              <text:p/>
              <draw:enhanced-geometry svg:viewBox="0 0 43 17" draw:type="non-primitive" draw:enhanced-path="M 0 16  L 42 16  L 41 0  L 0 0  L 0 16  N"/>
            </draw:custom-shape>
            <draw:custom-shape draw:style-name="gr108" draw:text-style-name="P50" draw:layer="layout" svg:width="0.001cm" svg:height="0.047cm" svg:x="5.525cm" svg:y="9.042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7cm" svg:x="5.523cm" svg:y="9.042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7cm" svg:x="5.513cm" svg:y="9.042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7cm" svg:x="5.506cm" svg:y="9.042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7cm" svg:x="5.498cm" svg:y="9.042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8cm" svg:x="5.594cm" svg:y="9.033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1cm" svg:height="0.048cm" svg:x="5.598cm" svg:y="9.03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1cm" svg:height="0.048cm" svg:x="5.598cm" svg:y="9.033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5.6cm" svg:y="9.033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5.608cm" svg:y="9.038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2cm" svg:height="0.048cm" svg:x="5.611cm" svg:y="9.047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5.624cm" svg:y1="9.047cm" svg:x2="5.624cm" svg:y2="9.058cm">
              <text:p/>
            </draw:line>
            <draw:custom-shape draw:style-name="gr103" draw:text-style-name="P48" draw:layer="layout" svg:width="0.086cm" svg:height="0.048cm" svg:x="5.54cm" svg:y="9.018cm">
              <text:p/>
              <draw:enhanced-geometry svg:viewBox="0 0 46 17" draw:type="non-primitive" draw:enhanced-path="M 0 16  L 45 16  L 45 0  L 0 0  L 0 16  N"/>
            </draw:custom-shape>
            <draw:custom-shape draw:style-name="gr103" draw:text-style-name="P48" draw:layer="layout" svg:width="0.032cm" svg:height="0.003cm" svg:x="5.54cm" svg:y="9.067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5.63cm" svg:y="9.03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1cm" svg:height="0.048cm" svg:x="5.557cm" svg:y="9.03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2cm" svg:height="0.048cm" svg:x="5.573cm" svg:y="9.018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2cm" svg:height="0.048cm" svg:x="5.583cm" svg:y="9.03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5.583cm" svg:y="9.044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2cm" svg:height="0.048cm" svg:x="5.583cm" svg:y="9.059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2cm" svg:height="0.048cm" svg:x="5.573cm" svg:y="9.067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1cm" svg:height="0.048cm" svg:x="5.557cm" svg:y="9.067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5.549cm" svg:y="9.03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1cm" svg:height="0.048cm" svg:x="5.557cm" svg:y="9.018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5.57cm" svg:y="9.038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5.577cm" svg:y="9.038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8cm" svg:x="5.583cm" svg:y="9.059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5.56cm" svg:y="9.033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5.553cm" svg:y="9.038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5.559cm" svg:y="9.038cm">
              <text:p/>
              <draw:enhanced-geometry svg:viewBox="0 0 17 17" draw:type="non-primitive" draw:enhanced-path="M 9 0  L 0 12  L 0 16  L 9 16  L 9 14  L 16 0  L 9 0  N"/>
            </draw:custom-shape>
          </draw:g>
          <draw:g draw:style-name="gr4">
            <draw:custom-shape draw:style-name="gr201" draw:text-style-name="P46" draw:layer="layout" svg:width="0.235cm" svg:height="0.657cm" svg:x="3.583cm" svg:y="10.76cm">
              <text:p/>
              <draw:enhanced-geometry svg:viewBox="0 0 125 230" draw:type="non-primitive" draw:enhanced-path="M 2 0  L 121 0  L 122 0  L 124 2  L 124 3  L 124 226  L 124 227  L 122 228  L 121 229  L 2 229  L 0 228  L 0 227  L 0 226  L 0 3  L 0 2  L 0 0  L 2 0  N"/>
            </draw:custom-shape>
            <draw:custom-shape draw:style-name="gr111" draw:text-style-name="P47" draw:layer="layout" svg:width="0.235cm" svg:height="0.048cm" svg:x="3.583cm" svg:y="11.323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304cm">
              <text:p/>
              <draw:enhanced-geometry svg:viewBox="0 0 125 17" draw:type="non-primitive" draw:enhanced-path="M 0 0  L 124 0  L 124 16  L 0 16  L 0 0  N"/>
            </draw:custom-shape>
            <draw:custom-shape draw:style-name="gr124" draw:text-style-name="P33" draw:layer="layout" svg:width="0.235cm" svg:height="0.048cm" svg:x="3.583cm" svg:y="11.28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28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2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24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221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197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178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16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134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118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09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075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05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032cm">
              <text:p/>
              <draw:enhanced-geometry svg:viewBox="0 0 125 17" draw:type="non-primitive" draw:enhanced-path="M 0 0  L 124 0  L 124 16  L 0 16  L 0 0  N"/>
            </draw:custom-shape>
            <draw:custom-shape draw:style-name="gr111" draw:text-style-name="P47" draw:layer="layout" svg:width="0.235cm" svg:height="0.048cm" svg:x="3.583cm" svg:y="11.012cm">
              <text:p/>
              <draw:enhanced-geometry svg:viewBox="0 0 125 17" draw:type="non-primitive" draw:enhanced-path="M 0 0  L 124 0  L 124 16  L 0 16  L 0 0  N"/>
            </draw:custom-shape>
            <draw:custom-shape draw:style-name="gr103" draw:text-style-name="P48" draw:layer="layout" svg:width="0.167cm" svg:height="0.048cm" svg:x="3.531cm" svg:y="11.389cm">
              <text:p/>
              <draw:enhanced-geometry svg:viewBox="0 0 89 17" draw:type="non-primitive" draw:enhanced-path="M 28 0  L 24 0  L 24 7  L 0 14  L 0 16  L 88 16  L 88 11  L 28 11  L 28 0  N"/>
            </draw:custom-shape>
            <draw:custom-shape draw:style-name="gr103" draw:text-style-name="P48" draw:layer="layout" svg:width="0.165cm" svg:height="0.048cm" svg:x="3.709cm" svg:y="11.389cm">
              <text:p/>
              <draw:enhanced-geometry svg:viewBox="0 0 88 17" draw:type="non-primitive" draw:enhanced-path="M 58 0  L 63 0  L 63 7  L 87 14  L 87 16  L 0 16  L 0 11  L 58 11  L 58 0  N"/>
            </draw:custom-shape>
            <draw:custom-shape draw:style-name="gr202" draw:text-style-name="P2" draw:layer="layout" svg:width="0.161cm" svg:height="0.231cm" svg:x="3.627cm" svg:y="11.186cm">
              <text:p/>
              <draw:enhanced-geometry svg:viewBox="0 0 86 81" draw:type="non-primitive" draw:enhanced-path="M 0 1  L 0 80  L 85 80  L 85 0  N"/>
            </draw:custom-shape>
            <draw:custom-shape draw:style-name="gr203" draw:text-style-name="P46" draw:layer="layout" svg:width="0.235cm" svg:height="0.488cm" svg:x="3.583cm" svg:y="10.22cm">
              <text:p/>
              <draw:enhanced-geometry svg:viewBox="0 0 125 171" draw:type="non-primitive" draw:enhanced-path="M 3 170  L 120 170  L 122 170  L 123 168  L 124 167  L 124 4  L 123 2  L 122 1  L 121 1  L 3 0  L 1 1  L 0 2  L 0 4  L 0 167  L 0 168  L 1 170  L 3 170  N"/>
            </draw:custom-shape>
            <draw:custom-shape draw:style-name="gr204" draw:text-style-name="P46" draw:layer="layout" svg:width="0.188cm" svg:height="0.3cm" svg:x="3.607cm" svg:y="10.363cm">
              <text:p/>
              <draw:enhanced-geometry svg:viewBox="0 0 100 105" draw:type="non-primitive" draw:enhanced-path="M 4 104  L 95 104  L 96 104  L 97 103  L 98 102  L 99 101  L 99 99  L 99 5  L 99 3  L 98 2  L 97 0  L 96 0  L 95 0  L 4 0  L 2 0  L 2 0  L 1 2  L 0 3  L 0 5  L 0 99  L 0 101  L 0 102  L 2 103  L 2 104  L 4 104  N"/>
            </draw:custom-shape>
            <draw:custom-shape draw:style-name="gr107" draw:text-style-name="P49" draw:layer="layout" svg:width="0.186cm" svg:height="0.048cm" svg:x="3.613cm" svg:y="10.448cm">
              <text:p/>
              <draw:enhanced-geometry svg:viewBox="0 0 99 17" draw:type="non-primitive" draw:enhanced-path="M 0 0  L 98 0  L 98 16  L 0 16  L 0 0  N"/>
            </draw:custom-shape>
            <draw:custom-shape draw:style-name="gr107" draw:text-style-name="P49" draw:layer="layout" svg:width="0.188cm" svg:height="0.048cm" svg:x="3.613cm" svg:y="10.537cm">
              <text:p/>
              <draw:enhanced-geometry svg:viewBox="0 0 100 17" draw:type="non-primitive" draw:enhanced-path="M 0 0  L 99 0  L 99 16  L 0 16  L 0 0  N"/>
            </draw:custom-shape>
            <draw:custom-shape draw:style-name="gr108" draw:text-style-name="P50" draw:layer="layout" svg:width="0.182cm" svg:height="0.068cm" svg:x="3.609cm" svg:y="10.374cm">
              <text:p/>
              <draw:enhanced-geometry svg:viewBox="0 0 97 24" draw:type="non-primitive" draw:enhanced-path="M 2 23  L 94 23  L 95 23  L 96 22  L 96 2  L 96 1  L 94 0  L 2 0  L 0 1  L 0 1  L 0 22  L 0 22  L 1 23  L 2 23  N"/>
            </draw:custom-shape>
            <draw:custom-shape draw:style-name="gr109" draw:text-style-name="P51" draw:layer="layout" svg:width="0.065cm" svg:height="0.048cm" svg:x="3.66cm" svg:y="10.377cm">
              <text:p/>
              <draw:enhanced-geometry svg:viewBox="0 0 35 17" draw:type="non-primitive" draw:enhanced-path="M 1 0  L 32 0  L 33 0  L 34 1  L 34 14  L 33 16  L 32 16  L 1 16  L 0 16  L 0 14  L 0 1  L 0 0  L 1 0  N"/>
            </draw:custom-shape>
            <draw:custom-shape draw:style-name="gr110" draw:text-style-name="P52" draw:layer="layout" svg:width="0.032cm" svg:height="0.002cm" svg:x="3.758cm" svg:y="10.377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08" draw:text-style-name="P50" draw:layer="layout" svg:width="0.032cm" svg:height="0.002cm" svg:x="3.758cm" svg:y="10.377cm">
              <text:p/>
              <draw:enhanced-geometry svg:viewBox="0 0 17 1" draw:type="non-primitive" draw:enhanced-path="M 2 0  L 13 0  L 16 0  L 16 0  L 13 0  L 2 0  L 0 0  L 0 0  L 2 0  N"/>
            </draw:custom-shape>
            <draw:custom-shape draw:style-name="gr111" draw:text-style-name="P47" draw:layer="layout" svg:width="0.167cm" svg:height="0.002cm" svg:x="3.621cm" svg:y="10.397cm">
              <text:p/>
              <draw:enhanced-geometry svg:viewBox="0 0 89 1" draw:type="non-primitive" draw:enhanced-path="M 1 0  L 86 0  L 88 0  L 88 0  L 88 0  L 88 0  L 86 0  L 1 0  L 0 0  L 0 0  L 0 0  L 0 0  L 1 0  N"/>
            </draw:custom-shape>
            <draw:custom-shape draw:style-name="gr108" draw:text-style-name="P50" draw:layer="layout" svg:width="0.178cm" svg:height="0.074cm" svg:x="3.613cm" svg:y="10.454cm">
              <text:p/>
              <draw:enhanced-geometry svg:viewBox="0 0 95 26" draw:type="non-primitive" draw:enhanced-path="M 0 25  L 92 25  L 94 25  L 94 24  L 94 2  L 93 1  L 92 0  L 0 0  L 0 1  L 0 2  L 0 24  L 0 25  L 0 25  N"/>
            </draw:custom-shape>
            <draw:custom-shape draw:style-name="gr109" draw:text-style-name="P51" draw:layer="layout" svg:width="0.065cm" svg:height="0.051cm" svg:x="3.66cm" svg:y="10.466cm">
              <text:p/>
              <draw:enhanced-geometry svg:viewBox="0 0 35 18" draw:type="non-primitive" draw:enhanced-path="M 1 0  L 32 0  L 33 0  L 34 1  L 34 2  L 34 15  L 34 16  L 32 17  L 32 17  L 1 17  L 0 17  L 0 16  L 0 15  L 0 2  L 0 1  L 1 0  L 1 0  N"/>
            </draw:custom-shape>
            <draw:custom-shape draw:style-name="gr110" draw:text-style-name="P52" draw:layer="layout" svg:width="0.032cm" svg:height="0.002cm" svg:x="3.739cm" svg:y="10.50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08" draw:text-style-name="P50" draw:layer="layout" svg:width="0.032cm" svg:height="0.002cm" svg:x="3.739cm" svg:y="10.509cm">
              <text:p/>
              <draw:enhanced-geometry svg:viewBox="0 0 17 1" draw:type="non-primitive" draw:enhanced-path="M 1 0  L 12 0  L 14 0  L 16 0  L 16 0  L 14 0  L 14 0  L 1 0  L 1 0  L 0 0  L 0 0  L 1 0  L 1 0  N"/>
            </draw:custom-shape>
            <draw:custom-shape draw:style-name="gr112" draw:text-style-name="P53" draw:layer="layout" svg:width="0.105cm" svg:height="0.048cm" svg:x="3.655cm" svg:y="10.474cm">
              <text:p/>
              <draw:enhanced-geometry svg:viewBox="0 0 56 17" draw:type="non-primitive" draw:enhanced-path="M 0 16  L 19 16  L 19 16  L 37 16  L 37 16  L 55 16  L 55 0  L 37 0  L 37 0  L 20 0  L 20 0  L 0 0  L 0 16  N"/>
            </draw:custom-shape>
            <draw:custom-shape draw:style-name="gr113" draw:text-style-name="P49" draw:layer="layout" svg:width="0.178cm" svg:height="0.048cm" svg:x="3.613cm" svg:y="10.557cm">
              <text:p/>
              <draw:enhanced-geometry svg:viewBox="0 0 95 17" draw:type="non-primitive" draw:enhanced-path="M 0 16  L 94 16  L 94 0  L 0 0  L 0 16  N"/>
            </draw:custom-shape>
            <draw:custom-shape draw:style-name="gr114" draw:text-style-name="P35" draw:layer="layout" svg:width="0.178cm" svg:height="0.048cm" svg:x="3.613cm" svg:y="10.548cm">
              <text:p/>
              <draw:enhanced-geometry svg:viewBox="0 0 95 17" draw:type="non-primitive" draw:enhanced-path="M 94 16  L 93 16  L 0 16  L 0 0  L 93 0  L 92 16  L 94 16  L 93 16  L 94 16  N"/>
            </draw:custom-shape>
            <draw:custom-shape draw:style-name="gr114" draw:text-style-name="P35" draw:layer="layout" svg:width="0.032cm" svg:height="0.048cm" svg:x="3.79cm" svg:y="10.557cm">
              <text:p/>
              <draw:enhanced-geometry svg:viewBox="0 0 17 17" draw:type="non-primitive" draw:enhanced-path="M 8 0  L 0 0  L 0 16  L 16 16  L 16 0  L 8 0  L 8 0  L 0 0  L 0 0  L 8 0  N"/>
            </draw:custom-shape>
            <draw:custom-shape draw:style-name="gr114" draw:text-style-name="P35" draw:layer="layout" svg:width="0.182cm" svg:height="0.048cm" svg:x="3.609cm" svg:y="10.557cm">
              <text:p/>
              <draw:enhanced-geometry svg:viewBox="0 0 97 17" draw:type="non-primitive" draw:enhanced-path="M 0 16  L 0 0  L 96 0  L 96 16  L 0 16  L 0 16  L 0 0  L 0 0  L 0 16  N"/>
            </draw:custom-shape>
            <draw:custom-shape draw:style-name="gr114" draw:text-style-name="P35" draw:layer="layout" svg:width="0.032cm" svg:height="0.048cm" svg:x="3.602cm" svg:y="10.557cm">
              <text:p/>
              <draw:enhanced-geometry svg:viewBox="0 0 17 17" draw:type="non-primitive" draw:enhanced-path="M 0 16  L 16 16  L 16 0  L 0 0  L 0 16  L 0 16  L 0 16  L 16 16  L 0 16  N"/>
            </draw:custom-shape>
            <draw:custom-shape draw:style-name="gr108" draw:text-style-name="P50" draw:layer="layout" svg:width="0.178cm" svg:height="0.091cm" svg:x="3.613cm" svg:y="10.568cm">
              <text:p/>
              <draw:enhanced-geometry svg:viewBox="0 0 95 32" draw:type="non-primitive" draw:enhanced-path="M 1 0  L 92 0  L 93 0  L 94 1  L 94 1  L 94 29  L 94 30  L 94 30  L 93 30  L 93 31  L 92 31  L 1 31  L 0 31  L 0 31  L 0 30  L 0 30  L 0 29  L 0 1  L 0 1  L 0 0  L 1 0  N"/>
            </draw:custom-shape>
            <draw:custom-shape draw:style-name="gr109" draw:text-style-name="P51" draw:layer="layout" svg:width="0.067cm" svg:height="0.071cm" svg:x="3.656cm" svg:y="10.583cm">
              <text:p/>
              <draw:enhanced-geometry svg:viewBox="0 0 36 25" draw:type="non-primitive" draw:enhanced-path="M 1 0  L 33 0  L 33 0  L 34 1  L 34 1  L 35 2  L 35 3  L 35 22  L 34 23  L 34 23  L 34 24  L 33 24  L 33 24  L 1 24  L 1 24  L 0 23  L 0 23  L 0 22  L 0 3  L 0 2  L 0 1  L 0 1  L 1 0  L 1 0  N"/>
            </draw:custom-shape>
            <draw:custom-shape draw:style-name="gr115" draw:text-style-name="P54" draw:layer="layout" svg:width="0.12cm" svg:height="0.054cm" svg:x="3.668cm" svg:y="10.586cm">
              <text:p/>
              <draw:enhanced-geometry svg:viewBox="0 0 64 19" draw:type="non-primitive" draw:enhanced-path="M 0 0  L 63 0  L 63 12  L 8 12  L 8 18  L 0 18  L 0 0  N"/>
            </draw:custom-shape>
            <draw:custom-shape draw:style-name="gr108" draw:text-style-name="P50" draw:layer="layout" svg:width="0.178cm" svg:height="0.048cm" svg:x="3.613cm" svg:y="10.546cm">
              <text:p/>
              <draw:enhanced-geometry svg:viewBox="0 0 95 17" draw:type="non-primitive" draw:enhanced-path="M 0 16  L 94 16  L 94 0  L 0 0  L 0 16  N"/>
            </draw:custom-shape>
            <draw:custom-shape draw:style-name="gr116" draw:text-style-name="P55" draw:layer="layout" svg:width="0.192cm" svg:height="0.002cm" svg:x="3.607cm" svg:y="10.334cm">
              <text:p/>
              <draw:enhanced-geometry svg:viewBox="0 0 102 1" draw:type="non-primitive" draw:enhanced-path="M 1 0  L 99 0  L 100 0  L 101 0  L 101 0  L 99 0  L 1 0  L 0 0  L 0 0  L 0 0  L 1 0  N"/>
            </draw:custom-shape>
            <draw:custom-shape draw:style-name="gr117" draw:text-style-name="P56" draw:layer="layout" svg:width="0.032cm" svg:height="0.048cm" svg:x="3.621cm" svg:y="10.4cm">
              <text:p/>
              <draw:enhanced-geometry svg:viewBox="0 0 17 17" draw:type="non-primitive" draw:enhanced-path="M 1 16  L 16 16  L 16 10  L 16 0  L 1 0  L 0 5  L 0 16  L 1 16  N"/>
            </draw:custom-shape>
            <draw:custom-shape draw:style-name="gr117" draw:text-style-name="P56" draw:layer="layout" svg:width="0.069cm" svg:height="0.048cm" svg:x="3.656cm" svg:y="10.4cm">
              <text:p/>
              <draw:enhanced-geometry svg:viewBox="0 0 37 17" draw:type="non-primitive" draw:enhanced-path="M 0 16  L 36 16  L 0 0  L 0 16  N"/>
            </draw:custom-shape>
            <draw:custom-shape draw:style-name="gr117" draw:text-style-name="P56" draw:layer="layout" svg:width="0.052cm" svg:height="0.048cm" svg:x="3.735cm" svg:y="10.4cm">
              <text:p/>
              <draw:enhanced-geometry svg:viewBox="0 0 28 17" draw:type="non-primitive" draw:enhanced-path="M 0 16  L 26 16  L 27 10  L 26 0  L 0 0  L 0 10  L 0 16  N"/>
            </draw:custom-shape>
            <draw:custom-shape draw:style-name="gr109" draw:text-style-name="P51" draw:layer="layout" svg:width="0.065cm" svg:height="0.048cm" svg:x="3.66cm" svg:y="10.417cm">
              <text:p/>
              <draw:enhanced-geometry svg:viewBox="0 0 35 17" draw:type="non-primitive" draw:enhanced-path="M 0 0  L 33 0  L 34 0  L 34 16  L 33 16  L 0 16  L 0 16  L 0 0  L 0 0  N"/>
            </draw:custom-shape>
            <draw:custom-shape draw:style-name="gr118" draw:text-style-name="P46" draw:layer="layout" svg:width="0.032cm" svg:height="0.048cm" svg:x="3.76cm" svg:y="10.363cm">
              <text:p/>
              <draw:enhanced-geometry svg:viewBox="0 0 17 17" draw:type="non-primitive" draw:enhanced-path="M 0 16  L 16 16  L 16 0  L 0 0  L 0 16  N"/>
            </draw:custom-shape>
            <draw:custom-shape draw:style-name="gr103" draw:text-style-name="P48" draw:layer="layout" svg:width="0.032cm" svg:height="0.048cm" svg:x="3.747cm" svg:y="10.377cm">
              <text:p/>
              <draw:enhanced-geometry svg:viewBox="0 0 17 17" draw:type="non-primitive" draw:enhanced-path="M 3 0  L 0 12  L 0 16  L 12 16  L 16 6  L 4 6  L 3 0  N"/>
            </draw:custom-shape>
            <draw:custom-shape draw:style-name="gr119" draw:text-style-name="P57" draw:layer="layout" svg:width="0.032cm" svg:height="0.048cm" svg:x="3.66cm" svg:y="10.417cm">
              <text:p/>
              <draw:enhanced-geometry svg:viewBox="0 0 17 17" draw:type="non-primitive" draw:enhanced-path="M 16 16  L 0 16  L 0 16  L 0 16  L 0 0  L 0 0  L 16 0  L 16 0  L 16 16  L 16 16  L 16 16  N"/>
            </draw:custom-shape>
            <draw:custom-shape draw:style-name="gr120" draw:text-style-name="P58" draw:layer="layout" svg:width="0.032cm" svg:height="0.048cm" svg:x="3.66cm" svg:y="10.414cm">
              <text:p/>
              <draw:enhanced-geometry svg:viewBox="0 0 17 17" draw:type="non-primitive" draw:enhanced-path="M 16 16  L 0 16  L 0 16  L 0 8  L 0 0  L 16 0  L 16 0  L 16 0  L 16 8  L 16 8  L 16 16  L 16 16  N"/>
            </draw:custom-shape>
            <draw:custom-shape draw:style-name="gr121" draw:text-style-name="P16" draw:layer="layout" svg:width="0.032cm" svg:height="0.048cm" svg:x="3.656cm" svg:y="10.411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2cm" svg:height="0.048cm" svg:x="3.634cm" svg:y="10.334cm">
              <text:p/>
              <draw:enhanced-geometry svg:viewBox="0 0 1 17" draw:type="non-primitive" draw:enhanced-path="M 0 16  L 0 16  L 0 16  L 0 10  L 0 5  L 0 0  L 0 0  L 0 5  L 0 10  L 0 16  L 0 16  N"/>
            </draw:custom-shape>
            <draw:custom-shape draw:style-name="gr120" draw:text-style-name="P58" draw:layer="layout" svg:width="0.002cm" svg:height="0.048cm" svg:x="3.634cm" svg:y="10.334cm">
              <text:p/>
              <draw:enhanced-geometry svg:viewBox="0 0 1 17" draw:type="non-primitive" draw:enhanced-path="M 0 16  L 0 16  L 0 10  L 0 5  L 0 5  L 0 0  L 0 0  L 0 5  L 0 5  L 0 10  L 0 10  L 0 16  N"/>
            </draw:custom-shape>
            <draw:line draw:style-name="gr60" draw:text-style-name="P14" draw:layer="layout" svg:x1="3.636cm" svg:y1="10.343cm" svg:x2="3.639cm" svg:y2="10.343cm">
              <text:p/>
            </draw:line>
            <draw:custom-shape draw:style-name="gr119" draw:text-style-name="P57" draw:layer="layout" svg:width="0.002cm" svg:height="0.048cm" svg:x="3.758cm" svg:y="10.334cm">
              <text:p/>
              <draw:enhanced-geometry svg:viewBox="0 0 1 17" draw:type="non-primitive" draw:enhanced-path="M 0 16  L 0 16  L 0 16  L 0 10  L 0 5  L 0 0  L 0 0  L 0 5  L 0 5  L 0 10  L 0 16  N"/>
            </draw:custom-shape>
            <draw:custom-shape draw:style-name="gr120" draw:text-style-name="P58" draw:layer="layout" svg:width="0.032cm" svg:height="0.048cm" svg:x="3.756cm" svg:y="10.334cm">
              <text:p/>
              <draw:enhanced-geometry svg:viewBox="0 0 17 17" draw:type="non-primitive" draw:enhanced-path="M 16 16  L 0 16  L 0 16  L 0 5  L 0 0  L 0 0  L 16 0  L 16 5  L 16 16  N"/>
            </draw:custom-shape>
            <draw:custom-shape draw:style-name="gr121" draw:text-style-name="P16" draw:layer="layout" svg:width="0.032cm" svg:height="0.048cm" svg:x="3.749cm" svg:y="10.328cm">
              <text:p/>
              <draw:enhanced-geometry svg:viewBox="0 0 17 17" draw:type="non-primitive" draw:enhanced-path="M 16 16  L 0 16  L 0 0  L 16 0  L 16 16  N"/>
            </draw:custom-shape>
            <draw:custom-shape draw:style-name="gr119" draw:text-style-name="P57" draw:layer="layout" svg:width="0.032cm" svg:height="0.048cm" svg:x="3.66cm" svg:y="10.509cm">
              <text:p/>
              <draw:enhanced-geometry svg:viewBox="0 0 17 17" draw:type="non-primitive" draw:enhanced-path="M 16 16  L 0 16  L 0 16  L 0 0  L 0 0  L 0 0  L 16 0  L 16 0  L 16 0  L 16 0  L 16 16  L 16 16  L 16 16  N"/>
            </draw:custom-shape>
            <draw:custom-shape draw:style-name="gr120" draw:text-style-name="P58" draw:layer="layout" svg:width="0.032cm" svg:height="0.048cm" svg:x="3.66cm" svg:y="10.505cm">
              <text:p/>
              <draw:enhanced-geometry svg:viewBox="0 0 17 17" draw:type="non-primitive" draw:enhanced-path="M 16 16  L 0 16  L 0 16  L 0 5  L 0 0  L 16 0  L 16 0  L 16 0  L 16 5  L 16 16  L 16 16  N"/>
            </draw:custom-shape>
            <draw:custom-shape draw:style-name="gr121" draw:text-style-name="P16" draw:layer="layout" svg:width="0.032cm" svg:height="0.048cm" svg:x="3.656cm" svg:y="10.503cm">
              <text:p/>
              <draw:enhanced-geometry svg:viewBox="0 0 17 17" draw:type="non-primitive" draw:enhanced-path="M 0 16  L 0 0  L 16 0  L 0 16  N"/>
            </draw:custom-shape>
            <draw:custom-shape draw:style-name="gr119" draw:text-style-name="P57" draw:layer="layout" svg:width="0.001cm" svg:height="0.048cm" svg:x="3.623cm" svg:y="10.649cm">
              <text:p/>
              <draw:enhanced-geometry svg:viewBox="0 0 1 17" draw:type="non-primitive" draw:enhanced-path="M 0 16  L 0 16  L 0 8  L 0 8  L 0 8  L 0 0  L 0 0  L 0 0  L 0 0  L 0 0  L 0 0  L 0 8  L 0 8  L 0 16  L 0 16  N"/>
            </draw:custom-shape>
            <draw:line draw:style-name="gr60" draw:text-style-name="P14" draw:layer="layout" svg:x1="3.627cm" svg:y1="10.66cm" svg:x2="3.632cm" svg:y2="10.66cm">
              <text:p/>
            </draw:line>
            <draw:line draw:style-name="gr60" draw:text-style-name="P14" draw:layer="layout" svg:x1="3.627cm" svg:y1="10.66cm" svg:x2="3.632cm" svg:y2="10.66cm">
              <text:p/>
            </draw:line>
            <draw:line draw:style-name="gr60" draw:text-style-name="P14" draw:layer="layout" svg:x1="3.627cm" svg:y1="10.66cm" svg:x2="3.632cm" svg:y2="10.66cm">
              <text:p/>
            </draw:line>
            <draw:line draw:style-name="gr60" draw:text-style-name="P14" draw:layer="layout" svg:x1="3.627cm" svg:y1="10.66cm" svg:x2="3.632cm" svg:y2="10.66cm">
              <text:p/>
            </draw:line>
            <draw:line draw:style-name="gr60" draw:text-style-name="P14" draw:layer="layout" svg:x1="3.627cm" svg:y1="10.66cm" svg:x2="3.632cm" svg:y2="10.66cm">
              <text:p/>
            </draw:line>
            <draw:line draw:style-name="gr60" draw:text-style-name="P14" draw:layer="layout" svg:x1="3.627cm" svg:y1="10.66cm" svg:x2="3.632cm" svg:y2="10.66cm">
              <text:p/>
            </draw:line>
            <draw:line draw:style-name="gr60" draw:text-style-name="P14" draw:layer="layout" svg:x1="3.627cm" svg:y1="10.66cm" svg:x2="3.632cm" svg:y2="10.66cm">
              <text:p/>
            </draw:line>
            <draw:custom-shape draw:style-name="gr120" draw:text-style-name="P58" draw:layer="layout" svg:width="0.032cm" svg:height="0.048cm" svg:x="3.623cm" svg:y="10.64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custom-shape draw:style-name="gr120" draw:text-style-name="P58" draw:layer="layout" svg:width="0.032cm" svg:height="0.048cm" svg:x="3.623cm" svg:y="10.646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line draw:style-name="gr60" draw:text-style-name="P14" draw:layer="layout" svg:x1="3.627cm" svg:y1="10.657cm" svg:x2="3.632cm" svg:y2="10.657cm">
              <text:p/>
            </draw:line>
            <draw:custom-shape draw:style-name="gr120" draw:text-style-name="P58" draw:layer="layout" svg:width="0.032cm" svg:height="0.048cm" svg:x="3.623cm" svg:y="10.64cm">
              <text:p/>
              <draw:enhanced-geometry svg:viewBox="0 0 17 17" draw:type="non-primitive" draw:enhanced-path="M 16 16  L 16 0  L 0 0  L 16 16  N"/>
            </draw:custom-shape>
            <draw:line draw:style-name="gr60" draw:text-style-name="P14" draw:layer="layout" svg:x1="3.627cm" svg:y1="10.655cm" svg:x2="3.632cm" svg:y2="10.655cm">
              <text:p/>
            </draw:line>
            <draw:custom-shape draw:style-name="gr121" draw:text-style-name="P16" draw:layer="layout" svg:width="0.032cm" svg:height="0.048cm" svg:x="3.621cm" svg:y="10.646cm">
              <text:p/>
              <draw:enhanced-geometry svg:viewBox="0 0 17 17" draw:type="non-primitive" draw:enhanced-path="M 16 16  L 0 16  L 16 0  L 16 16  N"/>
            </draw:custom-shape>
            <draw:custom-shape draw:style-name="gr113" draw:text-style-name="P49" draw:layer="layout" svg:width="0.161cm" svg:height="0.048cm" svg:x="3.623cm" svg:y="10.391cm">
              <text:p/>
              <draw:enhanced-geometry svg:viewBox="0 0 86 17" draw:type="non-primitive" draw:enhanced-path="M 0 16  L 0 0  L 85 0  L 85 16  L 0 16  N"/>
            </draw:custom-shape>
            <draw:custom-shape draw:style-name="gr117" draw:text-style-name="P56" draw:layer="layout" svg:width="0.032cm" svg:height="0.048cm" svg:x="3.655cm" svg:y="10.383cm">
              <text:p/>
              <draw:enhanced-geometry svg:viewBox="0 0 17 17" draw:type="non-primitive" draw:enhanced-path="M 8 0  L 0 0  L 0 16  L 8 16  L 16 0  L 8 0  N"/>
            </draw:custom-shape>
            <draw:custom-shape draw:style-name="gr117" draw:text-style-name="P56" draw:layer="layout" svg:width="0.032cm" svg:height="0.048cm" svg:x="3.655cm" svg:y="10.411cm">
              <text:p/>
              <draw:enhanced-geometry svg:viewBox="0 0 17 17" draw:type="non-primitive" draw:enhanced-path="M 8 0  L 0 0  L 0 16  L 8 16  L 16 16  L 16 0  L 8 0  N"/>
            </draw:custom-shape>
            <draw:custom-shape draw:style-name="gr111" draw:text-style-name="P47" draw:layer="layout" svg:width="0.12cm" svg:height="0.048cm" svg:x="3.668cm" svg:y="10.592cm">
              <text:p/>
              <draw:enhanced-geometry svg:viewBox="0 0 64 17" draw:type="non-primitive" draw:enhanced-path="M 0 0  L 0 16  L 63 16  L 63 0  L 0 0  N"/>
            </draw:custom-shape>
            <draw:custom-shape draw:style-name="gr117" draw:text-style-name="P56" draw:layer="layout" svg:width="0.065cm" svg:height="0.048cm" svg:x="3.656cm" svg:y="10.651cm">
              <text:p/>
              <draw:enhanced-geometry svg:viewBox="0 0 35 17" draw:type="non-primitive" draw:enhanced-path="M 0 16  L 33 16  L 34 5  L 0 0  L 0 5  L 0 16  N"/>
            </draw:custom-shape>
            <draw:custom-shape draw:style-name="gr117" draw:text-style-name="P56" draw:layer="layout" svg:width="0.039cm" svg:height="0.048cm" svg:x="3.685cm" svg:y="10.617cm">
              <text:p/>
              <draw:enhanced-geometry svg:viewBox="0 0 21 17" draw:type="non-primitive" draw:enhanced-path="M 0 16  L 0 0  L 20 0  L 20 16  L 0 16  N"/>
            </draw:custom-shape>
            <draw:custom-shape draw:style-name="gr117" draw:text-style-name="P56" draw:layer="layout" svg:width="0.062cm" svg:height="0.048cm" svg:x="3.73cm" svg:y="10.623cm">
              <text:p/>
              <draw:enhanced-geometry svg:viewBox="0 0 33 17" draw:type="non-primitive" draw:enhanced-path="M 1 16  L 31 16  L 32 10  L 31 0  L 1 0  L 0 10  L 1 16  N"/>
            </draw:custom-shape>
            <draw:line draw:style-name="gr60" draw:text-style-name="P14" draw:layer="layout" svg:x1="3.66cm" svg:y1="10.489cm" svg:x2="3.66cm" svg:y2="10.525cm">
              <text:p/>
            </draw:line>
            <draw:line draw:style-name="gr60" draw:text-style-name="P14" draw:layer="layout" svg:x1="3.66cm" svg:y1="10.474cm" svg:x2="3.66cm" svg:y2="10.476cm">
              <text:p/>
            </draw:line>
            <draw:custom-shape draw:style-name="gr118" draw:text-style-name="P46" draw:layer="layout" svg:width="0.032cm" svg:height="0.048cm" svg:x="3.645cm" svg:y="10.474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687cm" svg:y="10.466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687cm" svg:y="10.477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732cm" svg:y="10.477cm">
              <text:p/>
              <draw:enhanced-geometry svg:viewBox="0 0 17 17" draw:type="non-primitive" draw:enhanced-path="M 0 16  L 16 16  L 16 0  L 0 0  L 0 16  N"/>
            </draw:custom-shape>
            <draw:custom-shape draw:style-name="gr118" draw:text-style-name="P46" draw:layer="layout" svg:width="0.032cm" svg:height="0.048cm" svg:x="3.655cm" svg:y="10.491cm">
              <text:p/>
              <draw:enhanced-geometry svg:viewBox="0 0 17 17" draw:type="non-primitive" draw:enhanced-path="M 16 0  L 16 16  L 0 16  L 0 0  L 16 0  N"/>
            </draw:custom-shape>
            <draw:custom-shape draw:style-name="gr118" draw:text-style-name="P46" draw:layer="layout" svg:width="0.064cm" svg:height="0.048cm" svg:x="3.66cm" svg:y="10.515cm">
              <text:p/>
              <draw:enhanced-geometry svg:viewBox="0 0 34 17" draw:type="non-primitive" draw:enhanced-path="M 0 16  L 32 16  L 33 0  L 0 0  L 0 16  N"/>
            </draw:custom-shape>
            <draw:custom-shape draw:style-name="gr110" draw:text-style-name="P52" draw:layer="layout" svg:width="0.032cm" svg:height="0.048cm" svg:x="3.724cm" svg:y="10.491cm">
              <text:p/>
              <draw:enhanced-geometry svg:viewBox="0 0 17 17" draw:type="non-primitive" draw:enhanced-path="M 0 0  L 0 14  L 6 16  L 6 16  L 16 16  L 6 14  L 6 0  L 0 0  N"/>
            </draw:custom-shape>
            <draw:custom-shape draw:style-name="gr122" draw:text-style-name="P59" draw:layer="layout" svg:width="0.032cm" svg:height="0.048cm" svg:x="3.732cm" svg:y="10.468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3.758cm" svg:y="10.474cm">
              <text:p/>
              <draw:enhanced-geometry svg:viewBox="0 0 17 17" draw:type="non-primitive" draw:enhanced-path="M 16 16  L 16 0  L 0 0  L 0 16  L 16 16  N"/>
            </draw:custom-shape>
            <draw:custom-shape draw:style-name="gr110" draw:text-style-name="P52" draw:layer="layout" svg:width="0.065cm" svg:height="0.002cm" svg:x="3.66cm" svg:y="10.466cm">
              <text:p/>
              <draw:enhanced-geometry svg:viewBox="0 0 35 1" draw:type="non-primitive" draw:enhanced-path="M 0 0  L 1 0  L 32 0  L 33 0  L 34 0  L 34 0  L 33 0  L 32 0  L 1 0  L 0 0  L 0 0  N"/>
            </draw:custom-shape>
            <draw:custom-shape draw:style-name="gr122" draw:text-style-name="P59" draw:layer="layout" svg:width="0.032cm" svg:height="0.048cm" svg:x="3.647cm" svg:y="10.474cm">
              <text:p/>
              <draw:enhanced-geometry svg:viewBox="0 0 17 17" draw:type="non-primitive" draw:enhanced-path="M 16 16  L 16 0  L 0 0  L 0 16  L 16 16  N"/>
            </draw:custom-shape>
            <draw:custom-shape draw:style-name="gr118" draw:text-style-name="P46" draw:layer="layout" svg:width="0.032cm" svg:height="0.048cm" svg:x="3.655cm" svg:y="10.466cm">
              <text:p/>
              <draw:enhanced-geometry svg:viewBox="0 0 17 17" draw:type="non-primitive" draw:enhanced-path="M 16 16  L 16 0  L 0 16  L 16 16  N"/>
            </draw:custom-shape>
            <draw:line draw:style-name="gr60" draw:text-style-name="P14" draw:layer="layout" svg:x1="3.656cm" svg:y1="10.477cm" svg:x2="3.695cm" svg:y2="10.477cm">
              <text:p/>
            </draw:line>
            <draw:line draw:style-name="gr60" draw:text-style-name="P14" draw:layer="layout" svg:x1="3.696cm" svg:y1="10.489cm" svg:x2="3.696cm" svg:y2="10.494cm">
              <text:p/>
            </draw:line>
            <draw:custom-shape draw:style-name="gr122" draw:text-style-name="P59" draw:layer="layout" svg:width="0.032cm" svg:height="0.048cm" svg:x="3.696cm" svg:y="10.477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3.722cm" svg:y="10.477cm">
              <text:p/>
              <draw:enhanced-geometry svg:viewBox="0 0 17 17" draw:type="non-primitive" draw:enhanced-path="M 0 16  L 0 0  L 16 0  L 16 16  L 0 16  N"/>
            </draw:custom-shape>
            <draw:custom-shape draw:style-name="gr122" draw:text-style-name="P59" draw:layer="layout" svg:width="0.032cm" svg:height="0.048cm" svg:x="3.722cm" svg:y="10.468cm">
              <text:p/>
              <draw:enhanced-geometry svg:viewBox="0 0 17 17" draw:type="non-primitive" draw:enhanced-path="M 16 16  L 16 0  L 0 0  L 0 16  L 16 16  N"/>
            </draw:custom-shape>
            <draw:custom-shape draw:style-name="gr122" draw:text-style-name="P59" draw:layer="layout" svg:width="0.032cm" svg:height="0.048cm" svg:x="3.696cm" svg:y="10.463cm">
              <text:p/>
              <draw:enhanced-geometry svg:viewBox="0 0 17 17" draw:type="non-primitive" draw:enhanced-path="M 0 16  L 0 0  L 16 0  L 16 16  L 0 16  N"/>
            </draw:custom-shape>
            <draw:custom-shape draw:style-name="gr118" draw:text-style-name="P46" draw:layer="layout" svg:width="0.032cm" svg:height="0.048cm" svg:x="3.743cm" svg:y="10.497cm">
              <text:p/>
              <draw:enhanced-geometry svg:viewBox="0 0 17 17" draw:type="non-primitive" draw:enhanced-path="M 0 16  L 16 16  L 0 0  L 0 16  N"/>
            </draw:custom-shape>
            <draw:custom-shape draw:style-name="gr122" draw:text-style-name="P59" draw:layer="layout" svg:width="0.064cm" svg:height="0.048cm" svg:x="3.66cm" svg:y="10.369cm">
              <text:p/>
              <draw:enhanced-geometry svg:viewBox="0 0 34 17" draw:type="non-primitive" draw:enhanced-path="M 0 16  L 0 0  L 33 0  L 33 16  L 0 16  N"/>
            </draw:custom-shape>
            <draw:custom-shape draw:style-name="gr122" draw:text-style-name="P59" draw:layer="layout" svg:width="0.032cm" svg:height="0.048cm" svg:x="3.724cm" svg:y="10.377cm">
              <text:p/>
              <draw:enhanced-geometry svg:viewBox="0 0 17 17" draw:type="non-primitive" draw:enhanced-path="M 16 0  L 0 16  L 16 16  L 16 0  L 16 0  N"/>
            </draw:custom-shape>
            <draw:custom-shape draw:style-name="gr122" draw:text-style-name="P59" draw:layer="layout" svg:width="0.032cm" svg:height="0.048cm" svg:x="3.724cm" svg:y="10.417cm">
              <text:p/>
              <draw:enhanced-geometry svg:viewBox="0 0 17 17" draw:type="non-primitive" draw:enhanced-path="M 0 0  L 16 0  L 16 16  L 0 16  L 0 0  N"/>
            </draw:custom-shape>
            <draw:custom-shape draw:style-name="gr117" draw:text-style-name="P56" draw:layer="layout" svg:width="0.064cm" svg:height="0.048cm" svg:x="3.66cm" svg:y="10.42cm">
              <text:p/>
              <draw:enhanced-geometry svg:viewBox="0 0 34 17" draw:type="non-primitive" draw:enhanced-path="M 0 16  L 33 16  L 33 0  L 0 0  L 0 16  N"/>
            </draw:custom-shape>
            <draw:custom-shape draw:style-name="gr118" draw:text-style-name="P46" draw:layer="layout" svg:width="0.032cm" svg:height="0.048cm" svg:x="3.613cm" svg:y="10.397cm">
              <text:p/>
              <draw:enhanced-geometry svg:viewBox="0 0 17 17" draw:type="non-primitive" draw:enhanced-path="M 4 0  L 16 16  L 4 16  L 0 16  L 4 16  L 12 16  L 12 0  L 4 0  N"/>
            </draw:custom-shape>
            <draw:custom-shape draw:style-name="gr118" draw:text-style-name="P46" draw:layer="layout" svg:width="0.032cm" svg:height="0.048cm" svg:x="3.668cm" svg:y="10.637cm">
              <text:p/>
              <draw:enhanced-geometry svg:viewBox="0 0 17 17" draw:type="non-primitive" draw:enhanced-path="M 0 16  L 0 0  L 16 0  L 16 16  L 0 16  N"/>
            </draw:custom-shape>
            <draw:line draw:style-name="gr60" draw:text-style-name="P14" draw:layer="layout" svg:x1="3.798cm" svg:y1="10.592cm" svg:x2="3.798cm" svg:y2="10.631cm">
              <text:p/>
            </draw:line>
            <draw:custom-shape draw:style-name="gr122" draw:text-style-name="P59" draw:layer="layout" svg:width="0.12cm" svg:height="0.048cm" svg:x="3.668cm" svg:y="10.574cm">
              <text:p/>
              <draw:enhanced-geometry svg:viewBox="0 0 64 17" draw:type="non-primitive" draw:enhanced-path="M 0 16  L 0 0  L 63 0  L 63 16  L 0 16  N"/>
            </draw:custom-shape>
            <draw:custom-shape draw:style-name="gr122" draw:text-style-name="P59" draw:layer="layout" svg:width="0.032cm" svg:height="0.048cm" svg:x="3.66cm" svg:y="10.592cm">
              <text:p/>
              <draw:enhanced-geometry svg:viewBox="0 0 17 17" draw:type="non-primitive" draw:enhanced-path="M 16 0  L 16 16  L 0 16  L 0 0  L 16 0  N"/>
            </draw:custom-shape>
            <draw:custom-shape draw:style-name="gr122" draw:text-style-name="P59" draw:layer="layout" svg:width="0.12cm" svg:height="0.048cm" svg:x="3.668cm" svg:y="10.614cm">
              <text:p/>
              <draw:enhanced-geometry svg:viewBox="0 0 64 17" draw:type="non-primitive" draw:enhanced-path="M 0 0  L 0 16  L 63 16  L 63 0  L 0 0  N"/>
            </draw:custom-shape>
            <draw:custom-shape draw:style-name="gr205" draw:text-style-name="P60" draw:layer="layout" svg:width="0.235cm" svg:height="0.048cm" svg:x="3.583cm" svg:y="10.706cm">
              <text:p/>
              <draw:enhanced-geometry svg:viewBox="0 0 125 17" draw:type="non-primitive" draw:enhanced-path="M 0 0  L 0 16  L 124 16  L 124 0  L 0 0  N"/>
            </draw:custom-shape>
            <draw:custom-shape draw:style-name="gr124" draw:text-style-name="P33" draw:layer="layout" svg:width="0.162cm" svg:height="0.048cm" svg:x="3.621cm" svg:y="10.712cm">
              <text:p/>
              <draw:enhanced-geometry svg:viewBox="0 0 86 17" draw:type="non-primitive" draw:enhanced-path="M 1 16  L 83 16  L 84 16  L 84 14  L 85 3  L 84 1  L 83 1  L 1 0  L 0 1  L 0 3  L 0 12  L 0 14  L 1 16  N"/>
            </draw:custom-shape>
            <draw:custom-shape draw:style-name="gr108" draw:text-style-name="P50" draw:layer="layout" svg:width="0.032cm" svg:height="0.048cm" svg:x="3.696cm" svg:y="10.26cm">
              <text:p/>
              <draw:enhanced-geometry svg:viewBox="0 0 17 17" draw:type="non-primitive" draw:enhanced-path="M 8 16  L 0 16  L 0 0  L 16 0  L 8 16  N"/>
            </draw:custom-shape>
            <draw:custom-shape draw:style-name="gr125" draw:text-style-name="P2" draw:layer="layout" svg:width="0.031cm" svg:height="0.048cm" svg:x="3.7cm" svg:y="10.271cm">
              <text:p/>
              <draw:enhanced-geometry svg:viewBox="0 0 17 17" draw:type="non-primitive" draw:enhanced-path="M 10 0  L 16 0  L 16 16  L 0 16  L 10 0  N"/>
            </draw:custom-shape>
            <draw:custom-shape draw:style-name="gr118" draw:text-style-name="P46" draw:layer="layout" svg:width="0.192cm" svg:height="0.048cm" svg:x="3.607cm" svg:y="10.248cm">
              <text:p/>
              <draw:enhanced-geometry svg:viewBox="0 0 102 17" draw:type="non-primitive" draw:enhanced-path="M 7 0  L 94 0  L 96 1  L 97 1  L 98 2  L 99 2  L 100 4  L 101 4  L 101 6  L 101 9  L 101 11  L 100 11  L 99 13  L 98 14  L 97 14  L 96 16  L 94 16  L 93 16  L 7 16  L 6 16  L 4 16  L 3 14  L 2 14  L 0 12  L 0 11  L 0 9  L 0 9  L 0 6  L 0 6  L 0 4  L 0 3  L 1 2  L 3 1  L 4 1  L 7 0  N"/>
            </draw:custom-shape>
            <draw:custom-shape draw:style-name="gr126" draw:text-style-name="P2" draw:layer="layout" svg:width="0.199cm" svg:height="0.054cm" svg:x="3.607cm" svg:y="10.248cm">
              <text:p/>
              <draw:enhanced-geometry svg:viewBox="0 0 106 19" draw:type="non-primitive" draw:enhanced-path="M 7 0  L 98 0  L 100 1  L 100 1  L 102 2  L 103 3  L 104 5  L 105 6  L 105 7  L 105 11  L 105 12  L 104 13  L 103 15  L 102 16  L 100 17  L 100 18  L 98 18  L 7 18  L 6 18  L 4 18  L 3 17  L 2 16  L 0 14  L 0 12  L 0 11  L 0 7  L 0 7  L 0 6  L 0 4  L 1 2  L 3 1  L 4 1  L 7 0  N"/>
            </draw:custom-shape>
            <draw:custom-shape draw:style-name="gr118" draw:text-style-name="P46" draw:layer="layout" svg:width="0.101cm" svg:height="0.048cm" svg:x="3.609cm" svg:y="10.251cm">
              <text:p/>
              <draw:enhanced-geometry svg:viewBox="0 0 54 17" draw:type="non-primitive" draw:enhanced-path="M 7 0  L 45 0  L 45 0  L 48 1  L 50 1  L 50 1  L 52 2  L 52 2  L 53 4  L 53 5  L 53 5  L 53 10  L 53 11  L 52 13  L 51 14  L 50 14  L 48 16  L 45 16  L 45 16  L 7 16  L 7 16  L 5 16  L 3 14  L 2 14  L 1 13  L 0 11  L 0 10  L 0 10  L 0 5  L 0 5  L 0 4  L 0 2  L 0 2  L 1 2  L 2 1  L 2 1  L 5 0  L 7 0  N"/>
            </draw:custom-shape>
            <draw:custom-shape draw:style-name="gr127" draw:text-style-name="P2" draw:layer="layout" svg:width="0.107cm" svg:height="0.048cm" svg:x="3.609cm" svg:y="10.251cm">
              <text:p/>
              <draw:enhanced-geometry svg:viewBox="0 0 57 17" draw:type="non-primitive" draw:enhanced-path="M 8 0  L 47 0  L 49 0  L 51 1  L 52 1  L 53 2  L 55 3  L 55 3  L 56 4  L 56 5  L 56 6  L 56 9  L 56 11  L 55 13  L 54 13  L 52 14  L 51 16  L 48 16  L 8 16  L 7 16  L 5 16  L 4 14  L 2 13  L 1 13  L 0 11  L 0 10  L 0 6  L 0 5  L 0 4  L 0 3  L 0 3  L 1 3  L 2 2  L 3 1  L 8 0  N"/>
            </draw:custom-shape>
            <draw:custom-shape draw:style-name="gr108" draw:text-style-name="P50" draw:layer="layout" svg:width="0.032cm" svg:height="0.048cm" svg:x="3.696cm" svg:y="10.26cm">
              <text:p/>
              <draw:enhanced-geometry svg:viewBox="0 0 17 17" draw:type="non-primitive" draw:enhanced-path="M 8 16  L 0 16  L 0 16  L 0 8  L 8 0  L 8 0  L 8 0  L 16 0  L 16 0  L 16 8  L 16 16  L 8 16  L 8 0  L 16 0  L 8 8  L 8 8  L 8 0  L 8 16  N"/>
            </draw:custom-shape>
            <draw:custom-shape draw:style-name="gr128" draw:text-style-name="P61" draw:layer="layout" svg:width="0.08cm" svg:height="0.048cm" svg:x="3.617cm" svg:y="10.266cm">
              <text:p/>
              <draw:enhanced-geometry svg:viewBox="0 0 43 17" draw:type="non-primitive" draw:enhanced-path="M 0 16  L 42 16  L 41 0  L 0 0  L 0 16  N"/>
            </draw:custom-shape>
            <draw:custom-shape draw:style-name="gr108" draw:text-style-name="P50" draw:layer="layout" svg:width="0.001cm" svg:height="0.048cm" svg:x="3.687cm" svg:y="10.26cm">
              <text:p/>
              <draw:enhanced-geometry svg:viewBox="0 0 1 17" draw:type="non-primitive" draw:enhanced-path="M 0 0  L 0 16  L 0 16  L 0 0  L 0 0  L 0 0  L 0 0  L 0 8  L 0 8  L 0 0  L 0 0  N"/>
            </draw:custom-shape>
            <draw:custom-shape draw:style-name="gr108" draw:text-style-name="P50" draw:layer="layout" svg:width="0.032cm" svg:height="0.048cm" svg:x="3.685cm" svg:y="10.26cm">
              <text:p/>
              <draw:enhanced-geometry svg:viewBox="0 0 17 17" draw:type="non-primitive" draw:enhanced-path="M 16 0  L 16 8  L 0 16  L 0 16  L 0 8  L 0 8  L 0 8  L 0 0  L 0 0  L 16 0  L 0 8  L 0 8  L 0 8  L 16 0  L 16 0  N"/>
            </draw:custom-shape>
            <draw:custom-shape draw:style-name="gr108" draw:text-style-name="P50" draw:layer="layout" svg:width="0.002cm" svg:height="0.048cm" svg:x="3.675cm" svg:y="10.26cm">
              <text:p/>
              <draw:enhanced-geometry svg:viewBox="0 0 1 17" draw:type="non-primitive" draw:enhanced-path="M 0 0  L 0 8  L 0 16  L 0 16  L 0 16  L 0 8  L 0 0  L 0 0  L 0 8  L 0 8  L 0 0  L 0 0  L 0 8  L 0 8  L 0 0  L 0 0  N"/>
            </draw:custom-shape>
            <draw:custom-shape draw:style-name="gr108" draw:text-style-name="P50" draw:layer="layout" svg:width="0.032cm" svg:height="0.048cm" svg:x="3.668cm" svg:y="10.26cm">
              <text:p/>
              <draw:enhanced-geometry svg:viewBox="0 0 17 17" draw:type="non-primitive" draw:enhanced-path="M 8 16  L 0 16  L 0 16  L 0 8  L 0 0  L 8 0  L 8 0  L 16 0  L 16 0  L 16 0  L 16 8  L 8 16  L 8 0  L 16 0  L 8 8  L 0 8  L 8 0  L 8 16  N"/>
            </draw:custom-shape>
            <draw:custom-shape draw:style-name="gr108" draw:text-style-name="P50" draw:layer="layout" svg:width="0.032cm" svg:height="0.048cm" svg:x="3.66cm" svg:y="10.26cm">
              <text:p/>
              <draw:enhanced-geometry svg:viewBox="0 0 17 17" draw:type="non-primitive" draw:enhanced-path="M 0 16  L 0 16  L 16 16  L 16 8  L 16 0  L 16 0  L 16 0  L 0 0  L 0 0  L 16 0  L 0 8  L 0 8  L 0 16  N"/>
            </draw:custom-shape>
            <draw:custom-shape draw:style-name="gr119" draw:text-style-name="P57" draw:layer="layout" svg:width="0.001cm" svg:height="0.048cm" svg:x="3.756cm" svg:y="10.251cm">
              <text:p/>
              <draw:enhanced-geometry svg:viewBox="0 0 1 17" draw:type="non-primitive" draw:enhanced-path="M 0 0  L 0 0  L 0 2  L 0 13  L 0 14  L 0 16  L 0 14  L 0 13  L 0 2  L 0 1  L 0 1  L 0 0  N"/>
            </draw:custom-shape>
            <draw:custom-shape draw:style-name="gr113" draw:text-style-name="P49" draw:layer="layout" svg:width="0.032cm" svg:height="0.048cm" svg:x="3.76cm" svg:y="10.248cm">
              <text:p/>
              <draw:enhanced-geometry svg:viewBox="0 0 17 17" draw:type="non-primitive" draw:enhanced-path="M 3 16  L 13 16  L 13 16  L 14 14  L 14 14  L 14 13  L 16 13  L 16 12  L 16 10  L 16 5  L 16 4  L 14 2  L 14 1  L 14 1  L 13 0  L 3 0  L 1 1  L 1 1  L 1 2  L 0 4  L 0 5  L 0 10  L 0 12  L 0 13  L 1 13  L 1 14  L 1 14  L 3 16  N"/>
            </draw:custom-shape>
            <draw:custom-shape draw:style-name="gr122" draw:text-style-name="P59" draw:layer="layout" svg:width="0.032cm" svg:height="0.048cm" svg:x="3.76cm" svg:y="10.251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3" draw:text-style-name="P48" draw:layer="layout" svg:width="0.032cm" svg:height="0.048cm" svg:x="3.762cm" svg:y="10.251cm">
              <text:p/>
              <draw:enhanced-geometry svg:viewBox="0 0 17 17" draw:type="non-primitive" draw:enhanced-path="M 1 0  L 0 1  L 0 14  L 1 16  L 14 16  L 16 14  L 16 1  L 14 0  L 1 0  N"/>
            </draw:custom-shape>
            <draw:custom-shape draw:style-name="gr108" draw:text-style-name="P50" draw:layer="layout" svg:width="0.032cm" svg:height="0.048cm" svg:x="3.77cm" svg:y="10.257cm">
              <text:p/>
              <draw:enhanced-geometry svg:viewBox="0 0 17 17" draw:type="non-primitive" draw:enhanced-path="M 2 0  L 0 0  L 0 16  L 2 16  L 14 16  L 16 16  L 16 3  L 14 0  L 2 0  N"/>
            </draw:custom-shape>
            <draw:custom-shape draw:style-name="gr125" draw:text-style-name="P2" draw:layer="layout" svg:width="0.031cm" svg:height="0.048cm" svg:x="3.773cm" svg:y="10.266cm">
              <text:p/>
              <draw:enhanced-geometry svg:viewBox="0 0 17 17" draw:type="non-primitive" draw:enhanced-path="M 10 0  L 10 4  L 10 4  L 16 8  L 16 8  L 10 12  L 10 16  L 5 16  L 0 12  L 0 8  L 0 8  L 0 4  L 5 4  L 10 0  N"/>
            </draw:custom-shape>
            <draw:line draw:style-name="gr7" draw:text-style-name="P14" draw:layer="layout" svg:x1="3.786cm" svg:y1="10.266cm" svg:x2="3.786cm" svg:y2="10.277cm">
              <text:p/>
            </draw:line>
            <draw:custom-shape draw:style-name="gr103" draw:text-style-name="P48" draw:layer="layout" svg:width="0.086cm" svg:height="0.048cm" svg:x="3.702cm" svg:y="10.237cm">
              <text:p/>
              <draw:enhanced-geometry svg:viewBox="0 0 46 17" draw:type="non-primitive" draw:enhanced-path="M 0 16  L 45 16  L 45 0  L 0 0  L 0 16  N"/>
            </draw:custom-shape>
            <draw:custom-shape draw:style-name="gr103" draw:text-style-name="P48" draw:layer="layout" svg:width="0.032cm" svg:height="0.002cm" svg:x="3.702cm" svg:y="10.286cm">
              <text:p/>
              <draw:enhanced-geometry svg:viewBox="0 0 17 1" draw:type="non-primitive" draw:enhanced-path="M 0 0  L 0 0  L 0 0  L 16 0  L 16 0  L 16 0  L 16 0  L 16 0  L 0 0  L 0 0  L 0 0  N"/>
            </draw:custom-shape>
            <draw:custom-shape draw:style-name="gr103" draw:text-style-name="P48" draw:layer="layout" svg:width="0.032cm" svg:height="0.048cm" svg:x="3.792cm" svg:y="10.248cm">
              <text:p/>
              <draw:enhanced-geometry svg:viewBox="0 0 17 17" draw:type="non-primitive" draw:enhanced-path="M 10 16  L 10 14  L 10 14  L 16 13  L 16 10  L 16 9  L 16 5  L 16 5  L 10 2  L 10 2  L 5 1  L 5 1  L 0 0  L 0 1  L 5 2  L 5 2  L 10 5  L 10 5  L 10 6  L 10 9  L 10 10  L 10 12  L 10 13  L 10 14  L 10 16  N"/>
            </draw:custom-shape>
            <draw:custom-shape draw:style-name="gr108" draw:text-style-name="P50" draw:layer="layout" svg:width="0.032cm" svg:height="0.048cm" svg:x="3.719cm" svg:y="10.248cm">
              <text:p/>
              <draw:enhanced-geometry svg:viewBox="0 0 17 17" draw:type="non-primitive" draw:enhanced-path="M 8 0  L 12 0  L 13 1  L 15 1  L 15 2  L 15 5  L 16 6  L 16 6  L 16 9  L 16 10  L 15 12  L 15 13  L 14 14  L 13 16  L 13 16  L 12 16  L 0 16  L 8 0  N"/>
            </draw:custom-shape>
            <draw:custom-shape draw:style-name="gr110" draw:text-style-name="P52" draw:layer="layout" svg:width="0.002cm" svg:height="0.048cm" svg:x="3.735cm" svg:y="10.237cm">
              <text:p/>
              <draw:enhanced-geometry svg:viewBox="0 0 1 17" draw:type="non-primitive" draw:enhanced-path="M 0 16  L 0 16  L 0 0  L 0 16  N"/>
            </draw:custom-shape>
            <draw:custom-shape draw:style-name="gr110" draw:text-style-name="P52" draw:layer="layout" svg:width="0.002cm" svg:height="0.048cm" svg:x="3.745cm" svg:y="10.248cm">
              <text:p/>
  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  </draw:custom-shape>
            <draw:custom-shape draw:style-name="gr110" draw:text-style-name="P52" draw:layer="layout" svg:width="0.032cm" svg:height="0.048cm" svg:x="3.745cm" svg:y="10.262cm">
              <text:p/>
              <draw:enhanced-geometry svg:viewBox="0 0 17 17" draw:type="non-primitive" draw:enhanced-path="M 0 0  L 0 16  L 16 16  L 16 0  L 0 0  N"/>
            </draw:custom-shape>
            <draw:custom-shape draw:style-name="gr110" draw:text-style-name="P52" draw:layer="layout" svg:width="0.002cm" svg:height="0.047cm" svg:x="3.745cm" svg:y="10.277cm">
              <text:p/>
              <draw:enhanced-geometry svg:viewBox="0 0 1 17" draw:type="non-primitive" draw:enhanced-path="M 0 16  L 0 16  L 0 16  L 0 16  L 0 16  L 0 10  L 0 10  L 0 10  L 0 5  L 0 0  L 0 0  L 0 0  L 0 0  L 0 5  L 0 5  L 0 10  L 0 10  L 0 10  L 0 10  L 0 10  L 0 16  L 0 16  L 0 16  L 0 16  N"/>
            </draw:custom-shape>
            <draw:custom-shape draw:style-name="gr110" draw:text-style-name="P52" draw:layer="layout" svg:width="0.002cm" svg:height="0.048cm" svg:x="3.735cm" svg:y="10.286cm">
              <text:p/>
              <draw:enhanced-geometry svg:viewBox="0 0 1 17" draw:type="non-primitive" draw:enhanced-path="M 0 0  L 0 0  L 0 16  L 0 16  L 0 0  N"/>
            </draw:custom-shape>
            <draw:custom-shape draw:style-name="gr110" draw:text-style-name="P52" draw:layer="layout" svg:width="0.032cm" svg:height="0.048cm" svg:x="3.719cm" svg:y="10.286cm">
              <text:p/>
              <draw:enhanced-geometry svg:viewBox="0 0 17 17" draw:type="non-primitive" draw:enhanced-path="M 0 16  L 0 0  L 16 0  L 16 16  L 0 16  L 0 16  L 0 16  L 0 0  L 0 16  N"/>
            </draw:custom-shape>
            <draw:custom-shape draw:style-name="gr110" draw:text-style-name="P52" draw:layer="layout" svg:width="0.032cm" svg:height="0.048cm" svg:x="3.711cm" svg:y="10.248cm">
              <text:p/>
              <draw:enhanced-geometry svg:viewBox="0 0 17 17" draw:type="non-primitive" draw:enhanced-path="M 5 0  L 16 0  L 5 16  L 0 16  L 5 0  L 5 1  L 5 0  L 16 0  L 5 0  N"/>
            </draw:custom-shape>
            <draw:custom-shape draw:style-name="gr110" draw:text-style-name="P52" draw:layer="layout" svg:width="0.032cm" svg:height="0.048cm" svg:x="3.719cm" svg:y="10.237cm">
              <text:p/>
              <draw:enhanced-geometry svg:viewBox="0 0 17 17" draw:type="non-primitive" draw:enhanced-path="M 16 16  L 0 16  L 16 0  L 16 16  N"/>
            </draw:custom-shape>
            <draw:custom-shape draw:style-name="gr117" draw:text-style-name="P56" draw:layer="layout" svg:width="0.032cm" svg:height="0.048cm" svg:x="3.732cm" svg:y="10.257cm">
              <text:p/>
              <draw:enhanced-geometry svg:viewBox="0 0 17 17" draw:type="non-primitive" draw:enhanced-path="M 8 0  L 0 14  L 0 16  L 4 16  L 4 14  L 16 0  L 8 0  N"/>
            </draw:custom-shape>
            <draw:custom-shape draw:style-name="gr117" draw:text-style-name="P56" draw:layer="layout" svg:width="0.032cm" svg:height="0.048cm" svg:x="3.739cm" svg:y="10.257cm">
              <text:p/>
              <draw:enhanced-geometry svg:viewBox="0 0 17 17" draw:type="non-primitive" draw:enhanced-path="M 10 0  L 0 14  L 0 16  L 10 16  L 10 14  L 16 5  L 16 5  L 16 3  L 16 1  L 10 0  N"/>
            </draw:custom-shape>
            <draw:custom-shape draw:style-name="gr129" draw:text-style-name="P2" draw:layer="layout" svg:width="0.032cm" svg:height="0.047cm" svg:x="3.745cm" svg:y="10.277cm">
              <text:p/>
              <draw:enhanced-geometry svg:viewBox="0 0 17 17" draw:type="non-primitive" draw:enhanced-path="M 16 0  L 16 5  L 16 5  L 13 10  L 11 13  L 4 16  L 0 16  N"/>
            </draw:custom-shape>
            <draw:custom-shape draw:style-name="gr129" draw:text-style-name="P2" draw:layer="layout" svg:width="0.032cm" svg:height="0.048cm" svg:x="3.722cm" svg:y="10.251cm">
              <text:p/>
              <draw:enhanced-geometry svg:viewBox="0 0 17 17" draw:type="non-primitive" draw:enhanced-path="M 0 0  L 12 0  L 14 0  L 16 16  N"/>
            </draw:custom-shape>
            <draw:custom-shape draw:style-name="gr122" draw:text-style-name="P59" draw:layer="layout" svg:width="0.032cm" svg:height="0.048cm" svg:x="3.715cm" svg:y="10.257cm">
              <text:p/>
              <draw:enhanced-geometry svg:viewBox="0 0 17 17" draw:type="non-primitive" draw:enhanced-path="M 8 0  L 0 1  L 0 8  L 0 14  L 8 16  L 16 10  L 16 8  L 16 1  L 8 1  L 8 0  N"/>
            </draw:custom-shape>
            <draw:custom-shape draw:style-name="gr117" draw:text-style-name="P56" draw:layer="layout" svg:width="0.032cm" svg:height="0.048cm" svg:x="3.721cm" svg:y="10.257cm">
              <text:p/>
              <draw:enhanced-geometry svg:viewBox="0 0 17 17" draw:type="non-primitive" draw:enhanced-path="M 9 0  L 0 12  L 0 16  L 9 16  L 9 14  L 16 0  L 9 0  N"/>
            </draw:custom-shape>
          </draw:g>
        </draw:g>
        <draw:g draw:style-name="gr4">
          <draw:custom-shape draw:style-name="gr209" draw:text-style-name="P62" draw:layer="layout" svg:width="1.764cm" svg:height="0.788cm" svg:x="5.779cm" svg:y="11.739cm">
            <text:p/>
            <draw:enhanced-geometry svg:viewBox="0 0 21600 21600" draw:type="rectangle" draw:enhanced-path="M 0 0 L 21600 0 21600 21600 0 21600 0 0 Z N"/>
          </draw:custom-shape>
          <draw:custom-shape draw:style-name="gr210" draw:text-style-name="P21" draw:layer="layout" svg:width="0.511cm" svg:height="0.934cm" svg:x="6.045cm" svg:y="11.858cm">
            <text:list text:style-name="L14">
              <text:list-header>
                <text:p text:style-name="P20"><text:span text:style-name="T37"/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0.664cm" svg:height="1.043cm" svg:x="5.622cm" svg:y="12.835cm">
            <draw:image xlink:href="Pictures/100016C2000069FE0000618B4635E028.wmf" xlink:type="simple" xlink:show="embed" xlink:actuate="onLoad" draw:mime-type="image/x-wmf">
              <text:p/>
            </draw:image>
            <draw:image xlink:href="Pictures/10000001000002E1000002A6C98D981B.png" xlink:type="simple" xlink:show="embed" xlink:actuate="onLoad" draw:mime-type="image/png"/>
          </draw:frame>
          <draw:frame draw:style-name="gr9" draw:text-style-name="P15" draw:layer="layout" svg:width="0.663cm" svg:height="1.043cm" svg:x="6.323cm" svg:y="12.835cm">
            <draw:image xlink:href="Pictures/100016C2000069FE0000618B4635E028.wmf" xlink:type="simple" xlink:show="embed" xlink:actuate="onLoad" draw:mime-type="image/x-wmf">
              <text:p/>
            </draw:image>
            <draw:image xlink:href="Pictures/10000001000002E1000002A6C98D981B.png" xlink:type="simple" xlink:show="embed" xlink:actuate="onLoad" draw:mime-type="image/png"/>
          </draw:frame>
          <draw:frame draw:style-name="gr9" draw:text-style-name="P15" draw:layer="layout" svg:width="0.663cm" svg:height="1.043cm" svg:x="7.066cm" svg:y="12.87cm">
            <draw:image xlink:href="Pictures/100016C2000069FE0000618B4635E028.wmf" xlink:type="simple" xlink:show="embed" xlink:actuate="onLoad" draw:mime-type="image/x-wmf">
              <text:p/>
            </draw:image>
            <draw:image xlink:href="Pictures/10000001000002E1000002A6C98D981B.png" xlink:type="simple" xlink:show="embed" xlink:actuate="onLoad" draw:mime-type="image/png"/>
          </draw:frame>
        </draw:g>
        <draw:g draw:style-name="gr4">
          <draw:custom-shape draw:style-name="gr211" draw:text-style-name="P46" draw:layer="layout" svg:width="0.293cm" svg:height="0.82cm" svg:x="6.439cm" svg:y="10.068cm">
            <text:p/>
            <draw:enhanced-geometry svg:viewBox="0 0 155 287" draw:type="non-primitive" draw:enhanced-path="M 2 0  L 151 0  L 152 0  L 154 2  L 154 4  L 154 282  L 154 284  L 152 285  L 151 286  L 2 286  L 0 285  L 0 284  L 0 282  L 0 4  L 0 2  L 0 0  L 2 0  N"/>
          </draw:custom-shape>
          <draw:custom-shape draw:style-name="gr111" draw:text-style-name="P47" draw:layer="layout" svg:width="0.293cm" svg:height="0.048cm" svg:x="6.439cm" svg:y="10.771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748cm">
            <text:p/>
            <draw:enhanced-geometry svg:viewBox="0 0 155 17" draw:type="non-primitive" draw:enhanced-path="M 0 0  L 154 0  L 154 16  L 0 16  L 0 0  N"/>
          </draw:custom-shape>
          <draw:custom-shape draw:style-name="gr124" draw:text-style-name="P33" draw:layer="layout" svg:width="0.293cm" svg:height="0.048cm" svg:x="6.439cm" svg:y="10.722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722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693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668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642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614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591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568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536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514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485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462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431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407cm">
            <text:p/>
            <draw:enhanced-geometry svg:viewBox="0 0 155 17" draw:type="non-primitive" draw:enhanced-path="M 0 0  L 154 0  L 154 16  L 0 16  L 0 0  N"/>
          </draw:custom-shape>
          <draw:custom-shape draw:style-name="gr111" draw:text-style-name="P47" draw:layer="layout" svg:width="0.293cm" svg:height="0.048cm" svg:x="6.439cm" svg:y="10.382cm">
            <text:p/>
            <draw:enhanced-geometry svg:viewBox="0 0 155 17" draw:type="non-primitive" draw:enhanced-path="M 0 0  L 154 0  L 154 16  L 0 16  L 0 0  N"/>
          </draw:custom-shape>
          <draw:custom-shape draw:style-name="gr103" draw:text-style-name="P48" draw:layer="layout" svg:width="0.209cm" svg:height="0.06cm" svg:x="6.372cm" svg:y="10.854cm">
            <text:p/>
            <draw:enhanced-geometry svg:viewBox="0 0 111 21" draw:type="non-primitive" draw:enhanced-path="M 35 0  L 31 0  L 31 9  L 0 17  L 0 20  L 110 20  L 110 14  L 35 14  L 35 0  N"/>
          </draw:custom-shape>
          <draw:custom-shape draw:style-name="gr103" draw:text-style-name="P48" draw:layer="layout" svg:width="0.209cm" svg:height="0.06cm" svg:x="6.594cm" svg:y="10.854cm">
            <text:p/>
            <draw:enhanced-geometry svg:viewBox="0 0 111 21" draw:type="non-primitive" draw:enhanced-path="M 74 0  L 79 0  L 79 9  L 110 17  L 110 20  L 0 20  L 0 14  L 74 14  L 74 0  N"/>
          </draw:custom-shape>
          <draw:custom-shape draw:style-name="gr212" draw:text-style-name="P2" draw:layer="layout" svg:width="0.2cm" svg:height="0.288cm" svg:x="6.494cm" svg:y="10.599cm">
            <text:p/>
            <draw:enhanced-geometry svg:viewBox="0 0 106 101" draw:type="non-primitive" draw:enhanced-path="M 0 1  L 0 100  L 105 100  L 105 0  N"/>
          </draw:custom-shape>
          <draw:custom-shape draw:style-name="gr213" draw:text-style-name="P46" draw:layer="layout" svg:width="0.293cm" svg:height="0.608cm" svg:x="6.439cm" svg:y="9.393cm">
            <text:p/>
            <draw:enhanced-geometry svg:viewBox="0 0 155 213" draw:type="non-primitive" draw:enhanced-path="M 3 212  L 150 212  L 152 212  L 153 210  L 154 208  L 154 5  L 153 3  L 152 1  L 151 1  L 3 0  L 1 1  L 0 2  L 0 5  L 0 208  L 0 210  L 1 212  L 3 212  N"/>
          </draw:custom-shape>
          <draw:custom-shape draw:style-name="gr214" draw:text-style-name="P46" draw:layer="layout" svg:width="0.234cm" svg:height="0.374cm" svg:x="6.47cm" svg:y="9.573cm">
            <text:p/>
            <draw:enhanced-geometry svg:viewBox="0 0 124 131" draw:type="non-primitive" draw:enhanced-path="M 5 130  L 118 130  L 119 130  L 121 129  L 122 128  L 123 126  L 123 124  L 123 6  L 123 4  L 122 2  L 121 0  L 119 0  L 118 0  L 5 0  L 3 0  L 2 0  L 1 2  L 0 4  L 0 6  L 0 124  L 0 126  L 0 127  L 2 129  L 3 130  L 5 130  N"/>
          </draw:custom-shape>
          <draw:custom-shape draw:style-name="gr107" draw:text-style-name="P49" draw:layer="layout" svg:width="0.234cm" svg:height="0.048cm" svg:x="6.475cm" svg:y="9.678cm">
            <text:p/>
            <draw:enhanced-geometry svg:viewBox="0 0 124 17" draw:type="non-primitive" draw:enhanced-path="M 0 0  L 123 0  L 123 16  L 0 16  L 0 0  N"/>
          </draw:custom-shape>
          <draw:custom-shape draw:style-name="gr107" draw:text-style-name="P49" draw:layer="layout" svg:width="0.236cm" svg:height="0.048cm" svg:x="6.475cm" svg:y="9.79cm">
            <text:p/>
            <draw:enhanced-geometry svg:viewBox="0 0 125 17" draw:type="non-primitive" draw:enhanced-path="M 0 0  L 124 0  L 124 16  L 0 16  L 0 0  N"/>
          </draw:custom-shape>
          <draw:custom-shape draw:style-name="gr108" draw:text-style-name="P50" draw:layer="layout" svg:width="0.228cm" svg:height="0.086cm" svg:x="6.474cm" svg:y="9.584cm">
            <text:p/>
            <draw:enhanced-geometry svg:viewBox="0 0 121 30" draw:type="non-primitive" draw:enhanced-path="M 2 29  L 118 29  L 119 29  L 120 27  L 120 3  L 120 1  L 118 0  L 2 0  L 0 1  L 0 2  L 0 27  L 0 28  L 1 29  L 2 29  N"/>
          </draw:custom-shape>
          <draw:custom-shape draw:style-name="gr109" draw:text-style-name="P51" draw:layer="layout" svg:width="0.083cm" svg:height="0.057cm" svg:x="6.534cm" svg:y="9.59cm">
            <text:p/>
            <draw:enhanced-geometry svg:viewBox="0 0 44 20" draw:type="non-primitive" draw:enhanced-path="M 1 0  L 41 0  L 42 0  L 43 2  L 43 17  L 42 19  L 41 19  L 1 19  L 0 19  L 0 17  L 0 2  L 0 0  L 1 0  N"/>
          </draw:custom-shape>
          <draw:custom-shape draw:style-name="gr110" draw:text-style-name="P52" draw:layer="layout" svg:width="0.032cm" svg:height="0.003cm" svg:x="6.657cm" svg:y="9.59cm">
            <text:p/>
            <draw:enhanced-geometry svg:viewBox="0 0 17 1" draw:type="non-primitive" draw:enhanced-path="M 1 0  L 14 0  L 14 0  L 16 0  L 14 0  L 1 0  L 1 0  L 0 0  L 1 0  N"/>
          </draw:custom-shape>
          <draw:custom-shape draw:style-name="gr108" draw:text-style-name="P50" draw:layer="layout" svg:width="0.032cm" svg:height="0.003cm" svg:x="6.657cm" svg:y="9.59cm">
            <text:p/>
            <draw:enhanced-geometry svg:viewBox="0 0 17 1" draw:type="non-primitive" draw:enhanced-path="M 1 0  L 14 0  L 16 0  L 16 0  L 14 0  L 1 0  L 0 0  L 0 0  L 1 0  N"/>
          </draw:custom-shape>
          <draw:custom-shape draw:style-name="gr111" draw:text-style-name="P47" draw:layer="layout" svg:width="0.21cm" svg:height="0.002cm" svg:x="6.485cm" svg:y="9.616cm">
            <text:p/>
            <draw:enhanced-geometry svg:viewBox="0 0 111 1" draw:type="non-primitive" draw:enhanced-path="M 1 0  L 108 0  L 110 0  L 110 0  L 110 0  L 110 0  L 108 0  L 1 0  L 0 0  L 0 0  L 0 0  L 0 0  L 1 0  N"/>
          </draw:custom-shape>
          <draw:custom-shape draw:style-name="gr108" draw:text-style-name="P50" draw:layer="layout" svg:width="0.226cm" svg:height="0.091cm" svg:x="6.475cm" svg:y="9.687cm">
            <text:p/>
            <draw:enhanced-geometry svg:viewBox="0 0 120 32" draw:type="non-primitive" draw:enhanced-path="M 0 31  L 117 31  L 119 31  L 119 29  L 119 3  L 118 1  L 117 0  L 0 0  L 0 1  L 0 3  L 0 29  L 0 31  L 0 31  N"/>
          </draw:custom-shape>
          <draw:custom-shape draw:style-name="gr109" draw:text-style-name="P51" draw:layer="layout" svg:width="0.083cm" svg:height="0.065cm" svg:x="6.534cm" svg:y="9.699cm">
            <text:p/>
            <draw:enhanced-geometry svg:viewBox="0 0 44 23" draw:type="non-primitive" draw:enhanced-path="M 2 0  L 40 0  L 42 0  L 43 2  L 43 3  L 43 19  L 43 21  L 41 22  L 40 22  L 2 22  L 0 22  L 0 21  L 0 19  L 0 3  L 0 1  L 1 0  L 2 0  N"/>
          </draw:custom-shape>
          <draw:custom-shape draw:style-name="gr110" draw:text-style-name="P52" draw:layer="layout" svg:width="0.032cm" svg:height="0.002cm" svg:x="6.634cm" svg:y="9.753cm">
            <text:p/>
            <draw:enhanced-geometry svg:viewBox="0 0 17 1" draw:type="non-primitive" draw:enhanced-path="M 2 0  L 13 0  L 13 0  L 16 0  L 16 0  L 14 0  L 13 0  L 2 0  L 1 0  L 0 0  L 0 0  L 1 0  L 2 0  N"/>
          </draw:custom-shape>
          <draw:custom-shape draw:style-name="gr108" draw:text-style-name="P50" draw:layer="layout" svg:width="0.032cm" svg:height="0.002cm" svg:x="6.634cm" svg:y="9.753cm">
            <text:p/>
            <draw:enhanced-geometry svg:viewBox="0 0 17 1" draw:type="non-primitive" draw:enhanced-path="M 2 0  L 13 0  L 13 0  L 16 0  L 16 0  L 14 0  L 13 0  L 2 0  L 1 0  L 0 0  L 0 0  L 1 0  L 2 0  N"/>
          </draw:custom-shape>
          <draw:custom-shape draw:style-name="gr112" draw:text-style-name="P53" draw:layer="layout" svg:width="0.13cm" svg:height="0.048cm" svg:x="6.528cm" svg:y="9.71cm">
            <text:p/>
            <draw:enhanced-geometry svg:viewBox="0 0 69 17" draw:type="non-primitive" draw:enhanced-path="M 0 16  L 23 16  L 23 16  L 46 16  L 46 16  L 68 16  L 68 8  L 46 8  L 46 0  L 24 0  L 24 0  L 0 0  L 0 16  N"/>
          </draw:custom-shape>
          <draw:custom-shape draw:style-name="gr113" draw:text-style-name="P49" draw:layer="layout" svg:width="0.225cm" svg:height="0.048cm" svg:x="6.475cm" svg:y="9.816cm">
            <text:p/>
            <draw:enhanced-geometry svg:viewBox="0 0 119 17" draw:type="non-primitive" draw:enhanced-path="M 0 16  L 118 16  L 118 0  L 0 0  L 0 16  N"/>
          </draw:custom-shape>
          <draw:custom-shape draw:style-name="gr114" draw:text-style-name="P35" draw:layer="layout" svg:width="0.226cm" svg:height="0.048cm" svg:x="6.475cm" svg:y="9.804cm">
            <text:p/>
            <draw:enhanced-geometry svg:viewBox="0 0 120 17" draw:type="non-primitive" draw:enhanced-path="M 119 16  L 118 16  L 0 16  L 0 0  L 118 0  L 117 16  L 119 16  L 118 16  L 119 16  N"/>
          </draw:custom-shape>
          <draw:custom-shape draw:style-name="gr114" draw:text-style-name="P35" draw:layer="layout" svg:width="0.032cm" svg:height="0.048cm" svg:x="6.7cm" svg:y="9.816cm">
            <text:p/>
            <draw:enhanced-geometry svg:viewBox="0 0 17 17" draw:type="non-primitive" draw:enhanced-path="M 6 0  L 0 0  L 0 16  L 16 16  L 16 0  L 6 0  L 6 0  L 0 0  L 0 0  L 6 0  N"/>
          </draw:custom-shape>
          <draw:custom-shape draw:style-name="gr114" draw:text-style-name="P35" draw:layer="layout" svg:width="0.226cm" svg:height="0.048cm" svg:x="6.474cm" svg:y="9.816cm">
            <text:p/>
            <draw:enhanced-geometry svg:viewBox="0 0 120 17" draw:type="non-primitive" draw:enhanced-path="M 0 16  L 0 0  L 119 0  L 119 16  L 0 16  L 0 16  L 0 0  L 0 0  L 0 16  N"/>
          </draw:custom-shape>
          <draw:custom-shape draw:style-name="gr114" draw:text-style-name="P35" draw:layer="layout" svg:width="0.032cm" svg:height="0.048cm" svg:x="6.462cm" svg:y="9.816cm">
            <text:p/>
            <draw:enhanced-geometry svg:viewBox="0 0 17 17" draw:type="non-primitive" draw:enhanced-path="M 0 16  L 16 16  L 16 0  L 0 0  L 0 16  L 0 16  L 0 16  L 16 16  L 0 16  N"/>
          </draw:custom-shape>
          <draw:custom-shape draw:style-name="gr108" draw:text-style-name="P50" draw:layer="layout" svg:width="0.226cm" svg:height="0.111cm" svg:x="6.475cm" svg:y="9.83cm">
            <text:p/>
            <draw:enhanced-geometry svg:viewBox="0 0 120 39" draw:type="non-primitive" draw:enhanced-path="M 1 0  L 117 0  L 118 0  L 119 1  L 119 2  L 119 35  L 119 36  L 119 37  L 118 37  L 118 38  L 117 38  L 1 38  L 0 38  L 0 38  L 0 37  L 0 36  L 0 35  L 0 2  L 0 1  L 0 0  L 1 0  N"/>
          </draw:custom-shape>
          <draw:custom-shape draw:style-name="gr109" draw:text-style-name="P51" draw:layer="layout" svg:width="0.081cm" svg:height="0.088cm" svg:x="6.532cm" svg:y="9.847cm">
            <text:p/>
            <draw:enhanced-geometry svg:viewBox="0 0 43 31" draw:type="non-primitive" draw:enhanced-path="M 2 0  L 39 0  L 40 0  L 41 1  L 41 2  L 42 3  L 42 3  L 42 27  L 41 28  L 41 29  L 41 30  L 40 30  L 39 30  L 2 30  L 1 30  L 0 29  L 0 28  L 0 27  L 0 3  L 0 3  L 0 2  L 0 1  L 1 0  L 2 0  N"/>
          </draw:custom-shape>
          <draw:custom-shape draw:style-name="gr115" draw:text-style-name="P54" draw:layer="layout" svg:width="0.151cm" svg:height="0.068cm" svg:x="6.543cm" svg:y="9.85cm">
            <text:p/>
            <draw:enhanced-geometry svg:viewBox="0 0 80 24" draw:type="non-primitive" draw:enhanced-path="M 0 0  L 79 0  L 79 16  L 10 16  L 10 23  L 0 23  L 0 0  N"/>
          </draw:custom-shape>
          <draw:custom-shape draw:style-name="gr108" draw:text-style-name="P50" draw:layer="layout" svg:width="0.226cm" svg:height="0.048cm" svg:x="6.475cm" svg:y="9.798cm">
            <text:p/>
            <draw:enhanced-geometry svg:viewBox="0 0 120 17" draw:type="non-primitive" draw:enhanced-path="M 0 16  L 119 16  L 119 0  L 0 0  L 0 16  N"/>
          </draw:custom-shape>
          <draw:custom-shape draw:style-name="gr116" draw:text-style-name="P55" draw:layer="layout" svg:width="0.24cm" svg:height="0.003cm" svg:x="6.47cm" svg:y="9.535cm">
            <text:p/>
            <draw:enhanced-geometry svg:viewBox="0 0 127 1" draw:type="non-primitive" draw:enhanced-path="M 1 0  L 124 0  L 125 0  L 126 0  L 126 0  L 124 0  L 1 0  L 0 0  L 0 0  L 0 0  L 1 0  N"/>
          </draw:custom-shape>
          <draw:custom-shape draw:style-name="gr117" draw:text-style-name="P56" draw:layer="layout" svg:width="0.036cm" svg:height="0.048cm" svg:x="6.485cm" svg:y="9.618cm">
            <text:p/>
            <draw:enhanced-geometry svg:viewBox="0 0 19 17" draw:type="non-primitive" draw:enhanced-path="M 0 16  L 18 16  L 18 12  L 18 0  L 0 0  L 0 4  L 0 16  L 0 16  N"/>
          </draw:custom-shape>
          <draw:custom-shape draw:style-name="gr117" draw:text-style-name="P56" draw:layer="layout" svg:width="0.085cm" svg:height="0.048cm" svg:x="6.532cm" svg:y="9.618cm">
            <text:p/>
            <draw:enhanced-geometry svg:viewBox="0 0 45 17" draw:type="non-primitive" draw:enhanced-path="M 0 16  L 44 16  L 0 0  L 0 16  N"/>
          </draw:custom-shape>
          <draw:custom-shape draw:style-name="gr117" draw:text-style-name="P56" draw:layer="layout" svg:width="0.066cm" svg:height="0.048cm" svg:x="6.628cm" svg:y="9.618cm">
            <text:p/>
            <draw:enhanced-geometry svg:viewBox="0 0 35 17" draw:type="non-primitive" draw:enhanced-path="M 0 16  L 33 16  L 34 12  L 33 0  L 0 0  L 0 12  L 0 16  N"/>
          </draw:custom-shape>
          <draw:custom-shape draw:style-name="gr109" draw:text-style-name="P51" draw:layer="layout" svg:width="0.083cm" svg:height="0.048cm" svg:x="6.534cm" svg:y="9.638cm">
            <text:p/>
            <draw:enhanced-geometry svg:viewBox="0 0 44 17" draw:type="non-primitive" draw:enhanced-path="M 0 0  L 42 0  L 43 0  L 43 16  L 42 16  L 0 16  L 0 16  L 0 0  L 0 0  N"/>
          </draw:custom-shape>
          <draw:custom-shape draw:style-name="gr118" draw:text-style-name="P46" draw:layer="layout" svg:width="0.032cm" svg:height="0.048cm" svg:x="6.66cm" svg:y="9.573cm">
            <text:p/>
            <draw:enhanced-geometry svg:viewBox="0 0 17 17" draw:type="non-primitive" draw:enhanced-path="M 0 16  L 16 16  L 16 0  L 0 0  L 0 16  N"/>
          </draw:custom-shape>
          <draw:custom-shape draw:style-name="gr103" draw:text-style-name="P48" draw:layer="layout" svg:width="0.031cm" svg:height="0.048cm" svg:x="6.644cm" svg:y="9.59cm">
            <text:p/>
            <draw:enhanced-geometry svg:viewBox="0 0 17 17" draw:type="non-primitive" draw:enhanced-path="M 4 0  L 0 13  L 0 16  L 13 16  L 16 8  L 5 8  L 4 0  N"/>
          </draw:custom-shape>
          <draw:custom-shape draw:style-name="gr119" draw:text-style-name="P57" draw:layer="layout" svg:width="0.032cm" svg:height="0.048cm" svg:x="6.536cm" svg:y="9.638cm">
            <text:p/>
            <draw:enhanced-geometry svg:viewBox="0 0 17 17" draw:type="non-primitive" draw:enhanced-path="M 16 16  L 0 16  L 0 16  L 0 8  L 0 8  L 0 0  L 16 0  L 16 8  L 16 8  L 16 16  L 16 16  N"/>
          </draw:custom-shape>
          <draw:custom-shape draw:style-name="gr120" draw:text-style-name="P58" draw:layer="layout" svg:width="0.032cm" svg:height="0.048cm" svg:x="6.536cm" svg:y="9.636cm">
            <text:p/>
            <draw:enhanced-geometry svg:viewBox="0 0 17 17" draw:type="non-primitive" draw:enhanced-path="M 16 16  L 0 16  L 0 16  L 0 5  L 0 0  L 16 0  L 16 0  L 16 0  L 16 5  L 16 5  L 16 16  L 16 16  N"/>
          </draw:custom-shape>
          <draw:custom-shape draw:style-name="gr121" draw:text-style-name="P16" draw:layer="layout" svg:width="0.032cm" svg:height="0.048cm" svg:x="6.532cm" svg:y="9.632cm">
            <text:p/>
            <draw:enhanced-geometry svg:viewBox="0 0 17 17" draw:type="non-primitive" draw:enhanced-path="M 0 16  L 0 0  L 16 0  L 0 16  N"/>
          </draw:custom-shape>
          <draw:custom-shape draw:style-name="gr119" draw:text-style-name="P57" draw:layer="layout" svg:width="0.002cm" svg:height="0.048cm" svg:x="6.504cm" svg:y="9.535cm">
            <text:p/>
            <draw:enhanced-geometry svg:viewBox="0 0 1 17" draw:type="non-primitive" draw:enhanced-path="M 0 16  L 0 16  L 0 16  L 0 12  L 0 4  L 0 0  L 0 0  L 0 4  L 0 12  L 0 16  L 0 16  N"/>
          </draw:custom-shape>
          <draw:custom-shape draw:style-name="gr120" draw:text-style-name="P58" draw:layer="layout" svg:width="0.002cm" svg:height="0.048cm" svg:x="6.504cm" svg:y="9.535cm">
            <text:p/>
            <draw:enhanced-geometry svg:viewBox="0 0 1 17" draw:type="non-primitive" draw:enhanced-path="M 0 16  L 0 16  L 0 12  L 0 4  L 0 4  L 0 0  L 0 0  L 0 4  L 0 4  L 0 12  L 0 12  L 0 16  N"/>
          </draw:custom-shape>
          <draw:line draw:style-name="gr60" draw:text-style-name="P14" draw:layer="layout" svg:x1="6.504cm" svg:y1="9.547cm" svg:x2="6.507cm" svg:y2="9.547cm">
            <text:p/>
          </draw:line>
          <draw:custom-shape draw:style-name="gr119" draw:text-style-name="P57" draw:layer="layout" svg:width="0.002cm" svg:height="0.048cm" svg:x="6.657cm" svg:y="9.535cm">
            <text:p/>
            <draw:enhanced-geometry svg:viewBox="0 0 1 17" draw:type="non-primitive" draw:enhanced-path="M 0 16  L 0 16  L 0 16  L 0 12  L 0 4  L 0 0  L 0 0  L 0 4  L 0 4  L 0 12  L 0 16  N"/>
          </draw:custom-shape>
          <draw:custom-shape draw:style-name="gr120" draw:text-style-name="P58" draw:layer="layout" svg:width="0.032cm" svg:height="0.048cm" svg:x="6.655cm" svg:y="9.535cm">
            <text:p/>
            <draw:enhanced-geometry svg:viewBox="0 0 17 17" draw:type="non-primitive" draw:enhanced-path="M 16 16  L 0 16  L 0 16  L 0 8  L 0 0  L 0 0  L 16 0  L 16 8  L 16 16  N"/>
          </draw:custom-shape>
          <draw:custom-shape draw:style-name="gr121" draw:text-style-name="P16" draw:layer="layout" svg:width="0.032cm" svg:height="0.048cm" svg:x="6.647cm" svg:y="9.53cm">
            <text:p/>
            <draw:enhanced-geometry svg:viewBox="0 0 17 17" draw:type="non-primitive" draw:enhanced-path="M 16 16  L 0 16  L 0 0  L 16 0  L 16 16  N"/>
          </draw:custom-shape>
          <draw:custom-shape draw:style-name="gr119" draw:text-style-name="P57" draw:layer="layout" svg:width="0.032cm" svg:height="0.048cm" svg:x="6.536cm" svg:y="9.753cm">
            <text:p/>
            <draw:enhanced-geometry svg:viewBox="0 0 17 17" draw:type="non-primitive" draw:enhanced-path="M 16 16  L 0 16  L 0 16  L 0 0  L 0 0  L 0 0  L 16 0  L 16 0  L 16 0  L 16 0  L 16 16  L 16 16  L 16 16  N"/>
          </draw:custom-shape>
          <draw:custom-shape draw:style-name="gr120" draw:text-style-name="P58" draw:layer="layout" svg:width="0.032cm" svg:height="0.048cm" svg:x="6.536cm" svg:y="9.75cm">
            <text:p/>
            <draw:enhanced-geometry svg:viewBox="0 0 17 17" draw:type="non-primitive" draw:enhanced-path="M 16 16  L 0 16  L 0 16  L 0 8  L 0 0  L 16 0  L 16 0  L 16 0  L 16 8  L 16 16  L 16 16  N"/>
          </draw:custom-shape>
          <draw:custom-shape draw:style-name="gr121" draw:text-style-name="P16" draw:layer="layout" svg:width="0.032cm" svg:height="0.048cm" svg:x="6.532cm" svg:y="9.747cm">
            <text:p/>
            <draw:enhanced-geometry svg:viewBox="0 0 17 17" draw:type="non-primitive" draw:enhanced-path="M 0 16  L 0 0  L 16 0  L 0 16  N"/>
          </draw:custom-shape>
          <draw:custom-shape draw:style-name="gr119" draw:text-style-name="P57" draw:layer="layout" svg:width="0.001cm" svg:height="0.048cm" svg:x="6.489cm" svg:y="9.928cm">
            <text:p/>
            <draw:enhanced-geometry svg:viewBox="0 0 1 17" draw:type="non-primitive" draw:enhanced-path="M 0 16  L 0 16  L 0 10  L 0 10  L 0 5  L 0 5  L 0 0  L 0 0  L 0 0  L 0 5  L 0 5  L 0 5  L 0 10  L 0 16  L 0 16  N"/>
          </draw:custom-shape>
          <draw:line draw:style-name="gr60" draw:text-style-name="P14" draw:layer="layout" svg:x1="6.492cm" svg:y1="9.942cm" svg:x2="6.499cm" svg:y2="9.942cm">
            <text:p/>
          </draw:line>
          <draw:line draw:style-name="gr60" draw:text-style-name="P14" draw:layer="layout" svg:x1="6.492cm" svg:y1="9.942cm" svg:x2="6.499cm" svg:y2="9.942cm">
            <text:p/>
          </draw:line>
          <draw:line draw:style-name="gr60" draw:text-style-name="P14" draw:layer="layout" svg:x1="6.492cm" svg:y1="9.942cm" svg:x2="6.499cm" svg:y2="9.942cm">
            <text:p/>
          </draw:line>
          <draw:line draw:style-name="gr60" draw:text-style-name="P14" draw:layer="layout" svg:x1="6.492cm" svg:y1="9.942cm" svg:x2="6.499cm" svg:y2="9.942cm">
            <text:p/>
          </draw:line>
          <draw:line draw:style-name="gr60" draw:text-style-name="P14" draw:layer="layout" svg:x1="6.492cm" svg:y1="9.942cm" svg:x2="6.499cm" svg:y2="9.942cm">
            <text:p/>
          </draw:line>
          <draw:line draw:style-name="gr60" draw:text-style-name="P14" draw:layer="layout" svg:x1="6.492cm" svg:y1="9.942cm" svg:x2="6.499cm" svg:y2="9.942cm">
            <text:p/>
          </draw:line>
          <draw:line draw:style-name="gr60" draw:text-style-name="P14" draw:layer="layout" svg:x1="6.492cm" svg:y1="9.942cm" svg:x2="6.499cm" svg:y2="9.942cm">
            <text:p/>
          </draw:line>
          <draw:custom-shape draw:style-name="gr120" draw:text-style-name="P58" draw:layer="layout" svg:width="0.032cm" svg:height="0.048cm" svg:x="6.489cm" svg:y="9.924cm">
            <text:p/>
            <draw:enhanced-geometry svg:viewBox="0 0 17 17" draw:type="non-primitive" draw:enhanced-path="M 16 16  L 16 0  L 0 0  L 16 16  N"/>
          </draw:custom-shap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custom-shape draw:style-name="gr120" draw:text-style-name="P58" draw:layer="layout" svg:width="0.032cm" svg:height="0.048cm" svg:x="6.489cm" svg:y="9.924cm">
            <text:p/>
            <draw:enhanced-geometry svg:viewBox="0 0 17 17" draw:type="non-primitive" draw:enhanced-path="M 16 16  L 16 0  L 0 0  L 16 16  N"/>
          </draw:custom-shap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line draw:style-name="gr60" draw:text-style-name="P14" draw:layer="layout" svg:x1="6.492cm" svg:y1="9.939cm" svg:x2="6.499cm" svg:y2="9.939cm">
            <text:p/>
          </draw:line>
          <draw:custom-shape draw:style-name="gr120" draw:text-style-name="P58" draw:layer="layout" svg:width="0.032cm" svg:height="0.048cm" svg:x="6.489cm" svg:y="9.918cm">
            <text:p/>
            <draw:enhanced-geometry svg:viewBox="0 0 17 17" draw:type="non-primitive" draw:enhanced-path="M 16 16  L 16 0  L 0 0  L 16 16  N"/>
          </draw:custom-shape>
          <draw:line draw:style-name="gr60" draw:text-style-name="P14" draw:layer="layout" svg:x1="6.492cm" svg:y1="9.936cm" svg:x2="6.499cm" svg:y2="9.936cm">
            <text:p/>
          </draw:line>
          <draw:custom-shape draw:style-name="gr121" draw:text-style-name="P16" draw:layer="layout" svg:width="0.032cm" svg:height="0.048cm" svg:x="6.485cm" svg:y="9.924cm">
            <text:p/>
            <draw:enhanced-geometry svg:viewBox="0 0 17 17" draw:type="non-primitive" draw:enhanced-path="M 16 16  L 0 16  L 16 0  L 16 16  N"/>
          </draw:custom-shape>
          <draw:custom-shape draw:style-name="gr113" draw:text-style-name="P49" draw:layer="layout" svg:width="0.202cm" svg:height="0.048cm" svg:x="6.489cm" svg:y="9.607cm">
            <text:p/>
            <draw:enhanced-geometry svg:viewBox="0 0 107 17" draw:type="non-primitive" draw:enhanced-path="M 0 16  L 0 0  L 106 0  L 106 16  L 0 16  N"/>
          </draw:custom-shape>
          <draw:custom-shape draw:style-name="gr117" draw:text-style-name="P56" draw:layer="layout" svg:width="0.032cm" svg:height="0.048cm" svg:x="6.526cm" svg:y="9.595cm">
            <text:p/>
            <draw:enhanced-geometry svg:viewBox="0 0 17 17" draw:type="non-primitive" draw:enhanced-path="M 6 0  L 0 0  L 0 16  L 6 16  L 16 0  L 6 0  N"/>
          </draw:custom-shape>
          <draw:custom-shape draw:style-name="gr117" draw:text-style-name="P56" draw:layer="layout" svg:width="0.032cm" svg:height="0.048cm" svg:x="6.526cm" svg:y="9.632cm">
            <text:p/>
            <draw:enhanced-geometry svg:viewBox="0 0 17 17" draw:type="non-primitive" draw:enhanced-path="M 6 0  L 0 0  L 0 16  L 6 16  L 16 16  L 16 0  L 6 0  N"/>
          </draw:custom-shape>
          <draw:custom-shape draw:style-name="gr111" draw:text-style-name="P47" draw:layer="layout" svg:width="0.151cm" svg:height="0.048cm" svg:x="6.543cm" svg:y="9.856cm">
            <text:p/>
            <draw:enhanced-geometry svg:viewBox="0 0 80 17" draw:type="non-primitive" draw:enhanced-path="M 0 0  L 0 16  L 79 16  L 79 0  L 0 0  N"/>
          </draw:custom-shape>
          <draw:custom-shape draw:style-name="gr117" draw:text-style-name="P56" draw:layer="layout" svg:width="0.079cm" svg:height="0.048cm" svg:x="6.532cm" svg:y="9.933cm">
            <text:p/>
            <draw:enhanced-geometry svg:viewBox="0 0 42 17" draw:type="non-primitive" draw:enhanced-path="M 0 16  L 40 16  L 41 5  L 0 0  L 0 5  L 0 16  N"/>
          </draw:custom-shape>
          <draw:custom-shape draw:style-name="gr117" draw:text-style-name="P56" draw:layer="layout" svg:width="0.047cm" svg:height="0.048cm" svg:x="6.566cm" svg:y="9.89cm">
            <text:p/>
            <draw:enhanced-geometry svg:viewBox="0 0 25 17" draw:type="non-primitive" draw:enhanced-path="M 0 16  L 0 0  L 24 0  L 24 16  L 0 16  N"/>
          </draw:custom-shape>
          <draw:custom-shape draw:style-name="gr117" draw:text-style-name="P56" draw:layer="layout" svg:width="0.077cm" svg:height="0.048cm" svg:x="6.623cm" svg:y="9.896cm">
            <text:p/>
            <draw:enhanced-geometry svg:viewBox="0 0 41 17" draw:type="non-primitive" draw:enhanced-path="M 1 16  L 39 16  L 40 12  L 39 0  L 1 0  L 0 12  L 1 16  N"/>
          </draw:custom-shape>
          <draw:line draw:style-name="gr60" draw:text-style-name="P14" draw:layer="layout" svg:x1="6.534cm" svg:y1="9.73cm" svg:x2="6.534cm" svg:y2="9.776cm">
            <text:p/>
          </draw:line>
          <draw:line draw:style-name="gr60" draw:text-style-name="P14" draw:layer="layout" svg:x1="6.534cm" svg:y1="9.71cm" svg:x2="6.534cm" svg:y2="9.715cm">
            <text:p/>
          </draw:line>
          <draw:custom-shape draw:style-name="gr118" draw:text-style-name="P46" draw:layer="layout" svg:width="0.032cm" svg:height="0.048cm" svg:x="6.517cm" svg:y="9.71cm">
            <text:p/>
            <draw:enhanced-geometry svg:viewBox="0 0 17 17" draw:type="non-primitive" draw:enhanced-path="M 16 16  L 16 0  L 0 0  L 0 16  L 16 16  N"/>
          </draw:custom-shape>
          <draw:custom-shape draw:style-name="gr118" draw:text-style-name="P46" draw:layer="layout" svg:width="0.032cm" svg:height="0.048cm" svg:x="6.57cm" svg:y="9.699cm">
            <text:p/>
            <draw:enhanced-geometry svg:viewBox="0 0 17 17" draw:type="non-primitive" draw:enhanced-path="M 16 16  L 16 0  L 0 0  L 0 16  L 16 16  N"/>
          </draw:custom-shape>
          <draw:custom-shape draw:style-name="gr118" draw:text-style-name="P46" draw:layer="layout" svg:width="0.032cm" svg:height="0.048cm" svg:x="6.57cm" svg:y="9.715cm">
            <text:p/>
            <draw:enhanced-geometry svg:viewBox="0 0 17 17" draw:type="non-primitive" draw:enhanced-path="M 16 16  L 16 0  L 0 0  L 0 16  L 16 16  N"/>
          </draw:custom-shape>
          <draw:custom-shape draw:style-name="gr118" draw:text-style-name="P46" draw:layer="layout" svg:width="0.034cm" svg:height="0.048cm" svg:x="6.624cm" svg:y="9.715cm">
            <text:p/>
            <draw:enhanced-geometry svg:viewBox="0 0 18 17" draw:type="non-primitive" draw:enhanced-path="M 0 16  L 17 16  L 17 0  L 0 0  L 0 16  N"/>
          </draw:custom-shape>
          <draw:custom-shape draw:style-name="gr118" draw:text-style-name="P46" draw:layer="layout" svg:width="0.032cm" svg:height="0.048cm" svg:x="6.526cm" svg:y="9.733cm">
            <text:p/>
            <draw:enhanced-geometry svg:viewBox="0 0 17 17" draw:type="non-primitive" draw:enhanced-path="M 16 0  L 16 16  L 0 16  L 0 0  L 16 0  N"/>
          </draw:custom-shape>
          <draw:custom-shape draw:style-name="gr118" draw:text-style-name="P46" draw:layer="layout" svg:width="0.079cm" svg:height="0.048cm" svg:x="6.534cm" svg:y="9.761cm">
            <text:p/>
            <draw:enhanced-geometry svg:viewBox="0 0 42 17" draw:type="non-primitive" draw:enhanced-path="M 0 16  L 40 16  L 41 0  L 0 0  L 0 16  N"/>
          </draw:custom-shape>
          <draw:custom-shape draw:style-name="gr110" draw:text-style-name="P52" draw:layer="layout" svg:width="0.032cm" svg:height="0.048cm" svg:x="6.615cm" svg:y="9.733cm">
            <text:p/>
            <draw:enhanced-geometry svg:viewBox="0 0 17 17" draw:type="non-primitive" draw:enhanced-path="M 0 0  L 0 12  L 8 14  L 8 16  L 16 14  L 8 12  L 8 0  L 0 0  N"/>
          </draw:custom-shape>
          <draw:custom-shape draw:style-name="gr122" draw:text-style-name="P59" draw:layer="layout" svg:width="0.034cm" svg:height="0.048cm" svg:x="6.624cm" svg:y="9.704cm">
            <text:p/>
            <draw:enhanced-geometry svg:viewBox="0 0 18 17" draw:type="non-primitive" draw:enhanced-path="M 0 16  L 0 0  L 17 0  L 17 16  L 0 16  N"/>
          </draw:custom-shape>
          <draw:custom-shape draw:style-name="gr122" draw:text-style-name="P59" draw:layer="layout" svg:width="0.032cm" svg:height="0.048cm" svg:x="6.657cm" svg:y="9.71cm">
            <text:p/>
            <draw:enhanced-geometry svg:viewBox="0 0 17 17" draw:type="non-primitive" draw:enhanced-path="M 16 16  L 16 0  L 0 0  L 0 16  L 16 16  N"/>
          </draw:custom-shape>
          <draw:custom-shape draw:style-name="gr110" draw:text-style-name="P52" draw:layer="layout" svg:width="0.083cm" svg:height="0.002cm" svg:x="6.534cm" svg:y="9.699cm">
            <text:p/>
            <draw:enhanced-geometry svg:viewBox="0 0 44 1" draw:type="non-primitive" draw:enhanced-path="M 0 0  L 1 0  L 40 0  L 42 0  L 43 0  L 43 0  L 42 0  L 41 0  L 1 0  L 0 0  L 0 0  N"/>
          </draw:custom-shape>
          <draw:custom-shape draw:style-name="gr122" draw:text-style-name="P59" draw:layer="layout" svg:width="0.032cm" svg:height="0.048cm" svg:x="6.519cm" svg:y="9.71cm">
            <text:p/>
            <draw:enhanced-geometry svg:viewBox="0 0 17 17" draw:type="non-primitive" draw:enhanced-path="M 16 16  L 16 0  L 0 0  L 0 16  L 16 16  N"/>
          </draw:custom-shape>
          <draw:custom-shape draw:style-name="gr118" draw:text-style-name="P46" draw:layer="layout" svg:width="0.032cm" svg:height="0.048cm" svg:x="6.526cm" svg:y="9.699cm">
            <text:p/>
            <draw:enhanced-geometry svg:viewBox="0 0 17 17" draw:type="non-primitive" draw:enhanced-path="M 16 16  L 16 0  L 0 16  L 16 16  N"/>
          </draw:custom-shape>
          <draw:line draw:style-name="gr60" draw:text-style-name="P14" draw:layer="layout" svg:x1="6.532cm" svg:y1="9.715cm" svg:x2="6.579cm" svg:y2="9.715cm">
            <text:p/>
          </draw:line>
          <draw:line draw:style-name="gr60" draw:text-style-name="P14" draw:layer="layout" svg:x1="6.579cm" svg:y1="9.73cm" svg:x2="6.579cm" svg:y2="9.735cm">
            <text:p/>
          </draw:line>
          <draw:custom-shape draw:style-name="gr122" draw:text-style-name="P59" draw:layer="layout" svg:width="0.033cm" svg:height="0.048cm" svg:x="6.579cm" svg:y="9.715cm">
            <text:p/>
            <draw:enhanced-geometry svg:viewBox="0 0 18 17" draw:type="non-primitive" draw:enhanced-path="M 0 16  L 0 0  L 17 0  L 17 16  L 0 16  N"/>
          </draw:custom-shape>
          <draw:custom-shape draw:style-name="gr122" draw:text-style-name="P59" draw:layer="layout" svg:width="0.032cm" svg:height="0.048cm" svg:x="6.612cm" svg:y="9.715cm">
            <text:p/>
            <draw:enhanced-geometry svg:viewBox="0 0 17 17" draw:type="non-primitive" draw:enhanced-path="M 0 16  L 0 0  L 16 0  L 16 16  L 0 16  N"/>
          </draw:custom-shape>
          <draw:custom-shape draw:style-name="gr122" draw:text-style-name="P59" draw:layer="layout" svg:width="0.032cm" svg:height="0.048cm" svg:x="6.612cm" svg:y="9.704cm">
            <text:p/>
            <draw:enhanced-geometry svg:viewBox="0 0 17 17" draw:type="non-primitive" draw:enhanced-path="M 16 16  L 16 0  L 0 0  L 0 16  L 16 16  N"/>
          </draw:custom-shape>
          <draw:custom-shape draw:style-name="gr122" draw:text-style-name="P59" draw:layer="layout" svg:width="0.033cm" svg:height="0.048cm" svg:x="6.579cm" svg:y="9.695cm">
            <text:p/>
            <draw:enhanced-geometry svg:viewBox="0 0 18 17" draw:type="non-primitive" draw:enhanced-path="M 0 16  L 0 0  L 17 0  L 17 16  L 0 16  N"/>
          </draw:custom-shape>
          <draw:custom-shape draw:style-name="gr118" draw:text-style-name="P46" draw:layer="layout" svg:width="0.032cm" svg:height="0.047cm" svg:x="6.64cm" svg:y="9.739cm">
            <text:p/>
            <draw:enhanced-geometry svg:viewBox="0 0 17 17" draw:type="non-primitive" draw:enhanced-path="M 0 16  L 16 16  L 0 0  L 0 16  N"/>
          </draw:custom-shape>
          <draw:custom-shape draw:style-name="gr122" draw:text-style-name="P59" draw:layer="layout" svg:width="0.079cm" svg:height="0.048cm" svg:x="6.534cm" svg:y="9.579cm">
            <text:p/>
            <draw:enhanced-geometry svg:viewBox="0 0 42 17" draw:type="non-primitive" draw:enhanced-path="M 0 16  L 0 0  L 41 0  L 41 16  L 0 16  N"/>
          </draw:custom-shape>
          <draw:custom-shape draw:style-name="gr122" draw:text-style-name="P59" draw:layer="layout" svg:width="0.032cm" svg:height="0.048cm" svg:x="6.615cm" svg:y="9.59cm">
            <text:p/>
            <draw:enhanced-geometry svg:viewBox="0 0 17 17" draw:type="non-primitive" draw:enhanced-path="M 16 0  L 0 16  L 16 16  L 16 0  L 16 0  N"/>
          </draw:custom-shape>
          <draw:custom-shape draw:style-name="gr122" draw:text-style-name="P59" draw:layer="layout" svg:width="0.032cm" svg:height="0.048cm" svg:x="6.615cm" svg:y="9.638cm">
            <text:p/>
            <draw:enhanced-geometry svg:viewBox="0 0 17 17" draw:type="non-primitive" draw:enhanced-path="M 0 0  L 16 0  L 16 16  L 0 16  L 0 0  N"/>
          </draw:custom-shape>
          <draw:custom-shape draw:style-name="gr117" draw:text-style-name="P56" draw:layer="layout" svg:width="0.077cm" svg:height="0.048cm" svg:x="6.536cm" svg:y="9.644cm">
            <text:p/>
            <draw:enhanced-geometry svg:viewBox="0 0 41 17" draw:type="non-primitive" draw:enhanced-path="M 0 16  L 40 16  L 40 0  L 0 0  L 0 16  N"/>
          </draw:custom-shape>
          <draw:custom-shape draw:style-name="gr118" draw:text-style-name="P46" draw:layer="layout" svg:width="0.032cm" svg:height="0.048cm" svg:x="6.477cm" svg:y="9.616cm">
            <text:p/>
            <draw:enhanced-geometry svg:viewBox="0 0 17 17" draw:type="non-primitive" draw:enhanced-path="M 4 0  L 16 16  L 4 16  L 0 16  L 4 16  L 12 16  L 12 0  L 4 0  N"/>
          </draw:custom-shape>
          <draw:custom-shape draw:style-name="gr118" draw:text-style-name="P46" draw:layer="layout" svg:width="0.032cm" svg:height="0.048cm" svg:x="6.543cm" svg:y="9.916cm">
            <text:p/>
            <draw:enhanced-geometry svg:viewBox="0 0 17 17" draw:type="non-primitive" draw:enhanced-path="M 0 16  L 0 0  L 16 0  L 16 16  L 0 16  N"/>
          </draw:custom-shape>
          <draw:line draw:style-name="gr60" draw:text-style-name="P14" draw:layer="layout" svg:x1="6.708cm" svg:y1="9.856cm" svg:x2="6.708cm" svg:y2="9.907cm">
            <text:p/>
          </draw:line>
          <draw:custom-shape draw:style-name="gr122" draw:text-style-name="P59" draw:layer="layout" svg:width="0.151cm" svg:height="0.048cm" svg:x="6.543cm" svg:y="9.835cm">
            <text:p/>
            <draw:enhanced-geometry svg:viewBox="0 0 80 17" draw:type="non-primitive" draw:enhanced-path="M 0 16  L 0 0  L 79 0  L 79 16  L 0 16  N"/>
          </draw:custom-shape>
          <draw:custom-shape draw:style-name="gr122" draw:text-style-name="P59" draw:layer="layout" svg:width="0.032cm" svg:height="0.06cm" svg:x="6.534cm" svg:y="9.856cm">
            <text:p/>
            <draw:enhanced-geometry svg:viewBox="0 0 17 21" draw:type="non-primitive" draw:enhanced-path="M 16 0  L 16 20  L 0 20  L 0 0  L 16 0  N"/>
          </draw:custom-shape>
          <draw:custom-shape draw:style-name="gr122" draw:text-style-name="P59" draw:layer="layout" svg:width="0.151cm" svg:height="0.048cm" svg:x="6.543cm" svg:y="9.884cm">
            <text:p/>
            <draw:enhanced-geometry svg:viewBox="0 0 80 17" draw:type="non-primitive" draw:enhanced-path="M 0 0  L 0 16  L 79 16  L 79 0  L 0 0  N"/>
          </draw:custom-shape>
          <draw:custom-shape draw:style-name="gr205" draw:text-style-name="P60" draw:layer="layout" svg:width="0.293cm" svg:height="0.057cm" svg:x="6.439cm" svg:y="9.999cm">
            <text:p/>
            <draw:enhanced-geometry svg:viewBox="0 0 155 20" draw:type="non-primitive" draw:enhanced-path="M 0 0  L 0 19  L 154 19  L 154 0  L 0 0  N"/>
          </draw:custom-shape>
          <draw:custom-shape draw:style-name="gr124" draw:text-style-name="P33" draw:layer="layout" svg:width="0.202cm" svg:height="0.048cm" svg:x="6.485cm" svg:y="10.007cm">
            <text:p/>
            <draw:enhanced-geometry svg:viewBox="0 0 107 17" draw:type="non-primitive" draw:enhanced-path="M 1 16  L 104 16  L 105 16  L 105 14  L 106 4  L 105 1  L 104 1  L 1 0  L 0 1  L 0 2  L 0 13  L 0 14  L 1 16  N"/>
          </draw:custom-shape>
          <draw:custom-shape draw:style-name="gr108" draw:text-style-name="P50" draw:layer="layout" svg:width="0.032cm" svg:height="0.048cm" svg:x="6.579cm" svg:y="9.444cm">
            <text:p/>
            <draw:enhanced-geometry svg:viewBox="0 0 17 17" draw:type="non-primitive" draw:enhanced-path="M 8 16  L 0 16  L 0 0  L 16 0  L 8 16  N"/>
          </draw:custom-shape>
          <draw:custom-shape draw:style-name="gr125" draw:text-style-name="P2" draw:layer="layout" svg:width="0.032cm" svg:height="0.048cm" svg:x="6.583cm" svg:y="9.455cm">
            <text:p/>
            <draw:enhanced-geometry svg:viewBox="0 0 17 17" draw:type="non-primitive" draw:enhanced-path="M 12 0  L 16 0  L 16 16  L 0 16  L 12 0  N"/>
          </draw:custom-shape>
          <draw:custom-shape draw:style-name="gr118" draw:text-style-name="P46" draw:layer="layout" svg:width="0.24cm" svg:height="0.051cm" svg:x="6.47cm" svg:y="9.427cm">
            <text:p/>
            <draw:enhanced-geometry svg:viewBox="0 0 127 18" draw:type="non-primitive" draw:enhanced-path="M 9 0  L 118 0  L 119 1  L 121 1  L 123 2  L 124 3  L 125 5  L 126 5  L 126 7  L 126 10  L 126 12  L 125 12  L 124 14  L 123 15  L 121 16  L 119 17  L 118 17  L 116 17  L 9 17  L 7 17  L 6 17  L 3 16  L 2 15  L 0 13  L 0 12  L 0 11  L 0 10  L 0 7  L 0 6  L 0 5  L 0 4  L 1 2  L 3 1  L 6 1  L 9 0  N"/>
          </draw:custom-shape>
          <draw:custom-shape draw:style-name="gr126" draw:text-style-name="P2" draw:layer="layout" svg:width="0.249cm" svg:height="0.068cm" svg:x="6.47cm" svg:y="9.427cm">
            <text:p/>
            <draw:enhanced-geometry svg:viewBox="0 0 132 24" draw:type="non-primitive" draw:enhanced-path="M 9 0  L 123 0  L 124 1  L 125 1  L 128 3  L 129 4  L 130 6  L 131 7  L 131 9  L 131 14  L 131 16  L 130 17  L 129 19  L 128 21  L 125 22  L 124 23  L 123 23  L 9 23  L 7 23  L 6 23  L 4 22  L 2 21  L 0 18  L 0 16  L 0 15  L 0 9  L 0 8  L 0 7  L 0 5  L 1 3  L 4 1  L 6 1  L 9 0  N"/>
          </draw:custom-shape>
          <draw:custom-shape draw:style-name="gr118" draw:text-style-name="P46" draw:layer="layout" svg:width="0.124cm" svg:height="0.048cm" svg:x="6.471cm" svg:y="9.433cm">
            <text:p/>
            <draw:enhanced-geometry svg:viewBox="0 0 66 17" draw:type="non-primitive" draw:enhanced-path="M 10 0  L 54 0  L 56 0  L 59 1  L 61 1  L 62 1  L 64 2  L 64 3  L 65 4  L 65 4  L 65 6  L 65 9  L 65 11  L 64 13  L 63 14  L 61 14  L 59 16  L 55 16  L 54 16  L 10 16  L 8 16  L 6 16  L 4 14  L 2 14  L 1 13  L 0 11  L 0 11  L 0 9  L 0 6  L 0 4  L 0 4  L 0 3  L 0 2  L 1 2  L 2 1  L 3 1  L 6 0  L 10 0  N"/>
          </draw:custom-shape>
          <draw:custom-shape draw:style-name="gr127" draw:text-style-name="P2" draw:layer="layout" svg:width="0.134cm" svg:height="0.057cm" svg:x="6.471cm" svg:y="9.433cm">
            <text:p/>
            <draw:enhanced-geometry svg:viewBox="0 0 71 20" draw:type="non-primitive" draw:enhanced-path="M 10 0  L 59 0  L 61 0  L 63 1  L 65 1  L 67 2  L 69 3  L 69 4  L 70 5  L 70 6  L 70 7  L 70 12  L 70 14  L 69 16  L 68 17  L 65 18  L 63 19  L 60 19  L 10 19  L 8 19  L 7 19  L 5 18  L 2 17  L 1 16  L 0 14  L 0 13  L 0 7  L 0 6  L 0 5  L 0 4  L 0 3  L 1 3  L 2 2  L 4 1  L 10 0  N"/>
          </draw:custom-shape>
          <draw:custom-shape draw:style-name="gr108" draw:text-style-name="P50" draw:layer="layout" svg:width="0.032cm" svg:height="0.048cm" svg:x="6.579cm" svg:y="9.444cm">
            <text:p/>
            <draw:enhanced-geometry svg:viewBox="0 0 17 17" draw:type="non-primitive" draw:enhanced-path="M 8 16  L 0 16  L 0 16  L 0 8  L 8 0  L 8 0  L 8 0  L 16 0  L 16 0  L 16 8  L 16 16  L 8 16  L 8 0  L 16 0  L 8 8  L 8 8  L 8 0  L 8 16  N"/>
          </draw:custom-shape>
          <draw:custom-shape draw:style-name="gr128" draw:text-style-name="P61" draw:layer="layout" svg:width="0.1cm" svg:height="0.048cm" svg:x="6.481cm" svg:y="9.45cm">
            <text:p/>
            <draw:enhanced-geometry svg:viewBox="0 0 53 17" draw:type="non-primitive" draw:enhanced-path="M 0 16  L 52 16  L 51 0  L 0 0  L 0 16  N"/>
          </draw:custom-shape>
          <draw:custom-shape draw:style-name="gr108" draw:text-style-name="P50" draw:layer="layout" svg:width="0.001cm" svg:height="0.048cm" svg:x="6.57cm" svg:y="9.444cm">
            <text:p/>
            <draw:enhanced-geometry svg:viewBox="0 0 1 17" draw:type="non-primitive" draw:enhanced-path="M 0 0  L 0 16  L 0 16  L 0 0  L 0 0  L 0 0  L 0 0  L 0 8  L 0 8  L 0 0  L 0 0  N"/>
          </draw:custom-shape>
          <draw:custom-shape draw:style-name="gr108" draw:text-style-name="P50" draw:layer="layout" svg:width="0.032cm" svg:height="0.048cm" svg:x="6.564cm" svg:y="9.444cm">
            <text:p/>
            <draw:enhanced-geometry svg:viewBox="0 0 17 17" draw:type="non-primitive" draw:enhanced-path="M 16 0  L 16 8  L 0 16  L 0 16  L 0 8  L 0 8  L 0 8  L 0 0  L 0 0  L 16 0  L 0 8  L 0 8  L 0 8  L 16 0  L 16 0  N"/>
          </draw:custom-shape>
          <draw:custom-shape draw:style-name="gr108" draw:text-style-name="P50" draw:layer="layout" svg:width="0.002cm" svg:height="0.048cm" svg:x="6.555cm" svg:y="9.444cm">
            <text:p/>
            <draw:enhanced-geometry svg:viewBox="0 0 1 17" draw:type="non-primitive" draw:enhanced-path="M 0 0  L 0 8  L 0 16  L 0 16  L 0 16  L 0 8  L 0 0  L 0 0  L 0 8  L 0 8  L 0 0  L 0 0  L 0 8  L 0 8  L 0 0  L 0 0  N"/>
          </draw:custom-shape>
          <draw:custom-shape draw:style-name="gr108" draw:text-style-name="P50" draw:layer="layout" svg:width="0.032cm" svg:height="0.048cm" svg:x="6.545cm" svg:y="9.444cm">
            <text:p/>
            <draw:enhanced-geometry svg:viewBox="0 0 17 17" draw:type="non-primitive" draw:enhanced-path="M 8 16  L 0 16  L 0 16  L 0 8  L 0 0  L 8 0  L 8 0  L 16 0  L 16 0  L 16 0  L 16 8  L 8 16  L 8 0  L 16 0  L 8 8  L 0 8  L 8 0  L 8 16  N"/>
          </draw:custom-shape>
          <draw:custom-shape draw:style-name="gr108" draw:text-style-name="P50" draw:layer="layout" svg:width="0.032cm" svg:height="0.048cm" svg:x="6.536cm" svg:y="9.444cm">
            <text:p/>
            <draw:enhanced-geometry svg:viewBox="0 0 17 17" draw:type="non-primitive" draw:enhanced-path="M 0 16  L 0 16  L 16 16  L 16 8  L 16 0  L 16 0  L 16 0  L 0 0  L 0 0  L 16 0  L 0 8  L 0 8  L 0 16  N"/>
          </draw:custom-shape>
          <draw:custom-shape draw:style-name="gr119" draw:text-style-name="P57" draw:layer="layout" svg:width="0.001cm" svg:height="0.048cm" svg:x="6.655cm" svg:y="9.433cm">
            <text:p/>
            <draw:enhanced-geometry svg:viewBox="0 0 1 17" draw:type="non-primitive" draw:enhanced-path="M 0 0  L 0 0  L 0 2  L 0 13  L 0 14  L 0 16  L 0 14  L 0 12  L 0 3  L 0 1  L 0 1  L 0 0  N"/>
          </draw:custom-shape>
          <draw:custom-shape draw:style-name="gr113" draw:text-style-name="P49" draw:layer="layout" svg:width="0.034cm" svg:height="0.048cm" svg:x="6.66cm" svg:y="9.429cm">
            <text:p/>
            <draw:enhanced-geometry svg:viewBox="0 0 18 17" draw:type="non-primitive" draw:enhanced-path="M 2 16  L 14 16  L 15 16  L 15 14  L 16 14  L 16 13  L 17 13  L 17 12  L 17 11  L 17 4  L 17 4  L 16 2  L 16 1  L 15 1  L 14 0  L 2 0  L 1 1  L 0 1  L 0 2  L 0 4  L 0 4  L 0 11  L 0 12  L 0 13  L 0 13  L 0 14  L 1 14  L 2 16  N"/>
          </draw:custom-shape>
          <draw:custom-shape draw:style-name="gr122" draw:text-style-name="P59" draw:layer="layout" svg:width="0.034cm" svg:height="0.048cm" svg:x="6.66cm" svg:y="9.433cm">
            <text:p/>
            <draw:enhanced-geometry svg:viewBox="0 0 18 17" draw:type="non-primitive" draw:enhanced-path="M 1 0  L 0 1  L 0 14  L 0 16  L 16 16  L 17 14  L 17 1  L 16 0  L 1 0  N"/>
          </draw:custom-shape>
          <draw:custom-shape draw:style-name="gr103" draw:text-style-name="P48" draw:layer="layout" svg:width="0.032cm" svg:height="0.048cm" svg:x="6.663cm" svg:y="9.433cm">
            <text:p/>
            <draw:enhanced-geometry svg:viewBox="0 0 17 17" draw:type="non-primitive" draw:enhanced-path="M 1 0  L 0 1  L 0 13  L 0 16  L 15 16  L 16 13  L 16 2  L 15 0  L 1 0  N"/>
          </draw:custom-shape>
          <draw:custom-shape draw:style-name="gr108" draw:text-style-name="P50" draw:layer="layout" svg:width="0.032cm" svg:height="0.048cm" svg:x="6.67cm" svg:y="9.438cm">
            <text:p/>
            <draw:enhanced-geometry svg:viewBox="0 0 17 17" draw:type="non-primitive" draw:enhanced-path="M 1 0  L 0 0  L 0 16  L 1 16  L 14 16  L 16 16  L 16 2  L 14 0  L 1 0  N"/>
          </draw:custom-shape>
          <draw:custom-shape draw:style-name="gr125" draw:text-style-name="P2" draw:layer="layout" svg:width="0.032cm" svg:height="0.048cm" svg:x="6.675cm" svg:y="9.45cm">
            <text:p/>
            <draw:enhanced-geometry svg:viewBox="0 0 17 17" draw:type="non-primitive" draw:enhanced-path="M 8 0  L 8 3  L 12 3  L 16 6  L 16 9  L 12 12  L 8 16  L 4 16  L 0 12  L 0 9  L 0 6  L 0 3  L 4 3  L 8 0  N"/>
          </draw:custom-shape>
          <draw:line draw:style-name="gr7" draw:text-style-name="P14" draw:layer="layout" svg:x1="6.693cm" svg:y1="9.45cm" svg:x2="6.693cm" svg:y2="9.464cm">
            <text:p/>
          </draw:line>
          <draw:custom-shape draw:style-name="gr103" draw:text-style-name="P48" draw:layer="layout" svg:width="0.108cm" svg:height="0.048cm" svg:x="6.587cm" svg:y="9.415cm">
            <text:p/>
            <draw:enhanced-geometry svg:viewBox="0 0 57 17" draw:type="non-primitive" draw:enhanced-path="M 0 16  L 56 16  L 56 0  L 0 0  L 0 16  N"/>
          </draw:custom-shape>
          <draw:custom-shape draw:style-name="gr103" draw:text-style-name="P48" draw:layer="layout" svg:width="0.032cm" svg:height="0.002cm" svg:x="6.587cm" svg:y="9.476cm">
            <text:p/>
            <draw:enhanced-geometry svg:viewBox="0 0 17 1" draw:type="non-primitive" draw:enhanced-path="M 0 0  L 0 0  L 8 0  L 8 0  L 8 0  L 16 0  L 16 0  L 16 0  L 8 0  L 8 0  L 0 0  N"/>
          </draw:custom-shape>
          <draw:custom-shape draw:style-name="gr103" draw:text-style-name="P48" draw:layer="layout" svg:width="0.032cm" svg:height="0.048cm" svg:x="6.7cm" svg:y="9.427cm">
            <text:p/>
            <draw:enhanced-geometry svg:viewBox="0 0 17 17" draw:type="non-primitive" draw:enhanced-path="M 8 16  L 12 14  L 12 14  L 16 12  L 16 11  L 16 8  L 16 5  L 16 5  L 12 3  L 12 2  L 8 1  L 4 1  L 0 0  L 0 2  L 4 2  L 8 3  L 12 5  L 12 5  L 12 7  L 12 8  L 12 10  L 12 11  L 12 12  L 12 14  L 8 16  N"/>
          </draw:custom-shape>
          <draw:custom-shape draw:style-name="gr108" draw:text-style-name="P50" draw:layer="layout" svg:width="0.034cm" svg:height="0.048cm" svg:x="6.609cm" svg:y="9.429cm">
            <text:p/>
            <draw:enhanced-geometry svg:viewBox="0 0 18 17" draw:type="non-primitive" draw:enhanced-path="M 8 0  L 12 0  L 14 1  L 15 1  L 16 3  L 16 4  L 17 6  L 17 6  L 17 9  L 17 11  L 16 12  L 16 13  L 15 14  L 14 16  L 13 16  L 12 16  L 0 16  L 8 0  N"/>
          </draw:custom-shape>
          <draw:custom-shape draw:style-name="gr110" draw:text-style-name="P52" draw:layer="layout" svg:width="0.001cm" svg:height="0.048cm" svg:x="6.63cm" svg:y="9.415cm">
            <text:p/>
            <draw:enhanced-geometry svg:viewBox="0 0 1 17" draw:type="non-primitive" draw:enhanced-path="M 0 16  L 0 16  L 0 0  L 0 16  N"/>
          </draw:custom-shape>
          <draw:custom-shape draw:style-name="gr110" draw:text-style-name="P52" draw:layer="layout" svg:width="0.002cm" svg:height="0.048cm" svg:x="6.642cm" svg:y="9.429cm">
            <text:p/>
            <draw:enhanced-geometry svg:viewBox="0 0 1 17" draw:type="non-primitive" draw:enhanced-path="M 0 16  L 0 16  L 0 10  L 0 5  L 0 5  L 0 5  L 0 0  L 0 0  L 0 0  L 0 0  L 0 0  L 0 0  L 0 0  L 0 5  L 0 5  L 0 5  L 0 5  L 0 10  L 0 10  L 0 16  L 0 16  L 0 16  N"/>
          </draw:custom-shape>
          <draw:custom-shape draw:style-name="gr110" draw:text-style-name="P52" draw:layer="layout" svg:width="0.032cm" svg:height="0.048cm" svg:x="6.642cm" svg:y="9.447cm">
            <text:p/>
            <draw:enhanced-geometry svg:viewBox="0 0 17 17" draw:type="non-primitive" draw:enhanced-path="M 0 0  L 0 16  L 16 16  L 16 0  L 0 0  N"/>
          </draw:custom-shape>
          <draw:custom-shape draw:style-name="gr110" draw:text-style-name="P52" draw:layer="layout" svg:width="0.002cm" svg:height="0.048cm" svg:x="6.642cm" svg:y="9.464cm">
            <text:p/>
            <draw:enhanced-geometry svg:viewBox="0 0 1 17" draw:type="non-primitive" draw:enhanced-path="M 0 16  L 0 16  L 0 16  L 0 16  L 0 16  L 0 12  L 0 12  L 0 8  L 0 8  L 0 0  L 0 0  L 0 0  L 0 0  L 0 4  L 0 8  L 0 8  L 0 12  L 0 12  L 0 12  L 0 12  L 0 16  L 0 16  L 0 16  L 0 16  N"/>
          </draw:custom-shape>
          <draw:custom-shape draw:style-name="gr110" draw:text-style-name="P52" draw:layer="layout" svg:width="0.001cm" svg:height="0.048cm" svg:x="6.63cm" svg:y="9.476cm">
            <text:p/>
            <draw:enhanced-geometry svg:viewBox="0 0 1 17" draw:type="non-primitive" draw:enhanced-path="M 0 0  L 0 0  L 0 16  L 0 16  L 0 0  N"/>
          </draw:custom-shape>
          <draw:custom-shape draw:style-name="gr110" draw:text-style-name="P52" draw:layer="layout" svg:width="0.032cm" svg:height="0.048cm" svg:x="6.609cm" svg:y="9.476cm">
            <text:p/>
            <draw:enhanced-geometry svg:viewBox="0 0 17 17" draw:type="non-primitive" draw:enhanced-path="M 0 16  L 0 0  L 16 0  L 16 16  L 0 16  L 2 16  L 0 16  L 0 0  L 0 16  N"/>
          </draw:custom-shape>
          <draw:custom-shape draw:style-name="gr110" draw:text-style-name="P52" draw:layer="layout" svg:width="0.032cm" svg:height="0.048cm" svg:x="6.598cm" svg:y="9.429cm">
            <text:p/>
            <draw:enhanced-geometry svg:viewBox="0 0 17 17" draw:type="non-primitive" draw:enhanced-path="M 8 0  L 16 0  L 8 16  L 0 16  L 8 0  L 8 1  L 8 0  L 16 0  L 8 0  N"/>
          </draw:custom-shape>
          <draw:custom-shape draw:style-name="gr110" draw:text-style-name="P52" draw:layer="layout" svg:width="0.032cm" svg:height="0.048cm" svg:x="6.609cm" svg:y="9.415cm">
            <text:p/>
            <draw:enhanced-geometry svg:viewBox="0 0 17 17" draw:type="non-primitive" draw:enhanced-path="M 16 16  L 0 16  L 16 0  L 16 16  N"/>
          </draw:custom-shape>
          <draw:custom-shape draw:style-name="gr117" draw:text-style-name="P56" draw:layer="layout" svg:width="0.032cm" svg:height="0.048cm" svg:x="6.624cm" svg:y="9.438cm">
            <text:p/>
            <draw:enhanced-geometry svg:viewBox="0 0 17 17" draw:type="non-primitive" draw:enhanced-path="M 9 0  L 0 14  L 0 16  L 6 16  L 6 14  L 16 0  L 9 0  N"/>
          </draw:custom-shape>
          <draw:custom-shape draw:style-name="gr117" draw:text-style-name="P56" draw:layer="layout" svg:width="0.032cm" svg:height="0.048cm" svg:x="6.634cm" svg:y="9.438cm">
            <text:p/>
            <draw:enhanced-geometry svg:viewBox="0 0 17 17" draw:type="non-primitive" draw:enhanced-path="M 12 0  L 0 14  L 0 16  L 8 16  L 8 14  L 16 5  L 16 4  L 16 2  L 16 1  L 12 0  N"/>
          </draw:custom-shape>
          <draw:custom-shape draw:style-name="gr129" draw:text-style-name="P2" draw:layer="layout" svg:width="0.032cm" svg:height="0.048cm" svg:x="6.64cm" svg:y="9.464cm">
            <text:p/>
            <draw:enhanced-geometry svg:viewBox="0 0 17 17" draw:type="non-primitive" draw:enhanced-path="M 16 0  L 16 4  L 16 6  L 14 10  L 10 14  L 6 16  L 0 16  N"/>
          </draw:custom-shape>
          <draw:custom-shape draw:style-name="gr129" draw:text-style-name="P2" draw:layer="layout" svg:width="0.037cm" svg:height="0.048cm" svg:x="6.612cm" svg:y="9.433cm">
            <text:p/>
            <draw:enhanced-geometry svg:viewBox="0 0 20 17" draw:type="non-primitive" draw:enhanced-path="M 0 0  L 14 0  L 16 0  L 19 16  N"/>
          </draw:custom-shape>
          <draw:custom-shape draw:style-name="gr122" draw:text-style-name="P59" draw:layer="layout" svg:width="0.031cm" svg:height="0.048cm" svg:x="6.602cm" svg:y="9.438cm">
            <text:p/>
            <draw:enhanced-geometry svg:viewBox="0 0 17 17" draw:type="non-primitive" draw:enhanced-path="M 6 0  L 0 1  L 0 8  L 0 14  L 6 16  L 16 11  L 16 8  L 16 1  L 6 1  L 6 0  N"/>
          </draw:custom-shape>
          <draw:custom-shape draw:style-name="gr117" draw:text-style-name="P56" draw:layer="layout" svg:width="0.032cm" svg:height="0.048cm" svg:x="6.609cm" svg:y="9.438cm">
            <text:p/>
            <draw:enhanced-geometry svg:viewBox="0 0 17 17" draw:type="non-primitive" draw:enhanced-path="M 9 0  L 0 13  L 2 16  L 9 16  L 9 14  L 16 0  L 9 0  N"/>
          </draw:custom-shape>
        </draw:g>
        <draw:custom-shape draw:style-name="gr174" draw:text-style-name="P38" draw:layer="layout" svg:width="0.512cm" svg:height="1.019cm" svg:x="6.178cm" svg:y="14.023cm">
          <text:list text:style-name="L3">
            <text:list-header>
              <text:p text:style-name="P1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64" draw:layer="layout" svg:width="0.511cm" svg:height="1.019cm" svg:x="8.176cm" svg:y="6.332cm">
          <text:list text:style-name="L3">
            <text:list-header>
              <text:p text:style-name="P63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The infrastructure issues with n-tier platforms are immense:</text:span></text:p>
                  <text:p text:style-name="P4"><text:span text:style-name="T3"><text:tab/></text:span><text:span text:style-name="T3">- Unix and NT</text:span></text:p>
                  <text:p text:style-name="P4"><text:span text:style-name="T3"><text:tab/></text:span><text:span text:style-name="T3">- Gobs of middleware</text:span></text:p>
                  <text:p text:style-name="P4"><text:span text:style-name="T3"><text:tab/></text:span><text:span text:style-name="T3">- systems management and operations</text:span></text:p>
                  <text:p text:style-name="P4"><text:span text:style-name="T3"><text:tab/></text:span><text:span text:style-name="T3">- distributed databases</text:span></text:p>
                  <text:p text:style-name="P4"><text:span text:style-name="T3"><text:tab/></text:span><text:span text:style-name="T3">- distributed applications</text:span></text:p>
                  <text:p text:style-name="P4"><text:span text:style-name="T3"><text:tab/></text:span><text:span text:style-name="T3">- etc.</text:span></text:p>
                  <text:p text:style-name="P4"><text:span text:style-name="T3">The concerns about reliability, operability, and manageability are well founded.</text:span></text:p>
                  <text:p text:style-name="P4"><text:span text:style-name="T3"/></text:p>
                  <text:p text:style-name="P4"><text:span text:style-name="T3">Nevertheless, this diagram is the architecture of an SAP R/3 implementation that could be Intel, Cisco or Microsoft.</text:span></text:p>
                  <text:p text:style-name="P4"><text:span text:style-name="T3"/></text:p>
                </text:list-header>
              </text:list>
            </draw:text-box>
          </draw:frame>
        </presentation:notes>
      </draw:page>
      <draw:page draw:name="Geographically Distributed Enterprise" draw:style-name="dp1" draw:master-page-name="Default" presentation:presentation-page-layout-name="AL2T1" xml:id="id11" draw:id="id11">
        <draw:custom-shape draw:style-name="gr215" draw:text-style-name="P66" draw:layer="layout" svg:width="23.918cm" svg:height="9.737cm" svg:x="0.635cm" svg:y="6.9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Geographically Distributed Enterprise</text:p>
              </text:list-header>
            </text:list>
          </draw:text-box>
        </draw:frame>
        <draw:custom-shape draw:style-name="gr216" draw:text-style-name="P68" draw:layer="layout" svg:width="6.115cm" svg:height="1.475cm" svg:x="0.869cm" svg:y="4.41cm">
          <text:list text:style-name="L5">
            <text:list-header>
              <text:p text:style-name="P67"><text:span text:style-name="T39">Enterprise OLTP</text:span></text:p>
              <text:p text:style-name="P67"><text:span text:style-name="T39">Mainframe Gateway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4">
          <draw:custom-shape draw:style-name="gr217" draw:text-style-name="P69" draw:layer="layout" svg:width="3.616cm" svg:height="1.676cm" svg:x="0.741cm" svg:y="7.536cm">
            <text:p/>
            <draw:enhanced-geometry svg:viewBox="0 0 21600 21600" draw:type="rectangle" draw:enhanced-path="M 0 0 L 21600 0 21600 21600 0 21600 0 0 Z N"/>
          </draw:custom-shape>
          <draw:custom-shape draw:style-name="gr218" draw:text-style-name="P68" draw:layer="layout" svg:width="4.357cm" svg:height="1.475cm" svg:x="0.622cm" svg:y="7.62cm">
            <text:list text:style-name="L17">
              <text:list-header>
                <text:p text:style-name="P67"><text:span text:style-name="T40">Distributed Enterprise 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19" draw:text-style-name="P2" draw:layer="layout" svg:width="0.304cm" svg:height="1.746cm" svg:x="12.691cm" svg:y="6.769cm">
          <text:p/>
          <draw:enhanced-geometry svg:viewBox="0 0 69 396" draw:type="non-primitive" draw:enhanced-path="M 47 0  L 0 193  L 68 144  L 0 395  N"/>
        </draw:custom-shape>
        <draw:custom-shape draw:style-name="gr220" draw:text-style-name="P2" draw:layer="layout" svg:width="4.221cm" svg:height="2.531cm" svg:x="14.34cm" svg:y="5.997cm">
          <text:p/>
          <draw:enhanced-geometry svg:viewBox="0 0 957 574" draw:type="non-primitive" draw:enhanced-path="M 0 0  L 442 336  L 391 182  L 956 573  N"/>
        </draw:custom-shape>
        <draw:g draw:style-name="gr4">
          <draw:custom-shape draw:style-name="gr221" draw:text-style-name="P70" draw:layer="layout" svg:width="0.494cm" svg:height="0.507cm" svg:x="5.19cm" svg:y="11.946cm">
            <text:p/>
            <draw:enhanced-geometry svg:viewBox="0 0 112 115" draw:type="non-primitive" draw:enhanced-path="M 0 0  L 0 50  L 111 114  L 111 61  L 0 0  N"/>
          </draw:custom-shape>
          <draw:custom-shape draw:style-name="gr222" draw:text-style-name="P71" draw:layer="layout" svg:width="0.71cm" svg:height="0.701cm" svg:x="5.675cm" svg:y="11.752cm">
            <text:p/>
            <draw:enhanced-geometry svg:viewBox="0 0 161 159" draw:type="non-primitive" draw:enhanced-path="M 2 158  L 160 54  L 160 0  L 0 108  L 2 158  N"/>
          </draw:custom-shape>
          <draw:custom-shape draw:style-name="gr223" draw:text-style-name="P13" draw:layer="layout" svg:width="1.217cm" svg:height="0.732cm" svg:x="5.19cm" svg:y="11.514cm">
            <text:p/>
            <draw:enhanced-geometry svg:viewBox="0 0 276 166" draw:type="non-primitive" draw:enhanced-path="M 0 97  L 162 0  L 275 61  L 111 165  L 0 97  N"/>
          </draw:custom-shape>
          <draw:custom-shape draw:style-name="gr224" draw:text-style-name="P72" draw:layer="layout" svg:width="1.107cm" svg:height="0.683cm" svg:x="5.199cm" svg:y="10.923cm">
            <text:p/>
            <draw:enhanced-geometry svg:viewBox="0 0 251 155" draw:type="non-primitive" draw:enhanced-path="M 0 76  L 51 105  L 36 116  L 102 154  L 250 50  L 190 20  L 177 27  L 119 0  L 0 76  N"/>
          </draw:custom-shape>
          <draw:custom-shape draw:style-name="gr225" draw:text-style-name="P70" draw:layer="layout" svg:width="0.503cm" svg:height="0.834cm" svg:x="5.199cm" svg:y="11.24cm">
            <text:p/>
            <draw:enhanced-geometry svg:viewBox="0 0 114 189" draw:type="non-primitive" draw:enhanced-path="M 2 0  L 0 89  L 39 134  L 39 146  L 111 188  L 113 76  L 43 46  L 54 35  L 2 0  N"/>
          </draw:custom-shape>
          <draw:custom-shape draw:style-name="gr226" draw:text-style-name="P71" draw:layer="layout" svg:width="0.621cm" svg:height="0.922cm" svg:x="5.689cm" svg:y="11.152cm">
            <text:p/>
            <draw:enhanced-geometry svg:viewBox="0 0 141 209" draw:type="non-primitive" draw:enhanced-path="M 140 0  L 140 113  L 0 208  L 0 97  L 140 0  N"/>
          </draw:custom-shape>
          <draw:custom-shape draw:style-name="gr227" draw:text-style-name="P73" draw:layer="layout" svg:width="0.463cm" svg:height="0.666cm" svg:x="5.764cm" svg:y="11.258cm">
            <text:p/>
            <draw:enhanced-geometry svg:viewBox="0 0 105 151" draw:type="non-primitive" draw:enhanced-path="M 104 0  L 104 82  L 0 150  L 0 76  L 104 0  N"/>
          </draw:custom-shape>
          <draw:custom-shape draw:style-name="gr228" draw:text-style-name="P2" draw:layer="layout" svg:width="0.45cm" svg:height="0.653cm" svg:x="5.777cm" svg:y="11.271cm">
            <text:p/>
            <draw:enhanced-geometry svg:viewBox="0 0 102 148" draw:type="non-primitive" draw:enhanced-path="M 101 0  L 101 82  L 0 147  N"/>
          </draw:custom-shape>
          <draw:custom-shape draw:style-name="gr229" draw:text-style-name="P71" draw:layer="layout" svg:width="0.957cm" svg:height="0.64cm" svg:x="5.737cm" svg:y="11.994cm">
            <text:p/>
            <draw:enhanced-geometry svg:viewBox="0 0 217 145" draw:type="non-primitive" draw:enhanced-path="M 64 144  L 216 38  L 160 0  L 0 106  L 64 144  N"/>
          </draw:custom-shape>
          <draw:custom-shape draw:style-name="gr230" draw:text-style-name="P74" draw:layer="layout" svg:width="0.957cm" svg:height="0.679cm" svg:x="5.733cm" svg:y="11.933cm">
            <text:p/>
            <draw:enhanced-geometry svg:viewBox="0 0 217 154" draw:type="non-primitive" draw:enhanced-path="M 64 153  L 216 48  L 160 0  L 0 107  L 64 153  N"/>
          </draw:custom-shape>
          <draw:custom-shape draw:style-name="gr231" draw:text-style-name="P70" draw:layer="layout" svg:width="0.282cm" svg:height="0.238cm" svg:x="5.737cm" svg:y="12.405cm">
            <text:p/>
            <draw:enhanced-geometry svg:viewBox="0 0 64 54" draw:type="non-primitive" draw:enhanced-path="M 0 0  L 0 14  L 63 53  L 63 45  L 0 0  N"/>
          </draw:custom-shape>
          <draw:line draw:style-name="gr232" draw:text-style-name="P14" draw:layer="layout" svg:x1="5.799cm" svg:y1="12.404cm" svg:x2="6.46cm" svg:y2="11.967cm">
            <text:p/>
          </draw:line>
          <draw:custom-shape draw:style-name="gr233" draw:text-style-name="P70" draw:layer="layout" svg:width="0.639cm" svg:height="0.454cm" svg:x="5.852cm" svg:y="12.1cm">
            <text:p/>
            <draw:enhanced-geometry svg:viewBox="0 0 145 103" draw:type="non-primitive" draw:enhanced-path="M 0 76  L 36 102  L 144 25  L 112 0  L 0 76  N"/>
          </draw:custom-shape>
          <draw:custom-shape draw:style-name="gr231" draw:text-style-name="P70" draw:layer="layout" svg:width="0.239cm" svg:height="0.177cm" svg:x="6.376cm" svg:y="12.016cm">
            <text:p/>
            <draw:enhanced-geometry svg:viewBox="0 0 54 40" draw:type="non-primitive" draw:enhanced-path="M 0 16  L 33 39  L 53 24  L 21 0  L 0 16  N"/>
          </draw:custom-shape>
          <draw:custom-shape draw:style-name="gr234" draw:text-style-name="P13" draw:layer="layout" svg:width="0.639cm" svg:height="0.463cm" svg:x="5.852cm" svg:y="12.074cm">
            <text:p/>
            <draw:enhanced-geometry svg:viewBox="0 0 145 105" draw:type="non-primitive" draw:enhanced-path="M 0 78  L 36 104  L 144 26  L 112 0  L 0 78  N"/>
          </draw:custom-shape>
          <draw:custom-shape draw:style-name="gr235" draw:text-style-name="P13" draw:layer="layout" svg:width="0.239cm" svg:height="0.186cm" svg:x="6.376cm" svg:y="11.994cm">
            <text:p/>
            <draw:enhanced-geometry svg:viewBox="0 0 54 42" draw:type="non-primitive" draw:enhanced-path="M 0 17  L 33 41  L 53 25  L 21 0  L 0 17  N"/>
          </draw:custom-shape>
        </draw:g>
        <draw:line draw:style-name="gr236" draw:text-style-name="P14" draw:layer="layout" svg:x1="7.594cm" svg:y1="10.12cm" svg:x2="7.594cm" svg:y2="10.667cm">
          <text:p/>
        </draw:line>
        <draw:custom-shape draw:style-name="gr237" draw:text-style-name="P2" draw:layer="layout" svg:width="4.913cm" svg:height="2.394cm" svg:x="7.783cm" svg:y="6.262cm">
          <text:p/>
          <draw:enhanced-geometry svg:viewBox="0 0 1114 543" draw:type="non-primitive" draw:enhanced-path="M 1113 0  L 561 333  L 617 198  L 0 542  N"/>
        </draw:custom-shape>
        <draw:line draw:style-name="gr236" draw:text-style-name="P14" draw:layer="layout" svg:x1="5.741cm" svg:y1="10.654cm" svg:x2="5.741cm" svg:y2="11.187cm">
          <text:p/>
        </draw:line>
        <draw:line draw:style-name="gr236" draw:text-style-name="P14" draw:layer="layout" svg:x1="5.159cm" svg:y1="10.654cm" svg:x2="9.569cm" svg:y2="10.654cm">
          <text:p/>
        </draw:line>
        <draw:g draw:style-name="gr4">
          <draw:custom-shape draw:style-name="gr238" draw:text-style-name="P75" draw:layer="layout" svg:width="0.913cm" svg:height="0.005cm" svg:x="7.122cm" svg:y="7.999cm">
            <text:p/>
            <draw:enhanced-geometry svg:viewBox="0 0 21600 21600" draw:type="rectangle" draw:enhanced-path="M 0 0 L 21600 0 21600 21600 0 21600 0 0 Z N"/>
          </draw:custom-shape>
          <draw:custom-shape draw:style-name="gr239" draw:text-style-name="P76" draw:layer="layout" svg:width="0.913cm" svg:height="0.001cm" svg:x="7.122cm" svg:y="9.878cm">
            <text:p/>
            <draw:enhanced-geometry svg:viewBox="0 0 21600 21600" draw:type="rectangle" draw:enhanced-path="M 0 0 L 21600 0 21600 21600 0 21600 0 0 Z N"/>
          </draw:custom-shape>
          <draw:custom-shape draw:style-name="gr239" draw:text-style-name="P76" draw:layer="layout" svg:width="0.913cm" svg:height="0.009cm" svg:x="7.122cm" svg:y="9.891cm">
            <text:p/>
            <draw:enhanced-geometry svg:viewBox="0 0 21600 21600" draw:type="rectangle" draw:enhanced-path="M 0 0 L 21600 0 21600 21600 0 21600 0 0 Z N"/>
          </draw:custom-shape>
          <draw:custom-shape draw:style-name="gr240" draw:text-style-name="P77" draw:layer="layout" svg:width="0.913cm" svg:height="0.001cm" svg:x="7.122cm" svg:y="9.922cm">
            <text:p/>
            <draw:enhanced-geometry svg:viewBox="0 0 21600 21600" draw:type="rectangle" draw:enhanced-path="M 0 0 L 21600 0 21600 21600 0 21600 0 0 Z N"/>
          </draw:custom-shape>
          <draw:custom-shape draw:style-name="gr241" draw:text-style-name="P78" draw:layer="layout" svg:width="0.913cm" svg:height="0.004cm" svg:x="7.122cm" svg:y="9.931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16" draw:layer="layout" svg:width="0.913cm" svg:height="0.001cm" svg:x="7.122cm" svg:y="9.948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16" draw:layer="layout" svg:width="0.913cm" svg:height="0.005cm" svg:x="7.122cm" svg:y="9.97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79" draw:layer="layout" svg:width="0.878cm" svg:height="1.953cm" svg:x="7.139cm" svg:y="8.017cm">
            <text:p/>
            <draw:enhanced-geometry svg:viewBox="0 0 21600 21600" draw:type="rectangle" draw:enhanced-path="M 0 0 L 21600 0 21600 21600 0 21600 0 0 Z N"/>
          </draw:custom-shape>
          <draw:custom-shape draw:style-name="gr244" draw:text-style-name="P35" draw:layer="layout" svg:width="1.129cm" svg:height="0.15cm" svg:x="7.011cm" svg:y="9.98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7.131cm" svg:y1="8.868cm" svg:x2="8.035cm" svg:y2="8.868cm">
            <text:p/>
          </draw:line>
          <draw:custom-shape draw:style-name="gr245" draw:text-style-name="P80" draw:layer="layout" svg:width="0.683cm" svg:height="0.088cm" svg:x="7.228cm" svg:y="8.886cm">
            <text:p/>
            <draw:enhanced-geometry svg:viewBox="0 0 21600 21600" draw:type="rectangle" draw:enhanced-path="M 0 0 L 21600 0 21600 21600 0 21600 0 0 Z N"/>
          </draw:custom-shape>
          <draw:custom-shape draw:style-name="gr246" draw:text-style-name="P81" draw:layer="layout" svg:width="0.683cm" svg:height="0.001cm" svg:x="7.228cm" svg:y="9.878cm">
            <text:p/>
            <draw:enhanced-geometry svg:viewBox="0 0 21600 21600" draw:type="rectangle" draw:enhanced-path="M 0 0 L 21600 0 21600 21600 0 21600 0 0 Z N"/>
          </draw:custom-shape>
          <draw:custom-shape draw:style-name="gr247" draw:text-style-name="P34" draw:layer="layout" svg:width="0.683cm" svg:height="0.009cm" svg:x="7.228cm" svg:y="9.891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16" draw:layer="layout" svg:width="0.683cm" svg:height="0.001cm" svg:x="7.228cm" svg:y="9.922cm">
            <text:p/>
            <draw:enhanced-geometry svg:viewBox="0 0 21600 21600" draw:type="rectangle" draw:enhanced-path="M 0 0 L 21600 0 21600 21600 0 21600 0 0 Z N"/>
          </draw:custom-shape>
          <draw:line draw:style-name="gr249" draw:text-style-name="P14" draw:layer="layout" svg:x1="7.131cm" svg:y1="8.008cm" svg:x2="7.131cm" svg:y2="9.975cm">
            <text:p/>
          </draw:line>
          <draw:custom-shape draw:style-name="gr250" draw:text-style-name="P80" draw:layer="layout" svg:width="0.031cm" svg:height="0.039cm" svg:x="7.157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9cm" svg:x="7.258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6cm" svg:height="0.039cm" svg:x="7.386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9cm" svg:x="7.505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8cm" svg:height="0.039cm" svg:x="7.638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61cm" svg:height="0.039cm" svg:x="7.735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9cm" svg:x="7.871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8cm" svg:x="7.333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8cm" svg:x="7.457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6cm" svg:height="0.048cm" svg:x="7.58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8cm" svg:x="7.695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8cm" svg:x="7.823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8cm" svg:x="7.942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36cm" svg:x="7.157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6cm" svg:x="7.258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6cm" svg:height="0.036cm" svg:x="7.386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6cm" svg:x="7.505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8cm" svg:height="0.036cm" svg:x="7.638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61cm" svg:height="0.036cm" svg:x="7.735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6cm" svg:x="7.871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cm" svg:height="0.031cm" svg:x="7.228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7.333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7.457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6cm" svg:height="0.031cm" svg:x="7.58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7.695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31cm" svg:x="7.823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7.942cm" svg:y="8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82" draw:layer="layout" svg:width="0.075cm" svg:height="0.075cm" svg:x="7.205cm" svg:y="8.154cm">
            <text:p/>
            <draw:enhanced-geometry svg:viewBox="0 0 17 17" draw:type="non-primitive" draw:enhanced-path="M 5 0  L 0 0  L 5 16  L 16 0  L 5 0  N"/>
          </draw:custom-shape>
          <draw:custom-shape draw:style-name="gr251" draw:text-style-name="P82" draw:layer="layout" svg:width="0.075cm" svg:height="0.075cm" svg:x="7.205cm" svg:y="8.105cm">
            <text:p/>
            <draw:enhanced-geometry svg:viewBox="0 0 17 17" draw:type="non-primitive" draw:enhanced-path="M 5 16  L 0 16  L 5 0  L 16 16  L 5 16  N"/>
          </draw:custom-shape>
          <draw:custom-shape draw:style-name="gr245" draw:text-style-name="P80" draw:layer="layout" svg:width="0.683cm" svg:height="0.093cm" svg:x="7.228cm" svg:y="9.115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0.683cm" svg:height="0.102cm" svg:x="7.228cm" svg:y="9.344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0.683cm" svg:height="0.088cm" svg:x="7.228cm" svg:y="9.578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0.683cm" svg:height="0.088cm" svg:x="7.228cm" svg:y="9.812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0.683cm" svg:height="0.088cm" svg:x="7.228cm" svg:y="8.683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80" draw:layer="layout" svg:width="0.229cm" svg:height="0.066cm" svg:x="7.228cm" svg:y="8.3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221" draw:text-style-name="P70" draw:layer="layout" svg:width="0.494cm" svg:height="0.507cm" svg:x="6.809cm" svg:y="11.946cm">
            <text:p/>
            <draw:enhanced-geometry svg:viewBox="0 0 112 115" draw:type="non-primitive" draw:enhanced-path="M 0 0  L 0 50  L 111 114  L 111 61  L 0 0  N"/>
          </draw:custom-shape>
          <draw:custom-shape draw:style-name="gr252" draw:text-style-name="P71" draw:layer="layout" svg:width="0.715cm" svg:height="0.701cm" svg:x="7.289cm" svg:y="11.752cm">
            <text:p/>
            <draw:enhanced-geometry svg:viewBox="0 0 162 159" draw:type="non-primitive" draw:enhanced-path="M 2 158  L 161 54  L 161 0  L 0 108  L 2 158  N"/>
          </draw:custom-shape>
          <draw:custom-shape draw:style-name="gr253" draw:text-style-name="P13" draw:layer="layout" svg:width="1.212cm" svg:height="0.732cm" svg:x="6.809cm" svg:y="11.514cm">
            <text:p/>
            <draw:enhanced-geometry svg:viewBox="0 0 275 166" draw:type="non-primitive" draw:enhanced-path="M 0 97  L 161 0  L 274 61  L 111 165  L 0 97  N"/>
          </draw:custom-shape>
          <draw:custom-shape draw:style-name="gr254" draw:text-style-name="P72" draw:layer="layout" svg:width="1.103cm" svg:height="0.683cm" svg:x="6.817cm" svg:y="10.923cm">
            <text:p/>
            <draw:enhanced-geometry svg:viewBox="0 0 250 155" draw:type="non-primitive" draw:enhanced-path="M 0 76  L 51 105  L 36 116  L 102 154  L 249 50  L 189 20  L 176 27  L 118 0  L 0 76  N"/>
          </draw:custom-shape>
          <draw:custom-shape draw:style-name="gr225" draw:text-style-name="P70" draw:layer="layout" svg:width="0.503cm" svg:height="0.834cm" svg:x="6.817cm" svg:y="11.24cm">
            <text:p/>
            <draw:enhanced-geometry svg:viewBox="0 0 114 189" draw:type="non-primitive" draw:enhanced-path="M 2 0  L 0 89  L 39 134  L 39 146  L 111 188  L 113 76  L 43 46  L 54 35  L 2 0  N"/>
          </draw:custom-shape>
          <draw:custom-shape draw:style-name="gr255" draw:text-style-name="P71" draw:layer="layout" svg:width="0.613cm" svg:height="0.922cm" svg:x="7.311cm" svg:y="11.152cm">
            <text:p/>
            <draw:enhanced-geometry svg:viewBox="0 0 139 209" draw:type="non-primitive" draw:enhanced-path="M 138 0  L 138 113  L 0 208  L 0 97  L 138 0  N"/>
          </draw:custom-shape>
          <draw:custom-shape draw:style-name="gr227" draw:text-style-name="P73" draw:layer="layout" svg:width="0.458cm" svg:height="0.666cm" svg:x="7.382cm" svg:y="11.258cm">
            <text:p/>
            <draw:enhanced-geometry svg:viewBox="0 0 104 151" draw:type="non-primitive" draw:enhanced-path="M 103 0  L 103 82  L 0 150  L 0 76  L 103 0  N"/>
          </draw:custom-shape>
          <draw:custom-shape draw:style-name="gr228" draw:text-style-name="P2" draw:layer="layout" svg:width="0.449cm" svg:height="0.653cm" svg:x="7.391cm" svg:y="11.271cm">
            <text:p/>
            <draw:enhanced-geometry svg:viewBox="0 0 102 148" draw:type="non-primitive" draw:enhanced-path="M 101 0  L 101 82  L 0 147  N"/>
          </draw:custom-shape>
          <draw:custom-shape draw:style-name="gr229" draw:text-style-name="P71" draw:layer="layout" svg:width="0.957cm" svg:height="0.64cm" svg:x="7.351cm" svg:y="11.994cm">
            <text:p/>
            <draw:enhanced-geometry svg:viewBox="0 0 217 145" draw:type="non-primitive" draw:enhanced-path="M 64 144  L 216 38  L 160 0  L 0 106  L 64 144  N"/>
          </draw:custom-shape>
          <draw:custom-shape draw:style-name="gr256" draw:text-style-name="P74" draw:layer="layout" svg:width="0.953cm" svg:height="0.679cm" svg:x="7.351cm" svg:y="11.933cm">
            <text:p/>
            <draw:enhanced-geometry svg:viewBox="0 0 216 154" draw:type="non-primitive" draw:enhanced-path="M 63 153  L 215 48  L 159 0  L 0 107  L 63 153  N"/>
          </draw:custom-shape>
          <draw:custom-shape draw:style-name="gr231" draw:text-style-name="P70" draw:layer="layout" svg:width="0.291cm" svg:height="0.238cm" svg:x="7.351cm" svg:y="12.405cm">
            <text:p/>
            <draw:enhanced-geometry svg:viewBox="0 0 66 54" draw:type="non-primitive" draw:enhanced-path="M 0 0  L 0 14  L 65 53  L 65 45  L 0 0  N"/>
          </draw:custom-shape>
          <draw:line draw:style-name="gr232" draw:text-style-name="P14" draw:layer="layout" svg:x1="7.417cm" svg:y1="12.404cm" svg:x2="8.074cm" svg:y2="11.967cm">
            <text:p/>
          </draw:line>
          <draw:custom-shape draw:style-name="gr257" draw:text-style-name="P70" draw:layer="layout" svg:width="0.643cm" svg:height="0.454cm" svg:x="7.466cm" svg:y="12.1cm">
            <text:p/>
            <draw:enhanced-geometry svg:viewBox="0 0 146 103" draw:type="non-primitive" draw:enhanced-path="M 0 76  L 36 102  L 145 25  L 113 0  L 0 76  N"/>
          </draw:custom-shape>
          <draw:custom-shape draw:style-name="gr231" draw:text-style-name="P70" draw:layer="layout" svg:width="0.234cm" svg:height="0.177cm" svg:x="7.995cm" svg:y="12.016cm">
            <text:p/>
            <draw:enhanced-geometry svg:viewBox="0 0 53 40" draw:type="non-primitive" draw:enhanced-path="M 0 16  L 32 39  L 52 24  L 21 0  L 0 16  N"/>
          </draw:custom-shape>
          <draw:custom-shape draw:style-name="gr258" draw:text-style-name="P13" draw:layer="layout" svg:width="0.643cm" svg:height="0.463cm" svg:x="7.466cm" svg:y="12.074cm">
            <text:p/>
            <draw:enhanced-geometry svg:viewBox="0 0 146 105" draw:type="non-primitive" draw:enhanced-path="M 0 78  L 36 104  L 145 26  L 113 0  L 0 78  N"/>
          </draw:custom-shape>
          <draw:custom-shape draw:style-name="gr235" draw:text-style-name="P13" draw:layer="layout" svg:width="0.234cm" svg:height="0.186cm" svg:x="7.995cm" svg:y="11.994cm">
            <text:p/>
            <draw:enhanced-geometry svg:viewBox="0 0 53 42" draw:type="non-primitive" draw:enhanced-path="M 0 17  L 32 41  L 52 25  L 21 0  L 0 17  N"/>
          </draw:custom-shape>
        </draw:g>
        <draw:line draw:style-name="gr236" draw:text-style-name="P14" draw:layer="layout" svg:x1="7.359cm" svg:y1="10.654cm" svg:x2="7.354cm" svg:y2="11.187cm">
          <text:p/>
        </draw:line>
        <draw:line draw:style-name="gr236" draw:text-style-name="P14" draw:layer="layout" svg:x1="8.978cm" svg:y1="10.641cm" svg:x2="8.978cm" svg:y2="11.179cm">
          <text:p/>
        </draw:line>
        <draw:line draw:style-name="gr236" draw:text-style-name="P14" draw:layer="layout" svg:x1="11.21cm" svg:y1="10.649cm" svg:x2="11.21cm" svg:y2="11.187cm">
          <text:p/>
        </draw:line>
        <draw:g draw:style-name="gr4">
          <draw:custom-shape draw:style-name="gr259" draw:text-style-name="P70" draw:layer="layout" svg:width="0.502cm" svg:height="0.507cm" svg:x="12.277cm" svg:y="11.946cm">
            <text:p/>
            <draw:enhanced-geometry svg:viewBox="0 0 114 115" draw:type="non-primitive" draw:enhanced-path="M 0 0  L 0 50  L 113 114  L 113 61  L 0 0  N"/>
          </draw:custom-shape>
          <draw:custom-shape draw:style-name="gr260" draw:text-style-name="P71" draw:layer="layout" svg:width="0.715cm" svg:height="0.697cm" svg:x="12.766cm" svg:y="11.752cm">
            <text:p/>
            <draw:enhanced-geometry svg:viewBox="0 0 162 158" draw:type="non-primitive" draw:enhanced-path="M 2 157  L 161 54  L 161 0  L 0 108  L 2 157  N"/>
          </draw:custom-shape>
          <draw:custom-shape draw:style-name="gr223" draw:text-style-name="P13" draw:layer="layout" svg:width="1.217cm" svg:height="0.732cm" svg:x="12.277cm" svg:y="11.509cm">
            <text:p/>
            <draw:enhanced-geometry svg:viewBox="0 0 276 166" draw:type="non-primitive" draw:enhanced-path="M 0 97  L 162 0  L 275 61  L 111 165  L 0 97  N"/>
          </draw:custom-shape>
          <draw:custom-shape draw:style-name="gr261" draw:text-style-name="P72" draw:layer="layout" svg:width="1.107cm" svg:height="0.684cm" svg:x="12.285cm" svg:y="10.918cm">
            <text:p/>
            <draw:enhanced-geometry svg:viewBox="0 0 251 155" draw:type="non-primitive" draw:enhanced-path="M 0 76  L 51 105  L 36 116  L 102 154  L 250 50  L 190 20  L 177 27  L 119 0  L 0 76  N"/>
          </draw:custom-shape>
          <draw:custom-shape draw:style-name="gr262" draw:text-style-name="P70" draw:layer="layout" svg:width="0.508cm" svg:height="0.829cm" svg:x="12.285cm" svg:y="11.24cm">
            <text:p/>
            <draw:enhanced-geometry svg:viewBox="0 0 115 188" draw:type="non-primitive" draw:enhanced-path="M 2 0  L 0 89  L 39 133  L 39 146  L 112 187  L 114 75  L 43 46  L 54 35  L 2 0  N"/>
          </draw:custom-shape>
          <draw:custom-shape draw:style-name="gr263" draw:text-style-name="P71" draw:layer="layout" svg:width="0.613cm" svg:height="0.921cm" svg:x="12.784cm" svg:y="11.148cm">
            <text:p/>
            <draw:enhanced-geometry svg:viewBox="0 0 139 209" draw:type="non-primitive" draw:enhanced-path="M 138 0  L 138 113  L 0 208  L 0 97  L 138 0  N"/>
          </draw:custom-shape>
          <draw:custom-shape draw:style-name="gr264" draw:text-style-name="P73" draw:layer="layout" svg:width="0.459cm" svg:height="0.665cm" svg:x="12.854cm" svg:y="11.254cm">
            <text:p/>
            <draw:enhanced-geometry svg:viewBox="0 0 104 151" draw:type="non-primitive" draw:enhanced-path="M 103 0  L 103 82  L 0 150  L 0 76  L 103 0  N"/>
          </draw:custom-shape>
          <draw:custom-shape draw:style-name="gr265" draw:text-style-name="P2" draw:layer="layout" svg:width="0.445cm" svg:height="0.648cm" svg:x="12.868cm" svg:y="11.271cm">
            <text:p/>
            <draw:enhanced-geometry svg:viewBox="0 0 101 147" draw:type="non-primitive" draw:enhanced-path="M 100 0  L 100 82  L 0 146  N"/>
          </draw:custom-shape>
          <draw:custom-shape draw:style-name="gr266" draw:text-style-name="P71" draw:layer="layout" svg:width="0.962cm" svg:height="0.639cm" svg:x="12.823cm" svg:y="11.99cm">
            <text:p/>
            <draw:enhanced-geometry svg:viewBox="0 0 218 145" draw:type="non-primitive" draw:enhanced-path="M 64 144  L 217 38  L 161 0  L 0 106  L 64 144  N"/>
          </draw:custom-shape>
          <draw:custom-shape draw:style-name="gr230" draw:text-style-name="P74" draw:layer="layout" svg:width="0.957cm" svg:height="0.679cm" svg:x="12.823cm" svg:y="11.928cm">
            <text:p/>
            <draw:enhanced-geometry svg:viewBox="0 0 217 154" draw:type="non-primitive" draw:enhanced-path="M 64 153  L 216 48  L 160 0  L 0 107  L 64 153  N"/>
          </draw:custom-shape>
          <draw:custom-shape draw:style-name="gr231" draw:text-style-name="P70" draw:layer="layout" svg:width="0.287cm" svg:height="0.238cm" svg:x="12.823cm" svg:y="12.4cm">
            <text:p/>
            <draw:enhanced-geometry svg:viewBox="0 0 65 54" draw:type="non-primitive" draw:enhanced-path="M 0 0  L 0 14  L 64 53  L 64 45  L 0 0  N"/>
          </draw:custom-shape>
          <draw:line draw:style-name="gr232" draw:text-style-name="P14" draw:layer="layout" svg:x1="12.89cm" svg:y1="12.4cm" svg:x2="13.551cm" svg:y2="11.968cm">
            <text:p/>
          </draw:line>
          <draw:custom-shape draw:style-name="gr257" draw:text-style-name="P70" draw:layer="layout" svg:width="0.643cm" svg:height="0.454cm" svg:x="12.943cm" svg:y="12.096cm">
            <text:p/>
            <draw:enhanced-geometry svg:viewBox="0 0 146 103" draw:type="non-primitive" draw:enhanced-path="M 0 76  L 36 102  L 145 25  L 113 0  L 0 76  N"/>
          </draw:custom-shape>
          <draw:custom-shape draw:style-name="gr231" draw:text-style-name="P70" draw:layer="layout" svg:width="0.229cm" svg:height="0.176cm" svg:x="13.472cm" svg:y="12.012cm">
            <text:p/>
            <draw:enhanced-geometry svg:viewBox="0 0 52 40" draw:type="non-primitive" draw:enhanced-path="M 0 16  L 31 39  L 51 24  L 21 0  L 0 16  N"/>
          </draw:custom-shape>
          <draw:custom-shape draw:style-name="gr267" draw:text-style-name="P13" draw:layer="layout" svg:width="0.643cm" svg:height="0.458cm" svg:x="12.943cm" svg:y="12.074cm">
            <text:p/>
            <draw:enhanced-geometry svg:viewBox="0 0 146 104" draw:type="non-primitive" draw:enhanced-path="M 0 77  L 36 103  L 145 25  L 113 0  L 0 77  N"/>
          </draw:custom-shape>
          <draw:custom-shape draw:style-name="gr235" draw:text-style-name="P13" draw:layer="layout" svg:width="0.229cm" svg:height="0.185cm" svg:x="13.472cm" svg:y="11.99cm">
            <text:p/>
            <draw:enhanced-geometry svg:viewBox="0 0 52 42" draw:type="non-primitive" draw:enhanced-path="M 0 17  L 31 41  L 51 25  L 21 0  L 0 17  N"/>
          </draw:custom-shape>
        </draw:g>
        <draw:line draw:style-name="gr236" draw:text-style-name="P14" draw:layer="layout" svg:x1="12.827cm" svg:y1="10.649cm" svg:x2="12.822cm" svg:y2="11.187cm">
          <text:p/>
        </draw:line>
        <draw:g draw:style-name="gr4">
          <draw:custom-shape draw:style-name="gr268" draw:text-style-name="P70" draw:layer="layout" svg:width="0.498cm" svg:height="0.503cm" svg:x="13.904cm" svg:y="11.937cm">
            <text:p/>
            <draw:enhanced-geometry svg:viewBox="0 0 113 114" draw:type="non-primitive" draw:enhanced-path="M 0 0  L 0 49  L 112 113  L 112 61  L 0 0  N"/>
          </draw:custom-shape>
          <draw:custom-shape draw:style-name="gr269" draw:text-style-name="P71" draw:layer="layout" svg:width="0.715cm" svg:height="0.683cm" svg:x="14.393cm" svg:y="11.752cm">
            <text:p/>
            <draw:enhanced-geometry svg:viewBox="0 0 162 155" draw:type="non-primitive" draw:enhanced-path="M 2 154  L 161 53  L 161 0  L 0 106  L 2 154  N"/>
          </draw:custom-shape>
          <draw:custom-shape draw:style-name="gr270" draw:text-style-name="P13" draw:layer="layout" svg:width="1.213cm" svg:height="0.741cm" svg:x="13.904cm" svg:y="11.496cm">
            <text:p/>
            <draw:enhanced-geometry svg:viewBox="0 0 275 168" draw:type="non-primitive" draw:enhanced-path="M 0 98  L 161 0  L 274 62  L 111 167  L 0 98  N"/>
          </draw:custom-shape>
          <draw:custom-shape draw:style-name="gr271" draw:text-style-name="P72" draw:layer="layout" svg:width="1.103cm" svg:height="0.693cm" svg:x="13.908cm" svg:y="10.905cm">
            <text:p/>
            <draw:enhanced-geometry svg:viewBox="0 0 250 157" draw:type="non-primitive" draw:enhanced-path="M 0 77  L 51 107  L 36 117  L 102 156  L 249 51  L 189 20  L 176 28  L 118 0  L 0 77  N"/>
          </draw:custom-shape>
          <draw:custom-shape draw:style-name="gr272" draw:text-style-name="P70" draw:layer="layout" svg:width="0.512cm" svg:height="0.829cm" svg:x="13.908cm" svg:y="11.227cm">
            <text:p/>
            <draw:enhanced-geometry svg:viewBox="0 0 116 188" draw:type="non-primitive" draw:enhanced-path="M 2 0  L 0 89  L 40 133  L 40 146  L 112 187  L 115 75  L 43 46  L 55 35  L 2 0  N"/>
          </draw:custom-shape>
          <draw:custom-shape draw:style-name="gr263" draw:text-style-name="P71" draw:layer="layout" svg:width="0.613cm" svg:height="0.921cm" svg:x="14.407cm" svg:y="11.135cm">
            <text:p/>
            <draw:enhanced-geometry svg:viewBox="0 0 139 209" draw:type="non-primitive" draw:enhanced-path="M 138 0  L 138 113  L 0 208  L 0 97  L 138 0  N"/>
          </draw:custom-shape>
          <draw:custom-shape draw:style-name="gr273" draw:text-style-name="P73" draw:layer="layout" svg:width="0.463cm" svg:height="0.67cm" svg:x="14.477cm" svg:y="11.245cm">
            <text:p/>
            <draw:enhanced-geometry svg:viewBox="0 0 105 152" draw:type="non-primitive" draw:enhanced-path="M 104 0  L 104 83  L 0 151  L 0 77  L 104 0  N"/>
          </draw:custom-shape>
          <draw:custom-shape draw:style-name="gr265" draw:text-style-name="P2" draw:layer="layout" svg:width="0.45cm" svg:height="0.648cm" svg:x="14.49cm" svg:y="11.267cm">
            <text:p/>
            <draw:enhanced-geometry svg:viewBox="0 0 102 147" draw:type="non-primitive" draw:enhanced-path="M 101 0  L 101 82  L 0 146  N"/>
          </draw:custom-shape>
          <draw:custom-shape draw:style-name="gr274" draw:text-style-name="P71" draw:layer="layout" svg:width="0.957cm" svg:height="0.644cm" svg:x="14.451cm" svg:y="11.981cm">
            <text:p/>
            <draw:enhanced-geometry svg:viewBox="0 0 217 146" draw:type="non-primitive" draw:enhanced-path="M 64 145  L 216 38  L 160 0  L 0 107  L 64 145  N"/>
          </draw:custom-shape>
          <draw:custom-shape draw:style-name="gr275" draw:text-style-name="P74" draw:layer="layout" svg:width="0.962cm" svg:height="0.684cm" svg:x="14.446cm" svg:y="11.915cm">
            <text:p/>
            <draw:enhanced-geometry svg:viewBox="0 0 218 155" draw:type="non-primitive" draw:enhanced-path="M 64 154  L 217 48  L 161 0  L 0 107  L 64 154  N"/>
          </draw:custom-shape>
          <draw:custom-shape draw:style-name="gr231" draw:text-style-name="P70" draw:layer="layout" svg:width="0.295cm" svg:height="0.233cm" svg:x="14.451cm" svg:y="12.396cm">
            <text:p/>
            <draw:enhanced-geometry svg:viewBox="0 0 67 53" draw:type="non-primitive" draw:enhanced-path="M 0 0  L 0 14  L 66 52  L 66 44  L 0 0  N"/>
          </draw:custom-shape>
          <draw:line draw:style-name="gr232" draw:text-style-name="P14" draw:layer="layout" svg:x1="14.512cm" svg:y1="12.395cm" svg:x2="15.174cm" svg:y2="11.958cm">
            <text:p/>
          </draw:line>
          <draw:custom-shape draw:style-name="gr276" draw:text-style-name="P70" draw:layer="layout" svg:width="0.644cm" svg:height="0.458cm" svg:x="14.565cm" svg:y="12.083cm">
            <text:p/>
            <draw:enhanced-geometry svg:viewBox="0 0 146 104" draw:type="non-primitive" draw:enhanced-path="M 0 77  L 36 103  L 145 25  L 113 0  L 0 77  N"/>
          </draw:custom-shape>
          <draw:custom-shape draw:style-name="gr231" draw:text-style-name="P70" draw:layer="layout" svg:width="0.225cm" svg:height="0.185cm" svg:x="15.099cm" svg:y="11.999cm">
            <text:p/>
            <draw:enhanced-geometry svg:viewBox="0 0 51 42" draw:type="non-primitive" draw:enhanced-path="M 0 17  L 31 41  L 50 25  L 20 0  L 0 17  N"/>
          </draw:custom-shape>
          <draw:custom-shape draw:style-name="gr277" draw:text-style-name="P13" draw:layer="layout" svg:width="0.644cm" svg:height="0.45cm" svg:x="14.565cm" svg:y="12.069cm">
            <text:p/>
            <draw:enhanced-geometry svg:viewBox="0 0 146 102" draw:type="non-primitive" draw:enhanced-path="M 0 75  L 36 101  L 145 25  L 113 0  L 0 75  N"/>
          </draw:custom-shape>
          <draw:custom-shape draw:style-name="gr235" draw:text-style-name="P13" draw:layer="layout" svg:width="0.225cm" svg:height="0.185cm" svg:x="15.099cm" svg:y="11.981cm">
            <text:p/>
            <draw:enhanced-geometry svg:viewBox="0 0 51 42" draw:type="non-primitive" draw:enhanced-path="M 0 17  L 31 41  L 50 25  L 20 0  L 0 17  N"/>
          </draw:custom-shape>
        </draw:g>
        <draw:line draw:style-name="gr236" draw:text-style-name="P14" draw:layer="layout" svg:x1="14.455cm" svg:y1="10.641cm" svg:x2="14.455cm" svg:y2="11.174cm">
          <text:p/>
        </draw:line>
        <draw:g draw:style-name="gr4">
          <draw:custom-shape draw:style-name="gr221" draw:text-style-name="P70" draw:layer="layout" svg:width="0.494cm" svg:height="0.507cm" svg:x="17.37cm" svg:y="11.942cm">
            <text:p/>
            <draw:enhanced-geometry svg:viewBox="0 0 112 115" draw:type="non-primitive" draw:enhanced-path="M 0 0  L 0 50  L 111 114  L 111 61  L 0 0  N"/>
          </draw:custom-shape>
          <draw:custom-shape draw:style-name="gr278" draw:text-style-name="P71" draw:layer="layout" svg:width="0.714cm" svg:height="0.692cm" svg:x="17.855cm" svg:y="11.752cm">
            <text:p/>
            <draw:enhanced-geometry svg:viewBox="0 0 162 157" draw:type="non-primitive" draw:enhanced-path="M 2 156  L 161 53  L 161 0  L 0 107  L 2 156  N"/>
          </draw:custom-shape>
          <draw:custom-shape draw:style-name="gr279" draw:text-style-name="P13" draw:layer="layout" svg:width="1.213cm" svg:height="0.732cm" svg:x="17.37cm" svg:y="11.505cm">
            <text:p/>
            <draw:enhanced-geometry svg:viewBox="0 0 275 166" draw:type="non-primitive" draw:enhanced-path="M 0 97  L 161 0  L 274 61  L 111 165  L 0 97  N"/>
          </draw:custom-shape>
          <draw:custom-shape draw:style-name="gr280" draw:text-style-name="P72" draw:layer="layout" svg:width="1.103cm" svg:height="0.684cm" svg:x="17.383cm" svg:y="10.914cm">
            <text:p/>
            <draw:enhanced-geometry svg:viewBox="0 0 250 155" draw:type="non-primitive" draw:enhanced-path="M 0 76  L 51 105  L 36 116  L 102 154  L 249 50  L 189 20  L 176 27  L 118 0  L 0 76  N"/>
          </draw:custom-shape>
          <draw:custom-shape draw:style-name="gr281" draw:text-style-name="P70" draw:layer="layout" svg:width="0.503cm" svg:height="0.829cm" svg:x="17.383cm" svg:y="11.236cm">
            <text:p/>
            <draw:enhanced-geometry svg:viewBox="0 0 114 188" draw:type="non-primitive" draw:enhanced-path="M 2 0  L 0 89  L 39 133  L 39 146  L 111 187  L 113 75  L 43 46  L 54 35  L 2 0  N"/>
          </draw:custom-shape>
          <draw:custom-shape draw:style-name="gr282" draw:text-style-name="P71" draw:layer="layout" svg:width="0.617cm" svg:height="0.922cm" svg:x="17.873cm" svg:y="11.143cm">
            <text:p/>
            <draw:enhanced-geometry svg:viewBox="0 0 140 209" draw:type="non-primitive" draw:enhanced-path="M 139 0  L 139 113  L 0 208  L 0 97  L 139 0  N"/>
          </draw:custom-shape>
          <draw:custom-shape draw:style-name="gr227" draw:text-style-name="P73" draw:layer="layout" svg:width="0.458cm" svg:height="0.666cm" svg:x="17.948cm" svg:y="11.249cm">
            <text:p/>
            <draw:enhanced-geometry svg:viewBox="0 0 104 151" draw:type="non-primitive" draw:enhanced-path="M 103 0  L 103 82  L 0 150  L 0 76  L 103 0  N"/>
          </draw:custom-shape>
          <draw:custom-shape draw:style-name="gr283" draw:text-style-name="P2" draw:layer="layout" svg:width="0.445cm" svg:height="0.644cm" svg:x="17.961cm" svg:y="11.271cm">
            <text:p/>
            <draw:enhanced-geometry svg:viewBox="0 0 101 146" draw:type="non-primitive" draw:enhanced-path="M 100 0  L 100 81  L 0 145  N"/>
          </draw:custom-shape>
          <draw:custom-shape draw:style-name="gr284" draw:text-style-name="P71" draw:layer="layout" svg:width="0.953cm" svg:height="0.639cm" svg:x="17.921cm" svg:y="11.99cm">
            <text:p/>
            <draw:enhanced-geometry svg:viewBox="0 0 216 145" draw:type="non-primitive" draw:enhanced-path="M 63 144  L 215 38  L 159 0  L 0 106  L 63 144  N"/>
          </draw:custom-shape>
          <draw:custom-shape draw:style-name="gr285" draw:text-style-name="P74" draw:layer="layout" svg:width="0.952cm" svg:height="0.679cm" svg:x="17.917cm" svg:y="11.924cm">
            <text:p/>
            <draw:enhanced-geometry svg:viewBox="0 0 216 154" draw:type="non-primitive" draw:enhanced-path="M 63 153  L 215 48  L 159 0  L 0 107  L 63 153  N"/>
          </draw:custom-shape>
          <draw:custom-shape draw:style-name="gr231" draw:text-style-name="P70" draw:layer="layout" svg:width="0.287cm" svg:height="0.238cm" svg:x="17.921cm" svg:y="12.396cm">
            <text:p/>
            <draw:enhanced-geometry svg:viewBox="0 0 65 54" draw:type="non-primitive" draw:enhanced-path="M 0 0  L 0 14  L 64 53  L 64 45  L 0 0  N"/>
          </draw:custom-shape>
          <draw:line draw:style-name="gr232" draw:text-style-name="P14" draw:layer="layout" svg:x1="17.983cm" svg:y1="12.396cm" svg:x2="18.64cm" svg:y2="11.964cm">
            <text:p/>
          </draw:line>
          <draw:custom-shape draw:style-name="gr286" draw:text-style-name="P70" draw:layer="layout" svg:width="0.649cm" svg:height="0.455cm" svg:x="18.031cm" svg:y="12.091cm">
            <text:p/>
            <draw:enhanced-geometry svg:viewBox="0 0 147 103" draw:type="non-primitive" draw:enhanced-path="M 0 76  L 37 102  L 146 25  L 114 0  L 0 76  N"/>
          </draw:custom-shape>
          <draw:custom-shape draw:style-name="gr231" draw:text-style-name="P70" draw:layer="layout" svg:width="0.233cm" svg:height="0.176cm" svg:x="18.561cm" svg:y="12.008cm">
            <text:p/>
            <draw:enhanced-geometry svg:viewBox="0 0 53 40" draw:type="non-primitive" draw:enhanced-path="M 0 16  L 32 39  L 52 24  L 21 0  L 0 16  N"/>
          </draw:custom-shape>
          <draw:custom-shape draw:style-name="gr287" draw:text-style-name="P13" draw:layer="layout" svg:width="0.649cm" svg:height="0.454cm" svg:x="18.031cm" svg:y="12.074cm">
            <text:p/>
            <draw:enhanced-geometry svg:viewBox="0 0 147 103" draw:type="non-primitive" draw:enhanced-path="M 0 76  L 37 102  L 146 25  L 114 0  L 0 76  N"/>
          </draw:custom-shape>
          <draw:custom-shape draw:style-name="gr235" draw:text-style-name="P13" draw:layer="layout" svg:width="0.233cm" svg:height="0.181cm" svg:x="18.561cm" svg:y="11.99cm">
            <text:p/>
            <draw:enhanced-geometry svg:viewBox="0 0 53 41" draw:type="non-primitive" draw:enhanced-path="M 0 16  L 32 40  L 52 25  L 21 0  L 0 16  N"/>
          </draw:custom-shape>
        </draw:g>
        <draw:line draw:style-name="gr236" draw:text-style-name="P14" draw:layer="layout" svg:x1="17.925cm" svg:y1="10.645cm" svg:x2="17.92cm" svg:y2="11.183cm">
          <text:p/>
        </draw:line>
        <draw:line draw:style-name="gr236" draw:text-style-name="P14" draw:layer="layout" svg:x1="17.343cm" svg:y1="10.645cm" svg:x2="21.758cm" svg:y2="10.645cm">
          <text:p/>
        </draw:line>
        <draw:g draw:style-name="gr4">
          <draw:custom-shape draw:style-name="gr221" draw:text-style-name="P70" draw:layer="layout" svg:width="0.49cm" svg:height="0.507cm" svg:x="18.997cm" svg:y="11.942cm">
            <text:p/>
            <draw:enhanced-geometry svg:viewBox="0 0 111 115" draw:type="non-primitive" draw:enhanced-path="M 0 0  L 0 50  L 110 114  L 110 61  L 0 0  N"/>
          </draw:custom-shape>
          <draw:custom-shape draw:style-name="gr288" draw:text-style-name="P71" draw:layer="layout" svg:width="0.71cm" svg:height="0.692cm" svg:x="19.473cm" svg:y="11.752cm">
            <text:p/>
            <draw:enhanced-geometry svg:viewBox="0 0 161 157" draw:type="non-primitive" draw:enhanced-path="M 2 156  L 160 53  L 160 0  L 0 107  L 2 156  N"/>
          </draw:custom-shape>
          <draw:custom-shape draw:style-name="gr289" draw:text-style-name="P13" draw:layer="layout" svg:width="1.208cm" svg:height="0.732cm" svg:x="18.997cm" svg:y="11.505cm">
            <text:p/>
            <draw:enhanced-geometry svg:viewBox="0 0 274 166" draw:type="non-primitive" draw:enhanced-path="M 0 97  L 161 0  L 273 61  L 111 165  L 0 97  N"/>
          </draw:custom-shape>
          <draw:custom-shape draw:style-name="gr290" draw:text-style-name="P72" draw:layer="layout" svg:width="1.098cm" svg:height="0.684cm" svg:x="19.006cm" svg:y="10.914cm">
            <text:p/>
            <draw:enhanced-geometry svg:viewBox="0 0 249 155" draw:type="non-primitive" draw:enhanced-path="M 0 76  L 51 105  L 36 116  L 101 154  L 248 50  L 188 20  L 176 27  L 118 0  L 0 76  N"/>
          </draw:custom-shape>
          <draw:custom-shape draw:style-name="gr291" draw:text-style-name="P70" draw:layer="layout" svg:width="0.494cm" svg:height="0.829cm" svg:x="19.006cm" svg:y="11.236cm">
            <text:p/>
            <draw:enhanced-geometry svg:viewBox="0 0 112 188" draw:type="non-primitive" draw:enhanced-path="M 2 0  L 0 89  L 38 133  L 38 146  L 109 187  L 111 75  L 42 46  L 53 35  L 2 0  N"/>
          </draw:custom-shape>
          <draw:custom-shape draw:style-name="gr292" draw:text-style-name="P71" draw:layer="layout" svg:width="0.626cm" svg:height="0.922cm" svg:x="19.487cm" svg:y="11.143cm">
            <text:p/>
            <draw:enhanced-geometry svg:viewBox="0 0 142 209" draw:type="non-primitive" draw:enhanced-path="M 141 0  L 141 113  L 0 208  L 0 97  L 141 0  N"/>
          </draw:custom-shape>
          <draw:custom-shape draw:style-name="gr227" draw:text-style-name="P73" draw:layer="layout" svg:width="0.467cm" svg:height="0.666cm" svg:x="19.562cm" svg:y="11.249cm">
            <text:p/>
            <draw:enhanced-geometry svg:viewBox="0 0 106 151" draw:type="non-primitive" draw:enhanced-path="M 105 0  L 105 82  L 0 150  L 0 76  L 105 0  N"/>
          </draw:custom-shape>
          <draw:custom-shape draw:style-name="gr283" draw:text-style-name="P2" draw:layer="layout" svg:width="0.454cm" svg:height="0.644cm" svg:x="19.575cm" svg:y="11.271cm">
            <text:p/>
            <draw:enhanced-geometry svg:viewBox="0 0 103 146" draw:type="non-primitive" draw:enhanced-path="M 102 0  L 102 81  L 0 145  N"/>
          </draw:custom-shape>
          <draw:custom-shape draw:style-name="gr266" draw:text-style-name="P71" draw:layer="layout" svg:width="0.962cm" svg:height="0.639cm" svg:x="19.539cm" svg:y="11.99cm">
            <text:p/>
            <draw:enhanced-geometry svg:viewBox="0 0 218 145" draw:type="non-primitive" draw:enhanced-path="M 64 144  L 217 38  L 161 0  L 0 106  L 64 144  N"/>
          </draw:custom-shape>
          <draw:custom-shape draw:style-name="gr293" draw:text-style-name="P74" draw:layer="layout" svg:width="0.961cm" svg:height="0.679cm" svg:x="19.535cm" svg:y="11.924cm">
            <text:p/>
            <draw:enhanced-geometry svg:viewBox="0 0 218 154" draw:type="non-primitive" draw:enhanced-path="M 64 153  L 217 48  L 161 0  L 0 107  L 64 153  N"/>
          </draw:custom-shape>
          <draw:custom-shape draw:style-name="gr231" draw:text-style-name="P70" draw:layer="layout" svg:width="0.292cm" svg:height="0.238cm" svg:x="19.539cm" svg:y="12.396cm">
            <text:p/>
            <draw:enhanced-geometry svg:viewBox="0 0 66 54" draw:type="non-primitive" draw:enhanced-path="M 0 0  L 0 14  L 65 53  L 65 45  L 0 0  N"/>
          </draw:custom-shape>
          <draw:line draw:style-name="gr232" draw:text-style-name="P14" draw:layer="layout" svg:x1="19.601cm" svg:y1="12.396cm" svg:x2="20.258cm" svg:y2="11.964cm">
            <text:p/>
          </draw:line>
          <draw:custom-shape draw:style-name="gr294" draw:text-style-name="P70" draw:layer="layout" svg:width="0.635cm" svg:height="0.455cm" svg:x="19.659cm" svg:y="12.091cm">
            <text:p/>
            <draw:enhanced-geometry svg:viewBox="0 0 144 103" draw:type="non-primitive" draw:enhanced-path="M 0 76  L 36 102  L 143 25  L 111 0  L 0 76  N"/>
          </draw:custom-shape>
          <draw:custom-shape draw:style-name="gr231" draw:text-style-name="P70" draw:layer="layout" svg:width="0.247cm" svg:height="0.176cm" svg:x="20.174cm" svg:y="12.008cm">
            <text:p/>
            <draw:enhanced-geometry svg:viewBox="0 0 56 40" draw:type="non-primitive" draw:enhanced-path="M 0 16  L 34 39  L 55 24  L 22 0  L 0 16  N"/>
          </draw:custom-shape>
          <draw:custom-shape draw:style-name="gr295" draw:text-style-name="P13" draw:layer="layout" svg:width="0.635cm" svg:height="0.454cm" svg:x="19.659cm" svg:y="12.074cm">
            <text:p/>
            <draw:enhanced-geometry svg:viewBox="0 0 144 103" draw:type="non-primitive" draw:enhanced-path="M 0 76  L 36 102  L 143 25  L 111 0  L 0 76  N"/>
          </draw:custom-shape>
          <draw:custom-shape draw:style-name="gr235" draw:text-style-name="P13" draw:layer="layout" svg:width="0.247cm" svg:height="0.181cm" svg:x="20.174cm" svg:y="11.99cm">
            <text:p/>
            <draw:enhanced-geometry svg:viewBox="0 0 56 41" draw:type="non-primitive" draw:enhanced-path="M 0 16  L 34 40  L 55 25  L 22 0  L 0 16  N"/>
          </draw:custom-shape>
        </draw:g>
        <draw:line draw:style-name="gr236" draw:text-style-name="P14" draw:layer="layout" svg:x1="19.544cm" svg:y1="10.645cm" svg:x2="19.544cm" svg:y2="11.183cm">
          <text:p/>
        </draw:line>
        <draw:g draw:style-name="gr4">
          <draw:custom-shape draw:style-name="gr296" draw:text-style-name="P70" draw:layer="layout" svg:width="0.498cm" svg:height="0.502cm" svg:x="20.62cm" svg:y="11.933cm">
            <text:p/>
            <draw:enhanced-geometry svg:viewBox="0 0 113 114" draw:type="non-primitive" draw:enhanced-path="M 0 0  L 0 49  L 112 113  L 112 61  L 0 0  N"/>
          </draw:custom-shape>
          <draw:custom-shape draw:style-name="gr297" draw:text-style-name="P71" draw:layer="layout" svg:width="0.71cm" svg:height="0.683cm" svg:x="21.105cm" svg:y="11.752cm">
            <text:p/>
            <draw:enhanced-geometry svg:viewBox="0 0 161 155" draw:type="non-primitive" draw:enhanced-path="M 2 154  L 160 53  L 160 0  L 0 106  L 2 154  N"/>
          </draw:custom-shape>
          <draw:custom-shape draw:style-name="gr298" draw:text-style-name="P13" draw:layer="layout" svg:width="1.217cm" svg:height="0.741cm" svg:x="20.62cm" svg:y="11.496cm">
            <text:p/>
            <draw:enhanced-geometry svg:viewBox="0 0 276 168" draw:type="non-primitive" draw:enhanced-path="M 0 98  L 162 0  L 275 62  L 111 167  L 0 98  N"/>
          </draw:custom-shape>
          <draw:custom-shape draw:style-name="gr299" draw:text-style-name="P72" draw:layer="layout" svg:width="1.098cm" svg:height="0.692cm" svg:x="20.629cm" svg:y="10.901cm">
            <text:p/>
            <draw:enhanced-geometry svg:viewBox="0 0 249 157" draw:type="non-primitive" draw:enhanced-path="M 0 77  L 51 107  L 36 117  L 101 156  L 248 51  L 188 20  L 176 28  L 118 0  L 0 77  N"/>
          </draw:custom-shape>
          <draw:custom-shape draw:style-name="gr300" draw:text-style-name="P70" draw:layer="layout" svg:width="0.502cm" svg:height="0.829cm" svg:x="20.629cm" svg:y="11.223cm">
            <text:p/>
            <draw:enhanced-geometry svg:viewBox="0 0 114 188" draw:type="non-primitive" draw:enhanced-path="M 2 0  L 0 89  L 39 133  L 39 146  L 111 187  L 113 75  L 43 46  L 54 35  L 2 0  N"/>
          </draw:custom-shape>
          <draw:custom-shape draw:style-name="gr255" draw:text-style-name="P71" draw:layer="layout" svg:width="0.613cm" svg:height="0.922cm" svg:x="21.123cm" svg:y="11.13cm">
            <text:p/>
            <draw:enhanced-geometry svg:viewBox="0 0 139 209" draw:type="non-primitive" draw:enhanced-path="M 138 0  L 138 113  L 0 208  L 0 97  L 138 0  N"/>
          </draw:custom-shape>
          <draw:custom-shape draw:style-name="gr301" draw:text-style-name="P73" draw:layer="layout" svg:width="0.454cm" svg:height="0.675cm" svg:x="21.198cm" svg:y="11.24cm">
            <text:p/>
            <draw:enhanced-geometry svg:viewBox="0 0 103 153" draw:type="non-primitive" draw:enhanced-path="M 102 0  L 102 83  L 0 152  L 0 77  L 102 0  N"/>
          </draw:custom-shape>
          <draw:custom-shape draw:style-name="gr228" draw:text-style-name="P2" draw:layer="layout" svg:width="0.446cm" svg:height="0.653cm" svg:x="21.206cm" svg:y="11.262cm">
            <text:p/>
            <draw:enhanced-geometry svg:viewBox="0 0 101 148" draw:type="non-primitive" draw:enhanced-path="M 100 0  L 100 82  L 0 147  N"/>
          </draw:custom-shape>
          <draw:custom-shape draw:style-name="gr302" draw:text-style-name="P71" draw:layer="layout" svg:width="0.962cm" svg:height="0.644cm" svg:x="21.162cm" svg:y="11.977cm">
            <text:p/>
            <draw:enhanced-geometry svg:viewBox="0 0 218 146" draw:type="non-primitive" draw:enhanced-path="M 64 145  L 217 38  L 161 0  L 0 107  L 64 145  N"/>
          </draw:custom-shape>
          <draw:custom-shape draw:style-name="gr303" draw:text-style-name="P74" draw:layer="layout" svg:width="0.957cm" svg:height="0.683cm" svg:x="21.162cm" svg:y="11.911cm">
            <text:p/>
            <draw:enhanced-geometry svg:viewBox="0 0 217 155" draw:type="non-primitive" draw:enhanced-path="M 64 154  L 216 48  L 160 0  L 0 107  L 64 154  N"/>
          </draw:custom-shape>
          <draw:custom-shape draw:style-name="gr231" draw:text-style-name="P70" draw:layer="layout" svg:width="0.296cm" svg:height="0.229cm" svg:x="21.162cm" svg:y="12.396cm">
            <text:p/>
            <draw:enhanced-geometry svg:viewBox="0 0 67 52" draw:type="non-primitive" draw:enhanced-path="M 0 0  L 0 14  L 66 51  L 66 44  L 0 0  N"/>
          </draw:custom-shape>
          <draw:line draw:style-name="gr232" draw:text-style-name="P14" draw:layer="layout" svg:x1="21.237cm" svg:y1="12.395cm" svg:x2="21.89cm" svg:y2="11.958cm">
            <text:p/>
          </draw:line>
          <draw:custom-shape draw:style-name="gr304" draw:text-style-name="P70" draw:layer="layout" svg:width="0.639cm" svg:height="0.459cm" svg:x="21.286cm" svg:y="12.078cm">
            <text:p/>
            <draw:enhanced-geometry svg:viewBox="0 0 145 104" draw:type="non-primitive" draw:enhanced-path="M 0 77  L 36 103  L 144 25  L 112 0  L 0 77  N"/>
          </draw:custom-shape>
          <draw:custom-shape draw:style-name="gr231" draw:text-style-name="P70" draw:layer="layout" svg:width="0.23cm" svg:height="0.186cm" svg:x="21.81cm" svg:y="11.994cm">
            <text:p/>
            <draw:enhanced-geometry svg:viewBox="0 0 52 42" draw:type="non-primitive" draw:enhanced-path="M 0 17  L 31 41  L 51 25  L 21 0  L 0 17  N"/>
          </draw:custom-shape>
          <draw:custom-shape draw:style-name="gr305" draw:text-style-name="P13" draw:layer="layout" svg:width="0.639cm" svg:height="0.45cm" svg:x="21.286cm" svg:y="12.065cm">
            <text:p/>
            <draw:enhanced-geometry svg:viewBox="0 0 145 102" draw:type="non-primitive" draw:enhanced-path="M 0 75  L 36 101  L 144 25  L 112 0  L 0 75  N"/>
          </draw:custom-shape>
          <draw:custom-shape draw:style-name="gr235" draw:text-style-name="P13" draw:layer="layout" svg:width="0.23cm" svg:height="0.185cm" svg:x="21.81cm" svg:y="11.977cm">
            <text:p/>
            <draw:enhanced-geometry svg:viewBox="0 0 52 42" draw:type="non-primitive" draw:enhanced-path="M 0 17  L 31 41  L 51 25  L 21 0  L 0 17  N"/>
          </draw:custom-shape>
        </draw:g>
        <draw:line draw:style-name="gr236" draw:text-style-name="P14" draw:layer="layout" svg:x1="21.171cm" svg:y1="10.636cm" svg:x2="21.167cm" svg:y2="11.17cm">
          <text:p/>
        </draw:line>
        <draw:line draw:style-name="gr236" draw:text-style-name="P14" draw:layer="layout" svg:x1="12.823cm" svg:y1="10.116cm" svg:x2="12.823cm" svg:y2="10.667cm">
          <text:p/>
        </draw:line>
        <draw:line draw:style-name="gr236" draw:text-style-name="P14" draw:layer="layout" svg:x1="18.706cm" svg:y1="10.111cm" svg:x2="18.706cm" svg:y2="10.663cm">
          <text:p/>
        </draw:line>
        <draw:custom-shape draw:style-name="gr306" draw:text-style-name="P2" draw:layer="layout" svg:width="2.875cm" svg:height="4.079cm" svg:x="19.262cm" svg:y="5.874cm">
          <text:p/>
          <draw:enhanced-geometry svg:viewBox="0 0 652 925" draw:type="non-primitive" draw:enhanced-path="M 651 0  L 281 583  L 307 431  L 0 924  N"/>
        </draw:custom-shape>
        <draw:g draw:style-name="gr4">
          <draw:custom-shape draw:style-name="gr307" draw:text-style-name="P71" draw:layer="layout" svg:width="0.666cm" svg:height="0.551cm" svg:x="15.302cm" svg:y="13.212cm">
            <text:p/>
            <draw:enhanced-geometry svg:viewBox="0 0 151 125" draw:type="non-primitive" draw:enhanced-path="M 2 124  L 150 20  L 150 0  L 0 101  L 2 124  N"/>
          </draw:custom-shape>
          <draw:custom-shape draw:style-name="gr308" draw:text-style-name="P13" draw:layer="layout" svg:width="1.138cm" svg:height="0.727cm" svg:x="14.83cm" svg:y="12.943cm">
            <text:p/>
            <draw:enhanced-geometry svg:viewBox="0 0 258 165" draw:type="non-primitive" draw:enhanced-path="M 0 98  L 134 0  L 257 61  L 107 164  L 0 98  N"/>
          </draw:custom-shape>
          <draw:custom-shape draw:style-name="gr309" draw:text-style-name="P70" draw:layer="layout" svg:width="0.485cm" svg:height="0.379cm" svg:x="14.821cm" svg:y="13.384cm">
            <text:p/>
            <draw:enhanced-geometry svg:viewBox="0 0 110 86" draw:type="non-primitive" draw:enhanced-path="M 0 0  L 0 17  L 109 85  L 108 64  L 0 0  N"/>
          </draw:custom-shape>
          <draw:custom-shape draw:style-name="gr310" draw:text-style-name="P71" draw:layer="layout" svg:width="0.811cm" svg:height="0.833cm" svg:x="14.83cm" svg:y="12.603cm">
            <text:p/>
            <draw:enhanced-geometry svg:viewBox="0 0 184 189" draw:type="non-primitive" draw:enhanced-path="M 145 0  L 183 98  L 41 188  L 0 94  L 145 0  N"/>
          </draw:custom-shape>
          <draw:custom-shape draw:style-name="gr311" draw:text-style-name="P73" draw:layer="layout" svg:width="0.529cm" svg:height="0.542cm" svg:x="14.971cm" svg:y="12.753cm">
            <text:p/>
            <draw:enhanced-geometry svg:viewBox="0 0 120 123" draw:type="non-primitive" draw:enhanced-path="M 91 0  L 119 66  L 27 122  L 0 59  L 91 0  N"/>
          </draw:custom-shape>
          <draw:custom-shape draw:style-name="gr312" draw:text-style-name="P2" draw:layer="layout" svg:width="0.41cm" svg:height="0.538cm" svg:x="15.099cm" svg:y="12.757cm">
            <text:p/>
            <draw:enhanced-geometry svg:viewBox="0 0 93 122" draw:type="non-primitive" draw:enhanced-path="M 65 0  L 92 66  L 0 121  N"/>
          </draw:custom-shape>
          <draw:custom-shape draw:style-name="gr313" draw:text-style-name="P13" draw:layer="layout" svg:width="0.754cm" svg:height="0.424cm" svg:x="14.711cm" svg:y="12.607cm">
            <text:p/>
            <draw:enhanced-geometry svg:viewBox="0 0 171 96" draw:type="non-primitive" draw:enhanced-path="M 170 0  L 144 1  L 0 95  L 25 95  L 170 0  N"/>
          </draw:custom-shape>
          <draw:custom-shape draw:style-name="gr314" draw:text-style-name="P70" draw:layer="layout" svg:width="0.278cm" svg:height="0.423cm" svg:x="14.728cm" svg:y="13.022cm">
            <text:p/>
            <draw:enhanced-geometry svg:viewBox="0 0 63 96" draw:type="non-primitive" draw:enhanced-path="M 0 1  L 40 95  L 62 95  L 23 0  L 0 1  N"/>
          </draw:custom-shape>
          <draw:g draw:style-name="gr4">
            <draw:g draw:style-name="gr4">
              <draw:custom-shape draw:style-name="gr315" draw:text-style-name="P2" draw:layer="layout" svg:width="0.075cm" svg:height="0.075cm" svg:x="15.099cm" svg:y="13.436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152cm" svg:y="13.401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205cm" svg:y="13.357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266cm" svg:y="13.317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319cm" svg:y="13.286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4cm" svg:height="0.075cm" svg:x="15.386cm" svg:y="13.242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447cm" svg:y="13.198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505cm" svg:y="13.159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562cm" svg:y="13.123cm">
                <text:p/>
                <draw:enhanced-geometry svg:viewBox="0 0 17 17" draw:type="non-primitive" draw:enhanced-path="M 0 0  L 8 16  L 16 0  N"/>
              </draw:custom-shape>
            </draw:g>
            <draw:g draw:style-name="gr4">
              <draw:custom-shape draw:style-name="gr315" draw:text-style-name="P2" draw:layer="layout" svg:width="0.075cm" svg:height="0.075cm" svg:x="15.165cm" svg:y="13.458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84cm" svg:height="0.075cm" svg:x="15.218cm" svg:y="13.41cm">
                <text:p/>
                <draw:enhanced-geometry svg:viewBox="0 0 19 17" draw:type="non-primitive" draw:enhanced-path="M 0 0  L 9 16  L 18 0  N"/>
              </draw:custom-shape>
              <draw:custom-shape draw:style-name="gr315" draw:text-style-name="P2" draw:layer="layout" svg:width="0.075cm" svg:height="0.075cm" svg:x="15.284cm" svg:y="13.37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9cm" svg:height="0.075cm" svg:x="15.337cm" svg:y="13.344cm">
                <text:p/>
                <draw:enhanced-geometry svg:viewBox="0 0 18 17" draw:type="non-primitive" draw:enhanced-path="M 0 0  L 9 16  L 17 0  N"/>
              </draw:custom-shape>
              <draw:custom-shape draw:style-name="gr315" draw:text-style-name="P2" draw:layer="layout" svg:width="0.075cm" svg:height="0.075cm" svg:x="15.403cm" svg:y="13.304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46cm" svg:y="13.256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9cm" svg:height="0.075cm" svg:x="15.518cm" svg:y="13.216cm">
                <text:p/>
                <draw:enhanced-geometry svg:viewBox="0 0 18 17" draw:type="non-primitive" draw:enhanced-path="M 0 0  L 9 16  L 17 0  N"/>
              </draw:custom-shape>
              <draw:custom-shape draw:style-name="gr315" draw:text-style-name="P2" draw:layer="layout" svg:width="0.075cm" svg:height="0.075cm" svg:x="15.58cm" svg:y="13.181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641cm" svg:y="13.141cm">
                <text:p/>
                <draw:enhanced-geometry svg:viewBox="0 0 17 17" draw:type="non-primitive" draw:enhanced-path="M 0 0  L 8 16  L 16 0  N"/>
              </draw:custom-shape>
            </draw:g>
            <draw:g draw:style-name="gr4">
              <draw:custom-shape draw:style-name="gr315" draw:text-style-name="P2" draw:layer="layout" svg:width="0.075cm" svg:height="0.075cm" svg:x="15.187cm" svg:y="13.503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244cm" svg:y="13.458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306cm" svg:y="13.414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363cm" svg:y="13.375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43cm" svg:y="13.344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491cm" svg:y="13.304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544cm" svg:y="13.26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61cm" svg:y="13.22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663cm" svg:y="13.185cm">
                <text:p/>
                <draw:enhanced-geometry svg:viewBox="0 0 17 17" draw:type="non-primitive" draw:enhanced-path="M 0 0  L 8 16  L 16 0  N"/>
              </draw:custom-shape>
            </draw:g>
            <draw:g draw:style-name="gr4">
              <draw:custom-shape draw:style-name="gr315" draw:text-style-name="P2" draw:layer="layout" svg:width="0.075cm" svg:height="0.075cm" svg:x="15.244cm" svg:y="13.52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306cm" svg:y="13.485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8cm" svg:height="0.075cm" svg:x="15.363cm" svg:y="13.445cm">
                <text:p/>
                <draw:enhanced-geometry svg:viewBox="0 0 18 17" draw:type="non-primitive" draw:enhanced-path="M 0 0  L 9 16  L 17 0  N"/>
              </draw:custom-shape>
              <draw:custom-shape draw:style-name="gr315" draw:text-style-name="P2" draw:layer="layout" svg:width="0.075cm" svg:height="0.075cm" svg:x="15.43cm" svg:y="13.406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491cm" svg:y="13.361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549cm" svg:y="13.326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61cm" svg:y="13.291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663cm" svg:y="13.251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721cm" svg:y="13.207cm">
                <text:p/>
                <draw:enhanced-geometry svg:viewBox="0 0 17 17" draw:type="non-primitive" draw:enhanced-path="M 0 0  L 8 16  L 16 0  N"/>
              </draw:custom-shape>
            </draw:g>
            <draw:g draw:style-name="gr4">
              <draw:custom-shape draw:style-name="gr315" draw:text-style-name="P2" draw:layer="layout" svg:width="0.08cm" svg:height="0.075cm" svg:x="15.35cm" svg:y="13.529cm">
                <text:p/>
                <draw:enhanced-geometry svg:viewBox="0 0 18 17" draw:type="non-primitive" draw:enhanced-path="M 0 0  L 9 16  L 17 0  N"/>
              </draw:custom-shape>
              <draw:custom-shape draw:style-name="gr315" draw:text-style-name="P2" draw:layer="layout" svg:width="0.075cm" svg:height="0.075cm" svg:x="15.416cm" svg:y="13.494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238cm" svg:height="0.146cm" svg:x="15.478cm" svg:y="13.335cm">
                <text:p/>
                <draw:enhanced-geometry svg:viewBox="0 0 54 33" draw:type="non-primitive" draw:enhanced-path="M 0 27  L 7 32  L 53 0  N"/>
              </draw:custom-shape>
              <draw:custom-shape draw:style-name="gr315" draw:text-style-name="P2" draw:layer="layout" svg:width="0.075cm" svg:height="0.075cm" svg:x="15.707cm" svg:y="13.3cm">
                <text:p/>
                <draw:enhanced-geometry svg:viewBox="0 0 17 17" draw:type="non-primitive" draw:enhanced-path="M 0 0  L 8 16  L 16 0  N"/>
              </draw:custom-shape>
              <draw:custom-shape draw:style-name="gr315" draw:text-style-name="P2" draw:layer="layout" svg:width="0.075cm" svg:height="0.075cm" svg:x="15.765cm" svg:y="13.251cm">
                <text:p/>
                <draw:enhanced-geometry svg:viewBox="0 0 17 17" draw:type="non-primitive" draw:enhanced-path="M 0 0  L 8 16  L 16 0  N"/>
              </draw:custom-shape>
            </draw:g>
          </draw:g>
        </draw:g>
        <draw:custom-shape draw:style-name="gr316" draw:text-style-name="P2" draw:layer="layout" svg:width="4.233cm" svg:height="1.614cm" svg:x="20.955cm" svg:y="16.087cm">
          <text:p/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317" draw:text-style-name="P70" draw:layer="layout" svg:width="0.71cm" svg:height="2.134cm" svg:x="12.131cm" svg:y="4.639cm">
              <text:p/>
              <draw:enhanced-geometry svg:viewBox="0 0 161 484" draw:type="non-primitive" draw:enhanced-path="M 0 0  L 0 402  L 160 483  L 160 82  L 0 0  N"/>
            </draw:custom-shape>
            <draw:custom-shape draw:style-name="gr318" draw:text-style-name="P71" draw:layer="layout" svg:width="1.027cm" svg:height="2.333cm" svg:x="12.815cm" svg:y="4.392cm">
              <text:p/>
              <draw:enhanced-geometry svg:viewBox="0 0 233 529" draw:type="non-primitive" draw:enhanced-path="M 3 528  L 232 375  L 232 0  L 0 142  L 3 528  N"/>
            </draw:custom-shape>
            <draw:custom-shape draw:style-name="gr319" draw:text-style-name="P13" draw:layer="layout" svg:width="1.751cm" svg:height="0.97cm" svg:x="12.109cm" svg:y="4.066cm">
              <text:p/>
              <draw:enhanced-geometry svg:viewBox="0 0 397 220" draw:type="non-primitive" draw:enhanced-path="M 0 135  L 234 0  L 396 81  L 162 219  L 0 135  N"/>
            </draw:custom-shape>
            <draw:custom-shape draw:style-name="gr320" draw:text-style-name="P13" draw:layer="layout" svg:width="1.124cm" svg:height="0.653cm" svg:x="12.815cm" svg:y="4.595cm">
              <text:p/>
              <draw:enhanced-geometry svg:viewBox="0 0 255 148" draw:type="non-primitive" draw:enhanced-path="M 21 147  L 254 8  L 233 0  L 0 139  L 21 147  N"/>
            </draw:custom-shape>
            <draw:custom-shape draw:style-name="gr321" draw:text-style-name="P71" draw:layer="layout" svg:width="1.067cm" svg:height="1.826cm" svg:x="12.894cm" svg:y="4.639cm">
              <text:p/>
              <draw:enhanced-geometry svg:viewBox="0 0 242 414" draw:type="non-primitive" draw:enhanced-path="M 0 413  L 241 252  L 241 0  L 3 139  L 0 413  N"/>
            </draw:custom-shape>
            <draw:custom-shape draw:style-name="gr322" draw:text-style-name="P70" draw:layer="layout" svg:width="0.829cm" svg:height="2.117cm" svg:x="12.109cm" svg:y="4.652cm">
              <text:p/>
              <draw:enhanced-geometry svg:viewBox="0 0 188 480" draw:type="non-primitive" draw:enhanced-path="M 4 0  L 0 396  L 159 479  L 166 426  L 187 413  L 187 147  L 162 130  L 162 91  L 4 0  N"/>
            </draw:custom-shape>
          </draw:g>
          <draw:g draw:style-name="gr4">
            <draw:line draw:style-name="gr232" draw:text-style-name="P14" draw:layer="layout" svg:x1="12.995cm" svg:y1="5.583cm" svg:x2="13.939cm" svg:y2="5.005cm">
              <text:p/>
            </draw:line>
            <draw:line draw:style-name="gr232" draw:text-style-name="P14" draw:layer="layout" svg:x1="12.995cm" svg:y1="5.988cm" svg:x2="13.939cm" svg:y2="5.428cm">
              <text:p/>
            </draw:line>
            <draw:line draw:style-name="gr232" draw:text-style-name="P14" draw:layer="layout" svg:x1="12.995cm" svg:y1="6.129cm" svg:x2="13.939cm" svg:y2="5.582cm">
              <text:p/>
            </draw:line>
            <draw:g draw:style-name="gr1">
              <draw:line draw:style-name="gr232" draw:text-style-name="P14" draw:layer="layout" svg:x1="13.595cm" svg:y1="5.331cm" svg:x2="13.851cm" svg:y2="5.173cm">
                <text:p/>
              </draw:line>
              <draw:line draw:style-name="gr232" draw:text-style-name="P14" draw:layer="layout" svg:x1="13.595cm" svg:y1="5.393cm" svg:x2="13.851cm" svg:y2="5.243cm">
                <text:p/>
              </draw:line>
              <draw:line draw:style-name="gr232" draw:text-style-name="P14" draw:layer="layout" svg:x1="13.595cm" svg:y1="5.442cm" svg:x2="13.851cm" svg:y2="5.292cm">
                <text:p/>
              </draw:line>
            </draw:g>
            <draw:g draw:style-name="gr1">
              <draw:line draw:style-name="gr232" draw:text-style-name="P14" draw:layer="layout" svg:x1="13.115cm" svg:y1="5.63cm" svg:x2="13.37cm" svg:y2="5.467cm">
                <text:p/>
              </draw:line>
              <draw:line draw:style-name="gr232" draw:text-style-name="P14" draw:layer="layout" svg:x1="13.115cm" svg:y1="5.684cm" svg:x2="13.37cm" svg:y2="5.534cm">
                <text:p/>
              </draw:line>
              <draw:line draw:style-name="gr232" draw:text-style-name="P14" draw:layer="layout" svg:x1="13.115cm" svg:y1="5.736cm" svg:x2="13.37cm" svg:y2="5.595cm">
                <text:p/>
              </draw:line>
            </draw:g>
          </draw:g>
        </draw:g>
        <draw:g draw:style-name="gr4">
          <draw:g draw:style-name="gr4">
            <draw:custom-shape draw:style-name="gr317" draw:text-style-name="P70" draw:layer="layout" svg:width="0.71cm" svg:height="2.134cm" svg:x="13.78cm" svg:y="4.692cm">
              <text:p/>
              <draw:enhanced-geometry svg:viewBox="0 0 161 484" draw:type="non-primitive" draw:enhanced-path="M 0 0  L 0 402  L 160 483  L 160 82  L 0 0  N"/>
            </draw:custom-shape>
            <draw:custom-shape draw:style-name="gr318" draw:text-style-name="P71" draw:layer="layout" svg:width="1.027cm" svg:height="2.333cm" svg:x="14.464cm" svg:y="4.445cm">
              <text:p/>
              <draw:enhanced-geometry svg:viewBox="0 0 233 529" draw:type="non-primitive" draw:enhanced-path="M 3 528  L 232 375  L 232 0  L 0 142  L 3 528  N"/>
            </draw:custom-shape>
            <draw:custom-shape draw:style-name="gr319" draw:text-style-name="P13" draw:layer="layout" svg:width="1.751cm" svg:height="0.97cm" svg:x="13.758cm" svg:y="4.119cm">
              <text:p/>
              <draw:enhanced-geometry svg:viewBox="0 0 397 220" draw:type="non-primitive" draw:enhanced-path="M 0 135  L 234 0  L 396 81  L 162 219  L 0 135  N"/>
            </draw:custom-shape>
            <draw:custom-shape draw:style-name="gr323" draw:text-style-name="P13" draw:layer="layout" svg:width="1.124cm" svg:height="0.652cm" svg:x="14.464cm" svg:y="4.648cm">
              <text:p/>
              <draw:enhanced-geometry svg:viewBox="0 0 255 148" draw:type="non-primitive" draw:enhanced-path="M 21 147  L 254 8  L 233 0  L 0 139  L 21 147  N"/>
            </draw:custom-shape>
            <draw:custom-shape draw:style-name="gr321" draw:text-style-name="P71" draw:layer="layout" svg:width="1.067cm" svg:height="1.826cm" svg:x="14.543cm" svg:y="4.692cm">
              <text:p/>
              <draw:enhanced-geometry svg:viewBox="0 0 242 414" draw:type="non-primitive" draw:enhanced-path="M 0 413  L 241 252  L 241 0  L 3 139  L 0 413  N"/>
            </draw:custom-shape>
            <draw:custom-shape draw:style-name="gr322" draw:text-style-name="P70" draw:layer="layout" svg:width="0.829cm" svg:height="2.117cm" svg:x="13.758cm" svg:y="4.705cm">
              <text:p/>
              <draw:enhanced-geometry svg:viewBox="0 0 188 480" draw:type="non-primitive" draw:enhanced-path="M 4 0  L 0 396  L 159 479  L 166 426  L 187 413  L 187 147  L 162 130  L 162 91  L 4 0  N"/>
            </draw:custom-shape>
          </draw:g>
          <draw:g draw:style-name="gr4">
            <draw:line draw:style-name="gr232" draw:text-style-name="P14" draw:layer="layout" svg:x1="14.645cm" svg:y1="5.636cm" svg:x2="15.588cm" svg:y2="5.058cm">
              <text:p/>
            </draw:line>
            <draw:line draw:style-name="gr232" draw:text-style-name="P14" draw:layer="layout" svg:x1="14.645cm" svg:y1="6.041cm" svg:x2="15.588cm" svg:y2="5.481cm">
              <text:p/>
            </draw:line>
            <draw:line draw:style-name="gr232" draw:text-style-name="P14" draw:layer="layout" svg:x1="14.645cm" svg:y1="6.182cm" svg:x2="15.588cm" svg:y2="5.636cm">
              <text:p/>
            </draw:line>
            <draw:g draw:style-name="gr1">
              <draw:line draw:style-name="gr232" draw:text-style-name="P14" draw:layer="layout" svg:x1="15.244cm" svg:y1="5.384cm" svg:x2="15.5cm" svg:y2="5.226cm">
                <text:p/>
              </draw:line>
              <draw:line draw:style-name="gr232" draw:text-style-name="P14" draw:layer="layout" svg:x1="15.244cm" svg:y1="5.446cm" svg:x2="15.5cm" svg:y2="5.296cm">
                <text:p/>
              </draw:line>
              <draw:line draw:style-name="gr232" draw:text-style-name="P14" draw:layer="layout" svg:x1="15.244cm" svg:y1="5.495cm" svg:x2="15.5cm" svg:y2="5.345cm">
                <text:p/>
              </draw:line>
            </draw:g>
            <draw:g draw:style-name="gr1">
              <draw:line draw:style-name="gr232" draw:text-style-name="P14" draw:layer="layout" svg:x1="14.764cm" svg:y1="5.683cm" svg:x2="15.02cm" svg:y2="5.52cm">
                <text:p/>
              </draw:line>
              <draw:line draw:style-name="gr232" draw:text-style-name="P14" draw:layer="layout" svg:x1="14.764cm" svg:y1="5.737cm" svg:x2="15.02cm" svg:y2="5.587cm">
                <text:p/>
              </draw:line>
              <draw:line draw:style-name="gr232" draw:text-style-name="P14" draw:layer="layout" svg:x1="14.764cm" svg:y1="5.789cm" svg:x2="15.02cm" svg:y2="5.648cm">
                <text:p/>
              </draw:line>
            </draw:g>
          </draw:g>
        </draw:g>
        <draw:custom-shape draw:style-name="gr324" draw:text-style-name="P68" draw:layer="layout" svg:width="2.576cm" svg:height="0.866cm" svg:x="5.671cm" svg:y="12.784cm">
          <text:list text:style-name="L5">
            <text:list-header>
              <text:p text:style-name="P67"><text:span text:style-name="T41">Lond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5" draw:text-style-name="P68" draw:layer="layout" svg:width="2.169cm" svg:height="0.866cm" svg:x="11.492cm" svg:y="12.819cm">
          <text:list text:style-name="L5">
            <text:list-header>
              <text:p text:style-name="P67"><text:span text:style-name="T41">Toky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6" draw:text-style-name="P68" draw:layer="layout" svg:width="4.362cm" svg:height="0.866cm" svg:x="17.424cm" svg:y="12.775cm">
          <text:list text:style-name="L5">
            <text:list-header>
              <text:p text:style-name="P67"><text:span text:style-name="T41">San Francisco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4">
          <draw:custom-shape draw:style-name="gr296" draw:text-style-name="P70" draw:layer="layout" svg:width="0.498cm" svg:height="0.502cm" svg:x="22.102cm" svg:y="5.583cm">
            <text:p/>
            <draw:enhanced-geometry svg:viewBox="0 0 113 114" draw:type="non-primitive" draw:enhanced-path="M 0 0  L 0 49  L 112 113  L 112 61  L 0 0  N"/>
          </draw:custom-shape>
          <draw:custom-shape draw:style-name="gr297" draw:text-style-name="P71" draw:layer="layout" svg:width="0.71cm" svg:height="0.683cm" svg:x="22.587cm" svg:y="5.402cm">
            <text:p/>
            <draw:enhanced-geometry svg:viewBox="0 0 161 155" draw:type="non-primitive" draw:enhanced-path="M 2 154  L 160 53  L 160 0  L 0 106  L 2 154  N"/>
          </draw:custom-shape>
          <draw:custom-shape draw:style-name="gr298" draw:text-style-name="P13" draw:layer="layout" svg:width="1.217cm" svg:height="0.741cm" svg:x="22.102cm" svg:y="5.146cm">
            <text:p/>
            <draw:enhanced-geometry svg:viewBox="0 0 276 168" draw:type="non-primitive" draw:enhanced-path="M 0 98  L 162 0  L 275 62  L 111 167  L 0 98  N"/>
          </draw:custom-shape>
          <draw:custom-shape draw:style-name="gr299" draw:text-style-name="P72" draw:layer="layout" svg:width="1.098cm" svg:height="0.692cm" svg:x="22.11cm" svg:y="4.551cm">
            <text:p/>
            <draw:enhanced-geometry svg:viewBox="0 0 249 157" draw:type="non-primitive" draw:enhanced-path="M 0 77  L 51 107  L 36 117  L 101 156  L 248 51  L 188 20  L 176 28  L 118 0  L 0 77  N"/>
          </draw:custom-shape>
          <draw:custom-shape draw:style-name="gr281" draw:text-style-name="P70" draw:layer="layout" svg:width="0.503cm" svg:height="0.829cm" svg:x="22.11cm" svg:y="4.873cm">
            <text:p/>
            <draw:enhanced-geometry svg:viewBox="0 0 114 188" draw:type="non-primitive" draw:enhanced-path="M 2 0  L 0 89  L 39 133  L 39 146  L 111 187  L 113 75  L 43 46  L 54 35  L 2 0  N"/>
          </draw:custom-shape>
          <draw:custom-shape draw:style-name="gr255" draw:text-style-name="P71" draw:layer="layout" svg:width="0.613cm" svg:height="0.922cm" svg:x="22.604cm" svg:y="4.78cm">
            <text:p/>
            <draw:enhanced-geometry svg:viewBox="0 0 139 209" draw:type="non-primitive" draw:enhanced-path="M 138 0  L 138 113  L 0 208  L 0 97  L 138 0  N"/>
          </draw:custom-shape>
          <draw:custom-shape draw:style-name="gr301" draw:text-style-name="P73" draw:layer="layout" svg:width="0.454cm" svg:height="0.675cm" svg:x="22.679cm" svg:y="4.89cm">
            <text:p/>
            <draw:enhanced-geometry svg:viewBox="0 0 103 153" draw:type="non-primitive" draw:enhanced-path="M 102 0  L 102 83  L 0 152  L 0 77  L 102 0  N"/>
          </draw:custom-shape>
          <draw:custom-shape draw:style-name="gr228" draw:text-style-name="P2" draw:layer="layout" svg:width="0.445cm" svg:height="0.653cm" svg:x="22.688cm" svg:y="4.912cm">
            <text:p/>
            <draw:enhanced-geometry svg:viewBox="0 0 101 148" draw:type="non-primitive" draw:enhanced-path="M 100 0  L 100 82  L 0 147  N"/>
          </draw:custom-shape>
          <draw:custom-shape draw:style-name="gr327" draw:text-style-name="P71" draw:layer="layout" svg:width="0.961cm" svg:height="0.644cm" svg:x="22.644cm" svg:y="5.627cm">
            <text:p/>
            <draw:enhanced-geometry svg:viewBox="0 0 218 146" draw:type="non-primitive" draw:enhanced-path="M 64 145  L 217 38  L 161 0  L 0 107  L 64 145  N"/>
          </draw:custom-shape>
          <draw:custom-shape draw:style-name="gr303" draw:text-style-name="P74" draw:layer="layout" svg:width="0.957cm" svg:height="0.683cm" svg:x="22.644cm" svg:y="5.561cm">
            <text:p/>
            <draw:enhanced-geometry svg:viewBox="0 0 217 155" draw:type="non-primitive" draw:enhanced-path="M 64 154  L 216 48  L 160 0  L 0 107  L 64 154  N"/>
          </draw:custom-shape>
          <draw:custom-shape draw:style-name="gr231" draw:text-style-name="P70" draw:layer="layout" svg:width="0.295cm" svg:height="0.229cm" svg:x="22.644cm" svg:y="6.046cm">
            <text:p/>
            <draw:enhanced-geometry svg:viewBox="0 0 67 52" draw:type="non-primitive" draw:enhanced-path="M 0 0  L 0 14  L 66 51  L 66 44  L 0 0  N"/>
          </draw:custom-shape>
          <draw:line draw:style-name="gr232" draw:text-style-name="P14" draw:layer="layout" svg:x1="22.719cm" svg:y1="6.045cm" svg:x2="23.372cm" svg:y2="5.608cm">
            <text:p/>
          </draw:line>
          <draw:custom-shape draw:style-name="gr328" draw:text-style-name="P70" draw:layer="layout" svg:width="0.64cm" svg:height="0.459cm" svg:x="22.767cm" svg:y="5.728cm">
            <text:p/>
            <draw:enhanced-geometry svg:viewBox="0 0 145 104" draw:type="non-primitive" draw:enhanced-path="M 0 77  L 36 103  L 144 25  L 112 0  L 0 77  N"/>
          </draw:custom-shape>
          <draw:custom-shape draw:style-name="gr231" draw:text-style-name="P70" draw:layer="layout" svg:width="0.229cm" svg:height="0.186cm" svg:x="23.292cm" svg:y="5.644cm">
            <text:p/>
            <draw:enhanced-geometry svg:viewBox="0 0 52 42" draw:type="non-primitive" draw:enhanced-path="M 0 17  L 31 41  L 51 25  L 21 0  L 0 17  N"/>
          </draw:custom-shape>
          <draw:custom-shape draw:style-name="gr329" draw:text-style-name="P13" draw:layer="layout" svg:width="0.64cm" svg:height="0.45cm" svg:x="22.767cm" svg:y="5.715cm">
            <text:p/>
            <draw:enhanced-geometry svg:viewBox="0 0 145 102" draw:type="non-primitive" draw:enhanced-path="M 0 75  L 36 101  L 144 25  L 112 0  L 0 75  N"/>
          </draw:custom-shape>
          <draw:custom-shape draw:style-name="gr235" draw:text-style-name="P13" draw:layer="layout" svg:width="0.229cm" svg:height="0.185cm" svg:x="23.292cm" svg:y="5.627cm">
            <text:p/>
            <draw:enhanced-geometry svg:viewBox="0 0 52 42" draw:type="non-primitive" draw:enhanced-path="M 0 17  L 31 41  L 51 25  L 21 0  L 0 17  N"/>
          </draw:custom-shape>
        </draw:g>
        <draw:custom-shape draw:style-name="gr330" draw:text-style-name="P84" draw:layer="layout" svg:width="3.81cm" svg:height="1.443cm" svg:x="18.045cm" svg:y="5.411cm">
          <text:list text:style-name="L5">
            <text:list-header>
              <text:p text:style-name="P83"><text:span text:style-name="T42">Management Conso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1" draw:text-style-name="P2" draw:layer="layout" svg:width="2.831cm" svg:height="3.85cm" svg:x="15.919cm" svg:y="9.26cm">
          <text:p/>
          <draw:enhanced-geometry svg:viewBox="0 0 642 873" draw:type="non-primitive" draw:enhanced-path="M 641 0  L 277 550  L 302 406  L 0 872  N"/>
        </draw:custom-shape>
        <draw:g draw:style-name="gr4">
          <draw:custom-shape draw:style-name="gr332" draw:text-style-name="P75" draw:layer="layout" svg:width="0.921cm" svg:height="0.004cm" svg:x="18.23cm" svg:y="7.995cm">
            <text:p/>
            <draw:enhanced-geometry svg:viewBox="0 0 21600 21600" draw:type="rectangle" draw:enhanced-path="M 0 0 L 21600 0 21600 21600 0 21600 0 0 Z N"/>
          </draw:custom-shape>
          <draw:custom-shape draw:style-name="gr333" draw:text-style-name="P76" draw:layer="layout" svg:width="0.921cm" svg:height="0.001cm" svg:x="18.23cm" svg:y="9.878cm">
            <text:p/>
            <draw:enhanced-geometry svg:viewBox="0 0 21600 21600" draw:type="rectangle" draw:enhanced-path="M 0 0 L 21600 0 21600 21600 0 21600 0 0 Z N"/>
          </draw:custom-shape>
          <draw:custom-shape draw:style-name="gr333" draw:text-style-name="P76" draw:layer="layout" svg:width="0.921cm" svg:height="0.004cm" svg:x="18.23cm" svg:y="9.887cm">
            <text:p/>
            <draw:enhanced-geometry svg:viewBox="0 0 21600 21600" draw:type="rectangle" draw:enhanced-path="M 0 0 L 21600 0 21600 21600 0 21600 0 0 Z N"/>
          </draw:custom-shape>
          <draw:custom-shape draw:style-name="gr334" draw:text-style-name="P77" draw:layer="layout" svg:width="0.921cm" svg:height="0.001cm" svg:x="18.23cm" svg:y="9.913cm">
            <text:p/>
            <draw:enhanced-geometry svg:viewBox="0 0 21600 21600" draw:type="rectangle" draw:enhanced-path="M 0 0 L 21600 0 21600 21600 0 21600 0 0 Z N"/>
          </draw:custom-shape>
          <draw:custom-shape draw:style-name="gr335" draw:text-style-name="P78" draw:layer="layout" svg:width="0.921cm" svg:height="0.001cm" svg:x="18.23cm" svg:y="9.931cm">
            <text:p/>
            <draw:enhanced-geometry svg:viewBox="0 0 21600 21600" draw:type="rectangle" draw:enhanced-path="M 0 0 L 21600 0 21600 21600 0 21600 0 0 Z N"/>
          </draw:custom-shape>
          <draw:custom-shape draw:style-name="gr336" draw:text-style-name="P16" draw:layer="layout" svg:width="0.921cm" svg:height="0.001cm" svg:x="18.23cm" svg:y="9.944cm">
            <text:p/>
            <draw:enhanced-geometry svg:viewBox="0 0 21600 21600" draw:type="rectangle" draw:enhanced-path="M 0 0 L 21600 0 21600 21600 0 21600 0 0 Z N"/>
          </draw:custom-shape>
          <draw:custom-shape draw:style-name="gr336" draw:text-style-name="P16" draw:layer="layout" svg:width="0.921cm" svg:height="0.008cm" svg:x="18.23cm" svg:y="9.962cm">
            <text:p/>
            <draw:enhanced-geometry svg:viewBox="0 0 21600 21600" draw:type="rectangle" draw:enhanced-path="M 0 0 L 21600 0 21600 21600 0 21600 0 0 Z N"/>
          </draw:custom-shape>
          <draw:custom-shape draw:style-name="gr337" draw:text-style-name="P79" draw:layer="layout" svg:width="0.887cm" svg:height="1.954cm" svg:x="18.247cm" svg:y="8.012cm">
            <text:p/>
            <draw:enhanced-geometry svg:viewBox="0 0 21600 21600" draw:type="rectangle" draw:enhanced-path="M 0 0 L 21600 0 21600 21600 0 21600 0 0 Z N"/>
          </draw:custom-shape>
          <draw:custom-shape draw:style-name="gr338" draw:text-style-name="P35" draw:layer="layout" svg:width="1.125cm" svg:height="0.145cm" svg:x="18.128cm" svg:y="9.98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8.247cm" svg:y1="8.864cm" svg:x2="19.143cm" svg:y2="8.864cm">
            <text:p/>
          </draw:line>
          <draw:custom-shape draw:style-name="gr339" draw:text-style-name="P80" draw:layer="layout" svg:width="0.688cm" svg:height="0.092cm" svg:x="18.34cm" svg:y="8.877cm">
            <text:p/>
            <draw:enhanced-geometry svg:viewBox="0 0 21600 21600" draw:type="rectangle" draw:enhanced-path="M 0 0 L 21600 0 21600 21600 0 21600 0 0 Z N"/>
          </draw:custom-shape>
          <draw:custom-shape draw:style-name="gr340" draw:text-style-name="P81" draw:layer="layout" svg:width="0.688cm" svg:height="0.001cm" svg:x="18.34cm" svg:y="9.878cm">
            <text:p/>
            <draw:enhanced-geometry svg:viewBox="0 0 21600 21600" draw:type="rectangle" draw:enhanced-path="M 0 0 L 21600 0 21600 21600 0 21600 0 0 Z N"/>
          </draw:custom-shape>
          <draw:custom-shape draw:style-name="gr341" draw:text-style-name="P34" draw:layer="layout" svg:width="0.688cm" svg:height="0.004cm" svg:x="18.34cm" svg:y="9.887cm">
            <text:p/>
            <draw:enhanced-geometry svg:viewBox="0 0 21600 21600" draw:type="rectangle" draw:enhanced-path="M 0 0 L 21600 0 21600 21600 0 21600 0 0 Z N"/>
          </draw:custom-shape>
          <draw:custom-shape draw:style-name="gr342" draw:text-style-name="P16" draw:layer="layout" svg:width="0.688cm" svg:height="0.001cm" svg:x="18.34cm" svg:y="9.913cm">
            <text:p/>
            <draw:enhanced-geometry svg:viewBox="0 0 21600 21600" draw:type="rectangle" draw:enhanced-path="M 0 0 L 21600 0 21600 21600 0 21600 0 0 Z N"/>
          </draw:custom-shape>
          <draw:line draw:style-name="gr249" draw:text-style-name="P14" draw:layer="layout" svg:x1="18.243cm" svg:y1="8.008cm" svg:x2="18.243cm" svg:y2="9.97cm">
            <text:p/>
          </draw:line>
          <draw:custom-shape draw:style-name="gr250" draw:text-style-name="P80" draw:layer="layout" svg:width="0.035cm" svg:height="0.04cm" svg:x="18.274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4cm" svg:x="18.375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cm" svg:x="18.503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cm" svg:x="18.631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53cm" svg:height="0.04cm" svg:x="18.75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52cm" svg:height="0.04cm" svg:x="18.852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cm" svg:x="18.993cm" svg:y="8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45cm" svg:x="18.459cm" svg:y="8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5cm" svg:x="18.578cm" svg:y="8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45cm" svg:x="18.693cm" svg:y="8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6cm" svg:height="0.045cm" svg:x="18.807cm" svg:y="8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5cm" svg:x="18.931cm" svg:y="8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45cm" svg:x="19.063cm" svg:y="8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cm" svg:x="18.274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4cm" svg:x="18.375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cm" svg:x="18.503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cm" svg:x="18.631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53cm" svg:height="0.04cm" svg:x="18.75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52cm" svg:height="0.04cm" svg:x="18.852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cm" svg:x="18.993cm" svg:y="8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18.34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31cm" svg:x="18.459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31cm" svg:x="18.578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31cm" svg:x="18.693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6cm" svg:height="0.031cm" svg:x="18.807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18.931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31cm" svg:x="19.063cm" svg:y="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82" draw:layer="layout" svg:width="0.075cm" svg:height="0.075cm" svg:x="18.331cm" svg:y="8.145cm">
            <text:p/>
            <draw:enhanced-geometry svg:viewBox="0 0 17 17" draw:type="non-primitive" draw:enhanced-path="M 4 0  L 0 0  L 4 16  L 16 0  L 4 0  N"/>
          </draw:custom-shape>
          <draw:custom-shape draw:style-name="gr251" draw:text-style-name="P82" draw:layer="layout" svg:width="0.075cm" svg:height="0.075cm" svg:x="18.331cm" svg:y="8.096cm">
            <text:p/>
            <draw:enhanced-geometry svg:viewBox="0 0 17 17" draw:type="non-primitive" draw:enhanced-path="M 4 16  L 0 16  L 4 0  L 16 16  L 4 16  N"/>
          </draw:custom-shape>
          <draw:custom-shape draw:style-name="gr339" draw:text-style-name="P80" draw:layer="layout" svg:width="0.688cm" svg:height="0.093cm" svg:x="18.34cm" svg:y="9.106cm">
            <text:p/>
            <draw:enhanced-geometry svg:viewBox="0 0 21600 21600" draw:type="rectangle" draw:enhanced-path="M 0 0 L 21600 0 21600 21600 0 21600 0 0 Z N"/>
          </draw:custom-shape>
          <draw:custom-shape draw:style-name="gr339" draw:text-style-name="P80" draw:layer="layout" svg:width="0.688cm" svg:height="0.093cm" svg:x="18.34cm" svg:y="9.344cm">
            <text:p/>
            <draw:enhanced-geometry svg:viewBox="0 0 21600 21600" draw:type="rectangle" draw:enhanced-path="M 0 0 L 21600 0 21600 21600 0 21600 0 0 Z N"/>
          </draw:custom-shape>
          <draw:custom-shape draw:style-name="gr339" draw:text-style-name="P80" draw:layer="layout" svg:width="0.688cm" svg:height="0.097cm" svg:x="18.34cm" svg:y="9.569cm">
            <text:p/>
            <draw:enhanced-geometry svg:viewBox="0 0 21600 21600" draw:type="rectangle" draw:enhanced-path="M 0 0 L 21600 0 21600 21600 0 21600 0 0 Z N"/>
          </draw:custom-shape>
          <draw:custom-shape draw:style-name="gr339" draw:text-style-name="P80" draw:layer="layout" svg:width="0.688cm" svg:height="0.084cm" svg:x="18.34cm" svg:y="9.807cm">
            <text:p/>
            <draw:enhanced-geometry svg:viewBox="0 0 21600 21600" draw:type="rectangle" draw:enhanced-path="M 0 0 L 21600 0 21600 21600 0 21600 0 0 Z N"/>
          </draw:custom-shape>
          <draw:custom-shape draw:style-name="gr339" draw:text-style-name="P80" draw:layer="layout" svg:width="0.688cm" svg:height="0.093cm" svg:x="18.34cm" svg:y="8.674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80" draw:layer="layout" svg:width="0.238cm" svg:height="0.071cm" svg:x="18.34cm" svg:y="8.365cm">
            <text:p/>
            <draw:enhanced-geometry svg:viewBox="0 0 21600 21600" draw:type="rectangle" draw:enhanced-path="M 0 0 L 21600 0 21600 21600 0 21600 0 0 Z N"/>
          </draw:custom-shape>
        </draw:g>
        <draw:line draw:style-name="gr236" draw:text-style-name="P14" draw:layer="layout" svg:x1="7.373cm" svg:y1="15.588cm" svg:x2="7.369cm" svg:y2="15.968cm">
          <text:p/>
        </draw:line>
        <draw:g draw:style-name="gr4">
          <draw:custom-shape draw:style-name="gr343" draw:text-style-name="P69" draw:layer="layout" svg:width="4.326cm" svg:height="1.349cm" svg:x="0.754cm" svg:y="12.374cm">
            <text:p/>
            <draw:enhanced-geometry svg:viewBox="0 0 21600 21600" draw:type="rectangle" draw:enhanced-path="M 0 0 L 21600 0 21600 21600 0 21600 0 0 Z N"/>
          </draw:custom-shape>
          <draw:custom-shape draw:style-name="gr344" draw:text-style-name="P68" draw:layer="layout" svg:width="4.842cm" svg:height="1.475cm" svg:x="0.635cm" svg:y="12.277cm">
            <text:list text:style-name="L17">
              <text:list-header>
                <text:p text:style-name="P67"><text:span text:style-name="T40">Interconnected Workgroup</text:span><text:span text:style-name="T43"> 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7" draw:text-style-name="P14" draw:layer="layout" svg:x1="7.832cm" svg:y1="13.969cm" svg:x2="12.488cm" svg:y2="9.312cm">
          <text:p/>
        </draw:line>
        <draw:g draw:style-name="gr4">
          <draw:custom-shape draw:style-name="gr221" draw:text-style-name="P70" draw:layer="layout" svg:width="0.489cm" svg:height="0.507cm" svg:x="8.436cm" svg:y="11.937cm">
            <text:p/>
            <draw:enhanced-geometry svg:viewBox="0 0 111 115" draw:type="non-primitive" draw:enhanced-path="M 0 0  L 0 50  L 110 114  L 110 61  L 0 0  N"/>
          </draw:custom-shape>
          <draw:custom-shape draw:style-name="gr345" draw:text-style-name="P71" draw:layer="layout" svg:width="0.71cm" svg:height="0.688cm" svg:x="8.916cm" svg:y="11.752cm">
            <text:p/>
            <draw:enhanced-geometry svg:viewBox="0 0 161 156" draw:type="non-primitive" draw:enhanced-path="M 2 155  L 160 53  L 160 0  L 0 106  L 2 155  N"/>
          </draw:custom-shape>
          <draw:custom-shape draw:style-name="gr346" draw:text-style-name="P13" draw:layer="layout" svg:width="1.208cm" svg:height="0.736cm" svg:x="8.436cm" svg:y="11.501cm">
            <text:p/>
            <draw:enhanced-geometry svg:viewBox="0 0 274 167" draw:type="non-primitive" draw:enhanced-path="M 0 97  L 161 0  L 273 62  L 111 166  L 0 97  N"/>
          </draw:custom-shape>
          <draw:custom-shape draw:style-name="gr347" draw:text-style-name="P72" draw:layer="layout" svg:width="1.102cm" svg:height="0.688cm" svg:x="8.445cm" svg:y="10.91cm">
            <text:p/>
            <draw:enhanced-geometry svg:viewBox="0 0 250 156" draw:type="non-primitive" draw:enhanced-path="M 0 77  L 51 106  L 36 117  L 102 155  L 249 51  L 189 20  L 176 28  L 118 0  L 0 77  N"/>
          </draw:custom-shape>
          <draw:custom-shape draw:style-name="gr300" draw:text-style-name="P70" draw:layer="layout" svg:width="0.502cm" svg:height="0.829cm" svg:x="8.445cm" svg:y="11.232cm">
            <text:p/>
            <draw:enhanced-geometry svg:viewBox="0 0 114 188" draw:type="non-primitive" draw:enhanced-path="M 2 0  L 0 89  L 39 133  L 39 146  L 111 187  L 113 75  L 43 46  L 54 35  L 2 0  N"/>
          </draw:custom-shape>
          <draw:custom-shape draw:style-name="gr282" draw:text-style-name="P71" draw:layer="layout" svg:width="0.617cm" svg:height="0.922cm" svg:x="8.934cm" svg:y="11.139cm">
            <text:p/>
            <draw:enhanced-geometry svg:viewBox="0 0 140 209" draw:type="non-primitive" draw:enhanced-path="M 139 0  L 139 113  L 0 208  L 0 97  L 139 0  N"/>
          </draw:custom-shape>
          <draw:custom-shape draw:style-name="gr227" draw:text-style-name="P73" draw:layer="layout" svg:width="0.454cm" svg:height="0.666cm" svg:x="9.009cm" svg:y="11.249cm">
            <text:p/>
            <draw:enhanced-geometry svg:viewBox="0 0 103 151" draw:type="non-primitive" draw:enhanced-path="M 102 0  L 102 82  L 0 150  L 0 76  L 102 0  N"/>
          </draw:custom-shape>
          <draw:custom-shape draw:style-name="gr283" draw:text-style-name="P2" draw:layer="layout" svg:width="0.445cm" svg:height="0.644cm" svg:x="9.018cm" svg:y="11.271cm">
            <text:p/>
            <draw:enhanced-geometry svg:viewBox="0 0 101 146" draw:type="non-primitive" draw:enhanced-path="M 100 0  L 100 81  L 0 145  N"/>
          </draw:custom-shape>
          <draw:custom-shape draw:style-name="gr348" draw:text-style-name="P71" draw:layer="layout" svg:width="0.966cm" svg:height="0.639cm" svg:x="8.974cm" svg:y="11.986cm">
            <text:p/>
            <draw:enhanced-geometry svg:viewBox="0 0 219 145" draw:type="non-primitive" draw:enhanced-path="M 64 144  L 218 38  L 161 0  L 0 106  L 64 144  N"/>
          </draw:custom-shape>
          <draw:custom-shape draw:style-name="gr349" draw:text-style-name="P74" draw:layer="layout" svg:width="0.971cm" svg:height="0.68cm" svg:x="8.969cm" svg:y="11.919cm">
            <text:p/>
            <draw:enhanced-geometry svg:viewBox="0 0 220 154" draw:type="non-primitive" draw:enhanced-path="M 64 153  L 219 48  L 162 0  L 0 107  L 64 153  N"/>
          </draw:custom-shape>
          <draw:custom-shape draw:style-name="gr231" draw:text-style-name="P70" draw:layer="layout" svg:width="0.295cm" svg:height="0.233cm" svg:x="8.974cm" svg:y="12.396cm">
            <text:p/>
            <draw:enhanced-geometry svg:viewBox="0 0 67 53" draw:type="non-primitive" draw:enhanced-path="M 0 0  L 0 14  L 66 52  L 66 44  L 0 0  N"/>
          </draw:custom-shape>
          <draw:line draw:style-name="gr232" draw:text-style-name="P14" draw:layer="layout" svg:x1="9.049cm" svg:y1="12.396cm" svg:x2="9.697cm" svg:y2="11.964cm">
            <text:p/>
          </draw:line>
          <draw:custom-shape draw:style-name="gr350" draw:text-style-name="P70" draw:layer="layout" svg:width="0.635cm" svg:height="0.459cm" svg:x="9.102cm" svg:y="12.087cm">
            <text:p/>
            <draw:enhanced-geometry svg:viewBox="0 0 144 104" draw:type="non-primitive" draw:enhanced-path="M 0 77  L 36 103  L 143 25  L 111 0  L 0 77  N"/>
          </draw:custom-shape>
          <draw:custom-shape draw:style-name="gr231" draw:text-style-name="P70" draw:layer="layout" svg:width="0.242cm" svg:height="0.181cm" svg:x="9.618cm" svg:y="12.003cm">
            <text:p/>
            <draw:enhanced-geometry svg:viewBox="0 0 55 41" draw:type="non-primitive" draw:enhanced-path="M 0 16  L 33 40  L 54 25  L 22 0  L 0 16  N"/>
          </draw:custom-shape>
          <draw:custom-shape draw:style-name="gr351" draw:text-style-name="P13" draw:layer="layout" svg:width="0.635cm" svg:height="0.45cm" svg:x="9.102cm" svg:y="12.074cm">
            <text:p/>
            <draw:enhanced-geometry svg:viewBox="0 0 144 102" draw:type="non-primitive" draw:enhanced-path="M 0 75  L 36 101  L 143 25  L 111 0  L 0 75  N"/>
          </draw:custom-shape>
          <draw:custom-shape draw:style-name="gr235" draw:text-style-name="P13" draw:layer="layout" svg:width="0.242cm" svg:height="0.18cm" svg:x="9.618cm" svg:y="11.986cm">
            <text:p/>
            <draw:enhanced-geometry svg:viewBox="0 0 55 41" draw:type="non-primitive" draw:enhanced-path="M 0 16  L 33 40  L 54 25  L 22 0  L 0 16  N"/>
          </draw:custom-shape>
        </draw:g>
        <draw:g draw:style-name="gr4">
          <draw:custom-shape draw:style-name="gr352" draw:text-style-name="P75" draw:layer="layout" svg:width="0.918cm" svg:height="0.001cm" svg:x="12.338cm" svg:y="7.999cm">
            <text:p/>
            <draw:enhanced-geometry svg:viewBox="0 0 21600 21600" draw:type="rectangle" draw:enhanced-path="M 0 0 L 21600 0 21600 21600 0 21600 0 0 Z N"/>
          </draw:custom-shape>
          <draw:custom-shape draw:style-name="gr353" draw:text-style-name="P76" draw:layer="layout" svg:width="0.918cm" svg:height="0.001cm" svg:x="12.338cm" svg:y="9.878cm">
            <text:p/>
            <draw:enhanced-geometry svg:viewBox="0 0 21600 21600" draw:type="rectangle" draw:enhanced-path="M 0 0 L 21600 0 21600 21600 0 21600 0 0 Z N"/>
          </draw:custom-shape>
          <draw:custom-shape draw:style-name="gr353" draw:text-style-name="P76" draw:layer="layout" svg:width="0.918cm" svg:height="0.008cm" svg:x="12.338cm" svg:y="9.887cm">
            <text:p/>
            <draw:enhanced-geometry svg:viewBox="0 0 21600 21600" draw:type="rectangle" draw:enhanced-path="M 0 0 L 21600 0 21600 21600 0 21600 0 0 Z N"/>
          </draw:custom-shape>
          <draw:custom-shape draw:style-name="gr354" draw:text-style-name="P77" draw:layer="layout" svg:width="0.918cm" svg:height="0.001cm" svg:x="12.338cm" svg:y="9.917cm">
            <text:p/>
            <draw:enhanced-geometry svg:viewBox="0 0 21600 21600" draw:type="rectangle" draw:enhanced-path="M 0 0 L 21600 0 21600 21600 0 21600 0 0 Z N"/>
          </draw:custom-shape>
          <draw:custom-shape draw:style-name="gr355" draw:text-style-name="P78" draw:layer="layout" svg:width="0.918cm" svg:height="0.001cm" svg:x="12.338cm" svg:y="9.931cm">
            <text:p/>
            <draw:enhanced-geometry svg:viewBox="0 0 21600 21600" draw:type="rectangle" draw:enhanced-path="M 0 0 L 21600 0 21600 21600 0 21600 0 0 Z N"/>
          </draw:custom-shape>
          <draw:custom-shape draw:style-name="gr356" draw:text-style-name="P16" draw:layer="layout" svg:width="0.918cm" svg:height="0.001cm" svg:x="12.338cm" svg:y="9.944cm">
            <text:p/>
            <draw:enhanced-geometry svg:viewBox="0 0 21600 21600" draw:type="rectangle" draw:enhanced-path="M 0 0 L 21600 0 21600 21600 0 21600 0 0 Z N"/>
          </draw:custom-shape>
          <draw:custom-shape draw:style-name="gr356" draw:text-style-name="P16" draw:layer="layout" svg:width="0.918cm" svg:height="0.009cm" svg:x="12.338cm" svg:y="9.966cm">
            <text:p/>
            <draw:enhanced-geometry svg:viewBox="0 0 21600 21600" draw:type="rectangle" draw:enhanced-path="M 0 0 L 21600 0 21600 21600 0 21600 0 0 Z N"/>
          </draw:custom-shape>
          <draw:custom-shape draw:style-name="gr357" draw:text-style-name="P79" draw:layer="layout" svg:width="0.882cm" svg:height="1.953cm" svg:x="12.356cm" svg:y="8.017cm">
            <text:p/>
            <draw:enhanced-geometry svg:viewBox="0 0 21600 21600" draw:type="rectangle" draw:enhanced-path="M 0 0 L 21600 0 21600 21600 0 21600 0 0 Z N"/>
          </draw:custom-shape>
          <draw:custom-shape draw:style-name="gr358" draw:text-style-name="P35" draw:layer="layout" svg:width="1.137cm" svg:height="0.146cm" svg:x="12.233cm" svg:y="9.98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2.347cm" svg:y1="8.864cm" svg:x2="13.251cm" svg:y2="8.864cm">
            <text:p/>
          </draw:line>
          <draw:custom-shape draw:style-name="gr359" draw:text-style-name="P80" draw:layer="layout" svg:width="0.679cm" svg:height="0.088cm" svg:x="12.453cm" svg:y="8.881cm">
            <text:p/>
            <draw:enhanced-geometry svg:viewBox="0 0 21600 21600" draw:type="rectangle" draw:enhanced-path="M 0 0 L 21600 0 21600 21600 0 21600 0 0 Z N"/>
          </draw:custom-shape>
          <draw:custom-shape draw:style-name="gr360" draw:text-style-name="P81" draw:layer="layout" svg:width="0.679cm" svg:height="0.001cm" svg:x="12.453cm" svg:y="9.878cm">
            <text:p/>
            <draw:enhanced-geometry svg:viewBox="0 0 21600 21600" draw:type="rectangle" draw:enhanced-path="M 0 0 L 21600 0 21600 21600 0 21600 0 0 Z N"/>
          </draw:custom-shape>
          <draw:custom-shape draw:style-name="gr361" draw:text-style-name="P34" draw:layer="layout" svg:width="0.679cm" svg:height="0.008cm" svg:x="12.453cm" svg:y="9.887cm">
            <text:p/>
            <draw:enhanced-geometry svg:viewBox="0 0 21600 21600" draw:type="rectangle" draw:enhanced-path="M 0 0 L 21600 0 21600 21600 0 21600 0 0 Z N"/>
          </draw:custom-shape>
          <draw:custom-shape draw:style-name="gr362" draw:text-style-name="P16" draw:layer="layout" svg:width="0.679cm" svg:height="0.001cm" svg:x="12.453cm" svg:y="9.917cm">
            <text:p/>
            <draw:enhanced-geometry svg:viewBox="0 0 21600 21600" draw:type="rectangle" draw:enhanced-path="M 0 0 L 21600 0 21600 21600 0 21600 0 0 Z N"/>
          </draw:custom-shape>
          <draw:line draw:style-name="gr249" draw:text-style-name="P14" draw:layer="layout" svg:x1="12.343cm" svg:y1="8.008cm" svg:x2="12.343cm" svg:y2="9.975cm">
            <text:p/>
          </draw:line>
          <draw:custom-shape draw:style-name="gr250" draw:text-style-name="P80" draw:layer="layout" svg:width="0.031cm" svg:height="0.04cm" svg:x="12.378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4cm" svg:x="12.484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9cm" svg:height="0.04cm" svg:x="12.612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9cm" svg:height="0.04cm" svg:x="12.735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4cm" svg:x="12.863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53cm" svg:height="0.04cm" svg:x="12.965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cm" svg:x="13.092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44cm" svg:x="12.559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4cm" svg:x="12.687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26cm" svg:height="0.044cm" svg:x="12.815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44cm" svg:x="12.916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44cm" svg:x="13.04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44cm" svg:x="13.172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35cm" svg:x="12.378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35cm" svg:x="12.484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9cm" svg:height="0.035cm" svg:x="12.612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9cm" svg:height="0.035cm" svg:x="12.735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35cm" svg:x="12.863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53cm" svg:height="0.035cm" svg:x="12.965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5cm" svg:x="13.092cm" svg:y="8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31cm" svg:x="12.453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4cm" svg:height="0.031cm" svg:x="12.559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31cm" svg:x="12.687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26cm" svg:height="0.031cm" svg:x="12.815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4cm" svg:height="0.031cm" svg:x="12.916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5cm" svg:height="0.031cm" svg:x="13.04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80" draw:layer="layout" svg:width="0.031cm" svg:height="0.031cm" svg:x="13.172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82" draw:layer="layout" svg:width="0.075cm" svg:height="0.075cm" svg:x="12.431cm" svg:y="8.149cm">
            <text:p/>
            <draw:enhanced-geometry svg:viewBox="0 0 17 17" draw:type="non-primitive" draw:enhanced-path="M 5 0  L 0 0  L 5 16  L 16 0  L 5 0  N"/>
          </draw:custom-shape>
          <draw:custom-shape draw:style-name="gr251" draw:text-style-name="P82" draw:layer="layout" svg:width="0.075cm" svg:height="0.075cm" svg:x="12.431cm" svg:y="8.101cm">
            <text:p/>
            <draw:enhanced-geometry svg:viewBox="0 0 17 17" draw:type="non-primitive" draw:enhanced-path="M 5 16  L 0 16  L 5 0  L 16 16  L 5 16  N"/>
          </draw:custom-shape>
          <draw:custom-shape draw:style-name="gr359" draw:text-style-name="P80" draw:layer="layout" svg:width="0.679cm" svg:height="0.093cm" svg:x="12.453cm" svg:y="9.11cm">
            <text:p/>
            <draw:enhanced-geometry svg:viewBox="0 0 21600 21600" draw:type="rectangle" draw:enhanced-path="M 0 0 L 21600 0 21600 21600 0 21600 0 0 Z N"/>
          </draw:custom-shape>
          <draw:custom-shape draw:style-name="gr359" draw:text-style-name="P80" draw:layer="layout" svg:width="0.679cm" svg:height="0.097cm" svg:x="12.453cm" svg:y="9.344cm">
            <text:p/>
            <draw:enhanced-geometry svg:viewBox="0 0 21600 21600" draw:type="rectangle" draw:enhanced-path="M 0 0 L 21600 0 21600 21600 0 21600 0 0 Z N"/>
          </draw:custom-shape>
          <draw:custom-shape draw:style-name="gr359" draw:text-style-name="P80" draw:layer="layout" svg:width="0.679cm" svg:height="0.092cm" svg:x="12.453cm" svg:y="9.574cm">
            <text:p/>
            <draw:enhanced-geometry svg:viewBox="0 0 21600 21600" draw:type="rectangle" draw:enhanced-path="M 0 0 L 21600 0 21600 21600 0 21600 0 0 Z N"/>
          </draw:custom-shape>
          <draw:custom-shape draw:style-name="gr359" draw:text-style-name="P80" draw:layer="layout" svg:width="0.679cm" svg:height="0.088cm" svg:x="12.453cm" svg:y="9.807cm">
            <text:p/>
            <draw:enhanced-geometry svg:viewBox="0 0 21600 21600" draw:type="rectangle" draw:enhanced-path="M 0 0 L 21600 0 21600 21600 0 21600 0 0 Z N"/>
          </draw:custom-shape>
          <draw:custom-shape draw:style-name="gr359" draw:text-style-name="P80" draw:layer="layout" svg:width="0.679cm" svg:height="0.093cm" svg:x="12.453cm" svg:y="8.678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80" draw:layer="layout" svg:width="0.234cm" svg:height="0.066cm" svg:x="12.453cm" svg:y="8.3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221" draw:text-style-name="P70" draw:layer="layout" svg:width="0.489cm" svg:height="0.507cm" svg:x="10.663cm" svg:y="11.946cm">
            <text:p/>
            <draw:enhanced-geometry svg:viewBox="0 0 111 115" draw:type="non-primitive" draw:enhanced-path="M 0 0  L 0 50  L 110 114  L 110 61  L 0 0  N"/>
          </draw:custom-shape>
          <draw:custom-shape draw:style-name="gr363" draw:text-style-name="P71" draw:layer="layout" svg:width="0.71cm" svg:height="0.697cm" svg:x="11.143cm" svg:y="11.752cm">
            <text:p/>
            <draw:enhanced-geometry svg:viewBox="0 0 161 158" draw:type="non-primitive" draw:enhanced-path="M 2 157  L 160 54  L 160 0  L 0 108  L 2 157  N"/>
          </draw:custom-shape>
          <draw:custom-shape draw:style-name="gr364" draw:text-style-name="P13" draw:layer="layout" svg:width="1.204cm" svg:height="0.732cm" svg:x="10.663cm" svg:y="11.509cm">
            <text:p/>
            <draw:enhanced-geometry svg:viewBox="0 0 273 166" draw:type="non-primitive" draw:enhanced-path="M 0 97  L 160 0  L 272 61  L 110 165  L 0 97  N"/>
          </draw:custom-shape>
          <draw:custom-shape draw:style-name="gr365" draw:text-style-name="P72" draw:layer="layout" svg:width="1.102cm" svg:height="0.684cm" svg:x="10.672cm" svg:y="10.918cm">
            <text:p/>
            <draw:enhanced-geometry svg:viewBox="0 0 250 155" draw:type="non-primitive" draw:enhanced-path="M 0 76  L 51 105  L 36 116  L 102 154  L 249 50  L 189 20  L 176 27  L 118 0  L 0 76  N"/>
          </draw:custom-shape>
          <draw:custom-shape draw:style-name="gr300" draw:text-style-name="P70" draw:layer="layout" svg:width="0.502cm" svg:height="0.829cm" svg:x="10.672cm" svg:y="11.24cm">
            <text:p/>
            <draw:enhanced-geometry svg:viewBox="0 0 114 188" draw:type="non-primitive" draw:enhanced-path="M 2 0  L 0 89  L 39 133  L 39 146  L 111 187  L 113 75  L 43 46  L 54 35  L 2 0  N"/>
          </draw:custom-shape>
          <draw:custom-shape draw:style-name="gr263" draw:text-style-name="P71" draw:layer="layout" svg:width="0.613cm" svg:height="0.921cm" svg:x="11.161cm" svg:y="11.148cm">
            <text:p/>
            <draw:enhanced-geometry svg:viewBox="0 0 139 209" draw:type="non-primitive" draw:enhanced-path="M 138 0  L 138 113  L 0 208  L 0 97  L 138 0  N"/>
          </draw:custom-shape>
          <draw:custom-shape draw:style-name="gr264" draw:text-style-name="P73" draw:layer="layout" svg:width="0.441cm" svg:height="0.665cm" svg:x="11.245cm" svg:y="11.254cm">
            <text:p/>
            <draw:enhanced-geometry svg:viewBox="0 0 100 151" draw:type="non-primitive" draw:enhanced-path="M 99 0  L 99 82  L 0 150  L 0 76  L 99 0  N"/>
          </draw:custom-shape>
          <draw:custom-shape draw:style-name="gr265" draw:text-style-name="P2" draw:layer="layout" svg:width="0.432cm" svg:height="0.648cm" svg:x="11.254cm" svg:y="11.271cm">
            <text:p/>
            <draw:enhanced-geometry svg:viewBox="0 0 98 147" draw:type="non-primitive" draw:enhanced-path="M 97 0  L 97 82  L 0 146  N"/>
          </draw:custom-shape>
          <draw:custom-shape draw:style-name="gr366" draw:text-style-name="P71" draw:layer="layout" svg:width="0.957cm" svg:height="0.639cm" svg:x="11.205cm" svg:y="11.99cm">
            <text:p/>
            <draw:enhanced-geometry svg:viewBox="0 0 217 145" draw:type="non-primitive" draw:enhanced-path="M 64 144  L 216 38  L 160 0  L 0 106  L 64 144  N"/>
          </draw:custom-shape>
          <draw:custom-shape draw:style-name="gr293" draw:text-style-name="P74" draw:layer="layout" svg:width="0.961cm" svg:height="0.679cm" svg:x="11.201cm" svg:y="11.928cm">
            <text:p/>
            <draw:enhanced-geometry svg:viewBox="0 0 218 154" draw:type="non-primitive" draw:enhanced-path="M 64 153  L 217 48  L 161 0  L 0 107  L 64 153  N"/>
          </draw:custom-shape>
          <draw:custom-shape draw:style-name="gr231" draw:text-style-name="P70" draw:layer="layout" svg:width="0.287cm" svg:height="0.238cm" svg:x="11.205cm" svg:y="12.4cm">
            <text:p/>
            <draw:enhanced-geometry svg:viewBox="0 0 65 54" draw:type="non-primitive" draw:enhanced-path="M 0 0  L 0 14  L 64 53  L 64 45  L 0 0  N"/>
          </draw:custom-shape>
          <draw:line draw:style-name="gr232" draw:text-style-name="P14" draw:layer="layout" svg:x1="11.271cm" svg:y1="12.4cm" svg:x2="11.933cm" svg:y2="11.968cm">
            <text:p/>
          </draw:line>
          <draw:custom-shape draw:style-name="gr367" draw:text-style-name="P70" draw:layer="layout" svg:width="0.644cm" svg:height="0.454cm" svg:x="11.324cm" svg:y="12.096cm">
            <text:p/>
            <draw:enhanced-geometry svg:viewBox="0 0 146 103" draw:type="non-primitive" draw:enhanced-path="M 0 76  L 36 102  L 145 25  L 113 0  L 0 76  N"/>
          </draw:custom-shape>
          <draw:custom-shape draw:style-name="gr231" draw:text-style-name="P70" draw:layer="layout" svg:width="0.238cm" svg:height="0.176cm" svg:x="11.845cm" svg:y="12.012cm">
            <text:p/>
            <draw:enhanced-geometry svg:viewBox="0 0 54 40" draw:type="non-primitive" draw:enhanced-path="M 0 16  L 33 39  L 53 24  L 21 0  L 0 16  N"/>
          </draw:custom-shape>
          <draw:custom-shape draw:style-name="gr368" draw:text-style-name="P13" draw:layer="layout" svg:width="0.644cm" svg:height="0.458cm" svg:x="11.324cm" svg:y="12.074cm">
            <text:p/>
            <draw:enhanced-geometry svg:viewBox="0 0 146 104" draw:type="non-primitive" draw:enhanced-path="M 0 77  L 36 103  L 145 25  L 113 0  L 0 77  N"/>
          </draw:custom-shape>
          <draw:custom-shape draw:style-name="gr235" draw:text-style-name="P13" draw:layer="layout" svg:width="0.238cm" svg:height="0.185cm" svg:x="11.845cm" svg:y="11.99cm">
            <text:p/>
            <draw:enhanced-geometry svg:viewBox="0 0 54 42" draw:type="non-primitive" draw:enhanced-path="M 0 17  L 33 41  L 53 25  L 21 0  L 0 17  N"/>
          </draw:custom-shape>
        </draw:g>
        <draw:line draw:style-name="gr236" draw:text-style-name="P14" draw:layer="layout" svg:x1="10.641cm" svg:y1="10.649cm" svg:x2="15.046cm" svg:y2="10.649cm">
          <text:p/>
        </draw:line>
        <draw:custom-shape draw:style-name="gr369" draw:text-style-name="P86" draw:layer="layout" svg:width="13.493cm" svg:height="1.104cm" svg:x="11.007cm" svg:y="15.421cm">
          <text:list text:style-name="L18">
            <text:list-item>
              <text:p text:style-name="P85"><text:span text:style-name="T44"><text:s/></text:span><text:span text:style-name="T44">100’s to 1000’s of networked servers</text:span></text:p>
            </text:list-item>
          </text:list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231" draw:text-style-name="P70" draw:layer="layout" svg:width="0.251cm" svg:height="0.251cm" svg:x="9.878cm" svg:y="18.23cm">
              <text:p/>
              <draw:enhanced-geometry svg:viewBox="0 0 57 57" draw:type="non-primitive" draw:enhanced-path="M 0 0  L 0 25  L 56 56  L 56 30  L 0 0  N"/>
            </draw:custom-shape>
            <draw:custom-shape draw:style-name="gr370" draw:text-style-name="P71" draw:layer="layout" svg:width="0.366cm" svg:height="0.344cm" svg:x="10.125cm" svg:y="18.137cm">
              <text:p/>
              <draw:enhanced-geometry svg:viewBox="0 0 83 78" draw:type="non-primitive" draw:enhanced-path="M 1 77  L 82 26  L 82 0  L 0 53  L 1 77  N"/>
            </draw:custom-shape>
            <draw:custom-shape draw:style-name="gr371" draw:text-style-name="P13" draw:layer="layout" svg:width="0.617cm" svg:height="0.366cm" svg:x="9.878cm" svg:y="18.014cm">
              <text:p/>
              <draw:enhanced-geometry svg:viewBox="0 0 140 83" draw:type="non-primitive" draw:enhanced-path="M 0 48  L 82 0  L 139 31  L 56 82  L 0 48  N"/>
            </draw:custom-shape>
            <draw:custom-shape draw:style-name="gr372" draw:text-style-name="P72" draw:layer="layout" svg:width="0.569cm" svg:height="0.348cm" svg:x="9.882cm" svg:y="17.714cm">
              <text:p/>
              <draw:enhanced-geometry svg:viewBox="0 0 129 79" draw:type="non-primitive" draw:enhanced-path="M 0 39  L 26 53  L 19 59  L 52 78  L 128 25  L 97 10  L 91 14  L 61 0  L 0 39  N"/>
            </draw:custom-shape>
            <draw:custom-shape draw:style-name="gr373" draw:text-style-name="P70" draw:layer="layout" svg:width="0.26cm" svg:height="0.415cm" svg:x="9.882cm" svg:y="17.881cm">
              <text:p/>
              <draw:enhanced-geometry svg:viewBox="0 0 59 94" draw:type="non-primitive" draw:enhanced-path="M 1 0  L 0 44  L 20 66  L 20 72  L 57 93  L 58 38  L 22 23  L 28 17  L 1 0  N"/>
            </draw:custom-shape>
            <draw:custom-shape draw:style-name="gr374" draw:text-style-name="P71" draw:layer="layout" svg:width="0.317cm" svg:height="0.463cm" svg:x="10.134cm" svg:y="17.833cm">
              <text:p/>
              <draw:enhanced-geometry svg:viewBox="0 0 72 105" draw:type="non-primitive" draw:enhanced-path="M 71 0  L 71 57  L 0 104  L 0 49  L 71 0  N"/>
            </draw:custom-shape>
            <draw:custom-shape draw:style-name="gr375" draw:text-style-name="P73" draw:layer="layout" svg:width="0.234cm" svg:height="0.331cm" svg:x="10.173cm" svg:y="17.886cm">
              <text:p/>
              <draw:enhanced-geometry svg:viewBox="0 0 53 75" draw:type="non-primitive" draw:enhanced-path="M 52 0  L 52 41  L 0 74  L 0 38  L 52 0  N"/>
            </draw:custom-shape>
            <draw:custom-shape draw:style-name="gr376" draw:text-style-name="P2" draw:layer="layout" svg:width="0.225cm" svg:height="0.322cm" svg:x="10.182cm" svg:y="17.895cm">
              <text:p/>
              <draw:enhanced-geometry svg:viewBox="0 0 51 73" draw:type="non-primitive" draw:enhanced-path="M 50 0  L 50 40  L 0 72  N"/>
            </draw:custom-shape>
            <draw:custom-shape draw:style-name="gr377" draw:text-style-name="P71" draw:layer="layout" svg:width="0.498cm" svg:height="0.326cm" svg:x="10.151cm" svg:y="18.252cm">
              <text:p/>
              <draw:enhanced-geometry svg:viewBox="0 0 113 74" draw:type="non-primitive" draw:enhanced-path="M 33 73  L 112 19  L 83 0  L 0 54  L 33 73  N"/>
            </draw:custom-shape>
            <draw:custom-shape draw:style-name="gr378" draw:text-style-name="P74" draw:layer="layout" svg:width="0.498cm" svg:height="0.34cm" svg:x="10.151cm" svg:y="18.221cm">
              <text:p/>
              <draw:enhanced-geometry svg:viewBox="0 0 113 77" draw:type="non-primitive" draw:enhanced-path="M 33 76  L 112 24  L 83 0  L 0 53  L 33 76  N"/>
            </draw:custom-shape>
            <draw:custom-shape draw:style-name="gr231" draw:text-style-name="P70" draw:layer="layout" svg:width="0.159cm" svg:height="0.123cm" svg:x="10.151cm" svg:y="18.455cm">
              <text:p/>
              <draw:enhanced-geometry svg:viewBox="0 0 36 28" draw:type="non-primitive" draw:enhanced-path="M 0 0  L 0 7  L 35 27  L 35 23  L 0 0  N"/>
            </draw:custom-shape>
            <draw:line draw:style-name="gr232" draw:text-style-name="P14" draw:layer="layout" svg:x1="10.195cm" svg:y1="18.455cm" svg:x2="10.53cm" svg:y2="18.239cm">
              <text:p/>
            </draw:line>
            <draw:custom-shape draw:style-name="gr231" draw:text-style-name="P70" draw:layer="layout" svg:width="0.335cm" svg:height="0.225cm" svg:x="10.213cm" svg:y="18.309cm">
              <text:p/>
              <draw:enhanced-geometry svg:viewBox="0 0 76 51" draw:type="non-primitive" draw:enhanced-path="M 0 37  L 19 50  L 75 12  L 58 0  L 0 37  N"/>
            </draw:custom-shape>
            <draw:custom-shape draw:style-name="gr231" draw:text-style-name="P70" draw:layer="layout" svg:width="0.119cm" svg:height="0.097cm" svg:x="10.486cm" svg:y="18.261cm">
              <text:p/>
              <draw:enhanced-geometry svg:viewBox="0 0 27 22" draw:type="non-primitive" draw:enhanced-path="M 0 9  L 16 21  L 26 13  L 11 0  L 0 9  N"/>
            </draw:custom-shape>
            <draw:custom-shape draw:style-name="gr235" draw:text-style-name="P13" draw:layer="layout" svg:width="0.335cm" svg:height="0.229cm" svg:x="10.213cm" svg:y="18.296cm">
              <text:p/>
              <draw:enhanced-geometry svg:viewBox="0 0 76 52" draw:type="non-primitive" draw:enhanced-path="M 0 38  L 19 51  L 75 13  L 58 0  L 0 38  N"/>
            </draw:custom-shape>
            <draw:custom-shape draw:style-name="gr235" draw:text-style-name="P13" draw:layer="layout" svg:width="0.119cm" svg:height="0.097cm" svg:x="10.486cm" svg:y="18.252cm">
              <text:p/>
              <draw:enhanced-geometry svg:viewBox="0 0 27 22" draw:type="non-primitive" draw:enhanced-path="M 0 9  L 16 21  L 26 13  L 11 0  L 0 9  N"/>
            </draw:custom-shape>
          </draw:g>
          <draw:line draw:style-name="gr236" draw:text-style-name="P14" draw:layer="layout" svg:x1="9.869cm" svg:y1="17.582cm" svg:x2="12.114cm" svg:y2="17.582cm">
            <text:p/>
          </draw:line>
          <draw:g draw:style-name="gr4">
            <draw:custom-shape draw:style-name="gr231" draw:text-style-name="P70" draw:layer="layout" svg:width="0.264cm" svg:height="0.251cm" svg:x="10.522cm" svg:y="18.23cm">
              <text:p/>
              <draw:enhanced-geometry svg:viewBox="0 0 60 57" draw:type="non-primitive" draw:enhanced-path="M 0 0  L 0 25  L 59 56  L 59 30  L 0 0  N"/>
            </draw:custom-shape>
            <draw:custom-shape draw:style-name="gr370" draw:text-style-name="P71" draw:layer="layout" svg:width="0.366cm" svg:height="0.344cm" svg:x="10.769cm" svg:y="18.137cm">
              <text:p/>
              <draw:enhanced-geometry svg:viewBox="0 0 83 78" draw:type="non-primitive" draw:enhanced-path="M 1 77  L 82 26  L 82 0  L 0 53  L 1 77  N"/>
            </draw:custom-shape>
            <draw:custom-shape draw:style-name="gr379" draw:text-style-name="P13" draw:layer="layout" svg:width="0.626cm" svg:height="0.366cm" svg:x="10.522cm" svg:y="18.014cm">
              <text:p/>
              <draw:enhanced-geometry svg:viewBox="0 0 142 83" draw:type="non-primitive" draw:enhanced-path="M 0 48  L 83 0  L 141 31  L 57 82  L 0 48  N"/>
            </draw:custom-shape>
            <draw:custom-shape draw:style-name="gr372" draw:text-style-name="P72" draw:layer="layout" svg:width="0.569cm" svg:height="0.348cm" svg:x="10.526cm" svg:y="17.714cm">
              <text:p/>
              <draw:enhanced-geometry svg:viewBox="0 0 129 79" draw:type="non-primitive" draw:enhanced-path="M 0 39  L 26 53  L 19 59  L 52 78  L 128 25  L 97 10  L 91 14  L 61 0  L 0 39  N"/>
            </draw:custom-shape>
            <draw:custom-shape draw:style-name="gr373" draw:text-style-name="P70" draw:layer="layout" svg:width="0.26cm" svg:height="0.415cm" svg:x="10.526cm" svg:y="17.881cm">
              <text:p/>
              <draw:enhanced-geometry svg:viewBox="0 0 59 94" draw:type="non-primitive" draw:enhanced-path="M 1 0  L 0 44  L 20 66  L 20 72  L 57 93  L 58 38  L 22 23  L 28 17  L 1 0  N"/>
            </draw:custom-shape>
            <draw:custom-shape draw:style-name="gr374" draw:text-style-name="P71" draw:layer="layout" svg:width="0.313cm" svg:height="0.463cm" svg:x="10.782cm" svg:y="17.833cm">
              <text:p/>
              <draw:enhanced-geometry svg:viewBox="0 0 71 105" draw:type="non-primitive" draw:enhanced-path="M 70 0  L 70 57  L 0 104  L 0 49  L 70 0  N"/>
            </draw:custom-shape>
            <draw:custom-shape draw:style-name="gr375" draw:text-style-name="P73" draw:layer="layout" svg:width="0.23cm" svg:height="0.331cm" svg:x="10.821cm" svg:y="17.886cm">
              <text:p/>
              <draw:enhanced-geometry svg:viewBox="0 0 52 75" draw:type="non-primitive" draw:enhanced-path="M 51 0  L 51 41  L 0 74  L 0 38  L 51 0  N"/>
            </draw:custom-shape>
            <draw:custom-shape draw:style-name="gr376" draw:text-style-name="P2" draw:layer="layout" svg:width="0.23cm" svg:height="0.322cm" svg:x="10.821cm" svg:y="17.895cm">
              <text:p/>
              <draw:enhanced-geometry svg:viewBox="0 0 52 73" draw:type="non-primitive" draw:enhanced-path="M 51 0  L 51 40  L 0 72  N"/>
            </draw:custom-shape>
            <draw:custom-shape draw:style-name="gr377" draw:text-style-name="P71" draw:layer="layout" svg:width="0.499cm" svg:height="0.326cm" svg:x="10.799cm" svg:y="18.252cm">
              <text:p/>
              <draw:enhanced-geometry svg:viewBox="0 0 113 74" draw:type="non-primitive" draw:enhanced-path="M 33 73  L 112 19  L 83 0  L 0 54  L 33 73  N"/>
            </draw:custom-shape>
            <draw:custom-shape draw:style-name="gr378" draw:text-style-name="P74" draw:layer="layout" svg:width="0.494cm" svg:height="0.34cm" svg:x="10.799cm" svg:y="18.221cm">
              <text:p/>
              <draw:enhanced-geometry svg:viewBox="0 0 112 77" draw:type="non-primitive" draw:enhanced-path="M 33 76  L 111 24  L 82 0  L 0 53  L 33 76  N"/>
            </draw:custom-shape>
            <draw:custom-shape draw:style-name="gr231" draw:text-style-name="P70" draw:layer="layout" svg:width="0.155cm" svg:height="0.123cm" svg:x="10.799cm" svg:y="18.455cm">
              <text:p/>
              <draw:enhanced-geometry svg:viewBox="0 0 35 28" draw:type="non-primitive" draw:enhanced-path="M 0 0  L 0 7  L 34 27  L 34 23  L 0 0  N"/>
            </draw:custom-shape>
            <draw:line draw:style-name="gr232" draw:text-style-name="P14" draw:layer="layout" svg:x1="10.839cm" svg:y1="18.455cm" svg:x2="11.17cm" svg:y2="18.239cm">
              <text:p/>
            </draw:line>
            <draw:custom-shape draw:style-name="gr231" draw:text-style-name="P70" draw:layer="layout" svg:width="0.331cm" svg:height="0.225cm" svg:x="10.861cm" svg:y="18.309cm">
              <text:p/>
              <draw:enhanced-geometry svg:viewBox="0 0 75 51" draw:type="non-primitive" draw:enhanced-path="M 0 37  L 19 50  L 74 12  L 58 0  L 0 37  N"/>
            </draw:custom-shape>
            <draw:custom-shape draw:style-name="gr231" draw:text-style-name="P70" draw:layer="layout" svg:width="0.124cm" svg:height="0.097cm" svg:x="11.13cm" svg:y="18.261cm">
              <text:p/>
              <draw:enhanced-geometry svg:viewBox="0 0 28 22" draw:type="non-primitive" draw:enhanced-path="M 0 9  L 17 21  L 27 13  L 11 0  L 0 9  N"/>
            </draw:custom-shape>
            <draw:custom-shape draw:style-name="gr235" draw:text-style-name="P13" draw:layer="layout" svg:width="0.331cm" svg:height="0.229cm" svg:x="10.861cm" svg:y="18.296cm">
              <text:p/>
              <draw:enhanced-geometry svg:viewBox="0 0 75 52" draw:type="non-primitive" draw:enhanced-path="M 0 38  L 19 51  L 74 13  L 58 0  L 0 38  N"/>
            </draw:custom-shape>
            <draw:custom-shape draw:style-name="gr235" draw:text-style-name="P13" draw:layer="layout" svg:width="0.124cm" svg:height="0.097cm" svg:x="11.13cm" svg:y="18.252cm">
              <text:p/>
              <draw:enhanced-geometry svg:viewBox="0 0 28 22" draw:type="non-primitive" draw:enhanced-path="M 0 9  L 17 21  L 27 13  L 11 0  L 0 9  N"/>
            </draw:custom-shape>
          </draw:g>
          <draw:g draw:style-name="gr4">
            <draw:custom-shape draw:style-name="gr231" draw:text-style-name="P70" draw:layer="layout" svg:width="0.252cm" svg:height="0.26cm" svg:x="11.174cm" svg:y="18.221cm">
              <text:p/>
              <draw:enhanced-geometry svg:viewBox="0 0 57 59" draw:type="non-primitive" draw:enhanced-path="M 0 0  L 0 25  L 56 58  L 56 31  L 0 0  N"/>
            </draw:custom-shape>
            <draw:custom-shape draw:style-name="gr380" draw:text-style-name="P71" draw:layer="layout" svg:width="0.371cm" svg:height="0.348cm" svg:x="11.412cm" svg:y="18.133cm">
              <text:p/>
              <draw:enhanced-geometry svg:viewBox="0 0 84 79" draw:type="non-primitive" draw:enhanced-path="M 1 78  L 83 27  L 83 0  L 0 53  L 1 78  N"/>
            </draw:custom-shape>
            <draw:custom-shape draw:style-name="gr381" draw:text-style-name="P13" draw:layer="layout" svg:width="0.618cm" svg:height="0.371cm" svg:x="11.174cm" svg:y="18.009cm">
              <text:p/>
              <draw:enhanced-geometry svg:viewBox="0 0 140 84" draw:type="non-primitive" draw:enhanced-path="M 0 49  L 82 0  L 139 31  L 56 83  L 0 49  N"/>
            </draw:custom-shape>
            <draw:custom-shape draw:style-name="gr382" draw:text-style-name="P72" draw:layer="layout" svg:width="0.565cm" svg:height="0.344cm" svg:x="11.174cm" svg:y="17.714cm">
              <text:p/>
              <draw:enhanced-geometry svg:viewBox="0 0 128 78" draw:type="non-primitive" draw:enhanced-path="M 0 38  L 26 53  L 19 58  L 52 77  L 127 25  L 96 10  L 90 14  L 60 0  L 0 38  N"/>
            </draw:custom-shape>
            <draw:custom-shape draw:style-name="gr383" draw:text-style-name="P70" draw:layer="layout" svg:width="0.26cm" svg:height="0.41cm" svg:x="11.174cm" svg:y="17.877cm">
              <text:p/>
              <draw:enhanced-geometry svg:viewBox="0 0 59 93" draw:type="non-primitive" draw:enhanced-path="M 1 0  L 0 44  L 20 66  L 20 72  L 57 92  L 58 37  L 22 23  L 28 17  L 1 0  N"/>
            </draw:custom-shape>
            <draw:custom-shape draw:style-name="gr384" draw:text-style-name="P71" draw:layer="layout" svg:width="0.322cm" svg:height="0.458cm" svg:x="11.426cm" svg:y="17.829cm">
              <text:p/>
              <draw:enhanced-geometry svg:viewBox="0 0 73 104" draw:type="non-primitive" draw:enhanced-path="M 72 0  L 72 56  L 0 103  L 0 48  L 72 0  N"/>
            </draw:custom-shape>
            <draw:custom-shape draw:style-name="gr385" draw:text-style-name="P73" draw:layer="layout" svg:width="0.234cm" svg:height="0.336cm" svg:x="11.465cm" svg:y="17.881cm">
              <text:p/>
              <draw:enhanced-geometry svg:viewBox="0 0 53 76" draw:type="non-primitive" draw:enhanced-path="M 52 0  L 52 41  L 0 75  L 0 38  L 52 0  N"/>
            </draw:custom-shape>
            <draw:custom-shape draw:style-name="gr386" draw:text-style-name="P2" draw:layer="layout" svg:width="0.229cm" svg:height="0.327cm" svg:x="11.47cm" svg:y="17.89cm">
              <text:p/>
              <draw:enhanced-geometry svg:viewBox="0 0 52 74" draw:type="non-primitive" draw:enhanced-path="M 51 0  L 51 41  L 0 73  N"/>
            </draw:custom-shape>
            <draw:custom-shape draw:style-name="gr387" draw:text-style-name="P71" draw:layer="layout" svg:width="0.489cm" svg:height="0.327cm" svg:x="11.448cm" svg:y="18.247cm">
              <text:p/>
              <draw:enhanced-geometry svg:viewBox="0 0 111 74" draw:type="non-primitive" draw:enhanced-path="M 32 73  L 110 19  L 81 0  L 0 54  L 32 73  N"/>
            </draw:custom-shape>
            <draw:custom-shape draw:style-name="gr388" draw:text-style-name="P74" draw:layer="layout" svg:width="0.489cm" svg:height="0.349cm" svg:x="11.448cm" svg:y="18.212cm">
              <text:p/>
              <draw:enhanced-geometry svg:viewBox="0 0 111 79" draw:type="non-primitive" draw:enhanced-path="M 32 78  L 110 24  L 81 0  L 0 54  L 32 78  N"/>
            </draw:custom-shape>
            <draw:custom-shape draw:style-name="gr231" draw:text-style-name="P70" draw:layer="layout" svg:width="0.154cm" svg:height="0.124cm" svg:x="11.448cm" svg:y="18.45cm">
              <text:p/>
              <draw:enhanced-geometry svg:viewBox="0 0 35 28" draw:type="non-primitive" draw:enhanced-path="M 0 0  L 0 7  L 34 27  L 34 23  L 0 0  N"/>
            </draw:custom-shape>
            <draw:line draw:style-name="gr232" draw:text-style-name="P14" draw:layer="layout" svg:x1="11.479cm" svg:y1="18.45cm" svg:x2="11.814cm" svg:y2="18.234cm">
              <text:p/>
            </draw:line>
            <draw:custom-shape draw:style-name="gr231" draw:text-style-name="P70" draw:layer="layout" svg:width="0.327cm" svg:height="0.225cm" svg:x="11.509cm" svg:y="18.3cm">
              <text:p/>
              <draw:enhanced-geometry svg:viewBox="0 0 74 51" draw:type="non-primitive" draw:enhanced-path="M 0 37  L 18 50  L 73 12  L 57 0  L 0 37  N"/>
            </draw:custom-shape>
            <draw:custom-shape draw:style-name="gr231" draw:text-style-name="P70" draw:layer="layout" svg:width="0.115cm" svg:height="0.093cm" svg:x="11.778cm" svg:y="18.256cm">
              <text:p/>
              <draw:enhanced-geometry svg:viewBox="0 0 26 21" draw:type="non-primitive" draw:enhanced-path="M 0 8  L 15 20  L 25 12  L 10 0  L 0 8  N"/>
            </draw:custom-shape>
            <draw:custom-shape draw:style-name="gr235" draw:text-style-name="P13" draw:layer="layout" svg:width="0.327cm" svg:height="0.229cm" svg:x="11.509cm" svg:y="18.292cm">
              <text:p/>
              <draw:enhanced-geometry svg:viewBox="0 0 74 52" draw:type="non-primitive" draw:enhanced-path="M 0 38  L 18 51  L 73 13  L 57 0  L 0 38  N"/>
            </draw:custom-shape>
            <draw:custom-shape draw:style-name="gr235" draw:text-style-name="P13" draw:layer="layout" svg:width="0.115cm" svg:height="0.097cm" svg:x="11.778cm" svg:y="18.247cm">
              <text:p/>
              <draw:enhanced-geometry svg:viewBox="0 0 26 22" draw:type="non-primitive" draw:enhanced-path="M 0 9  L 15 21  L 25 13  L 10 0  L 0 9  N"/>
            </draw:custom-shape>
          </draw:g>
          <draw:line draw:style-name="gr236" draw:text-style-name="P14" draw:layer="layout" svg:x1="10.411cm" svg:y1="17.326cm" svg:x2="10.411cm" svg:y2="17.595cm">
            <text:p/>
          </draw:line>
          <draw:g draw:style-name="gr4">
            <draw:custom-shape draw:style-name="gr389" draw:text-style-name="P75" draw:layer="layout" svg:width="0.326cm" svg:height="0.004cm" svg:x="10.222cm" svg:y="16.281cm">
              <text:p/>
              <draw:enhanced-geometry svg:viewBox="0 0 21600 21600" draw:type="rectangle" draw:enhanced-path="M 0 0 L 21600 0 21600 21600 0 21600 0 0 Z N"/>
            </draw:custom-shape>
            <draw:custom-shape draw:style-name="gr390" draw:text-style-name="P76" draw:layer="layout" svg:width="0.326cm" svg:height="0.001cm" svg:x="10.222cm" svg:y="17.22cm">
              <text:p/>
              <draw:enhanced-geometry svg:viewBox="0 0 21600 21600" draw:type="rectangle" draw:enhanced-path="M 0 0 L 21600 0 21600 21600 0 21600 0 0 Z N"/>
            </draw:custom-shape>
            <draw:custom-shape draw:style-name="gr390" draw:text-style-name="P76" draw:layer="layout" svg:width="0.326cm" svg:height="0.004cm" svg:x="10.222cm" svg:y="17.229cm">
              <text:p/>
              <draw:enhanced-geometry svg:viewBox="0 0 21600 21600" draw:type="rectangle" draw:enhanced-path="M 0 0 L 21600 0 21600 21600 0 21600 0 0 Z N"/>
            </draw:custom-shape>
            <draw:custom-shape draw:style-name="gr391" draw:text-style-name="P77" draw:layer="layout" svg:width="0.326cm" svg:height="0.001cm" svg:x="10.222cm" svg:y="17.242cm">
              <text:p/>
              <draw:enhanced-geometry svg:viewBox="0 0 21600 21600" draw:type="rectangle" draw:enhanced-path="M 0 0 L 21600 0 21600 21600 0 21600 0 0 Z N"/>
            </draw:custom-shape>
            <draw:custom-shape draw:style-name="gr392" draw:text-style-name="P78" draw:layer="layout" svg:width="0.326cm" svg:height="0.001cm" svg:x="10.222cm" svg:y="17.251cm">
              <text:p/>
              <draw:enhanced-geometry svg:viewBox="0 0 21600 21600" draw:type="rectangle" draw:enhanced-path="M 0 0 L 21600 0 21600 21600 0 21600 0 0 Z N"/>
            </draw:custom-shape>
            <draw:custom-shape draw:style-name="gr393" draw:text-style-name="P16" draw:layer="layout" svg:width="0.326cm" svg:height="0.001cm" svg:x="10.222cm" svg:y="17.26cm">
              <text:p/>
              <draw:enhanced-geometry svg:viewBox="0 0 21600 21600" draw:type="rectangle" draw:enhanced-path="M 0 0 L 21600 0 21600 21600 0 21600 0 0 Z N"/>
            </draw:custom-shape>
            <draw:custom-shape draw:style-name="gr393" draw:text-style-name="P16" draw:layer="layout" svg:width="0.326cm" svg:height="0.009cm" svg:x="10.222cm" svg:y="17.264cm">
              <text:p/>
              <draw:enhanced-geometry svg:viewBox="0 0 21600 21600" draw:type="rectangle" draw:enhanced-path="M 0 0 L 21600 0 21600 21600 0 21600 0 0 Z N"/>
            </draw:custom-shape>
            <draw:custom-shape draw:style-name="gr394" draw:text-style-name="P79" draw:layer="layout" svg:width="0.291cm" svg:height="0.957cm" svg:x="10.239cm" svg:y="16.298cm">
              <text:p/>
              <draw:enhanced-geometry svg:viewBox="0 0 21600 21600" draw:type="rectangle" draw:enhanced-path="M 0 0 L 21600 0 21600 21600 0 21600 0 0 Z N"/>
            </draw:custom-shape>
            <draw:custom-shape draw:style-name="gr395" draw:text-style-name="P35" draw:layer="layout" svg:width="0.405cm" svg:height="0.07cm" svg:x="10.178cm" svg:y="17.27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4" draw:layer="layout" svg:x1="10.222cm" svg:y1="16.717cm" svg:x2="10.544cm" svg:y2="16.717cm">
              <text:p/>
            </draw:line>
            <draw:custom-shape draw:style-name="gr250" draw:text-style-name="P80" draw:layer="layout" svg:width="0.247cm" svg:height="0.044cm" svg:x="10.257cm" svg:y="16.726cm">
              <text:p/>
              <draw:enhanced-geometry svg:viewBox="0 0 21600 21600" draw:type="rectangle" draw:enhanced-path="M 0 0 L 21600 0 21600 21600 0 21600 0 0 Z N"/>
            </draw:custom-shape>
            <draw:custom-shape draw:style-name="gr396" draw:text-style-name="P81" draw:layer="layout" svg:width="0.247cm" svg:height="0.001cm" svg:x="10.257cm" svg:y="17.22cm">
              <text:p/>
              <draw:enhanced-geometry svg:viewBox="0 0 21600 21600" draw:type="rectangle" draw:enhanced-path="M 0 0 L 21600 0 21600 21600 0 21600 0 0 Z N"/>
            </draw:custom-shape>
            <draw:custom-shape draw:style-name="gr397" draw:text-style-name="P34" draw:layer="layout" svg:width="0.247cm" svg:height="0.004cm" svg:x="10.257cm" svg:y="17.229cm">
              <text:p/>
              <draw:enhanced-geometry svg:viewBox="0 0 21600 21600" draw:type="rectangle" draw:enhanced-path="M 0 0 L 21600 0 21600 21600 0 21600 0 0 Z N"/>
            </draw:custom-shape>
            <draw:custom-shape draw:style-name="gr393" draw:text-style-name="P16" draw:layer="layout" svg:width="0.247cm" svg:height="0.001cm" svg:x="10.257cm" svg:y="17.242cm">
              <text:p/>
              <draw:enhanced-geometry svg:viewBox="0 0 21600 21600" draw:type="rectangle" draw:enhanced-path="M 0 0 L 21600 0 21600 21600 0 21600 0 0 Z N"/>
            </draw:custom-shape>
            <draw:line draw:style-name="gr249" draw:text-style-name="P14" draw:layer="layout" svg:x1="10.222cm" svg:y1="16.285cm" svg:x2="10.222cm" svg:y2="17.273cm">
              <text:p/>
            </draw:line>
            <draw:custom-shape draw:style-name="gr250" draw:text-style-name="P80" draw:layer="layout" svg:width="0.013cm" svg:height="0.018cm" svg:x="10.231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18cm" svg:x="10.27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09cm" svg:height="0.018cm" svg:x="10.319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18cm" svg:x="10.363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8cm" svg:height="0.018cm" svg:x="10.407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8cm" svg:height="0.018cm" svg:x="10.442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18cm" svg:x="10.491cm" svg:y="1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297cm" svg:y="16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22cm" svg:height="0.022cm" svg:x="10.336cm" svg:y="16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385cm" svg:y="16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425cm" svg:y="16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09cm" svg:height="0.022cm" svg:x="10.473cm" svg:y="16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517cm" svg:y="16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231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27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09cm" svg:height="0.022cm" svg:x="10.319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363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8cm" svg:height="0.022cm" svg:x="10.407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8cm" svg:height="0.022cm" svg:x="10.442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491cm" svg:y="16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257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297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22cm" svg:height="0.022cm" svg:x="10.336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385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425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09cm" svg:height="0.022cm" svg:x="10.473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0" draw:text-style-name="P80" draw:layer="layout" svg:width="0.013cm" svg:height="0.022cm" svg:x="10.517cm" svg:y="16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1" draw:text-style-name="P82" draw:layer="layout" svg:width="0.075cm" svg:height="0.075cm" svg:x="10.248cm" svg:y="16.356cm">
              <text:p/>
              <draw:enhanced-geometry svg:viewBox="0 0 17 17" draw:type="non-primitive" draw:enhanced-path="M 6 0  L 0 0  L 6 16  L 16 0  L 6 0  N"/>
            </draw:custom-shape>
            <draw:custom-shape draw:style-name="gr251" draw:text-style-name="P82" draw:layer="layout" svg:width="0.075cm" svg:height="0.075cm" svg:x="10.248cm" svg:y="16.334cm">
              <text:p/>
              <draw:enhanced-geometry svg:viewBox="0 0 17 17" draw:type="non-primitive" draw:enhanced-path="M 6 16  L 0 16  L 6 0  L 16 16  L 6 16  N"/>
            </draw:custom-shape>
            <draw:custom-shape draw:style-name="gr250" draw:text-style-name="P80" draw:layer="layout" svg:width="0.247cm" svg:height="0.039cm" svg:x="10.257cm" svg:y="16.841cm">
              <text:p/>
              <draw:enhanced-geometry svg:viewBox="0 0 21600 21600" draw:type="rectangle" draw:enhanced-path="M 0 0 L 21600 0 21600 21600 0 21600 0 0 Z N"/>
            </draw:custom-shape>
            <draw:custom-shape draw:style-name="gr250" draw:text-style-name="P80" draw:layer="layout" svg:width="0.247cm" svg:height="0.049cm" svg:x="10.257cm" svg:y="16.955cm">
              <text:p/>
              <draw:enhanced-geometry svg:viewBox="0 0 21600 21600" draw:type="rectangle" draw:enhanced-path="M 0 0 L 21600 0 21600 21600 0 21600 0 0 Z N"/>
            </draw:custom-shape>
            <draw:custom-shape draw:style-name="gr250" draw:text-style-name="P80" draw:layer="layout" svg:width="0.247cm" svg:height="0.048cm" svg:x="10.257cm" svg:y="17.066cm">
              <text:p/>
              <draw:enhanced-geometry svg:viewBox="0 0 21600 21600" draw:type="rectangle" draw:enhanced-path="M 0 0 L 21600 0 21600 21600 0 21600 0 0 Z N"/>
            </draw:custom-shape>
            <draw:custom-shape draw:style-name="gr250" draw:text-style-name="P80" draw:layer="layout" svg:width="0.247cm" svg:height="0.048cm" svg:x="10.257cm" svg:y="17.185cm">
              <text:p/>
              <draw:enhanced-geometry svg:viewBox="0 0 21600 21600" draw:type="rectangle" draw:enhanced-path="M 0 0 L 21600 0 21600 21600 0 21600 0 0 Z N"/>
            </draw:custom-shape>
            <draw:custom-shape draw:style-name="gr250" draw:text-style-name="P80" draw:layer="layout" svg:width="0.247cm" svg:height="0.044cm" svg:x="10.257cm" svg:y="16.625cm">
              <text:p/>
              <draw:enhanced-geometry svg:viewBox="0 0 21600 21600" draw:type="rectangle" draw:enhanced-path="M 0 0 L 21600 0 21600 21600 0 21600 0 0 Z N"/>
            </draw:custom-shape>
            <draw:custom-shape draw:style-name="gr250" draw:text-style-name="P80" draw:layer="layout" svg:width="0.079cm" svg:height="0.031cm" svg:x="10.257cm" svg:y="16.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line draw:style-name="gr236" draw:text-style-name="P14" draw:layer="layout" svg:x1="7.452cm" svg:y1="15.35cm" svg:x2="7.448cm" svg:y2="15.729cm">
            <text:p/>
          </draw:line>
          <draw:g draw:style-name="gr4">
            <draw:g draw:style-name="gr4">
              <draw:custom-shape draw:style-name="gr398" draw:text-style-name="P70" draw:layer="layout" svg:width="0.357cm" svg:height="0.352cm" svg:x="6.862cm" svg:y="16.237cm">
                <text:p/>
                <draw:enhanced-geometry svg:viewBox="0 0 81 80" draw:type="non-primitive" draw:enhanced-path="M 0 0  L 0 35  L 80 79  L 80 42  L 0 0  N"/>
              </draw:custom-shape>
              <draw:custom-shape draw:style-name="gr399" draw:text-style-name="P71" draw:layer="layout" svg:width="0.516cm" svg:height="0.48cm" svg:x="7.214cm" svg:y="16.109cm">
                <text:p/>
                <draw:enhanced-geometry svg:viewBox="0 0 117 109" draw:type="non-primitive" draw:enhanced-path="M 1 108  L 116 37  L 116 0  L 0 74  L 1 108  N"/>
              </draw:custom-shape>
              <draw:custom-shape draw:style-name="gr400" draw:text-style-name="P13" draw:layer="layout" svg:width="0.873cm" svg:height="0.516cm" svg:x="6.862cm" svg:y="15.932cm">
                <text:p/>
                <draw:enhanced-geometry svg:viewBox="0 0 198 117" draw:type="non-primitive" draw:enhanced-path="M 0 68  L 116 0  L 197 43  L 80 116  L 0 68  N"/>
              </draw:custom-shape>
              <draw:custom-shape draw:style-name="gr401" draw:text-style-name="P72" draw:layer="layout" svg:width="0.807cm" svg:height="0.485cm" svg:x="6.866cm" svg:y="15.513cm">
                <text:p/>
                <draw:enhanced-geometry svg:viewBox="0 0 183 110" draw:type="non-primitive" draw:enhanced-path="M 0 54  L 37 74  L 27 82  L 74 109  L 182 36  L 138 14  L 129 19  L 86 0  L 0 54  N"/>
              </draw:custom-shape>
              <draw:custom-shape draw:style-name="gr402" draw:text-style-name="P70" draw:layer="layout" svg:width="0.37cm" svg:height="0.578cm" svg:x="6.866cm" svg:y="15.747cm">
                <text:p/>
                <draw:enhanced-geometry svg:viewBox="0 0 84 131" draw:type="non-primitive" draw:enhanced-path="M 1 0  L 0 62  L 29 93  L 29 101  L 81 130  L 83 52  L 31 32  L 39 24  L 1 0  N"/>
              </draw:custom-shape>
              <draw:custom-shape draw:style-name="gr403" draw:text-style-name="P71" draw:layer="layout" svg:width="0.445cm" svg:height="0.648cm" svg:x="7.228cm" svg:y="15.677cm">
                <text:p/>
                <draw:enhanced-geometry svg:viewBox="0 0 101 147" draw:type="non-primitive" draw:enhanced-path="M 100 0  L 100 80  L 0 146  L 0 68  L 100 0  N"/>
              </draw:custom-shape>
              <draw:custom-shape draw:style-name="gr404" draw:text-style-name="P73" draw:layer="layout" svg:width="0.331cm" svg:height="0.467cm" svg:x="7.28cm" svg:y="15.752cm">
                <text:p/>
                <draw:enhanced-geometry svg:viewBox="0 0 75 106" draw:type="non-primitive" draw:enhanced-path="M 74 0  L 74 58  L 0 105  L 0 54  L 74 0  N"/>
              </draw:custom-shape>
              <draw:custom-shape draw:style-name="gr405" draw:text-style-name="P2" draw:layer="layout" svg:width="0.317cm" svg:height="0.454cm" svg:x="7.294cm" svg:y="15.765cm">
                <text:p/>
                <draw:enhanced-geometry svg:viewBox="0 0 72 103" draw:type="non-primitive" draw:enhanced-path="M 71 0  L 71 57  L 0 102  N"/>
              </draw:custom-shape>
              <draw:custom-shape draw:style-name="gr406" draw:text-style-name="P71" draw:layer="layout" svg:width="0.701cm" svg:height="0.459cm" svg:x="7.254cm" svg:y="16.267cm">
                <text:p/>
                <draw:enhanced-geometry svg:viewBox="0 0 159 104" draw:type="non-primitive" draw:enhanced-path="M 46 103  L 158 27  L 117 0  L 0 76  L 46 103  N"/>
              </draw:custom-shape>
              <draw:custom-shape draw:style-name="gr407" draw:text-style-name="P74" draw:layer="layout" svg:width="0.701cm" svg:height="0.472cm" svg:x="7.254cm" svg:y="16.228cm">
                <text:p/>
                <draw:enhanced-geometry svg:viewBox="0 0 159 107" draw:type="non-primitive" draw:enhanced-path="M 46 106  L 158 33  L 117 0  L 0 74  L 46 106  N"/>
              </draw:custom-shape>
              <draw:custom-shape draw:style-name="gr231" draw:text-style-name="P70" draw:layer="layout" svg:width="0.22cm" svg:height="0.167cm" svg:x="7.254cm" svg:y="16.559cm">
                <text:p/>
                <draw:enhanced-geometry svg:viewBox="0 0 50 38" draw:type="non-primitive" draw:enhanced-path="M 0 0  L 0 10  L 49 37  L 49 32  L 0 0  N"/>
              </draw:custom-shape>
              <draw:line draw:style-name="gr232" draw:text-style-name="P14" draw:layer="layout" svg:x1="7.311cm" svg:y1="16.558cm" svg:x2="7.788cm" svg:y2="16.249cm">
                <text:p/>
              </draw:line>
              <draw:custom-shape draw:style-name="gr408" draw:text-style-name="P70" draw:layer="layout" svg:width="0.472cm" svg:height="0.313cm" svg:x="7.338cm" svg:y="16.347cm">
                <text:p/>
                <draw:enhanced-geometry svg:viewBox="0 0 107 71" draw:type="non-primitive" draw:enhanced-path="M 0 52  L 27 70  L 106 17  L 82 0  L 0 52  N"/>
              </draw:custom-shape>
              <draw:custom-shape draw:style-name="gr231" draw:text-style-name="P70" draw:layer="layout" svg:width="0.167cm" svg:height="0.137cm" svg:x="7.726cm" svg:y="16.276cm">
                <text:p/>
                <draw:enhanced-geometry svg:viewBox="0 0 38 31" draw:type="non-primitive" draw:enhanced-path="M 0 12  L 23 30  L 37 19  L 15 0  L 0 12  N"/>
              </draw:custom-shape>
              <draw:custom-shape draw:style-name="gr409" draw:text-style-name="P13" draw:layer="layout" svg:width="0.472cm" svg:height="0.322cm" svg:x="7.338cm" svg:y="16.329cm">
                <text:p/>
                <draw:enhanced-geometry svg:viewBox="0 0 107 73" draw:type="non-primitive" draw:enhanced-path="M 0 54  L 27 72  L 106 18  L 82 0  L 0 54  N"/>
              </draw:custom-shape>
              <draw:custom-shape draw:style-name="gr235" draw:text-style-name="P13" draw:layer="layout" svg:width="0.167cm" svg:height="0.133cm" svg:x="7.726cm" svg:y="16.267cm">
                <text:p/>
                <draw:enhanced-geometry svg:viewBox="0 0 38 30" draw:type="non-primitive" draw:enhanced-path="M 0 12  L 23 29  L 37 18  L 15 0  L 0 12  N"/>
              </draw:custom-shape>
            </draw:g>
            <draw:line draw:style-name="gr236" draw:text-style-name="P14" draw:layer="layout" svg:x1="6.848cm" svg:y1="15.324cm" svg:x2="10.045cm" svg:y2="15.324cm">
              <text:p/>
            </draw:line>
            <draw:g draw:style-name="gr4">
              <draw:custom-shape draw:style-name="gr398" draw:text-style-name="P70" draw:layer="layout" svg:width="0.371cm" svg:height="0.352cm" svg:x="7.783cm" svg:y="16.237cm">
                <text:p/>
                <draw:enhanced-geometry svg:viewBox="0 0 84 80" draw:type="non-primitive" draw:enhanced-path="M 0 0  L 0 35  L 83 79  L 83 42  L 0 0  N"/>
              </draw:custom-shape>
              <draw:custom-shape draw:style-name="gr399" draw:text-style-name="P71" draw:layer="layout" svg:width="0.516cm" svg:height="0.48cm" svg:x="8.136cm" svg:y="16.109cm">
                <text:p/>
                <draw:enhanced-geometry svg:viewBox="0 0 117 109" draw:type="non-primitive" draw:enhanced-path="M 1 108  L 116 37  L 116 0  L 0 74  L 1 108  N"/>
              </draw:custom-shape>
              <draw:custom-shape draw:style-name="gr410" draw:text-style-name="P13" draw:layer="layout" svg:width="0.887cm" svg:height="0.516cm" svg:x="7.783cm" svg:y="15.932cm">
                <text:p/>
                <draw:enhanced-geometry svg:viewBox="0 0 201 117" draw:type="non-primitive" draw:enhanced-path="M 0 68  L 118 0  L 200 43  L 81 116  L 0 68  N"/>
              </draw:custom-shape>
              <draw:custom-shape draw:style-name="gr401" draw:text-style-name="P72" draw:layer="layout" svg:width="0.807cm" svg:height="0.485cm" svg:x="7.788cm" svg:y="15.513cm">
                <text:p/>
                <draw:enhanced-geometry svg:viewBox="0 0 183 110" draw:type="non-primitive" draw:enhanced-path="M 0 54  L 37 74  L 27 82  L 74 109  L 182 36  L 138 14  L 129 19  L 86 0  L 0 54  N"/>
              </draw:custom-shape>
              <draw:custom-shape draw:style-name="gr402" draw:text-style-name="P70" draw:layer="layout" svg:width="0.366cm" svg:height="0.578cm" svg:x="7.788cm" svg:y="15.747cm">
                <text:p/>
                <draw:enhanced-geometry svg:viewBox="0 0 83 131" draw:type="non-primitive" draw:enhanced-path="M 1 0  L 0 62  L 28 93  L 28 101  L 80 130  L 82 52  L 31 32  L 39 24  L 1 0  N"/>
              </draw:custom-shape>
              <draw:custom-shape draw:style-name="gr403" draw:text-style-name="P71" draw:layer="layout" svg:width="0.446cm" svg:height="0.648cm" svg:x="8.149cm" svg:y="15.677cm">
                <text:p/>
                <draw:enhanced-geometry svg:viewBox="0 0 101 147" draw:type="non-primitive" draw:enhanced-path="M 100 0  L 100 80  L 0 146  L 0 68  L 100 0  N"/>
              </draw:custom-shape>
              <draw:custom-shape draw:style-name="gr404" draw:text-style-name="P73" draw:layer="layout" svg:width="0.322cm" svg:height="0.467cm" svg:x="8.211cm" svg:y="15.752cm">
                <text:p/>
                <draw:enhanced-geometry svg:viewBox="0 0 73 106" draw:type="non-primitive" draw:enhanced-path="M 72 0  L 72 58  L 0 105  L 0 54  L 72 0  N"/>
              </draw:custom-shape>
              <draw:custom-shape draw:style-name="gr405" draw:text-style-name="P2" draw:layer="layout" svg:width="0.322cm" svg:height="0.454cm" svg:x="8.211cm" svg:y="15.765cm">
                <text:p/>
                <draw:enhanced-geometry svg:viewBox="0 0 73 103" draw:type="non-primitive" draw:enhanced-path="M 72 0  L 72 57  L 0 102  N"/>
              </draw:custom-shape>
              <draw:custom-shape draw:style-name="gr406" draw:text-style-name="P71" draw:layer="layout" svg:width="0.701cm" svg:height="0.459cm" svg:x="8.18cm" svg:y="16.267cm">
                <text:p/>
                <draw:enhanced-geometry svg:viewBox="0 0 159 104" draw:type="non-primitive" draw:enhanced-path="M 46 103  L 158 27  L 117 0  L 0 76  L 46 103  N"/>
              </draw:custom-shape>
              <draw:custom-shape draw:style-name="gr407" draw:text-style-name="P74" draw:layer="layout" svg:width="0.701cm" svg:height="0.472cm" svg:x="8.176cm" svg:y="16.228cm">
                <text:p/>
                <draw:enhanced-geometry svg:viewBox="0 0 159 107" draw:type="non-primitive" draw:enhanced-path="M 46 106  L 158 33  L 117 0  L 0 74  L 46 106  N"/>
              </draw:custom-shape>
              <draw:custom-shape draw:style-name="gr231" draw:text-style-name="P70" draw:layer="layout" svg:width="0.212cm" svg:height="0.167cm" svg:x="8.18cm" svg:y="16.559cm">
                <text:p/>
                <draw:enhanced-geometry svg:viewBox="0 0 48 38" draw:type="non-primitive" draw:enhanced-path="M 0 0  L 0 10  L 47 37  L 47 32  L 0 0  N"/>
              </draw:custom-shape>
              <draw:line draw:style-name="gr232" draw:text-style-name="P14" draw:layer="layout" svg:x1="8.233cm" svg:y1="16.558cm" svg:x2="8.705cm" svg:y2="16.249cm">
                <text:p/>
              </draw:line>
              <draw:custom-shape draw:style-name="gr408" draw:text-style-name="P70" draw:layer="layout" svg:width="0.467cm" svg:height="0.313cm" svg:x="8.264cm" svg:y="16.347cm">
                <text:p/>
                <draw:enhanced-geometry svg:viewBox="0 0 106 71" draw:type="non-primitive" draw:enhanced-path="M 0 52  L 26 70  L 105 17  L 82 0  L 0 52  N"/>
              </draw:custom-shape>
              <draw:custom-shape draw:style-name="gr231" draw:text-style-name="P70" draw:layer="layout" svg:width="0.176cm" svg:height="0.137cm" svg:x="8.643cm" svg:y="16.276cm">
                <text:p/>
                <draw:enhanced-geometry svg:viewBox="0 0 40 31" draw:type="non-primitive" draw:enhanced-path="M 0 12  L 24 30  L 39 19  L 16 0  L 0 12  N"/>
              </draw:custom-shape>
              <draw:custom-shape draw:style-name="gr409" draw:text-style-name="P13" draw:layer="layout" svg:width="0.467cm" svg:height="0.322cm" svg:x="8.264cm" svg:y="16.329cm">
                <text:p/>
                <draw:enhanced-geometry svg:viewBox="0 0 106 73" draw:type="non-primitive" draw:enhanced-path="M 0 54  L 26 72  L 105 18  L 82 0  L 0 54  N"/>
              </draw:custom-shape>
              <draw:custom-shape draw:style-name="gr235" draw:text-style-name="P13" draw:layer="layout" svg:width="0.176cm" svg:height="0.133cm" svg:x="8.643cm" svg:y="16.267cm">
                <text:p/>
                <draw:enhanced-geometry svg:viewBox="0 0 40 30" draw:type="non-primitive" draw:enhanced-path="M 0 12  L 24 29  L 39 18  L 16 0  L 0 12  N"/>
              </draw:custom-shape>
            </draw:g>
            <draw:g draw:style-name="gr4">
              <draw:custom-shape draw:style-name="gr411" draw:text-style-name="P70" draw:layer="layout" svg:width="0.357cm" svg:height="0.357cm" svg:x="8.714cm" svg:y="16.228cm">
                <text:p/>
                <draw:enhanced-geometry svg:viewBox="0 0 81 81" draw:type="non-primitive" draw:enhanced-path="M 0 0  L 0 35  L 80 80  L 80 43  L 0 0  N"/>
              </draw:custom-shape>
              <draw:custom-shape draw:style-name="gr412" draw:text-style-name="P71" draw:layer="layout" svg:width="0.521cm" svg:height="0.485cm" svg:x="9.053cm" svg:y="16.1cm">
                <text:p/>
                <draw:enhanced-geometry svg:viewBox="0 0 118 110" draw:type="non-primitive" draw:enhanced-path="M 1 109  L 117 37  L 117 0  L 0 75  L 1 109  N"/>
              </draw:custom-shape>
              <draw:custom-shape draw:style-name="gr413" draw:text-style-name="P13" draw:layer="layout" svg:width="0.877cm" svg:height="0.516cm" svg:x="8.714cm" svg:y="15.928cm">
                <text:p/>
                <draw:enhanced-geometry svg:viewBox="0 0 199 117" draw:type="non-primitive" draw:enhanced-path="M 0 68  L 116 0  L 198 43  L 80 116  L 0 68  N"/>
              </draw:custom-shape>
              <draw:custom-shape draw:style-name="gr414" draw:text-style-name="P72" draw:layer="layout" svg:width="0.798cm" svg:height="0.481cm" svg:x="8.714cm" svg:y="15.509cm">
                <text:p/>
                <draw:enhanced-geometry svg:viewBox="0 0 181 109" draw:type="non-primitive" draw:enhanced-path="M 0 53  L 37 74  L 26 81  L 74 108  L 180 35  L 137 14  L 127 19  L 85 0  L 0 53  N"/>
              </draw:custom-shape>
              <draw:custom-shape draw:style-name="gr402" draw:text-style-name="P70" draw:layer="layout" svg:width="0.37cm" svg:height="0.578cm" svg:x="8.714cm" svg:y="15.738cm">
                <text:p/>
                <draw:enhanced-geometry svg:viewBox="0 0 84 131" draw:type="non-primitive" draw:enhanced-path="M 1 0  L 0 62  L 29 93  L 29 101  L 81 130  L 83 52  L 31 32  L 39 24  L 1 0  N"/>
              </draw:custom-shape>
              <draw:custom-shape draw:style-name="gr403" draw:text-style-name="P71" draw:layer="layout" svg:width="0.454cm" svg:height="0.648cm" svg:x="9.071cm" svg:y="15.668cm">
                <text:p/>
                <draw:enhanced-geometry svg:viewBox="0 0 103 147" draw:type="non-primitive" draw:enhanced-path="M 102 0  L 102 80  L 0 146  L 0 68  L 102 0  N"/>
              </draw:custom-shape>
              <draw:custom-shape draw:style-name="gr415" draw:text-style-name="P73" draw:layer="layout" svg:width="0.331cm" svg:height="0.472cm" svg:x="9.128cm" svg:y="15.747cm">
                <text:p/>
                <draw:enhanced-geometry svg:viewBox="0 0 75 107" draw:type="non-primitive" draw:enhanced-path="M 74 0  L 74 58  L 0 106  L 0 54  L 74 0  N"/>
              </draw:custom-shape>
              <draw:custom-shape draw:style-name="gr416" draw:text-style-name="P2" draw:layer="layout" svg:width="0.326cm" svg:height="0.459cm" svg:x="9.133cm" svg:y="15.76cm">
                <text:p/>
                <draw:enhanced-geometry svg:viewBox="0 0 74 104" draw:type="non-primitive" draw:enhanced-path="M 73 0  L 73 58  L 0 103  N"/>
              </draw:custom-shape>
              <draw:custom-shape draw:style-name="gr417" draw:text-style-name="P71" draw:layer="layout" svg:width="0.692cm" svg:height="0.454cm" svg:x="9.106cm" svg:y="16.263cm">
                <text:p/>
                <draw:enhanced-geometry svg:viewBox="0 0 157 103" draw:type="non-primitive" draw:enhanced-path="M 46 102  L 156 27  L 116 0  L 0 75  L 46 102  N"/>
              </draw:custom-shape>
              <draw:custom-shape draw:style-name="gr418" draw:text-style-name="P74" draw:layer="layout" svg:width="0.688cm" svg:height="0.485cm" svg:x="9.106cm" svg:y="16.215cm">
                <text:p/>
                <draw:enhanced-geometry svg:viewBox="0 0 156 110" draw:type="non-primitive" draw:enhanced-path="M 46 109  L 155 34  L 115 0  L 0 76  L 46 109  N"/>
              </draw:custom-shape>
              <draw:custom-shape draw:style-name="gr231" draw:text-style-name="P70" draw:layer="layout" svg:width="0.212cm" svg:height="0.172cm" svg:x="9.106cm" svg:y="16.55cm">
                <text:p/>
                <draw:enhanced-geometry svg:viewBox="0 0 48 39" draw:type="non-primitive" draw:enhanced-path="M 0 0  L 0 10  L 47 38  L 47 32  L 0 0  N"/>
              </draw:custom-shape>
              <draw:line draw:style-name="gr232" draw:text-style-name="P14" draw:layer="layout" svg:x1="9.15cm" svg:y1="16.549cm" svg:x2="9.622cm" svg:y2="16.244cm">
                <text:p/>
              </draw:line>
              <draw:custom-shape draw:style-name="gr408" draw:text-style-name="P70" draw:layer="layout" svg:width="0.459cm" svg:height="0.313cm" svg:x="9.194cm" svg:y="16.338cm">
                <text:p/>
                <draw:enhanced-geometry svg:viewBox="0 0 104 71" draw:type="non-primitive" draw:enhanced-path="M 0 52  L 26 70  L 103 17  L 80 0  L 0 52  N"/>
              </draw:custom-shape>
              <draw:custom-shape draw:style-name="gr231" draw:text-style-name="P70" draw:layer="layout" svg:width="0.163cm" svg:height="0.132cm" svg:x="9.569cm" svg:y="16.272cm">
                <text:p/>
                <draw:enhanced-geometry svg:viewBox="0 0 37 30" draw:type="non-primitive" draw:enhanced-path="M 0 12  L 22 29  L 36 18  L 15 0  L 0 12  N"/>
              </draw:custom-shape>
              <draw:custom-shape draw:style-name="gr419" draw:text-style-name="P13" draw:layer="layout" svg:width="0.459cm" svg:height="0.317cm" svg:x="9.194cm" svg:y="16.325cm">
                <text:p/>
                <draw:enhanced-geometry svg:viewBox="0 0 104 72" draw:type="non-primitive" draw:enhanced-path="M 0 53  L 26 71  L 103 17  L 80 0  L 0 53  N"/>
              </draw:custom-shape>
              <draw:custom-shape draw:style-name="gr235" draw:text-style-name="P13" draw:layer="layout" svg:width="0.163cm" svg:height="0.132cm" svg:x="9.569cm" svg:y="16.263cm">
                <text:p/>
                <draw:enhanced-geometry svg:viewBox="0 0 37 30" draw:type="non-primitive" draw:enhanced-path="M 0 12  L 22 29  L 36 18  L 15 0  L 0 12  N"/>
              </draw:custom-shape>
            </draw:g>
            <draw:line draw:style-name="gr236" draw:text-style-name="P14" draw:layer="layout" svg:x1="7.832cm" svg:y1="14.953cm" svg:x2="7.832cm" svg:y2="15.337cm">
              <text:p/>
            </draw:line>
            <draw:g draw:style-name="gr4">
              <draw:custom-shape draw:style-name="gr389" draw:text-style-name="P75" draw:layer="layout" svg:width="0.467cm" svg:height="0.004cm" svg:x="7.563cm" svg:y="13.463cm">
                <text:p/>
                <draw:enhanced-geometry svg:viewBox="0 0 21600 21600" draw:type="rectangle" draw:enhanced-path="M 0 0 L 21600 0 21600 21600 0 21600 0 0 Z N"/>
              </draw:custom-shape>
              <draw:custom-shape draw:style-name="gr390" draw:text-style-name="P76" draw:layer="layout" svg:width="0.467cm" svg:height="0.004cm" svg:x="7.563cm" svg:y="14.786cm">
                <text:p/>
                <draw:enhanced-geometry svg:viewBox="0 0 21600 21600" draw:type="rectangle" draw:enhanced-path="M 0 0 L 21600 0 21600 21600 0 21600 0 0 Z N"/>
              </draw:custom-shape>
              <draw:custom-shape draw:style-name="gr390" draw:text-style-name="P76" draw:layer="layout" svg:width="0.467cm" svg:height="0.004cm" svg:x="7.563cm" svg:y="14.799cm">
                <text:p/>
                <draw:enhanced-geometry svg:viewBox="0 0 21600 21600" draw:type="rectangle" draw:enhanced-path="M 0 0 L 21600 0 21600 21600 0 21600 0 0 Z N"/>
              </draw:custom-shape>
              <draw:custom-shape draw:style-name="gr391" draw:text-style-name="P77" draw:layer="layout" svg:width="0.467cm" svg:height="0.001cm" svg:x="7.563cm" svg:y="14.817cm">
                <text:p/>
                <draw:enhanced-geometry svg:viewBox="0 0 21600 21600" draw:type="rectangle" draw:enhanced-path="M 0 0 L 21600 0 21600 21600 0 21600 0 0 Z N"/>
              </draw:custom-shape>
              <draw:custom-shape draw:style-name="gr392" draw:text-style-name="P78" draw:layer="layout" svg:width="0.467cm" svg:height="0.001cm" svg:x="7.563cm" svg:y="14.825cm">
                <text:p/>
                <draw:enhanced-geometry svg:viewBox="0 0 21600 21600" draw:type="rectangle" draw:enhanced-path="M 0 0 L 21600 0 21600 21600 0 21600 0 0 Z N"/>
              </draw:custom-shape>
              <draw:custom-shape draw:style-name="gr393" draw:text-style-name="P16" draw:layer="layout" svg:width="0.467cm" svg:height="0.001cm" svg:x="7.563cm" svg:y="14.839cm">
                <text:p/>
                <draw:enhanced-geometry svg:viewBox="0 0 21600 21600" draw:type="rectangle" draw:enhanced-path="M 0 0 L 21600 0 21600 21600 0 21600 0 0 Z N"/>
              </draw:custom-shape>
              <draw:custom-shape draw:style-name="gr393" draw:text-style-name="P16" draw:layer="layout" svg:width="0.467cm" svg:height="0.008cm" svg:x="7.563cm" svg:y="14.848cm">
                <text:p/>
                <draw:enhanced-geometry svg:viewBox="0 0 21600 21600" draw:type="rectangle" draw:enhanced-path="M 0 0 L 21600 0 21600 21600 0 21600 0 0 Z N"/>
              </draw:custom-shape>
              <draw:custom-shape draw:style-name="gr420" draw:text-style-name="P79" draw:layer="layout" svg:width="0.432cm" svg:height="1.362cm" svg:x="7.58cm" svg:y="13.481cm">
                <text:p/>
                <draw:enhanced-geometry svg:viewBox="0 0 21600 21600" draw:type="rectangle" draw:enhanced-path="M 0 0 L 21600 0 21600 21600 0 21600 0 0 Z N"/>
              </draw:custom-shape>
              <draw:custom-shape draw:style-name="gr421" draw:text-style-name="P35" draw:layer="layout" svg:width="0.582cm" svg:height="0.101cm" svg:x="7.501cm" svg:y="14.861cm">
                <text:p/>
                <draw:enhanced-geometry svg:viewBox="0 0 21600 21600" draw:type="rectangle" draw:enhanced-path="M 0 0 L 21600 0 21600 21600 0 21600 0 0 Z N"/>
              </draw:custom-shape>
              <draw:line draw:style-name="gr7" draw:text-style-name="P14" draw:layer="layout" svg:x1="7.563cm" svg:y1="14.076cm" svg:x2="8.026cm" svg:y2="14.076cm">
                <text:p/>
              </draw:line>
              <draw:custom-shape draw:style-name="gr250" draw:text-style-name="P80" draw:layer="layout" svg:width="0.357cm" svg:height="0.066cm" svg:x="7.611cm" svg:y="14.089cm">
                <text:p/>
                <draw:enhanced-geometry svg:viewBox="0 0 21600 21600" draw:type="rectangle" draw:enhanced-path="M 0 0 L 21600 0 21600 21600 0 21600 0 0 Z N"/>
              </draw:custom-shape>
              <draw:custom-shape draw:style-name="gr396" draw:text-style-name="P81" draw:layer="layout" svg:width="0.357cm" svg:height="0.004cm" svg:x="7.611cm" svg:y="14.786cm">
                <text:p/>
                <draw:enhanced-geometry svg:viewBox="0 0 21600 21600" draw:type="rectangle" draw:enhanced-path="M 0 0 L 21600 0 21600 21600 0 21600 0 0 Z N"/>
              </draw:custom-shape>
              <draw:custom-shape draw:style-name="gr397" draw:text-style-name="P34" draw:layer="layout" svg:width="0.357cm" svg:height="0.004cm" svg:x="7.611cm" svg:y="14.799cm">
                <text:p/>
                <draw:enhanced-geometry svg:viewBox="0 0 21600 21600" draw:type="rectangle" draw:enhanced-path="M 0 0 L 21600 0 21600 21600 0 21600 0 0 Z N"/>
              </draw:custom-shape>
              <draw:custom-shape draw:style-name="gr393" draw:text-style-name="P16" draw:layer="layout" svg:width="0.357cm" svg:height="0.001cm" svg:x="7.611cm" svg:y="14.817cm">
                <text:p/>
                <draw:enhanced-geometry svg:viewBox="0 0 21600 21600" draw:type="rectangle" draw:enhanced-path="M 0 0 L 21600 0 21600 21600 0 21600 0 0 Z N"/>
              </draw:custom-shape>
              <draw:line draw:style-name="gr249" draw:text-style-name="P14" draw:layer="layout" svg:x1="7.563cm" svg:y1="13.472cm" svg:x2="7.563cm" svg:y2="14.856cm">
                <text:p/>
              </draw:line>
              <draw:custom-shape draw:style-name="gr250" draw:text-style-name="P80" draw:layer="layout" svg:width="0.018cm" svg:height="0.031cm" svg:x="7.576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1cm" svg:x="7.633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1cm" svg:x="7.699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7cm" svg:height="0.031cm" svg:x="7.766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7cm" svg:height="0.031cm" svg:x="7.827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31cm" svg:height="0.031cm" svg:x="7.876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7cm" svg:height="0.031cm" svg:x="7.951cm" svg:y="13.4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6cm" svg:x="7.673cm" svg:y="13.5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7cm" svg:height="0.036cm" svg:x="7.73cm" svg:y="13.5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2cm" svg:height="0.036cm" svg:x="7.796cm" svg:y="13.5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7cm" svg:height="0.036cm" svg:x="7.854cm" svg:y="13.5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3cm" svg:height="0.036cm" svg:x="7.92cm" svg:y="13.5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6cm" svg:x="7.986cm" svg:y="13.5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cm" svg:x="7.576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cm" svg:x="7.633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cm" svg:x="7.699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7cm" svg:height="0.03cm" svg:x="7.766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7cm" svg:height="0.03cm" svg:x="7.827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31cm" svg:height="0.03cm" svg:x="7.876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7cm" svg:height="0.03cm" svg:x="7.951cm" svg:y="1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2cm" svg:height="0.031cm" svg:x="7.611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1cm" svg:x="7.673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7cm" svg:height="0.031cm" svg:x="7.73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22cm" svg:height="0.031cm" svg:x="7.796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7cm" svg:height="0.031cm" svg:x="7.854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3cm" svg:height="0.031cm" svg:x="7.92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0" draw:text-style-name="P80" draw:layer="layout" svg:width="0.018cm" svg:height="0.031cm" svg:x="7.986cm" svg:y="13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1" draw:text-style-name="P82" draw:layer="layout" svg:width="0.075cm" svg:height="0.075cm" svg:x="7.602cm" svg:y="13.573cm">
                <text:p/>
                <draw:enhanced-geometry svg:viewBox="0 0 17 17" draw:type="non-primitive" draw:enhanced-path="M 4 0  L 0 0  L 4 16  L 16 0  L 4 0  N"/>
              </draw:custom-shape>
              <draw:custom-shape draw:style-name="gr251" draw:text-style-name="P82" draw:layer="layout" svg:width="0.075cm" svg:height="0.075cm" svg:x="7.602cm" svg:y="13.538cm">
                <text:p/>
                <draw:enhanced-geometry svg:viewBox="0 0 17 17" draw:type="non-primitive" draw:enhanced-path="M 4 16  L 0 16  L 4 0  L 16 16  L 4 16  N"/>
              </draw:custom-shape>
              <draw:custom-shape draw:style-name="gr250" draw:text-style-name="P80" draw:layer="layout" svg:width="0.357cm" svg:height="0.058cm" svg:x="7.611cm" svg:y="14.252cm">
                <text:p/>
                <draw:enhanced-geometry svg:viewBox="0 0 21600 21600" draw:type="rectangle" draw:enhanced-path="M 0 0 L 21600 0 21600 21600 0 21600 0 0 Z N"/>
              </draw:custom-shape>
              <draw:custom-shape draw:style-name="gr250" draw:text-style-name="P80" draw:layer="layout" svg:width="0.357cm" svg:height="0.071cm" svg:x="7.611cm" svg:y="14.4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50" draw:text-style-name="P80" draw:layer="layout" svg:width="0.357cm" svg:height="0.066cm" svg:x="7.611cm" svg:y="14.5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0" draw:text-style-name="P80" draw:layer="layout" svg:width="0.357cm" svg:height="0.066cm" svg:x="7.611cm" svg:y="14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0" draw:text-style-name="P80" draw:layer="layout" svg:width="0.357cm" svg:height="0.066cm" svg:x="7.611cm" svg:y="13.944cm">
                <text:p/>
                <draw:enhanced-geometry svg:viewBox="0 0 21600 21600" draw:type="rectangle" draw:enhanced-path="M 0 0 L 21600 0 21600 21600 0 21600 0 0 Z N"/>
              </draw:custom-shape>
              <draw:custom-shape draw:style-name="gr250" draw:text-style-name="P80" draw:layer="layout" svg:width="0.119cm" svg:height="0.049cm" svg:x="7.611cm" svg:y="13.72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style-name="gr4">
          <draw:custom-shape draw:style-name="gr422" draw:text-style-name="P17" draw:layer="layout" svg:width="4.326cm" svg:height="1.447cm" svg:x="0.966cm" svg:y="16.933cm">
            <text:p/>
            <draw:enhanced-geometry svg:viewBox="0 0 21600 21600" draw:type="rectangle" draw:enhanced-path="M 0 0 L 21600 0 21600 21600 0 21600 0 0 Z N"/>
          </draw:custom-shape>
          <draw:custom-shape draw:style-name="gr423" draw:text-style-name="P87" draw:layer="layout" svg:width="4.842cm" svg:height="1.475cm" svg:x="0.847cm" svg:y="16.828cm">
            <text:list text:style-name="L5">
              <text:list-header>
                <text:p text:style-name="P67"><text:span text:style-name="T43">Independent <text:s/>Workgroup 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24" draw:text-style-name="P68" draw:layer="layout" svg:width="0.666cm" svg:height="0.866cm" svg:x="3.98cm" svg:y="15.747cm">
          <text:list text:style-name="L5">
            <text:list-header>
              <text:p text:style-name="P67"><text:span text:style-name="T45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5" draw:text-style-name="P14" draw:layer="layout" svg:x1="6.376cm" svg:y1="5.856cm" svg:x2="8.445cm" svg:y2="5.856cm">
          <text:p/>
        </draw:line>
        <draw:custom-shape draw:style-name="gr426" draw:text-style-name="P2" draw:layer="layout" svg:width="1.746cm" svg:height="0.304cm" svg:x="10.279cm" svg:y="5.371cm">
          <text:p/>
          <draw:enhanced-geometry svg:viewBox="0 0 396 69" draw:type="non-primitive" draw:enhanced-path="M 0 21  L 193 68  L 144 0  L 395 68  N"/>
        </draw:custom-shape>
        <draw:frame draw:style-name="gr9" draw:text-style-name="P15" draw:layer="layout" svg:width="2.535cm" svg:height="2.099cm" svg:x="7.92cm" svg:y="4.361cm">
          <draw:image xlink:href="Pictures/10002E6400006A9D000058B7D885EBB1.wmf" xlink:type="simple" xlink:show="embed" xlink:actuate="onLoad" draw:mime-type="image/x-wmf">
            <text:p/>
          </draw:image>
          <draw:image xlink:href="Pictures/1000000100000307000002853850F70A.png" xlink:type="simple" xlink:show="embed" xlink:actuate="onLoad" draw:mime-type="image/png"/>
        </draw:frame>
        <draw:custom-shape draw:style-name="gr427" draw:text-style-name="P21" draw:layer="layout" svg:width="2.334cm" svg:height="1.019cm" svg:x="10.752cm" svg:y="16.656cm">
          <text:list text:style-name="L8">
            <text:list-header>
              <text:p text:style-name="P20"><text:span text:style-name="T46">Topeka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4">
          <draw:custom-shape draw:style-name="gr231" draw:text-style-name="P70" draw:layer="layout" svg:width="0.281cm" svg:height="0.257cm" svg:x="17.992cm" svg:y="18.09cm">
            <text:p/>
            <draw:enhanced-geometry svg:viewBox="0 0 114 115" draw:type="non-primitive" draw:enhanced-path="M 0 0  L 0 50  L 113 114  L 113 61  L 0 0  N"/>
          </draw:custom-shape>
          <draw:custom-shape draw:style-name="gr428" draw:text-style-name="P71" draw:layer="layout" svg:width="0.401cm" svg:height="0.353cm" svg:x="18.266cm" svg:y="17.991cm">
            <text:p/>
            <draw:enhanced-geometry svg:viewBox="0 0 162 158" draw:type="non-primitive" draw:enhanced-path="M 2 157  L 161 54  L 161 0  L 0 108  L 2 157  N"/>
          </draw:custom-shape>
          <draw:custom-shape draw:style-name="gr429" draw:text-style-name="P13" draw:layer="layout" svg:width="0.683cm" svg:height="0.371cm" svg:x="17.992cm" svg:y="17.868cm">
            <text:p/>
            <draw:enhanced-geometry svg:viewBox="0 0 276 166" draw:type="non-primitive" draw:enhanced-path="M 0 97  L 162 0  L 275 61  L 111 165  L 0 97  N"/>
          </draw:custom-shape>
          <draw:custom-shape draw:style-name="gr430" draw:text-style-name="P72" draw:layer="layout" svg:width="0.621cm" svg:height="0.347cm" svg:x="17.996cm" svg:y="17.568cm">
            <text:p/>
            <draw:enhanced-geometry svg:viewBox="0 0 251 155" draw:type="non-primitive" draw:enhanced-path="M 0 76  L 51 105  L 36 116  L 102 154  L 250 50  L 190 20  L 177 27  L 119 0  L 0 76  N"/>
          </draw:custom-shape>
          <draw:custom-shape draw:style-name="gr431" draw:text-style-name="P70" draw:layer="layout" svg:width="0.285cm" svg:height="0.421cm" svg:x="17.996cm" svg:y="17.731cm">
            <text:p/>
            <draw:enhanced-geometry svg:viewBox="0 0 115 188" draw:type="non-primitive" draw:enhanced-path="M 2 0  L 0 89  L 39 133  L 39 146  L 112 187  L 114 75  L 43 46  L 54 35  L 2 0  N"/>
          </draw:custom-shape>
          <draw:custom-shape draw:style-name="gr432" draw:text-style-name="P71" draw:layer="layout" svg:width="0.344cm" svg:height="0.467cm" svg:x="18.276cm" svg:y="17.684cm">
            <text:p/>
            <draw:enhanced-geometry svg:viewBox="0 0 139 209" draw:type="non-primitive" draw:enhanced-path="M 138 0  L 138 113  L 0 208  L 0 97  L 138 0  N"/>
          </draw:custom-shape>
          <draw:custom-shape draw:style-name="gr433" draw:text-style-name="P73" draw:layer="layout" svg:width="0.257cm" svg:height="0.337cm" svg:x="18.315cm" svg:y="17.738cm">
            <text:p/>
            <draw:enhanced-geometry svg:viewBox="0 0 104 151" draw:type="non-primitive" draw:enhanced-path="M 103 0  L 103 82  L 0 150  L 0 76  L 103 0  N"/>
          </draw:custom-shape>
          <draw:custom-shape draw:style-name="gr434" draw:text-style-name="P2" draw:layer="layout" svg:width="0.249cm" svg:height="0.329cm" svg:x="18.323cm" svg:y="17.747cm">
            <text:p/>
            <draw:enhanced-geometry svg:viewBox="0 0 101 147" draw:type="non-primitive" draw:enhanced-path="M 100 0  L 100 82  L 0 146  N"/>
          </draw:custom-shape>
          <draw:custom-shape draw:style-name="gr435" draw:text-style-name="P71" draw:layer="layout" svg:width="0.539cm" svg:height="0.324cm" svg:x="18.298cm" svg:y="18.112cm">
            <text:p/>
            <draw:enhanced-geometry svg:viewBox="0 0 218 145" draw:type="non-primitive" draw:enhanced-path="M 64 144  L 217 38  L 161 0  L 0 106  L 64 144  N"/>
          </draw:custom-shape>
          <draw:custom-shape draw:style-name="gr436" draw:text-style-name="P74" draw:layer="layout" svg:width="0.537cm" svg:height="0.344cm" svg:x="18.298cm" svg:y="18.08cm">
            <text:p/>
            <draw:enhanced-geometry svg:viewBox="0 0 217 154" draw:type="non-primitive" draw:enhanced-path="M 64 153  L 216 48  L 160 0  L 0 107  L 64 153  N"/>
          </draw:custom-shape>
          <draw:custom-shape draw:style-name="gr231" draw:text-style-name="P70" draw:layer="layout" svg:width="0.161cm" svg:height="0.12cm" svg:x="18.298cm" svg:y="18.32cm">
            <text:p/>
            <draw:enhanced-geometry svg:viewBox="0 0 65 54" draw:type="non-primitive" draw:enhanced-path="M 0 0  L 0 14  L 64 53  L 64 45  L 0 0  N"/>
          </draw:custom-shape>
          <draw:line draw:style-name="gr232" draw:text-style-name="P14" draw:layer="layout" svg:x1="18.336cm" svg:y1="18.319cm" svg:x2="18.707cm" svg:y2="18.1cm">
            <text:p/>
          </draw:line>
          <draw:custom-shape draw:style-name="gr231" draw:text-style-name="P70" draw:layer="layout" svg:width="0.36cm" svg:height="0.23cm" svg:x="18.365cm" svg:y="18.166cm">
            <text:p/>
            <draw:enhanced-geometry svg:viewBox="0 0 146 103" draw:type="non-primitive" draw:enhanced-path="M 0 76  L 36 102  L 145 25  L 113 0  L 0 76  N"/>
          </draw:custom-shape>
          <draw:custom-shape draw:style-name="gr231" draw:text-style-name="P70" draw:layer="layout" svg:width="0.128cm" svg:height="0.089cm" svg:x="18.662cm" svg:y="18.123cm">
            <text:p/>
            <draw:enhanced-geometry svg:viewBox="0 0 52 40" draw:type="non-primitive" draw:enhanced-path="M 0 16  L 31 39  L 51 24  L 21 0  L 0 16  N"/>
          </draw:custom-shape>
          <draw:custom-shape draw:style-name="gr235" draw:text-style-name="P13" draw:layer="layout" svg:width="0.36cm" svg:height="0.232cm" svg:x="18.365cm" svg:y="18.155cm">
            <text:p/>
            <draw:enhanced-geometry svg:viewBox="0 0 146 104" draw:type="non-primitive" draw:enhanced-path="M 0 77  L 36 103  L 145 25  L 113 0  L 0 77  N"/>
          </draw:custom-shape>
          <draw:custom-shape draw:style-name="gr235" draw:text-style-name="P13" draw:layer="layout" svg:width="0.128cm" svg:height="0.093cm" svg:x="18.662cm" svg:y="18.112cm">
            <text:p/>
            <draw:enhanced-geometry svg:viewBox="0 0 52 42" draw:type="non-primitive" draw:enhanced-path="M 0 17  L 31 41  L 51 25  L 21 0  L 0 17  N"/>
          </draw:custom-shape>
        </draw:g>
        <draw:custom-shape draw:style-name="gr437" draw:text-style-name="P21" draw:layer="layout" svg:width="4.35cm" svg:height="1.023cm" svg:x="17.32cm" svg:y="16.607cm">
          <text:list text:style-name="L8">
            <text:list-header>
              <text:p text:style-name="P20"><text:span text:style-name="T46">Telecommuter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4">
          <draw:custom-shape draw:style-name="gr231" draw:text-style-name="P70" draw:layer="layout" svg:width="0.282cm" svg:height="0.257cm" svg:x="19.473cm" svg:y="18.09cm">
            <text:p/>
            <draw:enhanced-geometry svg:viewBox="0 0 114 115" draw:type="non-primitive" draw:enhanced-path="M 0 0  L 0 50  L 113 114  L 113 61  L 0 0  N"/>
          </draw:custom-shape>
          <draw:custom-shape draw:style-name="gr428" draw:text-style-name="P71" draw:layer="layout" svg:width="0.401cm" svg:height="0.353cm" svg:x="19.747cm" svg:y="17.991cm">
            <text:p/>
            <draw:enhanced-geometry svg:viewBox="0 0 162 158" draw:type="non-primitive" draw:enhanced-path="M 2 157  L 161 54  L 161 0  L 0 108  L 2 157  N"/>
          </draw:custom-shape>
          <draw:custom-shape draw:style-name="gr429" draw:text-style-name="P13" draw:layer="layout" svg:width="0.683cm" svg:height="0.371cm" svg:x="19.473cm" svg:y="17.868cm">
            <text:p/>
            <draw:enhanced-geometry svg:viewBox="0 0 276 166" draw:type="non-primitive" draw:enhanced-path="M 0 97  L 162 0  L 275 61  L 111 165  L 0 97  N"/>
          </draw:custom-shape>
          <draw:custom-shape draw:style-name="gr438" draw:text-style-name="P72" draw:layer="layout" svg:width="0.622cm" svg:height="0.347cm" svg:x="19.477cm" svg:y="17.568cm">
            <text:p/>
            <draw:enhanced-geometry svg:viewBox="0 0 251 155" draw:type="non-primitive" draw:enhanced-path="M 0 76  L 51 105  L 36 116  L 102 154  L 250 50  L 190 20  L 177 27  L 119 0  L 0 76  N"/>
          </draw:custom-shape>
          <draw:custom-shape draw:style-name="gr431" draw:text-style-name="P70" draw:layer="layout" svg:width="0.285cm" svg:height="0.421cm" svg:x="19.477cm" svg:y="17.731cm">
            <text:p/>
            <draw:enhanced-geometry svg:viewBox="0 0 115 188" draw:type="non-primitive" draw:enhanced-path="M 2 0  L 0 89  L 39 133  L 39 146  L 112 187  L 114 75  L 43 46  L 54 35  L 2 0  N"/>
          </draw:custom-shape>
          <draw:custom-shape draw:style-name="gr432" draw:text-style-name="P71" draw:layer="layout" svg:width="0.344cm" svg:height="0.467cm" svg:x="19.757cm" svg:y="17.684cm">
            <text:p/>
            <draw:enhanced-geometry svg:viewBox="0 0 139 209" draw:type="non-primitive" draw:enhanced-path="M 138 0  L 138 113  L 0 208  L 0 97  L 138 0  N"/>
          </draw:custom-shape>
          <draw:custom-shape draw:style-name="gr433" draw:text-style-name="P73" draw:layer="layout" svg:width="0.257cm" svg:height="0.337cm" svg:x="19.797cm" svg:y="17.738cm">
            <text:p/>
            <draw:enhanced-geometry svg:viewBox="0 0 104 151" draw:type="non-primitive" draw:enhanced-path="M 103 0  L 103 82  L 0 150  L 0 76  L 103 0  N"/>
          </draw:custom-shape>
          <draw:custom-shape draw:style-name="gr434" draw:text-style-name="P2" draw:layer="layout" svg:width="0.25cm" svg:height="0.329cm" svg:x="19.805cm" svg:y="17.747cm">
            <text:p/>
            <draw:enhanced-geometry svg:viewBox="0 0 101 147" draw:type="non-primitive" draw:enhanced-path="M 100 0  L 100 82  L 0 146  N"/>
          </draw:custom-shape>
          <draw:custom-shape draw:style-name="gr439" draw:text-style-name="P71" draw:layer="layout" svg:width="0.54cm" svg:height="0.324cm" svg:x="19.779cm" svg:y="18.112cm">
            <text:p/>
            <draw:enhanced-geometry svg:viewBox="0 0 218 145" draw:type="non-primitive" draw:enhanced-path="M 64 144  L 217 38  L 161 0  L 0 106  L 64 144  N"/>
          </draw:custom-shape>
          <draw:custom-shape draw:style-name="gr436" draw:text-style-name="P74" draw:layer="layout" svg:width="0.537cm" svg:height="0.344cm" svg:x="19.779cm" svg:y="18.08cm">
            <text:p/>
            <draw:enhanced-geometry svg:viewBox="0 0 217 154" draw:type="non-primitive" draw:enhanced-path="M 64 153  L 216 48  L 160 0  L 0 107  L 64 153  N"/>
          </draw:custom-shape>
          <draw:custom-shape draw:style-name="gr231" draw:text-style-name="P70" draw:layer="layout" svg:width="0.161cm" svg:height="0.12cm" svg:x="19.779cm" svg:y="18.32cm">
            <text:p/>
            <draw:enhanced-geometry svg:viewBox="0 0 65 54" draw:type="non-primitive" draw:enhanced-path="M 0 0  L 0 14  L 64 53  L 64 45  L 0 0  N"/>
          </draw:custom-shape>
          <draw:line draw:style-name="gr232" draw:text-style-name="P14" draw:layer="layout" svg:x1="19.817cm" svg:y1="18.319cm" svg:x2="20.188cm" svg:y2="18.1cm">
            <text:p/>
          </draw:line>
          <draw:custom-shape draw:style-name="gr231" draw:text-style-name="P70" draw:layer="layout" svg:width="0.361cm" svg:height="0.23cm" svg:x="19.847cm" svg:y="18.166cm">
            <text:p/>
            <draw:enhanced-geometry svg:viewBox="0 0 146 103" draw:type="non-primitive" draw:enhanced-path="M 0 76  L 36 102  L 145 25  L 113 0  L 0 76  N"/>
          </draw:custom-shape>
          <draw:custom-shape draw:style-name="gr231" draw:text-style-name="P70" draw:layer="layout" svg:width="0.128cm" svg:height="0.089cm" svg:x="20.144cm" svg:y="18.123cm">
            <text:p/>
            <draw:enhanced-geometry svg:viewBox="0 0 52 40" draw:type="non-primitive" draw:enhanced-path="M 0 16  L 31 39  L 51 24  L 21 0  L 0 16  N"/>
          </draw:custom-shape>
          <draw:custom-shape draw:style-name="gr235" draw:text-style-name="P13" draw:layer="layout" svg:width="0.361cm" svg:height="0.232cm" svg:x="19.847cm" svg:y="18.155cm">
            <text:p/>
            <draw:enhanced-geometry svg:viewBox="0 0 146 104" draw:type="non-primitive" draw:enhanced-path="M 0 77  L 36 103  L 145 25  L 113 0  L 0 77  N"/>
          </draw:custom-shape>
          <draw:custom-shape draw:style-name="gr235" draw:text-style-name="P13" draw:layer="layout" svg:width="0.128cm" svg:height="0.093cm" svg:x="20.144cm" svg:y="18.112cm">
            <text:p/>
            <draw:enhanced-geometry svg:viewBox="0 0 52 42" draw:type="non-primitive" draw:enhanced-path="M 0 17  L 31 41  L 51 25  L 21 0  L 0 17  N"/>
          </draw:custom-shape>
        </draw:g>
        <anim:par presentation:node-type="timing-root">
          <anim:par smil:begin="id11.begin">
            <anim:transitionFilter smil:dur="1s" smil:type="fade" smil:subtype="fadeOverColor" smil:fadeColor="#000000"/>
          </anim:par>
        </anim:par>
        <presentation:notes draw:style-name="dp3">
          <draw:frame draw:style-name="gr33" draw:text-style-name="P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33" draw:text-style-name="P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page-thumbnail draw:style-name="gr1" draw:layer="layout" svg:width="12.696cm" svg:height="9.521cm" svg:x="3.179cm" svg:y="1.905cm" draw:page-number="11" presentation:class="page"/>
          <draw:frame presentation:style-name="pr9" draw:text-style-name="P5" draw:layer="layout" svg:width="13.97cm" svg:height="11.434cm" svg:x="2.54cm" svg:y="12.061cm" presentation:class="notes" presentation:user-transformed="true">
            <draw:text-box>
              <text:list text:style-name="L3">
                <text:list-header>
                  <text:p text:style-name="P4"><text:span text:style-name="T3">This is a 24x7 world, with many of your enterprises running around the clock around the globe.</text:span></text:p>
                  <text:p text:style-name="P4"><text:span text:style-name="T3"/></text:p>
                  <text:p text:style-name="P4"><text:span text:style-name="T3">The IT needed to deliver local data, local processing dictate local systems. <text:s/>In turn, you are stuck with enterprise management issues multiplied by country-by-country country service contracts. <text:s/>Not to mention the need to provide 24x7 global Help Desk support.</text:span></text:p>
                  <text:p text:style-name="P4"><text:span text:style-name="T3">Unless carefully managed, costs can sky-rocket and service levels deteriorate.</text:span></text:p>
                </text:list-header>
              </text:list>
            </draw:text-box>
          </draw:frame>
        </presentation:notes>
      </draw:page>
      <draw:page draw:name="Shift from NOS to Intranet" draw:style-name="dp1" draw:master-page-name="Default" presentation:presentation-page-layout-name="AL3T19" xml:id="id12" draw:id="id12"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Shift from NOS to Intranet</text:p>
              </text:list-header>
            </text:list>
          </draw:text-box>
        </draw:frame>
        <draw:custom-shape draw:style-name="gr174" draw:text-style-name="P38" draw:layer="layout" svg:width="8.308cm" svg:height="7.877cm" svg:x="16.395cm" svg:y="6.562cm">
          <text:list text:style-name="L3">
            <text:list-header>
              <text:p text:style-name="P1"><text:span text:style-name="T34">New LAN Functions:</text:span><text:span text:style-name="T34"><text:line-break/></text:span><text:span text:style-name="T34">-Applications</text:span><text:span text:style-name="T34"><text:line-break/></text:span><text:span text:style-name="T34">-Decision support</text:span><text:span text:style-name="T34"><text:line-break/></text:span><text:span text:style-name="T34">-Mainframe connectivity</text:span><text:span text:style-name="T34"><text:line-break/></text:span><text:span text:style-name="T34">-Exchange server</text:span></text:p>
              <text:p text:style-name="P1"><text:span text:style-name="T34">-Internet proxy</text:span><text:span text:style-name="T34"><text:line-break/></text:span><text:span text:style-name="T34">-firewall</text:span><text:span text:style-name="T34"><text:line-break/></text:span><text:span text:style-name="T34">-Systems management</text:span><text:span text:style-name="T34"><text:line-break/></text:span><text:span text:style-name="T34">-Development</text:span></text:p>
              <text:p text:style-name="P1"><text:span text:style-name="T34">-WINS &amp; DHCP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4">
          <draw:custom-shape draw:style-name="gr440" draw:text-style-name="P2" draw:layer="layout" svg:width="10.653cm" svg:height="3.033cm" svg:x="3.246cm" svg:y="8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5" draw:layer="layout" svg:width="1.654cm" svg:height="1.693cm" svg:x="5.08cm" svg:y="7.598cm">
            <draw:image xlink:href="Pictures/100003BA00006A0300006C85BC49BDCD.wmf" xlink:type="simple" xlink:show="embed" xlink:actuate="onLoad" draw:mime-type="image/x-wmf">
              <text:p/>
            </draw:image>
            <draw:image xlink:href="Pictures/10000001000002BB000002CB1C9342BB.png" xlink:type="simple" xlink:show="embed" xlink:actuate="onLoad" draw:mime-type="image/png"/>
          </draw:frame>
          <draw:frame draw:style-name="gr9" draw:text-style-name="P15" draw:layer="layout" svg:width="1.653cm" svg:height="1.694cm" svg:x="9.102cm" svg:y="7.386cm">
            <draw:image xlink:href="Pictures/100003BA00006A0300006C85BC49BDCD.wmf" xlink:type="simple" xlink:show="embed" xlink:actuate="onLoad" draw:mime-type="image/x-wmf">
              <text:p/>
            </draw:image>
            <draw:image xlink:href="Pictures/10000001000002BB000002CB1C9342BB.png" xlink:type="simple" xlink:show="embed" xlink:actuate="onLoad" draw:mime-type="image/png"/>
          </draw:frame>
          <draw:frame draw:style-name="gr9" draw:text-style-name="P15" draw:layer="layout" svg:width="1.654cm" svg:height="1.694cm" svg:x="7.408cm" svg:y="11.831cm">
            <draw:image xlink:href="Pictures/100003BA00006A0300006C85BC49BDCD.wmf" xlink:type="simple" xlink:show="embed" xlink:actuate="onLoad" draw:mime-type="image/x-wmf">
              <text:p/>
            </draw:image>
            <draw:image xlink:href="Pictures/10000001000002BB000002CB1C9342BB.png" xlink:type="simple" xlink:show="embed" xlink:actuate="onLoad" draw:mime-type="image/png"/>
          </draw:frame>
          <draw:frame draw:style-name="gr9" draw:text-style-name="P15" draw:layer="layout" svg:width="1.654cm" svg:height="1.693cm" svg:x="1.693cm" svg:y="9.503cm">
            <draw:image xlink:href="Pictures/100003BA00006A0300006C85BC49BDCD.wmf" xlink:type="simple" xlink:show="embed" xlink:actuate="onLoad" draw:mime-type="image/x-wmf">
              <text:p/>
            </draw:image>
            <draw:image xlink:href="Pictures/10000001000002BB000002CB1C9342BB.png" xlink:type="simple" xlink:show="embed" xlink:actuate="onLoad" draw:mime-type="image/png"/>
          </draw:frame>
          <draw:frame draw:style-name="gr9" draw:text-style-name="P15" draw:layer="layout" svg:width="1.654cm" svg:height="1.693cm" svg:x="3.81cm" svg:y="11.62cm">
            <draw:image xlink:href="Pictures/100003BA00006A0300006C85BC49BDCD.wmf" xlink:type="simple" xlink:show="embed" xlink:actuate="onLoad" draw:mime-type="image/x-wmf">
              <text:p/>
            </draw:image>
            <draw:image xlink:href="Pictures/10000001000002BB000002CB1C9342BB.png" xlink:type="simple" xlink:show="embed" xlink:actuate="onLoad" draw:mime-type="image/png"/>
          </draw:frame>
          <draw:frame draw:style-name="gr441" draw:text-style-name="P15" draw:layer="layout" svg:width="2.739cm" svg:height="4.815cm" svg:x="12.034cm" svg:y="5.927c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  <draw:frame draw:style-name="gr441" draw:text-style-name="P15" draw:layer="layout" svg:width="2.738cm" svg:height="4.815cm" svg:x="10.372cm" svg:y="10.16cm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  <draw:frame draw:style-name="gr441" draw:text-style-name="P15" draw:layer="layout" svg:width="2.739cm" svg:height="4.816cm" svg:x="13.727cm" svg:y="9.313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  <draw:g draw:style-name="gr4">
            <draw:custom-shape draw:style-name="gr442" draw:text-style-name="P16" draw:layer="layout" svg:width="2.717cm" svg:height="1.023cm" svg:x="13.564cm" svg:y="10.1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4" draw:text-style-name="P38" draw:layer="layout" svg:width="1.797cm" svg:height="0.765cm" svg:x="13.709cm" svg:y="10.288cm">
              <text:list text:style-name="L3">
                <text:list-header>
                  <text:p text:style-name="P1"><text:span text:style-name="T47">E-Mail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443" draw:text-style-name="P16" draw:layer="layout" svg:width="2.716cm" svg:height="1.023cm" svg:x="9.966cm" svg:y="11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4" draw:text-style-name="P38" draw:layer="layout" svg:width="1.687cm" svg:height="0.765cm" svg:x="10.128cm" svg:y="11.135cm">
              <text:list text:style-name="L3">
                <text:list-header>
                  <text:p text:style-name="P1"><text:span text:style-name="T47">DHC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442" draw:text-style-name="P16" draw:layer="layout" svg:width="2.717cm" svg:height="1.023cm" svg:x="11.659cm" svg:y="6.7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4" draw:text-style-name="P38" draw:layer="layout" svg:width="2.19cm" svg:height="0.765cm" svg:x="11.726cm" svg:y="6.901cm">
              <text:list text:style-name="L3">
                <text:list-header>
                  <text:p text:style-name="P1"><text:span text:style-name="T47">Firewall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444" draw:text-style-name="P88" draw:layer="layout" svg:width="10.53cm" svg:height="1.951cm" svg:x="0.865cm" svg:y="16.51cm">
          <text:list text:style-name="L19">
            <text:list-header>
              <text:p text:style-name="P3"><text:span text:style-name="T48">“</text:span><text:span text:style-name="T48">95% of Fortune 1000 Will Have </text:span><text:span text:style-name="T48"><text:line-break/></text:span><text:span text:style-name="T48">Intranets By 2000” -- Forrester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5">Five years ago, Aberdeen had a single Pentium-based server. <text:s/>Today we have six servers, including a symmetric multiprocessor. <text:s/>What’s happened to our LANS?</text:span></text:p>
                  <text:p text:style-name="P4"><text:span text:style-name="T35">First, we added services for users such as internet access, e-mail, client-server applications, and database access.</text:span></text:p>
                  <text:p text:style-name="P4"><text:span text:style-name="T35">But invisibly, the operating system services needed to support this workgroup grew by leaps and bounds:</text:span></text:p>
                  <text:p text:style-name="P4"><text:span text:style-name="T35">- firewalls</text:span></text:p>
                  <text:p text:style-name="P4"><text:span text:style-name="T35">- anti-virus software</text:span></text:p>
                  <text:p text:style-name="P4"><text:span text:style-name="T35">- distributed backup</text:span></text:p>
                  <text:p text:style-name="P4"><text:span text:style-name="T35">- WINS &amp; DHCP, &amp; domain management</text:span></text:p>
                  <text:p text:style-name="P4"><text:span text:style-name="T35">- SNMP for desktop management</text:span></text:p>
                  <text:p text:style-name="P4"><text:span text:style-name="T35">This means we needed more servers, and it radically complicated our IT planning, operations, and management.</text:span></text:p>
                  <text:p text:style-name="P4"><text:span text:style-name="T35">Sound familiar?</text:span></text:p>
                </text:list-header>
              </text:list>
            </draw:text-box>
          </draw:frame>
        </presentation:notes>
      </draw:page>
      <draw:page draw:name="Data Warehousing:  “Great Idea, Hard to Implement”" draw:style-name="dp1" draw:master-page-name="Default" presentation:presentation-page-layout-name="AL5T10" xml:id="id13" draw:id="id13"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Data Warehousing: <text:s/>“Great Idea, Hard to Implement”</text:p>
              </text:list-header>
            </text:list>
          </draw:text-box>
        </draw:frame>
        <draw:g draw:style-name="gr4">
          <draw:custom-shape draw:style-name="gr445" draw:text-style-name="P16" draw:layer="layout" svg:width="9.084cm" svg:height="1.544cm" svg:x="13.564cm" svg:y="8.438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446" draw:text-style-name="P89" draw:layer="layout" svg:width="6.535cm" svg:height="0.281cm" svg:x="14.837cm" svg:y="9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7" draw:text-style-name="P89" draw:layer="layout" svg:width="6.57cm" svg:height="0.952cm" svg:x="14.821cm" svg:y="8.745cm">
              <text:p/>
              <draw:enhanced-geometry svg:viewBox="0 0 21600 21600" draw:type="rectangle" draw:enhanced-path="M 0 0 L 21600 0 21600 21600 0 21600 0 0 Z N"/>
            </draw:custom-shape>
            <draw:custom-shape draw:style-name="gr446" draw:text-style-name="P89" draw:layer="layout" svg:width="6.535cm" svg:height="0.29cm" svg:x="14.837cm" svg:y="8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48" draw:text-style-name="P16" draw:layer="layout" svg:width="9.084cm" svg:height="1.071cm" svg:x="13.564cm" svg:y="11.43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449" draw:text-style-name="P90" draw:layer="layout" svg:width="1.604cm" svg:height="0.2cm" svg:x="14.293cm" svg:y="12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0" draw:text-style-name="P90" draw:layer="layout" svg:width="1.64cm" svg:height="0.678cm" svg:x="14.276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449" draw:text-style-name="P90" draw:layer="layout" svg:width="1.604cm" svg:height="0.196cm" svg:x="14.293cm" svg:y="11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451" draw:text-style-name="P90" draw:layer="layout" svg:width="1.601cm" svg:height="0.2cm" svg:x="16.3cm" svg:y="12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2" draw:text-style-name="P90" draw:layer="layout" svg:width="1.637cm" svg:height="0.678cm" svg:x="16.283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451" draw:text-style-name="P90" draw:layer="layout" svg:width="1.601cm" svg:height="0.196cm" svg:x="16.3cm" svg:y="11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453" draw:text-style-name="P90" draw:layer="layout" svg:width="1.605cm" svg:height="0.2cm" svg:x="18.304cm" svg:y="12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4" draw:text-style-name="P90" draw:layer="layout" svg:width="1.639cm" svg:height="0.678cm" svg:x="18.288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453" draw:text-style-name="P90" draw:layer="layout" svg:width="1.605cm" svg:height="0.196cm" svg:x="18.304cm" svg:y="11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455" draw:text-style-name="P90" draw:layer="layout" svg:width="1.609cm" svg:height="0.2cm" svg:x="20.307cm" svg:y="12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6" draw:text-style-name="P90" draw:layer="layout" svg:width="1.644cm" svg:height="0.678cm" svg:x="20.291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455" draw:text-style-name="P90" draw:layer="layout" svg:width="1.609cm" svg:height="0.196cm" svg:x="20.307cm" svg:y="11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57" draw:text-style-name="P16" draw:layer="layout" svg:width="9.084cm" svg:height="1.067cm" svg:x="13.564cm" svg:y="6.077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458" draw:text-style-name="P17" draw:layer="layout" svg:width="1.678cm" svg:height="0.175cm" svg:x="13.956cm" svg:y="6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9" draw:text-style-name="P17" draw:layer="layout" svg:width="1.714cm" svg:height="0.617cm" svg:x="13.939cm" svg:y="6.282cm">
              <text:p/>
              <draw:enhanced-geometry svg:viewBox="0 0 21600 21600" draw:type="rectangle" draw:enhanced-path="M 0 0 L 21600 0 21600 21600 0 21600 0 0 Z N"/>
            </draw:custom-shape>
            <draw:custom-shape draw:style-name="gr458" draw:text-style-name="P17" draw:layer="layout" svg:width="1.678cm" svg:height="0.17cm" svg:x="13.956cm" svg:y="6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460" draw:text-style-name="P17" draw:layer="layout" svg:width="1.674cm" svg:height="0.175cm" svg:x="16.15cm" svg:y="6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1" draw:text-style-name="P17" draw:layer="layout" svg:width="1.709cm" svg:height="0.617cm" svg:x="16.133cm" svg:y="6.282cm">
              <text:p/>
              <draw:enhanced-geometry svg:viewBox="0 0 21600 21600" draw:type="rectangle" draw:enhanced-path="M 0 0 L 21600 0 21600 21600 0 21600 0 0 Z N"/>
            </draw:custom-shape>
            <draw:custom-shape draw:style-name="gr460" draw:text-style-name="P17" draw:layer="layout" svg:width="1.674cm" svg:height="0.17cm" svg:x="16.15cm" svg:y="6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462" draw:text-style-name="P17" draw:layer="layout" svg:width="1.864cm" svg:height="0.175cm" svg:x="18.343cm" svg:y="6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3" draw:text-style-name="P17" draw:layer="layout" svg:width="1.9cm" svg:height="0.617cm" svg:x="18.326cm" svg:y="6.282cm">
              <text:p/>
              <draw:enhanced-geometry svg:viewBox="0 0 21600 21600" draw:type="rectangle" draw:enhanced-path="M 0 0 L 21600 0 21600 21600 0 21600 0 0 Z N"/>
            </draw:custom-shape>
            <draw:custom-shape draw:style-name="gr462" draw:text-style-name="P17" draw:layer="layout" svg:width="1.864cm" svg:height="0.17cm" svg:x="18.343cm" svg:y="6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464" draw:text-style-name="P91" draw:layer="layout" svg:width="1.674cm" svg:height="0.175cm" svg:x="20.739cm" svg:y="6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5" draw:text-style-name="P91" draw:layer="layout" svg:width="1.709cm" svg:height="0.617cm" svg:x="20.723cm" svg:y="6.282cm">
              <text:p/>
              <draw:enhanced-geometry svg:viewBox="0 0 21600 21600" draw:type="rectangle" draw:enhanced-path="M 0 0 L 21600 0 21600 21600 0 21600 0 0 Z N"/>
            </draw:custom-shape>
            <draw:custom-shape draw:style-name="gr464" draw:text-style-name="P91" draw:layer="layout" svg:width="1.674cm" svg:height="0.17cm" svg:x="20.739cm" svg:y="6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66" draw:text-style-name="P16" draw:layer="layout" svg:width="9.084cm" svg:height="1.225cm" svg:x="13.564cm" svg:y="14.115cm">
            <text:p/>
            <draw:enhanced-geometry svg:viewBox="0 0 21600 21600" draw:type="rectangle" draw:enhanced-path="M 0 0 L 21600 0 21600 21600 0 21600 0 0 Z N"/>
          </draw:custom-shape>
          <draw:frame draw:style-name="gr467" draw:text-style-name="P15" draw:layer="layout" svg:width="0.945cm" svg:height="0.841cm" svg:x="14.108cm" svg:y="14.307cm">
            <draw:object-ole draw:class-id="00000000-0000-0000-0000-000000000000" xlink:href="./Object 4" xlink:type="simple" xlink:show="embed" xlink:actuate="onLoad">
              <loext:p/>
            </draw:object-ole>
            <draw:image xlink:href="./ObjectReplacements/Object 4" xlink:type="simple" xlink:show="embed" xlink:actuate="onLoad"/>
          </draw:frame>
          <draw:frame draw:style-name="gr468" draw:text-style-name="P15" draw:layer="layout" svg:width="1.157cm" svg:height="0.875cm" svg:x="18.978cm" svg:y="14.328cm">
            <draw:object-ole draw:class-id="00000000-0000-0000-0000-000000000000" xlink:href="./Object 5" xlink:type="simple" xlink:show="embed" xlink:actuate="onLoad">
              <loext:p/>
            </draw:object-ole>
            <draw:image xlink:href="./ObjectReplacements/Object 5" xlink:type="simple" xlink:show="embed" xlink:actuate="onLoad"/>
          </draw:frame>
          <draw:frame draw:style-name="gr469" draw:text-style-name="P15" draw:layer="layout" svg:width="0.859cm" svg:height="0.737cm" svg:x="15.731cm" svg:y="14.393cm">
            <draw:object-ole draw:class-id="00000000-0000-0000-0000-000000000000" xlink:href="./Object 6" xlink:type="simple" xlink:show="embed" xlink:actuate="onLoad">
              <loext:p/>
            </draw:object-ole>
            <draw:image xlink:href="./ObjectReplacements/Object 6" xlink:type="simple" xlink:show="embed" xlink:actuate="onLoad"/>
          </draw:frame>
          <draw:custom-shape draw:style-name="gr470" draw:text-style-name="P16" draw:layer="layout" svg:width="9.084cm" svg:height="1.229cm" svg:x="13.564cm" svg:y="12.693cm">
            <text:p/>
            <draw:enhanced-geometry svg:viewBox="0 0 21600 21600" draw:type="rectangle" draw:enhanced-path="M 0 0 L 21600 0 21600 21600 0 21600 0 0 Z N"/>
          </draw:custom-shape>
          <draw:custom-shape draw:style-name="gr471" draw:text-style-name="P92" draw:layer="layout" svg:width="0.668cm" svg:height="0.473cm" svg:x="14.665cm" svg:y="12.989cm">
            <text:p/>
            <draw:enhanced-geometry svg:viewBox="0 0 155 111" draw:type="non-primitive" draw:enhanced-path="M 9 106  L 12 107  L 15 108  L 19 109  L 23 110  L 28 110  L 32 110  L 37 109  L 42 108  L 47 107  L 53 106  L 58 104  L 64 102  L 69 100  L 75 98  L 81 95  L 87 92  L 92 89  L 98 85  L 103 82  L 108 79  L 114 75  L 119 70  L 123 67  L 128 63  L 132 59  L 136 55  L 139 50  L 142 47  L 145 42  L 148 39  L 150 34  L 151 30  L 153 27  L 153 24  L 154 20  L 153 18  L 153 14  L 152 11  L 150 10  L 149 7  L 146 5  L 143 3  L 141 2  L 138 1  L 134 0  L 130 0  L 125 0  L 121 0  L 116 0  L 110 1  L 106 2  L 100 3  L 94 5  L 89 7  L 84 10  L 77 11  L 72 14  L 66 18  L 61 20  L 55 24  L 49 27  L 45 30  L 39 34  L 34 39  L 30 42  L 25 47  L 21 50  L 17 54  L 14 59  L 11 62  L 8 67  L 5 70  L 3 75  L 1 79  L 0 82  L 0 85  L 0 89  L 0 91  L 0 95  L 1 98  L 2 100  L 4 102  L 7 104  L 9 106  L 15 103  L 12 101  L 11 100  L 9 99  L 8 97  L 7 94  L 7 91  L 7 89  L 7 86  L 8 82  L 9 79  L 10 76  L 12 72  L 15 68  L 16 64  L 19 60  L 23 56  L 27 52  L 31 49  L 35 44  L 40 40  L 45 37  L 49 33  L 55 30  L 61 26  L 65 23  L 71 20  L 77 18  L 82 14  L 88 12  L 92 10  L 98 9  L 103 7  L 108 6  L 113 4  L 117 4  L 122 4  L 125 3  L 129 4  L 132 4  L 135 4  L 137 5  L 138 6  L 140 8  L 142 9  L 144 10  L 145 12  L 146 15  L 146 18  L 146 20  L 146 23  L 145 27  L 144 30  L 143 33  L 141 38  L 138 41  L 136 45  L 133 50  L 130 53  L 126 57  L 122 61  L 118 65  L 113 69  L 108 72  L 103 76  L 98 80  L 92 83  L 88 86  L 82 90  L 77 92  L 71 95  L 65 97  L 60 99  L 55 100  L 49 102  L 45 104  L 40 105  L 36 105  L 31 106  L 28 106  L 24 106  L 21 105  L 18 105  L 16 104  L 15 103  L 9 106  N"/>
          </draw:custom-shape>
          <draw:custom-shape draw:style-name="gr472" draw:text-style-name="P92" draw:layer="layout" svg:width="0.608cm" svg:height="0.439cm" svg:x="14.699cm" svg:y="13.01cm">
            <text:p/>
            <draw:enhanced-geometry svg:viewBox="0 0 141 103" draw:type="non-primitive" draw:enhanced-path="M 7 99  L 5 98  L 3 96  L 2 94  L 1 92  L 0 91  L 0 88  L 0 84  L 0 81  L 0 79  L 1 75  L 3 71  L 5 68  L 7 64  L 10 60  L 13 56  L 16 52  L 20 48  L 24 44  L 28 40  L 33 36  L 38 32  L 42 29  L 48 26  L 54 22  L 58 19  L 64 16  L 70 13  L 75 10  L 81 9  L 85 7  L 91 4  L 97 3  L 101 1  L 106 0  L 111 0  L 114 0  L 118 0  L 122 0  L 125 0  L 127 0  L 130 1  L 132 2  L 134 3  L 136 5  L 137 7  L 138 9  L 139 10  L 140 13  L 140 17  L 139 20  L 139 22  L 138 26  L 136 30  L 134 33  L 132 37  L 129 41  L 126 45  L 123 49  L 119 53  L 115 57  L 111 61  L 106 65  L 101 69  L 97 72  L 91 75  L 85 79  L 81 82  L 75 85  L 70 88  L 64 91  L 58 92  L 53 95  L 48 97  L 42 98  L 38 100  L 33 101  L 28 101  L 24 102  L 21 102  L 17 102  L 14 101  L 12 101  L 9 100  L 7 99  N"/>
          </draw:custom-shape>
          <draw:custom-shape draw:style-name="gr473" draw:text-style-name="P92" draw:layer="layout" svg:width="0.669cm" svg:height="0.469cm" svg:x="15.312cm" svg:y="13.223cm">
            <text:p/>
            <draw:enhanced-geometry svg:viewBox="0 0 155 110" draw:type="non-primitive" draw:enhanced-path="M 9 105  L 12 106  L 15 107  L 19 108  L 23 109  L 28 109  L 31 109  L 37 108  L 42 107  L 47 106  L 52 105  L 58 103  L 63 101  L 70 99  L 76 97  L 81 94  L 87 91  L 92 88  L 98 85  L 104 81  L 109 78  L 114 74  L 119 70  L 123 66  L 128 62  L 132 59  L 136 54  L 139 50  L 143 46  L 145 42  L 148 38  L 150 34  L 152 30  L 153 27  L 154 23  L 154 20  L 154 17  L 153 14  L 152 11  L 151 9  L 149 7  L 146 5  L 144 3  L 141 2  L 138 1  L 134 0  L 130 0  L 125 0  L 122 0  L 116 0  L 111 1  L 106 2  L 101 3  L 95 5  L 90 7  L 83 9  L 77 11  L 72 14  L 66 17  L 61 20  L 55 23  L 49 27  L 44 30  L 39 34  L 34 38  L 30 42  L 25 46  L 21 49  L 17 54  L 14 58  L 10 62  L 8 66  L 5 70  L 3 74  L 1 78  L 0 81  L 0 85  L 0 88  L 0 91  L 0 94  L 1 97  L 2 99  L 4 101  L 7 103  L 9 105  L 14 102  L 12 101  L 10 99  L 9 98  L 8 96  L 7 93  L 7 90  L 6 88  L 7 85  L 7 81  L 8 79  L 10 75  L 12 71  L 15 68  L 16 63  L 20 59  L 23 56  L 27 51  L 30 48  L 35 44  L 40 39  L 45 37  L 49 32  L 55 29  L 61 26  L 65 22  L 71 19  L 77 17  L 82 14  L 88 12  L 92 9  L 98 9  L 104 7  L 108 5  L 113 4  L 118 4  L 122 3  L 125 3  L 129 3  L 132 4  L 135 4  L 137 5  L 138 6  L 141 7  L 142 9  L 144 10  L 145 12  L 146 15  L 146 18  L 146 20  L 146 23  L 146 27  L 144 29  L 143 33  L 141 37  L 138 40  L 137 45  L 133 49  L 130 52  L 126 57  L 123 60  L 118 64  L 113 69  L 108 71  L 104 75  L 98 79  L 92 82  L 88 86  L 82 89  L 77 91  L 71 94  L 65 96  L 61 99  L 55 99  L 49 101  L 45 102  L 40 104  L 35 104  L 31 105  L 28 105  L 24 105  L 21 104  L 18 104  L 16 103  L 14 102  L 9 105  N"/>
          </draw:custom-shape>
          <draw:custom-shape draw:style-name="gr474" draw:text-style-name="P92" draw:layer="layout" svg:width="0.599cm" svg:height="0.43cm" svg:x="15.347cm" svg:y="13.24cm">
            <text:p/>
            <draw:enhanced-geometry svg:viewBox="0 0 139 101" draw:type="non-primitive" draw:enhanced-path="M 7 97  L 5 96  L 3 94  L 2 92  L 1 90  L 0 89  L 0 86  L 0 83  L 0 80  L 0 77  L 1 73  L 3 70  L 5 66  L 8 63  L 10 59  L 13 55  L 16 51  L 20 47  L 24 43  L 28 39  L 33 36  L 37 32  L 42 28  L 47 25  L 53 21  L 58 18  L 63 16  L 69 13  L 74 10  L 80 9  L 85 6  L 90 4  L 96 3  L 100 1  L 105 0  L 110 0  L 113 0  L 117 0  L 120 0  L 124 0  L 126 0  L 128 1  L 130 2  L 132 3  L 134 5  L 135 7  L 137 9  L 137 10  L 138 13  L 138 16  L 138 19  L 137 22  L 136 26  L 134 29  L 133 33  L 130 36  L 127 40  L 124 44  L 121 48  L 118 52  L 113 56  L 110 60  L 105 63  L 100 67  L 96 71  L 90 74  L 85 77  L 80 81  L 74 83  L 69 86  L 63 89  L 57 90  L 53 93  L 47 95  L 42 96  L 37 98  L 33 99  L 28 99  L 25 100  L 20 100  L 17 100  L 14 99  L 12 99  L 10 98  L 7 97  N"/>
          </draw:custom-shape>
          <draw:custom-shape draw:style-name="gr475" draw:text-style-name="P92" draw:layer="layout" svg:width="0.88cm" svg:height="0.717cm" svg:x="14.907cm" svg:y="12.984cm">
            <text:p/>
            <draw:enhanced-geometry svg:viewBox="0 0 204 168" draw:type="non-primitive" draw:enhanced-path="M 0 165  L 197 0  L 203 1  L 5 167  L 0 165  N"/>
          </draw:custom-shape>
          <draw:frame draw:style-name="gr476" draw:text-style-name="P15" draw:layer="layout" svg:width="1.39cm" svg:height="1.117cm" svg:x="20.182cm" svg:y="12.647cm">
            <draw:object-ole draw:class-id="00000000-0000-0000-0000-000000000000" xlink:href="./Object 7" xlink:type="simple" xlink:show="embed" xlink:actuate="onLoad">
              <loext:p/>
            </draw:object-ole>
            <draw:image xlink:href="./ObjectReplacements/Object 7" xlink:type="simple" xlink:show="embed" xlink:actuate="onLoad"/>
          </draw:frame>
          <draw:g draw:style-name="gr4">
            <draw:custom-shape draw:style-name="gr477" draw:text-style-name="P16" draw:layer="layout" svg:width="1.515cm" svg:height="1.229cm" svg:x="13.564cm" svg:y="4.657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478" draw:text-style-name="P74" draw:layer="layout" svg:width="0.586cm" svg:height="0.072cm" svg:x="14cm" svg:y="5.304cm">
                <text:p/>
                <draw:enhanced-geometry svg:viewBox="0 0 136 17" draw:type="non-primitive" draw:enhanced-path="M 0 16  L 135 16  L 121 0  L 14 0  L 0 16  N"/>
              </draw:custom-shape>
              <draw:custom-shape draw:style-name="gr479" draw:text-style-name="P93" draw:layer="layout" svg:width="0.034cm" svg:height="0.033cm" svg:x="14.461cm" svg:y="5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480" draw:text-style-name="P94" draw:layer="layout" svg:width="0.582cm" svg:height="0.162cm" svg:x="14cm" svg:y="5.368cm">
                <text:p/>
                <draw:enhanced-geometry svg:viewBox="0 0 21600 21600" draw:type="rectangle" draw:enhanced-path="M 0 0 L 21600 0 21600 21600 0 21600 0 0 Z N"/>
              </draw:custom-shape>
              <draw:custom-shape draw:style-name="gr481" draw:text-style-name="P72" draw:layer="layout" svg:width="0.82cm" svg:height="0.089cm" svg:x="13.913cm" svg:y="5.513cm">
                <text:p/>
                <draw:enhanced-geometry svg:viewBox="0 0 190 21" draw:type="non-primitive" draw:enhanced-path="M 0 20  L 189 20  L 177 0  L 14 0  L 0 20  N"/>
              </draw:custom-shape>
              <draw:custom-shape draw:style-name="gr482" draw:text-style-name="P79" draw:layer="layout" svg:width="0.772cm" svg:height="0.086cm" svg:x="13.939cm" svg:y="5.513cm">
                <text:p/>
                <draw:enhanced-geometry svg:viewBox="0 0 179 20" draw:type="non-primitive" draw:enhanced-path="M 10 0  L 0 19  L 178 19  L 169 0  N"/>
              </draw:custom-shape>
              <draw:custom-shape draw:style-name="gr483" draw:text-style-name="P72" draw:layer="layout" svg:width="0.112cm" svg:height="0.072cm" svg:x="14.53cm" svg:y="5.526cm">
                <text:p/>
                <draw:enhanced-geometry svg:viewBox="0 0 26 17" draw:type="non-primitive" draw:enhanced-path="M 0 0  L 23 0  L 25 16  L 0 16  L 0 0  N"/>
              </draw:custom-shape>
              <draw:line draw:style-name="gr484" draw:text-style-name="P14" draw:layer="layout" svg:x1="14.53cm" svg:y1="5.551cm" svg:x2="14.585cm" svg:y2="5.551cm">
                <text:p/>
              </draw:line>
              <draw:custom-shape draw:style-name="gr485" draw:text-style-name="P79" draw:layer="layout" svg:width="0.812cm" svg:height="0.067cm" svg:x="13.913cm" svg:y="5.5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6" draw:text-style-name="P95" draw:layer="layout" svg:width="0.379cm" svg:height="0.072cm" svg:x="14.098cm" svg:y="5.291cm">
                <text:p/>
                <draw:enhanced-geometry svg:viewBox="0 0 88 17" draw:type="non-primitive" draw:enhanced-path="M 0 16  L 87 16  L 82 0  L 5 0  L 0 16  N"/>
              </draw:custom-shape>
              <draw:custom-shape draw:style-name="gr487" draw:text-style-name="P79" draw:layer="layout" svg:width="0.206cm" svg:height="0.072cm" svg:x="14.189cm" svg:y="5.295cm">
                <text:p/>
                <draw:enhanced-geometry svg:viewBox="0 0 48 17" draw:type="non-primitive" draw:enhanced-path="M 0 8  L 0 0  L 47 0  L 47 8  L 47 10  L 46 10  L 45 10  L 44 12  L 43 12  L 42 14  L 40 14  L 38 14  L 36 14  L 34 16  L 32 16  L 30 16  L 28 16  L 25 16  L 22 16  L 19 16  L 15 16  L 14 16  L 11 14  L 10 14  L 7 14  L 5 14  L 4 12  L 2 12  L 1 12  L 0 10  L 0 10  L 0 10  L 0 8  N"/>
              </draw:custom-shape>
              <draw:custom-shape draw:style-name="gr488" draw:text-style-name="P94" draw:layer="layout" svg:width="0.423cm" svg:height="0.307cm" svg:x="14.081cm" svg:y="4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489" draw:text-style-name="P95" draw:layer="layout" svg:width="0.349cm" svg:height="0.264cm" svg:x="14.116cm" svg:y="4.963cm">
                <text:p/>
  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90" draw:text-style-name="P96" draw:layer="layout" svg:width="0.306cm" svg:height="0.234cm" svg:x="14.138cm" svg:y="4.98cm">
                <text:p/>
  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 draw:style-name="gr1">
                <draw:line draw:style-name="gr491" draw:text-style-name="P14" draw:layer="layout" svg:x1="14.176cm" svg:y1="5.035cm" svg:x2="14.236cm" svg:y2="5.162cm">
                  <text:p/>
                </draw:line>
                <draw:line draw:style-name="gr491" draw:text-style-name="P14" draw:layer="layout" svg:x1="14.206cm" svg:y1="5.019cm" svg:x2="14.305cm" svg:y2="5.193cm">
                  <text:p/>
                </draw:line>
              </draw:g>
              <draw:custom-shape draw:style-name="gr492" draw:text-style-name="P72" draw:layer="layout" svg:width="0.107cm" svg:height="0.072cm" svg:x="14.064cm" svg:y="5.513cm">
                <text:p/>
                <draw:enhanced-geometry svg:viewBox="0 0 25 17" draw:type="non-primitive" draw:enhanced-path="M 0 0  L 24 0  L 23 16  L 0 16  L 0 0  N"/>
              </draw:custom-shape>
              <draw:custom-shape draw:style-name="gr492" draw:text-style-name="P72" draw:layer="layout" svg:width="0.098cm" svg:height="0.072cm" svg:x="14.306cm" svg:y="5.513cm">
                <text:p/>
                <draw:enhanced-geometry svg:viewBox="0 0 23 17" draw:type="non-primitive" draw:enhanced-path="M 0 0  L 22 0  L 22 16  L 0 16  L 0 0  N"/>
              </draw:custom-shape>
              <draw:line draw:style-name="gr493" draw:text-style-name="P14" draw:layer="layout" svg:x1="14.03cm" svg:y1="5.539cm" svg:x2="14.34cm" svg:y2="5.539cm">
                <text:p/>
              </draw:line>
              <draw:line draw:style-name="gr493" draw:text-style-name="P14" draw:layer="layout" svg:x1="14.043cm" svg:y1="5.551cm" svg:x2="14.362cm" svg:y2="5.551cm">
                <text:p/>
              </draw:line>
              <draw:line draw:style-name="gr493" draw:text-style-name="P14" draw:layer="layout" svg:x1="14.043cm" svg:y1="5.564cm" svg:x2="14.327cm" svg:y2="5.564cm">
                <text:p/>
              </draw:line>
              <draw:line draw:style-name="gr493" draw:text-style-name="P14" draw:layer="layout" svg:x1="13.986cm" svg:y1="5.543cm" svg:x2="14.016cm" svg:y2="5.543cm">
                <text:p/>
              </draw:line>
              <draw:line draw:style-name="gr493" draw:text-style-name="P14" draw:layer="layout" svg:x1="13.986cm" svg:y1="5.555cm" svg:x2="14.012cm" svg:y2="5.555cm">
                <text:p/>
              </draw:line>
              <draw:line draw:style-name="gr493" draw:text-style-name="P14" draw:layer="layout" svg:x1="14.098cm" svg:y1="5.573cm" svg:x2="14.287cm" svg:y2="5.573cm">
                <text:p/>
              </draw:line>
              <draw:line draw:style-name="gr493" draw:text-style-name="P14" draw:layer="layout" svg:x1="14.362cm" svg:y1="5.539cm" svg:x2="14.401cm" svg:y2="5.539cm">
                <text:p/>
              </draw:line>
              <draw:line draw:style-name="gr493" draw:text-style-name="P14" draw:layer="layout" svg:x1="14.37cm" svg:y1="5.551cm" svg:x2="14.4cm" svg:y2="5.551cm">
                <text:p/>
              </draw:line>
              <draw:line draw:style-name="gr493" draw:text-style-name="P14" draw:layer="layout" svg:x1="14.34cm" svg:y1="5.564cm" svg:x2="14.4cm" svg:y2="5.564cm">
                <text:p/>
              </draw:line>
              <draw:line draw:style-name="gr493" draw:text-style-name="P14" draw:layer="layout" svg:x1="14.556cm" svg:y1="5.543cm" svg:x2="14.633cm" svg:y2="5.543cm">
                <text:p/>
              </draw:line>
              <draw:line draw:style-name="gr493" draw:text-style-name="P14" draw:layer="layout" svg:x1="14.556cm" svg:y1="5.564cm" svg:x2="14.59cm" svg:y2="5.564cm">
                <text:p/>
              </draw:line>
              <draw:line draw:style-name="gr493" draw:text-style-name="P14" draw:layer="layout" svg:x1="14.556cm" svg:y1="5.577cm" svg:x2="14.62cm" svg:y2="5.577cm">
                <text:p/>
              </draw:line>
              <draw:line draw:style-name="gr493" draw:text-style-name="P14" draw:layer="layout" svg:x1="14.616cm" svg:y1="5.555cm" svg:x2="14.646cm" svg:y2="5.555cm">
                <text:p/>
              </draw:line>
              <draw:line draw:style-name="gr493" draw:text-style-name="P14" draw:layer="layout" svg:x1="14.625cm" svg:y1="5.573cm" svg:x2="14.651cm" svg:y2="5.573cm">
                <text:p/>
              </draw:line>
              <draw:custom-shape draw:style-name="gr494" draw:text-style-name="P74" draw:layer="layout" svg:width="0.073cm" svg:height="0.072cm" svg:x="14cm" svg:y="5.513cm">
                <text:p/>
                <draw:enhanced-geometry svg:viewBox="0 0 17 17" draw:type="non-primitive" draw:enhanced-path="M 4 0  L 16 0  L 12 16  L 0 16  L 4 0  N"/>
              </draw:custom-shape>
              <draw:custom-shape draw:style-name="gr494" draw:text-style-name="P74" draw:layer="layout" svg:width="0.103cm" svg:height="0.072cm" svg:x="14.189cm" svg:y="5.513cm">
                <text:p/>
                <draw:enhanced-geometry svg:viewBox="0 0 24 17" draw:type="non-primitive" draw:enhanced-path="M 0 0  L 23 0  L 23 16  L 0 16  L 0 0  N"/>
              </draw:custom-shape>
              <draw:custom-shape draw:style-name="gr494" draw:text-style-name="P74" draw:layer="layout" svg:width="0.094cm" svg:height="0.072cm" svg:x="14.414cm" svg:y="5.513cm">
                <text:p/>
                <draw:enhanced-geometry svg:viewBox="0 0 22 17" draw:type="non-primitive" draw:enhanced-path="M 0 0  L 20 0  L 21 16  L 0 16  L 0 0  N"/>
              </draw:custom-shape>
              <draw:line draw:style-name="gr495" draw:text-style-name="P14" draw:layer="layout" svg:x1="14.047cm" svg:y1="5.573cm" svg:x2="14.098cm" svg:y2="5.573cm">
                <text:p/>
              </draw:line>
              <draw:line draw:style-name="gr495" draw:text-style-name="P14" draw:layer="layout" svg:x1="13.973cm" svg:y1="5.573cm" svg:x2="14.029cm" svg:y2="5.573cm">
                <text:p/>
              </draw:line>
              <draw:line draw:style-name="gr495" draw:text-style-name="P14" draw:layer="layout" svg:x1="14.293cm" svg:y1="5.573cm" svg:x2="14.331cm" svg:y2="5.573cm">
                <text:p/>
              </draw:line>
              <draw:line draw:style-name="gr495" draw:text-style-name="P14" draw:layer="layout" svg:x1="14.336cm" svg:y1="5.577cm" svg:x2="14.4cm" svg:y2="5.577cm">
                <text:p/>
              </draw:line>
              <draw:g draw:style-name="gr1">
                <draw:line draw:style-name="gr495" draw:text-style-name="P14" draw:layer="layout" svg:x1="14.414cm" svg:y1="5.543cm" svg:x2="14.521cm" svg:y2="5.543cm">
                  <text:p/>
                </draw:line>
                <draw:line draw:style-name="gr495" draw:text-style-name="P14" draw:layer="layout" svg:x1="14.431cm" svg:y1="5.555cm" svg:x2="14.52cm" svg:y2="5.555cm">
                  <text:p/>
                </draw:line>
                <draw:line draw:style-name="gr495" draw:text-style-name="P14" draw:layer="layout" svg:x1="14.431cm" svg:y1="5.576cm" svg:x2="14.52cm" svg:y2="5.576cm">
                  <text:p/>
                </draw:line>
              </draw:g>
              <draw:line draw:style-name="gr495" draw:text-style-name="P14" draw:layer="layout" svg:x1="14.556cm" svg:y1="5.53cm" svg:x2="14.633cm" svg:y2="5.53cm">
                <text:p/>
              </draw:line>
              <draw:custom-shape draw:style-name="gr496" draw:text-style-name="P35" draw:layer="layout" svg:width="0.034cm" svg:height="0.033cm" svg:x="14.599cm" svg:y="5.3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7" draw:text-style-name="P31" draw:layer="layout" svg:width="0.388cm" svg:height="0.077cm" svg:x="14.176cm" svg:y="5.398cm">
                <text:p/>
                <draw:enhanced-geometry svg:viewBox="0 0 21600 21600" draw:type="rectangle" draw:enhanced-path="M 0 0 L 21600 0 21600 21600 0 21600 0 0 Z N"/>
              </draw:custom-shape>
              <draw:g draw:style-name="gr4">
                <draw:custom-shape draw:style-name="gr496" draw:text-style-name="P35" draw:layer="layout" svg:width="0.034cm" svg:height="0.033cm" svg:x="14.573cm" svg:y="5.43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96" draw:text-style-name="P35" draw:layer="layout" svg:width="0.034cm" svg:height="0.034cm" svg:x="14.573cm" svg:y="5.4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96" draw:text-style-name="P35" draw:layer="layout" svg:width="0.034cm" svg:height="0.034cm" svg:x="14.349cm" svg:y="5.39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14.349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98cm" svg:height="0.033cm" svg:x="14.306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4.323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14.414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4cm" svg:x="14.573cm" svg:y="5.398cm">
                <text:p/>
                <draw:enhanced-geometry svg:viewBox="0 0 21600 21600" draw:type="rectangle" draw:enhanced-path="M 0 0 L 21600 0 21600 21600 0 21600 0 0 Z N"/>
              </draw:custom-shape>
              <draw:line draw:style-name="gr498" draw:text-style-name="P14" draw:layer="layout" svg:x1="14.245cm" svg:y1="5.385cm" svg:x2="14.245cm" svg:y2="5.491cm">
                <text:p/>
              </draw:line>
              <draw:line draw:style-name="gr498" draw:text-style-name="P14" draw:layer="layout" svg:x1="14.422cm" svg:y1="5.385cm" svg:x2="14.422cm" svg:y2="5.491cm">
                <text:p/>
              </draw:line>
              <draw:line draw:style-name="gr498" draw:text-style-name="P14" draw:layer="layout" svg:x1="14.158cm" svg:y1="5.385cm" svg:x2="13.999cm" svg:y2="5.385cm">
                <text:p/>
              </draw:line>
              <draw:line draw:style-name="gr498" draw:text-style-name="P14" draw:layer="layout" svg:x1="14.174cm" svg:y1="5.385cm" svg:x2="14.015cm" svg:y2="5.385cm">
                <text:p/>
              </draw:line>
              <draw:line draw:style-name="gr498" draw:text-style-name="P14" draw:layer="layout" svg:x1="14.174cm" svg:y1="5.415cm" svg:x2="14.015cm" svg:y2="5.415cm">
                <text:p/>
              </draw:line>
              <draw:line draw:style-name="gr498" draw:text-style-name="P14" draw:layer="layout" svg:x1="14.174cm" svg:y1="5.433cm" svg:x2="14.015cm" svg:y2="5.433cm">
                <text:p/>
              </draw:line>
              <draw:line draw:style-name="gr498" draw:text-style-name="P14" draw:layer="layout" svg:x1="14.174cm" svg:y1="5.462cm" svg:x2="14.015cm" svg:y2="5.462cm">
                <text:p/>
              </draw:line>
              <draw:line draw:style-name="gr498" draw:text-style-name="P14" draw:layer="layout" svg:x1="14.174cm" svg:y1="5.475cm" svg:x2="14.015cm" svg:y2="5.475cm">
                <text:p/>
              </draw:line>
              <draw:line draw:style-name="gr498" draw:text-style-name="P14" draw:layer="layout" svg:x1="14.016cm" svg:y1="5.5cm" svg:x2="14.615cm" svg:y2="5.5cm">
                <text:p/>
              </draw:line>
              <draw:line draw:style-name="gr498" draw:text-style-name="P14" draw:layer="layout" svg:x1="14.176cm" svg:y1="5.424cm" svg:x2="14.586cm" svg:y2="5.424cm">
                <text:p/>
              </draw:line>
              <draw:custom-shape draw:style-name="gr496" draw:text-style-name="P35" draw:layer="layout" svg:width="0.034cm" svg:height="0.034cm" svg:x="14.496cm" svg:y="5.4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9" draw:text-style-name="P79" draw:layer="layout" svg:width="0.34cm" svg:height="0.034cm" svg:x="14.116cm" svg:y="5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500" draw:text-style-name="P79" draw:layer="layout" svg:width="0.375cm" svg:height="0.067cm" svg:x="14.098cm" svg:y="5.2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style-name="gr4">
            <draw:custom-shape draw:style-name="gr501" draw:text-style-name="P35" draw:layer="layout" svg:width="0.219cm" svg:height="0.316cm" svg:x="16.854cm" svg:y="13.108cm">
              <text:p/>
              <draw:enhanced-geometry svg:viewBox="0 0 51 74" draw:type="non-primitive" draw:enhanced-path="M 47 73  L 46 73  L 45 73  L 44 73  L 44 73  L 43 73  L 42 73  L 41 73  L 40 73  L 40 73  L 39 73  L 38 73  L 37 73  L 37 73  L 36 73  L 35 73  L 34 73  L 34 73  L 33 73  L 32 73  L 31 73  L 30 73  L 29 73  L 29 73  L 27 73  L 27 73  L 26 73  L 25 73  L 25 73  L 24 73  L 24 73  L 23 73  L 22 73  L 21 73  L 20 73  L 19 73  L 19 73  L 18 73  L 17 73  L 16 73  L 15 73  L 14 73  L 14 73  L 12 73  L 12 73  L 12 73  L 11 73  L 10 73  L 9 73  L 8 73  L 8 73  L 7 73  L 6 73  L 5 73  L 4 73  L 4 73  L 2 73  L 2 73  L 1 73  L 0 73  L 0 73  L 0 73  L 0 72  L 0 72  L 0 71  L 0 71  L 0 70  L 0 70  L 0 69  L 1 68  L 1 68  L 2 67  L 2 67  L 2 66  L 3 65  L 4 64  L 4 64  L 4 63  L 5 63  L 5 63  L 5 62  L 6 62  L 6 61  L 7 61  L 7 60  L 8 59  L 8 58  L 9 58  L 9 57  L 9 57  L 10 56  L 10 55  L 11 55  L 11 54  L 12 54  L 12 54  L 12 53  L 12 52  L 12 52  L 13 51  L 14 51  L 14 50  L 14 49  L 15 49  L 15 48  L 16 48  L 16 47  L 16 46  L 17 46  L 18 45  L 18 45  L 18 45  L 19 44  L 19 44  L 19 43  L 20 42  L 20 42  L 21 41  L 21 40  L 22 40  L 22 39  L 23 38  L 23 38  L 23 37  L 24 37  L 24 36  L 24 36  L 23 36  L 23 35  L 23 34  L 22 34  L 22 33  L 21 32  L 21 32  L 20 31  L 20 31  L 19 30  L 19 29  L 19 28  L 18 28  L 18 27  L 18 27  L 17 27  L 16 26  L 16 26  L 16 25  L 15 24  L 15 23  L 14 23  L 14 22  L 14 22  L 13 21  L 12 20  L 12 20  L 12 19  L 12 18  L 12 18  L 12 18  L 11 17  L 10 17  L 10 16  L 9 15  L 9 15  L 9 14  L 8 14  L 8 13  L 8 12  L 7 11  L 6 11  L 6 10  L 5 10  L 5 9  L 5 9  L 4 9  L 4 8  L 4 7  L 3 7  L 2 6  L 2 5  L 2 5  L 1 4  L 1 3  L 0 3  L 0 2  L 0 2  L 0 1  L 0 1  L 0 0  L 0 0  L 0 0  L 0 0  L 0 0  L 1 0  L 1 0  L 2 0  L 3 0  L 4 0  L 5 0  L 5 0  L 6 0  L 7 0  L 8 0  L 9 0  L 10 0  L 10 0  L 12 0  L 12 0  L 12 0  L 13 0  L 14 0  L 15 0  L 15 0  L 16 0  L 17 0  L 18 0  L 19 0  L 20 0  L 20 0  L 21 0  L 22 0  L 23 0  L 24 0  L 24 0  L 25 0  L 25 0  L 26 0  L 27 0  L 27 0  L 29 0  L 29 0  L 30 0  L 31 0  L 31 0  L 33 0  L 33 0  L 34 0  L 35 0  L 36 0  L 37 0  L 37 0  L 37 0  L 38 0  L 39 0  L 40 0  L 41 0  L 41 0  L 43 0  L 43 0  L 44 0  L 45 0  L 45 0  L 45 0  L 46 0  L 46 1  L 46 2  L 46 3  L 46 5  L 46 6  L 46 8  L 47 9  L 47 10  L 47 11  L 47 13  L 47 14  L 47 16  L 47 17  L 47 17  L 47 18  L 47 18  L 47 18  L 46 18  L 45 18  L 45 18  L 45 17  L 45 16  L 45 15  L 45 15  L 44 14  L 44 13  L 44 13  L 44 12  L 44 11  L 44 11  L 43 10  L 43 9  L 43 9  L 43 9  L 43 9  L 42 9  L 42 8  L 41 8  L 41 7  L 41 7  L 41 6  L 40 6  L 40 5  L 39 5  L 39 5  L 38 5  L 38 4  L 37 4  L 37 4  L 37 4  L 37 3  L 35 3  L 35 3  L 34 3  L 34 3  L 33 3  L 33 3  L 32 3  L 31 3  L 31 3  L 30 3  L 30 3  L 29 3  L 29 3  L 28 3  L 27 3  L 27 3  L 26 3  L 26 3  L 25 3  L 25 3  L 25 3  L 24 3  L 24 3  L 23 3  L 23 3  L 22 3  L 22 3  L 21 3  L 20 3  L 20 3  L 19 3  L 19 3  L 18 3  L 18 3  L 17 3  L 16 3  L 16 3  L 15 3  L 15 3  L 14 3  L 14 3  L 13 3  L 12 3  L 12 3  L 12 3  L 12 3  L 11 3  L 12 4  L 12 4  L 12 5  L 12 5  L 12 6  L 12 6  L 12 7  L 13 7  L 14 8  L 14 9  L 14 9  L 15 9  L 15 9  L 15 10  L 16 10  L 16 11  L 16 11  L 16 12  L 17 12  L 18 13  L 18 14  L 18 14  L 19 14  L 19 15  L 19 16  L 20 16  L 20 17  L 20 17  L 20 18  L 21 18  L 22 18  L 22 18  L 22 19  L 23 20  L 23 20  L 23 20  L 24 21  L 24 22  L 24 22  L 25 23  L 25 23  L 25 24  L 25 24  L 25 25  L 26 26  L 26 26  L 26 27  L 27 27  L 27 27  L 27 27  L 28 28  L 28 28  L 29 29  L 29 29  L 29 30  L 30 31  L 30 31  L 30 32  L 30 32  L 31 33  L 30 33  L 30 34  L 30 35  L 29 35  L 29 36  L 29 36  L 28 36  L 28 36  L 27 37  L 27 37  L 27 38  L 26 39  L 26 39  L 26 40  L 25 40  L 25 41  L 25 41  L 25 42  L 24 43  L 24 43  L 24 44  L 23 44  L 23 45  L 23 45  L 22 45  L 22 46  L 22 46  L 21 47  L 20 47  L 20 48  L 20 49  L 19 49  L 19 50  L 19 50  L 18 51  L 18 52  L 18 52  L 17 52  L 16 53  L 16 54  L 16 54  L 15 54  L 15 55  L 15 55  L 14 56  L 14 56  L 14 57  L 13 58  L 12 58  L 12 58  L 12 59  L 12 60  L 12 60  L 12 61  L 11 61  L 11 62  L 10 62  L 10 63  L 9 63  L 9 63  L 9 63  L 10 63  L 10 63  L 11 63  L 12 63  L 12 63  L 12 63  L 12 63  L 13 63  L 14 63  L 14 63  L 15 63  L 15 63  L 16 63  L 16 63  L 17 63  L 18 63  L 18 63  L 19 63  L 19 63  L 20 63  L 20 63  L 21 63  L 22 63  L 22 63  L 23 63  L 23 63  L 24 63  L 24 63  L 25 63  L 25 63  L 25 63  L 26 63  L 26 63  L 27 63  L 27 63  L 28 63  L 29 63  L 29 63  L 30 63  L 30 63  L 31 63  L 31 63  L 32 63  L 33 63  L 33 63  L 34 63  L 34 63  L 35 63  L 35 63  L 36 63  L 37 63  L 37 63  L 37 63  L 37 63  L 38 63  L 39 63  L 39 63  L 40 63  L 40 63  L 41 63  L 41 62  L 42 62  L 43 61  L 43 61  L 43 61  L 44 61  L 44 60  L 44 60  L 44 59  L 45 59  L 45 58  L 45 58  L 45 57  L 46 57  L 46 56  L 47 55  L 47 55  L 47 54  L 47 54  L 47 54  L 48 53  L 48 52  L 48 51  L 49 51  L 49 51  L 50 51  L 50 52  L 50 52  L 50 53  L 49 54  L 49 54  L 49 55  L 49 57  L 49 59  L 49 61  L 48 62  L 48 63  L 48 65  L 48 67  L 48 68  L 48 70  L 47 71  L 47 72  L 47 73  L 47 73  N"/>
            </draw:custom-shape>
            <draw:custom-shape draw:style-name="gr114" draw:text-style-name="P35" draw:layer="layout" svg:width="0.116cm" svg:height="0.081cm" svg:x="17.203cm" svg:y="13.265cm">
              <text:p/>
              <draw:enhanced-geometry svg:viewBox="0 0 27 19" draw:type="non-primitive" draw:enhanced-path="M 12 12  L 11 13  L 11 13  L 10 14  L 10 14  L 10 15  L 9 15  L 9 16  L 9 16  L 8 16  L 8 17  L 7 17  L 7 17  L 6 17  L 5 18  L 5 18  L 4 18  L 4 18  L 3 18  L 3 18  L 2 18  L 2 18  L 2 18  L 1 18  L 1 17  L 1 17  L 1 17  L 0 17  L 0 17  L 0 17  L 0 16  L 0 16  L 0 16  L 0 16  L 0 15  L 0 15  L 0 14  L 0 14  L 0 14  L 0 13  L 0 13  L 0 13  L 0 12  L 0 12  L 0 12  L 0 11  L 0 11  L 0 11  L 0 10  L 0 10  L 0 10  L 0 9  L 0 9  L 0 9  L 1 9  L 1 9  L 1 9  L 1 8  L 1 8  L 1 8  L 1 7  L 1 7  L 1 7  L 1 6  L 1 6  L 2 6  L 2 5  L 2 5  L 2 5  L 2 4  L 2 4  L 2 4  L 2 3  L 2 3  L 2 3  L 2 2  L 2 2  L 2 2  L 2 1  L 1 1  L 1 1  L 1 1  L 0 1  L 0 1  L 0 1  L 0 1  L 0 0  L 0 0  L 0 0  L 0 0  L 0 0  L 1 0  L 1 0  L 2 0  L 2 0  L 3 0  L 3 0  L 3 0  L 4 0  L 4 0  L 5 0  L 5 0  L 6 0  L 7 0  L 7 0  L 8 0  L 8 0  L 9 0  L 9 0  L 8 0  L 8 0  L 8 0  L 8 0  L 8 1  L 8 1  L 8 1  L 8 1  L 8 2  L 8 2  L 8 3  L 8 3  L 7 3  L 7 3  L 7 4  L 7 4  L 7 4  L 7 5  L 7 5  L 7 5  L 7 6  L 7 6  L 7 6  L 6 7  L 6 7  L 6 7  L 6 8  L 6 8  L 5 8  L 5 8  L 5 9  L 5 9  L 5 9  L 5 9  L 5 9  L 5 9  L 5 10  L 5 10  L 5 10  L 5 11  L 5 11  L 4 11  L 4 11  L 4 12  L 4 12  L 4 12  L 4 13  L 4 13  L 4 13  L 4 14  L 4 14  L 4 14  L 4 14  L 4 15  L 5 15  L 5 15  L 5 15  L 6 15  L 6 15  L 7 15  L 7 14  L 7 14  L 8 14  L 8 14  L 8 14  L 8 13  L 9 13  L 9 13  L 9 13  L 9 12  L 9 12  L 10 12  L 10 11  L 10 11  L 10 11  L 11 10  L 11 10  L 11 9  L 11 9  L 11 9  L 11 9  L 11 9  L 12 8  L 12 8  L 12 8  L 12 7  L 12 7  L 12 7  L 12 6  L 13 6  L 13 5  L 13 5  L 13 4  L 13 4  L 13 3  L 13 2  L 13 1  L 13 1  L 14 0  L 14 0  L 14 0  L 15 0  L 15 0  L 16 0  L 16 0  L 17 0  L 17 0  L 18 0  L 18 0  L 18 0  L 18 0  L 18 0  L 18 0  L 18 1  L 18 1  L 18 1  L 18 2  L 18 2  L 18 3  L 17 3  L 17 3  L 17 3  L 17 4  L 17 4  L 17 4  L 17 5  L 17 5  L 17 5  L 17 6  L 17 6  L 17 6  L 17 7  L 17 7  L 16 7  L 16 7  L 16 8  L 16 8  L 16 8  L 16 9  L 16 9  L 16 9  L 16 9  L 16 9  L 16 9  L 16 10  L 16 10  L 16 10  L 15 10  L 15 11  L 15 11  L 15 11  L 15 12  L 15 12  L 15 12  L 15 13  L 15 13  L 15 13  L 15 14  L 15 14  L 15 14  L 16 14  L 16 15  L 16 15  L 16 15  L 16 16  L 17 16  L 17 16  L 18 16  L 18 15  L 19 15  L 19 15  L 20 14  L 20 14  L 20 14  L 20 14  L 21 13  L 21 13  L 21 13  L 21 13  L 21 12  L 21 12  L 22 12  L 22 12  L 22 11  L 22 11  L 22 11  L 22 10  L 22 10  L 22 10  L 23 10  L 23 9  L 23 9  L 23 9  L 23 9  L 23 9  L 23 9  L 23 8  L 23 8  L 23 8  L 23 7  L 23 7  L 23 7  L 23 6  L 23 6  L 24 6  L 23 6  L 23 5  L 23 5  L 23 5  L 23 4  L 23 4  L 23 4  L 23 4  L 22 4  L 22 3  L 22 3  L 22 3  L 22 3  L 22 2  L 22 2  L 21 2  L 21 1  L 21 1  L 21 1  L 21 0  L 22 0  L 22 0  L 22 0  L 22 0  L 22 0  L 23 0  L 23 0  L 24 0  L 24 0  L 24 0  L 25 0  L 25 0  L 25 0  L 25 0  L 25 1  L 25 1  L 26 1  L 26 1  L 26 2  L 26 2  L 26 3  L 26 3  L 26 3  L 26 4  L 26 4  L 26 5  L 25 6  L 25 6  L 25 7  L 25 7  L 25 7  L 25 8  L 25 8  L 25 8  L 25 9  L 25 9  L 25 9  L 24 9  L 24 10  L 24 10  L 24 10  L 24 11  L 24 11  L 23 11  L 23 12  L 23 12  L 23 13  L 23 13  L 22 13  L 22 14  L 22 14  L 22 14  L 22 15  L 21 15  L 21 16  L 21 16  L 20 16  L 20 16  L 20 16  L 20 17  L 19 17  L 18 17  L 18 17  L 18 18  L 17 18  L 17 18  L 16 18  L 16 18  L 15 18  L 15 18  L 14 18  L 14 18  L 14 18  L 13 18  L 13 17  L 13 17  L 13 17  L 13 17  L 12 17  L 12 16  L 12 16  L 12 16  L 12 15  L 12 15  L 12 14  L 11 14  L 11 14  L 11 14  L 11 13  L 11 13  L 11 13  L 11 12  L 12 12  N"/>
            </draw:custom-shape>
            <draw:custom-shape draw:style-name="gr114" draw:text-style-name="P35" draw:layer="layout" svg:width="0.077cm" svg:height="0.136cm" svg:x="17.449cm" svg:y="13.206cm">
              <text:p/>
              <draw:enhanced-geometry svg:viewBox="0 0 18 32" draw:type="non-primitive" draw:enhanced-path="M 4 0  L 4 0  L 5 0  L 5 0  L 6 0  L 6 0  L 7 0  L 7 0  L 8 0  L 8 0  L 9 0  L 9 0  L 10 0  L 10 0  L 11 0  L 11 0  L 12 0  L 12 0  L 13 0  L 13 0  L 14 0  L 14 0  L 15 0  L 15 0  L 16 0  L 16 0  L 17 0  L 17 0  L 17 0  L 17 0  L 17 0  L 17 0  L 17 1  L 17 1  L 16 1  L 16 1  L 15 1  L 15 1  L 14 1  L 14 1  L 14 1  L 13 1  L 13 2  L 13 2  L 13 3  L 13 3  L 13 3  L 13 4  L 13 5  L 12 5  L 12 6  L 12 6  L 12 7  L 12 7  L 12 7  L 12 8  L 12 8  L 12 9  L 12 9  L 12 9  L 12 10  L 11 10  L 11 10  L 11 11  L 11 11  L 11 12  L 11 12  L 11 12  L 11 13  L 11 13  L 11 14  L 11 14  L 10 15  L 10 16  L 10 16  L 10 16  L 10 17  L 10 17  L 10 18  L 10 18  L 10 18  L 9 19  L 9 19  L 9 20  L 9 20  L 9 20  L 9 20  L 9 21  L 9 21  L 9 21  L 9 22  L 9 22  L 9 23  L 8 23  L 8 23  L 8 24  L 8 25  L 8 25  L 8 26  L 8 26  L 8 27  L 8 27  L 8 27  L 8 28  L 8 28  L 8 28  L 9 29  L 9 29  L 10 29  L 10 29  L 11 29  L 11 29  L 12 29  L 11 29  L 11 29  L 11 29  L 11 30  L 11 30  L 11 31  L 11 31  L 11 31  L 10 31  L 10 31  L 9 31  L 9 31  L 8 31  L 8 31  L 7 31  L 7 31  L 6 31  L 6 31  L 5 31  L 5 31  L 4 31  L 4 31  L 3 31  L 3 31  L 2 31  L 2 31  L 1 31  L 1 31  L 0 31  L 0 31  L 0 31  L 0 31  L 0 31  L 0 30  L 0 30  L 0 29  L 0 29  L 0 29  L 0 29  L 0 29  L 0 29  L 1 29  L 1 29  L 1 28  L 2 28  L 2 28  L 2 27  L 2 27  L 2 27  L 2 26  L 3 26  L 3 25  L 3 25  L 3 25  L 3 24  L 3 24  L 3 23  L 3 22  L 3 22  L 3 21  L 3 21  L 4 21  L 4 20  L 4 20  L 4 20  L 4 20  L 4 20  L 4 19  L 4 18  L 4 18  L 4 18  L 4 17  L 5 17  L 5 16  L 5 16  L 5 16  L 5 15  L 5 15  L 5 14  L 5 14  L 5 13  L 5 12  L 5 12  L 6 12  L 6 11  L 6 11  L 6 10  L 6 10  L 6 10  L 6 10  L 6 10  L 6 9  L 6 9  L 6 8  L 7 7  L 7 7  L 7 7  L 7 6  L 7 6  L 7 5  L 7 5  L 7 5  L 7 4  L 7 4  L 7 3  L 7 3  L 7 3  L 8 3  L 7 2  L 7 2  L 7 1  L 7 1  L 7 1  L 6 1  L 6 1  L 5 1  L 5 1  L 4 1  L 4 1  L 4 1  L 4 1  L 4 0  L 4 0  L 4 0  L 4 0  N"/>
            </draw:custom-shape>
            <draw:custom-shape draw:style-name="gr114" draw:text-style-name="P35" draw:layer="layout" svg:width="0.073cm" svg:height="0.097cm" svg:x="17.66cm" svg:y="13.236cm">
              <text:p/>
              <draw:enhanced-geometry svg:viewBox="0 0 17 23" draw:type="non-primitive" draw:enhanced-path="M 0 9  L 0 9  L 0 9  L 0 9  L 0 9  L 1 9  L 1 9  L 2 9  L 2 9  L 2 9  L 3 9  L 3 9  L 4 9  L 4 9  L 5 9  L 5 9  L 6 9  L 6 9  L 6 8  L 6 8  L 6 7  L 6 7  L 6 7  L 6 7  L 6 7  L 6 6  L 6 6  L 6 6  L 6 5  L 6 5  L 6 4  L 6 4  L 6 4  L 6 3  L 6 3  L 6 3  L 6 2  L 6 2  L 6 1  L 6 1  L 6 1  L 6 0  L 6 0  L 6 0  L 6 0  L 6 0  L 7 0  L 7 0  L 8 0  L 8 0  L 9 0  L 9 0  L 9 0  L 9 0  L 9 0  L 9 1  L 9 1  L 9 1  L 9 2  L 9 2  L 9 3  L 9 3  L 9 3  L 9 4  L 9 4  L 9 4  L 9 5  L 9 5  L 9 6  L 9 6  L 9 6  L 9 7  L 9 7  L 9 7  L 9 7  L 9 7  L 9 8  L 9 8  L 9 9  L 9 9  L 10 9  L 10 9  L 11 9  L 11 9  L 12 9  L 12 9  L 13 9  L 13 9  L 13 9  L 14 9  L 14 9  L 15 9  L 15 9  L 16 9  L 16 9  L 16 9  L 16 9  L 16 10  L 16 10  L 16 11  L 16 11  L 16 11  L 16 12  L 16 12  L 16 12  L 16 12  L 15 12  L 15 12  L 14 12  L 14 12  L 13 12  L 13 12  L 13 12  L 12 12  L 12 12  L 11 12  L 11 12  L 10 12  L 10 12  L 9 12  L 9 12  L 9 13  L 9 13  L 9 14  L 9 14  L 9 14  L 9 14  L 9 14  L 9 15  L 9 15  L 9 15  L 9 16  L 9 16  L 9 17  L 9 17  L 9 17  L 9 18  L 9 18  L 9 18  L 9 19  L 9 19  L 9 20  L 9 20  L 9 20  L 9 21  L 9 21  L 9 22  L 9 22  L 9 22  L 8 22  L 8 22  L 7 22  L 7 22  L 6 22  L 6 22  L 6 22  L 6 21  L 6 21  L 6 20  L 6 20  L 6 20  L 6 19  L 6 19  L 6 18  L 6 18  L 6 18  L 6 17  L 6 17  L 6 17  L 6 16  L 6 16  L 6 15  L 6 15  L 6 15  L 6 14  L 6 14  L 6 14  L 6 14  L 6 14  L 6 13  L 6 13  L 6 12  L 6 12  L 5 12  L 5 12  L 4 12  L 4 12  L 3 12  L 3 12  L 2 12  L 2 12  L 2 12  L 1 12  L 1 12  L 0 12  L 0 12  L 0 12  L 0 12  L 0 12  L 0 12  L 0 11  L 0 11  L 0 11  L 0 10  L 0 10  L 0 9  L 0 9  L 0 9  N"/>
            </draw:custom-shape>
            <draw:custom-shape draw:style-name="gr114" draw:text-style-name="P35" draw:layer="layout" svg:width="0.073cm" svg:height="0.14cm" svg:x="17.945cm" svg:y="13.206cm">
              <text:p/>
              <draw:enhanced-geometry svg:viewBox="0 0 17 33" draw:type="non-primitive" draw:enhanced-path="M 0 16  L 0 16  L 0 14  L 0 13  L 0 13  L 0 12  L 0 11  L 0 10  L 0 10  L 0 10  L 1 9  L 1 8  L 1 8  L 1 7  L 1 6  L 2 6  L 2 5  L 2 4  L 2 4  L 3 3  L 3 3  L 3 2  L 3 2  L 4 1  L 4 1  L 4 1  L 4 1  L 4 0  L 5 0  L 5 0  L 5 0  L 5 0  L 6 0  L 6 0  L 6 0  L 7 0  L 7 0  L 8 0  L 8 0  L 8 0  L 9 0  L 9 0  L 10 0  L 10 0  L 11 0  L 11 0  L 11 0  L 11 0  L 12 0  L 12 1  L 12 1  L 12 1  L 12 2  L 13 2  L 13 3  L 13 3  L 14 3  L 14 4  L 14 5  L 14 6  L 15 6  L 15 7  L 15 7  L 15 8  L 15 9  L 16 9  L 16 10  L 16 10  L 16 11  L 16 11  L 16 12  L 16 13  L 16 14  L 16 15  L 16 16  L 16 17  L 16 18  L 16 18  L 16 19  L 16 20  L 16 20  L 16 21  L 16 21  L 16 22  L 15 22  L 15 23  L 15 23  L 15 24  L 15 25  L 14 25  L 14 26  L 14 27  L 14 27  L 13 28  L 13 28  L 13 29  L 12 29  L 12 29  L 12 30  L 12 30  L 12 30  L 12 30  L 11 31  L 11 31  L 10 31  L 10 32  L 9 32  L 9 32  L 9 32  L 8 32  L 8 32  L 8 32  L 7 32  L 7 32  L 6 32  L 6 32  L 5 31  L 5 31  L 5 31  L 4 31  L 4 30  L 4 30  L 4 30  L 4 30  L 4 30  L 4 29  L 3 29  L 3 29  L 3 28  L 3 28  L 2 28  L 2 27  L 2 27  L 2 26  L 2 26  L 1 25  L 1 25  L 1 25  L 1 24  L 1 24  L 1 24  L 1 23  L 1 23  L 1 23  L 0 22  L 0 22  L 0 21  L 0 21  L 0 21  L 0 21  L 0 20  L 0 20  L 0 20  L 0 19  L 0 19  L 0 18  L 0 18  L 0 18  L 0 17  L 0 17  L 0 16  L 0 16  L 1 16  L 1 16  L 2 16  L 3 16  L 4 16  L 4 16  L 5 16  L 7 16  L 8 16  L 8 15  L 9 15  L 10 15  L 11 15  L 12 15  L 12 15  L 12 15  L 13 15  L 13 14  L 13 13  L 13 13  L 13 12  L 13 12  L 13 11  L 13 11  L 12 10  L 12 10  L 12 10  L 12 10  L 12 9  L 12 8  L 12 8  L 12 7  L 12 7  L 12 6  L 12 6  L 12 6  L 12 6  L 12 5  L 12 5  L 12 4  L 12 4  L 11 4  L 11 3  L 11 3  L 11 3  L 11 3  L 11 2  L 10 2  L 10 1  L 10 1  L 10 1  L 9 1  L 9 1  L 9 1  L 8 1  L 8 1  L 8 1  L 7 1  L 7 1  L 7 1  L 6 1  L 6 1  L 6 2  L 5 2  L 5 2  L 5 3  L 5 3  L 4 3  L 4 4  L 4 4  L 4 5  L 4 5  L 4 6  L 4 6  L 4 6  L 4 7  L 4 7  L 4 8  L 4 8  L 4 8  L 4 9  L 4 9  L 4 10  L 4 10  L 4 10  L 4 10  L 4 11  L 4 11  L 4 11  L 3 12  L 3 13  L 3 13  L 3 14  L 3 15  L 4 15  L 4 15  L 4 15  L 5 15  L 5 15  L 6 15  L 6 15  L 7 15  L 7 15  L 8 15  L 8 15  L 8 15  L 9 15  L 9 15  L 10 15  L 10 15  L 11 15  L 11 15  L 12 15  L 12 15  L 12 15  L 13 15  L 12 15  L 12 15  L 12 15  L 11 15  L 10 15  L 9 15  L 8 15  L 8 16  L 7 16  L 5 16  L 4 16  L 4 16  L 3 16  L 2 16  L 1 16  L 1 16  L 0 16  L 0 16  L 0 16  L 1 16  L 1 16  L 2 16  L 2 16  L 3 16  L 3 16  L 3 17  L 3 17  L 3 18  L 3 18  L 3 18  L 3 19  L 3 19  L 4 20  L 4 20  L 4 20  L 4 21  L 4 21  L 4 21  L 4 21  L 4 21  L 4 22  L 4 22  L 4 23  L 4 23  L 4 23  L 4 24  L 4 24  L 4 25  L 4 25  L 4 25  L 4 26  L 4 26  L 4 27  L 4 27  L 5 27  L 5 28  L 5 28  L 5 28  L 5 29  L 6 29  L 6 29  L 6 30  L 7 30  L 7 30  L 7 30  L 8 30  L 8 30  L 8 30  L 8 30  L 8 30  L 9 30  L 9 30  L 10 30  L 10 29  L 10 29  L 10 29  L 11 29  L 11 28  L 11 28  L 11 28  L 11 28  L 11 27  L 12 27  L 12 26  L 12 26  L 12 25  L 12 25  L 12 25  L 12 24  L 12 24  L 12 23  L 12 23  L 12 23  L 12 22  L 12 22  L 12 21  L 12 21  L 12 21  L 12 21  L 12 20  L 12 20  L 12 20  L 12 19  L 12 19  L 12 18  L 12 18  L 12 17  L 13 16  L 12 16  L 12 16  L 12 16  L 11 16  L 11 16  L 10 16  L 10 16  L 9 16  L 9 16  L 8 16  L 8 16  L 8 16  L 7 16  L 7 16  L 6 16  L 6 16  L 5 16  L 5 16  L 4 16  L 4 16  L 4 16  L 3 16  L 3 16  L 2 16  L 2 16  L 1 16  L 1 16  L 0 16  L 0 16  N"/>
            </draw:custom-shape>
            <draw:custom-shape draw:style-name="gr114" draw:text-style-name="P35" draw:layer="layout" svg:width="0.073cm" svg:height="0.115cm" svg:x="16.944cm" svg:y="13.47cm">
              <text:p/>
              <draw:enhanced-geometry svg:viewBox="0 0 17 27" draw:type="non-primitive" draw:enhanced-path="M 10 0  L 10 0  L 10 0  L 10 0  L 10 0  L 16 0  L 16 0  L 16 0  L 16 0  L 16 1  L 16 1  L 16 1  L 16 2  L 16 2  L 16 3  L 16 3  L 16 3  L 16 3  L 16 4  L 16 4  L 10 4  L 10 5  L 10 5  L 10 5  L 10 5  L 10 5  L 10 4  L 5 4  L 5 4  L 5 3  L 5 3  L 5 3  L 5 2  L 5 2  L 5 1  L 5 1  L 5 1  L 5 0  L 5 0  L 5 0  L 5 0  L 10 0  L 10 0  L 10 0  L 10 0  L 10 0  L 10 0  L 10 0  L 10 1  L 5 2  L 5 2  L 5 3  L 5 4  L 5 4  L 5 5  L 5 6  L 5 7  L 0 7  L 0 8  L 0 8  L 0 8  L 0 9  L 0 9  L 5 9  L 5 9  L 5 9  L 5 8  L 5 8  L 5 8  L 10 8  L 10 8  L 10 8  L 10 8  L 10 8  L 10 9  L 10 9  L 10 10  L 10 10  L 10 10  L 10 10  L 10 11  L 10 11  L 10 11  L 10 12  L 10 12  L 10 13  L 10 13  L 10 13  L 10 13  L 10 13  L 10 13  L 10 14  L 10 14  L 10 14  L 10 15  L 10 15  L 10 16  L 10 16  L 10 16  L 10 17  L 10 17  L 10 17  L 10 17  L 10 18  L 10 18  L 10 19  L 10 19  L 10 19  L 10 20  L 5 20  L 5 20  L 5 21  L 5 21  L 5 21  L 5 22  L 5 22  L 5 23  L 5 23  L 5 23  L 10 23  L 10 23  L 10 23  L 10 23  L 10 22  L 10 22  L 10 22  L 10 21  L 10 21  L 10 21  L 10 20  L 10 20  L 10 19  L 16 19  L 16 19  L 16 20  L 16 20  L 16 21  L 16 21  L 16 21  L 16 22  L 10 23  L 10 23  L 10 23  L 10 24  L 10 24  L 10 24  L 10 25  L 10 25  L 5 26  L 5 26  L 5 26  L 5 26  L 5 26  L 5 26  L 5 26  L 0 26  L 0 25  L 0 25  L 0 24  L 0 24  L 0 24  L 0 23  L 0 23  L 0 23  L 0 22  L 0 22  L 0 21  L 0 21  L 0 21  L 0 20  L 0 20  L 0 19  L 0 19  L 0 19  L 0 18  L 0 18  L 0 17  L 0 17  L 0 17  L 0 16  L 5 16  L 5 16  L 5 16  L 5 15  L 5 15  L 5 14  L 5 14  L 5 14  L 5 13  L 5 13  L 5 13  L 5 13  L 5 13  L 5 12  L 5 12  L 5 11  L 5 11  L 5 11  L 5 11  L 0 11  L 0 11  L 0 11  L 0 10  L 0 10  L 0 10  L 0 10  L 0 9  L 0 9  L 0 8  L 0 8  L 0 8  L 0 7  L 5 7  L 5 6  L 5 5  L 5 4  L 5 4  L 5 3  L 5 2  L 5 2  L 10 1  L 10 0  L 10 0  L 10 0  L 10 0  N"/>
            </draw:custom-shape>
            <draw:custom-shape draw:style-name="gr114" draw:text-style-name="P35" draw:layer="layout" svg:width="0.073cm" svg:height="0.115cm" svg:x="17.592cm" svg:y="13.368cm">
              <text:p/>
              <draw:enhanced-geometry svg:viewBox="0 0 17 27" draw:type="non-primitive" draw:enhanced-path="M 10 0  L 10 0  L 10 0  L 10 0  L 10 0  L 16 0  L 16 0  L 16 1  L 16 1  L 16 1  L 16 1  L 16 2  L 16 2  L 16 3  L 16 3  L 16 3  L 16 4  L 16 4  L 16 5  L 10 5  L 10 5  L 10 5  L 10 5  L 10 5  L 10 5  L 10 5  L 5 5  L 5 4  L 5 4  L 5 4  L 5 3  L 5 3  L 5 3  L 5 2  L 5 2  L 5 1  L 5 1  L 5 1  L 5 0  L 5 0  L 10 0  L 10 0  L 10 0  L 10 0  L 10 0  L 10 0  L 10 0  L 10 0  L 10 1  L 10 1  L 5 2  L 5 3  L 5 3  L 5 4  L 5 5  L 5 5  L 5 6  L 5 7  L 0 7  L 0 8  L 0 8  L 0 8  L 0 8  L 5 8  L 5 8  L 5 8  L 5 8  L 5 8  L 10 8  L 10 8  L 10 8  L 10 8  L 10 8  L 10 8  L 10 8  L 10 8  L 10 9  L 10 9  L 10 10  L 10 10  L 10 10  L 10 11  L 10 11  L 10 12  L 10 12  L 10 13  L 10 13  L 10 13  L 10 14  L 10 14  L 10 15  L 10 15  L 10 15  L 10 15  L 10 16  L 10 16  L 10 17  L 10 17  L 10 17  L 10 17  L 10 17  L 10 17  L 10 18  L 10 18  L 10 18  L 10 19  L 10 19  L 10 20  L 5 20  L 5 20  L 5 21  L 5 21  L 5 22  L 5 22  L 5 22  L 5 23  L 5 23  L 5 24  L 5 23  L 10 23  L 10 23  L 10 23  L 10 22  L 10 22  L 10 22  L 10 22  L 10 21  L 10 21  L 10 20  L 10 20  L 10 20  L 10 20  L 10 19  L 16 19  L 16 19  L 16 19  L 16 19  L 16 20  L 16 20  L 16 20  L 16 20  L 16 21  L 16 22  L 16 22  L 10 22  L 10 23  L 10 24  L 10 24  L 10 24  L 10 25  L 10 25  L 10 25  L 10 26  L 5 26  L 5 26  L 5 26  L 5 26  L 5 26  L 5 26  L 0 26  L 0 25  L 0 25  L 0 25  L 0 24  L 0 24  L 0 24  L 0 23  L 0 23  L 0 22  L 0 22  L 0 22  L 0 22  L 0 21  L 0 21  L 0 20  L 0 20  L 0 20  L 0 19  L 0 19  L 0 19  L 0 18  L 0 18  L 0 18  L 0 17  L 0 17  L 0 17  L 0 17  L 5 17  L 5 17  L 5 16  L 5 16  L 5 15  L 5 15  L 5 15  L 5 14  L 5 14  L 5 14  L 5 13  L 5 13  L 5 13  L 5 12  L 5 12  L 5 11  L 5 11  L 5 10  L 5 10  L 5 10  L 0 10  L 0 10  L 0 10  L 0 10  L 0 9  L 0 9  L 0 9  L 0 8  L 0 8  L 0 8  L 0 8  L 0 7  L 5 7  L 5 6  L 5 5  L 5 5  L 5 4  L 5 3  L 5 3  L 5 2  L 10 1  L 10 1  L 10 0  L 10 0  L 10 0  L 10 0  N"/>
            </draw:custom-shape>
            <draw:custom-shape draw:style-name="gr114" draw:text-style-name="P35" draw:layer="layout" svg:width="0.073cm" svg:height="0.115cm" svg:x="17.35cm" svg:y="13.368cm">
              <text:p/>
              <draw:enhanced-geometry svg:viewBox="0 0 17 27" draw:type="non-primitive" draw:enhanced-path="M 10 0  L 10 0  L 10 0  L 10 0  L 16 0  L 16 0  L 16 0  L 16 0  L 16 1  L 16 1  L 16 1  L 16 2  L 16 2  L 16 3  L 16 3  L 16 3  L 16 4  L 16 4  L 16 4  L 16 5  L 10 5  L 10 5  L 10 5  L 10 5  L 10 5  L 10 5  L 10 4  L 5 4  L 5 4  L 5 3  L 5 3  L 5 3  L 5 3  L 5 2  L 5 2  L 5 1  L 5 1  L 5 1  L 5 0  L 5 0  L 10 0  L 10 0  L 10 0  L 10 0  L 10 0  L 10 0  L 10 0  L 10 0  L 10 1  L 10 1  L 10 2  L 5 3  L 5 3  L 5 4  L 5 5  L 5 5  L 5 6  L 0 7  L 0 7  L 0 8  L 0 8  L 0 8  L 0 8  L 0 8  L 0 8  L 5 8  L 5 8  L 5 8  L 5 8  L 10 8  L 10 8  L 10 8  L 10 8  L 10 8  L 10 8  L 10 8  L 10 8  L 10 9  L 10 9  L 10 10  L 10 10  L 10 10  L 10 11  L 10 11  L 10 12  L 10 12  L 10 13  L 10 13  L 10 13  L 10 13  L 10 14  L 10 14  L 10 15  L 10 15  L 10 15  L 10 16  L 10 16  L 10 17  L 10 17  L 10 17  L 10 17  L 10 17  L 10 18  L 10 18  L 10 18  L 10 19  L 10 19  L 10 20  L 10 20  L 10 20  L 10 21  L 5 21  L 5 22  L 5 22  L 5 22  L 5 23  L 5 23  L 10 23  L 10 24  L 10 23  L 10 23  L 10 23  L 10 23  L 10 22  L 10 22  L 10 22  L 10 21  L 10 21  L 10 21  L 10 20  L 10 20  L 16 20  L 16 19  L 16 19  L 16 19  L 16 20  L 16 20  L 16 20  L 16 20  L 16 21  L 16 22  L 16 22  L 16 22  L 10 23  L 10 24  L 10 24  L 10 24  L 10 24  L 10 25  L 10 25  L 10 26  L 5 26  L 5 26  L 5 26  L 5 26  L 5 26  L 0 26  L 0 26  L 0 26  L 0 25  L 0 25  L 0 24  L 0 24  L 0 24  L 0 23  L 0 23  L 0 22  L 0 22  L 0 22  L 0 21  L 0 21  L 0 20  L 0 20  L 0 20  L 0 20  L 0 19  L 0 19  L 0 18  L 0 18  L 0 18  L 0 17  L 0 17  L 0 17  L 0 17  L 0 17  L 0 16  L 0 16  L 0 15  L 5 15  L 5 15  L 5 15  L 5 14  L 5 14  L 5 13  L 5 13  L 5 13  L 5 13  L 5 12  L 5 12  L 5 11  L 5 11  L 5 10  L 5 10  L 5 10  L 0 10  L 0 10  L 0 10  L 0 10  L 0 9  L 0 9  L 0 8  L 0 8  L 0 8  L 0 8  L 0 8  L 0 7  L 0 7  L 5 6  L 5 5  L 5 5  L 5 4  L 5 3  L 5 3  L 10 2  L 10 1  L 10 1  L 10 0  L 10 0  L 10 0  L 10 0  N"/>
            </draw:custom-shape>
          </draw:g>
          <draw:frame draw:style-name="gr502" draw:text-style-name="P15" draw:layer="layout" svg:width="0.944cm" svg:height="0.93cm" svg:x="18.784cm" svg:y="12.835cm">
            <draw:object-ole draw:class-id="00000000-0000-0000-0000-000000000000" xlink:href="./Object 8" xlink:type="simple" xlink:show="embed" xlink:actuate="onLoad">
              <loext:p/>
            </draw:object-ole>
            <draw:image xlink:href="./ObjectReplacements/Object 8" xlink:type="simple" xlink:show="embed" xlink:actuate="onLoad"/>
          </draw:frame>
          <draw:custom-shape draw:style-name="gr503" draw:text-style-name="P97" draw:layer="layout" svg:width="1.476cm" svg:height="0.751cm" svg:x="20.744cm" svg:y="14.273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504" draw:text-style-name="P16" draw:layer="layout" svg:width="9.084cm" svg:height="1.066cm" svg:x="13.564cm" svg:y="10.176cm">
              <text:p/>
              <draw:enhanced-geometry svg:viewBox="0 0 21600 21600" draw:type="rectangle" draw:enhanced-path="M 0 0 L 21600 0 21600 21600 0 21600 0 0 Z N"/>
            </draw:custom-shape>
            <draw:line draw:style-name="gr505" draw:text-style-name="P14" draw:layer="layout" svg:x1="17.739cm" svg:y1="10.47cm" svg:x2="15.187cm" svg:y2="11.101cm">
              <text:p/>
            </draw:line>
            <draw:line draw:style-name="gr506" draw:text-style-name="P14" draw:layer="layout" svg:x1="17.92cm" svg:y1="10.47cm" svg:x2="17.018cm" svg:y2="11.101cm">
              <text:p/>
            </draw:line>
            <draw:line draw:style-name="gr507" draw:text-style-name="P14" draw:layer="layout" svg:x1="18.106cm" svg:y1="10.47cm" svg:x2="19.017cm" svg:y2="11.101cm">
              <text:p/>
            </draw:line>
            <draw:line draw:style-name="gr508" draw:text-style-name="P14" draw:layer="layout" svg:x1="18.288cm" svg:y1="10.47cm" svg:x2="20.662cm" svg:y2="11.101cm">
              <text:p/>
            </draw:line>
          </draw:g>
          <draw:custom-shape draw:style-name="gr509" draw:text-style-name="P16" draw:layer="layout" svg:width="1.537cm" svg:height="1.387cm" svg:x="19.107cm" svg:y="15.528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510" draw:text-style-name="P74" draw:layer="layout" svg:width="0.496cm" svg:height="0.072cm" svg:x="19.681cm" svg:y="16.321cm">
              <text:p/>
              <draw:enhanced-geometry svg:viewBox="0 0 115 17" draw:type="non-primitive" draw:enhanced-path="M 0 16  L 114 16  L 102 0  L 12 0  L 0 16  N"/>
            </draw:custom-shape>
            <draw:custom-shape draw:style-name="gr479" draw:text-style-name="P93" draw:layer="layout" svg:width="0.034cm" svg:height="0.033cm" svg:x="20.078cm" svg:y="16.279cm">
              <text:p/>
              <draw:enhanced-geometry svg:viewBox="0 0 21600 21600" draw:type="rectangle" draw:enhanced-path="M 0 0 L 21600 0 21600 21600 0 21600 0 0 Z N"/>
            </draw:custom-shape>
            <draw:custom-shape draw:style-name="gr511" draw:text-style-name="P94" draw:layer="layout" svg:width="0.492cm" svg:height="0.171cm" svg:x="19.681cm" svg:y="16.389cm">
              <text:p/>
              <draw:enhanced-geometry svg:viewBox="0 0 21600 21600" draw:type="rectangle" draw:enhanced-path="M 0 0 L 21600 0 21600 21600 0 21600 0 0 Z N"/>
            </draw:custom-shape>
            <draw:custom-shape draw:style-name="gr512" draw:text-style-name="P72" draw:layer="layout" svg:width="0.686cm" svg:height="0.106cm" svg:x="19.608cm" svg:y="16.534cm">
              <text:p/>
              <draw:enhanced-geometry svg:viewBox="0 0 159 25" draw:type="non-primitive" draw:enhanced-path="M 0 24  L 158 24  L 148 0  L 11 0  L 0 24  N"/>
            </draw:custom-shape>
            <draw:custom-shape draw:style-name="gr513" draw:text-style-name="P79" draw:layer="layout" svg:width="0.642cm" svg:height="0.089cm" svg:x="19.629cm" svg:y="16.543cm">
              <text:p/>
              <draw:enhanced-geometry svg:viewBox="0 0 149 21" draw:type="non-primitive" draw:enhanced-path="M 8 0  L 0 20  L 148 20  L 141 0  N"/>
            </draw:custom-shape>
            <draw:custom-shape draw:style-name="gr483" draw:text-style-name="P72" draw:layer="layout" svg:width="0.098cm" svg:height="0.072cm" svg:x="20.121cm" svg:y="16.56cm">
              <text:p/>
              <draw:enhanced-geometry svg:viewBox="0 0 23 17" draw:type="non-primitive" draw:enhanced-path="M 0 0  L 20 0  L 22 16  L 0 16  L 0 0  N"/>
            </draw:custom-shape>
            <draw:line draw:style-name="gr484" draw:text-style-name="P14" draw:layer="layout" svg:x1="20.121cm" svg:y1="16.582cm" svg:x2="20.172cm" svg:y2="16.582cm">
              <text:p/>
            </draw:line>
            <draw:custom-shape draw:style-name="gr514" draw:text-style-name="P79" draw:layer="layout" svg:width="0.677cm" svg:height="0.067cm" svg:x="19.608cm" svg:y="16.633cm">
              <text:p/>
              <draw:enhanced-geometry svg:viewBox="0 0 21600 21600" draw:type="rectangle" draw:enhanced-path="M 0 0 L 21600 0 21600 21600 0 21600 0 0 Z N"/>
            </draw:custom-shape>
            <draw:custom-shape draw:style-name="gr486" draw:text-style-name="P95" draw:layer="layout" svg:width="0.311cm" svg:height="0.071cm" svg:x="19.771cm" svg:y="16.309cm">
              <text:p/>
              <draw:enhanced-geometry svg:viewBox="0 0 72 17" draw:type="non-primitive" draw:enhanced-path="M 0 16  L 71 16  L 67 0  L 4 0  L 0 16  N"/>
            </draw:custom-shape>
            <draw:custom-shape draw:style-name="gr487" draw:text-style-name="P79" draw:layer="layout" svg:width="0.168cm" svg:height="0.072cm" svg:x="19.84cm" svg:y="16.313cm">
              <text:p/>
              <draw:enhanced-geometry svg:viewBox="0 0 39 17" draw:type="non-primitive" draw:enhanced-path="M 0 9  L 0 0  L 38 0  L 38 9  L 38 9  L 37 11  L 37 11  L 36 12  L 35 12  L 34 12  L 32 14  L 31 14  L 29 14  L 27 16  L 25 16  L 25 16  L 23 16  L 20 16  L 17 16  L 15 16  L 12 16  L 11 16  L 9 14  L 8 14  L 6 14  L 4 14  L 3 12  L 2 12  L 1 11  L 0 11  L 0 11  L 0 9  L 0 9  N"/>
            </draw:custom-shape>
            <draw:custom-shape draw:style-name="gr515" draw:text-style-name="P94" draw:layer="layout" svg:width="0.344cm" svg:height="0.336cm" svg:x="19.742cm" svg:y="15.925cm">
              <text:p/>
              <draw:enhanced-geometry svg:viewBox="0 0 21600 21600" draw:type="rectangle" draw:enhanced-path="M 0 0 L 21600 0 21600 21600 0 21600 0 0 Z N"/>
            </draw:custom-shape>
            <draw:custom-shape draw:style-name="gr516" draw:text-style-name="P95" draw:layer="layout" svg:width="0.298cm" svg:height="0.29cm" svg:x="19.771cm" svg:y="15.946cm">
              <text:p/>
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0" draw:text-style-name="P96" draw:layer="layout" svg:width="0.275cm" svg:height="0.251cm" svg:x="19.785cm" svg:y="15.967cm">
              <text:p/>
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">
              <draw:line draw:style-name="gr491" draw:text-style-name="P14" draw:layer="layout" svg:x1="19.828cm" svg:y1="16.018cm" svg:x2="19.883cm" svg:y2="16.166cm">
                <text:p/>
              </draw:line>
              <draw:line draw:style-name="gr491" draw:text-style-name="P14" draw:layer="layout" svg:x1="19.849cm" svg:y1="16.01cm" svg:x2="19.934cm" svg:y2="16.206cm">
                <text:p/>
              </draw:line>
            </draw:g>
            <draw:custom-shape draw:style-name="gr492" draw:text-style-name="P72" draw:layer="layout" svg:width="0.098cm" svg:height="0.072cm" svg:x="19.724cm" svg:y="16.543cm">
              <text:p/>
              <draw:enhanced-geometry svg:viewBox="0 0 23 17" draw:type="non-primitive" draw:enhanced-path="M 0 0  L 22 0  L 21 16  L 0 16  L 0 0  N"/>
            </draw:custom-shape>
            <draw:custom-shape draw:style-name="gr492" draw:text-style-name="P72" draw:layer="layout" svg:width="0.086cm" svg:height="0.072cm" svg:x="19.935cm" svg:y="16.543cm">
              <text:p/>
              <draw:enhanced-geometry svg:viewBox="0 0 20 17" draw:type="non-primitive" draw:enhanced-path="M 0 0  L 19 0  L 19 16  L 0 16  L 0 0  N"/>
            </draw:custom-shape>
            <draw:line draw:style-name="gr493" draw:text-style-name="P14" draw:layer="layout" svg:x1="19.702cm" svg:y1="16.569cm" svg:x2="19.965cm" svg:y2="16.569cm">
              <text:p/>
            </draw:line>
            <draw:line draw:style-name="gr493" draw:text-style-name="P14" draw:layer="layout" svg:x1="19.72cm" svg:y1="16.582cm" svg:x2="19.978cm" svg:y2="16.582cm">
              <text:p/>
            </draw:line>
            <draw:line draw:style-name="gr493" draw:text-style-name="P14" draw:layer="layout" svg:x1="19.72cm" svg:y1="16.594cm" svg:x2="19.952cm" svg:y2="16.594cm">
              <text:p/>
            </draw:line>
            <draw:line draw:style-name="gr493" draw:text-style-name="P14" draw:layer="layout" svg:x1="19.663cm" svg:y1="16.573cm" svg:x2="19.693cm" svg:y2="16.573cm">
              <text:p/>
            </draw:line>
            <draw:line draw:style-name="gr493" draw:text-style-name="P14" draw:layer="layout" svg:x1="19.663cm" svg:y1="16.585cm" svg:x2="19.693cm" svg:y2="16.585cm">
              <text:p/>
            </draw:line>
            <draw:line draw:style-name="gr493" draw:text-style-name="P14" draw:layer="layout" svg:x1="19.771cm" svg:y1="16.612cm" svg:x2="19.909cm" svg:y2="16.612cm">
              <text:p/>
            </draw:line>
            <draw:line draw:style-name="gr493" draw:text-style-name="P14" draw:layer="layout" svg:x1="19.978cm" svg:y1="16.569cm" svg:x2="20.021cm" svg:y2="16.569cm">
              <text:p/>
            </draw:line>
            <draw:line draw:style-name="gr493" draw:text-style-name="P14" draw:layer="layout" svg:x1="19.983cm" svg:y1="16.582cm" svg:x2="20.021cm" svg:y2="16.582cm">
              <text:p/>
            </draw:line>
            <draw:line draw:style-name="gr493" draw:text-style-name="P14" draw:layer="layout" svg:x1="19.966cm" svg:y1="16.594cm" svg:x2="20.021cm" svg:y2="16.594cm">
              <text:p/>
            </draw:line>
            <draw:line draw:style-name="gr493" draw:text-style-name="P14" draw:layer="layout" svg:x1="20.129cm" svg:y1="16.573cm" svg:x2="20.216cm" svg:y2="16.573cm">
              <text:p/>
            </draw:line>
            <draw:line draw:style-name="gr493" draw:text-style-name="P14" draw:layer="layout" svg:x1="20.129cm" svg:y1="16.594cm" svg:x2="20.189cm" svg:y2="16.594cm">
              <text:p/>
            </draw:line>
            <draw:line draw:style-name="gr493" draw:text-style-name="P14" draw:layer="layout" svg:x1="20.129cm" svg:y1="16.615cm" svg:x2="20.198cm" svg:y2="16.615cm">
              <text:p/>
            </draw:line>
            <draw:line draw:style-name="gr493" draw:text-style-name="P14" draw:layer="layout" svg:x1="20.195cm" svg:y1="16.585cm" svg:x2="20.216cm" svg:y2="16.585cm">
              <text:p/>
            </draw:line>
            <draw:line draw:style-name="gr493" draw:text-style-name="P14" draw:layer="layout" svg:x1="20.203cm" svg:y1="16.612cm" svg:x2="20.225cm" svg:y2="16.612cm">
              <text:p/>
            </draw:line>
            <draw:custom-shape draw:style-name="gr494" draw:text-style-name="P74" draw:layer="layout" svg:width="0.073cm" svg:height="0.072cm" svg:x="19.681cm" svg:y="16.543cm">
              <text:p/>
              <draw:enhanced-geometry svg:viewBox="0 0 17 17" draw:type="non-primitive" draw:enhanced-path="M 4 0  L 16 0  L 13 16  L 0 16  L 4 0  N"/>
            </draw:custom-shape>
            <draw:custom-shape draw:style-name="gr494" draw:text-style-name="P74" draw:layer="layout" svg:width="0.073cm" svg:height="0.072cm" svg:x="19.84cm" svg:y="16.543cm">
              <text:p/>
              <draw:enhanced-geometry svg:viewBox="0 0 17 17" draw:type="non-primitive" draw:enhanced-path="M 0 0  L 16 0  L 16 16  L 0 16  L 0 0  N"/>
            </draw:custom-shape>
            <draw:custom-shape draw:style-name="gr494" draw:text-style-name="P74" draw:layer="layout" svg:width="0.073cm" svg:height="0.072cm" svg:x="20.034cm" svg:y="16.543cm">
              <text:p/>
              <draw:enhanced-geometry svg:viewBox="0 0 17 17" draw:type="non-primitive" draw:enhanced-path="M 0 0  L 16 0  L 16 16  L 0 16  L 0 0  N"/>
            </draw:custom-shape>
            <draw:line draw:style-name="gr495" draw:text-style-name="P14" draw:layer="layout" svg:x1="19.72cm" svg:y1="16.612cm" svg:x2="19.766cm" svg:y2="16.612cm">
              <text:p/>
            </draw:line>
            <draw:line draw:style-name="gr495" draw:text-style-name="P14" draw:layer="layout" svg:x1="19.654cm" svg:y1="16.612cm" svg:x2="19.701cm" svg:y2="16.612cm">
              <text:p/>
            </draw:line>
            <draw:line draw:style-name="gr495" draw:text-style-name="P14" draw:layer="layout" svg:x1="19.931cm" svg:y1="16.612cm" svg:x2="19.956cm" svg:y2="16.612cm">
              <text:p/>
            </draw:line>
            <draw:line draw:style-name="gr495" draw:text-style-name="P14" draw:layer="layout" svg:x1="19.962cm" svg:y1="16.615cm" svg:x2="20.021cm" svg:y2="16.615cm">
              <text:p/>
            </draw:line>
            <draw:g draw:style-name="gr1">
              <draw:line draw:style-name="gr495" draw:text-style-name="P14" draw:layer="layout" svg:x1="20.034cm" svg:y1="16.573cm" svg:x2="20.103cm" svg:y2="16.573cm">
                <text:p/>
              </draw:line>
              <draw:line draw:style-name="gr495" draw:text-style-name="P14" draw:layer="layout" svg:x1="20.038cm" svg:y1="16.585cm" svg:x2="20.102cm" svg:y2="16.585cm">
                <text:p/>
              </draw:line>
              <draw:line draw:style-name="gr495" draw:text-style-name="P14" draw:layer="layout" svg:x1="20.038cm" svg:y1="16.615cm" svg:x2="20.102cm" svg:y2="16.615cm">
                <text:p/>
              </draw:line>
            </draw:g>
            <draw:line draw:style-name="gr495" draw:text-style-name="P14" draw:layer="layout" svg:x1="20.129cm" svg:y1="16.56cm" svg:x2="20.216cm" svg:y2="16.56cm">
              <text:p/>
            </draw:line>
            <draw:custom-shape draw:style-name="gr496" draw:text-style-name="P35" draw:layer="layout" svg:width="0.035cm" svg:height="0.033cm" svg:x="20.19cm" svg:y="16.415cm">
              <text:p/>
              <draw:enhanced-geometry svg:viewBox="0 0 21600 21600" draw:type="rectangle" draw:enhanced-path="M 0 0 L 21600 0 21600 21600 0 21600 0 0 Z N"/>
            </draw:custom-shape>
            <draw:custom-shape draw:style-name="gr497" draw:text-style-name="P31" draw:layer="layout" svg:width="0.323cm" svg:height="0.085cm" svg:x="19.832cm" svg:y="16.419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496" draw:text-style-name="P35" draw:layer="layout" svg:width="0.034cm" svg:height="0.034cm" svg:x="20.147cm" svg:y="16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20.147cm" svg:y="16.4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96" draw:text-style-name="P35" draw:layer="layout" svg:width="0.034cm" svg:height="0.033cm" svg:x="19.974cm" svg:y="16.419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9.974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94cm" svg:height="0.033cm" svg:x="19.927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9.953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20.03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20.147cm" svg:y="16.419cm">
              <text:p/>
              <draw:enhanced-geometry svg:viewBox="0 0 21600 21600" draw:type="rectangle" draw:enhanced-path="M 0 0 L 21600 0 21600 21600 0 21600 0 0 Z N"/>
            </draw:custom-shape>
            <draw:line draw:style-name="gr498" draw:text-style-name="P14" draw:layer="layout" svg:x1="19.892cm" svg:y1="16.406cm" svg:x2="19.892cm" svg:y2="16.521cm">
              <text:p/>
            </draw:line>
            <draw:line draw:style-name="gr498" draw:text-style-name="P14" draw:layer="layout" svg:x1="20.039cm" svg:y1="16.406cm" svg:x2="20.039cm" svg:y2="16.521cm">
              <text:p/>
            </draw:line>
            <draw:line draw:style-name="gr498" draw:text-style-name="P14" draw:layer="layout" svg:x1="19.815cm" svg:y1="16.406cm" svg:x2="19.681cm" svg:y2="16.406cm">
              <text:p/>
            </draw:line>
            <draw:line draw:style-name="gr498" draw:text-style-name="P14" draw:layer="layout" svg:x1="19.828cm" svg:y1="16.41cm" svg:x2="19.694cm" svg:y2="16.41cm">
              <text:p/>
            </draw:line>
            <draw:line draw:style-name="gr498" draw:text-style-name="P14" draw:layer="layout" svg:x1="19.828cm" svg:y1="16.432cm" svg:x2="19.694cm" svg:y2="16.432cm">
              <text:p/>
            </draw:line>
            <draw:line draw:style-name="gr498" draw:text-style-name="P14" draw:layer="layout" svg:x1="19.828cm" svg:y1="16.458cm" svg:x2="19.694cm" svg:y2="16.458cm">
              <text:p/>
            </draw:line>
            <draw:line draw:style-name="gr498" draw:text-style-name="P14" draw:layer="layout" svg:x1="19.828cm" svg:y1="16.483cm" svg:x2="19.694cm" svg:y2="16.483cm">
              <text:p/>
            </draw:line>
            <draw:line draw:style-name="gr498" draw:text-style-name="P14" draw:layer="layout" svg:x1="19.828cm" svg:y1="16.504cm" svg:x2="19.694cm" svg:y2="16.504cm">
              <text:p/>
            </draw:line>
            <draw:line draw:style-name="gr498" draw:text-style-name="P14" draw:layer="layout" svg:x1="19.694cm" svg:y1="16.53cm" svg:x2="20.195cm" svg:y2="16.53cm">
              <text:p/>
            </draw:line>
            <draw:line draw:style-name="gr498" draw:text-style-name="P14" draw:layer="layout" svg:x1="19.828cm" svg:y1="16.44cm" svg:x2="20.173cm" svg:y2="16.44cm">
              <text:p/>
            </draw:line>
            <draw:custom-shape draw:style-name="gr496" draw:text-style-name="P35" draw:layer="layout" svg:width="0.034cm" svg:height="0.033cm" svg:x="20.1cm" svg:y="16.458cm">
              <text:p/>
              <draw:enhanced-geometry svg:viewBox="0 0 21600 21600" draw:type="rectangle" draw:enhanced-path="M 0 0 L 21600 0 21600 21600 0 21600 0 0 Z N"/>
            </draw:custom-shape>
            <draw:custom-shape draw:style-name="gr499" draw:text-style-name="P79" draw:layer="layout" svg:width="0.272cm" svg:height="0.034cm" svg:x="19.789cm" svg:y="16.368cm">
              <text:p/>
              <draw:enhanced-geometry svg:viewBox="0 0 21600 21600" draw:type="rectangle" draw:enhanced-path="M 0 0 L 21600 0 21600 21600 0 21600 0 0 Z N"/>
            </draw:custom-shape>
            <draw:custom-shape draw:style-name="gr500" draw:text-style-name="P79" draw:layer="layout" svg:width="0.307cm" svg:height="0.067cm" svg:x="19.771cm" svg:y="16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17" draw:text-style-name="P16" draw:layer="layout" svg:width="1.64cm" svg:height="1.387cm" svg:x="17.263cm" svg:y="15.528cm">
            <text:p/>
            <draw:enhanced-geometry svg:viewBox="0 0 21600 21600" draw:type="rectangle" draw:enhanced-path="M 0 0 L 21600 0 21600 21600 0 21600 0 0 Z N"/>
          </draw:custom-shape>
          <draw:custom-shape draw:style-name="gr518" draw:text-style-name="P16" draw:layer="layout" svg:width="1.852cm" svg:height="1.387cm" svg:x="15.204cm" svg:y="15.528cm">
            <text:p/>
            <draw:enhanced-geometry svg:viewBox="0 0 21600 21600" draw:type="rectangle" draw:enhanced-path="M 0 0 L 21600 0 21600 21600 0 21600 0 0 Z N"/>
          </draw:custom-shape>
          <draw:custom-shape draw:style-name="gr519" draw:text-style-name="P16" draw:layer="layout" svg:width="1.425cm" svg:height="1.387cm" svg:x="13.564cm" svg:y="15.528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510" draw:text-style-name="P74" draw:layer="layout" svg:width="0.496cm" svg:height="0.072cm" svg:x="13.935cm" svg:y="16.321cm">
              <text:p/>
              <draw:enhanced-geometry svg:viewBox="0 0 115 17" draw:type="non-primitive" draw:enhanced-path="M 0 16  L 114 16  L 102 0  L 12 0  L 0 16  N"/>
            </draw:custom-shape>
            <draw:custom-shape draw:style-name="gr479" draw:text-style-name="P93" draw:layer="layout" svg:width="0.035cm" svg:height="0.033cm" svg:x="14.322cm" svg:y="16.279cm">
              <text:p/>
              <draw:enhanced-geometry svg:viewBox="0 0 21600 21600" draw:type="rectangle" draw:enhanced-path="M 0 0 L 21600 0 21600 21600 0 21600 0 0 Z N"/>
            </draw:custom-shape>
            <draw:custom-shape draw:style-name="gr511" draw:text-style-name="P94" draw:layer="layout" svg:width="0.491cm" svg:height="0.171cm" svg:x="13.935cm" svg:y="16.389cm">
              <text:p/>
              <draw:enhanced-geometry svg:viewBox="0 0 21600 21600" draw:type="rectangle" draw:enhanced-path="M 0 0 L 21600 0 21600 21600 0 21600 0 0 Z N"/>
            </draw:custom-shape>
            <draw:custom-shape draw:style-name="gr520" draw:text-style-name="P72" draw:layer="layout" svg:width="0.677cm" svg:height="0.106cm" svg:x="13.866cm" svg:y="16.534cm">
              <text:p/>
              <draw:enhanced-geometry svg:viewBox="0 0 157 25" draw:type="non-primitive" draw:enhanced-path="M 0 24  L 156 24  L 146 0  L 11 0  L 0 24  N"/>
            </draw:custom-shape>
            <draw:custom-shape draw:style-name="gr521" draw:text-style-name="P79" draw:layer="layout" svg:width="0.651cm" svg:height="0.089cm" svg:x="13.878cm" svg:y="16.543cm">
              <text:p/>
              <draw:enhanced-geometry svg:viewBox="0 0 151 21" draw:type="non-primitive" draw:enhanced-path="M 8 0  L 0 20  L 150 20  L 143 0  N"/>
            </draw:custom-shape>
            <draw:custom-shape draw:style-name="gr483" draw:text-style-name="P72" draw:layer="layout" svg:width="0.086cm" svg:height="0.072cm" svg:x="14.383cm" svg:y="16.56cm">
              <text:p/>
              <draw:enhanced-geometry svg:viewBox="0 0 20 17" draw:type="non-primitive" draw:enhanced-path="M 0 0  L 17 0  L 19 16  L 0 16  L 0 0  N"/>
            </draw:custom-shape>
            <draw:line draw:style-name="gr484" draw:text-style-name="P14" draw:layer="layout" svg:x1="14.392cm" svg:y1="16.582cm" svg:x2="14.438cm" svg:y2="16.582cm">
              <text:p/>
            </draw:line>
            <draw:custom-shape draw:style-name="gr522" draw:text-style-name="P79" draw:layer="layout" svg:width="0.668cm" svg:height="0.067cm" svg:x="13.866cm" svg:y="16.633cm">
              <text:p/>
              <draw:enhanced-geometry svg:viewBox="0 0 21600 21600" draw:type="rectangle" draw:enhanced-path="M 0 0 L 21600 0 21600 21600 0 21600 0 0 Z N"/>
            </draw:custom-shape>
            <draw:custom-shape draw:style-name="gr486" draw:text-style-name="P95" draw:layer="layout" svg:width="0.315cm" svg:height="0.071cm" svg:x="14.021cm" svg:y="16.309cm">
              <text:p/>
              <draw:enhanced-geometry svg:viewBox="0 0 73 17" draw:type="non-primitive" draw:enhanced-path="M 0 16  L 72 16  L 68 0  L 4 0  L 0 16  N"/>
            </draw:custom-shape>
            <draw:custom-shape draw:style-name="gr487" draw:text-style-name="P79" draw:layer="layout" svg:width="0.177cm" svg:height="0.072cm" svg:x="14.094cm" svg:y="16.313cm">
              <text:p/>
              <draw:enhanced-geometry svg:viewBox="0 0 41 17" draw:type="non-primitive" draw:enhanced-path="M 0 9  L 0 0  L 40 0  L 40 9  L 40 9  L 39 11  L 39 11  L 38 12  L 37 12  L 35 12  L 34 14  L 32 14  L 31 14  L 29 16  L 27 16  L 25 16  L 23 16  L 21 16  L 19 16  L 16 16  L 14 16  L 11 16  L 9 14  L 8 14  L 6 14  L 4 14  L 3 12  L 2 12  L 1 11  L 0 11  L 0 11  L 0 9  L 0 9  N"/>
            </draw:custom-shape>
            <draw:custom-shape draw:style-name="gr515" draw:text-style-name="P94" draw:layer="layout" svg:width="0.34cm" svg:height="0.336cm" svg:x="14.012cm" svg:y="15.925cm">
              <text:p/>
              <draw:enhanced-geometry svg:viewBox="0 0 21600 21600" draw:type="rectangle" draw:enhanced-path="M 0 0 L 21600 0 21600 21600 0 21600 0 0 Z N"/>
            </draw:custom-shape>
            <draw:custom-shape draw:style-name="gr516" draw:text-style-name="P95" draw:layer="layout" svg:width="0.301cm" svg:height="0.29cm" svg:x="14.021cm" svg:y="15.946cm">
              <text:p/>
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0" draw:text-style-name="P96" draw:layer="layout" svg:width="0.259cm" svg:height="0.251cm" svg:x="14.046cm" svg:y="15.967cm">
              <text:p/>
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">
              <draw:line draw:style-name="gr491" draw:text-style-name="P14" draw:layer="layout" svg:x1="14.081cm" svg:y1="16.018cm" svg:x2="14.137cm" svg:y2="16.166cm">
                <text:p/>
              </draw:line>
              <draw:line draw:style-name="gr491" draw:text-style-name="P14" draw:layer="layout" svg:x1="14.107cm" svg:y1="16.01cm" svg:x2="14.192cm" svg:y2="16.206cm">
                <text:p/>
              </draw:line>
            </draw:g>
            <draw:custom-shape draw:style-name="gr492" draw:text-style-name="P72" draw:layer="layout" svg:width="0.082cm" svg:height="0.072cm" svg:x="13.995cm" svg:y="16.543cm">
              <text:p/>
              <draw:enhanced-geometry svg:viewBox="0 0 19 17" draw:type="non-primitive" draw:enhanced-path="M 0 0  L 18 0  L 17 16  L 0 16  L 0 0  N"/>
            </draw:custom-shape>
            <draw:custom-shape draw:style-name="gr492" draw:text-style-name="P72" draw:layer="layout" svg:width="0.086cm" svg:height="0.072cm" svg:x="14.193cm" svg:y="16.543cm">
              <text:p/>
              <draw:enhanced-geometry svg:viewBox="0 0 20 17" draw:type="non-primitive" draw:enhanced-path="M 0 0  L 19 0  L 19 16  L 0 16  L 0 0  N"/>
            </draw:custom-shape>
            <draw:line draw:style-name="gr493" draw:text-style-name="P14" draw:layer="layout" svg:x1="13.96cm" svg:y1="16.569cm" svg:x2="14.227cm" svg:y2="16.569cm">
              <text:p/>
            </draw:line>
            <draw:line draw:style-name="gr493" draw:text-style-name="P14" draw:layer="layout" svg:x1="13.982cm" svg:y1="16.582cm" svg:x2="14.241cm" svg:y2="16.582cm">
              <text:p/>
            </draw:line>
            <draw:line draw:style-name="gr493" draw:text-style-name="P14" draw:layer="layout" svg:x1="13.982cm" svg:y1="16.594cm" svg:x2="14.21cm" svg:y2="16.594cm">
              <text:p/>
            </draw:line>
            <draw:line draw:style-name="gr493" draw:text-style-name="P14" draw:layer="layout" svg:x1="13.93cm" svg:y1="16.573cm" svg:x2="13.951cm" svg:y2="16.573cm">
              <text:p/>
            </draw:line>
            <draw:line draw:style-name="gr493" draw:text-style-name="P14" draw:layer="layout" svg:x1="13.93cm" svg:y1="16.585cm" svg:x2="13.947cm" svg:y2="16.585cm">
              <text:p/>
            </draw:line>
            <draw:line draw:style-name="gr493" draw:text-style-name="P14" draw:layer="layout" svg:x1="14.021cm" svg:y1="16.612cm" svg:x2="14.18cm" svg:y2="16.612cm">
              <text:p/>
            </draw:line>
            <draw:line draw:style-name="gr493" draw:text-style-name="P14" draw:layer="layout" svg:x1="14.241cm" svg:y1="16.569cm" svg:x2="14.275cm" svg:y2="16.569cm">
              <text:p/>
            </draw:line>
            <draw:line draw:style-name="gr493" draw:text-style-name="P14" draw:layer="layout" svg:x1="14.249cm" svg:y1="16.582cm" svg:x2="14.275cm" svg:y2="16.582cm">
              <text:p/>
            </draw:line>
            <draw:line draw:style-name="gr493" draw:text-style-name="P14" draw:layer="layout" svg:x1="14.227cm" svg:y1="16.594cm" svg:x2="14.274cm" svg:y2="16.594cm">
              <text:p/>
            </draw:line>
            <draw:line draw:style-name="gr493" draw:text-style-name="P14" draw:layer="layout" svg:x1="14.401cm" svg:y1="16.573cm" svg:x2="14.461cm" svg:y2="16.573cm">
              <text:p/>
            </draw:line>
            <draw:line draw:style-name="gr493" draw:text-style-name="P14" draw:layer="layout" svg:x1="14.401cm" svg:y1="16.594cm" svg:x2="14.447cm" svg:y2="16.594cm">
              <text:p/>
            </draw:line>
            <draw:line draw:style-name="gr493" draw:text-style-name="P14" draw:layer="layout" svg:x1="14.401cm" svg:y1="16.615cm" svg:x2="14.452cm" svg:y2="16.615cm">
              <text:p/>
            </draw:line>
            <draw:line draw:style-name="gr493" draw:text-style-name="P14" draw:layer="layout" svg:x1="14.453cm" svg:y1="16.585cm" svg:x2="14.469cm" svg:y2="16.585cm">
              <text:p/>
            </draw:line>
            <draw:line draw:style-name="gr493" draw:text-style-name="P14" draw:layer="layout" svg:x1="14.453cm" svg:y1="16.612cm" svg:x2="14.474cm" svg:y2="16.612cm">
              <text:p/>
            </draw:line>
            <draw:custom-shape draw:style-name="gr494" draw:text-style-name="P74" draw:layer="layout" svg:width="0.073cm" svg:height="0.072cm" svg:x="13.935cm" svg:y="16.543cm">
              <text:p/>
              <draw:enhanced-geometry svg:viewBox="0 0 17 17" draw:type="non-primitive" draw:enhanced-path="M 4 0  L 16 0  L 12 16  L 0 16  L 4 0  N"/>
            </draw:custom-shape>
            <draw:custom-shape draw:style-name="gr494" draw:text-style-name="P74" draw:layer="layout" svg:width="0.09cm" svg:height="0.072cm" svg:x="14.094cm" svg:y="16.543cm">
              <text:p/>
              <draw:enhanced-geometry svg:viewBox="0 0 21 17" draw:type="non-primitive" draw:enhanced-path="M 0 0  L 20 0  L 20 16  L 0 16  L 0 0  N"/>
            </draw:custom-shape>
            <draw:custom-shape draw:style-name="gr494" draw:text-style-name="P74" draw:layer="layout" svg:width="0.078cm" svg:height="0.072cm" svg:x="14.288cm" svg:y="16.543cm">
              <text:p/>
              <draw:enhanced-geometry svg:viewBox="0 0 18 17" draw:type="non-primitive" draw:enhanced-path="M 0 0  L 17 0  L 17 16  L 0 16  L 0 0  N"/>
            </draw:custom-shape>
            <draw:line draw:style-name="gr495" draw:text-style-name="P14" draw:layer="layout" svg:x1="13.986cm" svg:y1="16.612cm" svg:x2="14.021cm" svg:y2="16.612cm">
              <text:p/>
            </draw:line>
            <draw:line draw:style-name="gr495" draw:text-style-name="P14" draw:layer="layout" svg:x1="13.912cm" svg:y1="16.612cm" svg:x2="13.959cm" svg:y2="16.612cm">
              <text:p/>
            </draw:line>
            <draw:line draw:style-name="gr495" draw:text-style-name="P14" draw:layer="layout" svg:x1="14.189cm" svg:y1="16.612cm" svg:x2="14.21cm" svg:y2="16.612cm">
              <text:p/>
            </draw:line>
            <draw:line draw:style-name="gr495" draw:text-style-name="P14" draw:layer="layout" svg:x1="14.22cm" svg:y1="16.615cm" svg:x2="14.275cm" svg:y2="16.615cm">
              <text:p/>
            </draw:line>
            <draw:g draw:style-name="gr1">
              <draw:line draw:style-name="gr495" draw:text-style-name="P14" draw:layer="layout" svg:x1="14.288cm" svg:y1="16.573cm" svg:x2="14.366cm" svg:y2="16.573cm">
                <text:p/>
              </draw:line>
              <draw:line draw:style-name="gr495" draw:text-style-name="P14" draw:layer="layout" svg:x1="14.296cm" svg:y1="16.585cm" svg:x2="14.365cm" svg:y2="16.585cm">
                <text:p/>
              </draw:line>
              <draw:line draw:style-name="gr495" draw:text-style-name="P14" draw:layer="layout" svg:x1="14.296cm" svg:y1="16.615cm" svg:x2="14.369cm" svg:y2="16.615cm">
                <text:p/>
              </draw:line>
            </draw:g>
            <draw:line draw:style-name="gr495" draw:text-style-name="P14" draw:layer="layout" svg:x1="14.401cm" svg:y1="16.56cm" svg:x2="14.461cm" svg:y2="16.56cm">
              <text:p/>
            </draw:line>
            <draw:custom-shape draw:style-name="gr496" draw:text-style-name="P35" draw:layer="layout" svg:width="0.034cm" svg:height="0.033cm" svg:x="14.444cm" svg:y="16.415cm">
              <text:p/>
              <draw:enhanced-geometry svg:viewBox="0 0 21600 21600" draw:type="rectangle" draw:enhanced-path="M 0 0 L 21600 0 21600 21600 0 21600 0 0 Z N"/>
            </draw:custom-shape>
            <draw:custom-shape draw:style-name="gr497" draw:text-style-name="P31" draw:layer="layout" svg:width="0.323cm" svg:height="0.085cm" svg:x="14.086cm" svg:y="16.419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496" draw:text-style-name="P35" draw:layer="layout" svg:width="0.035cm" svg:height="0.034cm" svg:x="14.417cm" svg:y="16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4.417cm" svg:y="16.4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96" draw:text-style-name="P35" draw:layer="layout" svg:width="0.035cm" svg:height="0.033cm" svg:x="14.227cm" svg:y="16.419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5cm" svg:height="0.033cm" svg:x="14.227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81cm" svg:height="0.033cm" svg:x="14.198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4.211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4.293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5cm" svg:height="0.033cm" svg:x="14.417cm" svg:y="16.419cm">
              <text:p/>
              <draw:enhanced-geometry svg:viewBox="0 0 21600 21600" draw:type="rectangle" draw:enhanced-path="M 0 0 L 21600 0 21600 21600 0 21600 0 0 Z N"/>
            </draw:custom-shape>
            <draw:line draw:style-name="gr498" draw:text-style-name="P14" draw:layer="layout" svg:x1="14.146cm" svg:y1="16.406cm" svg:x2="14.146cm" svg:y2="16.521cm">
              <text:p/>
            </draw:line>
            <draw:line draw:style-name="gr498" draw:text-style-name="P14" draw:layer="layout" svg:x1="14.297cm" svg:y1="16.406cm" svg:x2="14.297cm" svg:y2="16.521cm">
              <text:p/>
            </draw:line>
            <draw:line draw:style-name="gr498" draw:text-style-name="P14" draw:layer="layout" svg:x1="14.067cm" svg:y1="16.406cm" svg:x2="13.934cm" svg:y2="16.406cm">
              <text:p/>
            </draw:line>
            <draw:line draw:style-name="gr498" draw:text-style-name="P14" draw:layer="layout" svg:x1="14.08cm" svg:y1="16.41cm" svg:x2="13.951cm" svg:y2="16.41cm">
              <text:p/>
            </draw:line>
            <draw:line draw:style-name="gr498" draw:text-style-name="P14" draw:layer="layout" svg:x1="14.08cm" svg:y1="16.432cm" svg:x2="13.951cm" svg:y2="16.432cm">
              <text:p/>
            </draw:line>
            <draw:line draw:style-name="gr498" draw:text-style-name="P14" draw:layer="layout" svg:x1="14.08cm" svg:y1="16.458cm" svg:x2="13.951cm" svg:y2="16.458cm">
              <text:p/>
            </draw:line>
            <draw:line draw:style-name="gr498" draw:text-style-name="P14" draw:layer="layout" svg:x1="14.08cm" svg:y1="16.483cm" svg:x2="13.951cm" svg:y2="16.483cm">
              <text:p/>
            </draw:line>
            <draw:line draw:style-name="gr498" draw:text-style-name="P14" draw:layer="layout" svg:x1="14.08cm" svg:y1="16.504cm" svg:x2="13.951cm" svg:y2="16.504cm">
              <text:p/>
            </draw:line>
            <draw:line draw:style-name="gr498" draw:text-style-name="P14" draw:layer="layout" svg:x1="13.952cm" svg:y1="16.53cm" svg:x2="14.452cm" svg:y2="16.53cm">
              <text:p/>
            </draw:line>
            <draw:line draw:style-name="gr498" draw:text-style-name="P14" draw:layer="layout" svg:x1="14.081cm" svg:y1="16.44cm" svg:x2="14.439cm" svg:y2="16.44cm">
              <text:p/>
            </draw:line>
            <draw:custom-shape draw:style-name="gr496" draw:text-style-name="P35" draw:layer="layout" svg:width="0.035cm" svg:height="0.033cm" svg:x="14.353cm" svg:y="16.458cm">
              <text:p/>
              <draw:enhanced-geometry svg:viewBox="0 0 21600 21600" draw:type="rectangle" draw:enhanced-path="M 0 0 L 21600 0 21600 21600 0 21600 0 0 Z N"/>
            </draw:custom-shape>
            <draw:custom-shape draw:style-name="gr499" draw:text-style-name="P79" draw:layer="layout" svg:width="0.276cm" svg:height="0.034cm" svg:x="14.038cm" svg:y="16.368cm">
              <text:p/>
              <draw:enhanced-geometry svg:viewBox="0 0 21600 21600" draw:type="rectangle" draw:enhanced-path="M 0 0 L 21600 0 21600 21600 0 21600 0 0 Z N"/>
            </draw:custom-shape>
            <draw:custom-shape draw:style-name="gr500" draw:text-style-name="P79" draw:layer="layout" svg:width="0.31cm" svg:height="0.067cm" svg:x="14.021cm" svg:y="16.279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523" draw:text-style-name="P74" draw:layer="layout" svg:width="0.504cm" svg:height="0.072cm" svg:x="15.782cm" svg:y="16.321cm">
              <text:p/>
              <draw:enhanced-geometry svg:viewBox="0 0 117 17" draw:type="non-primitive" draw:enhanced-path="M 0 16  L 116 16  L 104 0  L 12 0  L 0 16  N"/>
            </draw:custom-shape>
            <draw:custom-shape draw:style-name="gr479" draw:text-style-name="P93" draw:layer="layout" svg:width="0.034cm" svg:height="0.033cm" svg:x="16.183cm" svg:y="16.279cm">
              <text:p/>
              <draw:enhanced-geometry svg:viewBox="0 0 21600 21600" draw:type="rectangle" draw:enhanced-path="M 0 0 L 21600 0 21600 21600 0 21600 0 0 Z N"/>
            </draw:custom-shape>
            <draw:custom-shape draw:style-name="gr511" draw:text-style-name="P94" draw:layer="layout" svg:width="0.499cm" svg:height="0.171cm" svg:x="15.782cm" svg:y="16.389cm">
              <text:p/>
              <draw:enhanced-geometry svg:viewBox="0 0 21600 21600" draw:type="rectangle" draw:enhanced-path="M 0 0 L 21600 0 21600 21600 0 21600 0 0 Z N"/>
            </draw:custom-shape>
            <draw:custom-shape draw:style-name="gr524" draw:text-style-name="P72" draw:layer="layout" svg:width="0.673cm" svg:height="0.106cm" svg:x="15.718cm" svg:y="16.534cm">
              <text:p/>
              <draw:enhanced-geometry svg:viewBox="0 0 156 25" draw:type="non-primitive" draw:enhanced-path="M 0 24  L 155 24  L 145 0  L 11 0  L 0 24  N"/>
            </draw:custom-shape>
            <draw:custom-shape draw:style-name="gr525" draw:text-style-name="P79" draw:layer="layout" svg:width="0.638cm" svg:height="0.089cm" svg:x="15.73cm" svg:y="16.543cm">
              <text:p/>
              <draw:enhanced-geometry svg:viewBox="0 0 148 21" draw:type="non-primitive" draw:enhanced-path="M 8 0  L 0 20  L 147 20  L 140 0  N"/>
            </draw:custom-shape>
            <draw:custom-shape draw:style-name="gr483" draw:text-style-name="P72" draw:layer="layout" svg:width="0.082cm" svg:height="0.072cm" svg:x="16.235cm" svg:y="16.56cm">
              <text:p/>
              <draw:enhanced-geometry svg:viewBox="0 0 19 17" draw:type="non-primitive" draw:enhanced-path="M 0 0  L 16 0  L 18 16  L 0 16  L 0 0  N"/>
            </draw:custom-shape>
            <draw:line draw:style-name="gr484" draw:text-style-name="P14" draw:layer="layout" svg:x1="16.235cm" svg:y1="16.582cm" svg:x2="16.29cm" svg:y2="16.582cm">
              <text:p/>
            </draw:line>
            <draw:custom-shape draw:style-name="gr526" draw:text-style-name="P79" draw:layer="layout" svg:width="0.664cm" svg:height="0.067cm" svg:x="15.718cm" svg:y="16.633cm">
              <text:p/>
              <draw:enhanced-geometry svg:viewBox="0 0 21600 21600" draw:type="rectangle" draw:enhanced-path="M 0 0 L 21600 0 21600 21600 0 21600 0 0 Z N"/>
            </draw:custom-shape>
            <draw:custom-shape draw:style-name="gr486" draw:text-style-name="P95" draw:layer="layout" svg:width="0.306cm" svg:height="0.071cm" svg:x="15.873cm" svg:y="16.309cm">
              <text:p/>
              <draw:enhanced-geometry svg:viewBox="0 0 71 17" draw:type="non-primitive" draw:enhanced-path="M 0 16  L 70 16  L 66 0  L 3 0  L 0 16  N"/>
            </draw:custom-shape>
            <draw:custom-shape draw:style-name="gr487" draw:text-style-name="P79" draw:layer="layout" svg:width="0.168cm" svg:height="0.072cm" svg:x="15.945cm" svg:y="16.313cm">
              <text:p/>
              <draw:enhanced-geometry svg:viewBox="0 0 39 17" draw:type="non-primitive" draw:enhanced-path="M 0 9  L 0 0  L 38 0  L 38 9  L 38 9  L 37 11  L 37 11  L 36 12  L 35 12  L 34 12  L 32 14  L 31 14  L 29 14  L 27 16  L 25 16  L 25 16  L 23 16  L 20 16  L 17 16  L 15 16  L 12 16  L 11 16  L 9 14  L 8 14  L 6 14  L 4 14  L 3 12  L 2 12  L 1 11  L 0 11  L 0 11  L 0 9  L 0 9  N"/>
            </draw:custom-shape>
            <draw:custom-shape draw:style-name="gr515" draw:text-style-name="P94" draw:layer="layout" svg:width="0.354cm" svg:height="0.336cm" svg:x="15.851cm" svg:y="15.925cm">
              <text:p/>
              <draw:enhanced-geometry svg:viewBox="0 0 21600 21600" draw:type="rectangle" draw:enhanced-path="M 0 0 L 21600 0 21600 21600 0 21600 0 0 Z N"/>
            </draw:custom-shape>
            <draw:custom-shape draw:style-name="gr527" draw:text-style-name="P95" draw:layer="layout" svg:width="0.28cm" svg:height="0.29cm" svg:x="15.89cm" svg:y="15.946cm">
              <text:p/>
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0" draw:text-style-name="P96" draw:layer="layout" svg:width="0.258cm" svg:height="0.251cm" svg:x="15.907cm" svg:y="15.967cm">
              <text:p/>
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">
              <draw:line draw:style-name="gr491" draw:text-style-name="P14" draw:layer="layout" svg:x1="15.929cm" svg:y1="16.018cm" svg:x2="15.984cm" svg:y2="16.166cm">
                <text:p/>
              </draw:line>
              <draw:line draw:style-name="gr491" draw:text-style-name="P14" draw:layer="layout" svg:x1="15.959cm" svg:y1="16.01cm" svg:x2="16.044cm" svg:y2="16.206cm">
                <text:p/>
              </draw:line>
            </draw:g>
            <draw:custom-shape draw:style-name="gr492" draw:text-style-name="P72" draw:layer="layout" svg:width="0.089cm" svg:height="0.072cm" svg:x="15.834cm" svg:y="16.543cm">
              <text:p/>
              <draw:enhanced-geometry svg:viewBox="0 0 21 17" draw:type="non-primitive" draw:enhanced-path="M 0 0  L 20 0  L 19 16  L 0 16  L 0 0  N"/>
            </draw:custom-shape>
            <draw:custom-shape draw:style-name="gr492" draw:text-style-name="P72" draw:layer="layout" svg:width="0.077cm" svg:height="0.072cm" svg:x="16.045cm" svg:y="16.543cm">
              <text:p/>
              <draw:enhanced-geometry svg:viewBox="0 0 18 17" draw:type="non-primitive" draw:enhanced-path="M 0 0  L 17 0  L 17 16  L 0 16  L 0 0  N"/>
            </draw:custom-shape>
            <draw:line draw:style-name="gr493" draw:text-style-name="P14" draw:layer="layout" svg:x1="15.812cm" svg:y1="16.569cm" svg:x2="16.079cm" svg:y2="16.569cm">
              <text:p/>
            </draw:line>
            <draw:line draw:style-name="gr493" draw:text-style-name="P14" draw:layer="layout" svg:x1="15.825cm" svg:y1="16.582cm" svg:x2="16.088cm" svg:y2="16.582cm">
              <text:p/>
            </draw:line>
            <draw:line draw:style-name="gr493" draw:text-style-name="P14" draw:layer="layout" svg:x1="15.825cm" svg:y1="16.594cm" svg:x2="16.057cm" svg:y2="16.594cm">
              <text:p/>
            </draw:line>
            <draw:line draw:style-name="gr493" draw:text-style-name="P14" draw:layer="layout" svg:x1="15.764cm" svg:y1="16.573cm" svg:x2="15.799cm" svg:y2="16.573cm">
              <text:p/>
            </draw:line>
            <draw:line draw:style-name="gr493" draw:text-style-name="P14" draw:layer="layout" svg:x1="15.764cm" svg:y1="16.585cm" svg:x2="15.79cm" svg:y2="16.585cm">
              <text:p/>
            </draw:line>
            <draw:line draw:style-name="gr493" draw:text-style-name="P14" draw:layer="layout" svg:x1="15.873cm" svg:y1="16.612cm" svg:x2="16.032cm" svg:y2="16.612cm">
              <text:p/>
            </draw:line>
            <draw:line draw:style-name="gr493" draw:text-style-name="P14" draw:layer="layout" svg:x1="16.088cm" svg:y1="16.569cm" svg:x2="16.118cm" svg:y2="16.569cm">
              <text:p/>
            </draw:line>
            <draw:line draw:style-name="gr493" draw:text-style-name="P14" draw:layer="layout" svg:x1="16.101cm" svg:y1="16.582cm" svg:x2="16.118cm" svg:y2="16.582cm">
              <text:p/>
            </draw:line>
            <draw:line draw:style-name="gr493" draw:text-style-name="P14" draw:layer="layout" svg:x1="16.079cm" svg:y1="16.594cm" svg:x2="16.118cm" svg:y2="16.594cm">
              <text:p/>
            </draw:line>
            <draw:line draw:style-name="gr493" draw:text-style-name="P14" draw:layer="layout" svg:x1="16.248cm" svg:y1="16.573cm" svg:x2="16.308cm" svg:y2="16.573cm">
              <text:p/>
            </draw:line>
            <draw:line draw:style-name="gr493" draw:text-style-name="P14" draw:layer="layout" svg:x1="16.248cm" svg:y1="16.594cm" svg:x2="16.299cm" svg:y2="16.594cm">
              <text:p/>
            </draw:line>
            <draw:line draw:style-name="gr493" draw:text-style-name="P14" draw:layer="layout" svg:x1="16.248cm" svg:y1="16.615cm" svg:x2="16.299cm" svg:y2="16.615cm">
              <text:p/>
            </draw:line>
            <draw:line draw:style-name="gr493" draw:text-style-name="P14" draw:layer="layout" svg:x1="16.3cm" svg:y1="16.585cm" svg:x2="16.321cm" svg:y2="16.585cm">
              <text:p/>
            </draw:line>
            <draw:line draw:style-name="gr493" draw:text-style-name="P14" draw:layer="layout" svg:x1="16.3cm" svg:y1="16.612cm" svg:x2="16.33cm" svg:y2="16.612cm">
              <text:p/>
            </draw:line>
            <draw:custom-shape draw:style-name="gr494" draw:text-style-name="P74" draw:layer="layout" svg:width="0.073cm" svg:height="0.072cm" svg:x="15.782cm" svg:y="16.543cm">
              <text:p/>
              <draw:enhanced-geometry svg:viewBox="0 0 17 17" draw:type="non-primitive" draw:enhanced-path="M 4 0  L 16 0  L 12 16  L 0 16  L 4 0  N"/>
            </draw:custom-shape>
            <draw:custom-shape draw:style-name="gr494" draw:text-style-name="P74" draw:layer="layout" svg:width="0.09cm" svg:height="0.072cm" svg:x="15.945cm" svg:y="16.543cm">
              <text:p/>
              <draw:enhanced-geometry svg:viewBox="0 0 21 17" draw:type="non-primitive" draw:enhanced-path="M 0 0  L 20 0  L 20 16  L 0 16  L 0 0  N"/>
            </draw:custom-shape>
            <draw:custom-shape draw:style-name="gr494" draw:text-style-name="P74" draw:layer="layout" svg:width="0.081cm" svg:height="0.072cm" svg:x="16.136cm" svg:y="16.543cm">
              <text:p/>
              <draw:enhanced-geometry svg:viewBox="0 0 19 17" draw:type="non-primitive" draw:enhanced-path="M 0 0  L 17 0  L 18 16  L 0 16  L 0 0  N"/>
            </draw:custom-shape>
            <draw:line draw:style-name="gr495" draw:text-style-name="P14" draw:layer="layout" svg:x1="15.825cm" svg:y1="16.612cm" svg:x2="15.872cm" svg:y2="16.612cm">
              <text:p/>
            </draw:line>
            <draw:line draw:style-name="gr495" draw:text-style-name="P14" draw:layer="layout" svg:x1="15.756cm" svg:y1="16.612cm" svg:x2="15.812cm" svg:y2="16.612cm">
              <text:p/>
            </draw:line>
            <draw:line draw:style-name="gr495" draw:text-style-name="P14" draw:layer="layout" svg:x1="16.045cm" svg:y1="16.612cm" svg:x2="16.066cm" svg:y2="16.612cm">
              <text:p/>
            </draw:line>
            <draw:line draw:style-name="gr495" draw:text-style-name="P14" draw:layer="layout" svg:x1="16.071cm" svg:y1="16.615cm" svg:x2="16.118cm" svg:y2="16.615cm">
              <text:p/>
            </draw:line>
            <draw:g draw:style-name="gr1">
              <draw:line draw:style-name="gr495" draw:text-style-name="P14" draw:layer="layout" svg:x1="16.136cm" svg:y1="16.573cm" svg:x2="16.217cm" svg:y2="16.573cm">
                <text:p/>
              </draw:line>
              <draw:line draw:style-name="gr495" draw:text-style-name="P14" draw:layer="layout" svg:x1="16.152cm" svg:y1="16.585cm" svg:x2="16.216cm" svg:y2="16.585cm">
                <text:p/>
              </draw:line>
              <draw:line draw:style-name="gr495" draw:text-style-name="P14" draw:layer="layout" svg:x1="16.152cm" svg:y1="16.615cm" svg:x2="16.221cm" svg:y2="16.615cm">
                <text:p/>
              </draw:line>
            </draw:g>
            <draw:line draw:style-name="gr495" draw:text-style-name="P14" draw:layer="layout" svg:x1="16.248cm" svg:y1="16.56cm" svg:x2="16.308cm" svg:y2="16.56cm">
              <text:p/>
            </draw:line>
            <draw:custom-shape draw:style-name="gr496" draw:text-style-name="P35" draw:layer="layout" svg:width="0.034cm" svg:height="0.033cm" svg:x="16.3cm" svg:y="16.415cm">
              <text:p/>
              <draw:enhanced-geometry svg:viewBox="0 0 21600 21600" draw:type="rectangle" draw:enhanced-path="M 0 0 L 21600 0 21600 21600 0 21600 0 0 Z N"/>
            </draw:custom-shape>
            <draw:custom-shape draw:style-name="gr497" draw:text-style-name="P31" draw:layer="layout" svg:width="0.332cm" svg:height="0.085cm" svg:x="15.933cm" svg:y="16.419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496" draw:text-style-name="P35" draw:layer="layout" svg:width="0.034cm" svg:height="0.034cm" svg:x="16.265cm" svg:y="16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16.265cm" svg:y="16.4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96" draw:text-style-name="P35" draw:layer="layout" svg:width="0.034cm" svg:height="0.033cm" svg:x="16.084cm" svg:y="16.419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6.084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78cm" svg:height="0.033cm" svg:x="16.049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6.063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6.131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6.265cm" svg:y="16.419cm">
              <text:p/>
              <draw:enhanced-geometry svg:viewBox="0 0 21600 21600" draw:type="rectangle" draw:enhanced-path="M 0 0 L 21600 0 21600 21600 0 21600 0 0 Z N"/>
            </draw:custom-shape>
            <draw:line draw:style-name="gr498" draw:text-style-name="P14" draw:layer="layout" svg:x1="15.993cm" svg:y1="16.406cm" svg:x2="15.993cm" svg:y2="16.521cm">
              <text:p/>
            </draw:line>
            <draw:line draw:style-name="gr498" draw:text-style-name="P14" draw:layer="layout" svg:x1="16.144cm" svg:y1="16.406cm" svg:x2="16.144cm" svg:y2="16.521cm">
              <text:p/>
            </draw:line>
            <draw:line draw:style-name="gr498" draw:text-style-name="P14" draw:layer="layout" svg:x1="15.916cm" svg:y1="16.406cm" svg:x2="15.782cm" svg:y2="16.406cm">
              <text:p/>
            </draw:line>
            <draw:line draw:style-name="gr498" draw:text-style-name="P14" draw:layer="layout" svg:x1="15.928cm" svg:y1="16.41cm" svg:x2="15.799cm" svg:y2="16.41cm">
              <text:p/>
            </draw:line>
            <draw:line draw:style-name="gr498" draw:text-style-name="P14" draw:layer="layout" svg:x1="15.928cm" svg:y1="16.432cm" svg:x2="15.799cm" svg:y2="16.432cm">
              <text:p/>
            </draw:line>
            <draw:line draw:style-name="gr498" draw:text-style-name="P14" draw:layer="layout" svg:x1="15.928cm" svg:y1="16.458cm" svg:x2="15.799cm" svg:y2="16.458cm">
              <text:p/>
            </draw:line>
            <draw:line draw:style-name="gr498" draw:text-style-name="P14" draw:layer="layout" svg:x1="15.928cm" svg:y1="16.483cm" svg:x2="15.799cm" svg:y2="16.483cm">
              <text:p/>
            </draw:line>
            <draw:line draw:style-name="gr498" draw:text-style-name="P14" draw:layer="layout" svg:x1="15.928cm" svg:y1="16.504cm" svg:x2="15.799cm" svg:y2="16.504cm">
              <text:p/>
            </draw:line>
            <draw:line draw:style-name="gr498" draw:text-style-name="P14" draw:layer="layout" svg:x1="15.8cm" svg:y1="16.53cm" svg:x2="16.299cm" svg:y2="16.53cm">
              <text:p/>
            </draw:line>
            <draw:line draw:style-name="gr498" draw:text-style-name="P14" draw:layer="layout" svg:x1="15.929cm" svg:y1="16.44cm" svg:x2="16.29cm" svg:y2="16.44cm">
              <text:p/>
            </draw:line>
            <draw:custom-shape draw:style-name="gr496" draw:text-style-name="P35" draw:layer="layout" svg:width="0.034cm" svg:height="0.033cm" svg:x="16.205cm" svg:y="16.458cm">
              <text:p/>
              <draw:enhanced-geometry svg:viewBox="0 0 21600 21600" draw:type="rectangle" draw:enhanced-path="M 0 0 L 21600 0 21600 21600 0 21600 0 0 Z N"/>
            </draw:custom-shape>
            <draw:custom-shape draw:style-name="gr499" draw:text-style-name="P79" draw:layer="layout" svg:width="0.268cm" svg:height="0.034cm" svg:x="15.89cm" svg:y="16.368cm">
              <text:p/>
              <draw:enhanced-geometry svg:viewBox="0 0 21600 21600" draw:type="rectangle" draw:enhanced-path="M 0 0 L 21600 0 21600 21600 0 21600 0 0 Z N"/>
            </draw:custom-shape>
            <draw:custom-shape draw:style-name="gr500" draw:text-style-name="P79" draw:layer="layout" svg:width="0.301cm" svg:height="0.067cm" svg:x="15.873cm" svg:y="16.279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510" draw:text-style-name="P74" draw:layer="layout" svg:width="0.492cm" svg:height="0.072cm" svg:x="17.82cm" svg:y="16.321cm">
              <text:p/>
              <draw:enhanced-geometry svg:viewBox="0 0 114 17" draw:type="non-primitive" draw:enhanced-path="M 0 16  L 113 16  L 101 0  L 12 0  L 0 16  N"/>
            </draw:custom-shape>
            <draw:custom-shape draw:style-name="gr479" draw:text-style-name="P93" draw:layer="layout" svg:width="0.034cm" svg:height="0.033cm" svg:x="18.208cm" svg:y="16.279cm">
              <text:p/>
              <draw:enhanced-geometry svg:viewBox="0 0 21600 21600" draw:type="rectangle" draw:enhanced-path="M 0 0 L 21600 0 21600 21600 0 21600 0 0 Z N"/>
            </draw:custom-shape>
            <draw:custom-shape draw:style-name="gr511" draw:text-style-name="P94" draw:layer="layout" svg:width="0.488cm" svg:height="0.171cm" svg:x="17.82cm" svg:y="16.389cm">
              <text:p/>
              <draw:enhanced-geometry svg:viewBox="0 0 21600 21600" draw:type="rectangle" draw:enhanced-path="M 0 0 L 21600 0 21600 21600 0 21600 0 0 Z N"/>
            </draw:custom-shape>
            <draw:custom-shape draw:style-name="gr528" draw:text-style-name="P72" draw:layer="layout" svg:width="0.682cm" svg:height="0.106cm" svg:x="17.743cm" svg:y="16.534cm">
              <text:p/>
              <draw:enhanced-geometry svg:viewBox="0 0 158 25" draw:type="non-primitive" draw:enhanced-path="M 0 24  L 157 24  L 147 0  L 11 0  L 0 24  N"/>
            </draw:custom-shape>
            <draw:custom-shape draw:style-name="gr513" draw:text-style-name="P79" draw:layer="layout" svg:width="0.642cm" svg:height="0.089cm" svg:x="17.764cm" svg:y="16.543cm">
              <text:p/>
              <draw:enhanced-geometry svg:viewBox="0 0 149 21" draw:type="non-primitive" draw:enhanced-path="M 8 0  L 0 20  L 148 20  L 141 0  N"/>
            </draw:custom-shape>
            <draw:custom-shape draw:style-name="gr483" draw:text-style-name="P72" draw:layer="layout" svg:width="0.103cm" svg:height="0.072cm" svg:x="18.256cm" svg:y="16.56cm">
              <text:p/>
              <draw:enhanced-geometry svg:viewBox="0 0 24 17" draw:type="non-primitive" draw:enhanced-path="M 0 0  L 21 0  L 23 16  L 0 16  L 0 0  N"/>
            </draw:custom-shape>
            <draw:line draw:style-name="gr484" draw:text-style-name="P14" draw:layer="layout" svg:x1="18.26cm" svg:y1="16.582cm" svg:x2="18.311cm" svg:y2="16.582cm">
              <text:p/>
            </draw:line>
            <draw:custom-shape draw:style-name="gr529" draw:text-style-name="P79" draw:layer="layout" svg:width="0.673cm" svg:height="0.067cm" svg:x="17.743cm" svg:y="16.633cm">
              <text:p/>
              <draw:enhanced-geometry svg:viewBox="0 0 21600 21600" draw:type="rectangle" draw:enhanced-path="M 0 0 L 21600 0 21600 21600 0 21600 0 0 Z N"/>
            </draw:custom-shape>
            <draw:custom-shape draw:style-name="gr486" draw:text-style-name="P95" draw:layer="layout" svg:width="0.322cm" svg:height="0.071cm" svg:x="17.898cm" svg:y="16.309cm">
              <text:p/>
              <draw:enhanced-geometry svg:viewBox="0 0 75 17" draw:type="non-primitive" draw:enhanced-path="M 0 16  L 74 16  L 69 0  L 4 0  L 0 16  N"/>
            </draw:custom-shape>
            <draw:custom-shape draw:style-name="gr487" draw:text-style-name="P79" draw:layer="layout" svg:width="0.16cm" svg:height="0.072cm" svg:x="17.979cm" svg:y="16.313cm">
              <text:p/>
              <draw:enhanced-geometry svg:viewBox="0 0 37 17" draw:type="non-primitive" draw:enhanced-path="M 0 9  L 0 0  L 36 0  L 36 9  L 36 9  L 36 11  L 35 11  L 34 12  L 33 12  L 32 12  L 30 14  L 29 14  L 28 14  L 26 16  L 24 16  L 23 16  L 21 16  L 19 16  L 17 16  L 14 16  L 12 16  L 10 16  L 9 14  L 7 14  L 5 14  L 4 14  L 3 12  L 1 12  L 1 11  L 0 11  L 0 11  L 0 9  L 0 9  N"/>
            </draw:custom-shape>
            <draw:custom-shape draw:style-name="gr515" draw:text-style-name="P94" draw:layer="layout" svg:width="0.345cm" svg:height="0.336cm" svg:x="17.884cm" svg:y="15.925cm">
              <text:p/>
              <draw:enhanced-geometry svg:viewBox="0 0 21600 21600" draw:type="rectangle" draw:enhanced-path="M 0 0 L 21600 0 21600 21600 0 21600 0 0 Z N"/>
            </draw:custom-shape>
            <draw:custom-shape draw:style-name="gr516" draw:text-style-name="P95" draw:layer="layout" svg:width="0.293cm" svg:height="0.29cm" svg:x="17.911cm" svg:y="15.946cm">
              <text:p/>
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0" draw:text-style-name="P96" draw:layer="layout" svg:width="0.259cm" svg:height="0.251cm" svg:x="17.932cm" svg:y="15.967cm">
              <text:p/>
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">
              <draw:line draw:style-name="gr491" draw:text-style-name="P14" draw:layer="layout" svg:x1="17.967cm" svg:y1="16.018cm" svg:x2="18.009cm" svg:y2="16.166cm">
                <text:p/>
              </draw:line>
              <draw:line draw:style-name="gr491" draw:text-style-name="P14" draw:layer="layout" svg:x1="17.993cm" svg:y1="16.01cm" svg:x2="18.065cm" svg:y2="16.206cm">
                <text:p/>
              </draw:line>
            </draw:g>
            <draw:custom-shape draw:style-name="gr492" draw:text-style-name="P72" draw:layer="layout" svg:width="0.09cm" svg:height="0.072cm" svg:x="17.868cm" svg:y="16.543cm">
              <text:p/>
              <draw:enhanced-geometry svg:viewBox="0 0 21 17" draw:type="non-primitive" draw:enhanced-path="M 0 0  L 20 0  L 19 16  L 0 16  L 0 0  N"/>
            </draw:custom-shape>
            <draw:custom-shape draw:style-name="gr492" draw:text-style-name="P72" draw:layer="layout" svg:width="0.086cm" svg:height="0.072cm" svg:x="18.066cm" svg:y="16.543cm">
              <text:p/>
              <draw:enhanced-geometry svg:viewBox="0 0 20 17" draw:type="non-primitive" draw:enhanced-path="M 0 0  L 19 0  L 19 16  L 0 16  L 0 0  N"/>
            </draw:custom-shape>
            <draw:line draw:style-name="gr493" draw:text-style-name="P14" draw:layer="layout" svg:x1="17.837cm" svg:y1="16.569cm" svg:x2="18.104cm" svg:y2="16.569cm">
              <text:p/>
            </draw:line>
            <draw:line draw:style-name="gr493" draw:text-style-name="P14" draw:layer="layout" svg:x1="17.846cm" svg:y1="16.582cm" svg:x2="18.121cm" svg:y2="16.582cm">
              <text:p/>
            </draw:line>
            <draw:line draw:style-name="gr493" draw:text-style-name="P14" draw:layer="layout" svg:x1="17.85cm" svg:y1="16.594cm" svg:x2="18.082cm" svg:y2="16.594cm">
              <text:p/>
            </draw:line>
            <draw:line draw:style-name="gr493" draw:text-style-name="P14" draw:layer="layout" svg:x1="17.807cm" svg:y1="16.573cm" svg:x2="17.828cm" svg:y2="16.573cm">
              <text:p/>
            </draw:line>
            <draw:line draw:style-name="gr493" draw:text-style-name="P14" draw:layer="layout" svg:x1="17.807cm" svg:y1="16.585cm" svg:x2="17.819cm" svg:y2="16.585cm">
              <text:p/>
            </draw:line>
            <draw:line draw:style-name="gr493" draw:text-style-name="P14" draw:layer="layout" svg:x1="17.898cm" svg:y1="16.612cm" svg:x2="18.057cm" svg:y2="16.612cm">
              <text:p/>
            </draw:line>
            <draw:line draw:style-name="gr493" draw:text-style-name="P14" draw:layer="layout" svg:x1="18.122cm" svg:y1="16.569cm" svg:x2="18.156cm" svg:y2="16.569cm">
              <text:p/>
            </draw:line>
            <draw:line draw:style-name="gr493" draw:text-style-name="P14" draw:layer="layout" svg:x1="18.131cm" svg:y1="16.582cm" svg:x2="18.156cm" svg:y2="16.582cm">
              <text:p/>
            </draw:line>
            <draw:line draw:style-name="gr493" draw:text-style-name="P14" draw:layer="layout" svg:x1="18.105cm" svg:y1="16.594cm" svg:x2="18.156cm" svg:y2="16.594cm">
              <text:p/>
            </draw:line>
            <draw:line draw:style-name="gr493" draw:text-style-name="P14" draw:layer="layout" svg:x1="18.278cm" svg:y1="16.573cm" svg:x2="18.346cm" svg:y2="16.573cm">
              <text:p/>
            </draw:line>
            <draw:line draw:style-name="gr493" draw:text-style-name="P14" draw:layer="layout" svg:x1="18.278cm" svg:y1="16.594cm" svg:x2="18.321cm" svg:y2="16.594cm">
              <text:p/>
            </draw:line>
            <draw:line draw:style-name="gr493" draw:text-style-name="P14" draw:layer="layout" svg:x1="18.278cm" svg:y1="16.615cm" svg:x2="18.329cm" svg:y2="16.615cm">
              <text:p/>
            </draw:line>
            <draw:line draw:style-name="gr493" draw:text-style-name="P14" draw:layer="layout" svg:x1="18.325cm" svg:y1="16.585cm" svg:x2="18.36cm" svg:y2="16.585cm">
              <text:p/>
            </draw:line>
            <draw:line draw:style-name="gr493" draw:text-style-name="P14" draw:layer="layout" svg:x1="18.334cm" svg:y1="16.612cm" svg:x2="18.368cm" svg:y2="16.612cm">
              <text:p/>
            </draw:line>
            <draw:custom-shape draw:style-name="gr494" draw:text-style-name="P74" draw:layer="layout" svg:width="0.073cm" svg:height="0.072cm" svg:x="17.82cm" svg:y="16.543cm">
              <text:p/>
              <draw:enhanced-geometry svg:viewBox="0 0 17 17" draw:type="non-primitive" draw:enhanced-path="M 4 0  L 16 0  L 12 16  L 0 16  L 4 0  N"/>
            </draw:custom-shape>
            <draw:custom-shape draw:style-name="gr494" draw:text-style-name="P74" draw:layer="layout" svg:width="0.082cm" svg:height="0.072cm" svg:x="17.979cm" svg:y="16.543cm">
              <text:p/>
              <draw:enhanced-geometry svg:viewBox="0 0 19 17" draw:type="non-primitive" draw:enhanced-path="M 0 0  L 18 0  L 18 16  L 0 16  L 0 0  N"/>
            </draw:custom-shape>
            <draw:custom-shape draw:style-name="gr494" draw:text-style-name="P74" draw:layer="layout" svg:width="0.073cm" svg:height="0.072cm" svg:x="18.174cm" svg:y="16.543cm">
              <text:p/>
              <draw:enhanced-geometry svg:viewBox="0 0 17 17" draw:type="non-primitive" draw:enhanced-path="M 0 0  L 16 0  L 16 16  L 0 16  L 0 0  N"/>
            </draw:custom-shape>
            <draw:line draw:style-name="gr495" draw:text-style-name="P14" draw:layer="layout" svg:x1="17.855cm" svg:y1="16.612cm" svg:x2="17.898cm" svg:y2="16.612cm">
              <text:p/>
            </draw:line>
            <draw:line draw:style-name="gr495" draw:text-style-name="P14" draw:layer="layout" svg:x1="17.798cm" svg:y1="16.612cm" svg:x2="17.837cm" svg:y2="16.612cm">
              <text:p/>
            </draw:line>
            <draw:line draw:style-name="gr495" draw:text-style-name="P14" draw:layer="layout" svg:x1="18.066cm" svg:y1="16.612cm" svg:x2="18.096cm" svg:y2="16.612cm">
              <text:p/>
            </draw:line>
            <draw:line draw:style-name="gr495" draw:text-style-name="P14" draw:layer="layout" svg:x1="18.105cm" svg:y1="16.615cm" svg:x2="18.156cm" svg:y2="16.615cm">
              <text:p/>
            </draw:line>
            <draw:g draw:style-name="gr1">
              <draw:line draw:style-name="gr495" draw:text-style-name="P14" draw:layer="layout" svg:x1="18.174cm" svg:y1="16.573cm" svg:x2="18.238cm" svg:y2="16.573cm">
                <text:p/>
              </draw:line>
              <draw:line draw:style-name="gr495" draw:text-style-name="P14" draw:layer="layout" svg:x1="18.177cm" svg:y1="16.585cm" svg:x2="18.237cm" svg:y2="16.585cm">
                <text:p/>
              </draw:line>
              <draw:line draw:style-name="gr495" draw:text-style-name="P14" draw:layer="layout" svg:x1="18.177cm" svg:y1="16.615cm" svg:x2="18.246cm" svg:y2="16.615cm">
                <text:p/>
              </draw:line>
            </draw:g>
            <draw:line draw:style-name="gr495" draw:text-style-name="P14" draw:layer="layout" svg:x1="18.278cm" svg:y1="16.56cm" svg:x2="18.346cm" svg:y2="16.56cm">
              <text:p/>
            </draw:line>
            <draw:custom-shape draw:style-name="gr496" draw:text-style-name="P35" draw:layer="layout" svg:width="0.035cm" svg:height="0.033cm" svg:x="18.325cm" svg:y="16.415cm">
              <text:p/>
              <draw:enhanced-geometry svg:viewBox="0 0 21600 21600" draw:type="rectangle" draw:enhanced-path="M 0 0 L 21600 0 21600 21600 0 21600 0 0 Z N"/>
            </draw:custom-shape>
            <draw:custom-shape draw:style-name="gr497" draw:text-style-name="P31" draw:layer="layout" svg:width="0.327cm" svg:height="0.085cm" svg:x="17.963cm" svg:y="16.419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496" draw:text-style-name="P35" draw:layer="layout" svg:width="0.035cm" svg:height="0.034cm" svg:x="18.294cm" svg:y="16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8.294cm" svg:y="16.4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96" draw:text-style-name="P35" draw:layer="layout" svg:width="0.034cm" svg:height="0.033cm" svg:x="18.113cm" svg:y="16.419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8.113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82cm" svg:height="0.033cm" svg:x="18.074cm" svg:y="16.428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5cm" svg:height="0.033cm" svg:x="18.083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4cm" svg:height="0.033cm" svg:x="18.161cm" svg:y="16.445cm">
              <text:p/>
              <draw:enhanced-geometry svg:viewBox="0 0 21600 21600" draw:type="rectangle" draw:enhanced-path="M 0 0 L 21600 0 21600 21600 0 21600 0 0 Z N"/>
            </draw:custom-shape>
            <draw:custom-shape draw:style-name="gr496" draw:text-style-name="P35" draw:layer="layout" svg:width="0.035cm" svg:height="0.033cm" svg:x="18.294cm" svg:y="16.419cm">
              <text:p/>
              <draw:enhanced-geometry svg:viewBox="0 0 21600 21600" draw:type="rectangle" draw:enhanced-path="M 0 0 L 21600 0 21600 21600 0 21600 0 0 Z N"/>
            </draw:custom-shape>
            <draw:line draw:style-name="gr498" draw:text-style-name="P14" draw:layer="layout" svg:x1="18.018cm" svg:y1="16.406cm" svg:x2="18.018cm" svg:y2="16.521cm">
              <text:p/>
            </draw:line>
            <draw:line draw:style-name="gr498" draw:text-style-name="P14" draw:layer="layout" svg:x1="18.174cm" svg:y1="16.406cm" svg:x2="18.174cm" svg:y2="16.521cm">
              <text:p/>
            </draw:line>
            <draw:line draw:style-name="gr498" draw:text-style-name="P14" draw:layer="layout" svg:x1="17.944cm" svg:y1="16.406cm" svg:x2="17.819cm" svg:y2="16.406cm">
              <text:p/>
            </draw:line>
            <draw:line draw:style-name="gr498" draw:text-style-name="P14" draw:layer="layout" svg:x1="17.965cm" svg:y1="16.41cm" svg:x2="17.828cm" svg:y2="16.41cm">
              <text:p/>
            </draw:line>
            <draw:line draw:style-name="gr498" draw:text-style-name="P14" draw:layer="layout" svg:x1="17.965cm" svg:y1="16.432cm" svg:x2="17.828cm" svg:y2="16.432cm">
              <text:p/>
            </draw:line>
            <draw:line draw:style-name="gr498" draw:text-style-name="P14" draw:layer="layout" svg:x1="17.965cm" svg:y1="16.458cm" svg:x2="17.828cm" svg:y2="16.458cm">
              <text:p/>
            </draw:line>
            <draw:line draw:style-name="gr498" draw:text-style-name="P14" draw:layer="layout" svg:x1="17.965cm" svg:y1="16.483cm" svg:x2="17.828cm" svg:y2="16.483cm">
              <text:p/>
            </draw:line>
            <draw:line draw:style-name="gr498" draw:text-style-name="P14" draw:layer="layout" svg:x1="17.965cm" svg:y1="16.504cm" svg:x2="17.828cm" svg:y2="16.504cm">
              <text:p/>
            </draw:line>
            <draw:line draw:style-name="gr498" draw:text-style-name="P14" draw:layer="layout" svg:x1="17.829cm" svg:y1="16.53cm" svg:x2="18.325cm" svg:y2="16.53cm">
              <text:p/>
            </draw:line>
            <draw:line draw:style-name="gr498" draw:text-style-name="P14" draw:layer="layout" svg:x1="17.967cm" svg:y1="16.44cm" svg:x2="18.312cm" svg:y2="16.44cm">
              <text:p/>
            </draw:line>
            <draw:custom-shape draw:style-name="gr496" draw:text-style-name="P35" draw:layer="layout" svg:width="0.034cm" svg:height="0.033cm" svg:x="18.239cm" svg:y="16.458cm">
              <text:p/>
              <draw:enhanced-geometry svg:viewBox="0 0 21600 21600" draw:type="rectangle" draw:enhanced-path="M 0 0 L 21600 0 21600 21600 0 21600 0 0 Z N"/>
            </draw:custom-shape>
            <draw:custom-shape draw:style-name="gr499" draw:text-style-name="P79" draw:layer="layout" svg:width="0.284cm" svg:height="0.034cm" svg:x="17.915cm" svg:y="16.368cm">
              <text:p/>
              <draw:enhanced-geometry svg:viewBox="0 0 21600 21600" draw:type="rectangle" draw:enhanced-path="M 0 0 L 21600 0 21600 21600 0 21600 0 0 Z N"/>
            </draw:custom-shape>
            <draw:custom-shape draw:style-name="gr500" draw:text-style-name="P79" draw:layer="layout" svg:width="0.318cm" svg:height="0.067cm" svg:x="17.898cm" svg:y="16.279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530" draw:text-style-name="P79" draw:layer="layout" svg:width="0.367cm" svg:height="0.853cm" svg:x="21.569cm" svg:y="15.797cm">
              <text:p/>
              <draw:enhanced-geometry svg:viewBox="0 0 21600 21600" draw:type="rectangle" draw:enhanced-path="M 0 0 L 21600 0 21600 21600 0 21600 0 0 Z N"/>
            </draw:custom-shape>
            <draw:custom-shape draw:style-name="gr531" draw:text-style-name="P98" draw:layer="layout" svg:width="0.078cm" svg:height="0.853cm" svg:x="21.857cm" svg:y="15.797cm">
              <text:p/>
              <draw:enhanced-geometry svg:viewBox="0 0 21600 21600" draw:type="rectangle" draw:enhanced-path="M 0 0 L 21600 0 21600 21600 0 21600 0 0 Z N"/>
            </draw:custom-shape>
            <draw:line draw:style-name="gr532" draw:text-style-name="P14" draw:layer="layout" svg:x1="21.918cm" svg:y1="15.797cm" svg:x2="21.918cm" svg:y2="16.65cm">
              <text:p/>
            </draw:line>
            <draw:g draw:style-name="gr1">
              <draw:line draw:style-name="gr533" draw:text-style-name="P14" draw:layer="layout" svg:x1="21.569cm" svg:y1="16.24cm" svg:x2="21.849cm" svg:y2="16.24cm">
                <text:p/>
              </draw:line>
              <draw:line draw:style-name="gr533" draw:text-style-name="P14" draw:layer="layout" svg:x1="21.569cm" svg:y1="16.269cm" svg:x2="21.849cm" svg:y2="16.269cm">
                <text:p/>
              </draw:line>
              <draw:line draw:style-name="gr533" draw:text-style-name="P14" draw:layer="layout" svg:x1="21.569cm" svg:y1="16.303cm" svg:x2="21.849cm" svg:y2="16.303cm">
                <text:p/>
              </draw:line>
              <draw:line draw:style-name="gr533" draw:text-style-name="P14" draw:layer="layout" svg:x1="21.569cm" svg:y1="16.329cm" svg:x2="21.849cm" svg:y2="16.329cm">
                <text:p/>
              </draw:line>
              <draw:line draw:style-name="gr533" draw:text-style-name="P14" draw:layer="layout" svg:x1="21.569cm" svg:y1="16.358cm" svg:x2="21.849cm" svg:y2="16.358cm">
                <text:p/>
              </draw:line>
              <draw:line draw:style-name="gr533" draw:text-style-name="P14" draw:layer="layout" svg:x1="21.569cm" svg:y1="16.393cm" svg:x2="21.849cm" svg:y2="16.393cm">
                <text:p/>
              </draw:line>
              <draw:line draw:style-name="gr533" draw:text-style-name="P14" draw:layer="layout" svg:x1="21.569cm" svg:y1="16.427cm" svg:x2="21.849cm" svg:y2="16.427cm">
                <text:p/>
              </draw:line>
              <draw:line draw:style-name="gr533" draw:text-style-name="P14" draw:layer="layout" svg:x1="21.569cm" svg:y1="16.457cm" svg:x2="21.849cm" svg:y2="16.457cm">
                <text:p/>
              </draw:line>
              <draw:line draw:style-name="gr533" draw:text-style-name="P14" draw:layer="layout" svg:x1="21.569cm" svg:y1="16.482cm" svg:x2="21.849cm" svg:y2="16.482cm">
                <text:p/>
              </draw:line>
              <draw:line draw:style-name="gr533" draw:text-style-name="P14" draw:layer="layout" svg:x1="21.569cm" svg:y1="16.521cm" svg:x2="21.849cm" svg:y2="16.521cm">
                <text:p/>
              </draw:line>
              <draw:line draw:style-name="gr533" draw:text-style-name="P14" draw:layer="layout" svg:x1="21.569cm" svg:y1="16.546cm" svg:x2="21.849cm" svg:y2="16.546cm">
                <text:p/>
              </draw:line>
              <draw:line draw:style-name="gr533" draw:text-style-name="P14" draw:layer="layout" svg:x1="21.569cm" svg:y1="16.572cm" svg:x2="21.849cm" svg:y2="16.572cm">
                <text:p/>
              </draw:line>
              <draw:line draw:style-name="gr533" draw:text-style-name="P14" draw:layer="layout" svg:x1="21.569cm" svg:y1="16.611cm" svg:x2="21.849cm" svg:y2="16.611cm">
                <text:p/>
              </draw:line>
            </draw:g>
            <draw:line draw:style-name="gr534" draw:text-style-name="P14" draw:layer="layout" svg:x1="21.62cm" svg:y1="15.86cm" svg:x2="21.654cm" svg:y2="15.86cm">
              <text:p/>
            </draw:line>
          </draw:g>
          <draw:custom-shape draw:style-name="gr535" draw:text-style-name="P2" draw:layer="layout" svg:width="1.782cm" svg:height="1.387cm" svg:x="20.865cm" svg:y="15.528cm">
            <text:p/>
            <draw:enhanced-geometry svg:viewBox="0 0 21600 21600" draw:type="rectangle" draw:enhanced-path="M 0 0 L 21600 0 21600 21600 0 21600 0 0 Z N"/>
          </draw:custom-shape>
          <draw:custom-shape draw:style-name="gr536" draw:text-style-name="P16" draw:layer="layout" svg:width="9.084cm" svg:height="0.913cm" svg:x="13.564cm" svg:y="7.333cm">
            <text:p/>
            <draw:enhanced-geometry svg:viewBox="0 0 21600 21600" draw:type="rectangle" draw:enhanced-path="M 0 0 L 21600 0 21600 21600 0 21600 0 0 Z N"/>
          </draw:custom-shape>
          <draw:line draw:style-name="gr537" draw:text-style-name="P14" draw:layer="layout" svg:x1="14.907cm" svg:y1="7.435cm" svg:x2="16.102cm" svg:y2="8.126cm">
            <text:p/>
          </draw:line>
          <draw:line draw:style-name="gr538" draw:text-style-name="P14" draw:layer="layout" svg:x1="21.305cm" svg:y1="7.435cm" svg:x2="20.105cm" svg:y2="8.126cm">
            <text:p/>
          </draw:line>
          <draw:line draw:style-name="gr539" draw:text-style-name="P14" draw:layer="layout" svg:x1="17.018cm" svg:y1="7.418cm" svg:x2="17.557cm" svg:y2="8.126cm">
            <text:p/>
          </draw:line>
          <draw:line draw:style-name="gr540" draw:text-style-name="P14" draw:layer="layout" svg:x1="19.378cm" svg:y1="7.418cm" svg:x2="18.835cm" svg:y2="8.126cm">
            <text:p/>
          </draw:line>
          <draw:g draw:style-name="gr4">
            <draw:custom-shape draw:style-name="gr541" draw:text-style-name="P16" draw:layer="layout" svg:width="1.713cm" svg:height="1.229cm" svg:x="15.308cm" svg:y="4.657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542" draw:text-style-name="P74" draw:layer="layout" svg:width="0.659cm" svg:height="0.072cm" svg:x="15.799cm" svg:y="5.304cm">
                <text:p/>
                <draw:enhanced-geometry svg:viewBox="0 0 153 17" draw:type="non-primitive" draw:enhanced-path="M 0 16  L 152 16  L 137 0  L 15 0  L 0 16  N"/>
              </draw:custom-shape>
              <draw:custom-shape draw:style-name="gr479" draw:text-style-name="P93" draw:layer="layout" svg:width="0.034cm" svg:height="0.033cm" svg:x="16.317cm" svg:y="5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3" draw:text-style-name="P94" draw:layer="layout" svg:width="0.655cm" svg:height="0.162cm" svg:x="15.799cm" svg:y="5.36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4" draw:text-style-name="P72" draw:layer="layout" svg:width="0.923cm" svg:height="0.089cm" svg:x="15.705cm" svg:y="5.513cm">
                <text:p/>
                <draw:enhanced-geometry svg:viewBox="0 0 214 21" draw:type="non-primitive" draw:enhanced-path="M 0 20  L 213 20  L 200 0  L 15 0  L 0 20  N"/>
              </draw:custom-shape>
              <draw:custom-shape draw:style-name="gr545" draw:text-style-name="P79" draw:layer="layout" svg:width="0.872cm" svg:height="0.086cm" svg:x="15.73cm" svg:y="5.513cm">
                <text:p/>
                <draw:enhanced-geometry svg:viewBox="0 0 202 20" draw:type="non-primitive" draw:enhanced-path="M 11 0  L 0 19  L 201 19  L 191 0  N"/>
              </draw:custom-shape>
              <draw:custom-shape draw:style-name="gr483" draw:text-style-name="P72" draw:layer="layout" svg:width="0.12cm" svg:height="0.072cm" svg:x="16.403cm" svg:y="5.526cm">
                <text:p/>
                <draw:enhanced-geometry svg:viewBox="0 0 28 17" draw:type="non-primitive" draw:enhanced-path="M 0 0  L 24 0  L 27 16  L 0 16  L 0 0  N"/>
              </draw:custom-shape>
              <draw:line draw:style-name="gr484" draw:text-style-name="P14" draw:layer="layout" svg:x1="16.403cm" svg:y1="5.551cm" svg:x2="16.458cm" svg:y2="5.551cm">
                <text:p/>
              </draw:line>
              <draw:custom-shape draw:style-name="gr546" draw:text-style-name="P79" draw:layer="layout" svg:width="0.914cm" svg:height="0.067cm" svg:x="15.705cm" svg:y="5.5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6" draw:text-style-name="P95" draw:layer="layout" svg:width="0.426cm" svg:height="0.072cm" svg:x="15.916cm" svg:y="5.291cm">
                <text:p/>
                <draw:enhanced-geometry svg:viewBox="0 0 99 17" draw:type="non-primitive" draw:enhanced-path="M 0 16  L 98 16  L 92 0  L 5 0  L 0 16  N"/>
              </draw:custom-shape>
              <draw:custom-shape draw:style-name="gr487" draw:text-style-name="P79" draw:layer="layout" svg:width="0.229cm" svg:height="0.072cm" svg:x="16.015cm" svg:y="5.295cm">
                <text:p/>
                <draw:enhanced-geometry svg:viewBox="0 0 53 17" draw:type="non-primitive" draw:enhanced-path="M 0 8  L 0 0  L 52 0  L 52 8  L 52 10  L 51 10  L 50 10  L 49 12  L 47 12  L 46 14  L 44 14  L 42 14  L 40 14  L 38 16  L 36 16  L 33 16  L 31 16  L 28 16  L 25 16  L 21 16  L 18 16  L 14 16  L 13 14  L 11 14  L 8 14  L 6 14  L 4 12  L 2 12  L 1 12  L 1 10  L 0 10  L 0 10  L 0 8  N"/>
              </draw:custom-shape>
              <draw:custom-shape draw:style-name="gr488" draw:text-style-name="P94" draw:layer="layout" svg:width="0.479cm" svg:height="0.307cm" svg:x="15.889cm" svg:y="4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489" draw:text-style-name="P95" draw:layer="layout" svg:width="0.397cm" svg:height="0.264cm" svg:x="15.933cm" svg:y="4.963cm">
                <text:p/>
  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90" draw:text-style-name="P96" draw:layer="layout" svg:width="0.345cm" svg:height="0.234cm" svg:x="15.954cm" svg:y="4.98cm">
                <text:p/>
  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 draw:style-name="gr1">
                <draw:line draw:style-name="gr491" draw:text-style-name="P14" draw:layer="layout" svg:x1="16.002cm" svg:y1="5.035cm" svg:x2="16.066cm" svg:y2="5.162cm">
                  <text:p/>
                </draw:line>
                <draw:line draw:style-name="gr491" draw:text-style-name="P14" draw:layer="layout" svg:x1="16.032cm" svg:y1="5.019cm" svg:x2="16.147cm" svg:y2="5.193cm">
                  <text:p/>
                </draw:line>
              </draw:g>
              <draw:custom-shape draw:style-name="gr492" draw:text-style-name="P72" draw:layer="layout" svg:width="0.12cm" svg:height="0.072cm" svg:x="15.873cm" svg:y="5.513cm">
                <text:p/>
                <draw:enhanced-geometry svg:viewBox="0 0 28 17" draw:type="non-primitive" draw:enhanced-path="M 0 0  L 27 0  L 26 16  L 0 16  L 0 0  N"/>
              </draw:custom-shape>
              <draw:custom-shape draw:style-name="gr492" draw:text-style-name="P72" draw:layer="layout" svg:width="0.103cm" svg:height="0.072cm" svg:x="16.149cm" svg:y="5.513cm">
                <text:p/>
                <draw:enhanced-geometry svg:viewBox="0 0 24 17" draw:type="non-primitive" draw:enhanced-path="M 0 0  L 23 0  L 23 16  L 0 16  L 0 0  N"/>
              </draw:custom-shape>
              <draw:line draw:style-name="gr493" draw:text-style-name="P14" draw:layer="layout" svg:x1="15.838cm" svg:y1="5.539cm" svg:x2="16.187cm" svg:y2="5.539cm">
                <text:p/>
              </draw:line>
              <draw:line draw:style-name="gr493" draw:text-style-name="P14" draw:layer="layout" svg:x1="15.85cm" svg:y1="5.551cm" svg:x2="16.208cm" svg:y2="5.551cm">
                <text:p/>
              </draw:line>
              <draw:line draw:style-name="gr493" draw:text-style-name="P14" draw:layer="layout" svg:x1="15.85cm" svg:y1="5.564cm" svg:x2="16.17cm" svg:y2="5.564cm">
                <text:p/>
              </draw:line>
              <draw:line draw:style-name="gr493" draw:text-style-name="P14" draw:layer="layout" svg:x1="15.791cm" svg:y1="5.543cm" svg:x2="15.821cm" svg:y2="5.543cm">
                <text:p/>
              </draw:line>
              <draw:line draw:style-name="gr493" draw:text-style-name="P14" draw:layer="layout" svg:x1="15.791cm" svg:y1="5.555cm" svg:x2="15.812cm" svg:y2="5.555cm">
                <text:p/>
              </draw:line>
              <draw:line draw:style-name="gr493" draw:text-style-name="P14" draw:layer="layout" svg:x1="15.916cm" svg:y1="5.573cm" svg:x2="16.127cm" svg:y2="5.573cm">
                <text:p/>
              </draw:line>
              <draw:line draw:style-name="gr493" draw:text-style-name="P14" draw:layer="layout" svg:x1="16.209cm" svg:y1="5.539cm" svg:x2="16.256cm" svg:y2="5.539cm">
                <text:p/>
              </draw:line>
              <draw:line draw:style-name="gr493" draw:text-style-name="P14" draw:layer="layout" svg:x1="16.222cm" svg:y1="5.551cm" svg:x2="16.256cm" svg:y2="5.551cm">
                <text:p/>
              </draw:line>
              <draw:line draw:style-name="gr493" draw:text-style-name="P14" draw:layer="layout" svg:x1="16.187cm" svg:y1="5.564cm" svg:x2="16.256cm" svg:y2="5.564cm">
                <text:p/>
              </draw:line>
              <draw:line draw:style-name="gr493" draw:text-style-name="P14" draw:layer="layout" svg:x1="16.425cm" svg:y1="5.543cm" svg:x2="16.516cm" svg:y2="5.543cm">
                <text:p/>
              </draw:line>
              <draw:line draw:style-name="gr493" draw:text-style-name="P14" draw:layer="layout" svg:x1="16.425cm" svg:y1="5.564cm" svg:x2="16.468cm" svg:y2="5.564cm">
                <text:p/>
              </draw:line>
              <draw:line draw:style-name="gr493" draw:text-style-name="P14" draw:layer="layout" svg:x1="16.425cm" svg:y1="5.577cm" svg:x2="16.498cm" svg:y2="5.577cm">
                <text:p/>
              </draw:line>
              <draw:line draw:style-name="gr493" draw:text-style-name="P14" draw:layer="layout" svg:x1="16.494cm" svg:y1="5.555cm" svg:x2="16.528cm" svg:y2="5.555cm">
                <text:p/>
              </draw:line>
              <draw:line draw:style-name="gr493" draw:text-style-name="P14" draw:layer="layout" svg:x1="16.502cm" svg:y1="5.573cm" svg:x2="16.532cm" svg:y2="5.573cm">
                <text:p/>
              </draw:line>
              <draw:custom-shape draw:style-name="gr494" draw:text-style-name="P74" draw:layer="layout" svg:width="0.077cm" svg:height="0.072cm" svg:x="15.799cm" svg:y="5.513cm">
                <text:p/>
                <draw:enhanced-geometry svg:viewBox="0 0 18 17" draw:type="non-primitive" draw:enhanced-path="M 4 0  L 17 0  L 13 16  L 0 16  L 4 0  N"/>
              </draw:custom-shape>
              <draw:custom-shape draw:style-name="gr494" draw:text-style-name="P74" draw:layer="layout" svg:width="0.116cm" svg:height="0.072cm" svg:x="16.015cm" svg:y="5.513cm">
                <text:p/>
                <draw:enhanced-geometry svg:viewBox="0 0 27 17" draw:type="non-primitive" draw:enhanced-path="M 0 0  L 26 0  L 26 16  L 0 16  L 0 0  N"/>
              </draw:custom-shape>
              <draw:custom-shape draw:style-name="gr494" draw:text-style-name="P74" draw:layer="layout" svg:width="0.103cm" svg:height="0.072cm" svg:x="16.269cm" svg:y="5.513cm">
                <text:p/>
                <draw:enhanced-geometry svg:viewBox="0 0 24 17" draw:type="non-primitive" draw:enhanced-path="M 0 0  L 22 0  L 23 16  L 0 16  L 0 0  N"/>
              </draw:custom-shape>
              <draw:line draw:style-name="gr495" draw:text-style-name="P14" draw:layer="layout" svg:x1="15.855cm" svg:y1="5.573cm" svg:x2="15.915cm" svg:y2="5.573cm">
                <text:p/>
              </draw:line>
              <draw:line draw:style-name="gr495" draw:text-style-name="P14" draw:layer="layout" svg:x1="15.773cm" svg:y1="5.573cm" svg:x2="15.837cm" svg:y2="5.573cm">
                <text:p/>
              </draw:line>
              <draw:line draw:style-name="gr495" draw:text-style-name="P14" draw:layer="layout" svg:x1="16.131cm" svg:y1="5.573cm" svg:x2="16.174cm" svg:y2="5.573cm">
                <text:p/>
              </draw:line>
              <draw:line draw:style-name="gr495" draw:text-style-name="P14" draw:layer="layout" svg:x1="16.183cm" svg:y1="5.577cm" svg:x2="16.256cm" svg:y2="5.577cm">
                <text:p/>
              </draw:line>
              <draw:g draw:style-name="gr1">
                <draw:line draw:style-name="gr495" draw:text-style-name="P14" draw:layer="layout" svg:x1="16.269cm" svg:y1="5.543cm" svg:x2="16.385cm" svg:y2="5.543cm">
                  <text:p/>
                </draw:line>
                <draw:line draw:style-name="gr495" draw:text-style-name="P14" draw:layer="layout" svg:x1="16.286cm" svg:y1="5.555cm" svg:x2="16.384cm" svg:y2="5.555cm">
                  <text:p/>
                </draw:line>
                <draw:line draw:style-name="gr495" draw:text-style-name="P14" draw:layer="layout" svg:x1="16.286cm" svg:y1="5.576cm" svg:x2="16.384cm" svg:y2="5.576cm">
                  <text:p/>
                </draw:line>
              </draw:g>
              <draw:line draw:style-name="gr495" draw:text-style-name="P14" draw:layer="layout" svg:x1="16.425cm" svg:y1="5.53cm" svg:x2="16.516cm" svg:y2="5.53cm">
                <text:p/>
              </draw:line>
              <draw:custom-shape draw:style-name="gr496" draw:text-style-name="P35" draw:layer="layout" svg:width="0.035cm" svg:height="0.033cm" svg:x="16.472cm" svg:y="5.3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7" draw:text-style-name="P31" draw:layer="layout" svg:width="0.435cm" svg:height="0.077cm" svg:x="16.002cm" svg:y="5.398cm">
                <text:p/>
                <draw:enhanced-geometry svg:viewBox="0 0 21600 21600" draw:type="rectangle" draw:enhanced-path="M 0 0 L 21600 0 21600 21600 0 21600 0 0 Z N"/>
              </draw:custom-shape>
              <draw:g draw:style-name="gr4">
                <draw:custom-shape draw:style-name="gr496" draw:text-style-name="P35" draw:layer="layout" svg:width="0.034cm" svg:height="0.033cm" svg:x="16.443cm" svg:y="5.43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96" draw:text-style-name="P35" draw:layer="layout" svg:width="0.034cm" svg:height="0.034cm" svg:x="16.443cm" svg:y="5.4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96" draw:text-style-name="P35" draw:layer="layout" svg:width="0.034cm" svg:height="0.034cm" svg:x="16.192cm" svg:y="5.39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16.192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116cm" svg:height="0.033cm" svg:x="16.144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6.166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6.26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4cm" svg:x="16.443cm" svg:y="5.398cm">
                <text:p/>
                <draw:enhanced-geometry svg:viewBox="0 0 21600 21600" draw:type="rectangle" draw:enhanced-path="M 0 0 L 21600 0 21600 21600 0 21600 0 0 Z N"/>
              </draw:custom-shape>
              <draw:line draw:style-name="gr498" draw:text-style-name="P14" draw:layer="layout" svg:x1="16.079cm" svg:y1="5.385cm" svg:x2="16.079cm" svg:y2="5.491cm">
                <text:p/>
              </draw:line>
              <draw:line draw:style-name="gr498" draw:text-style-name="P14" draw:layer="layout" svg:x1="16.278cm" svg:y1="5.385cm" svg:x2="16.278cm" svg:y2="5.491cm">
                <text:p/>
              </draw:line>
              <draw:line draw:style-name="gr498" draw:text-style-name="P14" draw:layer="layout" svg:x1="15.983cm" svg:y1="5.385cm" svg:x2="15.799cm" svg:y2="5.385cm">
                <text:p/>
              </draw:line>
              <draw:line draw:style-name="gr498" draw:text-style-name="P14" draw:layer="layout" svg:x1="16.001cm" svg:y1="5.385cm" svg:x2="15.82cm" svg:y2="5.385cm">
                <text:p/>
              </draw:line>
              <draw:line draw:style-name="gr498" draw:text-style-name="P14" draw:layer="layout" svg:x1="16.001cm" svg:y1="5.415cm" svg:x2="15.82cm" svg:y2="5.415cm">
                <text:p/>
              </draw:line>
              <draw:line draw:style-name="gr498" draw:text-style-name="P14" draw:layer="layout" svg:x1="16.001cm" svg:y1="5.433cm" svg:x2="15.82cm" svg:y2="5.433cm">
                <text:p/>
              </draw:line>
              <draw:line draw:style-name="gr498" draw:text-style-name="P14" draw:layer="layout" svg:x1="16.001cm" svg:y1="5.462cm" svg:x2="15.82cm" svg:y2="5.462cm">
                <text:p/>
              </draw:line>
              <draw:line draw:style-name="gr498" draw:text-style-name="P14" draw:layer="layout" svg:x1="16.001cm" svg:y1="5.475cm" svg:x2="15.82cm" svg:y2="5.475cm">
                <text:p/>
              </draw:line>
              <draw:line draw:style-name="gr498" draw:text-style-name="P14" draw:layer="layout" svg:x1="15.821cm" svg:y1="5.5cm" svg:x2="16.494cm" svg:y2="5.5cm">
                <text:p/>
              </draw:line>
              <draw:line draw:style-name="gr498" draw:text-style-name="P14" draw:layer="layout" svg:x1="16.002cm" svg:y1="5.424cm" svg:x2="16.459cm" svg:y2="5.424cm">
                <text:p/>
              </draw:line>
              <draw:custom-shape draw:style-name="gr496" draw:text-style-name="P35" draw:layer="layout" svg:width="0.034cm" svg:height="0.034cm" svg:x="16.36cm" svg:y="5.4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9" draw:text-style-name="P79" draw:layer="layout" svg:width="0.388cm" svg:height="0.034cm" svg:x="15.933cm" svg:y="5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500" draw:text-style-name="P79" draw:layer="layout" svg:width="0.422cm" svg:height="0.067cm" svg:x="15.916cm" svg:y="5.2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style-name="gr4">
            <draw:custom-shape draw:style-name="gr477" draw:text-style-name="P16" draw:layer="layout" svg:width="1.515cm" svg:height="1.229cm" svg:x="17.251cm" svg:y="4.657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547" draw:text-style-name="P74" draw:layer="layout" svg:width="0.582cm" svg:height="0.072cm" svg:x="17.687cm" svg:y="5.304cm">
                <text:p/>
                <draw:enhanced-geometry svg:viewBox="0 0 135 17" draw:type="non-primitive" draw:enhanced-path="M 0 16  L 134 16  L 120 0  L 13 0  L 0 16  N"/>
              </draw:custom-shape>
              <draw:custom-shape draw:style-name="gr479" draw:text-style-name="P93" draw:layer="layout" svg:width="0.035cm" svg:height="0.033cm" svg:x="18.147cm" svg:y="5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8" draw:text-style-name="P94" draw:layer="layout" svg:width="0.577cm" svg:height="0.162cm" svg:x="17.687cm" svg:y="5.368cm">
                <text:p/>
                <draw:enhanced-geometry svg:viewBox="0 0 21600 21600" draw:type="rectangle" draw:enhanced-path="M 0 0 L 21600 0 21600 21600 0 21600 0 0 Z N"/>
              </draw:custom-shape>
              <draw:custom-shape draw:style-name="gr481" draw:text-style-name="P72" draw:layer="layout" svg:width="0.82cm" svg:height="0.089cm" svg:x="17.6cm" svg:y="5.513cm">
                <text:p/>
                <draw:enhanced-geometry svg:viewBox="0 0 190 21" draw:type="non-primitive" draw:enhanced-path="M 0 20  L 189 20  L 177 0  L 14 0  L 0 20  N"/>
              </draw:custom-shape>
              <draw:custom-shape draw:style-name="gr549" draw:text-style-name="P79" draw:layer="layout" svg:width="0.768cm" svg:height="0.086cm" svg:x="17.626cm" svg:y="5.513cm">
                <text:p/>
                <draw:enhanced-geometry svg:viewBox="0 0 178 20" draw:type="non-primitive" draw:enhanced-path="M 10 0  L 0 19  L 177 19  L 168 0  N"/>
              </draw:custom-shape>
              <draw:custom-shape draw:style-name="gr483" draw:text-style-name="P72" draw:layer="layout" svg:width="0.112cm" svg:height="0.072cm" svg:x="18.217cm" svg:y="5.526cm">
                <text:p/>
                <draw:enhanced-geometry svg:viewBox="0 0 26 17" draw:type="non-primitive" draw:enhanced-path="M 0 0  L 23 0  L 25 16  L 0 16  L 0 0  N"/>
              </draw:custom-shape>
              <draw:line draw:style-name="gr484" draw:text-style-name="P14" draw:layer="layout" svg:x1="18.217cm" svg:y1="5.551cm" svg:x2="18.268cm" svg:y2="5.551cm">
                <text:p/>
              </draw:line>
              <draw:custom-shape draw:style-name="gr550" draw:text-style-name="P79" draw:layer="layout" svg:width="0.811cm" svg:height="0.067cm" svg:x="17.6cm" svg:y="5.5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6" draw:text-style-name="P95" draw:layer="layout" svg:width="0.379cm" svg:height="0.072cm" svg:x="17.785cm" svg:y="5.291cm">
                <text:p/>
                <draw:enhanced-geometry svg:viewBox="0 0 88 17" draw:type="non-primitive" draw:enhanced-path="M 0 16  L 87 16  L 82 0  L 5 0  L 0 16  N"/>
              </draw:custom-shape>
              <draw:custom-shape draw:style-name="gr487" draw:text-style-name="P79" draw:layer="layout" svg:width="0.202cm" svg:height="0.072cm" svg:x="17.876cm" svg:y="5.295cm">
                <text:p/>
                <draw:enhanced-geometry svg:viewBox="0 0 47 17" draw:type="non-primitive" draw:enhanced-path="M 0 8  L 0 0  L 46 0  L 46 8  L 46 10  L 45 10  L 44 10  L 43 12  L 42 12  L 41 14  L 39 14  L 37 14  L 35 14  L 34 16  L 32 16  L 29 16  L 27 16  L 24 16  L 22 16  L 19 16  L 15 16  L 13 16  L 11 14  L 10 14  L 7 14  L 5 14  L 4 12  L 2 12  L 1 12  L 0 10  L 0 10  L 0 10  L 0 8  N"/>
              </draw:custom-shape>
              <draw:custom-shape draw:style-name="gr488" draw:text-style-name="P94" draw:layer="layout" svg:width="0.418cm" svg:height="0.307cm" svg:x="17.768cm" svg:y="4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489" draw:text-style-name="P95" draw:layer="layout" svg:width="0.349cm" svg:height="0.264cm" svg:x="17.803cm" svg:y="4.963cm">
                <text:p/>
  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90" draw:text-style-name="P96" draw:layer="layout" svg:width="0.311cm" svg:height="0.234cm" svg:x="17.82cm" svg:y="4.98cm">
                <text:p/>
  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 draw:style-name="gr1">
                <draw:line draw:style-name="gr491" draw:text-style-name="P14" draw:layer="layout" svg:x1="17.863cm" svg:y1="5.035cm" svg:x2="17.923cm" svg:y2="5.162cm">
                  <text:p/>
                </draw:line>
                <draw:line draw:style-name="gr491" draw:text-style-name="P14" draw:layer="layout" svg:x1="17.889cm" svg:y1="5.019cm" svg:x2="17.992cm" svg:y2="5.193cm">
                  <text:p/>
                </draw:line>
              </draw:g>
              <draw:custom-shape draw:style-name="gr492" draw:text-style-name="P72" draw:layer="layout" svg:width="0.107cm" svg:height="0.072cm" svg:x="17.751cm" svg:y="5.513cm">
                <text:p/>
                <draw:enhanced-geometry svg:viewBox="0 0 25 17" draw:type="non-primitive" draw:enhanced-path="M 0 0  L 24 0  L 23 16  L 0 16  L 0 0  N"/>
              </draw:custom-shape>
              <draw:custom-shape draw:style-name="gr492" draw:text-style-name="P72" draw:layer="layout" svg:width="0.094cm" svg:height="0.072cm" svg:x="17.993cm" svg:y="5.513cm">
                <text:p/>
                <draw:enhanced-geometry svg:viewBox="0 0 22 17" draw:type="non-primitive" draw:enhanced-path="M 0 0  L 21 0  L 21 16  L 0 16  L 0 0  N"/>
              </draw:custom-shape>
              <draw:line draw:style-name="gr493" draw:text-style-name="P14" draw:layer="layout" svg:x1="17.716cm" svg:y1="5.539cm" svg:x2="18.027cm" svg:y2="5.539cm">
                <text:p/>
              </draw:line>
              <draw:line draw:style-name="gr493" draw:text-style-name="P14" draw:layer="layout" svg:x1="17.73cm" svg:y1="5.551cm" svg:x2="18.049cm" svg:y2="5.551cm">
                <text:p/>
              </draw:line>
              <draw:line draw:style-name="gr493" draw:text-style-name="P14" draw:layer="layout" svg:x1="17.73cm" svg:y1="5.564cm" svg:x2="18.009cm" svg:y2="5.564cm">
                <text:p/>
              </draw:line>
              <draw:line draw:style-name="gr493" draw:text-style-name="P14" draw:layer="layout" svg:x1="17.673cm" svg:y1="5.543cm" svg:x2="17.699cm" svg:y2="5.543cm">
                <text:p/>
              </draw:line>
              <draw:line draw:style-name="gr493" draw:text-style-name="P14" draw:layer="layout" svg:x1="17.673cm" svg:y1="5.555cm" svg:x2="17.694cm" svg:y2="5.555cm">
                <text:p/>
              </draw:line>
              <draw:line draw:style-name="gr493" draw:text-style-name="P14" draw:layer="layout" svg:x1="17.785cm" svg:y1="5.573cm" svg:x2="17.974cm" svg:y2="5.573cm">
                <text:p/>
              </draw:line>
              <draw:line draw:style-name="gr493" draw:text-style-name="P14" draw:layer="layout" svg:x1="18.049cm" svg:y1="5.539cm" svg:x2="18.088cm" svg:y2="5.539cm">
                <text:p/>
              </draw:line>
              <draw:line draw:style-name="gr493" draw:text-style-name="P14" draw:layer="layout" svg:x1="18.057cm" svg:y1="5.551cm" svg:x2="18.087cm" svg:y2="5.551cm">
                <text:p/>
              </draw:line>
              <draw:line draw:style-name="gr493" draw:text-style-name="P14" draw:layer="layout" svg:x1="18.027cm" svg:y1="5.564cm" svg:x2="18.087cm" svg:y2="5.564cm">
                <text:p/>
              </draw:line>
              <draw:line draw:style-name="gr493" draw:text-style-name="P14" draw:layer="layout" svg:x1="18.242cm" svg:y1="5.543cm" svg:x2="18.32cm" svg:y2="5.543cm">
                <text:p/>
              </draw:line>
              <draw:line draw:style-name="gr493" draw:text-style-name="P14" draw:layer="layout" svg:x1="18.242cm" svg:y1="5.564cm" svg:x2="18.277cm" svg:y2="5.564cm">
                <text:p/>
              </draw:line>
              <draw:line draw:style-name="gr493" draw:text-style-name="P14" draw:layer="layout" svg:x1="18.242cm" svg:y1="5.577cm" svg:x2="18.307cm" svg:y2="5.577cm">
                <text:p/>
              </draw:line>
              <draw:line draw:style-name="gr493" draw:text-style-name="P14" draw:layer="layout" svg:x1="18.303cm" svg:y1="5.555cm" svg:x2="18.329cm" svg:y2="5.555cm">
                <text:p/>
              </draw:line>
              <draw:line draw:style-name="gr493" draw:text-style-name="P14" draw:layer="layout" svg:x1="18.312cm" svg:y1="5.573cm" svg:x2="18.333cm" svg:y2="5.573cm">
                <text:p/>
              </draw:line>
              <draw:custom-shape draw:style-name="gr494" draw:text-style-name="P74" draw:layer="layout" svg:width="0.073cm" svg:height="0.072cm" svg:x="17.687cm" svg:y="5.513cm">
                <text:p/>
                <draw:enhanced-geometry svg:viewBox="0 0 17 17" draw:type="non-primitive" draw:enhanced-path="M 4 0  L 16 0  L 12 16  L 0 16  L 4 0  N"/>
              </draw:custom-shape>
              <draw:custom-shape draw:style-name="gr494" draw:text-style-name="P74" draw:layer="layout" svg:width="0.102cm" svg:height="0.072cm" svg:x="17.876cm" svg:y="5.513cm">
                <text:p/>
                <draw:enhanced-geometry svg:viewBox="0 0 24 17" draw:type="non-primitive" draw:enhanced-path="M 0 0  L 23 0  L 23 16  L 0 16  L 0 0  N"/>
              </draw:custom-shape>
              <draw:custom-shape draw:style-name="gr494" draw:text-style-name="P74" draw:layer="layout" svg:width="0.094cm" svg:height="0.072cm" svg:x="18.101cm" svg:y="5.513cm">
                <text:p/>
                <draw:enhanced-geometry svg:viewBox="0 0 22 17" draw:type="non-primitive" draw:enhanced-path="M 0 0  L 20 0  L 21 16  L 0 16  L 0 0  N"/>
              </draw:custom-shape>
              <draw:line draw:style-name="gr495" draw:text-style-name="P14" draw:layer="layout" svg:x1="17.734cm" svg:y1="5.573cm" svg:x2="17.785cm" svg:y2="5.573cm">
                <text:p/>
              </draw:line>
              <draw:line draw:style-name="gr495" draw:text-style-name="P14" draw:layer="layout" svg:x1="17.66cm" svg:y1="5.573cm" svg:x2="17.715cm" svg:y2="5.573cm">
                <text:p/>
              </draw:line>
              <draw:line draw:style-name="gr495" draw:text-style-name="P14" draw:layer="layout" svg:x1="17.979cm" svg:y1="5.573cm" svg:x2="18.014cm" svg:y2="5.573cm">
                <text:p/>
              </draw:line>
              <draw:line draw:style-name="gr495" draw:text-style-name="P14" draw:layer="layout" svg:x1="18.023cm" svg:y1="5.577cm" svg:x2="18.087cm" svg:y2="5.577cm">
                <text:p/>
              </draw:line>
              <draw:g draw:style-name="gr1">
                <draw:line draw:style-name="gr495" draw:text-style-name="P14" draw:layer="layout" svg:x1="18.101cm" svg:y1="5.543cm" svg:x2="18.204cm" svg:y2="5.543cm">
                  <text:p/>
                </draw:line>
                <draw:line draw:style-name="gr495" draw:text-style-name="P14" draw:layer="layout" svg:x1="18.118cm" svg:y1="5.555cm" svg:x2="18.203cm" svg:y2="5.555cm">
                  <text:p/>
                </draw:line>
                <draw:line draw:style-name="gr495" draw:text-style-name="P14" draw:layer="layout" svg:x1="18.118cm" svg:y1="5.576cm" svg:x2="18.203cm" svg:y2="5.576cm">
                  <text:p/>
                </draw:line>
              </draw:g>
              <draw:line draw:style-name="gr495" draw:text-style-name="P14" draw:layer="layout" svg:x1="18.242cm" svg:y1="5.53cm" svg:x2="18.32cm" svg:y2="5.53cm">
                <text:p/>
              </draw:line>
              <draw:custom-shape draw:style-name="gr496" draw:text-style-name="P35" draw:layer="layout" svg:width="0.034cm" svg:height="0.033cm" svg:x="18.282cm" svg:y="5.3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7" draw:text-style-name="P31" draw:layer="layout" svg:width="0.384cm" svg:height="0.077cm" svg:x="17.863cm" svg:y="5.398cm">
                <text:p/>
                <draw:enhanced-geometry svg:viewBox="0 0 21600 21600" draw:type="rectangle" draw:enhanced-path="M 0 0 L 21600 0 21600 21600 0 21600 0 0 Z N"/>
              </draw:custom-shape>
              <draw:g draw:style-name="gr4">
                <draw:custom-shape draw:style-name="gr496" draw:text-style-name="P35" draw:layer="layout" svg:width="0.034cm" svg:height="0.033cm" svg:x="18.26cm" svg:y="5.43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96" draw:text-style-name="P35" draw:layer="layout" svg:width="0.034cm" svg:height="0.034cm" svg:x="18.26cm" svg:y="5.4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96" draw:text-style-name="P35" draw:layer="layout" svg:width="0.035cm" svg:height="0.034cm" svg:x="18.031cm" svg:y="5.39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8.031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98cm" svg:height="0.033cm" svg:x="17.993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8.01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18.097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4cm" svg:x="18.26cm" svg:y="5.398cm">
                <text:p/>
                <draw:enhanced-geometry svg:viewBox="0 0 21600 21600" draw:type="rectangle" draw:enhanced-path="M 0 0 L 21600 0 21600 21600 0 21600 0 0 Z N"/>
              </draw:custom-shape>
              <draw:line draw:style-name="gr498" draw:text-style-name="P14" draw:layer="layout" svg:x1="17.932cm" svg:y1="5.385cm" svg:x2="17.932cm" svg:y2="5.491cm">
                <text:p/>
              </draw:line>
              <draw:line draw:style-name="gr498" draw:text-style-name="P14" draw:layer="layout" svg:x1="18.109cm" svg:y1="5.385cm" svg:x2="18.109cm" svg:y2="5.491cm">
                <text:p/>
              </draw:line>
              <draw:line draw:style-name="gr498" draw:text-style-name="P14" draw:layer="layout" svg:x1="17.845cm" svg:y1="5.385cm" svg:x2="17.686cm" svg:y2="5.385cm">
                <text:p/>
              </draw:line>
              <draw:line draw:style-name="gr498" draw:text-style-name="P14" draw:layer="layout" svg:x1="17.861cm" svg:y1="5.385cm" svg:x2="17.698cm" svg:y2="5.385cm">
                <text:p/>
              </draw:line>
              <draw:line draw:style-name="gr498" draw:text-style-name="P14" draw:layer="layout" svg:x1="17.861cm" svg:y1="5.415cm" svg:x2="17.698cm" svg:y2="5.415cm">
                <text:p/>
              </draw:line>
              <draw:line draw:style-name="gr498" draw:text-style-name="P14" draw:layer="layout" svg:x1="17.861cm" svg:y1="5.433cm" svg:x2="17.698cm" svg:y2="5.433cm">
                <text:p/>
              </draw:line>
              <draw:line draw:style-name="gr498" draw:text-style-name="P14" draw:layer="layout" svg:x1="17.861cm" svg:y1="5.462cm" svg:x2="17.698cm" svg:y2="5.462cm">
                <text:p/>
              </draw:line>
              <draw:line draw:style-name="gr498" draw:text-style-name="P14" draw:layer="layout" svg:x1="17.861cm" svg:y1="5.475cm" svg:x2="17.698cm" svg:y2="5.475cm">
                <text:p/>
              </draw:line>
              <draw:line draw:style-name="gr498" draw:text-style-name="P14" draw:layer="layout" svg:x1="17.699cm" svg:y1="5.5cm" svg:x2="18.302cm" svg:y2="5.5cm">
                <text:p/>
              </draw:line>
              <draw:line draw:style-name="gr498" draw:text-style-name="P14" draw:layer="layout" svg:x1="17.863cm" svg:y1="5.424cm" svg:x2="18.269cm" svg:y2="5.424cm">
                <text:p/>
              </draw:line>
              <draw:custom-shape draw:style-name="gr496" draw:text-style-name="P35" draw:layer="layout" svg:width="0.034cm" svg:height="0.034cm" svg:x="18.183cm" svg:y="5.4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9" draw:text-style-name="P79" draw:layer="layout" svg:width="0.34cm" svg:height="0.034cm" svg:x="17.803cm" svg:y="5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500" draw:text-style-name="P79" draw:layer="layout" svg:width="0.375cm" svg:height="0.067cm" svg:x="17.785cm" svg:y="5.2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style-name="gr4">
            <draw:custom-shape draw:style-name="gr541" draw:text-style-name="P16" draw:layer="layout" svg:width="1.713cm" svg:height="1.229cm" svg:x="18.996cm" svg:y="4.657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551" draw:text-style-name="P74" draw:layer="layout" svg:width="0.66cm" svg:height="0.072cm" svg:x="19.486cm" svg:y="5.304cm">
                <text:p/>
                <draw:enhanced-geometry svg:viewBox="0 0 153 17" draw:type="non-primitive" draw:enhanced-path="M 0 16  L 152 16  L 137 0  L 15 0  L 0 16  N"/>
              </draw:custom-shape>
              <draw:custom-shape draw:style-name="gr479" draw:text-style-name="P93" draw:layer="layout" svg:width="0.034cm" svg:height="0.033cm" svg:x="20.005cm" svg:y="5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552" draw:text-style-name="P94" draw:layer="layout" svg:width="0.656cm" svg:height="0.162cm" svg:x="19.486cm" svg:y="5.368cm">
                <text:p/>
                <draw:enhanced-geometry svg:viewBox="0 0 21600 21600" draw:type="rectangle" draw:enhanced-path="M 0 0 L 21600 0 21600 21600 0 21600 0 0 Z N"/>
              </draw:custom-shape>
              <draw:custom-shape draw:style-name="gr553" draw:text-style-name="P72" draw:layer="layout" svg:width="0.924cm" svg:height="0.089cm" svg:x="19.392cm" svg:y="5.513cm">
                <text:p/>
                <draw:enhanced-geometry svg:viewBox="0 0 214 21" draw:type="non-primitive" draw:enhanced-path="M 0 20  L 213 20  L 200 0  L 15 0  L 0 20  N"/>
              </draw:custom-shape>
              <draw:custom-shape draw:style-name="gr545" draw:text-style-name="P79" draw:layer="layout" svg:width="0.872cm" svg:height="0.086cm" svg:x="19.418cm" svg:y="5.513cm">
                <text:p/>
                <draw:enhanced-geometry svg:viewBox="0 0 202 20" draw:type="non-primitive" draw:enhanced-path="M 11 0  L 0 19  L 201 19  L 191 0  N"/>
              </draw:custom-shape>
              <draw:custom-shape draw:style-name="gr483" draw:text-style-name="P72" draw:layer="layout" svg:width="0.12cm" svg:height="0.072cm" svg:x="20.091cm" svg:y="5.526cm">
                <text:p/>
                <draw:enhanced-geometry svg:viewBox="0 0 28 17" draw:type="non-primitive" draw:enhanced-path="M 0 0  L 24 0  L 27 16  L 0 16  L 0 0  N"/>
              </draw:custom-shape>
              <draw:line draw:style-name="gr484" draw:text-style-name="P14" draw:layer="layout" svg:x1="20.091cm" svg:y1="5.551cm" svg:x2="20.146cm" svg:y2="5.551cm">
                <text:p/>
              </draw:line>
              <draw:custom-shape draw:style-name="gr554" draw:text-style-name="P79" draw:layer="layout" svg:width="0.915cm" svg:height="0.067cm" svg:x="19.392cm" svg:y="5.5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6" draw:text-style-name="P95" draw:layer="layout" svg:width="0.431cm" svg:height="0.072cm" svg:x="19.599cm" svg:y="5.291cm">
                <text:p/>
                <draw:enhanced-geometry svg:viewBox="0 0 100 17" draw:type="non-primitive" draw:enhanced-path="M 0 16  L 99 16  L 93 0  L 5 0  L 0 16  N"/>
              </draw:custom-shape>
              <draw:custom-shape draw:style-name="gr487" draw:text-style-name="P79" draw:layer="layout" svg:width="0.229cm" svg:height="0.072cm" svg:x="19.703cm" svg:y="5.295cm">
                <text:p/>
                <draw:enhanced-geometry svg:viewBox="0 0 53 17" draw:type="non-primitive" draw:enhanced-path="M 0 8  L 0 0  L 52 0  L 52 8  L 52 10  L 51 10  L 50 10  L 49 12  L 47 12  L 46 14  L 44 14  L 42 14  L 40 14  L 38 16  L 36 16  L 33 16  L 31 16  L 28 16  L 25 16  L 21 16  L 18 16  L 14 16  L 13 14  L 11 14  L 8 14  L 6 14  L 4 12  L 2 12  L 1 12  L 1 10  L 0 10  L 0 10  L 0 8  N"/>
              </draw:custom-shape>
              <draw:custom-shape draw:style-name="gr488" draw:text-style-name="P94" draw:layer="layout" svg:width="0.479cm" svg:height="0.307cm" svg:x="19.577cm" svg:y="4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489" draw:text-style-name="P95" draw:layer="layout" svg:width="0.397cm" svg:height="0.264cm" svg:x="19.621cm" svg:y="4.963cm">
                <text:p/>
  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90" draw:text-style-name="P96" draw:layer="layout" svg:width="0.345cm" svg:height="0.234cm" svg:x="19.642cm" svg:y="4.98cm">
                <text:p/>
  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 draw:style-name="gr1">
                <draw:line draw:style-name="gr491" draw:text-style-name="P14" draw:layer="layout" svg:x1="19.69cm" svg:y1="5.035cm" svg:x2="19.754cm" svg:y2="5.162cm">
                  <text:p/>
                </draw:line>
                <draw:line draw:style-name="gr491" draw:text-style-name="P14" draw:layer="layout" svg:x1="19.72cm" svg:y1="5.019cm" svg:x2="19.835cm" svg:y2="5.193cm">
                  <text:p/>
                </draw:line>
              </draw:g>
              <draw:custom-shape draw:style-name="gr492" draw:text-style-name="P72" draw:layer="layout" svg:width="0.121cm" svg:height="0.072cm" svg:x="19.56cm" svg:y="5.513cm">
                <text:p/>
                <draw:enhanced-geometry svg:viewBox="0 0 28 17" draw:type="non-primitive" draw:enhanced-path="M 0 0  L 27 0  L 26 16  L 0 16  L 0 0  N"/>
              </draw:custom-shape>
              <draw:custom-shape draw:style-name="gr492" draw:text-style-name="P72" draw:layer="layout" svg:width="0.102cm" svg:height="0.072cm" svg:x="19.837cm" svg:y="5.513cm">
                <text:p/>
                <draw:enhanced-geometry svg:viewBox="0 0 24 17" draw:type="non-primitive" draw:enhanced-path="M 0 0  L 23 0  L 23 16  L 0 16  L 0 0  N"/>
              </draw:custom-shape>
              <draw:line draw:style-name="gr493" draw:text-style-name="P14" draw:layer="layout" svg:x1="19.526cm" svg:y1="5.539cm" svg:x2="19.875cm" svg:y2="5.539cm">
                <text:p/>
              </draw:line>
              <draw:line draw:style-name="gr493" draw:text-style-name="P14" draw:layer="layout" svg:x1="19.534cm" svg:y1="5.551cm" svg:x2="19.896cm" svg:y2="5.551cm">
                <text:p/>
              </draw:line>
              <draw:line draw:style-name="gr493" draw:text-style-name="P14" draw:layer="layout" svg:x1="19.534cm" svg:y1="5.564cm" svg:x2="19.853cm" svg:y2="5.564cm">
                <text:p/>
              </draw:line>
              <draw:line draw:style-name="gr493" draw:text-style-name="P14" draw:layer="layout" svg:x1="19.474cm" svg:y1="5.543cm" svg:x2="19.508cm" svg:y2="5.543cm">
                <text:p/>
              </draw:line>
              <draw:line draw:style-name="gr493" draw:text-style-name="P14" draw:layer="layout" svg:x1="19.474cm" svg:y1="5.555cm" svg:x2="19.5cm" svg:y2="5.555cm">
                <text:p/>
              </draw:line>
              <draw:line draw:style-name="gr493" draw:text-style-name="P14" draw:layer="layout" svg:x1="19.599cm" svg:y1="5.573cm" svg:x2="19.815cm" svg:y2="5.573cm">
                <text:p/>
              </draw:line>
              <draw:line draw:style-name="gr493" draw:text-style-name="P14" draw:layer="layout" svg:x1="19.897cm" svg:y1="5.539cm" svg:x2="19.944cm" svg:y2="5.539cm">
                <text:p/>
              </draw:line>
              <draw:line draw:style-name="gr493" draw:text-style-name="P14" draw:layer="layout" svg:x1="19.91cm" svg:y1="5.551cm" svg:x2="19.944cm" svg:y2="5.551cm">
                <text:p/>
              </draw:line>
              <draw:line draw:style-name="gr493" draw:text-style-name="P14" draw:layer="layout" svg:x1="19.875cm" svg:y1="5.564cm" svg:x2="19.944cm" svg:y2="5.564cm">
                <text:p/>
              </draw:line>
              <draw:line draw:style-name="gr493" draw:text-style-name="P14" draw:layer="layout" svg:x1="20.113cm" svg:y1="5.543cm" svg:x2="20.203cm" svg:y2="5.543cm">
                <text:p/>
              </draw:line>
              <draw:line draw:style-name="gr493" draw:text-style-name="P14" draw:layer="layout" svg:x1="20.113cm" svg:y1="5.564cm" svg:x2="20.156cm" svg:y2="5.564cm">
                <text:p/>
              </draw:line>
              <draw:line draw:style-name="gr493" draw:text-style-name="P14" draw:layer="layout" svg:x1="20.113cm" svg:y1="5.577cm" svg:x2="20.186cm" svg:y2="5.577cm">
                <text:p/>
              </draw:line>
              <draw:line draw:style-name="gr493" draw:text-style-name="P14" draw:layer="layout" svg:x1="20.181cm" svg:y1="5.555cm" svg:x2="20.216cm" svg:y2="5.555cm">
                <text:p/>
              </draw:line>
              <draw:line draw:style-name="gr493" draw:text-style-name="P14" draw:layer="layout" svg:x1="20.19cm" svg:y1="5.573cm" svg:x2="20.22cm" svg:y2="5.573cm">
                <text:p/>
              </draw:line>
              <draw:custom-shape draw:style-name="gr494" draw:text-style-name="P74" draw:layer="layout" svg:width="0.078cm" svg:height="0.072cm" svg:x="19.486cm" svg:y="5.513cm">
                <text:p/>
                <draw:enhanced-geometry svg:viewBox="0 0 18 17" draw:type="non-primitive" draw:enhanced-path="M 4 0  L 17 0  L 13 16  L 0 16  L 4 0  N"/>
              </draw:custom-shape>
              <draw:custom-shape draw:style-name="gr494" draw:text-style-name="P74" draw:layer="layout" svg:width="0.116cm" svg:height="0.072cm" svg:x="19.703cm" svg:y="5.513cm">
                <text:p/>
                <draw:enhanced-geometry svg:viewBox="0 0 27 17" draw:type="non-primitive" draw:enhanced-path="M 0 0  L 26 0  L 26 16  L 0 16  L 0 0  N"/>
              </draw:custom-shape>
              <draw:custom-shape draw:style-name="gr494" draw:text-style-name="P74" draw:layer="layout" svg:width="0.103cm" svg:height="0.072cm" svg:x="19.957cm" svg:y="5.513cm">
                <text:p/>
                <draw:enhanced-geometry svg:viewBox="0 0 24 17" draw:type="non-primitive" draw:enhanced-path="M 0 0  L 22 0  L 23 16  L 0 16  L 0 0  N"/>
              </draw:custom-shape>
              <draw:line draw:style-name="gr495" draw:text-style-name="P14" draw:layer="layout" svg:x1="19.543cm" svg:y1="5.573cm" svg:x2="19.598cm" svg:y2="5.573cm">
                <text:p/>
              </draw:line>
              <draw:line draw:style-name="gr495" draw:text-style-name="P14" draw:layer="layout" svg:x1="19.461cm" svg:y1="5.573cm" svg:x2="19.525cm" svg:y2="5.573cm">
                <text:p/>
              </draw:line>
              <draw:line draw:style-name="gr495" draw:text-style-name="P14" draw:layer="layout" svg:x1="19.819cm" svg:y1="5.573cm" svg:x2="19.858cm" svg:y2="5.573cm">
                <text:p/>
              </draw:line>
              <draw:line draw:style-name="gr495" draw:text-style-name="P14" draw:layer="layout" svg:x1="19.871cm" svg:y1="5.577cm" svg:x2="19.944cm" svg:y2="5.577cm">
                <text:p/>
              </draw:line>
              <draw:g draw:style-name="gr1">
                <draw:line draw:style-name="gr495" draw:text-style-name="P14" draw:layer="layout" svg:x1="19.957cm" svg:y1="5.543cm" svg:x2="20.073cm" svg:y2="5.543cm">
                  <text:p/>
                </draw:line>
                <draw:line draw:style-name="gr495" draw:text-style-name="P14" draw:layer="layout" svg:x1="19.974cm" svg:y1="5.555cm" svg:x2="20.072cm" svg:y2="5.555cm">
                  <text:p/>
                </draw:line>
                <draw:line draw:style-name="gr495" draw:text-style-name="P14" draw:layer="layout" svg:x1="19.974cm" svg:y1="5.576cm" svg:x2="20.072cm" svg:y2="5.576cm">
                  <text:p/>
                </draw:line>
              </draw:g>
              <draw:line draw:style-name="gr495" draw:text-style-name="P14" draw:layer="layout" svg:x1="20.113cm" svg:y1="5.53cm" svg:x2="20.203cm" svg:y2="5.53cm">
                <text:p/>
              </draw:line>
              <draw:custom-shape draw:style-name="gr496" draw:text-style-name="P35" draw:layer="layout" svg:width="0.035cm" svg:height="0.033cm" svg:x="20.16cm" svg:y="5.3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7" draw:text-style-name="P31" draw:layer="layout" svg:width="0.44cm" svg:height="0.077cm" svg:x="19.685cm" svg:y="5.398cm">
                <text:p/>
                <draw:enhanced-geometry svg:viewBox="0 0 21600 21600" draw:type="rectangle" draw:enhanced-path="M 0 0 L 21600 0 21600 21600 0 21600 0 0 Z N"/>
              </draw:custom-shape>
              <draw:g draw:style-name="gr4">
                <draw:custom-shape draw:style-name="gr496" draw:text-style-name="P35" draw:layer="layout" svg:width="0.035cm" svg:height="0.033cm" svg:x="20.13cm" svg:y="5.43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96" draw:text-style-name="P35" draw:layer="layout" svg:width="0.035cm" svg:height="0.034cm" svg:x="20.13cm" svg:y="5.4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96" draw:text-style-name="P35" draw:layer="layout" svg:width="0.035cm" svg:height="0.034cm" svg:x="19.875cm" svg:y="5.39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9.875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116cm" svg:height="0.033cm" svg:x="19.832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9.854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19.948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4cm" svg:x="20.13cm" svg:y="5.398cm">
                <text:p/>
                <draw:enhanced-geometry svg:viewBox="0 0 21600 21600" draw:type="rectangle" draw:enhanced-path="M 0 0 L 21600 0 21600 21600 0 21600 0 0 Z N"/>
              </draw:custom-shape>
              <draw:line draw:style-name="gr498" draw:text-style-name="P14" draw:layer="layout" svg:x1="19.767cm" svg:y1="5.385cm" svg:x2="19.767cm" svg:y2="5.491cm">
                <text:p/>
              </draw:line>
              <draw:line draw:style-name="gr498" draw:text-style-name="P14" draw:layer="layout" svg:x1="19.966cm" svg:y1="5.385cm" svg:x2="19.966cm" svg:y2="5.491cm">
                <text:p/>
              </draw:line>
              <draw:line draw:style-name="gr498" draw:text-style-name="P14" draw:layer="layout" svg:x1="19.668cm" svg:y1="5.385cm" svg:x2="19.486cm" svg:y2="5.385cm">
                <text:p/>
              </draw:line>
              <draw:line draw:style-name="gr498" draw:text-style-name="P14" draw:layer="layout" svg:x1="19.69cm" svg:y1="5.385cm" svg:x2="19.508cm" svg:y2="5.385cm">
                <text:p/>
              </draw:line>
              <draw:line draw:style-name="gr498" draw:text-style-name="P14" draw:layer="layout" svg:x1="19.69cm" svg:y1="5.415cm" svg:x2="19.508cm" svg:y2="5.415cm">
                <text:p/>
              </draw:line>
              <draw:line draw:style-name="gr498" draw:text-style-name="P14" draw:layer="layout" svg:x1="19.69cm" svg:y1="5.433cm" svg:x2="19.508cm" svg:y2="5.433cm">
                <text:p/>
              </draw:line>
              <draw:line draw:style-name="gr498" draw:text-style-name="P14" draw:layer="layout" svg:x1="19.69cm" svg:y1="5.462cm" svg:x2="19.508cm" svg:y2="5.462cm">
                <text:p/>
              </draw:line>
              <draw:line draw:style-name="gr498" draw:text-style-name="P14" draw:layer="layout" svg:x1="19.69cm" svg:y1="5.475cm" svg:x2="19.508cm" svg:y2="5.475cm">
                <text:p/>
              </draw:line>
              <draw:line draw:style-name="gr498" draw:text-style-name="P14" draw:layer="layout" svg:x1="19.508cm" svg:y1="5.5cm" svg:x2="20.181cm" svg:y2="5.5cm">
                <text:p/>
              </draw:line>
              <draw:line draw:style-name="gr498" draw:text-style-name="P14" draw:layer="layout" svg:x1="19.69cm" svg:y1="5.424cm" svg:x2="20.147cm" svg:y2="5.424cm">
                <text:p/>
              </draw:line>
              <draw:custom-shape draw:style-name="gr496" draw:text-style-name="P35" draw:layer="layout" svg:width="0.034cm" svg:height="0.034cm" svg:x="20.048cm" svg:y="5.4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9" draw:text-style-name="P79" draw:layer="layout" svg:width="0.392cm" svg:height="0.034cm" svg:x="19.617cm" svg:y="5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500" draw:text-style-name="P79" draw:layer="layout" svg:width="0.427cm" svg:height="0.067cm" svg:x="19.599cm" svg:y="5.2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style-name="gr4">
            <draw:custom-shape draw:style-name="gr555" draw:text-style-name="P16" draw:layer="layout" svg:width="1.709cm" svg:height="1.229cm" svg:x="20.938cm" svg:y="4.657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556" draw:text-style-name="P74" draw:layer="layout" svg:width="0.655cm" svg:height="0.072cm" svg:x="21.429cm" svg:y="5.304cm">
                <text:p/>
                <draw:enhanced-geometry svg:viewBox="0 0 152 17" draw:type="non-primitive" draw:enhanced-path="M 0 16  L 151 16  L 137 0  L 15 0  L 0 16  N"/>
              </draw:custom-shape>
              <draw:custom-shape draw:style-name="gr479" draw:text-style-name="P93" draw:layer="layout" svg:width="0.034cm" svg:height="0.033cm" svg:x="21.947cm" svg:y="5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557" draw:text-style-name="P94" draw:layer="layout" svg:width="0.651cm" svg:height="0.162cm" svg:x="21.429cm" svg:y="5.368cm">
                <text:p/>
                <draw:enhanced-geometry svg:viewBox="0 0 21600 21600" draw:type="rectangle" draw:enhanced-path="M 0 0 L 21600 0 21600 21600 0 21600 0 0 Z N"/>
              </draw:custom-shape>
              <draw:custom-shape draw:style-name="gr558" draw:text-style-name="P72" draw:layer="layout" svg:width="0.927cm" svg:height="0.089cm" svg:x="21.33cm" svg:y="5.513cm">
                <text:p/>
                <draw:enhanced-geometry svg:viewBox="0 0 215 21" draw:type="non-primitive" draw:enhanced-path="M 0 20  L 214 20  L 201 0  L 15 0  L 0 20  N"/>
              </draw:custom-shape>
              <draw:custom-shape draw:style-name="gr559" draw:text-style-name="P79" draw:layer="layout" svg:width="0.867cm" svg:height="0.086cm" svg:x="21.36cm" svg:y="5.513cm">
                <text:p/>
                <draw:enhanced-geometry svg:viewBox="0 0 201 20" draw:type="non-primitive" draw:enhanced-path="M 11 0  L 0 19  L 200 19  L 190 0  N"/>
              </draw:custom-shape>
              <draw:custom-shape draw:style-name="gr483" draw:text-style-name="P72" draw:layer="layout" svg:width="0.12cm" svg:height="0.072cm" svg:x="22.029cm" svg:y="5.526cm">
                <text:p/>
                <draw:enhanced-geometry svg:viewBox="0 0 28 17" draw:type="non-primitive" draw:enhanced-path="M 0 0  L 24 0  L 27 16  L 0 16  L 0 0  N"/>
              </draw:custom-shape>
              <draw:line draw:style-name="gr484" draw:text-style-name="P14" draw:layer="layout" svg:x1="22.029cm" svg:y1="5.551cm" svg:x2="22.084cm" svg:y2="5.551cm">
                <text:p/>
              </draw:line>
              <draw:custom-shape draw:style-name="gr560" draw:text-style-name="P79" draw:layer="layout" svg:width="0.919cm" svg:height="0.067cm" svg:x="21.33cm" svg:y="5.5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6" draw:text-style-name="P95" draw:layer="layout" svg:width="0.427cm" svg:height="0.072cm" svg:x="21.541cm" svg:y="5.291cm">
                <text:p/>
                <draw:enhanced-geometry svg:viewBox="0 0 99 17" draw:type="non-primitive" draw:enhanced-path="M 0 16  L 98 16  L 92 0  L 5 0  L 0 16  N"/>
              </draw:custom-shape>
              <draw:custom-shape draw:style-name="gr487" draw:text-style-name="P79" draw:layer="layout" svg:width="0.232cm" svg:height="0.072cm" svg:x="21.64cm" svg:y="5.295cm">
                <text:p/>
                <draw:enhanced-geometry svg:viewBox="0 0 54 17" draw:type="non-primitive" draw:enhanced-path="M 0 8  L 0 0  L 53 0  L 53 8  L 53 10  L 52 10  L 51 10  L 50 12  L 48 12  L 47 14  L 45 14  L 43 14  L 41 14  L 38 16  L 36 16  L 34 16  L 32 16  L 29 16  L 25 16  L 21 16  L 18 16  L 15 16  L 13 14  L 11 14  L 8 14  L 6 14  L 4 12  L 2 12  L 1 12  L 1 10  L 0 10  L 0 10  L 0 8  N"/>
              </draw:custom-shape>
              <draw:custom-shape draw:style-name="gr488" draw:text-style-name="P94" draw:layer="layout" svg:width="0.478cm" svg:height="0.307cm" svg:x="21.515cm" svg:y="4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489" draw:text-style-name="P95" draw:layer="layout" svg:width="0.397cm" svg:height="0.264cm" svg:x="21.558cm" svg:y="4.963cm">
                <text:p/>
                <draw:enhanced-geometry svg:viewBox="0 0 21600 21600" draw:path-stretchpoint-x="10800" draw:path-stretchpoint-y="10800" draw:text-areas="?f3 ?f4 ?f5 ?f6" draw:type="round-rectangle" draw:modifiers="261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90" draw:text-style-name="P96" draw:layer="layout" svg:width="0.349cm" svg:height="0.234cm" svg:x="21.58cm" svg:y="4.98cm">
                <text:p/>
                <draw:enhanced-geometry svg:viewBox="0 0 21600 21600" draw:path-stretchpoint-x="10800" draw:path-stretchpoint-y="10800" draw:text-areas="?f3 ?f4 ?f5 ?f6" draw:type="round-rectangle" draw:modifiers="265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 draw:style-name="gr1">
                <draw:line draw:style-name="gr491" draw:text-style-name="P14" draw:layer="layout" svg:x1="21.628cm" svg:y1="5.035cm" svg:x2="21.692cm" svg:y2="5.162cm">
                  <text:p/>
                </draw:line>
                <draw:line draw:style-name="gr491" draw:text-style-name="P14" draw:layer="layout" svg:x1="21.658cm" svg:y1="5.019cm" svg:x2="21.773cm" svg:y2="5.193cm">
                  <text:p/>
                </draw:line>
              </draw:g>
              <draw:custom-shape draw:style-name="gr492" draw:text-style-name="P72" draw:layer="layout" svg:width="0.125cm" svg:height="0.072cm" svg:x="21.498cm" svg:y="5.513cm">
                <text:p/>
                <draw:enhanced-geometry svg:viewBox="0 0 29 17" draw:type="non-primitive" draw:enhanced-path="M 0 0  L 28 0  L 27 16  L 0 16  L 0 0  N"/>
              </draw:custom-shape>
              <draw:custom-shape draw:style-name="gr492" draw:text-style-name="P72" draw:layer="layout" svg:width="0.102cm" svg:height="0.072cm" svg:x="21.774cm" svg:y="5.513cm">
                <text:p/>
                <draw:enhanced-geometry svg:viewBox="0 0 24 17" draw:type="non-primitive" draw:enhanced-path="M 0 0  L 23 0  L 23 16  L 0 16  L 0 0  N"/>
              </draw:custom-shape>
              <draw:line draw:style-name="gr493" draw:text-style-name="P14" draw:layer="layout" svg:x1="21.463cm" svg:y1="5.539cm" svg:x2="21.812cm" svg:y2="5.539cm">
                <text:p/>
              </draw:line>
              <draw:line draw:style-name="gr493" draw:text-style-name="P14" draw:layer="layout" svg:x1="21.476cm" svg:y1="5.551cm" svg:x2="21.833cm" svg:y2="5.551cm">
                <text:p/>
              </draw:line>
              <draw:line draw:style-name="gr493" draw:text-style-name="P14" draw:layer="layout" svg:x1="21.476cm" svg:y1="5.564cm" svg:x2="21.795cm" svg:y2="5.564cm">
                <text:p/>
              </draw:line>
              <draw:line draw:style-name="gr493" draw:text-style-name="P14" draw:layer="layout" svg:x1="21.417cm" svg:y1="5.543cm" svg:x2="21.446cm" svg:y2="5.543cm">
                <text:p/>
              </draw:line>
              <draw:line draw:style-name="gr493" draw:text-style-name="P14" draw:layer="layout" svg:x1="21.417cm" svg:y1="5.555cm" svg:x2="21.438cm" svg:y2="5.555cm">
                <text:p/>
              </draw:line>
              <draw:line draw:style-name="gr493" draw:text-style-name="P14" draw:layer="layout" svg:x1="21.541cm" svg:y1="5.573cm" svg:x2="21.753cm" svg:y2="5.573cm">
                <text:p/>
              </draw:line>
              <draw:line draw:style-name="gr493" draw:text-style-name="P14" draw:layer="layout" svg:x1="21.834cm" svg:y1="5.539cm" svg:x2="21.881cm" svg:y2="5.539cm">
                <text:p/>
              </draw:line>
              <draw:line draw:style-name="gr493" draw:text-style-name="P14" draw:layer="layout" svg:x1="21.848cm" svg:y1="5.551cm" svg:x2="21.882cm" svg:y2="5.551cm">
                <text:p/>
              </draw:line>
              <draw:line draw:style-name="gr493" draw:text-style-name="P14" draw:layer="layout" svg:x1="21.813cm" svg:y1="5.564cm" svg:x2="21.882cm" svg:y2="5.564cm">
                <text:p/>
              </draw:line>
              <draw:line draw:style-name="gr493" draw:text-style-name="P14" draw:layer="layout" svg:x1="22.054cm" svg:y1="5.543cm" svg:x2="22.14cm" svg:y2="5.543cm">
                <text:p/>
              </draw:line>
              <draw:line draw:style-name="gr493" draw:text-style-name="P14" draw:layer="layout" svg:x1="22.054cm" svg:y1="5.564cm" svg:x2="22.093cm" svg:y2="5.564cm">
                <text:p/>
              </draw:line>
              <draw:line draw:style-name="gr493" draw:text-style-name="P14" draw:layer="layout" svg:x1="22.054cm" svg:y1="5.577cm" svg:x2="22.123cm" svg:y2="5.577cm">
                <text:p/>
              </draw:line>
              <draw:line draw:style-name="gr493" draw:text-style-name="P14" draw:layer="layout" svg:x1="22.124cm" svg:y1="5.555cm" svg:x2="22.154cm" svg:y2="5.555cm">
                <text:p/>
              </draw:line>
              <draw:line draw:style-name="gr493" draw:text-style-name="P14" draw:layer="layout" svg:x1="22.127cm" svg:y1="5.573cm" svg:x2="22.157cm" svg:y2="5.573cm">
                <text:p/>
              </draw:line>
              <draw:custom-shape draw:style-name="gr494" draw:text-style-name="P74" draw:layer="layout" svg:width="0.073cm" svg:height="0.072cm" svg:x="21.429cm" svg:y="5.513cm">
                <text:p/>
                <draw:enhanced-geometry svg:viewBox="0 0 17 17" draw:type="non-primitive" draw:enhanced-path="M 4 0  L 16 0  L 12 16  L 0 16  L 4 0  N"/>
              </draw:custom-shape>
              <draw:custom-shape draw:style-name="gr494" draw:text-style-name="P74" draw:layer="layout" svg:width="0.116cm" svg:height="0.072cm" svg:x="21.64cm" svg:y="5.513cm">
                <text:p/>
                <draw:enhanced-geometry svg:viewBox="0 0 27 17" draw:type="non-primitive" draw:enhanced-path="M 0 0  L 26 0  L 26 16  L 0 16  L 0 0  N"/>
              </draw:custom-shape>
              <draw:custom-shape draw:style-name="gr494" draw:text-style-name="P74" draw:layer="layout" svg:width="0.107cm" svg:height="0.072cm" svg:x="21.895cm" svg:y="5.513cm">
                <text:p/>
                <draw:enhanced-geometry svg:viewBox="0 0 25 17" draw:type="non-primitive" draw:enhanced-path="M 0 0  L 23 0  L 24 16  L 0 16  L 0 0  N"/>
              </draw:custom-shape>
              <draw:line draw:style-name="gr495" draw:text-style-name="P14" draw:layer="layout" svg:x1="21.485cm" svg:y1="5.573cm" svg:x2="21.54cm" svg:y2="5.573cm">
                <text:p/>
              </draw:line>
              <draw:line draw:style-name="gr495" draw:text-style-name="P14" draw:layer="layout" svg:x1="21.399cm" svg:y1="5.573cm" svg:x2="21.463cm" svg:y2="5.573cm">
                <text:p/>
              </draw:line>
              <draw:line draw:style-name="gr495" draw:text-style-name="P14" draw:layer="layout" svg:x1="21.757cm" svg:y1="5.573cm" svg:x2="21.8cm" svg:y2="5.573cm">
                <text:p/>
              </draw:line>
              <draw:line draw:style-name="gr495" draw:text-style-name="P14" draw:layer="layout" svg:x1="21.809cm" svg:y1="5.577cm" svg:x2="21.882cm" svg:y2="5.577cm">
                <text:p/>
              </draw:line>
              <draw:g draw:style-name="gr1">
                <draw:line draw:style-name="gr495" draw:text-style-name="P14" draw:layer="layout" svg:x1="21.895cm" svg:y1="5.543cm" svg:x2="22.011cm" svg:y2="5.543cm">
                  <text:p/>
                </draw:line>
                <draw:line draw:style-name="gr495" draw:text-style-name="P14" draw:layer="layout" svg:x1="21.912cm" svg:y1="5.555cm" svg:x2="22.01cm" svg:y2="5.555cm">
                  <text:p/>
                </draw:line>
                <draw:line draw:style-name="gr495" draw:text-style-name="P14" draw:layer="layout" svg:x1="21.912cm" svg:y1="5.576cm" svg:x2="22.01cm" svg:y2="5.576cm">
                  <text:p/>
                </draw:line>
              </draw:g>
              <draw:line draw:style-name="gr495" draw:text-style-name="P14" draw:layer="layout" svg:x1="22.054cm" svg:y1="5.53cm" svg:x2="22.14cm" svg:y2="5.53cm">
                <text:p/>
              </draw:line>
              <draw:custom-shape draw:style-name="gr496" draw:text-style-name="P35" draw:layer="layout" svg:width="0.035cm" svg:height="0.033cm" svg:x="22.097cm" svg:y="5.3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7" draw:text-style-name="P31" draw:layer="layout" svg:width="0.435cm" svg:height="0.077cm" svg:x="21.628cm" svg:y="5.398cm">
                <text:p/>
                <draw:enhanced-geometry svg:viewBox="0 0 21600 21600" draw:type="rectangle" draw:enhanced-path="M 0 0 L 21600 0 21600 21600 0 21600 0 0 Z N"/>
              </draw:custom-shape>
              <draw:g draw:style-name="gr4">
                <draw:custom-shape draw:style-name="gr496" draw:text-style-name="P35" draw:layer="layout" svg:width="0.034cm" svg:height="0.033cm" svg:x="22.072cm" svg:y="5.43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96" draw:text-style-name="P35" draw:layer="layout" svg:width="0.034cm" svg:height="0.034cm" svg:x="22.072cm" svg:y="5.4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96" draw:text-style-name="P35" draw:layer="layout" svg:width="0.034cm" svg:height="0.034cm" svg:x="21.817cm" svg:y="5.39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21.817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116cm" svg:height="0.033cm" svg:x="21.77cm" svg:y="5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5cm" svg:height="0.033cm" svg:x="21.791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3cm" svg:x="21.891cm" svg:y="5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6" draw:text-style-name="P35" draw:layer="layout" svg:width="0.034cm" svg:height="0.034cm" svg:x="22.072cm" svg:y="5.398cm">
                <text:p/>
                <draw:enhanced-geometry svg:viewBox="0 0 21600 21600" draw:type="rectangle" draw:enhanced-path="M 0 0 L 21600 0 21600 21600 0 21600 0 0 Z N"/>
              </draw:custom-shape>
              <draw:line draw:style-name="gr498" draw:text-style-name="P14" draw:layer="layout" svg:x1="21.705cm" svg:y1="5.385cm" svg:x2="21.705cm" svg:y2="5.491cm">
                <text:p/>
              </draw:line>
              <draw:line draw:style-name="gr498" draw:text-style-name="P14" draw:layer="layout" svg:x1="21.904cm" svg:y1="5.385cm" svg:x2="21.904cm" svg:y2="5.491cm">
                <text:p/>
              </draw:line>
              <draw:line draw:style-name="gr498" draw:text-style-name="P14" draw:layer="layout" svg:x1="21.609cm" svg:y1="5.385cm" svg:x2="21.429cm" svg:y2="5.385cm">
                <text:p/>
              </draw:line>
              <draw:line draw:style-name="gr498" draw:text-style-name="P14" draw:layer="layout" svg:x1="21.626cm" svg:y1="5.385cm" svg:x2="21.445cm" svg:y2="5.385cm">
                <text:p/>
              </draw:line>
              <draw:line draw:style-name="gr498" draw:text-style-name="P14" draw:layer="layout" svg:x1="21.626cm" svg:y1="5.415cm" svg:x2="21.445cm" svg:y2="5.415cm">
                <text:p/>
              </draw:line>
              <draw:line draw:style-name="gr498" draw:text-style-name="P14" draw:layer="layout" svg:x1="21.626cm" svg:y1="5.433cm" svg:x2="21.445cm" svg:y2="5.433cm">
                <text:p/>
              </draw:line>
              <draw:line draw:style-name="gr498" draw:text-style-name="P14" draw:layer="layout" svg:x1="21.626cm" svg:y1="5.462cm" svg:x2="21.445cm" svg:y2="5.462cm">
                <text:p/>
              </draw:line>
              <draw:line draw:style-name="gr498" draw:text-style-name="P14" draw:layer="layout" svg:x1="21.626cm" svg:y1="5.475cm" svg:x2="21.445cm" svg:y2="5.475cm">
                <text:p/>
              </draw:line>
              <draw:line draw:style-name="gr498" draw:text-style-name="P14" draw:layer="layout" svg:x1="21.446cm" svg:y1="5.5cm" svg:x2="22.123cm" svg:y2="5.5cm">
                <text:p/>
              </draw:line>
              <draw:line draw:style-name="gr498" draw:text-style-name="P14" draw:layer="layout" svg:x1="21.628cm" svg:y1="5.424cm" svg:x2="22.084cm" svg:y2="5.424cm">
                <text:p/>
              </draw:line>
              <draw:custom-shape draw:style-name="gr496" draw:text-style-name="P35" draw:layer="layout" svg:width="0.034cm" svg:height="0.034cm" svg:x="21.986cm" svg:y="5.44cm">
                <text:p/>
                <draw:enhanced-geometry svg:viewBox="0 0 21600 21600" draw:type="rectangle" draw:enhanced-path="M 0 0 L 21600 0 21600 21600 0 21600 0 0 Z N"/>
              </draw:custom-shape>
              <draw:custom-shape draw:style-name="gr499" draw:text-style-name="P79" draw:layer="layout" svg:width="0.388cm" svg:height="0.034cm" svg:x="21.558cm" svg:y="5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500" draw:text-style-name="P79" draw:layer="layout" svg:width="0.423cm" svg:height="0.067cm" svg:x="21.541cm" svg:y="5.2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61" draw:text-style-name="P15" draw:layer="layout" svg:width="1.333cm" svg:height="0.729cm" svg:x="17.234cm" svg:y="14.328cm">
            <draw:object-ole draw:class-id="00000000-0000-0000-0000-000000000000" xlink:href="./Object 9" xlink:type="simple" xlink:show="embed" xlink:actuate="onLoad">
              <loext:p/>
            </draw:object-ole>
            <draw:image xlink:href="./ObjectReplacements/Object 9" xlink:type="simple" xlink:show="embed" xlink:actuate="onLoad"/>
          </draw:frame>
        </draw:g>
        <draw:custom-shape draw:style-name="gr562" draw:text-style-name="P100" draw:layer="layout" svg:width="9.578cm" svg:height="11.633cm" svg:x="3.134cm" svg:y="5.367cm">
          <text:list text:style-name="L20">
            <text:list-header>
              <text:p text:style-name="P99"><text:span text:style-name="T49">OLTP Transactions</text:span><text:span text:style-name="T49"><text:line-break/></text:span><text:span text:style-name="T49">Transformation</text:span><text:span text:style-name="T49"><text:line-break/></text:span><text:span text:style-name="T49">Enterprise DW Server</text:span><text:span text:style-name="T49"><text:line-break/></text:span><text:span text:style-name="T49">Transformation</text:span><text:span text:style-name="T49"><text:line-break/></text:span><text:span text:style-name="T49">Data Mart Servers</text:span><text:span text:style-name="T49"><text:line-break/></text:span><text:span text:style-name="T49">Data Mining Tools</text:span><text:span text:style-name="T49"><text:line-break/></text:span><text:span text:style-name="T49">Data Visualization Tools</text:span><text:span text:style-name="T49"><text:line-break/></text:span><text:span text:style-name="T49">Decision Support Client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63" draw:text-style-name="P14" draw:layer="layout" svg:x1="2.117cm" svg:y1="4.868cm" svg:x2="2.117cm" svg:y2="16.298cm">
          <text:p/>
        </draw:line>
        <anim:par presentation:node-type="timing-root">
          <anim:par smil:begin="id13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Anyone who has paid the personal price of implementing a data warehouse will nod their heads and agree that the benefits, which are real, come at a stiff cost in terms of IT resources. <text:s/></text:span></text:p>
                  <text:p text:style-name="P4"><text:span text:style-name="T3">First, they are hard to build. <text:s/></text:span></text:p>
                  <text:p text:style-name="P4"><text:span text:style-name="T3">Second, they are difficult and complicated to maintain.</text:span></text:p>
                  <text:p text:style-name="P4"><text:span text:style-name="T3">The infrastructure needed for a well-running data warehouse is radically different than, say, a production online transaction processing system.</text:span></text:p>
                </text:list-header>
              </text:list>
            </draw:text-box>
          </draw:frame>
        </presentation:notes>
      </draw:page>
      <draw:page draw:name="Client/Server Integration with Web Applications" draw:style-name="dp1" draw:master-page-name="Default" presentation:presentation-page-layout-name="AL2T1" xml:id="id14" draw:id="id14">
        <draw:custom-shape draw:style-name="gr564" draw:text-style-name="P2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line draw:style-name="gr565" draw:text-style-name="P14" draw:layer="layout" svg:x1="9.357cm" svg:y1="13.529cm" svg:x2="10.517cm" svg:y2="15.677cm">
          <text:p/>
        </draw:line>
        <draw:frame presentation:style-name="pr7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Client/Server Integration with<text:line-break/>Web Applications</text:p>
              </text:list-header>
            </text:list>
          </draw:text-box>
        </draw:frame>
        <draw:frame presentation:style-name="pr10" draw:text-style-name="P2" draw:layer="layout" svg:width="11.218cm" svg:height="8.255cm" svg:x="13.798cm" svg:y="8.25cm" presentation:class="outline" presentation:user-transformed="true">
          <draw:text-box>
            <text:list text:style-name="L4">
              <text:list-item>
                <text:p text:style-name="P101"><text:span text:style-name="T50">Just as IS masters client-server technology ...</text:span></text:p>
              </text:list-item>
              <text:list-item>
                <text:p text:style-name="P101"><text:span text:style-name="T50">Along comes the Web!</text:span></text:p>
              </text:list-item>
              <text:list-item>
                <text:p text:style-name="P101"><text:span text:style-name="T50">Issues:</text:span></text:p>
              </text:list-item>
            </text:list>
            <text:list text:style-name="L21">
              <text:list-item>
                <text:list>
                  <text:list-item>
                    <text:p text:style-name="P102"><text:span text:style-name="T51">Legacy C-S integration</text:span></text:p>
                  </text:list-item>
                  <text:list-item>
                    <text:p text:style-name="P102"><text:span text:style-name="T51">Evolving but “Not There” standards</text:span></text:p>
                  </text:list-item>
                  <text:list-item>
                    <text:p text:style-name="P102"><text:span text:style-name="T51">N-tier complexities</text:span></text:p>
                  </text:list-item>
                  <text:list-item>
                    <text:p text:style-name="P102"><text:span text:style-name="T51">Programmer unfamiliarity</text:span></text:p>
                  </text:list-item>
                </text:list>
              </text:list-item>
            </text:list>
          </draw:text-box>
        </draw:frame>
        <draw:line draw:style-name="gr566" draw:text-style-name="P14" draw:layer="layout" svg:x1="9.476cm" svg:y1="9.036cm" svg:x2="9.476cm" svg:y2="11.135cm">
          <text:p/>
        </draw:line>
        <draw:line draw:style-name="gr567" draw:text-style-name="P14" draw:layer="layout" svg:x1="11.835cm" svg:y1="9.247cm" svg:x2="10.036cm" svg:y2="11.448cm">
          <text:p/>
        </draw:line>
        <draw:line draw:style-name="gr567" draw:text-style-name="P14" draw:layer="layout" svg:x1="6.544cm" svg:y1="9.036cm" svg:x2="8.639cm" svg:y2="11.606cm">
          <text:p/>
        </draw:line>
        <draw:custom-shape draw:style-name="gr568" draw:text-style-name="P29" draw:layer="layout" svg:width="1.919cm" svg:height="1.105cm" svg:x="4.443cm" svg:y="5.715cm">
          <text:list text:style-name="L5">
            <text:list-header>
              <text:p text:style-name="P28"><text:span text:style-name="T52">Ingres,</text:span></text:p>
              <text:p text:style-name="P28"><text:span text:style-name="T52">Jasmine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4">
          <draw:custom-shape draw:style-name="gr569" draw:text-style-name="P103" draw:layer="layout" svg:width="1.989cm" svg:height="1.217cm" svg:x="4.48cm" svg:y="8.105cm">
            <text:p/>
            <draw:enhanced-geometry svg:viewBox="0 0 451 276" draw:type="non-primitive" draw:enhanced-path="M 450 193  L 244 275  L 167 253  L 0 138  L 366 0  L 450 193  N"/>
          </draw:custom-shape>
          <draw:g draw:style-name="gr4">
            <draw:custom-shape draw:style-name="gr570" draw:text-style-name="P70" draw:layer="layout" svg:width="0.555cm" svg:height="1.764cm" svg:x="5.808cm" svg:y="7.245cm">
              <text:p/>
              <draw:enhanced-geometry svg:viewBox="0 0 126 400" draw:type="non-primitive" draw:enhanced-path="M 0 0  L 0 332  L 125 399  L 125 68  L 0 0  N"/>
            </draw:custom-shape>
            <draw:custom-shape draw:style-name="gr571" draw:text-style-name="P74" draw:layer="layout" svg:width="0.798cm" svg:height="1.931cm" svg:x="6.35cm" svg:y="7.038cm">
              <text:p/>
              <draw:enhanced-geometry svg:viewBox="0 0 181 438" draw:type="non-primitive" draw:enhanced-path="M 2 437  L 180 310  L 180 0  L 0 118  L 2 437  N"/>
            </draw:custom-shape>
            <draw:custom-shape draw:style-name="gr572" draw:text-style-name="P13" draw:layer="layout" svg:width="1.372cm" svg:height="0.806cm" svg:x="5.794cm" svg:y="6.765cm">
              <text:p/>
              <draw:enhanced-geometry svg:viewBox="0 0 311 183" draw:type="non-primitive" draw:enhanced-path="M 0 112  L 183 0  L 310 68  L 127 182  L 0 112  N"/>
            </draw:custom-shape>
            <draw:custom-shape draw:style-name="gr573" draw:text-style-name="P13" draw:layer="layout" svg:width="0.89cm" svg:height="0.538cm" svg:x="6.346cm" svg:y="7.21cm">
              <text:p/>
              <draw:enhanced-geometry svg:viewBox="0 0 202 122" draw:type="non-primitive" draw:enhanced-path="M 17 121  L 201 7  L 184 0  L 0 114  L 17 121  N"/>
            </draw:custom-shape>
            <draw:custom-shape draw:style-name="gr574" draw:text-style-name="P74" draw:layer="layout" svg:width="0.838cm" svg:height="1.517cm" svg:x="6.403cm" svg:y="7.245cm">
              <text:p/>
              <draw:enhanced-geometry svg:viewBox="0 0 190 344" draw:type="non-primitive" draw:enhanced-path="M 0 343  L 189 209  L 189 0  L 3 116  L 0 343  N"/>
            </draw:custom-shape>
            <draw:custom-shape draw:style-name="gr575" draw:text-style-name="P70" draw:layer="layout" svg:width="0.653cm" svg:height="1.751cm" svg:x="5.794cm" svg:y="7.258cm">
              <text:p/>
              <draw:enhanced-geometry svg:viewBox="0 0 148 397" draw:type="non-primitive" draw:enhanced-path="M 3 0  L 0 327  L 125 396  L 130 353  L 147 341  L 147 121  L 128 108  L 128 76  L 3 0  N"/>
            </draw:custom-shape>
            <draw:line draw:style-name="gr232" draw:text-style-name="P14" draw:layer="layout" svg:x1="6.451cm" svg:y1="7.929cm" svg:x2="7.236cm" svg:y2="7.435cm">
              <text:p/>
            </draw:line>
            <draw:line draw:style-name="gr232" draw:text-style-name="P14" draw:layer="layout" svg:x1="6.451cm" svg:y1="8.298cm" svg:x2="7.236cm" svg:y2="7.809cm">
              <text:p/>
            </draw:line>
            <draw:line draw:style-name="gr232" draw:text-style-name="P14" draw:layer="layout" svg:x1="6.451cm" svg:y1="8.427cm" svg:x2="7.236cm" svg:y2="7.929cm">
              <text:p/>
            </draw:line>
            <draw:g draw:style-name="gr1">
              <draw:line draw:style-name="gr232" draw:text-style-name="P14" draw:layer="layout" svg:x1="6.959cm" svg:y1="7.712cm" svg:x2="7.161cm" svg:y2="7.579cm">
                <text:p/>
              </draw:line>
              <draw:line draw:style-name="gr232" draw:text-style-name="P14" draw:layer="layout" svg:x1="6.959cm" svg:y1="7.769cm" svg:x2="7.161cm" svg:y2="7.632cm">
                <text:p/>
              </draw:line>
              <draw:line draw:style-name="gr232" draw:text-style-name="P14" draw:layer="layout" svg:x1="6.959cm" svg:y1="7.823cm" svg:x2="7.161cm" svg:y2="7.691cm">
                <text:p/>
              </draw:line>
            </draw:g>
            <draw:g draw:style-name="gr1">
              <draw:line draw:style-name="gr232" draw:text-style-name="P14" draw:layer="layout" svg:x1="6.548cm" svg:y1="7.977cm" svg:x2="6.756cm" svg:y2="7.849cm">
                <text:p/>
              </draw:line>
              <draw:line draw:style-name="gr232" draw:text-style-name="P14" draw:layer="layout" svg:x1="6.548cm" svg:y1="8.034cm" svg:x2="6.756cm" svg:y2="7.901cm">
                <text:p/>
              </draw:line>
              <draw:line draw:style-name="gr232" draw:text-style-name="P14" draw:layer="layout" svg:x1="6.548cm" svg:y1="8.087cm" svg:x2="6.756cm" svg:y2="7.951cm">
                <text:p/>
              </draw:line>
            </draw:g>
          </draw:g>
        </draw:g>
        <draw:g draw:style-name="gr4">
          <draw:custom-shape draw:style-name="gr569" draw:text-style-name="P103" draw:layer="layout" svg:width="1.989cm" svg:height="1.217cm" svg:x="7.655cm" svg:y="8.105cm">
            <text:p/>
            <draw:enhanced-geometry svg:viewBox="0 0 451 276" draw:type="non-primitive" draw:enhanced-path="M 450 193  L 244 275  L 167 253  L 0 138  L 366 0  L 450 193  N"/>
          </draw:custom-shape>
          <draw:g draw:style-name="gr4">
            <draw:custom-shape draw:style-name="gr570" draw:text-style-name="P70" draw:layer="layout" svg:width="0.555cm" svg:height="1.764cm" svg:x="8.983cm" svg:y="7.245cm">
              <text:p/>
              <draw:enhanced-geometry svg:viewBox="0 0 126 400" draw:type="non-primitive" draw:enhanced-path="M 0 0  L 0 332  L 125 399  L 125 68  L 0 0  N"/>
            </draw:custom-shape>
            <draw:custom-shape draw:style-name="gr571" draw:text-style-name="P74" draw:layer="layout" svg:width="0.798cm" svg:height="1.931cm" svg:x="9.525cm" svg:y="7.038cm">
              <text:p/>
              <draw:enhanced-geometry svg:viewBox="0 0 181 438" draw:type="non-primitive" draw:enhanced-path="M 2 437  L 180 310  L 180 0  L 0 118  L 2 437  N"/>
            </draw:custom-shape>
            <draw:custom-shape draw:style-name="gr572" draw:text-style-name="P13" draw:layer="layout" svg:width="1.372cm" svg:height="0.806cm" svg:x="8.969cm" svg:y="6.765cm">
              <text:p/>
              <draw:enhanced-geometry svg:viewBox="0 0 311 183" draw:type="non-primitive" draw:enhanced-path="M 0 112  L 183 0  L 310 68  L 127 182  L 0 112  N"/>
            </draw:custom-shape>
            <draw:custom-shape draw:style-name="gr573" draw:text-style-name="P13" draw:layer="layout" svg:width="0.89cm" svg:height="0.538cm" svg:x="9.521cm" svg:y="7.21cm">
              <text:p/>
              <draw:enhanced-geometry svg:viewBox="0 0 202 122" draw:type="non-primitive" draw:enhanced-path="M 17 121  L 201 7  L 184 0  L 0 114  L 17 121  N"/>
            </draw:custom-shape>
            <draw:custom-shape draw:style-name="gr574" draw:text-style-name="P74" draw:layer="layout" svg:width="0.838cm" svg:height="1.517cm" svg:x="9.578cm" svg:y="7.245cm">
              <text:p/>
              <draw:enhanced-geometry svg:viewBox="0 0 190 344" draw:type="non-primitive" draw:enhanced-path="M 0 343  L 189 209  L 189 0  L 3 116  L 0 343  N"/>
            </draw:custom-shape>
            <draw:custom-shape draw:style-name="gr575" draw:text-style-name="P70" draw:layer="layout" svg:width="0.653cm" svg:height="1.751cm" svg:x="8.969cm" svg:y="7.258cm">
              <text:p/>
              <draw:enhanced-geometry svg:viewBox="0 0 148 397" draw:type="non-primitive" draw:enhanced-path="M 3 0  L 0 327  L 125 396  L 130 353  L 147 341  L 147 121  L 128 108  L 128 76  L 3 0  N"/>
            </draw:custom-shape>
            <draw:line draw:style-name="gr232" draw:text-style-name="P14" draw:layer="layout" svg:x1="9.626cm" svg:y1="7.929cm" svg:x2="10.411cm" svg:y2="7.435cm">
              <text:p/>
            </draw:line>
            <draw:line draw:style-name="gr232" draw:text-style-name="P14" draw:layer="layout" svg:x1="9.626cm" svg:y1="8.298cm" svg:x2="10.411cm" svg:y2="7.809cm">
              <text:p/>
            </draw:line>
            <draw:line draw:style-name="gr232" draw:text-style-name="P14" draw:layer="layout" svg:x1="9.626cm" svg:y1="8.427cm" svg:x2="10.411cm" svg:y2="7.929cm">
              <text:p/>
            </draw:line>
            <draw:g draw:style-name="gr1">
              <draw:line draw:style-name="gr232" draw:text-style-name="P14" draw:layer="layout" svg:x1="10.134cm" svg:y1="7.712cm" svg:x2="10.336cm" svg:y2="7.579cm">
                <text:p/>
              </draw:line>
              <draw:line draw:style-name="gr232" draw:text-style-name="P14" draw:layer="layout" svg:x1="10.134cm" svg:y1="7.769cm" svg:x2="10.336cm" svg:y2="7.632cm">
                <text:p/>
              </draw:line>
              <draw:line draw:style-name="gr232" draw:text-style-name="P14" draw:layer="layout" svg:x1="10.134cm" svg:y1="7.823cm" svg:x2="10.336cm" svg:y2="7.691cm">
                <text:p/>
              </draw:line>
            </draw:g>
            <draw:g draw:style-name="gr1">
              <draw:line draw:style-name="gr232" draw:text-style-name="P14" draw:layer="layout" svg:x1="9.723cm" svg:y1="7.977cm" svg:x2="9.931cm" svg:y2="7.849cm">
                <text:p/>
              </draw:line>
              <draw:line draw:style-name="gr232" draw:text-style-name="P14" draw:layer="layout" svg:x1="9.723cm" svg:y1="8.034cm" svg:x2="9.931cm" svg:y2="7.901cm">
                <text:p/>
              </draw:line>
              <draw:line draw:style-name="gr232" draw:text-style-name="P14" draw:layer="layout" svg:x1="9.723cm" svg:y1="8.087cm" svg:x2="9.931cm" svg:y2="7.951cm">
                <text:p/>
              </draw:line>
            </draw:g>
          </draw:g>
        </draw:g>
        <draw:g draw:style-name="gr4">
          <draw:custom-shape draw:style-name="gr569" draw:text-style-name="P103" draw:layer="layout" svg:width="1.989cm" svg:height="1.217cm" svg:x="10.83cm" svg:y="8.105cm">
            <text:p/>
            <draw:enhanced-geometry svg:viewBox="0 0 451 276" draw:type="non-primitive" draw:enhanced-path="M 450 193  L 244 275  L 167 253  L 0 138  L 366 0  L 450 193  N"/>
          </draw:custom-shape>
          <draw:g draw:style-name="gr4">
            <draw:custom-shape draw:style-name="gr570" draw:text-style-name="P70" draw:layer="layout" svg:width="0.555cm" svg:height="1.764cm" svg:x="12.158cm" svg:y="7.245cm">
              <text:p/>
              <draw:enhanced-geometry svg:viewBox="0 0 126 400" draw:type="non-primitive" draw:enhanced-path="M 0 0  L 0 332  L 125 399  L 125 68  L 0 0  N"/>
            </draw:custom-shape>
            <draw:custom-shape draw:style-name="gr571" draw:text-style-name="P74" draw:layer="layout" svg:width="0.798cm" svg:height="1.931cm" svg:x="12.7cm" svg:y="7.038cm">
              <text:p/>
              <draw:enhanced-geometry svg:viewBox="0 0 181 438" draw:type="non-primitive" draw:enhanced-path="M 2 437  L 180 310  L 180 0  L 0 118  L 2 437  N"/>
            </draw:custom-shape>
            <draw:custom-shape draw:style-name="gr572" draw:text-style-name="P13" draw:layer="layout" svg:width="1.372cm" svg:height="0.806cm" svg:x="12.144cm" svg:y="6.765cm">
              <text:p/>
              <draw:enhanced-geometry svg:viewBox="0 0 311 183" draw:type="non-primitive" draw:enhanced-path="M 0 112  L 183 0  L 310 68  L 127 182  L 0 112  N"/>
            </draw:custom-shape>
            <draw:custom-shape draw:style-name="gr573" draw:text-style-name="P13" draw:layer="layout" svg:width="0.89cm" svg:height="0.538cm" svg:x="12.696cm" svg:y="7.21cm">
              <text:p/>
              <draw:enhanced-geometry svg:viewBox="0 0 202 122" draw:type="non-primitive" draw:enhanced-path="M 17 121  L 201 7  L 184 0  L 0 114  L 17 121  N"/>
            </draw:custom-shape>
            <draw:custom-shape draw:style-name="gr574" draw:text-style-name="P74" draw:layer="layout" svg:width="0.838cm" svg:height="1.517cm" svg:x="12.753cm" svg:y="7.245cm">
              <text:p/>
              <draw:enhanced-geometry svg:viewBox="0 0 190 344" draw:type="non-primitive" draw:enhanced-path="M 0 343  L 189 209  L 189 0  L 3 116  L 0 343  N"/>
            </draw:custom-shape>
            <draw:custom-shape draw:style-name="gr575" draw:text-style-name="P70" draw:layer="layout" svg:width="0.653cm" svg:height="1.751cm" svg:x="12.144cm" svg:y="7.258cm">
              <text:p/>
              <draw:enhanced-geometry svg:viewBox="0 0 148 397" draw:type="non-primitive" draw:enhanced-path="M 3 0  L 0 327  L 125 396  L 130 353  L 147 341  L 147 121  L 128 108  L 128 76  L 3 0  N"/>
            </draw:custom-shape>
            <draw:line draw:style-name="gr232" draw:text-style-name="P14" draw:layer="layout" svg:x1="12.801cm" svg:y1="7.929cm" svg:x2="13.586cm" svg:y2="7.435cm">
              <text:p/>
            </draw:line>
            <draw:line draw:style-name="gr232" draw:text-style-name="P14" draw:layer="layout" svg:x1="12.801cm" svg:y1="8.298cm" svg:x2="13.586cm" svg:y2="7.809cm">
              <text:p/>
            </draw:line>
            <draw:line draw:style-name="gr232" draw:text-style-name="P14" draw:layer="layout" svg:x1="12.801cm" svg:y1="8.427cm" svg:x2="13.586cm" svg:y2="7.929cm">
              <text:p/>
            </draw:line>
            <draw:g draw:style-name="gr1">
              <draw:line draw:style-name="gr232" draw:text-style-name="P14" draw:layer="layout" svg:x1="13.309cm" svg:y1="7.712cm" svg:x2="13.511cm" svg:y2="7.579cm">
                <text:p/>
              </draw:line>
              <draw:line draw:style-name="gr232" draw:text-style-name="P14" draw:layer="layout" svg:x1="13.309cm" svg:y1="7.769cm" svg:x2="13.511cm" svg:y2="7.632cm">
                <text:p/>
              </draw:line>
              <draw:line draw:style-name="gr232" draw:text-style-name="P14" draw:layer="layout" svg:x1="13.309cm" svg:y1="7.823cm" svg:x2="13.511cm" svg:y2="7.691cm">
                <text:p/>
              </draw:line>
            </draw:g>
            <draw:g draw:style-name="gr1">
              <draw:line draw:style-name="gr232" draw:text-style-name="P14" draw:layer="layout" svg:x1="12.898cm" svg:y1="7.977cm" svg:x2="13.106cm" svg:y2="7.849cm">
                <text:p/>
              </draw:line>
              <draw:line draw:style-name="gr232" draw:text-style-name="P14" draw:layer="layout" svg:x1="12.898cm" svg:y1="8.034cm" svg:x2="13.106cm" svg:y2="7.901cm">
                <text:p/>
              </draw:line>
              <draw:line draw:style-name="gr232" draw:text-style-name="P14" draw:layer="layout" svg:x1="12.898cm" svg:y1="8.087cm" svg:x2="13.106cm" svg:y2="7.951cm">
                <text:p/>
              </draw:line>
            </draw:g>
          </draw:g>
        </draw:g>
        <draw:custom-shape draw:style-name="gr576" draw:text-style-name="P29" draw:layer="layout" svg:width="1.644cm" svg:height="0.681cm" svg:x="7.117cm" svg:y="9.648cm">
          <text:list text:style-name="L5">
            <text:list-header>
              <text:p text:style-name="P28"><text:span text:style-name="T53">TCP/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7" draw:text-style-name="P29" draw:layer="layout" svg:width="1.547cm" svg:height="0.681cm" svg:x="11.415cm" svg:y="9.631cm">
          <text:list text:style-name="L5">
            <text:list-header>
              <text:p text:style-name="P28"><text:span text:style-name="T53">LU 6.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8" draw:text-style-name="P29" draw:layer="layout" svg:width="4.74cm" svg:height="1.105cm" svg:x="10.103cm" svg:y="5.6cm">
          <text:list text:style-name="L5">
            <text:list-header>
              <text:p text:style-name="P28"><text:span text:style-name="T52">DB2/MVS, IMS,</text:span></text:p>
              <text:p text:style-name="P28"><text:span text:style-name="T52">VSAM, IDM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9" draw:text-style-name="P29" draw:layer="layout" svg:width="4.56cm" svg:height="1.105cm" svg:x="6.932cm" svg:y="5.561cm">
          <text:list text:style-name="L5">
            <text:list-header>
              <text:p text:style-name="P28"><text:span text:style-name="T52">Oracle, Informix,</text:span></text:p>
              <text:p text:style-name="P28"><text:span text:style-name="T52">Syba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0" draw:text-style-name="P104" draw:layer="layout" svg:width="3.572cm" svg:height="2.183cm" svg:x="4.083cm" svg:y="15.9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8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65" draw:text-style-name="P14" draw:layer="layout" svg:x1="5.521cm" svg:y1="13.56cm" svg:x2="6.645cm" svg:y2="15.941cm">
          <text:p/>
        </draw:line>
        <draw:line draw:style-name="gr567" draw:text-style-name="P14" draw:layer="layout" svg:x1="6.659cm" svg:y1="12.7cm" svg:x2="8.599cm" svg:y2="12.7cm">
          <text:p/>
        </draw:line>
        <draw:custom-shape draw:style-name="gr581" draw:text-style-name="P105" draw:layer="layout" svg:width="2.708cm" svg:height="1.715cm" svg:x="3.92cm" svg:y="11.8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8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2" draw:text-style-name="P29" draw:layer="layout" svg:width="1.619cm" svg:height="1.273cm" svg:x="4.088cm" svg:y="14.235cm">
          <text:list text:style-name="L5">
            <text:list-header>
              <text:p text:style-name="P28"><text:span text:style-name="T54">IIOP</text:span></text:p>
              <text:p text:style-name="P28"><text:span text:style-name="T54">HTT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3" draw:text-style-name="P29" draw:layer="layout" svg:width="1.361cm" svg:height="0.765cm" svg:x="7.66cm" svg:y="13.617cm">
          <text:list text:style-name="L5">
            <text:list-header>
              <text:p text:style-name="P28"><text:span text:style-name="T54">II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4" draw:text-style-name="P106" draw:layer="layout" svg:width="3.211cm" svg:height="1.853cm" svg:x="8.647cm" svg:y="11.62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8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67" draw:text-style-name="P14" draw:layer="layout" svg:x1="5.988cm" svg:y1="9.066cm" svg:x2="5.102cm" svg:y2="11.655cm">
          <text:p/>
        </draw:line>
        <draw:custom-shape draw:style-name="gr585" draw:text-style-name="P29" draw:layer="layout" svg:width="2.423cm" svg:height="1.529cm" svg:x="3.928cm" svg:y="12.171cm">
          <text:list text:style-name="L17">
            <text:list-header>
              <text:p text:style-name="P28"><text:span text:style-name="T55">Web </text:span></text:p>
              <text:p text:style-name="P28"><text:span text:style-name="T55">Application</text:span></text:p>
              <text:p text:style-name="P28"><text:span text:style-name="T55">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6" draw:text-style-name="P29" draw:layer="layout" svg:width="2.309cm" svg:height="1.953cm" svg:x="9.01cm" svg:y="12.131cm">
          <text:list text:style-name="L17">
            <text:list-header>
              <text:p text:style-name="P28"><text:span text:style-name="T55">Traditional</text:span><text:span text:style-name="T55"><text:line-break/></text:span><text:span text:style-name="T55">Client-</text:span><text:span text:style-name="T55"><text:line-break/></text:span><text:span text:style-name="T55">Server</text:span><text:span text:style-name="T55"><text:line-break/></text:span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7" draw:text-style-name="P104" draw:layer="layout" svg:width="3.4cm" svg:height="2.183cm" svg:x="9.437cm" svg:y="15.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8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8" draw:text-style-name="P29" draw:layer="layout" svg:width="3.266cm" svg:height="1.443cm" svg:x="9.299cm" svg:y="16.342cm">
          <text:list text:style-name="L17">
            <text:list-header>
              <text:p text:style-name="P28"><text:span text:style-name="T56">SQL </text:span><text:span text:style-name="T56"><text:line-break/></text:span><text:span text:style-name="T56">“Fat Client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9" draw:text-style-name="P29" draw:layer="layout" svg:width="2.745cm" svg:height="1.273cm" svg:x="4.256cm" svg:y="16.757cm">
          <text:list text:style-name="L17">
            <text:list-header>
              <text:p text:style-name="P28"><text:span text:style-name="T57">Web/Corba</text:span></text:p>
              <text:p text:style-name="P28"><text:span text:style-name="T57">Clien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65" draw:text-style-name="P14" draw:layer="layout" svg:x1="9.118cm" svg:y1="13.52cm" svg:x2="6.909cm" svg:y2="15.91cm">
          <text:p/>
        </draw:line>
        <draw:custom-shape draw:style-name="gr590" draw:text-style-name="P29" draw:layer="layout" svg:width="2.724cm" svg:height="1.273cm" svg:x="10.368cm" svg:y="14.041cm">
          <text:list text:style-name="L5">
            <text:list-header>
              <text:p text:style-name="P28"><text:span text:style-name="T54">proprietary</text:span><text:span text:style-name="T54"><text:line-break/></text:span><text:span text:style-name="T54">net protocol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fadeOverColor" smil:fadeColor="#000000"/>
          </anim:par>
        </anim:par>
        <presentation:notes draw:style-name="dp3">
          <draw:frame draw:style-name="gr33" draw:text-style-name="P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33" draw:text-style-name="P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34" draw:text-style-name="P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custom-shape draw:style-name="gr591" draw:text-style-name="P5" draw:layer="layout" svg:width="8.259cm" svg:height="1.27cm" svg:x="10.795cm" svg:y="-0.004cm">
            <text:p/>
            <draw:enhanced-geometry svg:viewBox="0 0 21600 21600" draw:type="rectangle" draw:enhanced-path="M 0 0 L 21600 0 21600 21600 0 21600 0 0 Z N"/>
          </draw:custom-shape>
          <draw:custom-shape draw:style-name="gr592" draw:text-style-name="P107" draw:layer="layout" svg:width="8.259cm" svg:height="1.279cm" svg:x="10.795cm" svg:y="24.121cm">
            <text:list text:style-name="L3">
              <text:list-header>
                <text:p text:style-name="P24"><text:span text:style-name="T58">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3" draw:text-style-name="P5" draw:layer="layout" svg:width="8.259cm" svg:height="1.279cm" svg:x="-0.004cm" svg:y="24.121cm">
            <text:p/>
            <draw:enhanced-geometry svg:viewBox="0 0 21600 21600" draw:type="rectangle" draw:enhanced-path="M 0 0 L 21600 0 21600 21600 0 21600 0 0 Z N"/>
          </draw:custom-shape>
          <draw:custom-shape draw:style-name="gr591" draw:text-style-name="P5" draw:layer="layout" svg:width="8.259cm" svg:height="1.27cm" svg:x="-0.004cm" svg:y="-0.004cm">
            <text:p/>
            <draw:enhanced-geometry svg:viewBox="0 0 21600 21600" draw:type="rectangle" draw:enhanced-path="M 0 0 L 21600 0 21600 21600 0 21600 0 0 Z N"/>
          </draw:custom-shape>
          <draw:page-thumbnail draw:style-name="gr1" draw:layer="layout" svg:width="12.648cm" svg:height="9.49cm" svg:x="3.201cm" svg:y="1.896cm" draw:page-number="14" presentation:class="page"/>
          <draw:frame presentation:style-name="pr11" draw:text-style-name="P5" draw:layer="layout" svg:width="13.978cm" svg:height="11.439cm" svg:x="2.536cm" svg:y="12.055cm" presentation:class="notes" presentation:user-transformed="true">
            <draw:text-box>
              <text:list text:style-name="L3">
                <text:list-header>
                  <text:p text:style-name="P4"><text:span text:style-name="T35">So, your programmers finally got proficient at Powerbuilder, or Ingres Windows 4GL, or some other client-server tool.</text:span></text:p>
                  <text:p text:style-name="P4"><text:span text:style-name="T35">You took a well-deserved trip to the Bahamas in 1997, came back and WHAM, your development roadmap suddenly said web, Java, and components.</text:span></text:p>
                  <text:p text:style-name="P4"><text:span text:style-name="T35">This means the IT development organization suddenly has to deal with now-legacy C-S apps, and wrestle with fast evolving technologies like Java while developing that mission-critical app the CEO is demanding to stave-off your competitors.</text:span></text:p>
                  <text:p text:style-name="P4"><text:span text:style-name="T35">Integrating new thin and thick web applications with existing data and applications will occupy at least a generation of programmers.</text:span></text:p>
                </text:list-header>
              </text:list>
            </draw:text-box>
          </draw:frame>
        </presentation:notes>
      </draw:page>
      <draw:page draw:name="CEO’s Infinite Resource Planning Vision" draw:style-name="dp1" draw:master-page-name="Default" presentation:presentation-page-layout-name="AL2T1" xml:id="id15" draw:id="id15">
        <draw:g draw:style-name="gr4">
          <draw:g draw:style-name="gr4">
            <draw:g draw:style-name="gr4">
              <draw:custom-shape draw:style-name="gr594" draw:text-style-name="P108" draw:layer="layout" svg:width="7.122cm" svg:height="4.04cm" svg:x="2.875cm" svg:y="4.083cm">
                <text:p/>
                <draw:enhanced-geometry svg:viewBox="0 0 21600 21600" draw:type="rectangle" draw:enhanced-path="M 0 0 L 21600 0 21600 21600 0 21600 0 0 Z N"/>
              </draw:custom-shape>
              <draw:custom-shape draw:style-name="gr595" draw:text-style-name="P109" draw:layer="layout" svg:width="6.275cm" svg:height="4.035cm" svg:x="3.726cm" svg:y="4.097cm">
                <text:p/>
                <draw:enhanced-geometry svg:viewBox="0 0 1423 915" draw:type="non-primitive" draw:enhanced-path="M 266 649  L 291 557  L 301 525  L 308 519  L 314 513  L 331 510  L 348 507  L 386 504  L 396 504  L 533 513  L 548 504  L 601 482  L 653 470  L 670 470  L 680 467  L 690 464  L 687 450  L 677 447  L 663 447  L 589 445  L 545 445  L 515 447  L 505 439  L 508 427  L 510 420  L 525 412  L 535 409  L 540 409  L 569 387  L 601 365  L 619 362  L 633 359  L 648 353  L 658 347  L 665 343  L 670 341  L 668 334  L 663 331  L 660 328  L 648 310  L 643 307  L 636 300  L 611 291  L 606 291  L 601 288  L 592 285  L 587 285  L 565 279  L 537 273  L 510 267  L 495 260  L 490 260  L 475 248  L 463 236  L 461 229  L 466 217  L 471 214  L 495 208  L 513 211  L 537 214  L 574 211  L 609 205  L 628 205  L 641 202  L 651 202  L 687 190  L 713 193  L 737 205  L 764 217  L 769 224  L 816 264  L 830 269  L 862 285  L 919 285  L 924 285  L 951 285  L 956 282  L 961 282  L 989 279  L 994 279  L 1006 276  L 1021 269  L 1040 264  L 1053 254  L 1058 251  L 1083 229  L 1099 208  L 1102 186  L 1099 180  L 1091 171  L 1077 168  L 1072 165  L 1063 165  L 1038 165  L 1028 168  L 1018 171  L 991 186  L 969 195  L 959 199  L 917 205  L 890 205  L 885 205  L 867 202  L 862 199  L 850 180  L 845 177  L 829 174  L 811 174  L 787 177  L 772 180  L 757 180  L 742 180  L 727 180  L 717 180  L 715 174  L 717 168  L 730 162  L 742 156  L 769 150  L 787 147  L 823 137  L 829 134  L 848 122  L 880 109  L 905 106  L 946 99  L 951 96  L 966 84  L 989 82  L 1006 78  L 1021 78  L 1055 54  L 1065 48  L 1129 30  L 1146 23  L 1161 20  L 1186 17  L 1193 14  L 1422 0  L 1418 911  L 0 914  L 266 649  N"/>
              </draw:custom-shape>
            </draw:g>
            <draw:g draw:style-name="gr4">
              <draw:g draw:style-name="gr4">
                <draw:g draw:style-name="gr4">
                  <draw:custom-shape draw:style-name="gr596" draw:text-style-name="P74" draw:layer="layout" svg:width="0.335cm" svg:height="0.185cm" svg:x="6.288cm" svg:y="4.73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597" draw:text-style-name="P74" draw:layer="layout" svg:width="0.331cm" svg:height="3.317cm" svg:x="6.288cm" svg:y="4.81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98" draw:text-style-name="P110" draw:layer="layout" svg:width="0.088cm" svg:height="3.201cm" svg:x="6.421cm" svg:y="4.82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99" draw:text-style-name="P110" draw:layer="layout" svg:width="0.088cm" svg:height="3.202cm" svg:x="6.372cm" svg:y="4.83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98" draw:text-style-name="P110" draw:layer="layout" svg:width="0.088cm" svg:height="3.201cm" svg:x="6.324cm" svg:y="4.82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00" draw:text-style-name="P111" draw:layer="layout" svg:width="0.088cm" svg:height="0.07cm" svg:x="6.284cm" svg:y="4.85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9cm" svg:height="0.07cm" svg:x="6.31cm" svg:y="4.82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8cm" svg:height="0.071cm" svg:x="6.346cm" svg:y="4.8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9cm" svg:height="0.07cm" svg:x="6.376cm" svg:y="4.7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8cm" svg:height="0.07cm" svg:x="6.416cm" svg:y="4.78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8cm" svg:height="0.07cm" svg:x="6.456cm" svg:y="4.78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8cm" svg:height="0.071cm" svg:x="6.491cm" svg:y="4.78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8cm" svg:height="0.07cm" svg:x="6.535cm" svg:y="4.7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9cm" svg:height="0.071cm" svg:x="6.57cm" svg:y="4.8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600" draw:text-style-name="P111" draw:layer="layout" svg:width="0.088cm" svg:height="0.071cm" svg:x="6.61cm" svg:y="4.83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601" draw:text-style-name="P35" draw:layer="layout" svg:width="0.657cm" svg:height="1.266cm" svg:x="6.266cm" svg:y="6.8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02" draw:text-style-name="P112" draw:layer="layout" svg:width="0.336cm" svg:height="1.124cm" svg:x="6.72cm" svg:y="5.843cm">
                  <text:p/>
                  <draw:enhanced-geometry svg:viewBox="0 0 76 255" draw:type="non-primitive" draw:enhanced-path="M 2 245  L 2 37  L 22 37  L 22 0  L 50 0  L 50 37  L 75 37  L 75 254  L 0 254  L 2 245  N"/>
                </draw:custom-shape>
                <draw:custom-shape draw:style-name="gr603" draw:text-style-name="P113" draw:layer="layout" svg:width="0.674cm" svg:height="0.79cm" svg:x="4.485cm" svg:y="6.654cm">
                  <text:p/>
                  <draw:enhanced-geometry svg:viewBox="0 0 153 179" draw:type="non-primitive" draw:enhanced-path="M 0 178  L 0 42  L 35 42  L 35 0  L 119 0  L 119 25  L 152 25  L 152 178  L 0 178  N"/>
                </draw:custom-shape>
                <draw:custom-shape draw:style-name="gr604" draw:text-style-name="P110" draw:layer="layout" svg:width="0.494cm" svg:height="1.143cm" svg:x="6.072cm" svg:y="6.989cm">
                  <text:p/>
                  <draw:enhanced-geometry svg:viewBox="0 0 21600 21600" draw:type="rectangle" draw:enhanced-path="M 0 0 L 21600 0 21600 21600 0 21600 0 0 Z N"/>
                </draw:custom-shape>
                <draw:g draw:style-name="gr4">
                  <draw:custom-shape draw:style-name="gr605" draw:text-style-name="P36" draw:layer="layout" svg:width="0.344cm" svg:height="2.037cm" svg:x="7.801cm" svg:y="5.561cm">
                    <text:p/>
                    <draw:enhanced-geometry svg:viewBox="0 0 78 462" draw:type="non-primitive" draw:enhanced-path="M 0 456  L 0 104  L 34 97  L 34 7  L 62 0  L 61 93  L 77 89  L 77 461  L 0 456  N"/>
                  </draw:custom-shape>
                  <draw:custom-shape draw:style-name="gr606" draw:text-style-name="P33" draw:layer="layout" svg:width="0.247cm" svg:height="2.028cm" svg:x="8.07cm" svg:y="5.561cm">
                    <text:p/>
                    <draw:enhanced-geometry svg:viewBox="0 0 56 460" draw:type="non-primitive" draw:enhanced-path="M 0 0  L 0 93  L 16 89  L 15 459  L 55 450  L 55 101  L 35 95  L 35 10  L 0 0  N"/>
                  </draw:custom-shape>
                </draw:g>
                <draw:custom-shape draw:style-name="gr607" draw:text-style-name="P114" draw:layer="layout" svg:width="1.041cm" svg:height="1.046cm" svg:x="7.373cm" svg:y="7.086cm">
                  <text:p/>
                  <draw:enhanced-geometry svg:viewBox="0 0 236 237" draw:type="non-primitive" draw:enhanced-path="M 63 14  L 80 23  L 83 23  L 85 23  L 88 21  L 90 19  L 90 15  L 91 12  L 91 9  L 91 6  L 91 3  L 92 0  L 95 0  L 98 0  L 102 3  L 104 5  L 107 6  L 110 7  L 112 9  L 115 14  L 117 15  L 120 19  L 120 21  L 121 25  L 124 26  L 124 29  L 124 33  L 127 31  L 129 28  L 132 25  L 134 25  L 137 25  L 139 25  L 142 26  L 144 26  L 147 26  L 149 26  L 152 26  L 153 23  L 155 21  L 158 20  L 160 20  L 162 20  L 165 20  L 167 19  L 170 17  L 173 17  L 175 19  L 177 19  L 180 20  L 182 20  L 186 20  L 189 17  L 191 14  L 194 14  L 197 12  L 199 12  L 202 14  L 203 17  L 205 20  L 205 23  L 205 26  L 205 29  L 208 33  L 210 36  L 212 36  L 215 36  L 217 36  L 219 39  L 220 43  L 223 44  L 224 47  L 225 50  L 227 53  L 229 57  L 230 60  L 232 63  L 233 66  L 235 69  L 235 73  L 235 76  L 230 236  L 0 236  L 63 14  N"/>
                </draw:custom-shape>
                <draw:g draw:style-name="gr4">
                  <draw:custom-shape draw:style-name="gr608" draw:text-style-name="P110" draw:layer="layout" svg:width="0.459cm" svg:height="0.78cm" svg:x="7.523cm" svg:y="7.36cm">
                    <text:p/>
                    <draw:enhanced-geometry svg:viewBox="0 0 104 177" draw:type="non-primitive" draw:enhanced-path="M 0 2  L 0 176  L 103 176  L 103 0  L 0 2  N"/>
                  </draw:custom-shape>
                  <draw:custom-shape draw:style-name="gr609" draw:text-style-name="P36" draw:layer="layout" svg:width="0.101cm" svg:height="0.794cm" svg:x="7.96cm" svg:y="7.355cm">
                    <text:p/>
                    <draw:enhanced-geometry svg:viewBox="0 0 23 180" draw:type="non-primitive" draw:enhanced-path="M 0 1  L 0 179  L 22 175  L 22 0  L 0 1  N"/>
                  </draw:custom-shape>
                </draw:g>
                <draw:custom-shape draw:style-name="gr610" draw:text-style-name="P112" draw:layer="layout" svg:width="0.291cm" svg:height="1.795cm" svg:x="8.383cm" svg:y="5.935cm">
                  <text:p/>
                  <draw:enhanced-geometry svg:viewBox="0 0 21600 21600" draw:type="rectangle" draw:enhanced-path="M 0 0 L 21600 0 21600 21600 0 21600 0 0 Z N"/>
                </draw:custom-shape>
                <draw:g draw:style-name="gr4">
                  <draw:custom-shape draw:style-name="gr611" draw:text-style-name="P36" draw:layer="layout" svg:width="0.9cm" svg:height="2.116cm" svg:x="8.771cm" svg:y="6.024cm">
                    <text:p/>
                    <draw:enhanced-geometry svg:viewBox="0 0 204 480" draw:type="non-primitive" draw:enhanced-path="M 203 478  L 203 7  L 0 0  L 0 479  L 203 478  N"/>
                  </draw:custom-shape>
                  <draw:custom-shape draw:style-name="gr612" draw:text-style-name="P110" draw:layer="layout" svg:width="0.331cm" svg:height="2.125cm" svg:x="8.475cm" svg:y="6.015cm">
                    <text:p/>
                    <draw:enhanced-geometry svg:viewBox="0 0 75 482" draw:type="non-primitive" draw:enhanced-path="M 74 0  L 0 15  L 0 479  L 74 481  L 74 0  N"/>
                  </draw:custom-shape>
                  <draw:g draw:style-name="gr1">
                    <draw:line draw:style-name="gr613" draw:text-style-name="P14" draw:layer="layout" svg:x1="8.881cm" svg:y1="6.134cm" svg:x2="9.631cm" svg:y2="6.16cm">
                      <text:p/>
                    </draw:line>
                    <draw:line draw:style-name="gr613" draw:text-style-name="P14" draw:layer="layout" svg:x1="8.881cm" svg:y1="6.288cm" svg:x2="9.618cm" svg:y2="6.31cm">
                      <text:p/>
                    </draw:line>
                    <draw:line draw:style-name="gr613" draw:text-style-name="P14" draw:layer="layout" svg:x1="8.872cm" svg:y1="6.447cm" svg:x2="9.622cm" svg:y2="6.473cm">
                      <text:p/>
                    </draw:line>
                    <draw:line draw:style-name="gr613" draw:text-style-name="P14" draw:layer="layout" svg:x1="8.872cm" svg:y1="6.61cm" svg:x2="9.622cm" svg:y2="6.628cm">
                      <text:p/>
                    </draw:line>
                    <draw:line draw:style-name="gr613" draw:text-style-name="P14" draw:layer="layout" svg:x1="8.872cm" svg:y1="6.769cm" svg:x2="9.622cm" svg:y2="6.787cm">
                      <text:p/>
                    </draw:line>
                    <draw:line draw:style-name="gr613" draw:text-style-name="P14" draw:layer="layout" svg:x1="8.868cm" svg:y1="6.936cm" svg:x2="9.613cm" svg:y2="6.954cm">
                      <text:p/>
                    </draw:line>
                    <draw:line draw:style-name="gr613" draw:text-style-name="P14" draw:layer="layout" svg:x1="8.872cm" svg:y1="7.082cm" svg:x2="9.613cm" svg:y2="7.104cm">
                      <text:p/>
                    </draw:line>
                    <draw:line draw:style-name="gr613" draw:text-style-name="P14" draw:layer="layout" svg:x1="8.868cm" svg:y1="7.254cm" svg:x2="9.609cm" svg:y2="7.28cm">
                      <text:p/>
                    </draw:line>
                  </draw:g>
                </draw:g>
                <draw:g draw:style-name="gr4">
                  <draw:custom-shape draw:style-name="gr614" draw:text-style-name="P36" draw:layer="layout" svg:width="0.335cm" svg:height="2.232cm" svg:x="6.972cm" svg:y="4.965cm">
                    <text:p/>
                    <draw:enhanced-geometry svg:viewBox="0 0 76 506" draw:type="non-primitive" draw:enhanced-path="M 75 0  L 0 25  L 0 505  L 75 505  L 75 0  N"/>
                  </draw:custom-shape>
                  <draw:custom-shape draw:style-name="gr615" draw:text-style-name="P110" draw:layer="layout" svg:width="0.202cm" svg:height="2.24cm" svg:x="7.303cm" svg:y="4.97cm">
                    <text:p/>
                    <draw:enhanced-geometry svg:viewBox="0 0 46 508" draw:type="non-primitive" draw:enhanced-path="M 0 0  L 0 504  L 45 507  L 45 19  L 0 0  N"/>
                  </draw:custom-shape>
                  <draw:line draw:style-name="gr616" draw:text-style-name="P14" draw:layer="layout" svg:x1="7.02cm" svg:y1="5.136cm" svg:x2="7.258cm" svg:y2="5.057cm">
                    <text:p/>
                  </draw:line>
                </draw:g>
                <draw:g draw:style-name="gr4">
                  <draw:custom-shape draw:style-name="gr617" draw:text-style-name="P33" draw:layer="layout" svg:width="0.181cm" svg:height="1.592cm" svg:x="3.36cm" svg:y="6.54cm">
                    <text:p/>
                    <draw:enhanced-geometry svg:viewBox="0 0 41 361" draw:type="non-primitive" draw:enhanced-path="M 40 0  L 0 15  L 0 360  L 40 358  L 40 0  N"/>
                  </draw:custom-shape>
                  <draw:custom-shape draw:style-name="gr618" draw:text-style-name="P112" draw:layer="layout" svg:width="1.328cm" svg:height="2.399cm" svg:x="3.523cm" svg:y="5.733cm">
                    <text:p/>
                    <draw:enhanced-geometry svg:viewBox="0 0 301 544" draw:type="non-primitive" draw:enhanced-path="M 0 411  L 0 180  L 52 184  L 52 17  L 104 0  L 158 6  L 158 161  L 175 156  L 203 167  L 203 75  L 232 64  L 300 76  L 300 543  L 0 543  L 0 411  N"/>
                  </draw:custom-shape>
                  <draw:line draw:style-name="gr619" draw:text-style-name="P14" draw:layer="layout" svg:x1="4.564cm" svg:y1="6.099cm" svg:x2="4.824cm" svg:y2="6.103cm">
                    <text:p/>
                  </draw:line>
                  <draw:line draw:style-name="gr619" draw:text-style-name="P14" draw:layer="layout" svg:x1="4.017cm" svg:y1="5.878cm" svg:x2="4.198cm" svg:y2="5.887cm">
                    <text:p/>
                  </draw:line>
                </draw:g>
                <draw:custom-shape draw:style-name="gr620" draw:text-style-name="P36" draw:layer="layout" svg:width="1.477cm" svg:height="1.715cm" svg:x="3.735cm" svg:y="6.421cm">
                  <text:p/>
                  <draw:enhanced-geometry svg:viewBox="0 0 335 389" draw:type="non-primitive" draw:enhanced-path="M 0 388  L 0 130  L 80 127  L 80 10  L 125 0  L 125 127  L 190 127  L 190 267  L 208 270  L 208 169  L 230 169  L 231 130  L 296 118  L 334 129  L 334 387  L 0 388  N"/>
                </draw:custom-shape>
                <draw:g draw:style-name="gr4">
                  <draw:custom-shape draw:style-name="gr621" draw:text-style-name="P33" draw:layer="layout" svg:width="0.15cm" svg:height="0.622cm" svg:x="5.155cm" svg:y="6.597cm">
                    <text:p/>
                    <draw:enhanced-geometry svg:viewBox="0 0 34 141" draw:type="non-primitive" draw:enhanced-path="M 0 1  L 0 138  L 33 140  L 33 0  L 0 1  N"/>
                  </draw:custom-shape>
                  <draw:custom-shape draw:style-name="gr622" draw:text-style-name="P33" draw:layer="layout" svg:width="0.168cm" svg:height="1.301cm" svg:x="4.815cm" svg:y="6.835cm">
                    <text:p/>
                    <draw:enhanced-geometry svg:viewBox="0 0 38 295" draw:type="non-primitive" draw:enhanced-path="M 37 0  L 0 12  L 0 294  L 37 294  L 37 0  N"/>
                  </draw:custom-shape>
                  <draw:custom-shape draw:style-name="gr623" draw:text-style-name="P110" draw:layer="layout" svg:width="0.489cm" svg:height="1.305cm" svg:x="4.97cm" svg:y="6.835cm">
                    <text:p/>
                    <draw:enhanced-geometry svg:viewBox="0 0 111 296" draw:type="non-primitive" draw:enhanced-path="M 108 22  L 0 0  L 0 294  L 110 295  L 108 22  N"/>
                  </draw:custom-shape>
                  <draw:g draw:style-name="gr1">
                    <draw:line draw:style-name="gr613" draw:text-style-name="P14" draw:layer="layout" svg:x1="5.054cm" svg:y1="7.029cm" svg:x2="5.38cm" svg:y2="7.1cm">
                      <text:p/>
                    </draw:line>
                    <draw:line draw:style-name="gr613" draw:text-style-name="P14" draw:layer="layout" svg:x1="5.049cm" svg:y1="7.161cm" svg:x2="5.389cm" svg:y2="7.228cm">
                      <text:p/>
                    </draw:line>
                    <draw:line draw:style-name="gr613" draw:text-style-name="P14" draw:layer="layout" svg:x1="5.049cm" svg:y1="7.289cm" svg:x2="5.389cm" svg:y2="7.351cm">
                      <text:p/>
                    </draw:line>
                    <draw:line draw:style-name="gr613" draw:text-style-name="P14" draw:layer="layout" svg:x1="5.049cm" svg:y1="7.408cm" svg:x2="5.38cm" svg:y2="7.466cm">
                      <text:p/>
                    </draw:line>
                    <draw:line draw:style-name="gr613" draw:text-style-name="P14" draw:layer="layout" svg:x1="5.049cm" svg:y1="7.536cm" svg:x2="5.38cm" svg:y2="7.58cm">
                      <text:p/>
                    </draw:line>
                    <draw:line draw:style-name="gr613" draw:text-style-name="P14" draw:layer="layout" svg:x1="5.049cm" svg:y1="7.651cm" svg:x2="5.38cm" svg:y2="7.691cm">
                      <text:p/>
                    </draw:line>
                  </draw:g>
                </draw:g>
                <draw:g draw:style-name="gr4">
                  <draw:custom-shape draw:style-name="gr624" draw:text-style-name="P112" draw:layer="layout" svg:width="0.802cm" svg:height="1.186cm" svg:x="5.314cm" svg:y="6.954cm">
                    <text:p/>
                    <draw:enhanced-geometry svg:viewBox="0 0 182 269" draw:type="non-primitive" draw:enhanced-path="M 0 17  L 40 0  L 181 21  L 181 268  L 0 268  L 0 17  N"/>
                  </draw:custom-shape>
                  <draw:g draw:style-name="gr1">
                    <draw:line draw:style-name="gr613" draw:text-style-name="P14" draw:layer="layout" svg:x1="5.534cm" svg:y1="7.02cm" svg:x2="6.05cm" svg:y2="7.095cm">
                      <text:p/>
                    </draw:line>
                    <draw:line draw:style-name="gr613" draw:text-style-name="P14" draw:layer="layout" svg:x1="5.543cm" svg:y1="7.197cm" svg:x2="6.05cm" svg:y2="7.25cm">
                      <text:p/>
                    </draw:line>
                    <draw:line draw:style-name="gr613" draw:text-style-name="P14" draw:layer="layout" svg:x1="5.543cm" svg:y1="7.36cm" svg:x2="6.05cm" svg:y2="7.4cm">
                      <text:p/>
                    </draw:line>
                    <draw:line draw:style-name="gr613" draw:text-style-name="P14" draw:layer="layout" svg:x1="5.543cm" svg:y1="7.523cm" svg:x2="6.05cm" svg:y2="7.541cm">
                      <text:p/>
                    </draw:line>
                    <draw:line draw:style-name="gr613" draw:text-style-name="P14" draw:layer="layout" svg:x1="5.543cm" svg:y1="7.695cm" svg:x2="6.046cm" svg:y2="7.695cm">
                      <text:p/>
                    </draw:line>
                  </draw:g>
                </draw:g>
                <draw:g draw:style-name="gr4">
                  <draw:custom-shape draw:style-name="gr625" draw:text-style-name="P113" draw:layer="layout" svg:width="0.22cm" svg:height="1.693cm" svg:x="6.703cm" svg:y="6.447cm">
                    <text:p/>
                    <draw:enhanced-geometry svg:viewBox="0 0 50 384" draw:type="non-primitive" draw:enhanced-path="M 0 15  L 49 0  L 48 382  L 0 383  L 0 15  N"/>
                  </draw:custom-shape>
                  <draw:custom-shape draw:style-name="gr626" draw:text-style-name="P33" draw:layer="layout" svg:width="0.542cm" svg:height="1.671cm" svg:x="6.888cm" svg:y="6.465cm">
                    <text:p/>
                    <draw:enhanced-geometry svg:viewBox="0 0 123 379" draw:type="non-primitive" draw:enhanced-path="M 0 0  L 122 8  L 122 377  L 0 378  L 0 0  N"/>
                  </draw:custom-shape>
                  <draw:line draw:style-name="gr613" draw:text-style-name="P14" draw:layer="layout" svg:x1="6.976cm" svg:y1="6.553cm" svg:x2="7.369cm" svg:y2="6.588cm">
                    <text:p/>
                  </draw:line>
                  <draw:line draw:style-name="gr613" draw:text-style-name="P14" draw:layer="layout" svg:x1="6.994cm" svg:y1="7.091cm" svg:x2="7.36cm" svg:y2="7.104cm">
                    <text:p/>
                  </draw:line>
                </draw:g>
                <draw:g draw:style-name="gr4">
                  <draw:custom-shape draw:style-name="gr627" draw:text-style-name="P113" draw:layer="layout" svg:width="0.291cm" svg:height="1.112cm" svg:x="7.373cm" svg:y="7.02cm">
                    <text:p/>
                    <draw:enhanced-geometry svg:viewBox="0 0 66 252" draw:type="non-primitive" draw:enhanced-path="M 0 0  L 65 6  L 65 251  L 0 251  L 0 0  N"/>
                  </draw:custom-shape>
                  <draw:custom-shape draw:style-name="gr628" draw:text-style-name="P115" draw:layer="layout" svg:width="0.119cm" svg:height="1.111cm" svg:x="7.258cm" svg:y="7.029cm">
                    <text:p/>
                    <draw:enhanced-geometry svg:viewBox="0 0 27 252" draw:type="non-primitive" draw:enhanced-path="M 26 0  L 26 249  L 0 251  L 0 4  L 26 0  N"/>
                  </draw:custom-shape>
                </draw:g>
              </draw:g>
              <draw:custom-shape draw:style-name="gr629" draw:text-style-name="P114" draw:layer="layout" svg:width="0.696cm" svg:height="0.502cm" svg:x="7.219cm" svg:y="7.638cm">
                <text:p/>
                <draw:enhanced-geometry svg:viewBox="0 0 158 114" draw:type="non-primitive" draw:enhanced-path="M 0 113  L 6 83  L 17 52  L 21 42  L 34 33  L 34 29  L 36 29  L 38 28  L 41 28  L 42 29  L 45 29  L 47 29  L 49 29  L 52 29  L 55 29  L 57 29  L 61 29  L 63 29  L 67 26  L 68 23  L 68 19  L 70 17  L 72 14  L 75 13  L 76 9  L 78 8  L 79 5  L 78 2  L 80 2  L 83 0  L 85 0  L 88 0  L 90 0  L 93 0  L 95 2  L 97 4  L 101 5  L 105 6  L 107 8  L 110 9  L 112 11  L 115 13  L 117 14  L 119 15  L 121 15  L 124 15  L 125 13  L 128 13  L 129 15  L 129 19  L 129 24  L 129 29  L 131 31  L 133 33  L 135 33  L 137 37  L 138 40  L 140 43  L 144 38  L 145 47  L 149 58  L 148 53  L 157 73  L 153 112  L 0 113  N"/>
              </draw:custom-shape>
            </draw:g>
            <draw:g draw:style-name="gr4">
              <draw:g draw:style-name="gr4">
                <draw:g draw:style-name="gr4">
                  <draw:custom-shape draw:style-name="gr630" draw:text-style-name="P112" draw:layer="layout" svg:width="6.2cm" svg:height="2.21cm" svg:x="2.875cm" svg:y="7.774cm">
                    <text:p/>
                    <draw:enhanced-geometry svg:viewBox="0 0 1406 501" draw:type="non-primitive" draw:enhanced-path="M 0 416  L 218 302  L 684 133  L 881 57  L 951 43  L 1044 34  L 1135 16  L 1195 0  L 1227 0  L 1202 40  L 1116 105  L 1111 148  L 1161 220  L 1284 389  L 1405 500  L 0 500  L 0 416  N"/>
                  </draw:custom-shape>
                  <draw:custom-shape draw:style-name="gr631" draw:text-style-name="P113" draw:layer="layout" svg:width="2.707cm" svg:height="2.214cm" svg:x="5.574cm" svg:y="7.77cm">
                    <text:p/>
                    <draw:enhanced-geometry svg:viewBox="0 0 614 502" draw:type="non-primitive" draw:enhanced-path="M 0 501  L 186 249  L 292 116  L 314 86  L 358 70  L 432 45  L 529 23  L 585 2  L 613 2  L 610 0  L 561 22  L 487 43  L 401 72  L 361 90  L 334 102  L 324 111  L 299 165  L 166 501  L 0 501  N"/>
                  </draw:custom-shape>
                  <draw:custom-shape draw:style-name="gr632" draw:text-style-name="P116" draw:layer="layout" svg:width="3.621cm" svg:height="2.342cm" svg:x="2.875cm" svg:y="7.32cm">
                    <text:p/>
                    <draw:enhanced-geometry svg:viewBox="0 0 821 531" draw:type="non-primitive" draw:enhanced-path="M 0 530  L 0 12  L 57 18  L 84 15  L 94 6  L 99 3  L 104 0  L 113 0  L 118 0  L 126 3  L 131 6  L 131 12  L 138 21  L 143 25  L 168 30  L 183 27  L 192 25  L 198 25  L 235 27  L 249 25  L 259 25  L 264 27  L 274 21  L 284 18  L 289 18  L 323 15  L 334 18  L 346 43  L 370 52  L 417 61  L 429 76  L 457 86  L 505 105  L 562 102  L 620 95  L 634 83  L 641 64  L 646 58  L 649 64  L 659 71  L 661 76  L 656 89  L 659 114  L 698 95  L 718 83  L 723 80  L 735 92  L 738 98  L 738 111  L 735 117  L 738 123  L 738 130  L 747 132  L 767 154  L 784 173  L 800 178  L 804 178  L 809 178  L 814 178  L 820 185  L 620 263  L 425 333  L 245 401  L 133 450  L 0 530  N"/>
                  </draw:custom-shape>
                  <draw:custom-shape draw:style-name="gr633" draw:text-style-name="P117" draw:layer="layout" svg:width="2.302cm" svg:height="2.857cm" svg:x="7.699cm" svg:y="7.131cm">
                    <text:p/>
                    <draw:enhanced-geometry svg:viewBox="0 0 522 648" draw:type="non-primitive" draw:enhanced-path="M 300 647  L 203 554  L 51 345  L 18 301  L 0 265  L 0 245  L 21 238  L 44 230  L 53 213  L 65 210  L 71 210  L 86 196  L 116 175  L 122 150  L 143 137  L 146 112  L 157 115  L 163 105  L 170 108  L 176 119  L 199 123  L 208 101  L 217 99  L 223 73  L 238 70  L 244 56  L 256 53  L 259 42  L 270 42  L 276 28  L 295 18  L 304 18  L 310 11  L 327 11  L 333 25  L 345 28  L 360 45  L 381 39  L 384 22  L 399 11  L 405 8  L 407 0  L 417 11  L 426 25  L 440 15  L 455 18  L 521 64  L 521 647  L 300 647  N"/>
                  </draw:custom-shape>
                  <draw:custom-shape draw:style-name="gr634" draw:text-style-name="P110" draw:layer="layout" svg:width="4.934cm" svg:height="0.926cm" svg:x="4.26cm" svg:y="7.735cm">
                    <text:p/>
                    <draw:enhanced-geometry svg:viewBox="0 0 1119 210" draw:type="non-primitive" draw:enhanced-path="M 797 163  L 831 209  L 878 193  L 916 169  L 931 155  L 964 141  L 1000 117  L 1023 103  L 1041 86  L 1056 73  L 1071 73  L 1086 66  L 1098 73  L 1107 62  L 1109 45  L 1118 41  L 1118 34  L 1012 38  L 955 41  L 973 73  L 1009 73  L 976 90  L 937 117  L 941 69  L 973 73  L 955 41  L 860 34  L 723 27  L 583 17  L 429 13  L 298 7  L 190 3  L 208 48  L 241 48  L 250 128  L 220 107  L 166 76  L 143 51  L 208 48  L 190 3  L 125 7  L 65 7  L 21 3  L 0 0  L 15 17  L 33 34  L 39 41  L 41 51  L 56 48  L 65 62  L 95 76  L 190 132  L 282 177  L 329 160  L 294 152  L 294 66  L 300 62  L 300 51  L 356 48  L 476 55  L 578 58  L 580 159  L 586 163  L 601 138  L 598 76  L 604 73  L 604 58  L 655 55  L 761 62  L 872 69  L 913 73  L 913 82  L 916 82  L 916 138  L 866 155  L 830 163  L 797 163  N"/>
                  </draw:custom-shape>
                </draw:g>
                <draw:custom-shape draw:style-name="gr635" draw:text-style-name="P112" draw:layer="layout" svg:width="0.092cm" svg:height="0.446cm" svg:x="6.778cm" svg:y="8.012cm">
                  <text:p/>
                  <draw:enhanced-geometry svg:viewBox="0 0 21 101" draw:type="non-primitive" draw:enhanced-path="M 0 0  L 16 0  L 16 19  L 20 23  L 20 100  L 3 100  L 3 19  L 0 19  L 0 0  N"/>
                </draw:custom-shape>
                <draw:custom-shape draw:style-name="gr636" draw:text-style-name="P112" draw:layer="layout" svg:width="0.093cm" svg:height="0.397cm" svg:x="8.365cm" svg:y="8.039cm">
                  <text:p/>
                  <draw:enhanced-geometry svg:viewBox="0 0 21 90" draw:type="non-primitive" draw:enhanced-path="M 2 0  L 16 0  L 20 31  L 12 31  L 16 82  L 0 89  L 0 31  L 4 31  L 2 0  N"/>
                </draw:custom-shape>
                <draw:custom-shape draw:style-name="gr637" draw:text-style-name="P112" draw:layer="layout" svg:width="0.092cm" svg:height="0.344cm" svg:x="5.477cm" svg:y="8.026cm">
                  <text:p/>
                  <draw:enhanced-geometry svg:viewBox="0 0 21 78" draw:type="non-primitive" draw:enhanced-path="M 3 4  L 20 0  L 20 77  L 3 71  L 3 10  L 0 13  L 3 4  N"/>
                </draw:custom-shape>
                <draw:custom-shape draw:style-name="gr638" draw:text-style-name="P112" draw:layer="layout" svg:width="0.093cm" svg:height="0.34cm" svg:x="5.402cm" svg:y="8.043cm">
                  <text:p/>
                  <draw:enhanced-geometry svg:viewBox="0 0 21 77" draw:type="non-primitive" draw:enhanced-path="M 6 3  L 20 0  L 20 76  L 6 70  L 6 10  L 0 12  L 6 3  N"/>
                </draw:custom-shape>
              </draw:g>
              <draw:custom-shape draw:style-name="gr639" draw:text-style-name="P115" draw:layer="layout" svg:width="4.785cm" svg:height="0.141cm" svg:x="4.352cm" svg:y="7.814cm">
                <text:p/>
                <draw:enhanced-geometry svg:viewBox="0 0 1085 32" draw:type="non-primitive" draw:enhanced-path="M 0 0  L 91 0  L 238 0  L 381 3  L 566 10  L 723 19  L 911 31  L 1084 31  L 0 0  N"/>
              </draw:custom-shape>
            </draw:g>
          </draw:g>
          <draw:g draw:style-name="gr4">
            <draw:g draw:style-name="gr4">
              <draw:custom-shape draw:style-name="gr640" draw:text-style-name="P113" draw:layer="layout" svg:width="4.356cm" svg:height="0.468cm" svg:x="17.754cm" svg:y="8.387cm">
                <text:p/>
                <draw:enhanced-geometry svg:viewBox="0 0 988 106" draw:type="non-primitive" draw:enhanced-path="M 987 33  L 890 105  L 0 82  L 157 0  L 987 33  N"/>
              </draw:custom-shape>
              <draw:custom-shape draw:style-name="gr641" draw:text-style-name="P36" draw:layer="layout" svg:width="4.101cm" svg:height="0.714cm" svg:x="17.612cm" svg:y="9.243cm">
                <text:p/>
                <draw:enhanced-geometry svg:viewBox="0 0 930 162" draw:type="non-primitive" draw:enhanced-path="M 919 41  L 929 161  L 44 110  L 0 0  L 919 41  N"/>
              </draw:custom-shape>
              <draw:custom-shape draw:style-name="gr642" draw:text-style-name="P115" draw:layer="layout" svg:width="4.062cm" svg:height="0.67cm" svg:x="17.612cm" svg:y="8.758cm">
                <text:p/>
                <draw:enhanced-geometry svg:viewBox="0 0 921 152" draw:type="non-primitive" draw:enhanced-path="M 920 151  L 0 110  L 32 0  L 919 21  L 920 151  N"/>
              </draw:custom-shape>
              <draw:custom-shape draw:style-name="gr643" draw:text-style-name="P31" draw:layer="layout" svg:width="4.07cm" svg:height="0.622cm" svg:x="18.027cm" svg:y="8.127cm">
                <text:p/>
                <draw:enhanced-geometry svg:viewBox="0 0 923 141" draw:type="non-primitive" draw:enhanced-path="M 893 0  L 893 16  L 922 23  L 817 117  L 807 140  L 0 122  L 20 99  L 143 31  L 154 0  L 893 0  N"/>
              </draw:custom-shape>
            </draw:g>
            <draw:g draw:style-name="gr4">
              <draw:g draw:style-name="gr4">
                <draw:custom-shape draw:style-name="gr644" draw:text-style-name="P113" draw:layer="layout" svg:width="4.313cm" svg:height="0.697cm" svg:x="18.534cm" svg:y="7.827cm">
                  <text:p/>
                  <draw:enhanced-geometry svg:viewBox="0 0 978 158" draw:type="non-primitive" draw:enhanced-path="M 977 0  L 178 0  L 0 144  L 810 157  L 977 0  N"/>
                </draw:custom-shape>
                <draw:custom-shape draw:style-name="gr645" draw:text-style-name="P110" draw:layer="layout" svg:width="2.188cm" svg:height="0.843cm" svg:x="19.861cm" svg:y="7.214cm">
                  <text:p/>
                  <draw:enhanced-geometry svg:viewBox="0 0 496 191" draw:type="non-primitive" draw:enhanced-path="M 455 190  L 495 1  L 78 0  L 0 190  L 455 190  N"/>
                </draw:custom-shape>
                <draw:custom-shape draw:style-name="gr646" draw:text-style-name="P110" draw:layer="layout" svg:width="1.173cm" svg:height="1.429cm" svg:x="21.669cm" svg:y="8.528cm">
                  <text:p/>
                  <draw:enhanced-geometry svg:viewBox="0 0 266 324" draw:type="non-primitive" draw:enhanced-path="M 2 73  L 0 205  L 10 323  L 265 52  L 265 33  L 120 187  L 100 0  L 2 73  N"/>
                </draw:custom-shape>
                <draw:custom-shape draw:style-name="gr647" draw:text-style-name="P110" draw:layer="layout" svg:width="0.741cm" svg:height="1.53cm" svg:x="22.106cm" svg:y="7.827cm">
                  <text:p/>
                  <draw:enhanced-geometry svg:viewBox="0 0 168 347" draw:type="non-primitive" draw:enhanced-path="M 19 346  L 167 189  L 167 0  L 0 157  L 19 346  N"/>
                </draw:custom-shape>
              </draw:g>
              <draw:g draw:style-name="gr4">
                <draw:custom-shape draw:style-name="gr648" draw:text-style-name="P118" draw:layer="layout" svg:width="2.664cm" svg:height="1.38cm" svg:x="19.504cm" svg:y="6.826cm">
                  <text:p/>
                  <draw:enhanced-geometry svg:viewBox="0 0 604 313" draw:type="non-primitive" draw:enhanced-path="M 522 45  L 509 74  L 496 109  L 416 312  L 0 308  L 116 67  L 127 50  L 141 33  L 156 20  L 173 10  L 196 1  L 225 0  L 247 0  L 603 0  L 585 4  L 576 7  L 564 11  L 554 15  L 544 22  L 538 26  L 532 33  L 526 39  L 522 45  N"/>
                </draw:custom-shape>
                <draw:custom-shape draw:style-name="gr649" draw:text-style-name="P119" draw:layer="layout" svg:width="2.668cm" svg:height="1.38cm" svg:x="19.398cm" svg:y="6.809cm">
                  <text:p/>
                  <draw:enhanced-geometry svg:viewBox="0 0 605 313" draw:type="non-primitive" draw:enhanced-path="M 522 45  L 509 74  L 496 110  L 416 312  L 0 308  L 116 67  L 127 51  L 142 33  L 157 20  L 173 10  L 196 2  L 225 0  L 248 0  L 604 0  L 586 4  L 576 8  L 565 11  L 555 16  L 544 22  L 539 27  L 533 33  L 526 40  L 522 45  N"/>
                </draw:custom-shape>
                <draw:custom-shape draw:style-name="gr650" draw:text-style-name="P120" draw:layer="layout" svg:width="2.659cm" svg:height="1.389cm" svg:x="19.328cm" svg:y="6.751cm">
                  <text:p/>
                  <draw:enhanced-geometry svg:viewBox="0 0 603 315" draw:type="non-primitive" draw:enhanced-path="M 522 46  L 509 75  L 496 110  L 416 314  L 0 310  L 116 68  L 127 50  L 141 33  L 156 20  L 173 10  L 196 2  L 225 0  L 247 0  L 602 0  L 585 4  L 576 7  L 564 11  L 555 15  L 544 22  L 538 27  L 532 33  L 527 39  L 522 46  N"/>
                </draw:custom-shape>
                <draw:g draw:style-name="gr1">
                  <draw:line draw:style-name="gr7" draw:text-style-name="P14" draw:layer="layout" svg:x1="20.086cm" svg:y1="6.928cm" svg:x2="21.497cm" svg:y2="6.928cm">
                    <text:p/>
                  </draw:line>
                  <draw:line draw:style-name="gr7" draw:text-style-name="P14" draw:layer="layout" svg:x1="20.042cm" svg:y1="7.047cm" svg:x2="21.453cm" svg:y2="7.047cm">
                    <text:p/>
                  </draw:line>
                  <draw:line draw:style-name="gr7" draw:text-style-name="P14" draw:layer="layout" svg:x1="19.945cm" svg:y1="7.25cm" svg:x2="21.356cm" svg:y2="7.25cm">
                    <text:p/>
                  </draw:line>
                  <draw:line draw:style-name="gr7" draw:text-style-name="P14" draw:layer="layout" svg:x1="19.866cm" svg:y1="7.355cm" svg:x2="21.277cm" svg:y2="7.355cm">
                    <text:p/>
                  </draw:line>
                  <draw:line draw:style-name="gr7" draw:text-style-name="P14" draw:layer="layout" svg:x1="19.817cm" svg:y1="7.448cm" svg:x2="21.228cm" svg:y2="7.448cm">
                    <text:p/>
                  </draw:line>
                  <draw:line draw:style-name="gr7" draw:text-style-name="P14" draw:layer="layout" svg:x1="19.795cm" svg:y1="7.549cm" svg:x2="21.206cm" svg:y2="7.549cm">
                    <text:p/>
                  </draw:line>
                  <draw:line draw:style-name="gr7" draw:text-style-name="P14" draw:layer="layout" svg:x1="19.729cm" svg:y1="7.726cm" svg:x2="21.136cm" svg:y2="7.726cm">
                    <text:p/>
                  </draw:line>
                  <draw:line draw:style-name="gr7" draw:text-style-name="P14" draw:layer="layout" svg:x1="19.663cm" svg:y1="7.849cm" svg:x2="21.07cm" svg:y2="7.849cm">
                    <text:p/>
                  </draw:line>
                </draw:g>
              </draw:g>
              <draw:g draw:style-name="gr4">
                <draw:custom-shape draw:style-name="gr651" draw:text-style-name="P113" draw:layer="layout" svg:width="0.829cm" svg:height="0.432cm" svg:x="21.736cm" svg:y="8.714cm">
                  <text:p/>
                  <draw:enhanced-geometry svg:viewBox="0 0 188 98" draw:type="non-primitive" draw:enhanced-path="M 87 0  L 0 97  L 106 97  L 187 1  L 87 0  N"/>
                </draw:custom-shape>
                <draw:custom-shape draw:style-name="gr652" draw:text-style-name="P113" draw:layer="layout" svg:width="0.692cm" svg:height="0.251cm" svg:x="22.115cm" svg:y="8.471cm">
                  <text:p/>
                  <draw:enhanced-geometry svg:viewBox="0 0 157 57" draw:type="non-primitive" draw:enhanced-path="M 101 56  L 0 55  L 65 0  L 156 4  L 101 56  N"/>
                </draw:custom-shape>
                <draw:custom-shape draw:style-name="gr653" draw:text-style-name="P110" draw:layer="layout" svg:width="0.471cm" svg:height="0.146cm" svg:x="21.736cm" svg:y="9.141cm">
                  <text:p/>
                  <draw:enhanced-geometry svg:viewBox="0 0 107 33" draw:type="non-primitive" draw:enhanced-path="M 0 0  L 106 0  L 106 32  L 0 29  L 0 0  N"/>
                </draw:custom-shape>
                <draw:custom-shape draw:style-name="gr654" draw:text-style-name="P110" draw:layer="layout" svg:width="0.6cm" svg:height="0.798cm" svg:x="22.203cm" svg:y="8.493cm">
                  <text:p/>
                  <draw:enhanced-geometry svg:viewBox="0 0 136 181" draw:type="non-primitive" draw:enhanced-path="M 135 0  L 80 53  L 1 146  L 0 180  L 90 72  L 135 26  L 135 0  N"/>
                </draw:custom-shape>
              </draw:g>
              <draw:g draw:style-name="gr4">
                <draw:custom-shape draw:style-name="gr655" draw:text-style-name="P121" draw:layer="layout" svg:width="2.504cm" svg:height="0.432cm" svg:x="17.798cm" svg:y="8.833cm">
                  <text:p/>
                  <draw:enhanced-geometry svg:viewBox="0 0 568 98" draw:type="non-primitive" draw:enhanced-path="M 567 16  L 547 97  L 0 71  L 23 0  L 567 16  N"/>
                </draw:custom-shape>
                <draw:custom-shape draw:style-name="gr656" draw:text-style-name="P121" draw:layer="layout" svg:width="1.195cm" svg:height="0.419cm" svg:x="20.298cm" svg:y="8.903cm">
                  <text:p/>
                  <draw:enhanced-geometry svg:viewBox="0 0 271 95" draw:type="non-primitive" draw:enhanced-path="M 270 5  L 270 94  L 0 82  L 20 0  L 270 5  N"/>
                </draw:custom-shape>
                <draw:custom-shape draw:style-name="gr657" draw:text-style-name="P121" draw:layer="layout" svg:width="1.521cm" svg:height="0.458cm" svg:x="20.435cm" svg:y="8.189cm">
                  <text:p/>
                  <draw:enhanced-geometry svg:viewBox="0 0 345 104" draw:type="non-primitive" draw:enhanced-path="M 119 0  L 0 98  L 237 103  L 344 0  L 119 0  N"/>
                </draw:custom-shape>
                <draw:custom-shape draw:style-name="gr658" draw:text-style-name="P122" draw:layer="layout" svg:width="0.278cm" svg:height="0.164cm" svg:x="18.005cm" svg:y="8.916cm">
                  <text:p/>
                  <draw:enhanced-geometry svg:viewBox="0 0 63 37" draw:type="non-primitive" draw:enhanced-path="M 11 0  L 0 34  L 52 36  L 62 2  L 11 0  N"/>
                </draw:custom-shape>
                <draw:custom-shape draw:style-name="gr658" draw:text-style-name="P122" draw:layer="layout" svg:width="0.278cm" svg:height="0.163cm" svg:x="18.6cm" svg:y="8.939cm">
                  <text:p/>
                  <draw:enhanced-geometry svg:viewBox="0 0 63 37" draw:type="non-primitive" draw:enhanced-path="M 11 0  L 0 34  L 52 36  L 62 2  L 11 0  N"/>
                </draw:custom-shape>
                <draw:custom-shape draw:style-name="gr658" draw:text-style-name="P122" draw:layer="layout" svg:width="0.286cm" svg:height="0.159cm" svg:x="19.231cm" svg:y="8.965cm">
                  <text:p/>
                  <draw:enhanced-geometry svg:viewBox="0 0 65 36" draw:type="non-primitive" draw:enhanced-path="M 12 0  L 0 33  L 55 35  L 64 2  L 12 0  N"/>
                </draw:custom-shape>
                <draw:custom-shape draw:style-name="gr658" draw:text-style-name="P122" draw:layer="layout" svg:width="0.278cm" svg:height="0.172cm" svg:x="20.496cm" svg:y="9.005cm">
                  <text:p/>
                  <draw:enhanced-geometry svg:viewBox="0 0 63 39" draw:type="non-primitive" draw:enhanced-path="M 8 0  L 0 36  L 53 38  L 62 2  L 8 0  N"/>
                </draw:custom-shape>
                <draw:line draw:style-name="gr7" draw:text-style-name="P14" draw:layer="layout" svg:x1="20.651cm" svg:y1="8.528cm" svg:x2="21.471cm" svg:y2="8.542cm">
                  <text:p/>
                </draw:line>
                <draw:custom-shape draw:style-name="gr659" draw:text-style-name="P123" draw:layer="layout" svg:width="1.018cm" svg:height="0.132cm" svg:x="20.726cm" svg:y="8.326cm">
                  <text:p/>
                  <draw:enhanced-geometry svg:viewBox="0 0 231 30" draw:type="non-primitive" draw:enhanced-path="M 33 0  L 0 25  L 196 29  L 230 2  L 33 0  N"/>
                </draw:custom-shape>
              </draw:g>
            </draw:g>
          </draw:g>
          <draw:custom-shape draw:style-name="gr660" draw:text-style-name="P124" draw:layer="layout" svg:width="3.493cm" svg:height="3.417cm" svg:x="11.628cm" svg:y="10.685cm">
            <text:p/>
            <draw:enhanced-geometry svg:viewBox="0 0 792 775" draw:type="non-primitive" draw:enhanced-path="M 417 774  L 433 772  L 444 772  L 458 770  L 475 765  L 493 761  L 514 755  L 533 749  L 552 742  L 567 736  L 579 728  L 592 721  L 604 713  L 623 703  L 635 694  L 647 684  L 658 675  L 687 647  L 698 634  L 708 622  L 723 601  L 736 581  L 742 571  L 746 563  L 753 550  L 758 540  L 763 526  L 769 509  L 773 497  L 777 483  L 782 465  L 786 445  L 788 422  L 791 401  L 791 368  L 788 340  L 782 316  L 777 290  L 768 262  L 758 238  L 742 204  L 733 187  L 723 173  L 715 161  L 702 146  L 696 137  L 683 123  L 663 104  L 641 85  L 616 68  L 597 56  L 575 44  L 550 31  L 521 20  L 489 12  L 455 5  L 422 1  L 393 0  L 362 1  L 329 6  L 295 13  L 264 22  L 239 31  L 218 41  L 196 54  L 174 66  L 150 84  L 130 101  L 116 115  L 104 125  L 91 142  L 77 158  L 67 172  L 56 187  L 47 203  L 39 217  L 31 236  L 26 252  L 18 272  L 14 286  L 8 308  L 4 331  L 0 365  L 0 384  L 0 404  L 4 443  L 7 463  L 13 486  L 18 505  L 28 530  L 39 555  L 51 578  L 66 599  L 73 611  L 94 637  L 109 653  L 123 667  L 141 682  L 157 696  L 173 707  L 189 717  L 213 729  L 236 741  L 261 750  L 279 757  L 301 763  L 328 770  L 354 772  L 369 774  L 417 774  L 417 774  L 417 774  N"/>
          </draw:custom-shape>
          <draw:custom-shape draw:style-name="gr661" draw:text-style-name="P2" draw:layer="layout" svg:width="3.493cm" svg:height="3.417cm" svg:x="11.628cm" svg:y="10.685cm">
            <text:p/>
            <draw:enhanced-geometry svg:viewBox="0 0 792 775" draw:type="non-primitive" draw:enhanced-path="M 417 774  L 433 772  L 444 772  L 458 770  L 475 765  L 493 761  L 514 755  L 533 749  L 552 742  L 567 736  L 579 728  L 592 721  L 604 713  L 623 703  L 635 694  L 647 684  L 658 675  L 687 647  L 698 634  L 708 622  L 723 601  L 736 581  L 742 571  L 746 563  L 753 550  L 758 540  L 763 526  L 769 509  L 773 497  L 777 483  L 782 465  L 786 445  L 788 422  L 791 401  L 791 368  L 788 340  L 782 316  L 777 290  L 768 262  L 758 238  L 742 204  L 733 187  L 723 173  L 715 161  L 702 146  L 696 137  L 683 123  L 663 104  L 641 85  L 616 68  L 597 56  L 575 44  L 550 31  L 521 20  L 489 12  L 455 5  L 422 1  L 393 0  L 362 1  L 329 6  L 295 13  L 264 22  L 239 31  L 218 41  L 196 54  L 174 66  L 150 84  L 130 101  L 116 115  L 104 125  L 91 142  L 77 158  L 67 172  L 56 187  L 47 203  L 39 217  L 31 236  L 26 252  L 18 272  L 14 286  L 8 308  L 4 331  L 0 365  L 0 384  L 0 404  L 4 443  L 7 463  L 13 486  L 18 505  L 28 530  L 39 555  L 51 578  L 66 599  L 73 611  L 94 637  L 109 653  L 123 667  L 141 682  L 157 696  L 173 707  L 189 717  L 213 729  L 236 741  L 261 750  L 279 757  L 301 763  L 328 770  L 354 772  L 369 774  L 417 774  L 417 774  N"/>
          </draw:custom-shape>
          <draw:custom-shape draw:style-name="gr662" draw:text-style-name="P2" draw:layer="layout" svg:width="1.093cm" svg:height="0.767cm" svg:x="12.246cm" svg:y="13.132cm">
            <text:p/>
            <draw:enhanced-geometry svg:viewBox="0 0 248 174" draw:type="non-primitive" draw:enhanced-path="M 123 0  L 121 16  L 117 75  L 117 94  L 92 86  L 62 75  L 31 61  L 0 43  L 0 63  L 1 82  L 6 106  L 14 129  L 23 133  L 40 144  L 71 156  L 101 166  L 127 173  L 122 150  L 118 120  L 118 94  L 140 99  L 179 107  L 215 111  L 244 113  L 247 75  N"/>
          </draw:custom-shape>
          <draw:custom-shape draw:style-name="gr662" draw:text-style-name="P2" draw:layer="layout" svg:width="1.093cm" svg:height="0.767cm" svg:x="12.246cm" svg:y="13.132cm">
            <text:p/>
            <draw:enhanced-geometry svg:viewBox="0 0 248 174" draw:type="non-primitive" draw:enhanced-path="M 123 0  L 121 16  L 117 75  L 117 94  L 92 86  L 62 75  L 31 61  L 0 43  L 0 63  L 1 82  L 6 106  L 14 129  L 23 133  L 40 144  L 71 156  L 101 166  L 127 173  L 122 150  L 118 120  L 118 94  L 140 99  L 179 107  L 215 111  L 244 113  L 247 75  N"/>
          </draw:custom-shape>
          <draw:custom-shape draw:style-name="gr663" draw:text-style-name="P2" draw:layer="layout" svg:width="0.679cm" svg:height="0.467cm" svg:x="11.77cm" svg:y="12.065cm">
            <text:p/>
            <draw:enhanced-geometry svg:viewBox="0 0 154 106" draw:type="non-primitive" draw:enhanced-path="M 153 47  L 142 40  L 130 32  L 117 18  L 103 0  L 90 17  L 71 45  L 59 68  L 47 89  L 40 105  L 33 96  L 25 84  L 16 66  L 7 47  L 0 25  N"/>
          </draw:custom-shape>
          <draw:custom-shape draw:style-name="gr663" draw:text-style-name="P2" draw:layer="layout" svg:width="0.679cm" svg:height="0.467cm" svg:x="11.77cm" svg:y="12.065cm">
            <text:p/>
            <draw:enhanced-geometry svg:viewBox="0 0 154 106" draw:type="non-primitive" draw:enhanced-path="M 153 47  L 142 40  L 130 32  L 117 18  L 103 0  L 90 17  L 71 45  L 59 68  L 47 89  L 40 105  L 33 96  L 25 84  L 16 66  L 7 47  L 0 25  N"/>
          </draw:custom-shape>
          <draw:custom-shape draw:style-name="gr664" draw:text-style-name="P2" draw:layer="layout" svg:width="0.953cm" svg:height="0.97cm" svg:x="11.65cm" svg:y="11.673cm">
            <text:p/>
            <draw:enhanced-geometry svg:viewBox="0 0 216 220" draw:type="non-primitive" draw:enhanced-path="M 0 219  L 2 184  L 7 158  L 11 138  L 21 111  L 34 90  L 48 69  L 57 58  L 69 45  L 80 32  L 94 21  L 101 43  L 111 61  L 120 77  L 129 88  L 151 62  L 170 41  L 175 38  L 180 31  L 184 26  L 215 0  N"/>
          </draw:custom-shape>
          <draw:custom-shape draw:style-name="gr664" draw:text-style-name="P2" draw:layer="layout" svg:width="0.953cm" svg:height="0.97cm" svg:x="11.65cm" svg:y="11.673cm">
            <text:p/>
            <draw:enhanced-geometry svg:viewBox="0 0 216 220" draw:type="non-primitive" draw:enhanced-path="M 0 219  L 2 184  L 7 158  L 11 138  L 21 111  L 34 90  L 48 69  L 57 58  L 69 45  L 80 32  L 94 21  L 101 43  L 111 61  L 120 77  L 129 88  L 151 62  L 170 41  L 175 38  L 180 31  L 184 26  L 215 0  N"/>
          </draw:custom-shape>
          <draw:custom-shape draw:style-name="gr665" draw:text-style-name="P2" draw:layer="layout" svg:width="0.463cm" svg:height="0.785cm" svg:x="14.442cm" svg:y="12.581cm">
            <text:p/>
            <draw:enhanced-geometry svg:viewBox="0 0 105 178" draw:type="non-primitive" draw:enhanced-path="M 97 151  L 99 137  L 102 120  L 104 104  L 87 120  L 68 139  L 46 155  L 29 167  L 16 177  L 12 137  L 9 116  L 6 93  L 2 71  L 0 68  L 16 60  L 33 49  L 46 37  L 70 14  L 80 0  L 82 9  L 91 37  L 98 60  L 101 80  L 102 93  L 104 104  N"/>
          </draw:custom-shape>
          <draw:custom-shape draw:style-name="gr665" draw:text-style-name="P2" draw:layer="layout" svg:width="0.463cm" svg:height="0.785cm" svg:x="14.442cm" svg:y="12.581cm">
            <text:p/>
            <draw:enhanced-geometry svg:viewBox="0 0 105 178" draw:type="non-primitive" draw:enhanced-path="M 97 151  L 99 137  L 102 120  L 104 104  L 87 120  L 68 139  L 46 155  L 29 167  L 16 177  L 12 137  L 9 116  L 6 93  L 2 71  L 0 68  L 16 60  L 33 49  L 46 37  L 70 14  L 80 0  L 82 9  L 91 37  L 98 60  L 101 80  L 102 93  L 104 104  N"/>
          </draw:custom-shape>
          <draw:custom-shape draw:style-name="gr666" draw:text-style-name="P2" draw:layer="layout" svg:width="0.202cm" svg:height="0.136cm" svg:x="12.114cm" svg:y="13.569cm">
            <text:p/>
            <draw:enhanced-geometry svg:viewBox="0 0 46 31" draw:type="non-primitive" draw:enhanced-path="M 45 30  L 25 18  L 0 0  N"/>
          </draw:custom-shape>
          <draw:custom-shape draw:style-name="gr666" draw:text-style-name="P2" draw:layer="layout" svg:width="0.202cm" svg:height="0.136cm" svg:x="12.114cm" svg:y="13.569cm">
            <text:p/>
            <draw:enhanced-geometry svg:viewBox="0 0 46 31" draw:type="non-primitive" draw:enhanced-path="M 45 30  L 25 18  L 0 0  N"/>
          </draw:custom-shape>
          <draw:custom-shape draw:style-name="gr667" draw:text-style-name="P2" draw:layer="layout" svg:width="0.582cm" svg:height="0.754cm" svg:x="11.858cm" svg:y="12.484cm">
            <text:p/>
            <draw:enhanced-geometry svg:viewBox="0 0 132 171" draw:type="non-primitive" draw:enhanced-path="M 131 0  L 119 27  L 114 43  L 105 68  L 101 81  L 93 76  L 70 59  L 51 43  L 32 26  L 20 10  L 13 31  L 6 52  L 2 76  L 1 97  L 0 114  L 0 142  L 1 170  N"/>
          </draw:custom-shape>
          <draw:custom-shape draw:style-name="gr667" draw:text-style-name="P2" draw:layer="layout" svg:width="0.582cm" svg:height="0.754cm" svg:x="11.858cm" svg:y="12.484cm">
            <text:p/>
            <draw:enhanced-geometry svg:viewBox="0 0 132 171" draw:type="non-primitive" draw:enhanced-path="M 131 0  L 119 27  L 114 43  L 105 68  L 101 81  L 93 76  L 70 59  L 51 43  L 32 26  L 20 10  L 13 31  L 6 52  L 2 76  L 1 97  L 0 114  L 0 142  L 1 170  N"/>
          </draw:custom-shape>
          <draw:custom-shape draw:style-name="gr668" draw:text-style-name="P2" draw:layer="layout" svg:width="0.781cm" svg:height="0.485cm" svg:x="11.862cm" svg:y="12.841cm">
            <text:p/>
            <draw:enhanced-geometry svg:viewBox="0 0 177 110" draw:type="non-primitive" draw:enhanced-path="M 0 33  L 19 57  L 43 78  L 62 92  L 88 109  L 89 72  L 92 34  L 100 0  L 121 12  L 150 26  L 174 34  L 176 34  N"/>
          </draw:custom-shape>
          <draw:custom-shape draw:style-name="gr668" draw:text-style-name="P2" draw:layer="layout" svg:width="0.781cm" svg:height="0.485cm" svg:x="11.862cm" svg:y="12.841cm">
            <text:p/>
            <draw:enhanced-geometry svg:viewBox="0 0 177 110" draw:type="non-primitive" draw:enhanced-path="M 0 33  L 19 57  L 43 78  L 62 92  L 88 109  L 89 72  L 92 34  L 100 0  L 121 12  L 150 26  L 174 34  L 176 34  N"/>
          </draw:custom-shape>
          <draw:custom-shape draw:style-name="gr669" draw:text-style-name="P2" draw:layer="layout" svg:width="0.092cm" svg:height="0.529cm" svg:x="11.748cm" svg:y="11.655cm">
            <text:p/>
            <draw:enhanced-geometry svg:viewBox="0 0 21 120" draw:type="non-primitive" draw:enhanced-path="M 7 119  L 3 94  L 0 72  L 4 47  L 9 22  L 20 0  N"/>
          </draw:custom-shape>
          <draw:custom-shape draw:style-name="gr669" draw:text-style-name="P2" draw:layer="layout" svg:width="0.092cm" svg:height="0.529cm" svg:x="11.748cm" svg:y="11.655cm">
            <text:p/>
            <draw:enhanced-geometry svg:viewBox="0 0 21 120" draw:type="non-primitive" draw:enhanced-path="M 7 119  L 3 94  L 0 72  L 4 47  L 9 22  L 20 0  N"/>
          </draw:custom-shape>
          <draw:custom-shape draw:style-name="gr670" draw:text-style-name="P2" draw:layer="layout" svg:width="0.516cm" svg:height="0.207cm" svg:x="12.81cm" svg:y="13.895cm">
            <text:p/>
            <draw:enhanced-geometry svg:viewBox="0 0 117 47" draw:type="non-primitive" draw:enhanced-path="M 13 29  L 8 21  L 4 10  L 0 0  L 36 8  L 69 13  L 97 15  L 116 17  L 116 46  N"/>
          </draw:custom-shape>
          <draw:custom-shape draw:style-name="gr670" draw:text-style-name="P2" draw:layer="layout" svg:width="0.516cm" svg:height="0.207cm" svg:x="12.81cm" svg:y="13.895cm">
            <text:p/>
            <draw:enhanced-geometry svg:viewBox="0 0 117 47" draw:type="non-primitive" draw:enhanced-path="M 13 29  L 8 21  L 4 10  L 0 0  L 36 8  L 69 13  L 97 15  L 116 17  L 116 46  N"/>
          </draw:custom-shape>
          <draw:custom-shape draw:style-name="gr666" draw:text-style-name="P2" draw:layer="layout" svg:width="0.304cm" svg:height="0.22cm" svg:x="13.322cm" svg:y="13.754cm">
            <text:p/>
            <draw:enhanced-geometry svg:viewBox="0 0 69 50" draw:type="non-primitive" draw:enhanced-path="M 68 47  L 33 49  L 0 49  L 0 0  N"/>
          </draw:custom-shape>
          <draw:custom-shape draw:style-name="gr666" draw:text-style-name="P2" draw:layer="layout" svg:width="0.304cm" svg:height="0.22cm" svg:x="13.322cm" svg:y="13.754cm">
            <text:p/>
            <draw:enhanced-geometry svg:viewBox="0 0 69 50" draw:type="non-primitive" draw:enhanced-path="M 68 47  L 33 49  L 0 49  L 0 0  N"/>
          </draw:custom-shape>
          <draw:custom-shape draw:style-name="gr671" draw:text-style-name="P2" draw:layer="layout" svg:width="0.194cm" svg:height="0.326cm" svg:x="13.145cm" svg:y="13.11cm">
            <text:p/>
            <draw:enhanced-geometry svg:viewBox="0 0 44 74" draw:type="non-primitive" draw:enhanced-path="M 0 0  L 14 2  L 29 5  L 43 5  L 43 73  N"/>
          </draw:custom-shape>
          <draw:custom-shape draw:style-name="gr671" draw:text-style-name="P2" draw:layer="layout" svg:width="0.194cm" svg:height="0.326cm" svg:x="13.145cm" svg:y="13.11cm">
            <text:p/>
            <draw:enhanced-geometry svg:viewBox="0 0 44 74" draw:type="non-primitive" draw:enhanced-path="M 0 0  L 14 2  L 29 5  L 43 5  L 43 73  N"/>
          </draw:custom-shape>
          <draw:line draw:style-name="gr7" draw:text-style-name="P14" draw:layer="layout" svg:x1="13.335cm" svg:y1="13.047cm" svg:x2="13.335cm" svg:y2="12.986cm">
            <text:p/>
          </draw:line>
          <draw:line draw:style-name="gr7" draw:text-style-name="P14" draw:layer="layout" svg:x1="13.335cm" svg:y1="13.047cm" svg:x2="13.335cm" svg:y2="12.986cm">
            <text:p/>
          </draw:line>
          <draw:custom-shape draw:style-name="gr666" draw:text-style-name="P2" draw:layer="layout" svg:width="0.101cm" svg:height="0.075cm" svg:x="13.335cm" svg:y="13.084cm">
            <text:p/>
            <draw:enhanced-geometry svg:viewBox="0 0 23 17" draw:type="non-primitive" draw:enhanced-path="M 0 0  L 0 16  L 22 16  N"/>
          </draw:custom-shape>
          <draw:custom-shape draw:style-name="gr666" draw:text-style-name="P2" draw:layer="layout" svg:width="0.101cm" svg:height="0.075cm" svg:x="13.335cm" svg:y="13.084cm">
            <text:p/>
            <draw:enhanced-geometry svg:viewBox="0 0 23 17" draw:type="non-primitive" draw:enhanced-path="M 0 0  L 0 16  L 22 16  N"/>
          </draw:custom-shape>
          <draw:custom-shape draw:style-name="gr666" draw:text-style-name="P2" draw:layer="layout" svg:width="0.115cm" svg:height="0.092cm" svg:x="13.895cm" svg:y="11.492cm">
            <text:p/>
            <draw:enhanced-geometry svg:viewBox="0 0 26 21" draw:type="non-primitive" draw:enhanced-path="M 0 0  L 12 9  L 25 20  N"/>
          </draw:custom-shape>
          <draw:custom-shape draw:style-name="gr666" draw:text-style-name="P2" draw:layer="layout" svg:width="0.115cm" svg:height="0.092cm" svg:x="13.895cm" svg:y="11.492cm">
            <text:p/>
            <draw:enhanced-geometry svg:viewBox="0 0 26 21" draw:type="non-primitive" draw:enhanced-path="M 0 0  L 12 9  L 25 20  N"/>
          </draw:custom-shape>
          <draw:custom-shape draw:style-name="gr672" draw:text-style-name="P2" draw:layer="layout" svg:width="0.639cm" svg:height="1.306cm" svg:x="13.604cm" svg:y="11.831cm">
            <text:p/>
            <draw:enhanced-geometry svg:viewBox="0 0 145 296" draw:type="non-primitive" draw:enhanced-path="M 0 295  L 29 290  L 54 286  L 74 282  L 64 212  L 50 152  L 78 145  L 97 139  L 124 129  L 144 119  L 141 111  L 124 80  L 108 45  L 91 21  L 83 6  L 77 0  L 66 5  N"/>
          </draw:custom-shape>
          <draw:custom-shape draw:style-name="gr672" draw:text-style-name="P2" draw:layer="layout" svg:width="0.639cm" svg:height="1.306cm" svg:x="13.604cm" svg:y="11.831cm">
            <text:p/>
            <draw:enhanced-geometry svg:viewBox="0 0 145 296" draw:type="non-primitive" draw:enhanced-path="M 0 295  L 29 290  L 54 286  L 74 282  L 64 212  L 50 152  L 78 145  L 97 139  L 124 129  L 144 119  L 141 111  L 124 80  L 108 45  L 91 21  L 83 6  L 77 0  L 66 5  N"/>
          </draw:custom-shape>
          <draw:custom-shape draw:style-name="gr673" draw:text-style-name="P2" draw:layer="layout" svg:width="0.198cm" svg:height="0.286cm" svg:x="13.163cm" svg:y="11.933cm">
            <text:p/>
            <draw:enhanced-geometry svg:viewBox="0 0 45 65" draw:type="non-primitive" draw:enhanced-path="M 44 64  L 44 6  L 27 5  L 11 3  L 0 0  N"/>
          </draw:custom-shape>
          <draw:custom-shape draw:style-name="gr673" draw:text-style-name="P2" draw:layer="layout" svg:width="0.198cm" svg:height="0.286cm" svg:x="13.163cm" svg:y="11.933cm">
            <text:p/>
            <draw:enhanced-geometry svg:viewBox="0 0 45 65" draw:type="non-primitive" draw:enhanced-path="M 44 64  L 44 6  L 27 5  L 11 3  L 0 0  N"/>
          </draw:custom-shape>
          <draw:custom-shape draw:style-name="gr666" draw:text-style-name="P2" draw:layer="layout" svg:width="0.181cm" svg:height="0.075cm" svg:x="12.898cm" svg:y="13.075cm">
            <text:p/>
            <draw:enhanced-geometry svg:viewBox="0 0 41 17" draw:type="non-primitive" draw:enhanced-path="M 0 0  L 24 8  L 40 16  N"/>
          </draw:custom-shape>
          <draw:custom-shape draw:style-name="gr666" draw:text-style-name="P2" draw:layer="layout" svg:width="0.181cm" svg:height="0.075cm" svg:x="12.898cm" svg:y="13.075cm">
            <text:p/>
            <draw:enhanced-geometry svg:viewBox="0 0 41 17" draw:type="non-primitive" draw:enhanced-path="M 0 0  L 24 8  L 40 16  N"/>
          </draw:custom-shape>
          <draw:line draw:style-name="gr7" draw:text-style-name="P14" draw:layer="layout" svg:x1="13.339cm" svg:y1="12.797cm" svg:x2="13.339cm" svg:y2="12.898cm">
            <text:p/>
          </draw:line>
          <draw:line draw:style-name="gr7" draw:text-style-name="P14" draw:layer="layout" svg:x1="13.339cm" svg:y1="12.797cm" svg:x2="13.339cm" svg:y2="12.898cm">
            <text:p/>
          </draw:line>
          <draw:custom-shape draw:style-name="gr666" draw:text-style-name="P2" draw:layer="layout" svg:width="0.313cm" svg:height="0.224cm" svg:x="13.516cm" svg:y="12.33cm">
            <text:p/>
            <draw:enhanced-geometry svg:viewBox="0 0 71 51" draw:type="non-primitive" draw:enhanced-path="M 61 0  L 65 19  L 70 39  L 41 45  L 17 50  L 0 50  N"/>
          </draw:custom-shape>
          <draw:custom-shape draw:style-name="gr666" draw:text-style-name="P2" draw:layer="layout" svg:width="0.313cm" svg:height="0.224cm" svg:x="13.516cm" svg:y="12.33cm">
            <text:p/>
            <draw:enhanced-geometry svg:viewBox="0 0 71 51" draw:type="non-primitive" draw:enhanced-path="M 61 0  L 65 19  L 70 39  L 41 45  L 17 50  L 0 50  N"/>
          </draw:custom-shape>
          <draw:line draw:style-name="gr7" draw:text-style-name="P14" draw:layer="layout" svg:x1="13.595cm" svg:y1="11.946cm" svg:x2="13.529cm" svg:y2="11.959cm">
            <text:p/>
          </draw:line>
          <draw:line draw:style-name="gr7" draw:text-style-name="P14" draw:layer="layout" svg:x1="13.595cm" svg:y1="11.946cm" svg:x2="13.529cm" svg:y2="11.959cm">
            <text:p/>
          </draw:line>
          <draw:custom-shape draw:style-name="gr666" draw:text-style-name="P2" draw:layer="layout" svg:width="0.216cm" svg:height="0.216cm" svg:x="13.683cm" svg:y="11.853cm">
            <text:p/>
            <draw:enhanced-geometry svg:viewBox="0 0 49 49" draw:type="non-primitive" draw:enhanced-path="M 9 48  L 6 38  L 0 18  L 22 11  L 38 5  L 48 0  N"/>
          </draw:custom-shape>
          <draw:custom-shape draw:style-name="gr666" draw:text-style-name="P2" draw:layer="layout" svg:width="0.216cm" svg:height="0.216cm" svg:x="13.683cm" svg:y="11.853cm">
            <text:p/>
            <draw:enhanced-geometry svg:viewBox="0 0 49 49" draw:type="non-primitive" draw:enhanced-path="M 9 48  L 6 38  L 0 18  L 22 11  L 38 5  L 48 0  N"/>
          </draw:custom-shape>
          <draw:line draw:style-name="gr7" draw:text-style-name="P14" draw:layer="layout" svg:x1="13.78cm" svg:y1="12.316cm" svg:x2="13.754cm" svg:y2="12.206cm">
            <text:p/>
          </draw:line>
          <draw:line draw:style-name="gr7" draw:text-style-name="P14" draw:layer="layout" svg:x1="13.78cm" svg:y1="12.316cm" svg:x2="13.754cm" svg:y2="12.206cm">
            <text:p/>
          </draw:line>
          <draw:line draw:style-name="gr7" draw:text-style-name="P14" draw:layer="layout" svg:x1="12.285cm" svg:y1="11.06cm" svg:x2="12.211cm" svg:y2="11.152cm">
            <text:p/>
          </draw:line>
          <draw:line draw:style-name="gr7" draw:text-style-name="P14" draw:layer="layout" svg:x1="12.285cm" svg:y1="11.06cm" svg:x2="12.211cm" svg:y2="11.152cm">
            <text:p/>
          </draw:line>
          <draw:custom-shape draw:style-name="gr674" draw:text-style-name="P2" draw:layer="layout" svg:width="0.679cm" svg:height="0.366cm" svg:x="11.739cm" svg:y="11.448cm">
            <text:p/>
            <draw:enhanced-geometry svg:viewBox="0 0 154 83" draw:type="non-primitive" draw:enhanced-path="M 153 11  L 129 27  L 109 42  L 88 59  L 75 72  L 72 60  L 72 25  L 73 10  L 75 0  L 68 4  L 50 18  L 40 30  L 27 44  L 13 61  L 0 82  N"/>
          </draw:custom-shape>
          <draw:custom-shape draw:style-name="gr674" draw:text-style-name="P2" draw:layer="layout" svg:width="0.679cm" svg:height="0.366cm" svg:x="11.739cm" svg:y="11.448cm">
            <text:p/>
            <draw:enhanced-geometry svg:viewBox="0 0 154 83" draw:type="non-primitive" draw:enhanced-path="M 153 11  L 129 27  L 109 42  L 88 59  L 75 72  L 72 60  L 72 25  L 73 10  L 75 0  L 68 4  L 50 18  L 40 30  L 27 44  L 13 61  L 0 82  N"/>
          </draw:custom-shape>
          <draw:custom-shape draw:style-name="gr675" draw:text-style-name="P2" draw:layer="layout" svg:width="0.459cm" svg:height="0.296cm" svg:x="12.069cm" svg:y="11.152cm">
            <text:p/>
            <draw:enhanced-geometry svg:viewBox="0 0 104 67" draw:type="non-primitive" draw:enhanced-path="M 102 56  L 101 44  L 102 31  L 103 19  L 86 24  L 64 31  L 43 40  L 22 50  L 9 61  L 0 66  L 3 55  L 5 44  L 15 26  L 24 10  L 32 0  L 15 10  N"/>
          </draw:custom-shape>
          <draw:custom-shape draw:style-name="gr675" draw:text-style-name="P2" draw:layer="layout" svg:width="0.459cm" svg:height="0.296cm" svg:x="12.069cm" svg:y="11.152cm">
            <text:p/>
            <draw:enhanced-geometry svg:viewBox="0 0 104 67" draw:type="non-primitive" draw:enhanced-path="M 102 56  L 101 44  L 102 31  L 103 19  L 86 24  L 64 31  L 43 40  L 22 50  L 9 61  L 0 66  L 3 55  L 5 44  L 15 26  L 24 10  L 32 0  L 15 10  N"/>
          </draw:custom-shape>
          <draw:custom-shape draw:style-name="gr666" draw:text-style-name="P2" draw:layer="layout" svg:width="0.291cm" svg:height="0.106cm" svg:x="12.211cm" svg:y="11.051cm">
            <text:p/>
            <draw:enhanced-geometry svg:viewBox="0 0 66 24" draw:type="non-primitive" draw:enhanced-path="M 0 23  L 23 14  L 44 5  L 65 0  N"/>
          </draw:custom-shape>
          <draw:custom-shape draw:style-name="gr666" draw:text-style-name="P2" draw:layer="layout" svg:width="0.291cm" svg:height="0.106cm" svg:x="12.211cm" svg:y="11.051cm">
            <text:p/>
            <draw:enhanced-geometry svg:viewBox="0 0 66 24" draw:type="non-primitive" draw:enhanced-path="M 0 23  L 23 14  L 44 5  L 65 0  N"/>
          </draw:custom-shape>
          <draw:custom-shape draw:style-name="gr666" draw:text-style-name="P2" draw:layer="layout" svg:width="0.092cm" svg:height="0.092cm" svg:x="14.742cm" svg:y="11.514cm">
            <text:p/>
            <draw:enhanced-geometry svg:viewBox="0 0 21 21" draw:type="non-primitive" draw:enhanced-path="M 0 0  L 10 12  L 20 20  N"/>
          </draw:custom-shape>
          <draw:custom-shape draw:style-name="gr666" draw:text-style-name="P2" draw:layer="layout" svg:width="0.092cm" svg:height="0.092cm" svg:x="14.742cm" svg:y="11.514cm">
            <text:p/>
            <draw:enhanced-geometry svg:viewBox="0 0 21 21" draw:type="non-primitive" draw:enhanced-path="M 0 0  L 10 12  L 20 20  N"/>
          </draw:custom-shape>
          <draw:custom-shape draw:style-name="gr666" draw:text-style-name="P2" draw:layer="layout" svg:width="0.115cm" svg:height="0.154cm" svg:x="13.097cm" svg:y="11.395cm">
            <text:p/>
            <draw:enhanced-geometry svg:viewBox="0 0 26 35" draw:type="non-primitive" draw:enhanced-path="M 0 34  L 13 16  L 25 0  N"/>
          </draw:custom-shape>
          <draw:custom-shape draw:style-name="gr666" draw:text-style-name="P2" draw:layer="layout" svg:width="0.115cm" svg:height="0.154cm" svg:x="13.097cm" svg:y="11.395cm">
            <text:p/>
            <draw:enhanced-geometry svg:viewBox="0 0 26 35" draw:type="non-primitive" draw:enhanced-path="M 0 34  L 13 16  L 25 0  N"/>
          </draw:custom-shape>
          <draw:custom-shape draw:style-name="gr666" draw:text-style-name="P2" draw:layer="layout" svg:width="0.273cm" svg:height="0.172cm" svg:x="12.846cm" svg:y="11.32cm">
            <text:p/>
            <draw:enhanced-geometry svg:viewBox="0 0 62 39" draw:type="non-primitive" draw:enhanced-path="M 61 0  L 30 17  L 0 38  N"/>
          </draw:custom-shape>
          <draw:custom-shape draw:style-name="gr666" draw:text-style-name="P2" draw:layer="layout" svg:width="0.273cm" svg:height="0.172cm" svg:x="12.846cm" svg:y="11.32cm">
            <text:p/>
            <draw:enhanced-geometry svg:viewBox="0 0 62 39" draw:type="non-primitive" draw:enhanced-path="M 61 0  L 30 17  L 0 38  N"/>
          </draw:custom-shape>
          <draw:custom-shape draw:style-name="gr666" draw:text-style-name="P2" draw:layer="layout" svg:width="0.269cm" svg:height="0.08cm" svg:x="12.815cm" svg:y="11.249cm">
            <text:p/>
            <draw:enhanced-geometry svg:viewBox="0 0 61 18" draw:type="non-primitive" draw:enhanced-path="M 0 17  L 30 8  L 60 0  N"/>
          </draw:custom-shape>
          <draw:custom-shape draw:style-name="gr666" draw:text-style-name="P2" draw:layer="layout" svg:width="0.269cm" svg:height="0.08cm" svg:x="12.815cm" svg:y="11.249cm">
            <text:p/>
            <draw:enhanced-geometry svg:viewBox="0 0 61 18" draw:type="non-primitive" draw:enhanced-path="M 0 17  L 30 8  L 60 0  N"/>
          </draw:custom-shape>
          <draw:custom-shape draw:style-name="gr666" draw:text-style-name="P2" draw:layer="layout" svg:width="0.136cm" svg:height="0.119cm" svg:x="12.524cm" svg:y="11.121cm">
            <text:p/>
            <draw:enhanced-geometry svg:viewBox="0 0 31 27" draw:type="non-primitive" draw:enhanced-path="M 30 18  L 17 23  L 0 26  L 4 19  L 9 9  L 13 0  N"/>
          </draw:custom-shape>
          <draw:custom-shape draw:style-name="gr666" draw:text-style-name="P2" draw:layer="layout" svg:width="0.136cm" svg:height="0.119cm" svg:x="12.524cm" svg:y="11.121cm">
            <text:p/>
            <draw:enhanced-geometry svg:viewBox="0 0 31 27" draw:type="non-primitive" draw:enhanced-path="M 30 18  L 17 23  L 0 26  L 4 19  L 9 9  L 13 0  N"/>
          </draw:custom-shape>
          <draw:custom-shape draw:style-name="gr666" draw:text-style-name="P2" draw:layer="layout" svg:width="0.343cm" svg:height="0.075cm" svg:x="12.749cm" svg:y="11.165cm">
            <text:p/>
            <draw:enhanced-geometry svg:viewBox="0 0 78 17" draw:type="non-primitive" draw:enhanced-path="M 77 0  L 37 5  L 0 16  N"/>
          </draw:custom-shape>
          <draw:custom-shape draw:style-name="gr666" draw:text-style-name="P2" draw:layer="layout" svg:width="0.343cm" svg:height="0.075cm" svg:x="12.749cm" svg:y="11.165cm">
            <text:p/>
            <draw:enhanced-geometry svg:viewBox="0 0 78 17" draw:type="non-primitive" draw:enhanced-path="M 77 0  L 37 5  L 0 16  N"/>
          </draw:custom-shape>
          <draw:custom-shape draw:style-name="gr666" draw:text-style-name="P2" draw:layer="layout" svg:width="0.233cm" svg:height="0.075cm" svg:x="12.89cm" svg:y="11.051cm">
            <text:p/>
            <draw:enhanced-geometry svg:viewBox="0 0 53 17" draw:type="non-primitive" draw:enhanced-path="M 52 16  L 23 7  L 0 0  N"/>
          </draw:custom-shape>
          <draw:custom-shape draw:style-name="gr666" draw:text-style-name="P2" draw:layer="layout" svg:width="0.233cm" svg:height="0.075cm" svg:x="12.89cm" svg:y="11.051cm">
            <text:p/>
            <draw:enhanced-geometry svg:viewBox="0 0 53 17" draw:type="non-primitive" draw:enhanced-path="M 52 16  L 23 7  L 0 0  N"/>
          </draw:custom-shape>
          <draw:custom-shape draw:style-name="gr666" draw:text-style-name="P2" draw:layer="layout" svg:width="0.128cm" svg:height="0.079cm" svg:x="13.066cm" svg:y="10.967cm">
            <text:p/>
            <draw:enhanced-geometry svg:viewBox="0 0 29 18" draw:type="non-primitive" draw:enhanced-path="M 0 0  L 12 8  L 28 17  N"/>
          </draw:custom-shape>
          <draw:custom-shape draw:style-name="gr666" draw:text-style-name="P2" draw:layer="layout" svg:width="0.128cm" svg:height="0.079cm" svg:x="13.066cm" svg:y="10.967cm">
            <text:p/>
            <draw:enhanced-geometry svg:viewBox="0 0 29 18" draw:type="non-primitive" draw:enhanced-path="M 0 0  L 12 8  L 28 17  N"/>
          </draw:custom-shape>
          <draw:custom-shape draw:style-name="gr676" draw:text-style-name="P2" draw:layer="layout" svg:width="0.093cm" svg:height="0.278cm" svg:x="13.357cm" svg:y="11.686cm">
            <text:p/>
            <draw:enhanced-geometry svg:viewBox="0 0 21 63" draw:type="non-primitive" draw:enhanced-path="M 2 0  L 2 32  L 0 62  L 20 62  N"/>
          </draw:custom-shape>
          <draw:custom-shape draw:style-name="gr676" draw:text-style-name="P2" draw:layer="layout" svg:width="0.093cm" svg:height="0.278cm" svg:x="13.357cm" svg:y="11.686cm">
            <text:p/>
            <draw:enhanced-geometry svg:viewBox="0 0 21 63" draw:type="non-primitive" draw:enhanced-path="M 2 0  L 2 32  L 0 62  L 20 62  N"/>
          </draw:custom-shape>
          <draw:line draw:style-name="gr7" draw:text-style-name="P14" draw:layer="layout" svg:x1="13.366cm" svg:y1="11.514cm" svg:x2="13.366cm" svg:y2="11.598cm">
            <text:p/>
          </draw:line>
          <draw:line draw:style-name="gr7" draw:text-style-name="P14" draw:layer="layout" svg:x1="13.366cm" svg:y1="11.514cm" svg:x2="13.366cm" svg:y2="11.598cm">
            <text:p/>
          </draw:line>
          <draw:line draw:style-name="gr7" draw:text-style-name="P14" draw:layer="layout" svg:x1="13.384cm" svg:y1="10.941cm" svg:x2="13.388cm" svg:y2="10.998cm">
            <text:p/>
          </draw:line>
          <draw:line draw:style-name="gr7" draw:text-style-name="P14" draw:layer="layout" svg:x1="13.384cm" svg:y1="10.941cm" svg:x2="13.388cm" svg:y2="10.998cm">
            <text:p/>
          </draw:line>
          <draw:custom-shape draw:style-name="gr666" draw:text-style-name="P2" draw:layer="layout" svg:width="0.114cm" svg:height="0.101cm" svg:x="13.181cm" svg:y="10.91cm">
            <text:p/>
            <draw:enhanced-geometry svg:viewBox="0 0 26 23" draw:type="non-primitive" draw:enhanced-path="M 25 22  L 16 13  L 6 4  L 0 0  N"/>
          </draw:custom-shape>
          <draw:custom-shape draw:style-name="gr666" draw:text-style-name="P2" draw:layer="layout" svg:width="0.114cm" svg:height="0.101cm" svg:x="13.181cm" svg:y="10.91cm">
            <text:p/>
            <draw:enhanced-geometry svg:viewBox="0 0 26 23" draw:type="non-primitive" draw:enhanced-path="M 25 22  L 16 13  L 6 4  L 0 0  N"/>
          </draw:custom-shape>
          <draw:custom-shape draw:style-name="gr666" draw:text-style-name="P2" draw:layer="layout" svg:width="0.207cm" svg:height="0.101cm" svg:x="13.578cm" svg:y="10.945cm">
            <text:p/>
            <draw:enhanced-geometry svg:viewBox="0 0 47 23" draw:type="non-primitive" draw:enhanced-path="M 0 22  L 32 7  L 46 0  N"/>
          </draw:custom-shape>
          <draw:custom-shape draw:style-name="gr666" draw:text-style-name="P2" draw:layer="layout" svg:width="0.207cm" svg:height="0.101cm" svg:x="13.578cm" svg:y="10.945cm">
            <text:p/>
            <draw:enhanced-geometry svg:viewBox="0 0 47 23" draw:type="non-primitive" draw:enhanced-path="M 0 22  L 32 7  L 46 0  N"/>
          </draw:custom-shape>
          <draw:custom-shape draw:style-name="gr666" draw:text-style-name="P2" draw:layer="layout" svg:width="0.092cm" svg:height="0.097cm" svg:x="13.494cm" svg:y="10.923cm">
            <text:p/>
            <draw:enhanced-geometry svg:viewBox="0 0 21 22" draw:type="non-primitive" draw:enhanced-path="M 20 0  L 12 5  L 7 12  L 0 21  N"/>
          </draw:custom-shape>
          <draw:custom-shape draw:style-name="gr666" draw:text-style-name="P2" draw:layer="layout" svg:width="0.092cm" svg:height="0.097cm" svg:x="13.494cm" svg:y="10.923cm">
            <text:p/>
            <draw:enhanced-geometry svg:viewBox="0 0 21 22" draw:type="non-primitive" draw:enhanced-path="M 20 0  L 12 5  L 7 12  L 0 21  N"/>
          </draw:custom-shape>
          <draw:custom-shape draw:style-name="gr666" draw:text-style-name="P2" draw:layer="layout" svg:width="0.305cm" svg:height="0.075cm" svg:x="13.661cm" svg:y="11.073cm">
            <text:p/>
            <draw:enhanced-geometry svg:viewBox="0 0 69 17" draw:type="non-primitive" draw:enhanced-path="M 68 0  L 32 6  L 0 16  N"/>
          </draw:custom-shape>
          <draw:custom-shape draw:style-name="gr666" draw:text-style-name="P2" draw:layer="layout" svg:width="0.305cm" svg:height="0.075cm" svg:x="13.661cm" svg:y="11.073cm">
            <text:p/>
            <draw:enhanced-geometry svg:viewBox="0 0 69 17" draw:type="non-primitive" draw:enhanced-path="M 68 0  L 32 6  L 0 16  N"/>
          </draw:custom-shape>
          <draw:line draw:style-name="gr7" draw:text-style-name="P14" draw:layer="layout" svg:x1="13.683cm" svg:y1="11.183cm" svg:x2="13.816cm" svg:y2="11.192cm">
            <text:p/>
          </draw:line>
          <draw:line draw:style-name="gr7" draw:text-style-name="P14" draw:layer="layout" svg:x1="13.683cm" svg:y1="11.183cm" svg:x2="13.816cm" svg:y2="11.192cm">
            <text:p/>
          </draw:line>
          <draw:custom-shape draw:style-name="gr666" draw:text-style-name="P2" draw:layer="layout" svg:width="0.185cm" svg:height="0.075cm" svg:x="13.816cm" svg:y="11.192cm">
            <text:p/>
            <draw:enhanced-geometry svg:viewBox="0 0 42 17" draw:type="non-primitive" draw:enhanced-path="M 0 0  L 22 8  L 41 16  N"/>
          </draw:custom-shape>
          <draw:custom-shape draw:style-name="gr666" draw:text-style-name="P2" draw:layer="layout" svg:width="0.185cm" svg:height="0.075cm" svg:x="13.816cm" svg:y="11.192cm">
            <text:p/>
            <draw:enhanced-geometry svg:viewBox="0 0 42 17" draw:type="non-primitive" draw:enhanced-path="M 0 0  L 22 8  L 41 16  N"/>
          </draw:custom-shape>
          <draw:custom-shape draw:style-name="gr666" draw:text-style-name="P2" draw:layer="layout" svg:width="0.274cm" svg:height="0.133cm" svg:x="14.243cm" svg:y="13.361cm">
            <text:p/>
            <draw:enhanced-geometry svg:viewBox="0 0 62 30" draw:type="non-primitive" draw:enhanced-path="M 0 29  L 13 23  L 34 15  L 54 4  L 61 0  L 61 21  N"/>
          </draw:custom-shape>
          <draw:custom-shape draw:style-name="gr666" draw:text-style-name="P2" draw:layer="layout" svg:width="0.274cm" svg:height="0.133cm" svg:x="14.243cm" svg:y="13.361cm">
            <text:p/>
            <draw:enhanced-geometry svg:viewBox="0 0 62 30" draw:type="non-primitive" draw:enhanced-path="M 0 29  L 13 23  L 34 15  L 54 4  L 61 0  L 61 21  N"/>
          </draw:custom-shape>
          <draw:custom-shape draw:style-name="gr677" draw:text-style-name="P2" draw:layer="layout" svg:width="0.208cm" svg:height="0.52cm" svg:x="14.9cm" svg:y="12.524cm">
            <text:p/>
            <draw:enhanced-geometry svg:viewBox="0 0 47 118" draw:type="non-primitive" draw:enhanced-path="M 46 0  L 38 37  L 29 60  L 21 80  L 9 98  L 0 117  N"/>
          </draw:custom-shape>
          <draw:custom-shape draw:style-name="gr677" draw:text-style-name="P2" draw:layer="layout" svg:width="0.208cm" svg:height="0.52cm" svg:x="14.9cm" svg:y="12.524cm">
            <text:p/>
            <draw:enhanced-geometry svg:viewBox="0 0 47 118" draw:type="non-primitive" draw:enhanced-path="M 46 0  L 38 37  L 29 60  L 21 80  L 9 98  L 0 117  N"/>
          </draw:custom-shape>
          <draw:custom-shape draw:style-name="gr678" draw:text-style-name="P2" draw:layer="layout" svg:width="0.904cm" svg:height="1.27cm" svg:x="13.93cm" svg:y="12.114cm">
            <text:p/>
            <draw:enhanced-geometry svg:viewBox="0 0 205 288" draw:type="non-primitive" draw:enhanced-path="M 204 94  L 196 106  L 184 75  L 176 59  L 163 36  L 147 11  L 138 0  L 130 11  L 116 23  L 97 40  L 78 49  L 71 54  L 78 68  L 88 94  L 105 132  L 115 167  L 118 174  L 105 181  L 84 189  L 52 202  L 21 214  L 0 218  L 4 247  L 9 277  L 9 287  N"/>
          </draw:custom-shape>
          <draw:custom-shape draw:style-name="gr678" draw:text-style-name="P2" draw:layer="layout" svg:width="0.904cm" svg:height="1.27cm" svg:x="13.93cm" svg:y="12.114cm">
            <text:p/>
            <draw:enhanced-geometry svg:viewBox="0 0 205 288" draw:type="non-primitive" draw:enhanced-path="M 204 94  L 196 106  L 184 75  L 176 59  L 163 36  L 147 11  L 138 0  L 130 11  L 116 23  L 97 40  L 78 49  L 71 54  L 78 68  L 88 94  L 105 132  L 115 167  L 118 174  L 105 181  L 84 189  L 52 202  L 21 214  L 0 218  L 4 247  L 9 277  L 9 287  N"/>
          </draw:custom-shape>
          <draw:custom-shape draw:style-name="gr679" draw:text-style-name="P2" draw:layer="layout" svg:width="0.565cm" svg:height="0.229cm" svg:x="13.683cm" svg:y="11.254cm">
            <text:p/>
            <draw:enhanced-geometry svg:viewBox="0 0 128 52" draw:type="non-primitive" draw:enhanced-path="M 0 0  L 37 13  L 82 27  L 117 45  L 126 51  L 127 38  N"/>
          </draw:custom-shape>
          <draw:custom-shape draw:style-name="gr679" draw:text-style-name="P2" draw:layer="layout" svg:width="0.565cm" svg:height="0.229cm" svg:x="13.683cm" svg:y="11.254cm">
            <text:p/>
            <draw:enhanced-geometry svg:viewBox="0 0 128 52" draw:type="non-primitive" draw:enhanced-path="M 0 0  L 37 13  L 82 27  L 117 45  L 126 51  L 127 38  N"/>
          </draw:custom-shape>
          <draw:line draw:style-name="gr7" draw:text-style-name="P14" draw:layer="layout" svg:x1="13.802cm" svg:y1="11.43cm" svg:x2="13.895cm" svg:y2="11.492cm">
            <text:p/>
          </draw:line>
          <draw:line draw:style-name="gr7" draw:text-style-name="P14" draw:layer="layout" svg:x1="13.802cm" svg:y1="11.43cm" svg:x2="13.895cm" svg:y2="11.492cm">
            <text:p/>
          </draw:line>
          <draw:custom-shape draw:style-name="gr680" draw:text-style-name="P2" draw:layer="layout" svg:width="0.15cm" svg:height="0.427cm" svg:x="13.538cm" svg:y="11.523cm">
            <text:p/>
            <draw:enhanced-geometry svg:viewBox="0 0 34 97" draw:type="non-primitive" draw:enhanced-path="M 13 96  L 33 93  L 23 66  L 16 48  L 10 27  L 0 0  N"/>
          </draw:custom-shape>
          <draw:custom-shape draw:style-name="gr680" draw:text-style-name="P2" draw:layer="layout" svg:width="0.15cm" svg:height="0.427cm" svg:x="13.538cm" svg:y="11.523cm">
            <text:p/>
            <draw:enhanced-geometry svg:viewBox="0 0 34 97" draw:type="non-primitive" draw:enhanced-path="M 13 96  L 33 93  L 23 66  L 16 48  L 10 27  L 0 0  N"/>
          </draw:custom-shape>
          <draw:custom-shape draw:style-name="gr681" draw:text-style-name="P2" draw:layer="layout" svg:width="0.741cm" svg:height="0.441cm" svg:x="13.86cm" svg:y="11.677cm">
            <text:p/>
            <draw:enhanced-geometry svg:viewBox="0 0 168 100" draw:type="non-primitive" draw:enhanced-path="M 167 82  L 154 99  L 141 80  L 127 62  L 110 44  L 83 18  L 62 0  L 51 12  L 33 25  L 20 35  L 0 6  N"/>
          </draw:custom-shape>
          <draw:custom-shape draw:style-name="gr681" draw:text-style-name="P2" draw:layer="layout" svg:width="0.741cm" svg:height="0.441cm" svg:x="13.86cm" svg:y="11.677cm">
            <text:p/>
            <draw:enhanced-geometry svg:viewBox="0 0 168 100" draw:type="non-primitive" draw:enhanced-path="M 167 82  L 154 99  L 141 80  L 127 62  L 110 44  L 83 18  L 62 0  L 51 12  L 33 25  L 20 35  L 0 6  N"/>
          </draw:custom-shape>
          <draw:line draw:style-name="gr7" draw:text-style-name="P14" draw:layer="layout" svg:x1="14.654cm" svg:y1="11.946cm" svg:x2="14.596cm" svg:y2="12.039cm">
            <text:p/>
          </draw:line>
          <draw:line draw:style-name="gr7" draw:text-style-name="P14" draw:layer="layout" svg:x1="14.654cm" svg:y1="11.946cm" svg:x2="14.596cm" svg:y2="12.039cm">
            <text:p/>
          </draw:line>
          <draw:custom-shape draw:style-name="gr666" draw:text-style-name="P2" draw:layer="layout" svg:width="0.225cm" svg:height="0.075cm" svg:x="14.16cm" svg:y="11.254cm">
            <text:p/>
            <draw:enhanced-geometry svg:viewBox="0 0 51 17" draw:type="non-primitive" draw:enhanced-path="M 0 0  L 13 4  L 28 8  L 38 13  L 50 16  N"/>
          </draw:custom-shape>
          <draw:custom-shape draw:style-name="gr666" draw:text-style-name="P2" draw:layer="layout" svg:width="0.225cm" svg:height="0.075cm" svg:x="14.16cm" svg:y="11.254cm">
            <text:p/>
            <draw:enhanced-geometry svg:viewBox="0 0 51 17" draw:type="non-primitive" draw:enhanced-path="M 0 0  L 13 4  L 28 8  L 38 13  L 50 16  N"/>
          </draw:custom-shape>
          <draw:custom-shape draw:style-name="gr666" draw:text-style-name="P2" draw:layer="layout" svg:width="0.092cm" svg:height="0.075cm" svg:x="14.226cm" svg:y="11.249cm">
            <text:p/>
            <draw:enhanced-geometry svg:viewBox="0 0 21 17" draw:type="non-primitive" draw:enhanced-path="M 20 16  L 15 6  L 0 0  N"/>
          </draw:custom-shape>
          <draw:custom-shape draw:style-name="gr666" draw:text-style-name="P2" draw:layer="layout" svg:width="0.092cm" svg:height="0.075cm" svg:x="14.226cm" svg:y="11.249cm">
            <text:p/>
            <draw:enhanced-geometry svg:viewBox="0 0 21 17" draw:type="non-primitive" draw:enhanced-path="M 20 16  L 15 6  L 0 0  N"/>
          </draw:custom-shape>
          <draw:custom-shape draw:style-name="gr666" draw:text-style-name="P2" draw:layer="layout" svg:width="0.339cm" svg:height="0.202cm" svg:x="14.063cm" svg:y="11.479cm">
            <text:p/>
            <draw:enhanced-geometry svg:viewBox="0 0 77 46" draw:type="non-primitive" draw:enhanced-path="M 76 21  L 60 11  L 40 0  L 36 10  L 31 24  L 24 35  L 16 45  L 8 39  L 0 32  N"/>
          </draw:custom-shape>
          <draw:custom-shape draw:style-name="gr666" draw:text-style-name="P2" draw:layer="layout" svg:width="0.339cm" svg:height="0.202cm" svg:x="14.063cm" svg:y="11.479cm">
            <text:p/>
            <draw:enhanced-geometry svg:viewBox="0 0 77 46" draw:type="non-primitive" draw:enhanced-path="M 76 21  L 60 11  L 40 0  L 36 10  L 31 24  L 24 35  L 16 45  L 8 39  L 0 32  N"/>
          </draw:custom-shape>
          <draw:line draw:style-name="gr7" draw:text-style-name="P14" draw:layer="layout" svg:x1="14.477cm" svg:y1="11.624cm" svg:x2="14.512cm" svg:y2="11.655cm">
            <text:p/>
          </draw:line>
          <draw:line draw:style-name="gr7" draw:text-style-name="P14" draw:layer="layout" svg:x1="14.477cm" svg:y1="11.624cm" svg:x2="14.512cm" svg:y2="11.655cm">
            <text:p/>
          </draw:line>
          <draw:line draw:style-name="gr7" draw:text-style-name="P14" draw:layer="layout" svg:x1="14.724cm" svg:y1="11.589cm" svg:x2="14.724cm" svg:y2="11.673cm">
            <text:p/>
          </draw:line>
          <draw:line draw:style-name="gr7" draw:text-style-name="P14" draw:layer="layout" svg:x1="14.724cm" svg:y1="11.589cm" svg:x2="14.724cm" svg:y2="11.673cm">
            <text:p/>
          </draw:line>
          <draw:custom-shape draw:style-name="gr666" draw:text-style-name="P2" draw:layer="layout" svg:width="0.092cm" svg:height="0.154cm" svg:x="14.72cm" svg:y="11.673cm">
            <text:p/>
            <draw:enhanced-geometry svg:viewBox="0 0 21 35" draw:type="non-primitive" draw:enhanced-path="M 20 0  L 20 12  L 10 26  L 0 34  N"/>
          </draw:custom-shape>
          <draw:custom-shape draw:style-name="gr666" draw:text-style-name="P2" draw:layer="layout" svg:width="0.092cm" svg:height="0.154cm" svg:x="14.72cm" svg:y="11.673cm">
            <text:p/>
            <draw:enhanced-geometry svg:viewBox="0 0 21 35" draw:type="non-primitive" draw:enhanced-path="M 20 0  L 20 12  L 10 26  L 0 34  N"/>
          </draw:custom-shape>
          <draw:line draw:style-name="gr7" draw:text-style-name="P14" draw:layer="layout" svg:x1="14.786cm" svg:y1="11.911cm" svg:x2="14.742cm" svg:y2="11.849cm">
            <text:p/>
          </draw:line>
          <draw:line draw:style-name="gr7" draw:text-style-name="P14" draw:layer="layout" svg:x1="14.786cm" svg:y1="11.911cm" svg:x2="14.742cm" svg:y2="11.849cm">
            <text:p/>
          </draw:line>
          <draw:line draw:style-name="gr7" draw:text-style-name="P14" draw:layer="layout" svg:x1="13.428cm" svg:y1="11.43cm" svg:x2="13.463cm" svg:y2="11.43cm">
            <text:p/>
          </draw:line>
          <draw:line draw:style-name="gr7" draw:text-style-name="P14" draw:layer="layout" svg:x1="13.428cm" svg:y1="11.43cm" svg:x2="13.463cm" svg:y2="11.43cm">
            <text:p/>
          </draw:line>
          <draw:line draw:style-name="gr7" draw:text-style-name="P14" draw:layer="layout" svg:x1="13.066cm" svg:y1="11.602cm" svg:x2="13.075cm" svg:y2="11.584cm">
            <text:p/>
          </draw:line>
          <draw:line draw:style-name="gr7" draw:text-style-name="P14" draw:layer="layout" svg:x1="13.066cm" svg:y1="11.602cm" svg:x2="13.075cm" svg:y2="11.584cm">
            <text:p/>
          </draw:line>
          <draw:line draw:style-name="gr7" draw:text-style-name="P14" draw:layer="layout" svg:x1="13.044cm" svg:y1="11.633cm" svg:x2="13.022cm" svg:y2="11.659cm">
            <text:p/>
          </draw:line>
          <draw:line draw:style-name="gr7" draw:text-style-name="P14" draw:layer="layout" svg:x1="13.044cm" svg:y1="11.633cm" svg:x2="13.022cm" svg:y2="11.659cm">
            <text:p/>
          </draw:line>
          <draw:line draw:style-name="gr7" draw:text-style-name="P14" draw:layer="layout" svg:x1="13.52cm" svg:y1="13.132cm" svg:x2="13.551cm" svg:y2="13.132cm">
            <text:p/>
          </draw:line>
          <draw:line draw:style-name="gr7" draw:text-style-name="P14" draw:layer="layout" svg:x1="13.52cm" svg:y1="13.132cm" svg:x2="13.551cm" svg:y2="13.132cm">
            <text:p/>
          </draw:line>
          <draw:custom-shape draw:style-name="gr682" draw:text-style-name="P2" draw:layer="layout" svg:width="0.609cm" svg:height="0.436cm" svg:x="13.079cm" svg:y="10.998cm">
            <text:p/>
            <draw:enhanced-geometry svg:viewBox="0 0 138 99" draw:type="non-primitive" draw:enhanced-path="M 131 71  L 133 65  L 136 58  L 137 54  L 137 47  L 136 37  L 131 27  L 124 21  L 114 13  L 104 8  L 92 4  L 79 1  L 67 0  L 54 1  L 41 4  L 30 9  L 20 14  L 11 21  L 8 26  L 2 33  L 0 44  L 0 52  L 1 58  L 2 65  L 6 71  L 10 75  L 15 80  L 20 83  L 25 87  L 29 90  L 34 92  L 43 95  L 51 97  L 60 98  N"/>
          </draw:custom-shape>
          <draw:custom-shape draw:style-name="gr682" draw:text-style-name="P2" draw:layer="layout" svg:width="0.609cm" svg:height="0.436cm" svg:x="13.079cm" svg:y="10.998cm">
            <text:p/>
            <draw:enhanced-geometry svg:viewBox="0 0 138 99" draw:type="non-primitive" draw:enhanced-path="M 131 71  L 133 65  L 136 58  L 137 54  L 137 47  L 136 37  L 131 27  L 124 21  L 114 13  L 104 8  L 92 4  L 79 1  L 67 0  L 54 1  L 41 4  L 30 9  L 20 14  L 11 21  L 8 26  L 2 33  L 0 44  L 0 52  L 1 58  L 2 65  L 6 71  L 10 75  L 15 80  L 20 83  L 25 87  L 29 90  L 34 92  L 43 95  L 51 97  L 60 98  N"/>
          </draw:custom-shape>
          <draw:line draw:style-name="gr7" draw:text-style-name="P14" draw:layer="layout" svg:x1="14.72cm" svg:y1="11.549cm" svg:x2="14.72cm" svg:y2="11.505cm">
            <text:p/>
          </draw:line>
          <draw:line draw:style-name="gr7" draw:text-style-name="P14" draw:layer="layout" svg:x1="14.72cm" svg:y1="11.549cm" svg:x2="14.72cm" svg:y2="11.505cm">
            <text:p/>
          </draw:line>
          <draw:line draw:style-name="gr7" draw:text-style-name="P14" draw:layer="layout" svg:x1="13.33cm" svg:y1="13.63cm" svg:x2="13.321cm" svg:y2="13.714cm">
            <text:p/>
          </draw:line>
          <draw:line draw:style-name="gr7" draw:text-style-name="P14" draw:layer="layout" svg:x1="13.33cm" svg:y1="13.63cm" svg:x2="13.321cm" svg:y2="13.714cm">
            <text:p/>
          </draw:line>
          <draw:custom-shape draw:style-name="gr666" draw:text-style-name="P2" draw:layer="layout" svg:width="0.189cm" svg:height="0.074cm" svg:x="12.621cm" svg:y="10.844cm">
            <text:p/>
            <draw:enhanced-geometry svg:viewBox="0 0 43 17" draw:type="non-primitive" draw:enhanced-path="M 0 16  L 23 0  L 42 0  N"/>
          </draw:custom-shape>
          <draw:custom-shape draw:style-name="gr666" draw:text-style-name="P2" draw:layer="layout" svg:width="0.189cm" svg:height="0.074cm" svg:x="12.621cm" svg:y="10.844cm">
            <text:p/>
            <draw:enhanced-geometry svg:viewBox="0 0 43 17" draw:type="non-primitive" draw:enhanced-path="M 0 16  L 23 0  L 42 0  N"/>
          </draw:custom-shape>
          <draw:line draw:style-name="gr7" draw:text-style-name="P14" draw:layer="layout" svg:x1="12.312cm" svg:y1="13.701cm" svg:x2="12.352cm" svg:y2="13.767cm">
            <text:p/>
          </draw:line>
          <draw:line draw:style-name="gr7" draw:text-style-name="P14" draw:layer="layout" svg:x1="12.312cm" svg:y1="13.701cm" svg:x2="12.352cm" svg:y2="13.767cm">
            <text:p/>
          </draw:line>
          <draw:custom-shape draw:style-name="gr683" draw:text-style-name="P2" draw:layer="layout" svg:width="0.212cm" svg:height="0.37cm" svg:x="11.65cm" svg:y="12.621cm">
            <text:p/>
            <draw:enhanced-geometry svg:viewBox="0 0 48 84" draw:type="non-primitive" draw:enhanced-path="M 0 0  L 6 13  L 12 27  L 18 40  L 27 52  L 35 66  L 43 76  L 47 83  N"/>
          </draw:custom-shape>
          <draw:custom-shape draw:style-name="gr683" draw:text-style-name="P2" draw:layer="layout" svg:width="0.212cm" svg:height="0.37cm" svg:x="11.65cm" svg:y="12.621cm">
            <text:p/>
            <draw:enhanced-geometry svg:viewBox="0 0 48 84" draw:type="non-primitive" draw:enhanced-path="M 0 0  L 6 13  L 12 27  L 18 40  L 27 52  L 35 66  L 43 76  L 47 83  N"/>
          </draw:custom-shape>
          <draw:line draw:style-name="gr7" draw:text-style-name="P14" draw:layer="layout" svg:x1="12.599cm" svg:y1="11.037cm" svg:x2="12.638cm" svg:y2="11.032cm">
            <text:p/>
          </draw:line>
          <draw:line draw:style-name="gr7" draw:text-style-name="P14" draw:layer="layout" svg:x1="12.599cm" svg:y1="11.037cm" svg:x2="12.638cm" svg:y2="11.032cm">
            <text:p/>
          </draw:line>
          <draw:custom-shape draw:style-name="gr684" draw:text-style-name="P125" draw:layer="layout" svg:width="2.324cm" svg:height="1.318cm" svg:x="12.444cm" svg:y="10.685cm">
            <text:p/>
            <draw:enhanced-geometry svg:viewBox="0 0 527 299" draw:type="non-primitive" draw:enhanced-path="M 48 34  L 56 34  L 64 31  L 69 36  L 80 29  L 81 38  L 77 40  L 72 50  L 49 64  L 55 73  L 54 77  L 46 77  L 43 80  L 48 88  L 42 88  L 34 83  L 33 77  L 26 75  L 21 77  L 0 77  L 13 84  L 21 85  L 30 84  L 37 85  L 37 92  L 32 92  L 28 102  L 32 109  L 32 118  L 33 118  L 46 113  L 49 121  L 40 133  L 41 136  L 47 136  L 67 115  L 80 99  L 82 92  L 91 83  L 101 83  L 113 71  L 139 64  L 137 55  L 139 52  L 160 52  L 166 51  L 173 48  L 198 48  L 192 56  L 194 60  L 200 59  L 208 59  L 212 58  L 232 56  L 241 52  L 252 52  L 262 54  L 272 59  L 284 55  L 287 51  L 293 48  L 296 55  L 301 59  L 307 59  L 322 71  L 335 75  L 335 79  L 336 80  L 345 80  L 349 81  L 353 81  L 355 85  L 363 85  L 366 92  L 370 90  L 372 95  L 370 98  L 357 104  L 355 102  L 353 90  L 345 85  L 342 88  L 345 97  L 340 108  L 349 119  L 385 142  L 399 163  L 420 170  L 417 156  L 437 161  L 438 158  L 411 142  L 406 140  L 403 140  L 388 129  L 374 122  L 374 118  L 376 115  L 381 115  L 386 119  L 390 125  L 397 128  L 403 128  L 403 122  L 399 119  L 399 115  L 403 113  L 409 115  L 410 123  L 416 125  L 424 125  L 428 129  L 426 132  L 437 145  L 440 145  L 441 148  L 441 152  L 447 169  L 445 171  L 441 171  L 430 166  L 430 170  L 438 176  L 451 177  L 451 190  L 460 195  L 460 203  L 468 211  L 468 222  L 472 227  L 468 231  L 468 235  L 472 237  L 476 234  L 494 242  L 497 254  L 487 268  L 487 272  L 495 278  L 499 286  L 510 298  L 518 295  L 518 287  L 520 281  L 518 271  L 520 264  L 514 258  L 510 253  L 508 242  L 502 236  L 506 224  L 501 215  L 501 208  L 514 205  L 516 205  L 520 211  L 520 208  L 516 200  L 514 198  L 515 196  L 511 196  L 510 199  L 498 200  L 494 196  L 495 191  L 504 190  L 508 186  L 514 186  L 515 190  L 518 187  L 526 186  L 520 182  L 512 180  L 510 165  L 514 161  L 514 156  L 506 144  L 510 137  L 497 123  L 477 104  L 455 85  L 430 68  L 411 56  L 389 44  L 364 31  L 335 20  L 303 12  L 269 5  L 236 1  L 208 0  L 177 1  L 144 6  L 110 13  L 79 22  L 54 31  L 48 34  L 48 34  N"/>
          </draw:custom-shape>
          <draw:custom-shape draw:style-name="gr685" draw:text-style-name="P2" draw:layer="layout" svg:width="2.324cm" svg:height="1.318cm" svg:x="12.444cm" svg:y="10.685cm">
            <text:p/>
            <draw:enhanced-geometry svg:viewBox="0 0 527 299" draw:type="non-primitive" draw:enhanced-path="M 48 34  L 56 34  L 64 31  L 69 36  L 80 29  L 81 38  L 77 40  L 72 50  L 49 64  L 55 73  L 54 77  L 46 77  L 43 80  L 48 88  L 42 88  L 34 83  L 33 77  L 26 75  L 21 77  L 0 77  L 13 84  L 21 85  L 30 84  L 37 85  L 37 92  L 32 92  L 28 102  L 32 109  L 32 118  L 33 118  L 46 113  L 49 121  L 40 133  L 41 136  L 47 136  L 67 115  L 80 99  L 82 92  L 91 83  L 101 83  L 113 71  L 139 64  L 137 55  L 139 52  L 160 52  L 166 51  L 173 48  L 198 48  L 192 56  L 194 60  L 200 59  L 208 59  L 212 58  L 232 56  L 241 52  L 252 52  L 262 54  L 272 59  L 284 55  L 287 51  L 293 48  L 296 55  L 301 59  L 307 59  L 322 71  L 335 75  L 335 79  L 336 80  L 345 80  L 349 81  L 353 81  L 355 85  L 363 85  L 366 92  L 370 90  L 372 95  L 370 98  L 357 104  L 355 102  L 353 90  L 345 85  L 342 88  L 345 97  L 340 108  L 349 119  L 385 142  L 399 163  L 420 170  L 417 156  L 437 161  L 438 158  L 411 142  L 406 140  L 403 140  L 388 129  L 374 122  L 374 118  L 376 115  L 381 115  L 386 119  L 390 125  L 397 128  L 403 128  L 403 122  L 399 119  L 399 115  L 403 113  L 409 115  L 410 123  L 416 125  L 424 125  L 428 129  L 426 132  L 437 145  L 440 145  L 441 148  L 441 152  L 447 169  L 445 171  L 441 171  L 430 166  L 430 170  L 438 176  L 451 177  L 451 190  L 460 195  L 460 203  L 468 211  L 468 222  L 472 227  L 468 231  L 468 235  L 472 237  L 476 234  L 494 242  L 497 254  L 487 268  L 487 272  L 495 278  L 499 286  L 510 298  L 518 295  L 518 287  L 520 281  L 518 271  L 520 264  L 514 258  L 510 253  L 508 242  L 502 236  L 506 224  L 501 215  L 501 208  L 514 205  L 516 205  L 520 211  L 520 208  L 516 200  L 514 198  L 515 196  L 511 196  L 510 199  L 498 200  L 494 196  L 495 191  L 504 190  L 508 186  L 514 186  L 515 190  L 518 187  L 526 186  L 520 182  L 512 180  L 510 165  L 514 161  L 514 156  L 506 144  L 510 137  L 497 123  L 477 104  L 455 85  L 430 68  L 411 56  L 389 44  L 364 31  L 335 20  L 303 12  L 269 5  L 236 1  L 208 0  L 177 1  L 144 6  L 110 13  L 79 22  L 54 31  L 48 34  L 48 34  N"/>
          </draw:custom-shape>
          <draw:custom-shape draw:style-name="gr686" draw:text-style-name="P125" draw:layer="layout" svg:width="0.379cm" svg:height="1.283cm" svg:x="14.742cm" svg:y="11.448cm">
            <text:p/>
            <draw:enhanced-geometry svg:viewBox="0 0 86 291" draw:type="non-primitive" draw:enhanced-path="M 14 0  L 14 5  L 19 22  L 20 34  L 19 35  L 23 44  L 27 44  L 23 69  L 10 59  L 8 59  L 10 68  L 8 90  L 10 99  L 8 120  L 2 124  L 0 127  L 5 134  L 5 151  L 8 158  L 17 169  L 14 201  L 19 240  L 20 245  L 27 250  L 30 254  L 31 278  L 40 285  L 45 287  L 50 290  L 63 290  L 63 279  L 74 257  L 85 227  L 85 195  L 82 167  L 76 143  L 71 117  L 62 89  L 52 65  L 36 31  L 27 14  L 17 0  L 14 0  L 14 0  N"/>
          </draw:custom-shape>
          <draw:custom-shape draw:style-name="gr687" draw:text-style-name="P2" draw:layer="layout" svg:width="0.379cm" svg:height="1.283cm" svg:x="14.742cm" svg:y="11.448cm">
            <text:p/>
            <draw:enhanced-geometry svg:viewBox="0 0 86 291" draw:type="non-primitive" draw:enhanced-path="M 14 0  L 14 5  L 19 22  L 20 34  L 19 35  L 23 44  L 27 44  L 23 69  L 10 59  L 8 59  L 10 68  L 8 90  L 10 99  L 8 120  L 2 124  L 0 127  L 5 134  L 5 151  L 8 158  L 17 169  L 14 201  L 19 240  L 20 245  L 27 250  L 30 254  L 31 278  L 40 285  L 45 287  L 50 290  L 63 290  L 63 279  L 74 257  L 85 227  L 85 195  L 82 167  L 76 143  L 71 117  L 62 89  L 52 65  L 36 31  L 27 14  L 17 0  L 14 0  L 14 0  N"/>
          </draw:custom-shape>
          <draw:custom-shape draw:style-name="gr688" draw:text-style-name="P125" draw:layer="layout" svg:width="0.476cm" svg:height="0.56cm" svg:x="13.432cm" svg:y="11.302cm">
            <text:p/>
            <draw:enhanced-geometry svg:viewBox="0 0 108 127" draw:type="non-primitive" draw:enhanced-path="M 48 6  L 51 2  L 57 8  L 65 16  L 82 23  L 84 29  L 87 34  L 96 42  L 105 43  L 105 58  L 103 64  L 98 68  L 101 80  L 95 91  L 96 108  L 101 112  L 105 124  L 107 125  L 105 125  L 98 126  L 95 124  L 87 124  L 78 121  L 72 110  L 68 106  L 61 103  L 60 97  L 57 92  L 61 87  L 57 77  L 48 76  L 39 68  L 34 61  L 32 56  L 24 50  L 12 50  L 8 47  L 8 42  L 6 37  L 0 37  L 2 34  L 7 32  L 6 29  L 7 23  L 7 16  L 18 12  L 21 8  L 25 2  L 28 2  L 34 0  L 42 0  L 39 2  L 35 8  L 39 10  L 48 6  L 48 6  L 48 6  N"/>
          </draw:custom-shape>
          <draw:custom-shape draw:style-name="gr689" draw:text-style-name="P2" draw:layer="layout" svg:width="0.476cm" svg:height="0.56cm" svg:x="13.432cm" svg:y="11.302cm">
            <text:p/>
            <draw:enhanced-geometry svg:viewBox="0 0 108 127" draw:type="non-primitive" draw:enhanced-path="M 48 6  L 51 2  L 57 8  L 65 16  L 82 23  L 84 29  L 87 34  L 96 42  L 105 43  L 105 58  L 103 64  L 98 68  L 101 80  L 95 91  L 96 108  L 101 112  L 105 124  L 107 125  L 105 125  L 98 126  L 95 124  L 87 124  L 78 121  L 72 110  L 68 106  L 61 103  L 60 97  L 57 92  L 61 87  L 57 77  L 48 76  L 39 68  L 34 61  L 32 56  L 24 50  L 12 50  L 8 47  L 8 42  L 6 37  L 0 37  L 2 34  L 7 32  L 6 29  L 7 23  L 7 16  L 18 12  L 21 8  L 25 2  L 28 2  L 34 0  L 42 0  L 39 2  L 35 8  L 39 10  L 48 6  L 48 6  N"/>
          </draw:custom-shape>
          <draw:custom-shape draw:style-name="gr690" draw:text-style-name="P125" draw:layer="layout" svg:width="2.179cm" svg:height="2.782cm" svg:x="12.413cm" svg:y="11.311cm">
            <text:p/>
            <draw:enhanced-geometry svg:viewBox="0 0 494 631" draw:type="non-primitive" draw:enhanced-path="M 8 269  L 5 266  L 7 219  L 32 174  L 38 174  L 41 155  L 34 145  L 46 97  L 42 93  L 43 80  L 41 56  L 27 53  L 45 48  L 21 48  L 0 44  L 0 41  L 21 40  L 17 35  L 24 21  L 32 14  L 48 19  L 52 14  L 50 8  L 57 2  L 63 9  L 71 5  L 73 0  L 77 0  L 86 0  L 91 4  L 98 40  L 98 44  L 117 50  L 143 83  L 153 84  L 160 89  L 183 94  L 185 88  L 183 78  L 185 69  L 189 73  L 190 89  L 194 92  L 195 98  L 202 100  L 209 87  L 212 90  L 212 103  L 204 108  L 168 144  L 172 152  L 171 163  L 196 177  L 204 178  L 203 188  L 212 203  L 218 205  L 222 201  L 223 183  L 229 180  L 229 163  L 223 152  L 228 148  L 225 132  L 251 140  L 253 147  L 259 155  L 269 156  L 267 144  L 290 167  L 297 171  L 318 192  L 305 203  L 275 211  L 263 229  L 267 229  L 285 216  L 291 216  L 290 226  L 294 236  L 310 227  L 311 231  L 287 254  L 284 250  L 288 245  L 287 240  L 270 252  L 263 264  L 265 270  L 249 281  L 247 289  L 240 297  L 239 314  L 212 334  L 206 354  L 209 360  L 214 371  L 213 377  L 209 380  L 196 349  L 183 349  L 181 346  L 160 344  L 160 351  L 157 351  L 147 347  L 111 351  L 102 392  L 110 400  L 112 408  L 137 419  L 148 413  L 150 408  L 152 404  L 165 404  L 165 408  L 152 434  L 185 441  L 191 448  L 187 461  L 190 472  L 204 481  L 209 481  L 221 480  L 235 490  L 250 472  L 255 472  L 270 461  L 273 480  L 277 478  L 277 469  L 291 463  L 296 467  L 320 466  L 326 461  L 336 461  L 336 465  L 378 477  L 394 476  L 414 490  L 415 497  L 438 494  L 476 486  L 491 486  L 493 494  L 485 500  L 462 540  L 459 547  L 449 554  L 445 561  L 426 571  L 414 579  L 401 586  L 389 594  L 374 600  L 355 607  L 336 613  L 315 619  L 297 623  L 280 628  L 266 630  L 265 630  L 274 604  L 273 599  L 248 589  L 237 573  L 205 552  L 205 546  L 214 540  L 209 535  L 209 529  L 227 516  L 229 512  L 234 511  L 234 498  L 225 486  L 221 482  L 209 488  L 195 484  L 180 473  L 162 448  L 114 425  L 106 423  L 86 413  L 51 381  L 55 371  L 42 344  L 31 297  L 23 293  L 22 302  L 29 338  L 34 351  L 31 356  L 23 342  L 21 327  L 15 316  L 17 312  L 8 269  L 8 269  L 8 269  N"/>
          </draw:custom-shape>
          <draw:custom-shape draw:style-name="gr691" draw:text-style-name="P2" draw:layer="layout" svg:width="2.179cm" svg:height="2.782cm" svg:x="12.413cm" svg:y="11.311cm">
            <text:p/>
            <draw:enhanced-geometry svg:viewBox="0 0 494 631" draw:type="non-primitive" draw:enhanced-path="M 8 269  L 5 266  L 7 219  L 32 174  L 38 174  L 41 155  L 34 145  L 46 97  L 42 93  L 43 80  L 41 56  L 27 53  L 45 48  L 21 48  L 0 44  L 0 41  L 21 40  L 17 35  L 24 21  L 32 14  L 48 19  L 52 14  L 50 8  L 57 2  L 63 9  L 71 5  L 73 0  L 77 0  L 86 0  L 91 4  L 98 40  L 98 44  L 117 50  L 143 83  L 153 84  L 160 89  L 183 94  L 185 88  L 183 78  L 185 69  L 189 73  L 190 89  L 194 92  L 195 98  L 202 100  L 209 87  L 212 90  L 212 103  L 204 108  L 168 144  L 172 152  L 171 163  L 196 177  L 204 178  L 203 188  L 212 203  L 218 205  L 222 201  L 223 183  L 229 180  L 229 163  L 223 152  L 228 148  L 225 132  L 251 140  L 253 147  L 259 155  L 269 156  L 267 144  L 290 167  L 297 171  L 318 192  L 305 203  L 275 211  L 263 229  L 267 229  L 285 216  L 291 216  L 290 226  L 294 236  L 310 227  L 311 231  L 287 254  L 284 250  L 288 245  L 287 240  L 270 252  L 263 264  L 265 270  L 249 281  L 247 289  L 240 297  L 239 314  L 212 334  L 206 354  L 209 360  L 214 371  L 213 377  L 209 380  L 196 349  L 183 349  L 181 346  L 160 344  L 160 351  L 157 351  L 147 347  L 111 351  L 102 392  L 110 400  L 112 408  L 137 419  L 148 413  L 150 408  L 152 404  L 165 404  L 165 408  L 152 434  L 185 441  L 191 448  L 187 461  L 190 472  L 204 481  L 209 481  L 221 480  L 235 490  L 250 472  L 255 472  L 270 461  L 273 480  L 277 478  L 277 469  L 291 463  L 296 467  L 320 466  L 326 461  L 336 461  L 336 465  L 378 477  L 394 476  L 414 490  L 415 497  L 438 494  L 476 486  L 491 486  L 493 494  L 485 500  L 462 540  L 459 547  L 449 554  L 445 561  L 426 571  L 414 579  L 401 586  L 389 594  L 374 600  L 355 607  L 336 613  L 315 619  L 297 623  L 280 628  L 266 630  L 265 630  L 274 604  L 273 599  L 248 589  L 237 573  L 205 552  L 205 546  L 214 540  L 209 535  L 209 529  L 227 516  L 229 512  L 234 511  L 234 498  L 225 486  L 221 482  L 209 488  L 195 484  L 180 473  L 162 448  L 114 425  L 106 423  L 86 413  L 51 381  L 55 371  L 42 344  L 31 297  L 23 293  L 22 302  L 29 338  L 34 351  L 31 356  L 23 342  L 21 327  L 15 316  L 17 312  L 8 269  L 8 269  N"/>
          </draw:custom-shape>
          <draw:custom-shape draw:style-name="gr692" draw:text-style-name="P125" draw:layer="layout" svg:width="0.221cm" svg:height="0.194cm" svg:x="14.261cm" svg:y="11.523cm">
            <text:p/>
            <draw:enhanced-geometry svg:viewBox="0 0 50 44" draw:type="non-primitive" draw:enhanced-path="M 0 0  L 3 1  L 5 10  L 7 13  L 15 17  L 19 20  L 22 17  L 26 17  L 33 21  L 34 25  L 41 31  L 44 31  L 44 37  L 47 41  L 49 43  L 49 18  L 44 17  L 41 13  L 34 13  L 24 9  L 19 10  L 17 8  L 15 6  L 13 6  L 10 8  L 9 4  L 6 1  L 0 0  L 0 0  N"/>
          </draw:custom-shape>
          <draw:custom-shape draw:style-name="gr666" draw:text-style-name="P2" draw:layer="layout" svg:width="0.221cm" svg:height="0.194cm" svg:x="14.261cm" svg:y="11.523cm">
            <text:p/>
            <draw:enhanced-geometry svg:viewBox="0 0 50 44" draw:type="non-primitive" draw:enhanced-path="M 0 0  L 3 1  L 5 10  L 7 13  L 15 17  L 19 20  L 22 17  L 26 17  L 33 21  L 34 25  L 41 31  L 44 31  L 44 37  L 47 41  L 49 43  L 49 18  L 44 17  L 41 13  L 34 13  L 24 9  L 19 10  L 17 8  L 15 6  L 13 6  L 10 8  L 9 4  L 6 1  L 0 0  L 0 0  N"/>
          </draw:custom-shape>
          <draw:custom-shape draw:style-name="gr692" draw:text-style-name="P125" draw:layer="layout" svg:width="0.092cm" svg:height="0.097cm" svg:x="14.345cm" svg:y="11.633cm">
            <text:p/>
            <draw:enhanced-geometry svg:viewBox="0 0 21 22" draw:type="non-primitive" draw:enhanced-path="M 20 19  L 18 21  L 14 19  L 10 14  L 0 12  L 0 2  L 0 0  L 5 2  L 10 7  L 14 9  L 16 11  L 20 19  L 20 19  L 20 19  N"/>
          </draw:custom-shape>
          <draw:custom-shape draw:style-name="gr666" draw:text-style-name="P2" draw:layer="layout" svg:width="0.092cm" svg:height="0.097cm" svg:x="14.345cm" svg:y="11.633cm">
            <text:p/>
            <draw:enhanced-geometry svg:viewBox="0 0 21 22" draw:type="non-primitive" draw:enhanced-path="M 20 19  L 18 21  L 14 19  L 10 14  L 0 12  L 0 2  L 0 0  L 5 2  L 10 7  L 14 9  L 16 11  L 20 19  L 20 19  N"/>
          </draw:custom-shape>
          <draw:custom-shape draw:style-name="gr692" draw:text-style-name="P125" draw:layer="layout" svg:width="0.136cm" svg:height="0.181cm" svg:x="13.309cm" svg:y="11.346cm">
            <text:p/>
            <draw:enhanced-geometry svg:viewBox="0 0 31 41" draw:type="non-primitive" draw:enhanced-path="M 0 34  L 1 32  L 9 32  L 10 28  L 8 19  L 15 13  L 9 11  L 6 6  L 7 2  L 22 2  L 27 0  L 30 0  L 26 11  L 27 19  L 24 20  L 22 19  L 19 32  L 19 40  L 15 40  L 13 38  L 0 34  L 0 34  L 0 34  N"/>
          </draw:custom-shape>
          <draw:custom-shape draw:style-name="gr666" draw:text-style-name="P2" draw:layer="layout" svg:width="0.136cm" svg:height="0.181cm" svg:x="13.309cm" svg:y="11.346cm">
            <text:p/>
            <draw:enhanced-geometry svg:viewBox="0 0 31 41" draw:type="non-primitive" draw:enhanced-path="M 0 34  L 1 32  L 9 32  L 10 28  L 8 19  L 15 13  L 9 11  L 6 6  L 7 2  L 22 2  L 27 0  L 30 0  L 26 11  L 27 19  L 24 20  L 22 19  L 19 32  L 19 40  L 15 40  L 13 38  L 0 34  L 0 34  N"/>
          </draw:custom-shape>
          <draw:custom-shape draw:style-name="gr692" draw:text-style-name="P125" draw:layer="layout" svg:width="0.093cm" svg:height="0.119cm" svg:x="13.992cm" svg:y="11.527cm">
            <text:p/>
            <draw:enhanced-geometry svg:viewBox="0 0 21 27" draw:type="non-primitive" draw:enhanced-path="M 20 13  L 20 5  L 18 3  L 16 3  L 12 0  L 7 4  L 5 7  L 5 12  L 3 12  L 0 13  L 0 20  L 3 20  L 7 22  L 9 22  L 12 26  L 14 24  L 17 22  L 20 13  L 20 13  N"/>
          </draw:custom-shape>
          <draw:custom-shape draw:style-name="gr666" draw:text-style-name="P2" draw:layer="layout" svg:width="0.093cm" svg:height="0.119cm" svg:x="13.992cm" svg:y="11.527cm">
            <text:p/>
            <draw:enhanced-geometry svg:viewBox="0 0 21 27" draw:type="non-primitive" draw:enhanced-path="M 20 13  L 20 5  L 18 3  L 16 3  L 12 0  L 7 4  L 5 7  L 5 12  L 3 12  L 0 13  L 0 20  L 3 20  L 7 22  L 9 22  L 12 26  L 14 24  L 17 22  L 20 13  L 20 13  N"/>
          </draw:custom-shape>
          <draw:custom-shape draw:style-name="gr692" draw:text-style-name="P125" draw:layer="layout" svg:width="0.137cm" svg:height="0.132cm" svg:x="13.022cm" svg:y="11.545cm">
            <text:p/>
            <draw:enhanced-geometry svg:viewBox="0 0 31 30" draw:type="non-primitive" draw:enhanced-path="M 12 1  L 5 3  L 7 8  L 15 12  L 17 13  L 15 16  L 4 12  L 0 15  L 0 16  L 8 20  L 17 22  L 19 26  L 27 29  L 28 29  L 30 22  L 27 18  L 27 16  L 30 12  L 30 5  L 28 3  L 24 5  L 16 0  L 12 1  L 12 1  L 12 1  N"/>
          </draw:custom-shape>
          <draw:custom-shape draw:style-name="gr666" draw:text-style-name="P2" draw:layer="layout" svg:width="0.137cm" svg:height="0.132cm" svg:x="13.022cm" svg:y="11.545cm">
            <text:p/>
            <draw:enhanced-geometry svg:viewBox="0 0 31 30" draw:type="non-primitive" draw:enhanced-path="M 12 1  L 5 3  L 7 8  L 15 12  L 17 13  L 15 16  L 4 12  L 0 15  L 0 16  L 8 20  L 17 22  L 19 26  L 27 29  L 28 29  L 30 22  L 27 18  L 27 16  L 30 12  L 30 5  L 28 3  L 24 5  L 16 0  L 12 1  L 12 1  N"/>
          </draw:custom-shape>
          <draw:custom-shape draw:style-name="gr692" draw:text-style-name="P125" draw:layer="layout" svg:width="0.093cm" svg:height="0.083cm" svg:x="13.022cm" svg:y="11.479cm">
            <text:p/>
            <draw:enhanced-geometry svg:viewBox="0 0 21 19" draw:type="non-primitive" draw:enhanced-path="M 0 15  L 0 10  L 7 6  L 8 0  L 18 2  L 20 10  L 5 14  L 1 18  L 0 15  L 0 15  L 0 15  N"/>
          </draw:custom-shape>
          <draw:custom-shape draw:style-name="gr666" draw:text-style-name="P2" draw:layer="layout" svg:width="0.093cm" svg:height="0.083cm" svg:x="13.022cm" svg:y="11.479cm">
            <text:p/>
            <draw:enhanced-geometry svg:viewBox="0 0 21 19" draw:type="non-primitive" draw:enhanced-path="M 0 15  L 0 10  L 7 6  L 8 0  L 18 2  L 20 10  L 5 14  L 1 18  L 0 15  L 0 15  N"/>
          </draw:custom-shape>
          <draw:custom-shape draw:style-name="gr692" draw:text-style-name="P125" draw:layer="layout" svg:width="0.101cm" svg:height="0.123cm" svg:x="13.816cm" svg:y="12.162cm">
            <text:p/>
            <draw:enhanced-geometry svg:viewBox="0 0 23 28" draw:type="non-primitive" draw:enhanced-path="M 0 13  L 4 24  L 5 22  L 9 23  L 9 26  L 14 23  L 16 25  L 18 26  L 21 27  L 22 23  L 18 17  L 12 17  L 11 13  L 6 10  L 4 10  L 4 2  L 2 0  L 0 13  L 0 13  L 0 13  N"/>
          </draw:custom-shape>
          <draw:custom-shape draw:style-name="gr666" draw:text-style-name="P2" draw:layer="layout" svg:width="0.101cm" svg:height="0.123cm" svg:x="13.816cm" svg:y="12.162cm">
            <text:p/>
            <draw:enhanced-geometry svg:viewBox="0 0 23 28" draw:type="non-primitive" draw:enhanced-path="M 0 13  L 4 24  L 5 22  L 9 23  L 9 26  L 14 23  L 16 25  L 18 26  L 21 27  L 22 23  L 18 17  L 12 17  L 11 13  L 6 10  L 4 10  L 4 2  L 2 0  L 0 13  L 0 13  N"/>
          </draw:custom-shape>
          <draw:custom-shape draw:style-name="gr693" draw:text-style-name="P125" draw:layer="layout" svg:width="0.322cm" svg:height="0.318cm" svg:x="13.286cm" svg:y="11.584cm">
            <text:p/>
            <draw:enhanced-geometry svg:viewBox="0 0 73 72" draw:type="non-primitive" draw:enhanced-path="M 18 23  L 26 22  L 34 26  L 43 39  L 37 51  L 29 51  L 27 55  L 31 59  L 37 56  L 40 56  L 52 68  L 60 71  L 63 70  L 63 66  L 58 65  L 56 61  L 60 61  L 63 66  L 69 65  L 67 60  L 63 54  L 57 51  L 54 46  L 56 46  L 69 51  L 72 49  L 72 46  L 71 42  L 58 37  L 54 33  L 50 30  L 49 28  L 49 23  L 35 13  L 31 8  L 23 11  L 19 7  L 18 4  L 13 3  L 11 3  L 11 9  L 8 11  L 6 11  L 6 7  L 7 3  L 5 0  L 0 4  L 0 9  L 6 21  L 12 20  L 18 23  L 18 23  L 18 23  N"/>
          </draw:custom-shape>
          <draw:custom-shape draw:style-name="gr694" draw:text-style-name="P2" draw:layer="layout" svg:width="0.322cm" svg:height="0.318cm" svg:x="13.286cm" svg:y="11.584cm">
            <text:p/>
            <draw:enhanced-geometry svg:viewBox="0 0 73 72" draw:type="non-primitive" draw:enhanced-path="M 18 23  L 26 22  L 34 26  L 43 39  L 37 51  L 29 51  L 27 55  L 31 59  L 37 56  L 40 56  L 52 68  L 60 71  L 63 70  L 63 66  L 58 65  L 56 61  L 60 61  L 63 66  L 69 65  L 67 60  L 63 54  L 57 51  L 54 46  L 56 46  L 69 51  L 72 49  L 72 46  L 71 42  L 58 37  L 54 33  L 50 30  L 49 28  L 49 23  L 35 13  L 31 8  L 23 11  L 19 7  L 18 4  L 13 3  L 11 3  L 11 9  L 8 11  L 6 11  L 6 7  L 7 3  L 5 0  L 0 4  L 0 9  L 6 21  L 12 20  L 18 23  L 18 23  N"/>
          </draw:custom-shape>
          <draw:custom-shape draw:style-name="gr695" draw:text-style-name="P126" draw:layer="layout" svg:width="0.093cm" svg:height="0.075cm" svg:x="12.541cm" svg:y="11.981cm">
            <text:p/>
            <draw:enhanced-geometry svg:viewBox="0 0 21 17" draw:type="non-primitive" draw:enhanced-path="M 14 1  L 14 4  L 20 10  L 20 14  L 14 16  L 0 3  L 5 0  L 14 1  L 14 1  L 14 1  N"/>
          </draw:custom-shape>
          <draw:custom-shape draw:style-name="gr666" draw:text-style-name="P2" draw:layer="layout" svg:width="0.093cm" svg:height="0.075cm" svg:x="12.541cm" svg:y="11.981cm">
            <text:p/>
            <draw:enhanced-geometry svg:viewBox="0 0 21 17" draw:type="non-primitive" draw:enhanced-path="M 14 1  L 14 4  L 20 10  L 20 14  L 14 16  L 0 3  L 5 0  L 14 1  L 14 1  N"/>
          </draw:custom-shape>
          <draw:custom-shape draw:style-name="gr692" draw:text-style-name="P125" draw:layer="layout" svg:width="0.296cm" svg:height="0.097cm" svg:x="13.229cm" svg:y="13.048cm">
            <text:p/>
            <draw:enhanced-geometry svg:viewBox="0 0 67 22" draw:type="non-primitive" draw:enhanced-path="M 31 4  L 36 6  L 48 10  L 54 10  L 62 14  L 66 16  L 66 19  L 52 21  L 45 21  L 47 19  L 45 14  L 29 10  L 20 6  L 9 6  L 2 8  L 0 8  L 0 6  L 7 2  L 9 2  L 15 0  L 25 2  L 31 4  L 31 4  L 31 4  N"/>
          </draw:custom-shape>
          <draw:custom-shape draw:style-name="gr666" draw:text-style-name="P2" draw:layer="layout" svg:width="0.296cm" svg:height="0.097cm" svg:x="13.229cm" svg:y="13.048cm">
            <text:p/>
            <draw:enhanced-geometry svg:viewBox="0 0 67 22" draw:type="non-primitive" draw:enhanced-path="M 31 4  L 36 6  L 48 10  L 54 10  L 62 14  L 66 16  L 66 19  L 52 21  L 45 21  L 47 19  L 45 14  L 29 10  L 20 6  L 9 6  L 2 8  L 0 8  L 0 6  L 7 2  L 9 2  L 15 0  L 25 2  L 31 4  L 31 4  N"/>
          </draw:custom-shape>
          <draw:custom-shape draw:style-name="gr692" draw:text-style-name="P125" draw:layer="layout" svg:width="0.137cm" svg:height="0.075cm" svg:x="13.551cm" svg:y="13.119cm">
            <text:p/>
            <draw:enhanced-geometry svg:viewBox="0 0 31 17" draw:type="non-primitive" draw:enhanced-path="M 0 3  L 0 5  L 5 7  L 5 11  L 0 11  L 11 11  L 16 16  L 22 11  L 30 11  L 22 7  L 17 3  L 9 0  L 7 3  L 0 3  L 0 3  L 0 3  N"/>
          </draw:custom-shape>
          <draw:custom-shape draw:style-name="gr666" draw:text-style-name="P2" draw:layer="layout" svg:width="0.137cm" svg:height="0.075cm" svg:x="13.551cm" svg:y="13.119cm">
            <text:p/>
            <draw:enhanced-geometry svg:viewBox="0 0 31 17" draw:type="non-primitive" draw:enhanced-path="M 0 3  L 0 5  L 5 7  L 5 11  L 0 11  L 11 11  L 16 16  L 22 11  L 30 11  L 22 7  L 17 3  L 9 0  L 7 3  L 0 3  L 0 3  N"/>
          </draw:custom-shape>
          <draw:custom-shape draw:style-name="gr692" draw:text-style-name="P125" draw:layer="layout" svg:width="0.092cm" svg:height="0.075cm" svg:x="13.741cm" svg:y="13.15cm">
            <text:p/>
            <draw:enhanced-geometry svg:viewBox="0 0 21 17" draw:type="non-primitive" draw:enhanced-path="M 8 8  L 14 0  L 20 16  L 8 16  L 0 8  L 8 8  L 8 8  L 8 8  N"/>
          </draw:custom-shape>
          <draw:custom-shape draw:style-name="gr666" draw:text-style-name="P2" draw:layer="layout" svg:width="0.092cm" svg:height="0.075cm" svg:x="13.741cm" svg:y="13.15cm">
            <text:p/>
            <draw:enhanced-geometry svg:viewBox="0 0 21 17" draw:type="non-primitive" draw:enhanced-path="M 8 8  L 14 0  L 20 16  L 8 16  L 0 8  L 8 8  L 8 8  N"/>
          </draw:custom-shape>
          <draw:custom-shape draw:style-name="gr696" draw:text-style-name="P124" draw:layer="layout" svg:width="0.295cm" svg:height="0.212cm" svg:x="13.119cm" svg:y="12.29cm">
            <text:p/>
            <draw:enhanced-geometry svg:viewBox="0 0 67 48" draw:type="non-primitive" draw:enhanced-path="M 31 4  L 30 0  L 18 0  L 13 1  L 10 4  L 0 9  L 0 11  L 13 15  L 16 13  L 25 18  L 18 23  L 16 28  L 17 30  L 16 40  L 17 47  L 23 47  L 27 44  L 27 42  L 27 36  L 27 33  L 27 29  L 32 24  L 34 25  L 36 29  L 36 33  L 40 35  L 44 40  L 46 40  L 49 35  L 51 28  L 54 30  L 56 30  L 65 23  L 65 22  L 66 19  L 65 17  L 65 18  L 61 19  L 58 21  L 54 18  L 48 18  L 40 16  L 38 14  L 38 11  L 46 11  L 48 9  L 44 6  L 38 2  L 38 7  L 31 4  L 31 4  N"/>
          </draw:custom-shape>
          <draw:custom-shape draw:style-name="gr666" draw:text-style-name="P2" draw:layer="layout" svg:width="0.295cm" svg:height="0.212cm" svg:x="13.119cm" svg:y="12.29cm">
            <text:p/>
            <draw:enhanced-geometry svg:viewBox="0 0 67 48" draw:type="non-primitive" draw:enhanced-path="M 31 4  L 30 0  L 18 0  L 13 1  L 10 4  L 0 9  L 0 11  L 13 15  L 16 13  L 25 18  L 18 23  L 16 28  L 17 30  L 16 40  L 17 47  L 23 47  L 27 44  L 27 42  L 27 36  L 27 33  L 27 29  L 32 24  L 34 25  L 36 29  L 36 33  L 40 35  L 44 40  L 46 40  L 49 35  L 51 28  L 54 30  L 56 30  L 65 23  L 65 22  L 66 19  L 65 17  L 65 18  L 61 19  L 58 21  L 54 18  L 48 18  L 40 16  L 38 14  L 38 11  L 46 11  L 48 9  L 44 6  L 38 2  L 38 7  L 31 4  L 31 4  N"/>
          </draw:custom-shape>
          <draw:custom-shape draw:style-name="gr696" draw:text-style-name="P124" draw:layer="layout" svg:width="0.216cm" svg:height="0.11cm" svg:x="13.278cm" svg:y="12.418cm">
            <text:p/>
            <draw:enhanced-geometry svg:viewBox="0 0 49 25" draw:type="non-primitive" draw:enhanced-path="M 16 14  L 10 14  L 8 11  L 0 17  L 1 20  L 6 22  L 18 24  L 25 21  L 32 21  L 33 23  L 36 21  L 34 17  L 29 14  L 22 11  L 29 12  L 31 13  L 33 11  L 38 11  L 39 10  L 42 10  L 44 11  L 48 6  L 46 3  L 43 0  L 33 2  L 25 4  L 22 7  L 22 11  L 16 14  L 16 14  L 16 14  N"/>
          </draw:custom-shape>
          <draw:custom-shape draw:style-name="gr666" draw:text-style-name="P2" draw:layer="layout" svg:width="0.216cm" svg:height="0.11cm" svg:x="13.278cm" svg:y="12.418cm">
            <text:p/>
            <draw:enhanced-geometry svg:viewBox="0 0 49 25" draw:type="non-primitive" draw:enhanced-path="M 16 14  L 10 14  L 8 11  L 0 17  L 1 20  L 6 22  L 18 24  L 25 21  L 32 21  L 33 23  L 36 21  L 34 17  L 29 14  L 22 11  L 29 12  L 31 13  L 33 11  L 38 11  L 39 10  L 42 10  L 44 11  L 48 6  L 46 3  L 43 0  L 33 2  L 25 4  L 22 7  L 22 11  L 16 14  L 16 14  N"/>
          </draw:custom-shape>
          <draw:custom-shape draw:style-name="gr697" draw:text-style-name="P2" draw:layer="layout" svg:width="0.988cm" svg:height="1.058cm" svg:x="13.022cm" svg:y="11.32cm">
            <text:p/>
            <draw:enhanced-geometry svg:viewBox="0 0 224 240" draw:type="non-primitive" draw:enhanced-path="M 28 238  L 154 224  L 217 165  L 223 139  L 213 66  L 165 19  L 73 0  L 29 31  L 0 79  L 0 176  L 29 239  N"/>
          </draw:custom-shape>
          <draw:custom-shape draw:style-name="gr697" draw:text-style-name="P2" draw:layer="layout" svg:width="0.988cm" svg:height="1.058cm" svg:x="13.022cm" svg:y="11.32cm">
            <text:p/>
            <draw:enhanced-geometry svg:viewBox="0 0 224 240" draw:type="non-primitive" draw:enhanced-path="M 28 238  L 154 224  L 217 165  L 223 139  L 213 66  L 165 19  L 73 0  L 29 31  L 0 79  L 0 176  L 29 239  N"/>
          </draw:custom-shape>
          <draw:line draw:style-name="gr7" draw:text-style-name="P14" draw:layer="layout" svg:x1="13.154cm" svg:y1="12.374cm" svg:x2="10.306cm" svg:y2="15.897cm">
            <text:p/>
          </draw:line>
          <draw:line draw:style-name="gr7" draw:text-style-name="P14" draw:layer="layout" svg:x1="13.154cm" svg:y1="12.374cm" svg:x2="10.306cm" svg:y2="15.897cm">
            <text:p/>
          </draw:line>
          <draw:line draw:style-name="gr7" draw:text-style-name="P14" draw:layer="layout" svg:x1="13.021cm" svg:y1="12.096cm" svg:x2="9.586cm" svg:y2="13.785cm">
            <text:p/>
          </draw:line>
          <draw:line draw:style-name="gr7" draw:text-style-name="P14" draw:layer="layout" svg:x1="13.021cm" svg:y1="12.096cm" svg:x2="9.586cm" svg:y2="13.785cm">
            <text:p/>
          </draw:line>
          <draw:line draw:style-name="gr7" draw:text-style-name="P14" draw:layer="layout" svg:x1="13.021cm" svg:y1="11.667cm" svg:x2="9.242cm" svg:y2="11.614cm">
            <text:p/>
          </draw:line>
          <draw:line draw:style-name="gr7" draw:text-style-name="P14" draw:layer="layout" svg:x1="13.021cm" svg:y1="11.667cm" svg:x2="9.242cm" svg:y2="11.614cm">
            <text:p/>
          </draw:line>
          <draw:line draw:style-name="gr7" draw:text-style-name="P14" draw:layer="layout" svg:x1="13.189cm" svg:y1="11.425cm" svg:x2="8.449cm" svg:y2="9.176cm">
            <text:p/>
          </draw:line>
          <draw:line draw:style-name="gr7" draw:text-style-name="P14" draw:layer="layout" svg:x1="13.189cm" svg:y1="11.425cm" svg:x2="8.449cm" svg:y2="9.176cm">
            <text:p/>
          </draw:line>
          <draw:line draw:style-name="gr7" draw:text-style-name="P14" draw:layer="layout" svg:x1="13.18cm" svg:y1="11.425cm" svg:x2="11.319cm" svg:y2="9.074cm">
            <text:p/>
          </draw:line>
          <draw:line draw:style-name="gr7" draw:text-style-name="P14" draw:layer="layout" svg:x1="13.18cm" svg:y1="11.425cm" svg:x2="11.319cm" svg:y2="9.074cm">
            <text:p/>
          </draw:line>
          <draw:line draw:style-name="gr7" draw:text-style-name="P14" draw:layer="layout" svg:x1="13.344cm" svg:y1="11.32cm" svg:x2="12.81cm" svg:y2="8.978cm">
            <text:p/>
          </draw:line>
          <draw:line draw:style-name="gr7" draw:text-style-name="P14" draw:layer="layout" svg:x1="13.344cm" svg:y1="11.32cm" svg:x2="12.81cm" svg:y2="8.978cm">
            <text:p/>
          </draw:line>
          <draw:line draw:style-name="gr7" draw:text-style-name="P14" draw:layer="layout" svg:x1="13.741cm" svg:y1="11.404cm" svg:x2="14.512cm" svg:y2="8.802cm">
            <text:p/>
          </draw:line>
          <draw:line draw:style-name="gr7" draw:text-style-name="P14" draw:layer="layout" svg:x1="13.741cm" svg:y1="11.404cm" svg:x2="14.512cm" svg:y2="8.802cm">
            <text:p/>
          </draw:line>
          <draw:line draw:style-name="gr7" draw:text-style-name="P14" draw:layer="layout" svg:x1="13.961cm" svg:y1="11.614cm" svg:x2="16.201cm" svg:y2="8.907cm">
            <text:p/>
          </draw:line>
          <draw:line draw:style-name="gr7" draw:text-style-name="P14" draw:layer="layout" svg:x1="13.961cm" svg:y1="11.614cm" svg:x2="16.201cm" svg:y2="8.907cm">
            <text:p/>
          </draw:line>
          <draw:line draw:style-name="gr7" draw:text-style-name="P14" draw:layer="layout" svg:x1="13.996cm" svg:y1="11.945cm" svg:x2="16.625cm" svg:y2="10.9cm">
            <text:p/>
          </draw:line>
          <draw:line draw:style-name="gr7" draw:text-style-name="P14" draw:layer="layout" svg:x1="13.996cm" svg:y1="11.945cm" svg:x2="16.625cm" svg:y2="10.9cm">
            <text:p/>
          </draw:line>
          <draw:line draw:style-name="gr7" draw:text-style-name="P14" draw:layer="layout" svg:x1="13.996cm" svg:y1="12.047cm" svg:x2="16.713cm" svg:y2="12.532cm">
            <text:p/>
          </draw:line>
          <draw:line draw:style-name="gr7" draw:text-style-name="P14" draw:layer="layout" svg:x1="13.996cm" svg:y1="12.047cm" svg:x2="16.713cm" svg:y2="12.532cm">
            <text:p/>
          </draw:line>
          <draw:line draw:style-name="gr7" draw:text-style-name="P14" draw:layer="layout" svg:x1="13.741cm" svg:y1="12.321cm" svg:x2="16.651cm" svg:y2="14.834cm">
            <text:p/>
          </draw:line>
          <draw:line draw:style-name="gr7" draw:text-style-name="P14" draw:layer="layout" svg:x1="13.741cm" svg:y1="12.321cm" svg:x2="16.651cm" svg:y2="14.834cm">
            <text:p/>
          </draw:line>
          <draw:line draw:style-name="gr7" draw:text-style-name="P14" draw:layer="layout" svg:x1="13.705cm" svg:y1="12.321cm" svg:x2="15.227cm" svg:y2="16.545cm">
            <text:p/>
          </draw:line>
          <draw:line draw:style-name="gr7" draw:text-style-name="P14" draw:layer="layout" svg:x1="13.705cm" svg:y1="12.321cm" svg:x2="15.227cm" svg:y2="16.545cm">
            <text:p/>
          </draw:line>
          <draw:line draw:style-name="gr7" draw:text-style-name="P14" draw:layer="layout" svg:x1="13.541cm" svg:y1="12.312cm" svg:x2="13.188cm" svg:y2="15.959cm">
            <text:p/>
          </draw:line>
          <draw:line draw:style-name="gr7" draw:text-style-name="P14" draw:layer="layout" svg:x1="13.541cm" svg:y1="12.312cm" svg:x2="13.188cm" svg:y2="15.959cm">
            <text:p/>
          </draw:line>
          <draw:custom-shape draw:style-name="gr698" draw:text-style-name="P2" draw:layer="layout" svg:width="2.434cm" svg:height="2.373cm" svg:x="12.422cm" svg:y="10.821cm">
            <text:p/>
            <draw:enhanced-geometry svg:viewBox="0 0 552 538" draw:type="non-primitive" draw:enhanced-path="M 238 537  L 67 472  L 4 352  L 0 191  L 43 85  L 88 66  L 191 12  L 337 0  L 457 46  L 551 179  L 529 184  L 525 311  L 457 474  L 349 523  L 239 537  N"/>
          </draw:custom-shape>
          <draw:custom-shape draw:style-name="gr698" draw:text-style-name="P2" draw:layer="layout" svg:width="2.434cm" svg:height="2.373cm" svg:x="12.422cm" svg:y="10.821cm">
            <text:p/>
            <draw:enhanced-geometry svg:viewBox="0 0 552 538" draw:type="non-primitive" draw:enhanced-path="M 238 537  L 67 472  L 4 352  L 0 191  L 43 85  L 88 66  L 191 12  L 337 0  L 457 46  L 551 179  L 529 184  L 525 311  L 457 474  L 349 523  L 239 537  N"/>
          </draw:custom-shape>
          <draw:custom-shape draw:style-name="gr699" draw:text-style-name="P2" draw:layer="layout" svg:width="4.291cm" svg:height="4.211cm" svg:x="11.54cm" svg:y="9.768cm">
            <text:p/>
            <draw:enhanced-geometry svg:viewBox="0 0 973 955" draw:type="non-primitive" draw:enhanced-path="M 419 947  L 153 855  L 13 683  L 51 669  L 0 431  L 97 248  L 164 114  L 182 136  L 336 27  L 610 0  L 802 114  L 953 345  L 972 591  L 830 859  L 624 954  L 419 947  N"/>
          </draw:custom-shape>
          <draw:custom-shape draw:style-name="gr699" draw:text-style-name="P2" draw:layer="layout" svg:width="4.291cm" svg:height="4.211cm" svg:x="11.54cm" svg:y="9.768cm">
            <text:p/>
            <draw:enhanced-geometry svg:viewBox="0 0 973 955" draw:type="non-primitive" draw:enhanced-path="M 419 947  L 153 855  L 13 683  L 51 669  L 0 431  L 97 248  L 164 114  L 182 136  L 336 27  L 610 0  L 802 114  L 953 345  L 972 591  L 830 859  L 624 954  L 419 947  N"/>
          </draw:custom-shape>
          <draw:custom-shape draw:style-name="gr700" draw:text-style-name="P2" draw:layer="layout" svg:width="2.893cm" svg:height="6.117cm" svg:x="10.389cm" svg:y="8.969cm">
            <text:p/>
            <draw:enhanced-geometry svg:viewBox="0 0 656 1387" draw:type="non-primitive" draw:enhanced-path="M 655 1386  L 289 1215  L 68 972  L 0 603  L 147 339  L 295 133  L 548 0  N"/>
          </draw:custom-shape>
          <draw:custom-shape draw:style-name="gr700" draw:text-style-name="P2" draw:layer="layout" svg:width="2.893cm" svg:height="6.117cm" svg:x="10.389cm" svg:y="8.969cm">
            <text:p/>
            <draw:enhanced-geometry svg:viewBox="0 0 656 1387" draw:type="non-primitive" draw:enhanced-path="M 655 1386  L 289 1215  L 68 972  L 0 603  L 147 339  L 295 133  L 548 0  N"/>
          </draw:custom-shape>
          <draw:custom-shape draw:style-name="gr701" draw:text-style-name="P2" draw:layer="layout" svg:width="2.21cm" svg:height="1.834cm" svg:x="14.437cm" svg:y="9.071cm">
            <text:p/>
            <draw:enhanced-geometry svg:viewBox="0 0 501 416" draw:type="non-primitive" draw:enhanced-path="M 0 0  L 269 126  L 500 415  N"/>
          </draw:custom-shape>
          <draw:custom-shape draw:style-name="gr701" draw:text-style-name="P2" draw:layer="layout" svg:width="2.21cm" svg:height="1.834cm" svg:x="14.437cm" svg:y="9.071cm">
            <text:p/>
            <draw:enhanced-geometry svg:viewBox="0 0 501 416" draw:type="non-primitive" draw:enhanced-path="M 0 0  L 269 126  L 500 415  N"/>
          </draw:custom-shape>
          <draw:custom-shape draw:style-name="gr702" draw:text-style-name="P2" draw:layer="layout" svg:width="3.489cm" svg:height="2.478cm" svg:x="13.264cm" svg:y="12.581cm">
            <text:p/>
            <draw:enhanced-geometry svg:viewBox="0 0 791 562" draw:type="non-primitive" draw:enhanced-path="M 0 561  L 304 508  L 557 337  L 790 0  N"/>
          </draw:custom-shape>
          <draw:custom-shape draw:style-name="gr702" draw:text-style-name="P2" draw:layer="layout" svg:width="3.489cm" svg:height="2.478cm" svg:x="13.264cm" svg:y="12.581cm">
            <text:p/>
            <draw:enhanced-geometry svg:viewBox="0 0 791 562" draw:type="non-primitive" draw:enhanced-path="M 0 561  L 304 508  L 557 337  L 790 0  N"/>
          </draw:custom-shape>
          <draw:custom-shape draw:style-name="gr703" draw:text-style-name="P2" draw:layer="layout" svg:width="7.311cm" svg:height="6.751cm" svg:x="9.706cm" svg:y="9.093cm">
            <text:p/>
            <draw:enhanced-geometry svg:viewBox="0 0 1658 1531" draw:type="non-primitive" draw:enhanced-path="M 1657 1026  L 1511 1237  L 1178 1484  L 799 1530  L 262 1396  L 20 1027  L 0 572  L 68 187  L 290 0  N"/>
          </draw:custom-shape>
          <draw:custom-shape draw:style-name="gr703" draw:text-style-name="P2" draw:layer="layout" svg:width="7.311cm" svg:height="6.751cm" svg:x="9.706cm" svg:y="9.093cm">
            <text:p/>
            <draw:enhanced-geometry svg:viewBox="0 0 1658 1531" draw:type="non-primitive" draw:enhanced-path="M 1657 1026  L 1511 1237  L 1178 1484  L 799 1530  L 262 1396  L 20 1027  L 0 572  L 68 187  L 290 0  N"/>
          </draw:custom-shape>
          <draw:custom-shape draw:style-name="gr704" draw:text-style-name="P2" draw:layer="layout" svg:width="1.217cm" svg:height="6.883cm" svg:x="8.44cm" svg:y="9.177cm">
            <text:p/>
            <draw:enhanced-geometry svg:viewBox="0 0 276 1561" draw:type="non-primitive" draw:enhanced-path="M 269 1560  L 274 1465  L 275 1368  L 275 1272  L 270 1174  L 263 1079  L 254 984  L 245 889  L 230 792  L 213 696  L 192 602  L 171 508  L 145 415  L 118 323  L 86 231  L 55 139  L 19 50  L 0 0  N"/>
          </draw:custom-shape>
          <draw:custom-shape draw:style-name="gr704" draw:text-style-name="P2" draw:layer="layout" svg:width="1.217cm" svg:height="6.883cm" svg:x="8.44cm" svg:y="9.177cm">
            <text:p/>
            <draw:enhanced-geometry svg:viewBox="0 0 276 1561" draw:type="non-primitive" draw:enhanced-path="M 269 1560  L 274 1465  L 275 1368  L 275 1272  L 270 1174  L 263 1079  L 254 984  L 245 889  L 230 792  L 213 696  L 192 602  L 171 508  L 145 415  L 118 323  L 86 231  L 55 139  L 19 50  L 0 0  N"/>
          </draw:custom-shape>
          <draw:custom-shape draw:style-name="gr705" draw:text-style-name="P2" draw:layer="layout" svg:width="7.347cm" svg:height="0.538cm" svg:x="8.44cm" svg:y="8.643cm">
            <text:p/>
            <draw:enhanced-geometry svg:viewBox="0 0 1666 122" draw:type="non-primitive" draw:enhanced-path="M 0 121  L 180 119  L 357 114  L 535 107  L 713 98  L 892 84  L 1070 67  L 1246 53  L 1423 32  L 1600 8  L 1665 0  N"/>
          </draw:custom-shape>
          <draw:custom-shape draw:style-name="gr705" draw:text-style-name="P2" draw:layer="layout" svg:width="7.347cm" svg:height="0.538cm" svg:x="8.44cm" svg:y="8.643cm">
            <text:p/>
            <draw:enhanced-geometry svg:viewBox="0 0 1666 122" draw:type="non-primitive" draw:enhanced-path="M 0 121  L 180 119  L 357 114  L 535 107  L 713 98  L 892 84  L 1070 67  L 1246 53  L 1423 32  L 1600 8  L 1665 0  N"/>
          </draw:custom-shape>
          <draw:custom-shape draw:style-name="gr706" draw:text-style-name="P2" draw:layer="layout" svg:width="1.204cm" svg:height="0.441cm" svg:x="15.769cm" svg:y="8.634cm">
            <text:p/>
            <draw:enhanced-geometry svg:viewBox="0 0 273 100" draw:type="non-primitive" draw:enhanced-path="M 0 0  L 100 57  L 117 65  L 158 78  L 200 89  L 240 96  L 272 99  N"/>
          </draw:custom-shape>
          <draw:custom-shape draw:style-name="gr706" draw:text-style-name="P2" draw:layer="layout" svg:width="1.204cm" svg:height="0.441cm" svg:x="15.769cm" svg:y="8.634cm">
            <text:p/>
            <draw:enhanced-geometry svg:viewBox="0 0 273 100" draw:type="non-primitive" draw:enhanced-path="M 0 0  L 100 57  L 117 65  L 158 78  L 200 89  L 240 96  L 272 99  N"/>
          </draw:custom-shape>
          <draw:custom-shape draw:style-name="gr707" draw:text-style-name="P2" draw:layer="layout" svg:width="0.666cm" svg:height="5.256cm" svg:x="16.62cm" svg:y="9.071cm">
            <text:p/>
            <draw:enhanced-geometry svg:viewBox="0 0 151 1192" draw:type="non-primitive" draw:enhanced-path="M 90 0  L 69 49  L 50 111  L 36 174  L 22 237  L 14 302  L 7 366  L 1 430  L 0 494  L 1 560  L 5 624  L 12 688  L 20 752  L 31 816  L 47 879  L 63 943  L 85 1002  L 106 1064  L 150 1191  N"/>
          </draw:custom-shape>
          <draw:custom-shape draw:style-name="gr707" draw:text-style-name="P2" draw:layer="layout" svg:width="0.666cm" svg:height="5.256cm" svg:x="16.62cm" svg:y="9.071cm">
            <text:p/>
            <draw:enhanced-geometry svg:viewBox="0 0 151 1192" draw:type="non-primitive" draw:enhanced-path="M 90 0  L 69 49  L 50 111  L 36 174  L 22 237  L 14 302  L 7 366  L 1 430  L 0 494  L 1 560  L 5 624  L 12 688  L 20 752  L 31 816  L 47 879  L 63 943  L 85 1002  L 106 1064  L 150 1191  N"/>
          </draw:custom-shape>
          <draw:custom-shape draw:style-name="gr708" draw:text-style-name="P2" draw:layer="layout" svg:width="2.041cm" svg:height="2.227cm" svg:x="15.227cm" svg:y="14.323cm">
            <text:p/>
            <draw:enhanced-geometry svg:viewBox="0 0 463 505" draw:type="non-primitive" draw:enhanced-path="M 462 0  L 406 46  L 352 91  L 297 140  L 247 190  L 199 243  L 151 296  L 106 352  L 64 410  L 23 468  L 0 504  N"/>
          </draw:custom-shape>
          <draw:custom-shape draw:style-name="gr708" draw:text-style-name="P2" draw:layer="layout" svg:width="2.041cm" svg:height="2.227cm" svg:x="15.227cm" svg:y="14.323cm">
            <text:p/>
            <draw:enhanced-geometry svg:viewBox="0 0 463 505" draw:type="non-primitive" draw:enhanced-path="M 462 0  L 406 46  L 352 91  L 297 140  L 247 190  L 199 243  L 151 296  L 106 352  L 64 410  L 23 468  L 0 504  N"/>
          </draw:custom-shape>
          <draw:custom-shape draw:style-name="gr709" draw:text-style-name="P2" draw:layer="layout" svg:width="5.6cm" svg:height="0.688cm" svg:x="9.631cm" svg:y="15.862cm">
            <text:p/>
            <draw:enhanced-geometry svg:viewBox="0 0 1270 156" draw:type="non-primitive" draw:enhanced-path="M 1269 155  L 1196 127  L 1123 104  L 1048 83  L 974 62  L 897 46  L 820 30  L 743 19  L 667 10  L 589 6  L 511 2  L 435 0  L 357 2  L 279 6  L 203 14  L 125 23  L 47 34  L 0 45  N"/>
          </draw:custom-shape>
          <draw:custom-shape draw:style-name="gr709" draw:text-style-name="P2" draw:layer="layout" svg:width="5.6cm" svg:height="0.688cm" svg:x="9.631cm" svg:y="15.862cm">
            <text:p/>
            <draw:enhanced-geometry svg:viewBox="0 0 1270 156" draw:type="non-primitive" draw:enhanced-path="M 1269 155  L 1196 127  L 1123 104  L 1048 83  L 974 62  L 897 46  L 820 30  L 743 19  L 667 10  L 589 6  L 511 2  L 435 0  L 357 2  L 279 6  L 203 14  L 125 23  L 47 34  L 0 45  N"/>
          </draw:custom-shape>
          <draw:line draw:style-name="gr7" draw:text-style-name="P14" draw:layer="layout" svg:x1="9.631cm" svg:y1="16.012cm" svg:x2="8.819cm" svg:y2="17.365cm">
            <text:p/>
          </draw:line>
          <draw:line draw:style-name="gr7" draw:text-style-name="P14" draw:layer="layout" svg:x1="9.631cm" svg:y1="16.012cm" svg:x2="8.819cm" svg:y2="17.365cm">
            <text:p/>
          </draw:line>
          <draw:custom-shape draw:style-name="gr710" draw:text-style-name="P2" draw:layer="layout" svg:width="0.798cm" svg:height="0.974cm" svg:x="7.638cm" svg:y="8.317cm">
            <text:p/>
            <draw:enhanced-geometry svg:viewBox="0 0 181 221" draw:type="non-primitive" draw:enhanced-path="M 7 220  L 180 195  L 0 0  N"/>
          </draw:custom-shape>
          <draw:custom-shape draw:style-name="gr710" draw:text-style-name="P2" draw:layer="layout" svg:width="0.798cm" svg:height="0.974cm" svg:x="7.638cm" svg:y="8.317cm">
            <text:p/>
            <draw:enhanced-geometry svg:viewBox="0 0 181 221" draw:type="non-primitive" draw:enhanced-path="M 7 220  L 180 195  L 0 0  N"/>
          </draw:custom-shape>
          <draw:line draw:style-name="gr7" draw:text-style-name="P14" draw:layer="layout" svg:x1="16.077cm" svg:y1="7.549cm" svg:x2="15.742cm" svg:y2="8.643cm">
            <text:p/>
          </draw:line>
          <draw:line draw:style-name="gr7" draw:text-style-name="P14" draw:layer="layout" svg:x1="16.077cm" svg:y1="7.549cm" svg:x2="15.742cm" svg:y2="8.643cm">
            <text:p/>
          </draw:line>
          <draw:line draw:style-name="gr7" draw:text-style-name="P14" draw:layer="layout" svg:x1="17.819cm" svg:y1="8.687cm" svg:x2="16.994cm" svg:y2="9.071cm">
            <text:p/>
          </draw:line>
          <draw:line draw:style-name="gr7" draw:text-style-name="P14" draw:layer="layout" svg:x1="17.819cm" svg:y1="8.687cm" svg:x2="16.994cm" svg:y2="9.071cm">
            <text:p/>
          </draw:line>
          <draw:line draw:style-name="gr7" draw:text-style-name="P14" draw:layer="layout" svg:x1="17.948cm" svg:y1="14.485cm" svg:x2="17.268cm" svg:y2="14.326cm">
            <text:p/>
          </draw:line>
          <draw:line draw:style-name="gr7" draw:text-style-name="P14" draw:layer="layout" svg:x1="17.948cm" svg:y1="14.485cm" svg:x2="17.268cm" svg:y2="14.326cm">
            <text:p/>
          </draw:line>
          <draw:line draw:style-name="gr7" draw:text-style-name="P14" draw:layer="layout" svg:x1="15.473cm" svg:y1="17.405cm" svg:x2="15.226cm" svg:y2="16.541cm">
            <text:p/>
          </draw:line>
          <draw:line draw:style-name="gr7" draw:text-style-name="P14" draw:layer="layout" svg:x1="15.473cm" svg:y1="17.405cm" svg:x2="15.226cm" svg:y2="16.541cm">
            <text:p/>
          </draw:line>
          <draw:custom-shape draw:style-name="gr711" draw:text-style-name="P127" draw:layer="layout" svg:width="3.51cm" svg:height="0.582cm" svg:x="17.886cm" svg:y="13.004cm">
            <text:p/>
            <draw:enhanced-geometry svg:viewBox="0 0 796 132" draw:type="non-primitive" draw:enhanced-path="M 795 131  L 795 0  L 0 0  L 0 131  L 795 131  L 795 131  L 795 131  N"/>
          </draw:custom-shape>
          <draw:custom-shape draw:style-name="gr712" draw:text-style-name="P128" draw:layer="layout" svg:width="3.51cm" svg:height="0.101cm" svg:x="17.886cm" svg:y="13.582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3" draw:text-style-name="P129" draw:layer="layout" svg:width="3.51cm" svg:height="0.101cm" svg:x="17.886cm" svg:y="13.679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4" draw:text-style-name="P130" draw:layer="layout" svg:width="3.51cm" svg:height="0.097cm" svg:x="17.886cm" svg:y="13.776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15" draw:text-style-name="P131" draw:layer="layout" svg:width="3.51cm" svg:height="0.101cm" svg:x="17.886cm" svg:y="13.869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6" draw:text-style-name="P132" draw:layer="layout" svg:width="3.51cm" svg:height="0.101cm" svg:x="17.886cm" svg:y="13.966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6" draw:text-style-name="P132" draw:layer="layout" svg:width="3.51cm" svg:height="0.101cm" svg:x="17.886cm" svg:y="14.063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7" draw:text-style-name="P133" draw:layer="layout" svg:width="3.51cm" svg:height="0.097cm" svg:x="17.886cm" svg:y="14.16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17" draw:text-style-name="P133" draw:layer="layout" svg:width="3.51cm" svg:height="0.102cm" svg:x="17.886cm" svg:y="14.252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8" draw:text-style-name="P134" draw:layer="layout" svg:width="3.51cm" svg:height="0.102cm" svg:x="17.886cm" svg:y="14.349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9" draw:text-style-name="P135" draw:layer="layout" svg:width="3.51cm" svg:height="0.102cm" svg:x="17.886cm" svg:y="14.446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19" draw:text-style-name="P135" draw:layer="layout" svg:width="3.51cm" svg:height="0.102cm" svg:x="17.886cm" svg:y="14.543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0" draw:text-style-name="P136" draw:layer="layout" svg:width="3.51cm" svg:height="0.097cm" svg:x="17.886cm" svg:y="14.64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21" draw:text-style-name="P137" draw:layer="layout" svg:width="3.51cm" svg:height="0.101cm" svg:x="17.886cm" svg:y="14.733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2" draw:text-style-name="P138" draw:layer="layout" svg:width="3.51cm" svg:height="0.101cm" svg:x="17.886cm" svg:y="14.83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3" draw:text-style-name="P139" draw:layer="layout" svg:width="3.51cm" svg:height="0.101cm" svg:x="17.886cm" svg:y="14.927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4" draw:text-style-name="P140" draw:layer="layout" svg:width="3.51cm" svg:height="0.097cm" svg:x="17.886cm" svg:y="15.024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25" draw:text-style-name="P141" draw:layer="layout" svg:width="3.51cm" svg:height="0.101cm" svg:x="17.886cm" svg:y="15.117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6" draw:text-style-name="P142" draw:layer="layout" svg:width="3.51cm" svg:height="0.101cm" svg:x="17.886cm" svg:y="15.214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7" draw:text-style-name="P143" draw:layer="layout" svg:width="3.51cm" svg:height="0.101cm" svg:x="17.886cm" svg:y="15.311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28" draw:text-style-name="P144" draw:layer="layout" svg:width="3.51cm" svg:height="0.097cm" svg:x="17.886cm" svg:y="15.408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29" draw:text-style-name="P145" draw:layer="layout" svg:width="3.51cm" svg:height="0.106cm" svg:x="17.886cm" svg:y="15.5cm">
            <text:p/>
            <draw:enhanced-geometry svg:viewBox="0 0 796 24" draw:type="non-primitive" draw:enhanced-path="M 795 0  L 795 23  L 0 23  L 0 0  L 795 0  L 795 0  L 795 0  N"/>
          </draw:custom-shape>
          <draw:custom-shape draw:style-name="gr730" draw:text-style-name="P146" draw:layer="layout" svg:width="3.51cm" svg:height="0.097cm" svg:x="17.886cm" svg:y="15.602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31" draw:text-style-name="P147" draw:layer="layout" svg:width="3.51cm" svg:height="0.106cm" svg:x="17.886cm" svg:y="15.694cm">
            <text:p/>
            <draw:enhanced-geometry svg:viewBox="0 0 796 24" draw:type="non-primitive" draw:enhanced-path="M 795 0  L 795 23  L 0 23  L 0 0  L 795 0  L 795 0  L 795 0  N"/>
          </draw:custom-shape>
          <draw:custom-shape draw:style-name="gr732" draw:text-style-name="P148" draw:layer="layout" svg:width="3.51cm" svg:height="0.102cm" svg:x="17.886cm" svg:y="15.791cm">
            <text:p/>
            <draw:enhanced-geometry svg:viewBox="0 0 796 23" draw:type="non-primitive" draw:enhanced-path="M 795 0  L 795 22  L 0 22  L 0 1  L 795 1  L 795 1  L 795 0  N"/>
          </draw:custom-shape>
          <draw:custom-shape draw:style-name="gr733" draw:text-style-name="P149" draw:layer="layout" svg:width="3.51cm" svg:height="0.097cm" svg:x="17.886cm" svg:y="15.888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34" draw:text-style-name="P150" draw:layer="layout" svg:width="3.51cm" svg:height="0.106cm" svg:x="17.886cm" svg:y="15.981cm">
            <text:p/>
            <draw:enhanced-geometry svg:viewBox="0 0 796 24" draw:type="non-primitive" draw:enhanced-path="M 795 0  L 795 23  L 0 23  L 0 0  L 795 0  L 795 0  L 795 0  N"/>
          </draw:custom-shape>
          <draw:custom-shape draw:style-name="gr735" draw:text-style-name="P151" draw:layer="layout" svg:width="3.51cm" svg:height="0.097cm" svg:x="17.886cm" svg:y="16.082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36" draw:text-style-name="P152" draw:layer="layout" svg:width="3.51cm" svg:height="0.101cm" svg:x="17.886cm" svg:y="16.175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37" draw:text-style-name="P153" draw:layer="layout" svg:width="3.51cm" svg:height="0.101cm" svg:x="17.886cm" svg:y="16.272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38" draw:text-style-name="P154" draw:layer="layout" svg:width="3.51cm" svg:height="0.097cm" svg:x="17.886cm" svg:y="16.369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39" draw:text-style-name="P155" draw:layer="layout" svg:width="3.51cm" svg:height="0.106cm" svg:x="17.886cm" svg:y="16.461cm">
            <text:p/>
            <draw:enhanced-geometry svg:viewBox="0 0 796 24" draw:type="non-primitive" draw:enhanced-path="M 795 0  L 795 23  L 0 23  L 0 0  L 795 0  L 795 0  L 795 0  N"/>
          </draw:custom-shape>
          <draw:custom-shape draw:style-name="gr740" draw:text-style-name="P156" draw:layer="layout" svg:width="3.51cm" svg:height="0.097cm" svg:x="17.886cm" svg:y="16.563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41" draw:text-style-name="P157" draw:layer="layout" svg:width="3.51cm" svg:height="0.101cm" svg:x="17.886cm" svg:y="16.656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42" draw:text-style-name="P158" draw:layer="layout" svg:width="3.51cm" svg:height="0.097cm" svg:x="17.886cm" svg:y="16.753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43" draw:text-style-name="P159" draw:layer="layout" svg:width="3.51cm" svg:height="0.106cm" svg:x="17.886cm" svg:y="16.845cm">
            <text:p/>
            <draw:enhanced-geometry svg:viewBox="0 0 796 24" draw:type="non-primitive" draw:enhanced-path="M 795 0  L 795 23  L 0 23  L 0 0  L 795 0  L 795 0  L 795 0  N"/>
          </draw:custom-shape>
          <draw:custom-shape draw:style-name="gr744" draw:text-style-name="P160" draw:layer="layout" svg:width="3.51cm" svg:height="0.101cm" svg:x="17.886cm" svg:y="16.947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45" draw:text-style-name="P161" draw:layer="layout" svg:width="3.51cm" svg:height="0.097cm" svg:x="17.886cm" svg:y="17.044cm">
            <text:p/>
            <draw:enhanced-geometry svg:viewBox="0 0 796 22" draw:type="non-primitive" draw:enhanced-path="M 795 0  L 795 21  L 0 21  L 0 0  L 795 0  L 795 0  L 795 0  N"/>
          </draw:custom-shape>
          <draw:custom-shape draw:style-name="gr746" draw:text-style-name="P162" draw:layer="layout" svg:width="3.51cm" svg:height="0.102cm" svg:x="17.886cm" svg:y="17.136cm">
            <text:p/>
            <draw:enhanced-geometry svg:viewBox="0 0 796 23" draw:type="non-primitive" draw:enhanced-path="M 795 0  L 795 22  L 0 22  L 0 0  L 795 0  L 795 0  L 795 0  N"/>
          </draw:custom-shape>
          <draw:custom-shape draw:style-name="gr747" draw:text-style-name="P16" draw:layer="layout" svg:width="3.51cm" svg:height="0.582cm" svg:x="17.886cm" svg:y="17.233cm">
            <text:p/>
            <draw:enhanced-geometry svg:viewBox="0 0 796 132" draw:type="non-primitive" draw:enhanced-path="M 795 0  L 795 131  L 0 131  L 0 0  L 795 0  L 795 0  L 795 0  N"/>
          </draw:custom-shape>
          <draw:custom-shape draw:style-name="gr748" draw:text-style-name="P163" draw:layer="layout" svg:width="1.049cm" svg:height="0.114cm" svg:x="17.886cm" svg:y="17.701cm">
            <text:p/>
            <draw:enhanced-geometry svg:viewBox="0 0 238 26" draw:type="non-primitive" draw:enhanced-path="M 0 25  L 237 25  L 237 25  L 237 24  L 235 24  L 234 23  L 234 23  L 233 23  L 232 23  L 231 22  L 229 22  L 226 21  L 222 21  L 219 20  L 216 20  L 212 20  L 209 20  L 206 19  L 203 19  L 199 18  L 196 18  L 193 18  L 189 17  L 186 17  L 183 17  L 179 17  L 178 16  L 177 16  L 175 16  L 174 16  L 172 16  L 171 15  L 170 15  L 168 15  L 158 11  L 149 11  L 149 10  L 147 9  L 146 8  L 145 7  L 142 7  L 140 7  L 138 7  L 135 6  L 133 6  L 131 6  L 128 6  L 126 5  L 125 5  L 123 5  L 122 5  L 120 5  L 118 5  L 116 5  L 115 5  L 113 5  L 111 5  L 110 5  L 108 5  L 107 6  L 105 6  L 104 6  L 102 6  L 101 7  L 99 7  L 98 7  L 97 7  L 97 8  L 95 8  L 94 9  L 94 9  L 92 9  L 14 5  L 14 5  L 13 4  L 12 3  L 12 3  L 11 3  L 11 3  L 10 2  L 10 2  L 7 2  L 6 2  L 5 1  L 4 0  L 4 0  L 0 0  L 0 25  L 0 25  L 0 25  N"/>
          </draw:custom-shape>
          <draw:custom-shape draw:style-name="gr749" draw:text-style-name="P163" draw:layer="layout" svg:width="0.723cm" svg:height="0.114cm" svg:x="20.664cm" svg:y="17.701cm">
            <text:p/>
            <draw:enhanced-geometry svg:viewBox="0 0 164 26" draw:type="non-primitive" draw:enhanced-path="M 163 25  L 0 25  L 1 24  L 1 23  L 3 23  L 4 22  L 6 22  L 8 21  L 10 21  L 13 20  L 14 20  L 17 20  L 19 20  L 21 19  L 24 19  L 25 18  L 28 18  L 30 18  L 32 17  L 35 17  L 37 17  L 39 17  L 40 16  L 41 16  L 42 16  L 44 16  L 44 16  L 45 15  L 46 15  L 47 15  L 54 11  L 61 11  L 61 10  L 62 9  L 63 8  L 63 7  L 65 7  L 67 7  L 68 7  L 70 6  L 72 6  L 73 6  L 75 6  L 76 5  L 78 5  L 81 5  L 83 5  L 85 5  L 88 5  L 89 6  L 91 6  L 94 7  L 95 7  L 96 7  L 96 7  L 97 8  L 98 8  L 98 9  L 98 9  L 100 9  L 153 5  L 154 5  L 155 4  L 155 3  L 155 3  L 155 3  L 155 3  L 156 2  L 157 2  L 159 2  L 160 2  L 160 1  L 160 0  L 161 0  L 163 0  L 163 25  L 163 25  L 163 25  N"/>
          </draw:custom-shape>
          <draw:custom-shape draw:style-name="gr750" draw:text-style-name="P35" draw:layer="layout" svg:width="0.093cm" svg:height="0.52cm" svg:x="18.997cm" svg:y="13.538cm">
            <text:p/>
            <draw:enhanced-geometry svg:viewBox="0 0 21 118" draw:type="non-primitive" draw:enhanced-path="M 0 117  L 20 117  L 20 0  L 0 0  L 0 117  L 0 117  L 0 117  N"/>
          </draw:custom-shape>
          <draw:custom-shape draw:style-name="gr114" draw:text-style-name="P35" draw:layer="layout" svg:width="0.092cm" svg:height="0.225cm" svg:x="19.178cm" svg:y="13.816cm">
            <text:p/>
            <draw:enhanced-geometry svg:viewBox="0 0 21 51" draw:type="non-primitive" draw:enhanced-path="M 20 49  L 0 50  L 0 0  L 20 0  L 20 50  L 20 50  L 20 49  N"/>
          </draw:custom-shape>
          <draw:custom-shape draw:style-name="gr751" draw:text-style-name="P35" draw:layer="layout" svg:width="0.092cm" svg:height="0.613cm" svg:x="19.328cm" svg:y="13.538cm">
            <text:p/>
            <draw:enhanced-geometry svg:viewBox="0 0 21 139" draw:type="non-primitive" draw:enhanced-path="M 20 138  L 0 138  L 0 0  L 20 0  L 20 138  L 20 138  L 20 138  N"/>
          </draw:custom-shape>
          <draw:custom-shape draw:style-name="gr114" draw:text-style-name="P35" draw:layer="layout" svg:width="0.093cm" svg:height="0.19cm" svg:x="19.416cm" svg:y="13.723cm">
            <text:p/>
            <draw:enhanced-geometry svg:viewBox="0 0 21 43" draw:type="non-primitive" draw:enhanced-path="M 20 42  L 0 42  L 0 0  L 20 0  L 20 42  L 20 42  L 20 42  N"/>
          </draw:custom-shape>
          <draw:custom-shape draw:style-name="gr752" draw:text-style-name="P35" draw:layer="layout" svg:width="0.092cm" svg:height="0.472cm" svg:x="19.447cm" svg:y="13.498cm">
            <text:p/>
            <draw:enhanced-geometry svg:viewBox="0 0 21 107" draw:type="non-primitive" draw:enhanced-path="M 0 106  L 20 106  L 20 0  L 0 0  L 0 106  L 0 106  L 0 106  N"/>
          </draw:custom-shape>
          <draw:custom-shape draw:style-name="gr753" draw:text-style-name="P35" draw:layer="layout" svg:width="0.092cm" svg:height="0.357cm" svg:x="19.756cm" svg:y="13.767cm">
            <text:p/>
            <draw:enhanced-geometry svg:viewBox="0 0 21 81" draw:type="non-primitive" draw:enhanced-path="M 20 80  L 0 80  L 0 0  L 20 0  L 20 80  L 20 80  N"/>
          </draw:custom-shape>
          <draw:custom-shape draw:style-name="gr754" draw:text-style-name="P35" draw:layer="layout" svg:width="0.093cm" svg:height="0.595cm" svg:x="19.923cm" svg:y="13.67cm">
            <text:p/>
            <draw:enhanced-geometry svg:viewBox="0 0 21 135" draw:type="non-primitive" draw:enhanced-path="M 20 134  L 0 134  L 0 0  L 20 0  L 20 134  L 20 134  L 20 134  N"/>
          </draw:custom-shape>
          <draw:custom-shape draw:style-name="gr755" draw:text-style-name="P164" draw:layer="layout" svg:width="1.124cm" svg:height="0.383cm" svg:x="18.79cm" svg:y="16.065cm">
            <text:p/>
            <draw:enhanced-geometry svg:viewBox="0 0 255 87" draw:type="non-primitive" draw:enhanced-path="M 32 8  L 254 86  L 250 85  L 245 84  L 241 82  L 237 82  L 232 80  L 229 79  L 0 0  L 5 1  L 10 2  L 15 5  L 21 5  L 26 7  L 32 8  L 32 8  N"/>
          </draw:custom-shape>
          <draw:custom-shape draw:style-name="gr756" draw:text-style-name="P36" draw:layer="layout" svg:width="1.102cm" svg:height="0.52cm" svg:x="18.812cm" svg:y="16.528cm">
            <text:p/>
            <draw:enhanced-geometry svg:viewBox="0 0 250 118" draw:type="non-primitive" draw:enhanced-path="M 0 0  L 228 58  L 229 63  L 230 67  L 230 72  L 232 77  L 232 81  L 233 85  L 234 88  L 236 93  L 237 96  L 239 100  L 240 103  L 242 106  L 244 110  L 246 112  L 248 114  L 249 117  L 27 74  L 24 70  L 22 67  L 20 63  L 17 59  L 16 55  L 14 51  L 12 47  L 10 42  L 9 38  L 7 32  L 6 27  L 5 22  L 3 17  L 2 11  L 2 6  L 0 0  L 0 0  L 0 0  N"/>
          </draw:custom-shape>
          <draw:custom-shape draw:style-name="gr757" draw:text-style-name="P36" draw:layer="layout" svg:width="0.247cm" svg:height="0.123cm" svg:x="19.667cm" svg:y="15.796cm">
            <text:p/>
            <draw:enhanced-geometry svg:viewBox="0 0 56 28" draw:type="non-primitive" draw:enhanced-path="M 0 0  L 55 27  L 53 25  L 50 23  L 48 21  L 46 20  L 44 18  L 43 15  L 41 13  L 40 11  L 38 9  L 38 6  L 36 4  L 36 1  L 36 0  L 0 0  L 0 0  N"/>
          </draw:custom-shape>
          <draw:custom-shape draw:style-name="gr757" draw:text-style-name="P36" draw:layer="layout" svg:width="0.203cm" svg:height="0.075cm" svg:x="19.628cm" svg:y="15.778cm">
            <text:p/>
            <draw:enhanced-geometry svg:viewBox="0 0 46 17" draw:type="non-primitive" draw:enhanced-path="M 9 16  L 0 0  L 44 0  L 44 0  L 44 8  L 45 16  L 9 16  L 9 16  N"/>
          </draw:custom-shape>
          <draw:custom-shape draw:style-name="gr758" draw:text-style-name="P165" draw:layer="layout" svg:width="0.242cm" svg:height="0.075cm" svg:x="19.584cm" svg:y="15.756cm">
            <text:p/>
            <draw:enhanced-geometry svg:viewBox="0 0 55 17" draw:type="non-primitive" draw:enhanced-path="M 10 12  L 0 0  L 53 0  L 53 6  L 54 16  L 10 16  L 10 16  L 10 12  N"/>
          </draw:custom-shape>
          <draw:custom-shape draw:style-name="gr759" draw:text-style-name="P166" draw:layer="layout" svg:width="0.274cm" svg:height="0.075cm" svg:x="19.548cm" svg:y="15.738cm">
            <text:p/>
            <draw:enhanced-geometry svg:viewBox="0 0 62 17" draw:type="non-primitive" draw:enhanced-path="M 8 16  L 0 0  L 61 0  L 61 12  L 61 16  L 8 16  L 8 16  L 8 16  N"/>
          </draw:custom-shape>
          <draw:custom-shape draw:style-name="gr759" draw:text-style-name="P166" draw:layer="layout" svg:width="0.322cm" svg:height="0.075cm" svg:x="19.504cm" svg:y="15.716cm">
            <text:p/>
            <draw:enhanced-geometry svg:viewBox="0 0 73 17" draw:type="non-primitive" draw:enhanced-path="M 9 16  L 0 0  L 72 0  L 71 16  L 9 16  L 9 16  L 9 16  N"/>
          </draw:custom-shape>
          <draw:custom-shape draw:style-name="gr760" draw:text-style-name="P167" draw:layer="layout" svg:width="0.366cm" svg:height="0.075cm" svg:x="19.46cm" svg:y="15.699cm">
            <text:p/>
            <draw:enhanced-geometry svg:viewBox="0 0 83 17" draw:type="non-primitive" draw:enhanced-path="M 10 16  L 0 0  L 82 0  L 82 16  L 82 16  L 10 16  L 10 16  N"/>
          </draw:custom-shape>
          <draw:custom-shape draw:style-name="gr761" draw:text-style-name="P168" draw:layer="layout" svg:width="0.411cm" svg:height="0.075cm" svg:x="19.42cm" svg:y="15.677cm">
            <text:p/>
            <draw:enhanced-geometry svg:viewBox="0 0 93 17" draw:type="non-primitive" draw:enhanced-path="M 9 16  L 0 0  L 92 0  L 92 3  L 91 16  L 9 16  L 9 16  L 9 16  N"/>
          </draw:custom-shape>
          <draw:custom-shape draw:style-name="gr762" draw:text-style-name="P169" draw:layer="layout" svg:width="0.458cm" svg:height="0.075cm" svg:x="19.381cm" svg:y="15.659cm">
            <text:p/>
            <draw:enhanced-geometry svg:viewBox="0 0 104 17" draw:type="non-primitive" draw:enhanced-path="M 9 16  L 0 0  L 103 0  L 101 16  L 9 16  L 9 16  L 9 16  N"/>
          </draw:custom-shape>
          <draw:custom-shape draw:style-name="gr763" draw:text-style-name="P170" draw:layer="layout" svg:width="0.498cm" svg:height="0.075cm" svg:x="19.341cm" svg:y="15.637cm">
            <text:p/>
            <draw:enhanced-geometry svg:viewBox="0 0 113 17" draw:type="non-primitive" draw:enhanced-path="M 9 16  L 0 0  L 112 0  L 111 6  L 111 16  L 9 16  L 9 16  N"/>
          </draw:custom-shape>
          <draw:custom-shape draw:style-name="gr764" draw:text-style-name="P170" draw:layer="layout" svg:width="0.547cm" svg:height="0.075cm" svg:x="19.297cm" svg:y="15.615cm">
            <text:p/>
            <draw:enhanced-geometry svg:viewBox="0 0 124 17" draw:type="non-primitive" draw:enhanced-path="M 10 16  L 0 0  L 123 0  L 122 16  L 10 16  L 10 16  L 10 16  N"/>
          </draw:custom-shape>
          <draw:custom-shape draw:style-name="gr765" draw:text-style-name="P171" draw:layer="layout" svg:width="0.591cm" svg:height="0.075cm" svg:x="19.262cm" svg:y="15.597cm">
            <text:p/>
            <draw:enhanced-geometry svg:viewBox="0 0 134 17" draw:type="non-primitive" draw:enhanced-path="M 8 16  L 0 0  L 133 0  L 131 16  L 8 16  L 8 16  L 8 16  N"/>
          </draw:custom-shape>
          <draw:custom-shape draw:style-name="gr766" draw:text-style-name="P172" draw:layer="layout" svg:width="0.643cm" svg:height="0.075cm" svg:x="19.218cm" svg:y="15.575cm">
            <text:p/>
            <draw:enhanced-geometry svg:viewBox="0 0 146 17" draw:type="non-primitive" draw:enhanced-path="M 9 16  L 0 0  L 145 0  L 144 9  L 143 16  L 9 16  L 9 16  L 9 16  N"/>
          </draw:custom-shape>
          <draw:custom-shape draw:style-name="gr767" draw:text-style-name="P173" draw:layer="layout" svg:width="0.697cm" svg:height="0.074cm" svg:x="19.178cm" svg:y="15.558cm">
            <text:p/>
            <draw:enhanced-geometry svg:viewBox="0 0 158 17" draw:type="non-primitive" draw:enhanced-path="M 9 16  L 0 0  L 157 0  L 156 4  L 154 16  L 9 16  L 9 16  N"/>
          </draw:custom-shape>
          <draw:custom-shape draw:style-name="gr768" draw:text-style-name="P174" draw:layer="layout" svg:width="0.754cm" svg:height="0.075cm" svg:x="19.134cm" svg:y="15.535cm">
            <text:p/>
            <draw:enhanced-geometry svg:viewBox="0 0 171 17" draw:type="non-primitive" draw:enhanced-path="M 9 16  L 0 0  L 170 0  L 167 16  L 10 16  L 10 16  L 9 16  N"/>
          </draw:custom-shape>
          <draw:custom-shape draw:style-name="gr769" draw:text-style-name="P174" draw:layer="layout" svg:width="0.811cm" svg:height="0.075cm" svg:x="19.094cm" svg:y="15.518cm">
            <text:p/>
            <draw:enhanced-geometry svg:viewBox="0 0 184 17" draw:type="non-primitive" draw:enhanced-path="M 9 16  L 0 0  L 183 0  L 179 16  L 179 16  L 9 16  L 9 16  N"/>
          </draw:custom-shape>
          <draw:custom-shape draw:style-name="gr770" draw:text-style-name="P175" draw:layer="layout" svg:width="0.86cm" svg:height="0.075cm" svg:x="19.054cm" svg:y="15.496cm">
            <text:p/>
            <draw:enhanced-geometry svg:viewBox="0 0 195 17" draw:type="non-primitive" draw:enhanced-path="M 9 16  L 0 0  L 194 0  L 194 3  L 194 3  L 194 6  L 193 9  L 192 12  L 191 16  L 9 16  L 9 16  N"/>
          </draw:custom-shape>
          <draw:custom-shape draw:style-name="gr771" draw:text-style-name="P176" draw:layer="layout" svg:width="0.904cm" svg:height="0.075cm" svg:x="19.01cm" svg:y="15.478cm">
            <text:p/>
            <draw:enhanced-geometry svg:viewBox="0 0 205 17" draw:type="non-primitive" draw:enhanced-path="M 10 16  L 0 0  L 196 0  L 204 16  L 10 16  L 10 16  L 10 16  N"/>
          </draw:custom-shape>
          <draw:custom-shape draw:style-name="gr772" draw:text-style-name="P177" draw:layer="layout" svg:width="0.908cm" svg:height="0.075cm" svg:x="18.975cm" svg:y="15.46cm">
            <text:p/>
            <draw:enhanced-geometry svg:viewBox="0 0 206 17" draw:type="non-primitive" draw:enhanced-path="M 9 16  L 0 0  L 197 0  L 205 16  L 9 16  L 9 16  L 9 16  N"/>
          </draw:custom-shape>
          <draw:custom-shape draw:style-name="gr773" draw:text-style-name="P177" draw:layer="layout" svg:width="0.913cm" svg:height="0.075cm" svg:x="18.931cm" svg:y="15.438cm">
            <text:p/>
            <draw:enhanced-geometry svg:viewBox="0 0 207 17" draw:type="non-primitive" draw:enhanced-path="M 9 12  L 0 0  L 0 0  L 198 0  L 206 16  L 9 16  L 9 16  L 9 12  N"/>
          </draw:custom-shape>
          <draw:custom-shape draw:style-name="gr774" draw:text-style-name="P178" draw:layer="layout" svg:width="0.899cm" svg:height="0.075cm" svg:x="18.909cm" svg:y="15.421cm">
            <text:p/>
            <draw:enhanced-geometry svg:viewBox="0 0 204 17" draw:type="non-primitive" draw:enhanced-path="M 4 16  L 2 8  L 0 0  L 0 0  L 196 0  L 203 16  L 4 16  L 4 16  N"/>
          </draw:custom-shape>
          <draw:custom-shape draw:style-name="gr775" draw:text-style-name="P179" draw:layer="layout" svg:width="0.891cm" svg:height="0.075cm" svg:x="18.887cm" svg:y="15.399cm">
            <text:p/>
            <draw:enhanced-geometry svg:viewBox="0 0 202 17" draw:type="non-primitive" draw:enhanced-path="M 4 16  L 1 6  L 0 0  L 194 0  L 201 16  L 4 16  L 4 16  N"/>
          </draw:custom-shape>
          <draw:custom-shape draw:style-name="gr776" draw:text-style-name="P179" draw:layer="layout" svg:width="0.886cm" svg:height="0.075cm" svg:x="18.865cm" svg:y="15.377cm">
            <text:p/>
            <draw:enhanced-geometry svg:viewBox="0 0 201 17" draw:type="non-primitive" draw:enhanced-path="M 4 16  L 4 16  L 1 6  L 0 0  L 191 0  L 200 16  L 4 16  L 4 16  N"/>
          </draw:custom-shape>
          <draw:custom-shape draw:style-name="gr777" draw:text-style-name="P180" draw:layer="layout" svg:width="0.859cm" svg:height="0.075cm" svg:x="18.852cm" svg:y="15.355cm">
            <text:p/>
            <draw:enhanced-geometry svg:viewBox="0 0 195 17" draw:type="non-primitive" draw:enhanced-path="M 3 16  L 2 16  L 1 6  L 0 0  L 186 0  L 194 16  L 3 16  L 3 16  L 3 16  N"/>
          </draw:custom-shape>
          <draw:custom-shape draw:style-name="gr778" draw:text-style-name="P181" draw:layer="layout" svg:width="0.833cm" svg:height="0.075cm" svg:x="18.843cm" svg:y="15.337cm">
            <text:p/>
            <draw:enhanced-geometry svg:viewBox="0 0 189 17" draw:type="non-primitive" draw:enhanced-path="M 2 16  L 0 12  L 0 0  L 180 0  L 188 16  L 2 16  L 2 16  L 2 16  N"/>
          </draw:custom-shape>
          <draw:custom-shape draw:style-name="gr779" draw:text-style-name="P182" draw:layer="layout" svg:width="0.811cm" svg:height="0.075cm" svg:x="18.83cm" svg:y="15.315cm">
            <text:p/>
            <draw:enhanced-geometry svg:viewBox="0 0 184 17" draw:type="non-primitive" draw:enhanced-path="M 2 16  L 2 16  L 1 6  L 0 0  L 176 0  L 183 16  L 2 16  L 2 16  L 2 16  N"/>
          </draw:custom-shape>
          <draw:custom-shape draw:style-name="gr780" draw:text-style-name="P183" draw:layer="layout" svg:width="0.789cm" svg:height="0.075cm" svg:x="18.821cm" svg:y="15.297cm">
            <text:p/>
            <draw:enhanced-geometry svg:viewBox="0 0 179 17" draw:type="non-primitive" draw:enhanced-path="M 2 16  L 1 8  L 0 0  L 170 0  L 178 16  L 2 16  L 2 16  N"/>
          </draw:custom-shape>
          <draw:custom-shape draw:style-name="gr781" draw:text-style-name="P183" draw:layer="layout" svg:width="0.754cm" svg:height="0.075cm" svg:x="18.821cm" svg:y="15.275cm">
            <text:p/>
            <draw:enhanced-geometry svg:viewBox="0 0 171 17" draw:type="non-primitive" draw:enhanced-path="M 0 16  L 0 12  L 0 3  L 0 0  L 163 0  L 170 16  L 0 16  L 0 16  L 0 16  N"/>
          </draw:custom-shape>
          <draw:custom-shape draw:style-name="gr782" draw:text-style-name="P184" draw:layer="layout" svg:width="0.723cm" svg:height="0.075cm" svg:x="18.821cm" svg:y="15.258cm">
            <text:p/>
            <draw:enhanced-geometry svg:viewBox="0 0 164 17" draw:type="non-primitive" draw:enhanced-path="M 0 16  L 0 8  L 0 0  L 155 0  L 163 16  L 0 16  L 0 16  L 0 16  N"/>
          </draw:custom-shape>
          <draw:custom-shape draw:style-name="gr783" draw:text-style-name="P185" draw:layer="layout" svg:width="0.697cm" svg:height="0.075cm" svg:x="18.812cm" svg:y="15.24cm">
            <text:p/>
            <draw:enhanced-geometry svg:viewBox="0 0 158 17" draw:type="non-primitive" draw:enhanced-path="M 1 16  L 1 12  L 0 0  L 149 0  L 157 16  L 1 16  L 1 16  L 1 16  N"/>
          </draw:custom-shape>
          <draw:custom-shape draw:style-name="gr784" draw:text-style-name="P186" draw:layer="layout" svg:width="0.661cm" svg:height="0.075cm" svg:x="18.812cm" svg:y="15.218cm">
            <text:p/>
            <draw:enhanced-geometry svg:viewBox="0 0 150 17" draw:type="non-primitive" draw:enhanced-path="M 0 16  L 0 12  L 1 0  L 142 0  L 149 16  L 0 16  L 0 16  N"/>
          </draw:custom-shape>
          <draw:custom-shape draw:style-name="gr785" draw:text-style-name="P186" draw:layer="layout" svg:width="0.621cm" svg:height="0.075cm" svg:x="18.821cm" svg:y="15.2cm">
            <text:p/>
            <draw:enhanced-geometry svg:viewBox="0 0 141 17" draw:type="non-primitive" draw:enhanced-path="M 0 16  L 0 0  L 132 0  L 140 16  L 0 16  L 0 16  L 0 16  N"/>
          </draw:custom-shape>
          <draw:custom-shape draw:style-name="gr786" draw:text-style-name="P187" draw:layer="layout" svg:width="0.586cm" svg:height="0.075cm" svg:x="18.821cm" svg:y="15.178cm">
            <text:p/>
            <draw:enhanced-geometry svg:viewBox="0 0 133 17" draw:type="non-primitive" draw:enhanced-path="M 0 16  L 0 9  L 0 0  L 124 0  L 132 16  L 0 16  L 0 16  L 0 16  N"/>
          </draw:custom-shape>
          <draw:custom-shape draw:style-name="gr787" draw:text-style-name="P188" draw:layer="layout" svg:width="0.555cm" svg:height="0.075cm" svg:x="18.821cm" svg:y="15.161cm">
            <text:p/>
            <draw:enhanced-geometry svg:viewBox="0 0 126 17" draw:type="non-primitive" draw:enhanced-path="M 0 16  L 0 0  L 116 0  L 125 16  L 0 16  L 0 16  N"/>
          </draw:custom-shape>
          <draw:custom-shape draw:style-name="gr788" draw:text-style-name="P33" draw:layer="layout" svg:width="0.516cm" svg:height="0.075cm" svg:x="18.821cm" svg:y="15.139cm">
            <text:p/>
            <draw:enhanced-geometry svg:viewBox="0 0 117 17" draw:type="non-primitive" draw:enhanced-path="M 0 16  L 0 3  L 0 0  L 109 0  L 116 16  L 0 16  L 0 16  L 0 16  N"/>
          </draw:custom-shape>
          <draw:custom-shape draw:style-name="gr789" draw:text-style-name="P189" draw:layer="layout" svg:width="0.489cm" svg:height="0.074cm" svg:x="18.821cm" svg:y="15.117cm">
            <text:p/>
            <draw:enhanced-geometry svg:viewBox="0 0 111 17" draw:type="non-primitive" draw:enhanced-path="M 0 16  L 1 0  L 102 0  L 110 16  L 0 16  L 0 16  N"/>
          </draw:custom-shape>
          <draw:custom-shape draw:style-name="gr789" draw:text-style-name="P189" draw:layer="layout" svg:width="0.45cm" svg:height="0.075cm" svg:x="18.825cm" svg:y="15.099cm">
            <text:p/>
            <draw:enhanced-geometry svg:viewBox="0 0 102 17" draw:type="non-primitive" draw:enhanced-path="M 0 16  L 2 4  L 2 0  L 93 0  L 101 16  L 0 16  L 0 16  L 0 16  N"/>
          </draw:custom-shape>
          <draw:custom-shape draw:style-name="gr790" draw:text-style-name="P190" draw:layer="layout" svg:width="0.41cm" svg:height="0.075cm" svg:x="18.834cm" svg:y="15.077cm">
            <text:p/>
            <draw:enhanced-geometry svg:viewBox="0 0 93 17" draw:type="non-primitive" draw:enhanced-path="M 0 16  L 1 0  L 83 0  L 92 16  L 0 16  L 0 16  N"/>
          </draw:custom-shape>
          <draw:custom-shape draw:style-name="gr791" draw:text-style-name="P191" draw:layer="layout" svg:width="0.361cm" svg:height="0.075cm" svg:x="18.843cm" svg:y="15.059cm">
            <text:p/>
            <draw:enhanced-geometry svg:viewBox="0 0 82 17" draw:type="non-primitive" draw:enhanced-path="M 0 16  L 0 4  L 0 0  L 74 0  L 81 16  L 0 16  L 0 16  L 0 16  N"/>
          </draw:custom-shape>
          <draw:custom-shape draw:style-name="gr792" draw:text-style-name="P192" draw:layer="layout" svg:width="0.335cm" svg:height="0.075cm" svg:x="18.843cm" svg:y="15.037cm">
            <text:p/>
            <draw:enhanced-geometry svg:viewBox="0 0 76 17" draw:type="non-primitive" draw:enhanced-path="M 0 16  L 3 0  L 66 0  L 75 16  L 0 16  L 0 16  L 0 16  N"/>
          </draw:custom-shape>
          <draw:custom-shape draw:style-name="gr793" draw:text-style-name="P193" draw:layer="layout" svg:width="0.282cm" svg:height="0.124cm" svg:x="18.856cm" svg:y="14.918cm">
            <text:p/>
            <draw:enhanced-geometry svg:viewBox="0 0 64 28" draw:type="non-primitive" draw:enhanced-path="M 0 27  L 0 25  L 4 17  L 9 10  L 14 3  L 15 3  L 16 2  L 16 1  L 17 0  L 63 27  L 0 27  L 0 27  L 0 27  N"/>
          </draw:custom-shape>
          <draw:custom-shape draw:style-name="gr794" draw:text-style-name="P36" draw:layer="layout" svg:width="0.944cm" svg:height="1.058cm" svg:x="19.116cm" svg:y="13.944cm">
            <text:p/>
            <draw:enhanced-geometry svg:viewBox="0 0 214 240" draw:type="non-primitive" draw:enhanced-path="M 0 0  L 213 176  L 213 191  L 213 207  L 213 223  L 213 239  L 0 79  L 0 59  L 0 40  L 0 20  L 0 0  L 0 0  L 0 0  N"/>
          </draw:custom-shape>
          <draw:custom-shape draw:style-name="gr795" draw:text-style-name="P36" draw:layer="layout" svg:width="0.944cm" svg:height="0.277cm" svg:x="19.116cm" svg:y="17.529cm">
            <text:p/>
            <draw:enhanced-geometry svg:viewBox="0 0 214 63" draw:type="non-primitive" draw:enhanced-path="M 0 0  L 213 13  L 213 26  L 213 38  L 213 50  L 213 62  L 0 61  L 0 45  L 0 31  L 0 16  L 0 0  L 0 0  L 0 0  N"/>
          </draw:custom-shape>
          <draw:custom-shape draw:style-name="gr796" draw:text-style-name="P36" draw:layer="layout" svg:width="0.666cm" svg:height="0.124cm" svg:x="19.394cm" svg:y="17.017cm">
            <text:p/>
            <draw:enhanced-geometry svg:viewBox="0 0 151 28" draw:type="non-primitive" draw:enhanced-path="M 0 0  L 150 27  L 150 0  L 0 0  L 0 0  L 0 0  N"/>
          </draw:custom-shape>
          <draw:custom-shape draw:style-name="gr797" draw:text-style-name="P36" draw:layer="layout" svg:width="0.776cm" svg:height="0.075cm" svg:x="19.284cm" svg:y="16.999cm">
            <text:p/>
            <draw:enhanced-geometry svg:viewBox="0 0 176 17" draw:type="non-primitive" draw:enhanced-path="M 25 16  L 0 0  L 175 0  L 175 16  L 25 16  L 25 16  L 25 16  N"/>
          </draw:custom-shape>
          <draw:custom-shape draw:style-name="gr798" draw:text-style-name="P165" draw:layer="layout" svg:width="0.887cm" svg:height="0.075cm" svg:x="19.173cm" svg:y="16.977cm">
            <text:p/>
            <draw:enhanced-geometry svg:viewBox="0 0 201 17" draw:type="non-primitive" draw:enhanced-path="M 25 16  L 0 0  L 200 0  L 200 16  L 25 16  L 25 16  L 25 16  N"/>
          </draw:custom-shape>
          <draw:custom-shape draw:style-name="gr799" draw:text-style-name="P166" draw:layer="layout" svg:width="0.944cm" svg:height="0.075cm" svg:x="19.116cm" svg:y="16.96cm">
            <text:p/>
            <draw:enhanced-geometry svg:viewBox="0 0 214 17" draw:type="non-primitive" draw:enhanced-path="M 12 16  L 0 8  L 0 0  L 213 0  L 213 8  L 213 16  L 12 16  L 12 16  L 12 16  N"/>
          </draw:custom-shape>
          <draw:custom-shape draw:style-name="gr799" draw:text-style-name="P166" draw:layer="layout" svg:width="0.944cm" svg:height="0.075cm" svg:x="19.116cm" svg:y="16.938cm">
            <text:p/>
            <draw:enhanced-geometry svg:viewBox="0 0 214 17" draw:type="non-primitive" draw:enhanced-path="M 0 16  L 0 0  L 213 0  L 213 16  L 0 16  L 0 16  L 0 16  N"/>
          </draw:custom-shape>
          <draw:custom-shape draw:style-name="gr800" draw:text-style-name="P167" draw:layer="layout" svg:width="0.944cm" svg:height="0.075cm" svg:x="19.116cm" svg:y="16.916cm">
            <text:p/>
            <draw:enhanced-geometry svg:viewBox="0 0 214 17" draw:type="non-primitive" draw:enhanced-path="M 0 16  L 0 0  L 213 0  L 213 16  L 0 16  L 0 16  N"/>
          </draw:custom-shape>
          <draw:custom-shape draw:style-name="gr801" draw:text-style-name="P168" draw:layer="layout" svg:width="0.944cm" svg:height="0.075cm" svg:x="19.116cm" svg:y="16.898cm">
            <text:p/>
            <draw:enhanced-geometry svg:viewBox="0 0 214 17" draw:type="non-primitive" draw:enhanced-path="M 0 16  L 0 0  L 213 0  L 213 16  L 0 16  L 0 16  N"/>
          </draw:custom-shape>
          <draw:custom-shape draw:style-name="gr802" draw:text-style-name="P169" draw:layer="layout" svg:width="0.944cm" svg:height="0.075cm" svg:x="19.116cm" svg:y="16.876cm">
            <text:p/>
            <draw:enhanced-geometry svg:viewBox="0 0 214 17" draw:type="non-primitive" draw:enhanced-path="M 0 16  L 0 0  L 213 0  L 213 16  L 0 16  L 0 16  L 0 16  N"/>
          </draw:custom-shape>
          <draw:custom-shape draw:style-name="gr803" draw:text-style-name="P170" draw:layer="layout" svg:width="0.944cm" svg:height="0.075cm" svg:x="19.116cm" svg:y="16.858cm">
            <text:p/>
            <draw:enhanced-geometry svg:viewBox="0 0 214 17" draw:type="non-primitive" draw:enhanced-path="M 0 16  L 0 0  L 213 0  L 213 16  L 0 16  L 0 16  L 0 16  N"/>
          </draw:custom-shape>
          <draw:custom-shape draw:style-name="gr803" draw:text-style-name="P170" draw:layer="layout" svg:width="0.944cm" svg:height="0.075cm" svg:x="19.116cm" svg:y="16.836cm">
            <text:p/>
            <draw:enhanced-geometry svg:viewBox="0 0 214 17" draw:type="non-primitive" draw:enhanced-path="M 0 16  L 0 0  L 213 0  L 213 16  L 0 16  L 0 16  L 0 16  N"/>
          </draw:custom-shape>
          <draw:custom-shape draw:style-name="gr804" draw:text-style-name="P171" draw:layer="layout" svg:width="0.944cm" svg:height="0.075cm" svg:x="19.116cm" svg:y="16.814cm">
            <text:p/>
            <draw:enhanced-geometry svg:viewBox="0 0 214 17" draw:type="non-primitive" draw:enhanced-path="M 0 16  L 0 0  L 213 0  L 213 16  L 0 16  L 0 16  N"/>
          </draw:custom-shape>
          <draw:custom-shape draw:style-name="gr805" draw:text-style-name="P172" draw:layer="layout" svg:width="0.944cm" svg:height="0.075cm" svg:x="19.116cm" svg:y="16.797cm">
            <text:p/>
            <draw:enhanced-geometry svg:viewBox="0 0 214 17" draw:type="non-primitive" draw:enhanced-path="M 0 16  L 0 0  L 213 0  L 213 8  L 213 16  L 0 16  L 0 16  L 0 16  N"/>
          </draw:custom-shape>
          <draw:custom-shape draw:style-name="gr806" draw:text-style-name="P173" draw:layer="layout" svg:width="0.944cm" svg:height="0.075cm" svg:x="19.116cm" svg:y="16.779cm">
            <text:p/>
            <draw:enhanced-geometry svg:viewBox="0 0 214 17" draw:type="non-primitive" draw:enhanced-path="M 0 16  L 0 0  L 213 0  L 213 16  L 0 16  L 0 16  N"/>
          </draw:custom-shape>
          <draw:custom-shape draw:style-name="gr807" draw:text-style-name="P174" draw:layer="layout" svg:width="0.944cm" svg:height="0.075cm" svg:x="19.116cm" svg:y="16.757cm">
            <text:p/>
            <draw:enhanced-geometry svg:viewBox="0 0 214 17" draw:type="non-primitive" draw:enhanced-path="M 0 12  L 0 3  L 0 0  L 213 0  L 213 16  L 0 16  L 0 16  L 0 12  N"/>
          </draw:custom-shape>
          <draw:custom-shape draw:style-name="gr807" draw:text-style-name="P174" draw:layer="layout" svg:width="0.944cm" svg:height="0.075cm" svg:x="19.116cm" svg:y="16.739cm">
            <text:p/>
            <draw:enhanced-geometry svg:viewBox="0 0 214 17" draw:type="non-primitive" draw:enhanced-path="M 0 16  L 0 0  L 213 0  L 213 16  L 0 16  L 0 16  L 0 16  N"/>
          </draw:custom-shape>
          <draw:custom-shape draw:style-name="gr808" draw:text-style-name="P175" draw:layer="layout" svg:width="0.944cm" svg:height="0.075cm" svg:x="19.116cm" svg:y="16.717cm">
            <text:p/>
            <draw:enhanced-geometry svg:viewBox="0 0 214 17" draw:type="non-primitive" draw:enhanced-path="M 0 12  L 0 0  L 213 0  L 213 16  L 0 16  L 0 16  L 0 12  N"/>
          </draw:custom-shape>
          <draw:custom-shape draw:style-name="gr809" draw:text-style-name="P176" draw:layer="layout" svg:width="0.944cm" svg:height="0.075cm" svg:x="19.116cm" svg:y="16.7cm">
            <text:p/>
            <draw:enhanced-geometry svg:viewBox="0 0 214 17" draw:type="non-primitive" draw:enhanced-path="M 0 16  L 0 0  L 213 0  L 213 16  L 0 16  L 0 16  L 0 16  N"/>
          </draw:custom-shape>
          <draw:custom-shape draw:style-name="gr810" draw:text-style-name="P177" draw:layer="layout" svg:width="0.944cm" svg:height="0.075cm" svg:x="19.116cm" svg:y="16.678cm">
            <text:p/>
            <draw:enhanced-geometry svg:viewBox="0 0 214 17" draw:type="non-primitive" draw:enhanced-path="M 0 16  L 0 0  L 213 0  L 213 16  L 0 16  L 0 16  N"/>
          </draw:custom-shape>
          <draw:custom-shape draw:style-name="gr810" draw:text-style-name="P177" draw:layer="layout" svg:width="0.944cm" svg:height="0.074cm" svg:x="19.116cm" svg:y="16.656cm">
            <text:p/>
            <draw:enhanced-geometry svg:viewBox="0 0 214 17" draw:type="non-primitive" draw:enhanced-path="M 0 16  L 0 0  L 213 0  L 213 16  L 0 16  L 0 16  L 0 16  N"/>
          </draw:custom-shape>
          <draw:custom-shape draw:style-name="gr811" draw:text-style-name="P178" draw:layer="layout" svg:width="0.944cm" svg:height="0.075cm" svg:x="19.116cm" svg:y="16.638cm">
            <text:p/>
            <draw:enhanced-geometry svg:viewBox="0 0 214 17" draw:type="non-primitive" draw:enhanced-path="M 0 16  L 0 0  L 213 0  L 213 0  L 213 16  L 0 16  L 0 16  N"/>
          </draw:custom-shape>
          <draw:custom-shape draw:style-name="gr812" draw:text-style-name="P179" draw:layer="layout" svg:width="0.944cm" svg:height="0.075cm" svg:x="19.116cm" svg:y="16.616cm">
            <text:p/>
            <draw:enhanced-geometry svg:viewBox="0 0 214 17" draw:type="non-primitive" draw:enhanced-path="M 0 16  L 0 0  L 213 0  L 213 16  L 0 16  L 0 16  N"/>
          </draw:custom-shape>
          <draw:custom-shape draw:style-name="gr812" draw:text-style-name="P179" draw:layer="layout" svg:width="0.944cm" svg:height="0.075cm" svg:x="19.116cm" svg:y="16.594cm">
            <text:p/>
            <draw:enhanced-geometry svg:viewBox="0 0 214 17" draw:type="non-primitive" draw:enhanced-path="M 0 16  L 0 0  L 213 0  L 213 16  L 0 16  L 0 16  L 0 16  N"/>
          </draw:custom-shape>
          <draw:custom-shape draw:style-name="gr813" draw:text-style-name="P180" draw:layer="layout" svg:width="0.944cm" svg:height="0.075cm" svg:x="19.116cm" svg:y="16.576cm">
            <text:p/>
            <draw:enhanced-geometry svg:viewBox="0 0 214 17" draw:type="non-primitive" draw:enhanced-path="M 0 16  L 0 0  L 213 0  L 213 16  L 0 16  L 0 16  N"/>
          </draw:custom-shape>
          <draw:custom-shape draw:style-name="gr814" draw:text-style-name="P181" draw:layer="layout" svg:width="0.944cm" svg:height="0.075cm" svg:x="19.116cm" svg:y="16.554cm">
            <text:p/>
            <draw:enhanced-geometry svg:viewBox="0 0 214 17" draw:type="non-primitive" draw:enhanced-path="M 0 16  L 0 0  L 213 0  L 213 16  L 0 16  L 0 16  L 0 16  N"/>
          </draw:custom-shape>
          <draw:custom-shape draw:style-name="gr815" draw:text-style-name="P182" draw:layer="layout" svg:width="0.944cm" svg:height="0.075cm" svg:x="19.116cm" svg:y="16.536cm">
            <text:p/>
            <draw:enhanced-geometry svg:viewBox="0 0 214 17" draw:type="non-primitive" draw:enhanced-path="M 0 16  L 0 12  L 0 0  L 213 0  L 213 16  L 0 16  L 0 16  N"/>
          </draw:custom-shape>
          <draw:custom-shape draw:style-name="gr816" draw:text-style-name="P183" draw:layer="layout" svg:width="0.944cm" svg:height="0.075cm" svg:x="19.116cm" svg:y="16.514cm">
            <text:p/>
            <draw:enhanced-geometry svg:viewBox="0 0 214 17" draw:type="non-primitive" draw:enhanced-path="M 0 16  L 0 0  L 213 0  L 213 16  L 0 16  L 0 16  L 0 16  N"/>
          </draw:custom-shape>
          <draw:custom-shape draw:style-name="gr816" draw:text-style-name="P183" draw:layer="layout" svg:width="0.944cm" svg:height="0.075cm" svg:x="19.116cm" svg:y="16.497cm">
            <text:p/>
            <draw:enhanced-geometry svg:viewBox="0 0 214 17" draw:type="non-primitive" draw:enhanced-path="M 0 16  L 0 0  L 213 0  L 213 16  L 0 16  L 0 16  N"/>
          </draw:custom-shape>
          <draw:custom-shape draw:style-name="gr817" draw:text-style-name="P184" draw:layer="layout" svg:width="0.944cm" svg:height="0.075cm" svg:x="19.116cm" svg:y="16.475cm">
            <text:p/>
            <draw:enhanced-geometry svg:viewBox="0 0 214 17" draw:type="non-primitive" draw:enhanced-path="M 0 16  L 0 0  L 213 0  L 213 16  L 0 16  L 0 16  N"/>
          </draw:custom-shape>
          <draw:custom-shape draw:style-name="gr818" draw:text-style-name="P185" draw:layer="layout" svg:width="0.944cm" svg:height="0.075cm" svg:x="19.116cm" svg:y="16.457cm">
            <text:p/>
            <draw:enhanced-geometry svg:viewBox="0 0 214 17" draw:type="non-primitive" draw:enhanced-path="M 0 16  L 0 0  L 203 0  L 213 12  L 213 16  L 0 16  L 0 16  N"/>
          </draw:custom-shape>
          <draw:custom-shape draw:style-name="gr819" draw:text-style-name="P186" draw:layer="layout" svg:width="0.9cm" svg:height="0.075cm" svg:x="19.116cm" svg:y="16.435cm">
            <text:p/>
            <draw:enhanced-geometry svg:viewBox="0 0 204 17" draw:type="non-primitive" draw:enhanced-path="M 0 16  L 0 0  L 191 0  L 203 16  L 0 16  L 0 16  L 0 16  N"/>
          </draw:custom-shape>
          <draw:custom-shape draw:style-name="gr820" draw:text-style-name="P186" draw:layer="layout" svg:width="0.847cm" svg:height="0.075cm" svg:x="19.116cm" svg:y="16.417cm">
            <text:p/>
            <draw:enhanced-geometry svg:viewBox="0 0 192 17" draw:type="non-primitive" draw:enhanced-path="M 0 16  L 0 0  L 177 0  L 191 16  L 0 16  L 0 16  L 0 16  N"/>
          </draw:custom-shape>
          <draw:custom-shape draw:style-name="gr821" draw:text-style-name="P187" draw:layer="layout" svg:width="0.789cm" svg:height="0.075cm" svg:x="19.116cm" svg:y="16.395cm">
            <text:p/>
            <draw:enhanced-geometry svg:viewBox="0 0 179 17" draw:type="non-primitive" draw:enhanced-path="M 0 16  L 0 0  L 165 0  L 178 16  L 0 16  L 0 16  N"/>
          </draw:custom-shape>
          <draw:custom-shape draw:style-name="gr822" draw:text-style-name="P188" draw:layer="layout" svg:width="0.732cm" svg:height="0.075cm" svg:x="19.116cm" svg:y="16.378cm">
            <text:p/>
            <draw:enhanced-geometry svg:viewBox="0 0 166 17" draw:type="non-primitive" draw:enhanced-path="M 0 16  L 0 0  L 152 0  L 165 16  L 0 16  L 0 16  L 0 16  N"/>
          </draw:custom-shape>
          <draw:custom-shape draw:style-name="gr823" draw:text-style-name="P33" draw:layer="layout" svg:width="0.679cm" svg:height="0.075cm" svg:x="19.116cm" svg:y="16.356cm">
            <text:p/>
            <draw:enhanced-geometry svg:viewBox="0 0 154 17" draw:type="non-primitive" draw:enhanced-path="M 0 16  L 0 0  L 139 0  L 153 16  L 0 16  L 0 16  N"/>
          </draw:custom-shape>
          <draw:custom-shape draw:style-name="gr824" draw:text-style-name="P189" draw:layer="layout" svg:width="0.618cm" svg:height="0.075cm" svg:x="19.116cm" svg:y="16.334cm">
            <text:p/>
            <draw:enhanced-geometry svg:viewBox="0 0 140 17" draw:type="non-primitive" draw:enhanced-path="M 0 16  L 0 6  L 0 0  L 127 0  L 139 16  L 0 16  L 0 16  N"/>
          </draw:custom-shape>
          <draw:custom-shape draw:style-name="gr825" draw:text-style-name="P189" draw:layer="layout" svg:width="0.569cm" svg:height="0.075cm" svg:x="19.116cm" svg:y="16.312cm">
            <text:p/>
            <draw:enhanced-geometry svg:viewBox="0 0 129 17" draw:type="non-primitive" draw:enhanced-path="M 0 16  L 0 0  L 114 0  L 128 16  L 0 16  L 0 16  N"/>
          </draw:custom-shape>
          <draw:custom-shape draw:style-name="gr826" draw:text-style-name="P190" draw:layer="layout" svg:width="0.507cm" svg:height="0.075cm" svg:x="19.116cm" svg:y="16.294cm">
            <text:p/>
            <draw:enhanced-geometry svg:viewBox="0 0 115 17" draw:type="non-primitive" draw:enhanced-path="M 0 16  L 0 0  L 102 0  L 114 16  L 0 16  L 0 16  N"/>
          </draw:custom-shape>
          <draw:custom-shape draw:style-name="gr791" draw:text-style-name="P191" draw:layer="layout" svg:width="0.459cm" svg:height="0.075cm" svg:x="19.116cm" svg:y="16.272cm">
            <text:p/>
            <draw:enhanced-geometry svg:viewBox="0 0 104 17" draw:type="non-primitive" draw:enhanced-path="M 0 16  L 0 0  L 88 0  L 103 16  L 0 16  L 0 16  N"/>
          </draw:custom-shape>
          <draw:custom-shape draw:style-name="gr792" draw:text-style-name="P192" draw:layer="layout" svg:width="0.393cm" svg:height="0.075cm" svg:x="19.116cm" svg:y="16.254cm">
            <text:p/>
            <draw:enhanced-geometry svg:viewBox="0 0 89 17" draw:type="non-primitive" draw:enhanced-path="M 0 16  L 0 0  L 75 0  L 88 16  L 0 16  L 0 16  N"/>
          </draw:custom-shape>
          <draw:custom-shape draw:style-name="gr793" draw:text-style-name="P193" draw:layer="layout" svg:width="0.335cm" svg:height="0.124cm" svg:x="19.116cm" svg:y="16.135cm">
            <text:p/>
            <draw:enhanced-geometry svg:viewBox="0 0 76 28" draw:type="non-primitive" draw:enhanced-path="M 0 27  L 0 0  L 75 27  L 0 27  L 0 27  N"/>
          </draw:custom-shape>
          <draw:custom-shape draw:style-name="gr757" draw:text-style-name="P36" draw:layer="layout" svg:width="0.287cm" svg:height="0.141cm" svg:x="19.773cm" svg:y="15.835cm">
            <text:p/>
            <draw:enhanced-geometry svg:viewBox="0 0 65 32" draw:type="non-primitive" draw:enhanced-path="M 0 0  L 64 31  L 64 0  L 0 0  L 0 0  L 0 0  N"/>
          </draw:custom-shape>
          <draw:custom-shape draw:style-name="gr757" draw:text-style-name="P36" draw:layer="layout" svg:width="0.335cm" svg:height="0.075cm" svg:x="19.725cm" svg:y="15.813cm">
            <text:p/>
            <draw:enhanced-geometry svg:viewBox="0 0 76 17" draw:type="non-primitive" draw:enhanced-path="M 11 16  L 0 0  L 75 0  L 75 12  L 75 16  L 11 16  L 11 16  L 11 16  N"/>
          </draw:custom-shape>
          <draw:custom-shape draw:style-name="gr758" draw:text-style-name="P165" draw:layer="layout" svg:width="0.379cm" svg:height="0.075cm" svg:x="19.681cm" svg:y="15.787cm">
            <text:p/>
            <draw:enhanced-geometry svg:viewBox="0 0 86 17" draw:type="non-primitive" draw:enhanced-path="M 10 16  L 0 0  L 85 0  L 85 16  L 10 16  L 10 16  N"/>
          </draw:custom-shape>
          <draw:custom-shape draw:style-name="gr759" draw:text-style-name="P166" draw:layer="layout" svg:width="0.432cm" svg:height="0.075cm" svg:x="19.628cm" svg:y="15.76cm">
            <text:p/>
            <draw:enhanced-geometry svg:viewBox="0 0 98 17" draw:type="non-primitive" draw:enhanced-path="M 11 16  L 0 0  L 97 0  L 97 16  L 11 16  L 11 16  L 11 16  N"/>
          </draw:custom-shape>
          <draw:custom-shape draw:style-name="gr759" draw:text-style-name="P166" draw:layer="layout" svg:width="0.481cm" svg:height="0.075cm" svg:x="19.579cm" svg:y="15.743cm">
            <text:p/>
            <draw:enhanced-geometry svg:viewBox="0 0 109 17" draw:type="non-primitive" draw:enhanced-path="M 11 16  L 0 0  L 108 0  L 108 16  L 11 16  L 11 16  N"/>
          </draw:custom-shape>
          <draw:custom-shape draw:style-name="gr827" draw:text-style-name="P167" draw:layer="layout" svg:width="0.529cm" svg:height="0.075cm" svg:x="19.531cm" svg:y="15.716cm">
            <text:p/>
            <draw:enhanced-geometry svg:viewBox="0 0 120 17" draw:type="non-primitive" draw:enhanced-path="M 11 16  L 0 0  L 119 0  L 119 16  L 11 16  L 11 16  L 11 16  N"/>
          </draw:custom-shape>
          <draw:custom-shape draw:style-name="gr828" draw:text-style-name="P168" draw:layer="layout" svg:width="0.578cm" svg:height="0.075cm" svg:x="19.482cm" svg:y="15.694cm">
            <text:p/>
            <draw:enhanced-geometry svg:viewBox="0 0 131 17" draw:type="non-primitive" draw:enhanced-path="M 11 16  L 0 0  L 130 0  L 130 16  L 11 16  L 11 16  L 11 16  N"/>
          </draw:custom-shape>
          <draw:custom-shape draw:style-name="gr829" draw:text-style-name="P169" draw:layer="layout" svg:width="0.622cm" svg:height="0.075cm" svg:x="19.438cm" svg:y="15.668cm">
            <text:p/>
            <draw:enhanced-geometry svg:viewBox="0 0 141 17" draw:type="non-primitive" draw:enhanced-path="M 10 16  L 0 0  L 140 0  L 140 13  L 140 16  L 10 16  L 10 16  N"/>
          </draw:custom-shape>
          <draw:custom-shape draw:style-name="gr830" draw:text-style-name="P170" draw:layer="layout" svg:width="0.675cm" svg:height="0.075cm" svg:x="19.385cm" svg:y="15.646cm">
            <text:p/>
            <draw:enhanced-geometry svg:viewBox="0 0 153 17" draw:type="non-primitive" draw:enhanced-path="M 11 16  L 0 0  L 152 0  L 152 16  L 12 16  L 12 16  L 11 16  N"/>
          </draw:custom-shape>
          <draw:custom-shape draw:style-name="gr831" draw:text-style-name="P170" draw:layer="layout" svg:width="0.719cm" svg:height="0.075cm" svg:x="19.341cm" svg:y="15.619cm">
            <text:p/>
            <draw:enhanced-geometry svg:viewBox="0 0 163 17" draw:type="non-primitive" draw:enhanced-path="M 10 16  L 0 0  L 162 0  L 162 16  L 10 16  L 10 16  N"/>
          </draw:custom-shape>
          <draw:custom-shape draw:style-name="gr832" draw:text-style-name="P171" draw:layer="layout" svg:width="0.767cm" svg:height="0.075cm" svg:x="19.293cm" svg:y="15.597cm">
            <text:p/>
            <draw:enhanced-geometry svg:viewBox="0 0 174 17" draw:type="non-primitive" draw:enhanced-path="M 11 16  L 0 0  L 173 0  L 173 16  L 11 16  L 11 16  N"/>
          </draw:custom-shape>
          <draw:custom-shape draw:style-name="gr833" draw:text-style-name="P172" draw:layer="layout" svg:width="0.816cm" svg:height="0.075cm" svg:x="19.244cm" svg:y="15.575cm">
            <text:p/>
            <draw:enhanced-geometry svg:viewBox="0 0 185 17" draw:type="non-primitive" draw:enhanced-path="M 11 16  L 0 0  L 184 0  L 184 16  L 11 16  L 11 16  L 11 16  N"/>
          </draw:custom-shape>
          <draw:custom-shape draw:style-name="gr834" draw:text-style-name="P173" draw:layer="layout" svg:width="0.864cm" svg:height="0.075cm" svg:x="19.196cm" svg:y="15.553cm">
            <text:p/>
            <draw:enhanced-geometry svg:viewBox="0 0 196 17" draw:type="non-primitive" draw:enhanced-path="M 11 16  L 0 0  L 195 0  L 195 16  L 11 16  L 11 16  N"/>
          </draw:custom-shape>
          <draw:custom-shape draw:style-name="gr835" draw:text-style-name="P174" draw:layer="layout" svg:width="0.909cm" svg:height="0.075cm" svg:x="19.151cm" svg:y="15.531cm">
            <text:p/>
            <draw:enhanced-geometry svg:viewBox="0 0 206 17" draw:type="non-primitive" draw:enhanced-path="M 10 16  L 0 0  L 205 0  L 205 9  L 205 16  L 10 16  L 10 16  N"/>
          </draw:custom-shape>
          <draw:custom-shape draw:style-name="gr807" draw:text-style-name="P174" draw:layer="layout" svg:width="0.944cm" svg:height="0.075cm" svg:x="19.116cm" svg:y="15.505cm">
            <text:p/>
            <draw:enhanced-geometry svg:viewBox="0 0 214 17" draw:type="non-primitive" draw:enhanced-path="M 7 16  L 0 5  L 0 0  L 213 0  L 213 16  L 7 16  L 7 16  L 7 16  N"/>
          </draw:custom-shape>
          <draw:custom-shape draw:style-name="gr808" draw:text-style-name="P175" draw:layer="layout" svg:width="0.944cm" svg:height="0.075cm" svg:x="19.116cm" svg:y="15.483cm">
            <text:p/>
            <draw:enhanced-geometry svg:viewBox="0 0 214 17" draw:type="non-primitive" draw:enhanced-path="M 0 12  L 0 0  L 213 0  L 213 16  L 0 16  L 0 16  L 0 12  N"/>
          </draw:custom-shape>
          <draw:custom-shape draw:style-name="gr809" draw:text-style-name="P176" draw:layer="layout" svg:width="0.944cm" svg:height="0.075cm" svg:x="19.116cm" svg:y="15.46cm">
            <text:p/>
            <draw:enhanced-geometry svg:viewBox="0 0 214 17" draw:type="non-primitive" draw:enhanced-path="M 0 16  L 0 0  L 213 0  L 213 16  L 0 16  L 0 16  N"/>
          </draw:custom-shape>
          <draw:custom-shape draw:style-name="gr810" draw:text-style-name="P177" draw:layer="layout" svg:width="0.944cm" svg:height="0.075cm" svg:x="19.116cm" svg:y="15.434cm">
            <text:p/>
            <draw:enhanced-geometry svg:viewBox="0 0 214 17" draw:type="non-primitive" draw:enhanced-path="M 0 13  L 0 0  L 213 0  L 213 16  L 0 16  L 0 16  L 0 13  N"/>
          </draw:custom-shape>
          <draw:custom-shape draw:style-name="gr810" draw:text-style-name="P177" draw:layer="layout" svg:width="0.944cm" svg:height="0.075cm" svg:x="19.116cm" svg:y="15.412cm">
            <text:p/>
            <draw:enhanced-geometry svg:viewBox="0 0 214 17" draw:type="non-primitive" draw:enhanced-path="M 0 16  L 0 0  L 213 0  L 213 16  L 0 16  L 0 16  L 0 16  N"/>
          </draw:custom-shape>
          <draw:custom-shape draw:style-name="gr811" draw:text-style-name="P178" draw:layer="layout" svg:width="0.944cm" svg:height="0.075cm" svg:x="19.116cm" svg:y="15.39cm">
            <text:p/>
            <draw:enhanced-geometry svg:viewBox="0 0 214 17" draw:type="non-primitive" draw:enhanced-path="M 0 16  L 0 0  L 208 0  L 213 9  L 213 16  L 0 16  L 0 16  N"/>
          </draw:custom-shape>
          <draw:custom-shape draw:style-name="gr836" draw:text-style-name="P179" draw:layer="layout" svg:width="0.922cm" svg:height="0.075cm" svg:x="19.116cm" svg:y="15.363cm">
            <text:p/>
            <draw:enhanced-geometry svg:viewBox="0 0 209 17" draw:type="non-primitive" draw:enhanced-path="M 0 16  L 0 0  L 199 0  L 208 16  L 0 16  L 0 16  N"/>
          </draw:custom-shape>
          <draw:custom-shape draw:style-name="gr837" draw:text-style-name="P179" draw:layer="layout" svg:width="0.882cm" svg:height="0.075cm" svg:x="19.116cm" svg:y="15.341cm">
            <text:p/>
            <draw:enhanced-geometry svg:viewBox="0 0 200 17" draw:type="non-primitive" draw:enhanced-path="M 0 16  L 0 0  L 191 0  L 199 16  L 0 16  L 0 16  L 0 16  N"/>
          </draw:custom-shape>
          <draw:custom-shape draw:style-name="gr838" draw:text-style-name="P180" draw:layer="layout" svg:width="0.847cm" svg:height="0.075cm" svg:x="19.116cm" svg:y="15.315cm">
            <text:p/>
            <draw:enhanced-geometry svg:viewBox="0 0 192 17" draw:type="non-primitive" draw:enhanced-path="M 0 16  L 0 13  L 0 0  L 182 0  L 191 16  L 0 16  L 0 16  N"/>
          </draw:custom-shape>
          <draw:custom-shape draw:style-name="gr839" draw:text-style-name="P181" draw:layer="layout" svg:width="0.812cm" svg:height="0.075cm" svg:x="19.116cm" svg:y="15.293cm">
            <text:p/>
            <draw:enhanced-geometry svg:viewBox="0 0 184 17" draw:type="non-primitive" draw:enhanced-path="M 0 16  L 0 0  L 174 0  L 183 16  L 0 16  L 0 16  N"/>
          </draw:custom-shape>
          <draw:custom-shape draw:style-name="gr840" draw:text-style-name="P182" draw:layer="layout" svg:width="0.772cm" svg:height="0.075cm" svg:x="19.116cm" svg:y="15.271cm">
            <text:p/>
            <draw:enhanced-geometry svg:viewBox="0 0 175 17" draw:type="non-primitive" draw:enhanced-path="M 0 16  L 0 0  L 166 0  L 174 16  L 0 16  L 0 16  L 0 16  N"/>
          </draw:custom-shape>
          <draw:custom-shape draw:style-name="gr841" draw:text-style-name="P183" draw:layer="layout" svg:width="0.737cm" svg:height="0.075cm" svg:x="19.116cm" svg:y="15.244cm">
            <text:p/>
            <draw:enhanced-geometry svg:viewBox="0 0 167 17" draw:type="non-primitive" draw:enhanced-path="M 0 16  L 0 0  L 157 0  L 166 16  L 0 16  L 0 16  N"/>
          </draw:custom-shape>
          <draw:custom-shape draw:style-name="gr842" draw:text-style-name="P183" draw:layer="layout" svg:width="0.701cm" svg:height="0.075cm" svg:x="19.116cm" svg:y="15.222cm">
            <text:p/>
            <draw:enhanced-geometry svg:viewBox="0 0 159 17" draw:type="non-primitive" draw:enhanced-path="M 0 16  L 0 0  L 149 0  L 158 16  L 0 16  L 0 16  N"/>
          </draw:custom-shape>
          <draw:custom-shape draw:style-name="gr843" draw:text-style-name="P184" draw:layer="layout" svg:width="0.662cm" svg:height="0.075cm" svg:x="19.116cm" svg:y="15.2cm">
            <text:p/>
            <draw:enhanced-geometry svg:viewBox="0 0 150 17" draw:type="non-primitive" draw:enhanced-path="M 0 16  L 0 0  L 141 0  L 149 16  L 0 16  L 0 16  L 0 16  N"/>
          </draw:custom-shape>
          <draw:custom-shape draw:style-name="gr844" draw:text-style-name="P185" draw:layer="layout" svg:width="0.626cm" svg:height="0.075cm" svg:x="19.116cm" svg:y="15.174cm">
            <text:p/>
            <draw:enhanced-geometry svg:viewBox="0 0 142 17" draw:type="non-primitive" draw:enhanced-path="M 0 16  L 0 0  L 132 0  L 141 16  L 0 16  L 0 16  L 0 16  N"/>
          </draw:custom-shape>
          <draw:custom-shape draw:style-name="gr845" draw:text-style-name="P186" draw:layer="layout" svg:width="0.591cm" svg:height="0.075cm" svg:x="19.116cm" svg:y="15.152cm">
            <text:p/>
            <draw:enhanced-geometry svg:viewBox="0 0 134 17" draw:type="non-primitive" draw:enhanced-path="M 0 16  L 0 3  L 0 0  L 124 0  L 133 16  L 0 16  L 0 16  N"/>
          </draw:custom-shape>
          <draw:custom-shape draw:style-name="gr846" draw:text-style-name="P186" draw:layer="layout" svg:width="0.551cm" svg:height="0.075cm" svg:x="19.116cm" svg:y="15.13cm">
            <text:p/>
            <draw:enhanced-geometry svg:viewBox="0 0 125 17" draw:type="non-primitive" draw:enhanced-path="M 0 16  L 0 0  L 116 0  L 124 16  L 0 16  L 0 16  L 0 16  N"/>
          </draw:custom-shape>
          <draw:custom-shape draw:style-name="gr847" draw:text-style-name="P187" draw:layer="layout" svg:width="0.516cm" svg:height="0.075cm" svg:x="19.116cm" svg:y="15.108cm">
            <text:p/>
            <draw:enhanced-geometry svg:viewBox="0 0 117 17" draw:type="non-primitive" draw:enhanced-path="M 0 16  L 0 0  L 108 0  L 116 16  L 0 16  L 0 16  L 0 16  N"/>
          </draw:custom-shape>
          <draw:custom-shape draw:style-name="gr848" draw:text-style-name="P188" draw:layer="layout" svg:width="0.481cm" svg:height="0.075cm" svg:x="19.116cm" svg:y="15.081cm">
            <text:p/>
            <draw:enhanced-geometry svg:viewBox="0 0 109 17" draw:type="non-primitive" draw:enhanced-path="M 0 16  L 0 0  L 99 0  L 108 16  L 0 16  L 0 16  N"/>
          </draw:custom-shape>
          <draw:custom-shape draw:style-name="gr124" draw:text-style-name="P33" draw:layer="layout" svg:width="0.441cm" svg:height="0.075cm" svg:x="19.116cm" svg:y="15.059cm">
            <text:p/>
            <draw:enhanced-geometry svg:viewBox="0 0 100 17" draw:type="non-primitive" draw:enhanced-path="M 0 16  L 0 0  L 91 0  L 99 16  L 0 16  L 0 16  N"/>
          </draw:custom-shape>
          <draw:custom-shape draw:style-name="gr789" draw:text-style-name="P189" draw:layer="layout" svg:width="0.406cm" svg:height="0.075cm" svg:x="19.116cm" svg:y="15.033cm">
            <text:p/>
            <draw:enhanced-geometry svg:viewBox="0 0 92 17" draw:type="non-primitive" draw:enhanced-path="M 0 13  L 0 0  L 83 0  L 91 16  L 0 16  L 0 16  L 0 13  N"/>
          </draw:custom-shape>
          <draw:custom-shape draw:style-name="gr789" draw:text-style-name="P189" draw:layer="layout" svg:width="0.371cm" svg:height="0.075cm" svg:x="19.116cm" svg:y="15.011cm">
            <text:p/>
            <draw:enhanced-geometry svg:viewBox="0 0 84 17" draw:type="non-primitive" draw:enhanced-path="M 0 16  L 0 0  L 74 0  L 83 16  L 0 16  L 0 16  N"/>
          </draw:custom-shape>
          <draw:custom-shape draw:style-name="gr790" draw:text-style-name="P190" draw:layer="layout" svg:width="0.331cm" svg:height="0.075cm" svg:x="19.116cm" svg:y="14.989cm">
            <text:p/>
            <draw:enhanced-geometry svg:viewBox="0 0 75 17" draw:type="non-primitive" draw:enhanced-path="M 0 16  L 0 0  L 66 0  L 74 16  L 0 16  L 0 16  N"/>
          </draw:custom-shape>
          <draw:custom-shape draw:style-name="gr791" draw:text-style-name="P191" draw:layer="layout" svg:width="0.296cm" svg:height="0.075cm" svg:x="19.116cm" svg:y="14.962cm">
            <text:p/>
            <draw:enhanced-geometry svg:viewBox="0 0 67 17" draw:type="non-primitive" draw:enhanced-path="M 0 16  L 0 10  L 0 0  L 58 0  L 66 16  L 0 16  L 0 16  L 0 16  N"/>
          </draw:custom-shape>
          <draw:custom-shape draw:style-name="gr792" draw:text-style-name="P192" draw:layer="layout" svg:width="0.26cm" svg:height="0.075cm" svg:x="19.116cm" svg:y="14.94cm">
            <text:p/>
            <draw:enhanced-geometry svg:viewBox="0 0 59 17" draw:type="non-primitive" draw:enhanced-path="M 0 16  L 0 0  L 49 0  L 58 16  L 0 16  L 0 16  L 0 16  N"/>
          </draw:custom-shape>
          <draw:custom-shape draw:style-name="gr793" draw:text-style-name="P193" draw:layer="layout" svg:width="0.221cm" svg:height="0.146cm" svg:x="19.116cm" svg:y="14.799cm">
            <text:p/>
            <draw:enhanced-geometry svg:viewBox="0 0 50 33" draw:type="non-primitive" draw:enhanced-path="M 0 32  L 0 0  L 49 32  L 0 32  L 0 32  N"/>
          </draw:custom-shape>
          <draw:custom-shape draw:style-name="gr849" draw:text-style-name="P164" draw:layer="layout" svg:width="0.966cm" svg:height="0.34cm" svg:x="19.116cm" svg:y="16.135cm">
            <text:p/>
            <draw:enhanced-geometry svg:viewBox="0 0 219 77" draw:type="non-primitive" draw:enhanced-path="M 4 0  L 218 76  L 216 76  L 215 76  L 215 76  L 214 76  L 213 76  L 0 0  L 0 0  L 1 0  L 2 0  L 2 0  L 4 0  L 4 0  N"/>
          </draw:custom-shape>
          <draw:custom-shape draw:style-name="gr850" draw:text-style-name="P164" draw:layer="layout" svg:width="0.953cm" svg:height="0.075cm" svg:x="19.151cm" svg:y="17.533cm">
            <text:p/>
            <draw:enhanced-geometry svg:viewBox="0 0 216 17" draw:type="non-primitive" draw:enhanced-path="M 2 0  L 215 16  L 213 16  L 0 0  L 2 0  L 2 0  L 2 0  N"/>
          </draw:custom-shape>
          <draw:custom-shape draw:style-name="gr851" draw:text-style-name="P164" draw:layer="layout" svg:width="1.01cm" svg:height="0.189cm" svg:x="19.116cm" svg:y="16.969cm">
            <text:p/>
            <draw:enhanced-geometry svg:viewBox="0 0 229 43" draw:type="non-primitive" draw:enhanced-path="M 0 0  L 213 38  L 215 39  L 218 40  L 220 40  L 223 41  L 225 42  L 228 42  L 17 5  L 14 4  L 11 3  L 8 2  L 5 2  L 2 0  L 0 0  L 0 0  N"/>
          </draw:custom-shape>
          <draw:custom-shape draw:style-name="gr852" draw:text-style-name="P164" draw:layer="layout" svg:width="0.957cm" svg:height="0.075cm" svg:x="19.173cm" svg:y="17.537cm">
            <text:p/>
            <draw:enhanced-geometry svg:viewBox="0 0 217 17" draw:type="non-primitive" draw:enhanced-path="M 7 0  L 216 16  L 214 16  L 213 16  L 210 16  L 0 0  L 1 0  L 4 0  L 7 1  L 7 1  L 7 0  N"/>
          </draw:custom-shape>
          <draw:custom-shape draw:style-name="gr853" draw:text-style-name="P164" draw:layer="layout" svg:width="1.04cm" svg:height="0.075cm" svg:x="19.218cm" svg:y="17.537cm">
            <text:p/>
            <draw:enhanced-geometry svg:viewBox="0 0 236 17" draw:type="non-primitive" draw:enhanced-path="M 31 0  L 235 16  L 233 16  L 232 16  L 230 16  L 230 16  L 228 16  L 227 16  L 225 16  L 224 16  L 221 16  L 219 16  L 217 16  L 215 16  L 213 16  L 211 16  L 209 16  L 0 1  L 2 1  L 5 1  L 8 1  L 10 1  L 12 1  L 15 1  L 18 1  L 19 1  L 22 1  L 23 1  L 25 1  L 26 1  L 29 1  L 30 1  L 31 0  L 31 0  N"/>
          </draw:custom-shape>
          <draw:custom-shape draw:style-name="gr854" draw:text-style-name="P174" draw:layer="layout" svg:width="1.107cm" svg:height="0.379cm" svg:x="19.151cm" svg:y="16.144cm">
            <text:p/>
            <draw:enhanced-geometry svg:viewBox="0 0 251 86" draw:type="non-primitive" draw:enhanced-path="M 46 11  L 250 85  L 247 84  L 245 83  L 243 83  L 241 82  L 238 81  L 236 81  L 234 81  L 231 80  L 229 79  L 226 79  L 224 79  L 221 78  L 219 78  L 217 77  L 214 76  L 212 76  L 0 0  L 2 1  L 6 1  L 8 2  L 11 3  L 15 3  L 18 3  L 21 4  L 24 5  L 27 5  L 30 7  L 33 7  L 36 8  L 39 9  L 41 10  L 44 10  L 46 11  L 46 11  L 46 11  N"/>
          </draw:custom-shape>
          <draw:custom-shape draw:style-name="gr855" draw:text-style-name="P174" draw:layer="layout" svg:width="1.142cm" svg:height="0.653cm" svg:x="19.116cm" svg:y="14.755cm">
            <text:p/>
            <draw:enhanced-geometry svg:viewBox="0 0 259 148" draw:type="non-primitive" draw:enhanced-path="M 54 0  L 258 139  L 257 139  L 255 139  L 253 139  L 252 139  L 251 139  L 249 139  L 248 140  L 246 140  L 245 140  L 244 140  L 241 141  L 240 141  L 239 141  L 237 141  L 236 141  L 234 142  L 233 142  L 231 142  L 230 143  L 229 143  L 227 144  L 226 144  L 225 144  L 223 144  L 222 145  L 220 145  L 220 146  L 218 146  L 217 146  L 216 146  L 215 147  L 213 147  L 0 10  L 1 10  L 2 9  L 4 9  L 5 9  L 7 8  L 9 7  L 10 7  L 12 7  L 14 7  L 15 6  L 16 5  L 18 5  L 20 4  L 21 4  L 23 4  L 25 3  L 27 3  L 29 3  L 31 2  L 33 2  L 35 2  L 37 2  L 38 2  L 40 1  L 42 1  L 44 0  L 46 0  L 48 0  L 49 0  L 52 0  L 53 0  L 54 0  L 54 0  N"/>
          </draw:custom-shape>
          <draw:custom-shape draw:style-name="gr856" draw:text-style-name="P36" draw:layer="layout" svg:width="0.86cm" svg:height="1.111cm" svg:x="19.553cm" svg:y="13.829cm">
            <text:p/>
            <draw:enhanced-geometry svg:viewBox="0 0 195 252" draw:type="non-primitive" draw:enhanced-path="M 0 0  L 194 181  L 194 199  L 194 217  L 194 233  L 194 251  L 0 87  L 0 66  L 0 44  L 0 22  L 0 0  L 0 0  L 0 0  N"/>
          </draw:custom-shape>
          <draw:custom-shape draw:style-name="gr757" draw:text-style-name="P36" draw:layer="layout" svg:width="0.287cm" svg:height="0.15cm" svg:x="20.126cm" svg:y="15.888cm">
            <text:p/>
            <draw:enhanced-geometry svg:viewBox="0 0 65 34" draw:type="non-primitive" draw:enhanced-path="M 0 0  L 64 33  L 64 0  L 0 0  L 0 0  L 0 0  N"/>
          </draw:custom-shape>
          <draw:custom-shape draw:style-name="gr757" draw:text-style-name="P36" draw:layer="layout" svg:width="0.336cm" svg:height="0.075cm" svg:x="20.077cm" svg:y="15.862cm">
            <text:p/>
            <draw:enhanced-geometry svg:viewBox="0 0 76 17" draw:type="non-primitive" draw:enhanced-path="M 11 16  L 0 0  L 75 0  L 75 8  L 75 16  L 11 16  L 11 16  L 11 16  N"/>
          </draw:custom-shape>
          <draw:custom-shape draw:style-name="gr758" draw:text-style-name="P165" draw:layer="layout" svg:width="0.38cm" svg:height="0.075cm" svg:x="20.033cm" svg:y="15.84cm">
            <text:p/>
            <draw:enhanced-geometry svg:viewBox="0 0 86 17" draw:type="non-primitive" draw:enhanced-path="M 10 16  L 0 0  L 85 0  L 85 16  L 10 16  L 10 16  L 10 16  N"/>
          </draw:custom-shape>
          <draw:custom-shape draw:style-name="gr759" draw:text-style-name="P166" draw:layer="layout" svg:width="0.424cm" svg:height="0.075cm" svg:x="19.989cm" svg:y="15.813cm">
            <text:p/>
            <draw:enhanced-geometry svg:viewBox="0 0 96 17" draw:type="non-primitive" draw:enhanced-path="M 10 13  L 0 0  L 95 0  L 95 16  L 10 16  L 10 16  L 10 13  N"/>
          </draw:custom-shape>
          <draw:custom-shape draw:style-name="gr759" draw:text-style-name="P166" draw:layer="layout" svg:width="0.477cm" svg:height="0.075cm" svg:x="19.936cm" svg:y="15.791cm">
            <text:p/>
            <draw:enhanced-geometry svg:viewBox="0 0 108 17" draw:type="non-primitive" draw:enhanced-path="M 10 16  L 0 0  L 107 0  L 107 16  L 11 16  L 11 16  L 10 16  N"/>
          </draw:custom-shape>
          <draw:custom-shape draw:style-name="gr857" draw:text-style-name="P167" draw:layer="layout" svg:width="0.525cm" svg:height="0.075cm" svg:x="19.888cm" svg:y="15.765cm">
            <text:p/>
            <draw:enhanced-geometry svg:viewBox="0 0 119 17" draw:type="non-primitive" draw:enhanced-path="M 11 16  L 0 0  L 118 0  L 118 16  L 11 16  L 11 16  N"/>
          </draw:custom-shape>
          <draw:custom-shape draw:style-name="gr858" draw:text-style-name="P168" draw:layer="layout" svg:width="0.569cm" svg:height="0.075cm" svg:x="19.844cm" svg:y="15.743cm">
            <text:p/>
            <draw:enhanced-geometry svg:viewBox="0 0 129 17" draw:type="non-primitive" draw:enhanced-path="M 10 16  L 0 0  L 128 0  L 128 16  L 10 16  L 10 16  N"/>
          </draw:custom-shape>
          <draw:custom-shape draw:style-name="gr859" draw:text-style-name="P169" draw:layer="layout" svg:width="0.618cm" svg:height="0.075cm" svg:x="19.795cm" svg:y="15.716cm">
            <text:p/>
            <draw:enhanced-geometry svg:viewBox="0 0 140 17" draw:type="non-primitive" draw:enhanced-path="M 11 16  L 0 0  L 139 0  L 139 2  L 139 16  L 11 16  L 11 16  N"/>
          </draw:custom-shape>
          <draw:custom-shape draw:style-name="gr860" draw:text-style-name="P170" draw:layer="layout" svg:width="0.666cm" svg:height="0.075cm" svg:x="19.747cm" svg:y="15.69cm">
            <text:p/>
            <draw:enhanced-geometry svg:viewBox="0 0 151 17" draw:type="non-primitive" draw:enhanced-path="M 11 16  L 0 0  L 150 0  L 150 16  L 11 16  L 11 16  L 11 16  N"/>
          </draw:custom-shape>
          <draw:custom-shape draw:style-name="gr861" draw:text-style-name="P170" draw:layer="layout" svg:width="0.71cm" svg:height="0.075cm" svg:x="19.703cm" svg:y="15.668cm">
            <text:p/>
            <draw:enhanced-geometry svg:viewBox="0 0 161 17" draw:type="non-primitive" draw:enhanced-path="M 10 16  L 0 0  L 160 0  L 160 16  L 10 16  L 10 16  N"/>
          </draw:custom-shape>
          <draw:custom-shape draw:style-name="gr862" draw:text-style-name="P171" draw:layer="layout" svg:width="0.754cm" svg:height="0.075cm" svg:x="19.659cm" svg:y="15.641cm">
            <text:p/>
            <draw:enhanced-geometry svg:viewBox="0 0 171 17" draw:type="non-primitive" draw:enhanced-path="M 9 16  L 0 0  L 170 0  L 170 16  L 9 16  L 9 16  N"/>
          </draw:custom-shape>
          <draw:custom-shape draw:style-name="gr863" draw:text-style-name="P172" draw:layer="layout" svg:width="0.807cm" svg:height="0.075cm" svg:x="19.606cm" svg:y="15.615cm">
            <text:p/>
            <draw:enhanced-geometry svg:viewBox="0 0 183 17" draw:type="non-primitive" draw:enhanced-path="M 11 16  L 0 0  L 182 0  L 182 16  L 11 16  L 11 16  L 11 16  N"/>
          </draw:custom-shape>
          <draw:custom-shape draw:style-name="gr864" draw:text-style-name="P173" draw:layer="layout" svg:width="0.856cm" svg:height="0.075cm" svg:x="19.557cm" svg:y="15.593cm">
            <text:p/>
            <draw:enhanced-geometry svg:viewBox="0 0 194 17" draw:type="non-primitive" draw:enhanced-path="M 11 16  L 0 0  L 193 0  L 193 16  L 11 16  L 11 16  N"/>
          </draw:custom-shape>
          <draw:custom-shape draw:style-name="gr865" draw:text-style-name="P174" draw:layer="layout" svg:width="0.86cm" svg:height="0.075cm" svg:x="19.553cm" svg:y="15.566cm">
            <text:p/>
            <draw:enhanced-geometry svg:viewBox="0 0 195 17" draw:type="non-primitive" draw:enhanced-path="M 1 16  L 0 13  L 0 0  L 194 0  L 194 16  L 1 16  L 1 16  L 1 16  N"/>
          </draw:custom-shape>
          <draw:custom-shape draw:style-name="gr865" draw:text-style-name="P174" draw:layer="layout" svg:width="0.86cm" svg:height="0.075cm" svg:x="19.553cm" svg:y="15.544cm">
            <text:p/>
            <draw:enhanced-geometry svg:viewBox="0 0 195 17" draw:type="non-primitive" draw:enhanced-path="M 0 16  L 0 0  L 194 0  L 194 16  L 194 16  L 0 16  L 0 16  L 0 16  N"/>
          </draw:custom-shape>
          <draw:custom-shape draw:style-name="gr770" draw:text-style-name="P175" draw:layer="layout" svg:width="0.86cm" svg:height="0.075cm" svg:x="19.553cm" svg:y="15.518cm">
            <text:p/>
            <draw:enhanced-geometry svg:viewBox="0 0 195 17" draw:type="non-primitive" draw:enhanced-path="M 0 16  L 0 0  L 194 0  L 194 16  L 0 16  L 0 16  N"/>
          </draw:custom-shape>
          <draw:custom-shape draw:style-name="gr866" draw:text-style-name="P176" draw:layer="layout" svg:width="0.86cm" svg:height="0.075cm" svg:x="19.553cm" svg:y="15.491cm">
            <text:p/>
            <draw:enhanced-geometry svg:viewBox="0 0 195 17" draw:type="non-primitive" draw:enhanced-path="M 0 16  L 0 0  L 194 0  L 194 16  L 0 16  L 0 16  L 0 16  N"/>
          </draw:custom-shape>
          <draw:custom-shape draw:style-name="gr867" draw:text-style-name="P177" draw:layer="layout" svg:width="0.86cm" svg:height="0.075cm" svg:x="19.553cm" svg:y="15.469cm">
            <text:p/>
            <draw:enhanced-geometry svg:viewBox="0 0 195 17" draw:type="non-primitive" draw:enhanced-path="M 0 16  L 0 0  L 194 0  L 194 16  L 0 16  L 0 16  N"/>
          </draw:custom-shape>
          <draw:custom-shape draw:style-name="gr867" draw:text-style-name="P177" draw:layer="layout" svg:width="0.86cm" svg:height="0.075cm" svg:x="19.553cm" svg:y="15.443cm">
            <text:p/>
            <draw:enhanced-geometry svg:viewBox="0 0 195 17" draw:type="non-primitive" draw:enhanced-path="M 0 16  L 0 0  L 194 0  L 194 16  L 0 16  L 0 16  N"/>
          </draw:custom-shape>
          <draw:custom-shape draw:style-name="gr868" draw:text-style-name="P178" draw:layer="layout" svg:width="0.86cm" svg:height="0.075cm" svg:x="19.553cm" svg:y="15.421cm">
            <text:p/>
            <draw:enhanced-geometry svg:viewBox="0 0 195 17" draw:type="non-primitive" draw:enhanced-path="M 0 16  L 0 0  L 194 0  L 194 16  L 0 16  L 0 16  L 0 16  N"/>
          </draw:custom-shape>
          <draw:custom-shape draw:style-name="gr869" draw:text-style-name="P179" draw:layer="layout" svg:width="0.86cm" svg:height="0.075cm" svg:x="19.553cm" svg:y="15.399cm">
            <text:p/>
            <draw:enhanced-geometry svg:viewBox="0 0 195 17" draw:type="non-primitive" draw:enhanced-path="M 0 16  L 0 0  L 189 0  L 194 6  L 194 16  L 0 16  L 0 16  N"/>
          </draw:custom-shape>
          <draw:custom-shape draw:style-name="gr870" draw:text-style-name="P179" draw:layer="layout" svg:width="0.838cm" svg:height="0.075cm" svg:x="19.553cm" svg:y="15.368cm">
            <text:p/>
            <draw:enhanced-geometry svg:viewBox="0 0 190 17" draw:type="non-primitive" draw:enhanced-path="M 0 16  L 0 13  L 0 0  L 182 0  L 189 16  L 0 16  L 0 16  L 0 16  N"/>
          </draw:custom-shape>
          <draw:custom-shape draw:style-name="gr871" draw:text-style-name="P180" draw:layer="layout" svg:width="0.807cm" svg:height="0.075cm" svg:x="19.553cm" svg:y="15.346cm">
            <text:p/>
            <draw:enhanced-geometry svg:viewBox="0 0 183 17" draw:type="non-primitive" draw:enhanced-path="M 0 16  L 0 0  L 173 0  L 182 16  L 0 16  L 0 16  N"/>
          </draw:custom-shape>
          <draw:custom-shape draw:style-name="gr872" draw:text-style-name="P181" draw:layer="layout" svg:width="0.771cm" svg:height="0.075cm" svg:x="19.553cm" svg:y="15.324cm">
            <text:p/>
            <draw:enhanced-geometry svg:viewBox="0 0 175 17" draw:type="non-primitive" draw:enhanced-path="M 0 16  L 0 0  L 166 0  L 174 16  L 0 16  L 0 16  N"/>
          </draw:custom-shape>
          <draw:custom-shape draw:style-name="gr873" draw:text-style-name="P182" draw:layer="layout" svg:width="0.736cm" svg:height="0.075cm" svg:x="19.553cm" svg:y="15.297cm">
            <text:p/>
            <draw:enhanced-geometry svg:viewBox="0 0 167 17" draw:type="non-primitive" draw:enhanced-path="M 0 16  L 0 0  L 158 0  L 166 16  L 0 16  L 0 16  N"/>
          </draw:custom-shape>
          <draw:custom-shape draw:style-name="gr874" draw:text-style-name="P183" draw:layer="layout" svg:width="0.705cm" svg:height="0.075cm" svg:x="19.553cm" svg:y="15.275cm">
            <text:p/>
            <draw:enhanced-geometry svg:viewBox="0 0 160 17" draw:type="non-primitive" draw:enhanced-path="M 0 16  L 0 0  L 150 0  L 159 16  L 0 16  L 0 16  N"/>
          </draw:custom-shape>
          <draw:custom-shape draw:style-name="gr875" draw:text-style-name="P183" draw:layer="layout" svg:width="0.666cm" svg:height="0.075cm" svg:x="19.553cm" svg:y="15.249cm">
            <text:p/>
            <draw:enhanced-geometry svg:viewBox="0 0 151 17" draw:type="non-primitive" draw:enhanced-path="M 0 16  L 0 0  L 142 0  L 150 16  L 0 16  L 0 16  L 0 16  N"/>
          </draw:custom-shape>
          <draw:custom-shape draw:style-name="gr876" draw:text-style-name="P184" draw:layer="layout" svg:width="0.63cm" svg:height="0.075cm" svg:x="19.553cm" svg:y="15.222cm">
            <text:p/>
            <draw:enhanced-geometry svg:viewBox="0 0 143 17" draw:type="non-primitive" draw:enhanced-path="M 0 16  L 0 0  L 134 0  L 142 16  L 0 16  L 0 16  L 0 16  N"/>
          </draw:custom-shape>
          <draw:custom-shape draw:style-name="gr877" draw:text-style-name="P185" draw:layer="layout" svg:width="0.595cm" svg:height="0.075cm" svg:x="19.553cm" svg:y="15.2cm">
            <text:p/>
            <draw:enhanced-geometry svg:viewBox="0 0 135 17" draw:type="non-primitive" draw:enhanced-path="M 0 16  L 0 0  L 126 0  L 134 16  L 0 16  L 0 16  N"/>
          </draw:custom-shape>
          <draw:custom-shape draw:style-name="gr878" draw:text-style-name="P186" draw:layer="layout" svg:width="0.56cm" svg:height="0.075cm" svg:x="19.553cm" svg:y="15.174cm">
            <text:p/>
            <draw:enhanced-geometry svg:viewBox="0 0 127 17" draw:type="non-primitive" draw:enhanced-path="M 0 16  L 0 16  L 0 0  L 118 0  L 126 16  L 0 16  L 0 16  L 0 16  N"/>
          </draw:custom-shape>
          <draw:custom-shape draw:style-name="gr879" draw:text-style-name="P186" draw:layer="layout" svg:width="0.529cm" svg:height="0.075cm" svg:x="19.553cm" svg:y="15.147cm">
            <text:p/>
            <draw:enhanced-geometry svg:viewBox="0 0 120 17" draw:type="non-primitive" draw:enhanced-path="M 0 16  L 0 0  L 110 0  L 119 16  L 0 16  L 0 16  N"/>
          </draw:custom-shape>
          <draw:custom-shape draw:style-name="gr880" draw:text-style-name="P187" draw:layer="layout" svg:width="0.489cm" svg:height="0.075cm" svg:x="19.553cm" svg:y="15.125cm">
            <text:p/>
            <draw:enhanced-geometry svg:viewBox="0 0 111 17" draw:type="non-primitive" draw:enhanced-path="M 0 16  L 0 0  L 102 0  L 110 16  L 0 16  L 0 16  L 0 16  N"/>
          </draw:custom-shape>
          <draw:custom-shape draw:style-name="gr848" draw:text-style-name="P188" draw:layer="layout" svg:width="0.454cm" svg:height="0.075cm" svg:x="19.553cm" svg:y="15.099cm">
            <text:p/>
            <draw:enhanced-geometry svg:viewBox="0 0 103 17" draw:type="non-primitive" draw:enhanced-path="M 0 16  L 0 0  L 95 0  L 102 16  L 0 16  L 0 16  N"/>
          </draw:custom-shape>
          <draw:custom-shape draw:style-name="gr124" draw:text-style-name="P33" draw:layer="layout" svg:width="0.423cm" svg:height="0.075cm" svg:x="19.553cm" svg:y="15.077cm">
            <text:p/>
            <draw:enhanced-geometry svg:viewBox="0 0 96 17" draw:type="non-primitive" draw:enhanced-path="M 0 16  L 0 0  L 87 0  L 95 16  L 0 16  L 0 16  N"/>
          </draw:custom-shape>
          <draw:custom-shape draw:style-name="gr789" draw:text-style-name="P189" draw:layer="layout" svg:width="0.388cm" svg:height="0.075cm" svg:x="19.553cm" svg:y="15.05cm">
            <text:p/>
            <draw:enhanced-geometry svg:viewBox="0 0 88 17" draw:type="non-primitive" draw:enhanced-path="M 0 16  L 0 0  L 78 0  L 87 16  L 0 16  L 0 16  N"/>
          </draw:custom-shape>
          <draw:custom-shape draw:style-name="gr789" draw:text-style-name="P189" draw:layer="layout" svg:width="0.352cm" svg:height="0.075cm" svg:x="19.553cm" svg:y="15.024cm">
            <text:p/>
            <draw:enhanced-geometry svg:viewBox="0 0 80 17" draw:type="non-primitive" draw:enhanced-path="M 0 16  L 0 0  L 71 0  L 79 16  L 0 16  L 0 16  N"/>
          </draw:custom-shape>
          <draw:custom-shape draw:style-name="gr790" draw:text-style-name="P190" draw:layer="layout" svg:width="0.317cm" svg:height="0.075cm" svg:x="19.553cm" svg:y="15.002cm">
            <text:p/>
            <draw:enhanced-geometry svg:viewBox="0 0 72 17" draw:type="non-primitive" draw:enhanced-path="M 0 16  L 0 0  L 63 0  L 71 16  L 0 16  L 0 16  L 0 16  N"/>
          </draw:custom-shape>
          <draw:custom-shape draw:style-name="gr791" draw:text-style-name="P191" draw:layer="layout" svg:width="0.286cm" svg:height="0.075cm" svg:x="19.553cm" svg:y="14.98cm">
            <text:p/>
            <draw:enhanced-geometry svg:viewBox="0 0 65 17" draw:type="non-primitive" draw:enhanced-path="M 0 16  L 0 16  L 0 0  L 55 0  L 64 16  L 0 16  L 0 16  N"/>
          </draw:custom-shape>
          <draw:custom-shape draw:style-name="gr792" draw:text-style-name="P192" draw:layer="layout" svg:width="0.247cm" svg:height="0.075cm" svg:x="19.553cm" svg:y="14.949cm">
            <text:p/>
            <draw:enhanced-geometry svg:viewBox="0 0 56 17" draw:type="non-primitive" draw:enhanced-path="M 0 16  L 0 0  L 47 0  L 55 16  L 0 16  L 0 16  N"/>
          </draw:custom-shape>
          <draw:custom-shape draw:style-name="gr793" draw:text-style-name="P193" draw:layer="layout" svg:width="0.211cm" svg:height="0.15cm" svg:x="19.553cm" svg:y="14.803cm">
            <text:p/>
            <draw:enhanced-geometry svg:viewBox="0 0 48 34" draw:type="non-primitive" draw:enhanced-path="M 0 33  L 0 0  L 47 33  L 0 33  L 0 33  N"/>
          </draw:custom-shape>
          <draw:custom-shape draw:style-name="gr881" draw:text-style-name="P36" draw:layer="layout" svg:width="0.86cm" svg:height="0.291cm" svg:x="19.553cm" svg:y="17.515cm">
            <text:p/>
            <draw:enhanced-geometry svg:viewBox="0 0 195 66" draw:type="non-primitive" draw:enhanced-path="M 0 0  L 194 13  L 194 26  L 194 39  L 194 52  L 194 65  L 0 64  L 0 48  L 0 32  L 0 16  L 0 0  L 0 0  L 0 0  N"/>
          </draw:custom-shape>
          <draw:custom-shape draw:style-name="gr882" draw:text-style-name="P36" draw:layer="layout" svg:width="0.512cm" svg:height="0.105cm" svg:x="19.901cm" svg:y="17.022cm">
            <text:p/>
            <draw:enhanced-geometry svg:viewBox="0 0 116 24" draw:type="non-primitive" draw:enhanced-path="M 0 0  L 115 23  L 115 0  L 0 0  L 0 0  N"/>
          </draw:custom-shape>
          <draw:custom-shape draw:style-name="gr883" draw:text-style-name="P36" draw:layer="layout" svg:width="0.6cm" svg:height="0.075cm" svg:x="19.813cm" svg:y="17.008cm">
            <text:p/>
            <draw:enhanced-geometry svg:viewBox="0 0 136 17" draw:type="non-primitive" draw:enhanced-path="M 19 16  L 0 0  L 135 0  L 135 16  L 19 16  L 19 16  N"/>
          </draw:custom-shape>
          <draw:custom-shape draw:style-name="gr884" draw:text-style-name="P165" draw:layer="layout" svg:width="0.684cm" svg:height="0.075cm" svg:x="19.729cm" svg:y="16.991cm">
            <text:p/>
            <draw:enhanced-geometry svg:viewBox="0 0 155 17" draw:type="non-primitive" draw:enhanced-path="M 19 16  L 0 0  L 154 0  L 154 16  L 19 16  L 19 16  L 19 16  N"/>
          </draw:custom-shape>
          <draw:custom-shape draw:style-name="gr885" draw:text-style-name="P166" draw:layer="layout" svg:width="0.768cm" svg:height="0.075cm" svg:x="19.645cm" svg:y="16.969cm">
            <text:p/>
            <draw:enhanced-geometry svg:viewBox="0 0 174 17" draw:type="non-primitive" draw:enhanced-path="M 19 16  L 0 0  L 173 0  L 173 16  L 173 16  L 19 16  L 19 16  L 19 16  N"/>
          </draw:custom-shape>
          <draw:custom-shape draw:style-name="gr886" draw:text-style-name="P166" draw:layer="layout" svg:width="0.851cm" svg:height="0.075cm" svg:x="19.562cm" svg:y="16.955cm">
            <text:p/>
            <draw:enhanced-geometry svg:viewBox="0 0 193 17" draw:type="non-primitive" draw:enhanced-path="M 19 16  L 0 0  L 192 0  L 192 16  L 19 16  L 19 16  N"/>
          </draw:custom-shape>
          <draw:custom-shape draw:style-name="gr887" draw:text-style-name="P167" draw:layer="layout" svg:width="0.86cm" svg:height="0.075cm" svg:x="19.553cm" svg:y="16.938cm">
            <text:p/>
            <draw:enhanced-geometry svg:viewBox="0 0 195 17" draw:type="non-primitive" draw:enhanced-path="M 2 16  L 0 12  L 0 0  L 194 0  L 194 16  L 2 16  L 2 16  N"/>
          </draw:custom-shape>
          <draw:custom-shape draw:style-name="gr888" draw:text-style-name="P168" draw:layer="layout" svg:width="0.86cm" svg:height="0.075cm" svg:x="19.553cm" svg:y="16.92cm">
            <text:p/>
            <draw:enhanced-geometry svg:viewBox="0 0 195 17" draw:type="non-primitive" draw:enhanced-path="M 0 16  L 0 0  L 194 0  L 194 16  L 0 16  L 0 16  N"/>
          </draw:custom-shape>
          <draw:custom-shape draw:style-name="gr889" draw:text-style-name="P169" draw:layer="layout" svg:width="0.86cm" svg:height="0.075cm" svg:x="19.553cm" svg:y="16.902cm">
            <text:p/>
            <draw:enhanced-geometry svg:viewBox="0 0 195 17" draw:type="non-primitive" draw:enhanced-path="M 0 16  L 0 0  L 194 0  L 194 16  L 0 16  L 0 16  L 0 16  N"/>
          </draw:custom-shape>
          <draw:custom-shape draw:style-name="gr890" draw:text-style-name="P170" draw:layer="layout" svg:width="0.86cm" svg:height="0.075cm" svg:x="19.553cm" svg:y="16.885cm">
            <text:p/>
            <draw:enhanced-geometry svg:viewBox="0 0 195 17" draw:type="non-primitive" draw:enhanced-path="M 0 16  L 0 0  L 194 0  L 194 16  L 0 16  L 0 16  L 0 16  N"/>
          </draw:custom-shape>
          <draw:custom-shape draw:style-name="gr890" draw:text-style-name="P170" draw:layer="layout" svg:width="0.86cm" svg:height="0.075cm" svg:x="19.553cm" svg:y="16.867cm">
            <text:p/>
            <draw:enhanced-geometry svg:viewBox="0 0 195 17" draw:type="non-primitive" draw:enhanced-path="M 0 16  L 0 0  L 194 0  L 194 16  L 0 16  L 0 16  N"/>
          </draw:custom-shape>
          <draw:custom-shape draw:style-name="gr891" draw:text-style-name="P171" draw:layer="layout" svg:width="0.86cm" svg:height="0.075cm" svg:x="19.553cm" svg:y="16.85cm">
            <text:p/>
            <draw:enhanced-geometry svg:viewBox="0 0 195 17" draw:type="non-primitive" draw:enhanced-path="M 0 16  L 0 0  L 194 0  L 194 16  L 0 16  L 0 16  N"/>
          </draw:custom-shape>
          <draw:custom-shape draw:style-name="gr892" draw:text-style-name="P172" draw:layer="layout" svg:width="0.86cm" svg:height="0.075cm" svg:x="19.553cm" svg:y="16.832cm">
            <text:p/>
            <draw:enhanced-geometry svg:viewBox="0 0 195 17" draw:type="non-primitive" draw:enhanced-path="M 0 16  L 0 0  L 194 0  L 194 16  L 0 16  L 0 16  L 0 16  N"/>
          </draw:custom-shape>
          <draw:custom-shape draw:style-name="gr893" draw:text-style-name="P173" draw:layer="layout" svg:width="0.86cm" svg:height="0.075cm" svg:x="19.553cm" svg:y="16.814cm">
            <text:p/>
            <draw:enhanced-geometry svg:viewBox="0 0 195 17" draw:type="non-primitive" draw:enhanced-path="M 0 16  L 0 0  L 194 0  L 194 16  L 0 16  L 0 16  L 0 16  N"/>
          </draw:custom-shape>
          <draw:custom-shape draw:style-name="gr865" draw:text-style-name="P174" draw:layer="layout" svg:width="0.86cm" svg:height="0.075cm" svg:x="19.553cm" svg:y="16.801cm">
            <text:p/>
            <draw:enhanced-geometry svg:viewBox="0 0 195 17" draw:type="non-primitive" draw:enhanced-path="M 0 16  L 0 0  L 194 0  L 194 16  L 0 16  L 0 16  N"/>
          </draw:custom-shape>
          <draw:custom-shape draw:style-name="gr865" draw:text-style-name="P174" draw:layer="layout" svg:width="0.86cm" svg:height="0.075cm" svg:x="19.553cm" svg:y="16.783cm">
            <text:p/>
            <draw:enhanced-geometry svg:viewBox="0 0 195 17" draw:type="non-primitive" draw:enhanced-path="M 0 16  L 0 0  L 194 0  L 194 16  L 0 16  L 0 16  N"/>
          </draw:custom-shape>
          <draw:custom-shape draw:style-name="gr770" draw:text-style-name="P175" draw:layer="layout" svg:width="0.86cm" svg:height="0.075cm" svg:x="19.553cm" svg:y="16.761cm">
            <text:p/>
            <draw:enhanced-geometry svg:viewBox="0 0 195 17" draw:type="non-primitive" draw:enhanced-path="M 0 16  L 0 12  L 0 0  L 194 0  L 194 16  L 0 16  L 0 16  N"/>
          </draw:custom-shape>
          <draw:custom-shape draw:style-name="gr866" draw:text-style-name="P176" draw:layer="layout" svg:width="0.86cm" svg:height="0.075cm" svg:x="19.553cm" svg:y="16.748cm">
            <text:p/>
            <draw:enhanced-geometry svg:viewBox="0 0 195 17" draw:type="non-primitive" draw:enhanced-path="M 0 16  L 0 0  L 194 0  L 194 16  L 0 16  L 0 16  N"/>
          </draw:custom-shape>
          <draw:custom-shape draw:style-name="gr867" draw:text-style-name="P177" draw:layer="layout" svg:width="0.86cm" svg:height="0.075cm" svg:x="19.553cm" svg:y="16.73cm">
            <text:p/>
            <draw:enhanced-geometry svg:viewBox="0 0 195 17" draw:type="non-primitive" draw:enhanced-path="M 0 16  L 0 0  L 194 0  L 194 16  L 0 16  L 0 16  N"/>
          </draw:custom-shape>
          <draw:custom-shape draw:style-name="gr867" draw:text-style-name="P177" draw:layer="layout" svg:width="0.86cm" svg:height="0.075cm" svg:x="19.553cm" svg:y="16.708cm">
            <text:p/>
            <draw:enhanced-geometry svg:viewBox="0 0 195 17" draw:type="non-primitive" draw:enhanced-path="M 0 16  L 0 0  L 194 0  L 194 3  L 194 16  L 0 16  L 0 16  L 0 16  N"/>
          </draw:custom-shape>
          <draw:custom-shape draw:style-name="gr868" draw:text-style-name="P178" draw:layer="layout" svg:width="0.86cm" svg:height="0.075cm" svg:x="19.553cm" svg:y="16.695cm">
            <text:p/>
            <draw:enhanced-geometry svg:viewBox="0 0 195 17" draw:type="non-primitive" draw:enhanced-path="M 0 16  L 0 0  L 194 0  L 194 16  L 0 16  L 0 16  L 0 16  N"/>
          </draw:custom-shape>
          <draw:custom-shape draw:style-name="gr869" draw:text-style-name="P179" draw:layer="layout" svg:width="0.86cm" svg:height="0.075cm" svg:x="19.553cm" svg:y="16.678cm">
            <text:p/>
            <draw:enhanced-geometry svg:viewBox="0 0 195 17" draw:type="non-primitive" draw:enhanced-path="M 0 16  L 0 0  L 194 0  L 194 16  L 0 16  L 0 16  N"/>
          </draw:custom-shape>
          <draw:custom-shape draw:style-name="gr869" draw:text-style-name="P179" draw:layer="layout" svg:width="0.86cm" svg:height="0.075cm" svg:x="19.553cm" svg:y="16.66cm">
            <text:p/>
            <draw:enhanced-geometry svg:viewBox="0 0 195 17" draw:type="non-primitive" draw:enhanced-path="M 0 16  L 0 0  L 194 0  L 194 16  L 0 16  L 0 16  L 0 16  N"/>
          </draw:custom-shape>
          <draw:custom-shape draw:style-name="gr894" draw:text-style-name="P180" draw:layer="layout" svg:width="0.86cm" svg:height="0.075cm" svg:x="19.553cm" svg:y="16.642cm">
            <text:p/>
            <draw:enhanced-geometry svg:viewBox="0 0 195 17" draw:type="non-primitive" draw:enhanced-path="M 0 16  L 0 0  L 194 0  L 194 16  L 0 16  L 0 16  L 0 16  N"/>
          </draw:custom-shape>
          <draw:custom-shape draw:style-name="gr895" draw:text-style-name="P181" draw:layer="layout" svg:width="0.86cm" svg:height="0.075cm" svg:x="19.553cm" svg:y="16.625cm">
            <text:p/>
            <draw:enhanced-geometry svg:viewBox="0 0 195 17" draw:type="non-primitive" draw:enhanced-path="M 0 16  L 0 0  L 194 0  L 194 16  L 0 16  L 0 16  N"/>
          </draw:custom-shape>
          <draw:custom-shape draw:style-name="gr896" draw:text-style-name="P182" draw:layer="layout" svg:width="0.86cm" svg:height="0.075cm" svg:x="19.553cm" svg:y="16.607cm">
            <text:p/>
            <draw:enhanced-geometry svg:viewBox="0 0 195 17" draw:type="non-primitive" draw:enhanced-path="M 0 16  L 0 0  L 194 0  L 194 16  L 0 16  L 0 16  L 0 16  N"/>
          </draw:custom-shape>
          <draw:custom-shape draw:style-name="gr897" draw:text-style-name="P183" draw:layer="layout" svg:width="0.86cm" svg:height="0.075cm" svg:x="19.553cm" svg:y="16.594cm">
            <text:p/>
            <draw:enhanced-geometry svg:viewBox="0 0 195 17" draw:type="non-primitive" draw:enhanced-path="M 0 16  L 0 16  L 0 0  L 194 0  L 194 16  L 0 16  L 0 16  N"/>
          </draw:custom-shape>
          <draw:custom-shape draw:style-name="gr897" draw:text-style-name="P183" draw:layer="layout" svg:width="0.86cm" svg:height="0.075cm" svg:x="19.553cm" svg:y="16.572cm">
            <text:p/>
            <draw:enhanced-geometry svg:viewBox="0 0 195 17" draw:type="non-primitive" draw:enhanced-path="M 0 16  L 0 0  L 193 0  L 194 0  L 194 16  L 0 16  L 0 16  N"/>
          </draw:custom-shape>
          <draw:custom-shape draw:style-name="gr898" draw:text-style-name="P184" draw:layer="layout" svg:width="0.86cm" svg:height="0.074cm" svg:x="19.553cm" svg:y="16.559cm">
            <text:p/>
            <draw:enhanced-geometry svg:viewBox="0 0 195 17" draw:type="non-primitive" draw:enhanced-path="M 0 16  L 0 0  L 182 0  L 194 16  L 0 16  L 0 16  L 0 16  N"/>
          </draw:custom-shape>
          <draw:custom-shape draw:style-name="gr899" draw:text-style-name="P185" draw:layer="layout" svg:width="0.807cm" svg:height="0.075cm" svg:x="19.553cm" svg:y="16.541cm">
            <text:p/>
            <draw:enhanced-geometry svg:viewBox="0 0 183 17" draw:type="non-primitive" draw:enhanced-path="M 0 12  L 0 0  L 171 0  L 182 16  L 0 16  L 0 16  L 0 12  N"/>
          </draw:custom-shape>
          <draw:custom-shape draw:style-name="gr900" draw:text-style-name="P186" draw:layer="layout" svg:width="0.758cm" svg:height="0.075cm" svg:x="19.553cm" svg:y="16.523cm">
            <text:p/>
            <draw:enhanced-geometry svg:viewBox="0 0 172 17" draw:type="non-primitive" draw:enhanced-path="M 0 16  L 0 0  L 161 0  L 171 16  L 0 16  L 0 16  L 0 16  N"/>
          </draw:custom-shape>
          <draw:custom-shape draw:style-name="gr901" draw:text-style-name="P186" draw:layer="layout" svg:width="0.714cm" svg:height="0.075cm" svg:x="19.553cm" svg:y="16.501cm">
            <text:p/>
            <draw:enhanced-geometry svg:viewBox="0 0 162 17" draw:type="non-primitive" draw:enhanced-path="M 0 16  L 0 0  L 150 0  L 161 16  L 0 16  L 0 16  N"/>
          </draw:custom-shape>
          <draw:custom-shape draw:style-name="gr902" draw:text-style-name="P187" draw:layer="layout" svg:width="0.666cm" svg:height="0.075cm" svg:x="19.553cm" svg:y="16.488cm">
            <text:p/>
            <draw:enhanced-geometry svg:viewBox="0 0 151 17" draw:type="non-primitive" draw:enhanced-path="M 0 16  L 0 0  L 140 0  L 150 16  L 0 16  L 0 16  N"/>
          </draw:custom-shape>
          <draw:custom-shape draw:style-name="gr903" draw:text-style-name="P188" draw:layer="layout" svg:width="0.621cm" svg:height="0.075cm" svg:x="19.553cm" svg:y="16.47cm">
            <text:p/>
            <draw:enhanced-geometry svg:viewBox="0 0 141 17" draw:type="non-primitive" draw:enhanced-path="M 0 16  L 0 0  L 128 0  L 140 16  L 0 16  L 0 16  L 0 16  N"/>
          </draw:custom-shape>
          <draw:custom-shape draw:style-name="gr904" draw:text-style-name="P33" draw:layer="layout" svg:width="0.573cm" svg:height="0.075cm" svg:x="19.553cm" svg:y="16.453cm">
            <text:p/>
            <draw:enhanced-geometry svg:viewBox="0 0 130 17" draw:type="non-primitive" draw:enhanced-path="M 0 16  L 0 0  L 118 0  L 129 16  L 0 16  L 0 16  N"/>
          </draw:custom-shape>
          <draw:custom-shape draw:style-name="gr905" draw:text-style-name="P189" draw:layer="layout" svg:width="0.529cm" svg:height="0.075cm" svg:x="19.553cm" svg:y="16.435cm">
            <text:p/>
            <draw:enhanced-geometry svg:viewBox="0 0 120 17" draw:type="non-primitive" draw:enhanced-path="M 0 16  L 0 0  L 107 0  L 119 16  L 0 16  L 0 16  N"/>
          </draw:custom-shape>
          <draw:custom-shape draw:style-name="gr789" draw:text-style-name="P189" draw:layer="layout" svg:width="0.476cm" svg:height="0.075cm" svg:x="19.553cm" svg:y="16.417cm">
            <text:p/>
            <draw:enhanced-geometry svg:viewBox="0 0 108 17" draw:type="non-primitive" draw:enhanced-path="M 0 16  L 0 0  L 96 0  L 107 16  L 0 16  L 0 16  L 0 16  N"/>
          </draw:custom-shape>
          <draw:custom-shape draw:style-name="gr790" draw:text-style-name="P190" draw:layer="layout" svg:width="0.427cm" svg:height="0.075cm" svg:x="19.553cm" svg:y="16.4cm">
            <text:p/>
            <draw:enhanced-geometry svg:viewBox="0 0 97 17" draw:type="non-primitive" draw:enhanced-path="M 0 16  L 0 0  L 85 0  L 96 16  L 0 16  L 0 16  N"/>
          </draw:custom-shape>
          <draw:custom-shape draw:style-name="gr791" draw:text-style-name="P191" draw:layer="layout" svg:width="0.379cm" svg:height="0.074cm" svg:x="19.553cm" svg:y="16.387cm">
            <text:p/>
            <draw:enhanced-geometry svg:viewBox="0 0 86 17" draw:type="non-primitive" draw:enhanced-path="M 0 16  L 0 0  L 74 0  L 85 16  L 0 16  L 0 16  N"/>
          </draw:custom-shape>
          <draw:custom-shape draw:style-name="gr792" draw:text-style-name="P192" draw:layer="layout" svg:width="0.33cm" svg:height="0.075cm" svg:x="19.553cm" svg:y="16.364cm">
            <text:p/>
            <draw:enhanced-geometry svg:viewBox="0 0 75 17" draw:type="non-primitive" draw:enhanced-path="M 0 12  L 0 0  L 64 0  L 74 16  L 0 16  L 0 16  L 0 12  N"/>
          </draw:custom-shape>
          <draw:custom-shape draw:style-name="gr793" draw:text-style-name="P193" draw:layer="layout" svg:width="0.286cm" svg:height="0.106cm" svg:x="19.553cm" svg:y="16.263cm">
            <text:p/>
            <draw:enhanced-geometry svg:viewBox="0 0 65 24" draw:type="non-primitive" draw:enhanced-path="M 0 23  L 0 0  L 64 23  L 0 23  L 0 23  L 0 23  N"/>
          </draw:custom-shape>
          <draw:custom-shape draw:style-name="gr906" draw:text-style-name="P164" draw:layer="layout" svg:width="0.868cm" svg:height="0.618cm" svg:x="19.553cm" svg:y="14.803cm">
            <text:p/>
            <draw:enhanced-geometry svg:viewBox="0 0 197 140" draw:type="non-primitive" draw:enhanced-path="M 3 3  L 196 139  L 195 138  L 194 138  L 194 137  L 0 0  L 0 1  L 2 2  L 3 3  L 3 3  L 3 3  N"/>
          </draw:custom-shape>
          <draw:custom-shape draw:style-name="gr907" draw:text-style-name="P164" draw:layer="layout" svg:width="0.86cm" svg:height="0.604cm" svg:x="19.575cm" svg:y="14.821cm">
            <text:p/>
            <draw:enhanced-geometry svg:viewBox="0 0 195 137" draw:type="non-primitive" draw:enhanced-path="M 1 1  L 194 136  L 193 136  L 0 0  L 1 1  L 1 1  L 1 1  N"/>
          </draw:custom-shape>
          <draw:custom-shape draw:style-name="gr908" draw:text-style-name="P194" draw:layer="layout" svg:width="0.516cm" svg:height="0.468cm" svg:x="20.011cm" svg:y="14.38cm">
            <text:p/>
            <draw:enhanced-geometry svg:viewBox="0 0 117 106" draw:type="non-primitive" draw:enhanced-path="M 116 105  L 0 0  L 7 7  L 13 15  L 19 23  L 24 31  L 30 40  L 33 47  L 116 105  L 116 105  N"/>
          </draw:custom-shape>
          <draw:custom-shape draw:style-name="gr909" draw:text-style-name="P194" draw:layer="layout" svg:width="0.414cm" svg:height="0.305cm" svg:x="20.157cm" svg:y="14.587cm">
            <text:p/>
            <draw:enhanced-geometry svg:viewBox="0 0 94 69" draw:type="non-primitive" draw:enhanced-path="M 83 58  L 93 68  L 1 2  L 0 0  L 83 58  L 83 58  N"/>
          </draw:custom-shape>
          <draw:custom-shape draw:style-name="gr910" draw:text-style-name="P195" draw:layer="layout" svg:width="0.458cm" svg:height="0.34cm" svg:x="20.166cm" svg:y="14.596cm">
            <text:p/>
            <draw:enhanced-geometry svg:viewBox="0 0 104 77" draw:type="non-primitive" draw:enhanced-path="M 91 66  L 103 76  L 1 4  L 0 1  L 0 0  L 91 66  L 91 66  L 91 66  N"/>
          </draw:custom-shape>
          <draw:custom-shape draw:style-name="gr911" draw:text-style-name="P195" draw:layer="layout" svg:width="0.507cm" svg:height="0.361cm" svg:x="20.17cm" svg:y="14.614cm">
            <text:p/>
            <draw:enhanced-geometry svg:viewBox="0 0 115 82" draw:type="non-primitive" draw:enhanced-path="M 102 72  L 114 81  L 1 3  L 0 0  L 102 72  L 102 72  N"/>
          </draw:custom-shape>
          <draw:custom-shape draw:style-name="gr912" draw:text-style-name="P81" draw:layer="layout" svg:width="0.552cm" svg:height="0.401cm" svg:x="20.174cm" svg:y="14.627cm">
            <text:p/>
            <draw:enhanced-geometry svg:viewBox="0 0 125 91" draw:type="non-primitive" draw:enhanced-path="M 112 78  L 124 90  L 1 3  L 0 0  L 112 78  L 112 78  L 112 78  N"/>
          </draw:custom-shape>
          <draw:custom-shape draw:style-name="gr913" draw:text-style-name="P196" draw:layer="layout" svg:width="0.595cm" svg:height="0.432cm" svg:x="20.179cm" svg:y="14.64cm">
            <text:p/>
            <draw:enhanced-geometry svg:viewBox="0 0 135 98" draw:type="non-primitive" draw:enhanced-path="M 123 87  L 134 97  L 2 3  L 0 1  L 0 0  L 123 87  L 123 87  L 123 87  N"/>
          </draw:custom-shape>
          <draw:custom-shape draw:style-name="gr914" draw:text-style-name="P197" draw:layer="layout" svg:width="0.621cm" svg:height="0.445cm" svg:x="20.188cm" svg:y="14.654cm">
            <text:p/>
            <draw:enhanced-geometry svg:viewBox="0 0 141 101" draw:type="non-primitive" draw:enhanced-path="M 132 94  L 133 94  L 138 100  L 140 100  L 1 3  L 0 0  L 132 94  L 132 94  N"/>
          </draw:custom-shape>
          <draw:custom-shape draw:style-name="gr915" draw:text-style-name="P31" draw:layer="layout" svg:width="0.64cm" svg:height="0.463cm" svg:x="20.192cm" svg:y="14.667cm">
            <text:p/>
            <draw:enhanced-geometry svg:viewBox="0 0 145 105" draw:type="non-primitive" draw:enhanced-path="M 138 97  L 144 103  L 144 104  L 0 3  L 0 0  L 138 97  L 138 97  N"/>
          </draw:custom-shape>
          <draw:custom-shape draw:style-name="gr916" draw:text-style-name="P31" draw:layer="layout" svg:width="0.653cm" svg:height="0.467cm" svg:x="20.192cm" svg:y="14.68cm">
            <text:p/>
            <draw:enhanced-geometry svg:viewBox="0 0 148 106" draw:type="non-primitive" draw:enhanced-path="M 143 101  L 147 105  L 2 2  L 0 0  L 143 101  L 143 101  N"/>
          </draw:custom-shape>
          <draw:custom-shape draw:style-name="gr917" draw:text-style-name="P198" draw:layer="layout" svg:width="0.657cm" svg:height="0.476cm" svg:x="20.201cm" svg:y="14.689cm">
            <text:p/>
            <draw:enhanced-geometry svg:viewBox="0 0 149 108" draw:type="non-primitive" draw:enhanced-path="M 144 103  L 146 104  L 148 107  L 0 4  L 0 0  L 145 103  L 145 103  L 144 103  N"/>
          </draw:custom-shape>
          <draw:custom-shape draw:style-name="gr918" draw:text-style-name="P199" draw:layer="layout" svg:width="0.675cm" svg:height="0.477cm" svg:x="20.201cm" svg:y="14.706cm">
            <text:p/>
            <draw:enhanced-geometry svg:viewBox="0 0 153 108" draw:type="non-primitive" draw:enhanced-path="M 148 103  L 150 107  L 152 107  L 1 3  L 0 0  L 148 103  L 148 103  L 148 103  N"/>
          </draw:custom-shape>
          <draw:custom-shape draw:style-name="gr919" draw:text-style-name="P200" draw:layer="layout" svg:width="0.666cm" svg:height="0.485cm" svg:x="20.21cm" svg:y="14.72cm">
            <text:p/>
            <draw:enhanced-geometry svg:viewBox="0 0 151 110" draw:type="non-primitive" draw:enhanced-path="M 148 104  L 150 109  L 0 2  L 0 0  L 149 104  L 149 104  L 148 104  N"/>
          </draw:custom-shape>
          <draw:custom-shape draw:style-name="gr920" draw:text-style-name="P201" draw:layer="layout" svg:width="0.674cm" svg:height="0.49cm" svg:x="20.21cm" svg:y="14.728cm">
            <text:p/>
            <draw:enhanced-geometry svg:viewBox="0 0 153 111" draw:type="non-primitive" draw:enhanced-path="M 150 106  L 152 109  L 152 110  L 1 3  L 1 3  L 0 0  L 150 107  L 150 107  L 150 106  N"/>
          </draw:custom-shape>
          <draw:custom-shape draw:style-name="gr921" draw:text-style-name="P201" draw:layer="layout" svg:width="0.684cm" svg:height="0.489cm" svg:x="20.214cm" svg:y="14.742cm">
            <text:p/>
            <draw:enhanced-geometry svg:viewBox="0 0 155 111" draw:type="non-primitive" draw:enhanced-path="M 151 107  L 154 110  L 1 3  L 0 0  L 151 107  L 151 107  L 151 107  N"/>
          </draw:custom-shape>
          <draw:custom-shape draw:style-name="gr922" draw:text-style-name="P164" draw:layer="layout" svg:width="0.683cm" svg:height="0.489cm" svg:x="20.219cm" svg:y="14.755cm">
            <text:p/>
            <draw:enhanced-geometry svg:viewBox="0 0 155 111" draw:type="non-primitive" draw:enhanced-path="M 152 107  L 154 110  L 0 2  L 0 0  L 152 107  L 152 107  N"/>
          </draw:custom-shape>
          <draw:custom-shape draw:style-name="gr923" draw:text-style-name="P202" draw:layer="layout" svg:width="0.687cm" svg:height="0.494cm" svg:x="20.219cm" svg:y="14.764cm">
            <text:p/>
            <draw:enhanced-geometry svg:viewBox="0 0 156 112" draw:type="non-primitive" draw:enhanced-path="M 154 108  L 154 109  L 155 111  L 1 3  L 0 0  L 154 108  L 154 108  L 154 108  N"/>
          </draw:custom-shape>
          <draw:custom-shape draw:style-name="gr924" draw:text-style-name="P203" draw:layer="layout" svg:width="0.688cm" svg:height="0.494cm" svg:x="20.223cm" svg:y="14.777cm">
            <text:p/>
            <draw:enhanced-geometry svg:viewBox="0 0 156 112" draw:type="non-primitive" draw:enhanced-path="M 154 108  L 155 111  L 0 2  L 0 0  L 154 108  L 154 108  L 154 108  N"/>
          </draw:custom-shape>
          <draw:custom-shape draw:style-name="gr925" draw:text-style-name="P203" draw:layer="layout" svg:width="0.697cm" svg:height="0.503cm" svg:x="20.223cm" svg:y="14.786cm">
            <text:p/>
            <draw:enhanced-geometry svg:viewBox="0 0 158 114" draw:type="non-primitive" draw:enhanced-path="M 155 109  L 157 112  L 157 113  L 1 3  L 0 1  L 0 0  L 155 109  L 155 109  N"/>
          </draw:custom-shape>
          <draw:custom-shape draw:style-name="gr926" draw:text-style-name="P204" draw:layer="layout" svg:width="0.692cm" svg:height="0.498cm" svg:x="20.232cm" svg:y="14.799cm">
            <text:p/>
            <draw:enhanced-geometry svg:viewBox="0 0 157 113" draw:type="non-primitive" draw:enhanced-path="M 154 110  L 156 112  L 0 3  L 0 0  L 154 110  L 154 110  L 154 110  N"/>
          </draw:custom-shape>
          <draw:custom-shape draw:style-name="gr927" draw:text-style-name="P205" draw:layer="layout" svg:width="0.692cm" svg:height="0.499cm" svg:x="20.232cm" svg:y="14.812cm">
            <text:p/>
            <draw:enhanced-geometry svg:viewBox="0 0 157 113" draw:type="non-primitive" draw:enhanced-path="M 156 109  L 156 112  L 0 2  L 0 0  L 156 109  L 156 109  L 156 109  N"/>
          </draw:custom-shape>
          <draw:custom-shape draw:style-name="gr928" draw:text-style-name="P206" draw:layer="layout" svg:width="0.701cm" svg:height="0.507cm" svg:x="20.232cm" svg:y="14.821cm">
            <text:p/>
            <draw:enhanced-geometry svg:viewBox="0 0 159 115" draw:type="non-primitive" draw:enhanced-path="M 156 110  L 157 112  L 158 114  L 0 3  L 0 0  L 156 110  L 156 110  N"/>
          </draw:custom-shape>
          <draw:custom-shape draw:style-name="gr929" draw:text-style-name="P207" draw:layer="layout" svg:width="0.71cm" svg:height="0.503cm" svg:x="20.232cm" svg:y="14.834cm">
            <text:p/>
            <draw:enhanced-geometry svg:viewBox="0 0 161 114" draw:type="non-primitive" draw:enhanced-path="M 158 111  L 160 113  L 1 2  L 0 0  L 158 111  L 158 111  L 158 111  N"/>
          </draw:custom-shape>
          <draw:custom-shape draw:style-name="gr930" draw:text-style-name="P207" draw:layer="layout" svg:width="0.706cm" svg:height="0.507cm" svg:x="20.236cm" svg:y="14.843cm">
            <text:p/>
            <draw:enhanced-geometry svg:viewBox="0 0 160 115" draw:type="non-primitive" draw:enhanced-path="M 159 111  L 159 114  L 0 3  L 0 0  L 0 0  L 159 111  L 159 111  L 159 111  N"/>
          </draw:custom-shape>
          <draw:custom-shape draw:style-name="gr931" draw:text-style-name="P208" draw:layer="layout" svg:width="0.706cm" svg:height="0.503cm" svg:x="20.236cm" svg:y="14.856cm">
            <text:p/>
            <draw:enhanced-geometry svg:viewBox="0 0 160 114" draw:type="non-primitive" draw:enhanced-path="M 158 111  L 159 113  L 1 2  L 0 0  L 158 111  L 158 111  N"/>
          </draw:custom-shape>
          <draw:custom-shape draw:style-name="gr932" draw:text-style-name="P209" draw:layer="layout" svg:width="0.705cm" svg:height="0.507cm" svg:x="20.241cm" svg:y="14.865cm">
            <text:p/>
            <draw:enhanced-geometry svg:viewBox="0 0 160 115" draw:type="non-primitive" draw:enhanced-path="M 158 111  L 159 114  L 0 3  L 0 0  L 158 111  L 158 111  L 158 111  N"/>
          </draw:custom-shape>
          <draw:custom-shape draw:style-name="gr933" draw:text-style-name="P210" draw:layer="layout" svg:width="0.705cm" svg:height="0.508cm" svg:x="20.241cm" svg:y="14.878cm">
            <text:p/>
            <draw:enhanced-geometry svg:viewBox="0 0 160 115" draw:type="non-primitive" draw:enhanced-path="M 159 111  L 159 114  L 0 2  L 0 0  L 159 111  L 159 111  N"/>
          </draw:custom-shape>
          <draw:custom-shape draw:style-name="gr934" draw:text-style-name="P211" draw:layer="layout" svg:width="0.71cm" svg:height="0.512cm" svg:x="20.241cm" svg:y="14.887cm">
            <text:p/>
            <draw:enhanced-geometry svg:viewBox="0 0 161 116" draw:type="non-primitive" draw:enhanced-path="M 159 112  L 160 115  L 1 3  L 0 0  L 159 112  L 159 112  L 159 112  N"/>
          </draw:custom-shape>
          <draw:custom-shape draw:style-name="gr935" draw:text-style-name="P211" draw:layer="layout" svg:width="0.71cm" svg:height="0.508cm" svg:x="20.245cm" svg:y="14.9cm">
            <text:p/>
            <draw:enhanced-geometry svg:viewBox="0 0 161 115" draw:type="non-primitive" draw:enhanced-path="M 159 112  L 159 113  L 160 114  L 0 2  L 0 0  L 0 0  L 159 112  L 159 112  N"/>
          </draw:custom-shape>
          <draw:custom-shape draw:style-name="gr936" draw:text-style-name="P212" draw:layer="layout" svg:width="0.71cm" svg:height="0.507cm" svg:x="20.245cm" svg:y="14.909cm">
            <text:p/>
            <draw:enhanced-geometry svg:viewBox="0 0 161 115" draw:type="non-primitive" draw:enhanced-path="M 159 112  L 160 114  L 1 2  L 0 0  L 160 112  L 160 112  L 159 112  N"/>
          </draw:custom-shape>
          <draw:custom-shape draw:style-name="gr937" draw:text-style-name="P213" draw:layer="layout" svg:width="0.701cm" svg:height="0.516cm" svg:x="20.254cm" svg:y="14.918cm">
            <text:p/>
            <draw:enhanced-geometry svg:viewBox="0 0 159 117" draw:type="non-primitive" draw:enhanced-path="M 158 112  L 158 116  L 0 3  L 0 0  L 158 112  L 158 112  L 158 112  N"/>
          </draw:custom-shape>
          <draw:custom-shape draw:style-name="gr938" draw:text-style-name="P214" draw:layer="layout" svg:width="0.71cm" svg:height="0.512cm" svg:x="20.254cm" svg:y="14.931cm">
            <text:p/>
            <draw:enhanced-geometry svg:viewBox="0 0 161 116" draw:type="non-primitive" draw:enhanced-path="M 159 112  L 160 115  L 0 2  L 0 0  L 159 113  L 159 113  L 159 112  N"/>
          </draw:custom-shape>
          <draw:custom-shape draw:style-name="gr939" draw:text-style-name="P214" draw:layer="layout" svg:width="0.71cm" svg:height="0.516cm" svg:x="20.254cm" svg:y="14.94cm">
            <text:p/>
            <draw:enhanced-geometry svg:viewBox="0 0 161 117" draw:type="non-primitive" draw:enhanced-path="M 160 113  L 160 113  L 160 116  L 1 2  L 0 0  L 160 113  L 160 113  N"/>
          </draw:custom-shape>
          <draw:custom-shape draw:style-name="gr940" draw:text-style-name="P215" draw:layer="layout" svg:width="0.71cm" svg:height="0.516cm" svg:x="20.254cm" svg:y="14.949cm">
            <text:p/>
            <draw:enhanced-geometry svg:viewBox="0 0 161 117" draw:type="non-primitive" draw:enhanced-path="M 159 113  L 160 116  L 0 3  L 0 2  L 0 0  L 159 114  L 159 114  L 159 113  N"/>
          </draw:custom-shape>
          <draw:custom-shape draw:style-name="gr941" draw:text-style-name="P216" draw:layer="layout" svg:width="0.714cm" svg:height="0.512cm" svg:x="20.254cm" svg:y="14.962cm">
            <text:p/>
            <draw:enhanced-geometry svg:viewBox="0 0 162 116" draw:type="non-primitive" draw:enhanced-path="M 160 113  L 161 115  L 0 2  L 0 0  L 160 113  L 160 113  L 160 113  N"/>
          </draw:custom-shape>
          <draw:custom-shape draw:style-name="gr942" draw:text-style-name="P217" draw:layer="layout" svg:width="0.714cm" svg:height="0.516cm" svg:x="20.254cm" svg:y="14.971cm">
            <text:p/>
            <draw:enhanced-geometry svg:viewBox="0 0 162 117" draw:type="non-primitive" draw:enhanced-path="M 161 113  L 161 116  L 0 3  L 0 0  L 161 113  L 161 113  L 161 113  N"/>
          </draw:custom-shape>
          <draw:custom-shape draw:style-name="gr943" draw:text-style-name="P218" draw:layer="layout" svg:width="0.714cm" svg:height="0.512cm" svg:x="20.254cm" svg:y="14.984cm">
            <text:p/>
            <draw:enhanced-geometry svg:viewBox="0 0 162 116" draw:type="non-primitive" draw:enhanced-path="M 161 113  L 161 113  L 161 115  L 0 2  L 0 0  L 161 113  L 161 113  L 161 113  N"/>
          </draw:custom-shape>
          <draw:custom-shape draw:style-name="gr943" draw:text-style-name="P218" draw:layer="layout" svg:width="0.714cm" svg:height="0.512cm" svg:x="20.254cm" svg:y="14.993cm">
            <text:p/>
            <draw:enhanced-geometry svg:viewBox="0 0 162 116" draw:type="non-primitive" draw:enhanced-path="M 161 113  L 161 115  L 0 2  L 0 0  L 161 113  L 161 113  L 161 113  N"/>
          </draw:custom-shape>
          <draw:custom-shape draw:style-name="gr944" draw:text-style-name="P219" draw:layer="layout" svg:width="0.714cm" svg:height="0.516cm" svg:x="20.254cm" svg:y="15.002cm">
            <text:p/>
            <draw:enhanced-geometry svg:viewBox="0 0 162 117" draw:type="non-primitive" draw:enhanced-path="M 161 113  L 161 116  L 0 3  L 0 0  L 161 113  L 161 113  L 161 113  N"/>
          </draw:custom-shape>
          <draw:custom-shape draw:style-name="gr945" draw:text-style-name="P220" draw:layer="layout" svg:width="0.719cm" svg:height="0.512cm" svg:x="20.254cm" svg:y="15.015cm">
            <text:p/>
            <draw:enhanced-geometry svg:viewBox="0 0 163 116" draw:type="non-primitive" draw:enhanced-path="M 161 113  L 162 115  L 1 2  L 1 0  L 0 0  L 161 113  L 161 113  L 161 113  N"/>
          </draw:custom-shape>
          <draw:custom-shape draw:style-name="gr946" draw:text-style-name="P36" draw:layer="layout" svg:width="0.719cm" svg:height="0.608cm" svg:x="20.258cm" svg:y="15.024cm">
            <text:p/>
            <draw:enhanced-geometry svg:viewBox="0 0 163 138" draw:type="non-primitive" draw:enhanced-path="M 161 113  L 161 115  L 162 125  L 162 137  L 1 13  L 0 0  L 161 113  L 161 113  N"/>
          </draw:custom-shape>
          <draw:custom-shape draw:style-name="gr947" draw:text-style-name="P174" draw:layer="layout" svg:width="1.239cm" svg:height="0.622cm" svg:x="19.738cm" svg:y="15.081cm">
            <text:p/>
            <draw:enhanced-geometry svg:viewBox="0 0 281 141" draw:type="non-primitive" draw:enhanced-path="M 119 0  L 280 124  L 278 124  L 274 125  L 271 126  L 268 126  L 266 126  L 262 127  L 259 128  L 256 128  L 254 128  L 250 129  L 247 129  L 245 130  L 241 131  L 238 131  L 235 131  L 233 132  L 230 133  L 226 133  L 223 133  L 221 134  L 217 135  L 215 136  L 211 136  L 209 136  L 206 136  L 203 137  L 200 138  L 197 138  L 194 138  L 191 139  L 188 139  L 185 140  L 0 20  L 3 19  L 7 18  L 10 18  L 15 18  L 18 17  L 22 16  L 25 15  L 29 15  L 32 14  L 36 14  L 40 13  L 43 13  L 47 12  L 51 11  L 55 11  L 58 10  L 62 9  L 66 8  L 69 8  L 73 7  L 77 7  L 81 6  L 85 5  L 88 5  L 92 4  L 95 3  L 99 3  L 103 2  L 107 1  L 111 1  L 114 1  L 119 0  L 119 0  N"/>
          </draw:custom-shape>
          <draw:custom-shape draw:style-name="gr948" draw:text-style-name="P194" draw:layer="layout" svg:width="0.997cm" svg:height="0.697cm" svg:x="20.011cm" svg:y="15.729cm">
            <text:p/>
            <draw:enhanced-geometry svg:viewBox="0 0 226 158" draw:type="non-primitive" draw:enhanced-path="M 225 157  L 222 151  L 218 142  L 216 139  L 215 135  L 213 131  L 211 128  L 208 124  L 206 121  L 203 118  L 200 114  L 197 111  L 194 109  L 191 107  L 187 104  L 184 102  L 180 99  L 177 97  L 173 95  L 0 0  L 5 3  L 9 5  L 13 8  L 17 11  L 22 15  L 26 17  L 30 21  L 33 25  L 37 29  L 41 33  L 43 36  L 46 40  L 49 45  L 52 50  L 54 55  L 57 60  L 61 70  L 64 81  L 68 92  L 71 104  L 74 114  L 225 157  L 225 157  N"/>
          </draw:custom-shape>
          <draw:custom-shape draw:style-name="gr949" draw:text-style-name="P195" draw:layer="layout" svg:width="0.67cm" svg:height="0.221cm" svg:x="20.342cm" svg:y="16.232cm">
            <text:p/>
            <draw:enhanced-geometry svg:viewBox="0 0 152 50" draw:type="non-primitive" draw:enhanced-path="M 149 43  L 150 46  L 151 49  L 0 4  L 0 3  L 0 0  L 149 43  L 149 43  N"/>
          </draw:custom-shape>
          <draw:custom-shape draw:style-name="gr950" draw:text-style-name="P81" draw:layer="layout" svg:width="0.675cm" svg:height="0.225cm" svg:x="20.342cm" svg:y="16.25cm">
            <text:p/>
            <draw:enhanced-geometry svg:viewBox="0 0 153 51" draw:type="non-primitive" draw:enhanced-path="M 151 45  L 152 50  L 0 6  L 0 0  L 151 45  L 151 45  L 151 45  N"/>
          </draw:custom-shape>
          <draw:custom-shape draw:style-name="gr951" draw:text-style-name="P196" draw:layer="layout" svg:width="0.688cm" svg:height="0.225cm" svg:x="20.342cm" svg:y="16.276cm">
            <text:p/>
            <draw:enhanced-geometry svg:viewBox="0 0 156 51" draw:type="non-primitive" draw:enhanced-path="M 152 44  L 153 45  L 155 50  L 1 6  L 0 0  L 152 44  L 152 44  N"/>
          </draw:custom-shape>
          <draw:custom-shape draw:style-name="gr952" draw:text-style-name="P31" draw:layer="layout" svg:width="0.684cm" svg:height="0.225cm" svg:x="20.346cm" svg:y="16.303cm">
            <text:p/>
            <draw:enhanced-geometry svg:viewBox="0 0 155 51" draw:type="non-primitive" draw:enhanced-path="M 153 44  L 154 49  L 154 50  L 0 5  L 0 0  L 0 0  L 153 44  L 153 44  L 153 44  N"/>
          </draw:custom-shape>
          <draw:custom-shape draw:style-name="gr953" draw:text-style-name="P198" draw:layer="layout" svg:width="0.693cm" svg:height="0.225cm" svg:x="20.346cm" svg:y="16.325cm">
            <text:p/>
            <draw:enhanced-geometry svg:viewBox="0 0 157 51" draw:type="non-primitive" draw:enhanced-path="M 154 45  L 156 50  L 0 5  L 0 0  L 154 45  L 154 45  N"/>
          </draw:custom-shape>
          <draw:custom-shape draw:style-name="gr954" draw:text-style-name="P199" draw:layer="layout" svg:width="0.697cm" svg:height="0.225cm" svg:x="20.346cm" svg:y="16.347cm">
            <text:p/>
            <draw:enhanced-geometry svg:viewBox="0 0 158 51" draw:type="non-primitive" draw:enhanced-path="M 156 45  L 156 49  L 157 50  L 1 5  L 1 5  L 0 0  L 156 45  L 156 45  N"/>
          </draw:custom-shape>
          <draw:custom-shape draw:style-name="gr955" draw:text-style-name="P200" draw:layer="layout" svg:width="0.692cm" svg:height="0.229cm" svg:x="20.351cm" svg:y="16.369cm">
            <text:p/>
            <draw:enhanced-geometry svg:viewBox="0 0 157 52" draw:type="non-primitive" draw:enhanced-path="M 155 45  L 156 51  L 0 6  L 0 0  L 156 45  L 156 45  L 155 45  N"/>
          </draw:custom-shape>
          <draw:custom-shape draw:style-name="gr956" draw:text-style-name="P164" draw:layer="layout" svg:width="0.701cm" svg:height="0.225cm" svg:x="20.351cm" svg:y="16.395cm">
            <text:p/>
            <draw:enhanced-geometry svg:viewBox="0 0 159 51" draw:type="non-primitive" draw:enhanced-path="M 156 45  L 158 48  L 158 50  L 1 5  L 0 0  L 156 45  L 156 45  N"/>
          </draw:custom-shape>
          <draw:custom-shape draw:style-name="gr957" draw:text-style-name="P202" draw:layer="layout" svg:width="0.697cm" svg:height="0.225cm" svg:x="20.355cm" svg:y="16.417cm">
            <text:p/>
            <draw:enhanced-geometry svg:viewBox="0 0 158 51" draw:type="non-primitive" draw:enhanced-path="M 156 45  L 157 50  L 0 5  L 0 4  L 0 0  L 156 45  L 156 45  L 156 45  N"/>
          </draw:custom-shape>
          <draw:custom-shape draw:style-name="gr958" draw:text-style-name="P203" draw:layer="layout" svg:width="0.697cm" svg:height="0.23cm" svg:x="20.355cm" svg:y="16.439cm">
            <text:p/>
            <draw:enhanced-geometry svg:viewBox="0 0 158 52" draw:type="non-primitive" draw:enhanced-path="M 157 45  L 157 49  L 157 51  L 0 5  L 0 0  L 157 45  L 157 45  L 157 45  N"/>
          </draw:custom-shape>
          <draw:custom-shape draw:style-name="gr959" draw:text-style-name="P205" draw:layer="layout" svg:width="0.701cm" svg:height="0.23cm" svg:x="20.351cm" svg:y="16.461cm">
            <text:p/>
            <draw:enhanced-geometry svg:viewBox="0 0 159 52" draw:type="non-primitive" draw:enhanced-path="M 158 46  L 158 51  L 0 5  L 1 0  L 158 46  L 158 46  N"/>
          </draw:custom-shape>
          <draw:custom-shape draw:style-name="gr960" draw:text-style-name="P206" draw:layer="layout" svg:width="0.701cm" svg:height="0.229cm" svg:x="20.351cm" svg:y="16.484cm">
            <text:p/>
            <draw:enhanced-geometry svg:viewBox="0 0 159 52" draw:type="non-primitive" draw:enhanced-path="M 158 46  L 158 51  L 0 5  L 0 3  L 0 0  L 158 46  L 158 46  L 158 46  N"/>
          </draw:custom-shape>
          <draw:custom-shape draw:style-name="gr961" draw:text-style-name="P207" draw:layer="layout" svg:width="0.701cm" svg:height="0.229cm" svg:x="20.351cm" svg:y="16.506cm">
            <text:p/>
            <draw:enhanced-geometry svg:viewBox="0 0 159 52" draw:type="non-primitive" draw:enhanced-path="M 158 46  L 158 46  L 158 51  L 0 6  L 0 0  L 158 46  L 158 46  L 158 46  N"/>
          </draw:custom-shape>
          <draw:custom-shape draw:style-name="gr962" draw:text-style-name="P208" draw:layer="layout" svg:width="0.706cm" svg:height="0.225cm" svg:x="20.346cm" svg:y="16.532cm">
            <text:p/>
            <draw:enhanced-geometry svg:viewBox="0 0 160 51" draw:type="non-primitive" draw:enhanced-path="M 159 45  L 159 50  L 0 5  L 1 0  L 159 45  L 159 45  L 159 45  N"/>
          </draw:custom-shape>
          <draw:custom-shape draw:style-name="gr963" draw:text-style-name="P210" draw:layer="layout" svg:width="0.706cm" svg:height="0.225cm" svg:x="20.346cm" svg:y="16.554cm">
            <text:p/>
            <draw:enhanced-geometry svg:viewBox="0 0 160 51" draw:type="non-primitive" draw:enhanced-path="M 159 45  L 159 47  L 159 50  L 0 4  L 0 1  L 0 0  L 159 45  L 159 45  N"/>
          </draw:custom-shape>
          <draw:custom-shape draw:style-name="gr964" draw:text-style-name="P211" draw:layer="layout" svg:width="0.706cm" svg:height="0.233cm" svg:x="20.346cm" svg:y="16.572cm">
            <text:p/>
            <draw:enhanced-geometry svg:viewBox="0 0 160 53" draw:type="non-primitive" draw:enhanced-path="M 159 46  L 159 52  L 0 5  L 0 0  L 159 46  L 159 46  N"/>
          </draw:custom-shape>
          <draw:custom-shape draw:style-name="gr965" draw:text-style-name="P212" draw:layer="layout" svg:width="0.71cm" svg:height="0.234cm" svg:x="20.342cm" svg:y="16.594cm">
            <text:p/>
            <draw:enhanced-geometry svg:viewBox="0 0 161 53" draw:type="non-primitive" draw:enhanced-path="M 160 47  L 160 50  L 159 52  L 0 6  L 1 0  L 160 47  L 160 47  L 160 47  N"/>
          </draw:custom-shape>
          <draw:custom-shape draw:style-name="gr966" draw:text-style-name="P214" draw:layer="layout" svg:width="0.71cm" svg:height="0.23cm" svg:x="20.342cm" svg:y="16.62cm">
            <text:p/>
            <draw:enhanced-geometry svg:viewBox="0 0 161 52" draw:type="non-primitive" draw:enhanced-path="M 160 46  L 160 51  L 0 4  L 1 0  L 1 0  L 160 46  L 160 46  L 160 46  N"/>
          </draw:custom-shape>
          <draw:custom-shape draw:style-name="gr967" draw:text-style-name="P215" draw:layer="layout" svg:width="0.71cm" svg:height="0.234cm" svg:x="20.342cm" svg:y="16.638cm">
            <text:p/>
            <draw:enhanced-geometry svg:viewBox="0 0 161 53" draw:type="non-primitive" draw:enhanced-path="M 160 47  L 159 50  L 159 52  L 0 6  L 0 0  L 160 47  L 160 47  L 160 47  N"/>
          </draw:custom-shape>
          <draw:custom-shape draw:style-name="gr968" draw:text-style-name="P216" draw:layer="layout" svg:width="0.71cm" svg:height="0.225cm" svg:x="20.333cm" svg:y="16.664cm">
            <text:p/>
            <draw:enhanced-geometry svg:viewBox="0 0 161 51" draw:type="non-primitive" draw:enhanced-path="M 160 46  L 159 50  L 0 5  L 1 3  L 1 0  L 160 46  L 160 46  L 160 46  N"/>
          </draw:custom-shape>
          <draw:custom-shape draw:style-name="gr969" draw:text-style-name="P217" draw:layer="layout" svg:width="0.71cm" svg:height="0.225cm" svg:x="20.329cm" svg:y="16.686cm">
            <text:p/>
            <draw:enhanced-geometry svg:viewBox="0 0 161 51" draw:type="non-primitive" draw:enhanced-path="M 160 45  L 160 50  L 160 50  L 0 5  L 1 0  L 160 45  L 160 45  L 160 45  N"/>
          </draw:custom-shape>
          <draw:custom-shape draw:style-name="gr970" draw:text-style-name="P219" draw:layer="layout" svg:width="0.715cm" svg:height="0.23cm" svg:x="20.324cm" svg:y="16.708cm">
            <text:p/>
            <draw:enhanced-geometry svg:viewBox="0 0 162 52" draw:type="non-primitive" draw:enhanced-path="M 161 45  L 160 51  L 0 5  L 1 0  L 161 45  L 161 45  N"/>
          </draw:custom-shape>
          <draw:custom-shape draw:style-name="gr971" draw:text-style-name="P220" draw:layer="layout" svg:width="0.714cm" svg:height="0.225cm" svg:x="20.32cm" svg:y="16.73cm">
            <text:p/>
            <draw:enhanced-geometry svg:viewBox="0 0 162 51" draw:type="non-primitive" draw:enhanced-path="M 161 46  L 160 50  L 0 5  L 1 2  L 1 0  L 161 46  L 161 46  N"/>
          </draw:custom-shape>
          <draw:custom-shape draw:style-name="gr972" draw:text-style-name="P36" draw:layer="layout" svg:width="0.71cm" svg:height="0.224cm" svg:x="20.32cm" svg:y="16.753cm">
            <text:p/>
            <draw:enhanced-geometry svg:viewBox="0 0 161 51" draw:type="non-primitive" draw:enhanced-path="M 160 45  L 159 50  L 0 4  L 0 0  L 160 45  L 160 45  L 160 45  N"/>
          </draw:custom-shape>
          <draw:custom-shape draw:style-name="gr973" draw:text-style-name="P166" draw:layer="layout" svg:width="0.719cm" svg:height="0.229cm" svg:x="20.311cm" svg:y="16.77cm">
            <text:p/>
            <draw:enhanced-geometry svg:viewBox="0 0 163 52" draw:type="non-primitive" draw:enhanced-path="M 162 46  L 159 51  L 0 5  L 1 0  L 162 46  L 162 46  L 162 46  N"/>
          </draw:custom-shape>
          <draw:custom-shape draw:style-name="gr974" draw:text-style-name="P167" draw:layer="layout" svg:width="0.71cm" svg:height="0.23cm" svg:x="20.307cm" svg:y="16.792cm">
            <text:p/>
            <draw:enhanced-geometry svg:viewBox="0 0 161 52" draw:type="non-primitive" draw:enhanced-path="M 160 46  L 160 47  L 160 51  L 0 5  L 1 0  L 160 46  L 160 46  N"/>
          </draw:custom-shape>
          <draw:custom-shape draw:style-name="gr975" draw:text-style-name="P168" draw:layer="layout" svg:width="0.719cm" svg:height="0.23cm" svg:x="20.298cm" svg:y="16.814cm">
            <text:p/>
            <draw:enhanced-geometry svg:viewBox="0 0 163 52" draw:type="non-primitive" draw:enhanced-path="M 162 46  L 160 51  L 0 4  L 2 0  L 162 46  L 162 46  N"/>
          </draw:custom-shape>
          <draw:custom-shape draw:style-name="gr976" draw:text-style-name="P169" draw:layer="layout" svg:width="0.71cm" svg:height="0.229cm" svg:x="20.298cm" svg:y="16.832cm">
            <text:p/>
            <draw:enhanced-geometry svg:viewBox="0 0 161 52" draw:type="non-primitive" draw:enhanced-path="M 160 47  L 160 48  L 159 51  L 0 5  L 0 3  L 0 0  L 160 47  L 160 47  N"/>
          </draw:custom-shape>
          <draw:custom-shape draw:style-name="gr977" draw:text-style-name="P171" draw:layer="layout" svg:width="0.723cm" svg:height="0.229cm" svg:x="20.285cm" svg:y="16.854cm">
            <text:p/>
            <draw:enhanced-geometry svg:viewBox="0 0 164 52" draw:type="non-primitive" draw:enhanced-path="M 163 46  L 161 51  L 0 5  L 2 0  L 163 46  L 163 46  N"/>
          </draw:custom-shape>
          <draw:custom-shape draw:style-name="gr978" draw:text-style-name="P172" draw:layer="layout" svg:width="0.719cm" svg:height="0.229cm" svg:x="20.28cm" svg:y="16.876cm">
            <text:p/>
            <draw:enhanced-geometry svg:viewBox="0 0 163 52" draw:type="non-primitive" draw:enhanced-path="M 162 46  L 161 47  L 159 51  L 0 5  L 1 0  L 162 46  L 162 46  N"/>
          </draw:custom-shape>
          <draw:custom-shape draw:style-name="gr979" draw:text-style-name="P173" draw:layer="layout" svg:width="0.71cm" svg:height="0.225cm" svg:x="20.276cm" svg:y="16.898cm">
            <text:p/>
            <draw:enhanced-geometry svg:viewBox="0 0 161 51" draw:type="non-primitive" draw:enhanced-path="M 160 46  L 159 50  L 0 4  L 1 0  L 1 0  L 160 46  L 160 46  L 160 46  N"/>
          </draw:custom-shape>
          <draw:custom-shape draw:style-name="gr980" draw:text-style-name="P175" draw:layer="layout" svg:width="0.723cm" svg:height="0.229cm" svg:x="20.263cm" svg:y="16.916cm">
            <text:p/>
            <draw:enhanced-geometry svg:viewBox="0 0 164 52" draw:type="non-primitive" draw:enhanced-path="M 163 46  L 161 47  L 160 51  L 0 5  L 2 0  L 163 46  L 163 46  N"/>
          </draw:custom-shape>
          <draw:custom-shape draw:style-name="gr981" draw:text-style-name="P176" draw:layer="layout" svg:width="0.719cm" svg:height="0.229cm" svg:x="20.254cm" svg:y="16.938cm">
            <text:p/>
            <draw:enhanced-geometry svg:viewBox="0 0 163 52" draw:type="non-primitive" draw:enhanced-path="M 162 46  L 160 51  L 0 5  L 2 3  L 2 0  L 162 46  L 162 46  N"/>
          </draw:custom-shape>
          <draw:custom-shape draw:style-name="gr982" draw:text-style-name="P177" draw:layer="layout" svg:width="0.71cm" svg:height="0.225cm" svg:x="20.254cm" svg:y="16.96cm">
            <text:p/>
            <draw:enhanced-geometry svg:viewBox="0 0 161 51" draw:type="non-primitive" draw:enhanced-path="M 160 45  L 160 46  L 157 50  L 0 4  L 0 0  L 160 46  L 160 46  L 160 45  N"/>
          </draw:custom-shape>
          <draw:custom-shape draw:style-name="gr983" draw:text-style-name="P178" draw:layer="layout" svg:width="0.71cm" svg:height="0.23cm" svg:x="20.241cm" svg:y="16.977cm">
            <text:p/>
            <draw:enhanced-geometry svg:viewBox="0 0 161 52" draw:type="non-primitive" draw:enhanced-path="M 160 46  L 158 50  L 158 51  L 0 5  L 2 0  L 160 46  L 160 46  N"/>
          </draw:custom-shape>
          <draw:custom-shape draw:style-name="gr984" draw:text-style-name="P180" draw:layer="layout" svg:width="0.71cm" svg:height="0.225cm" svg:x="20.232cm" svg:y="16.999cm">
            <text:p/>
            <draw:enhanced-geometry svg:viewBox="0 0 161 51" draw:type="non-primitive" draw:enhanced-path="M 160 46  L 158 50  L 0 5  L 2 0  L 160 46  L 160 46  L 160 46  N"/>
          </draw:custom-shape>
          <draw:custom-shape draw:style-name="gr985" draw:text-style-name="P181" draw:layer="layout" svg:width="0.714cm" svg:height="0.22cm" svg:x="20.219cm" svg:y="17.022cm">
            <text:p/>
            <draw:enhanced-geometry svg:viewBox="0 0 162 50" draw:type="non-primitive" draw:enhanced-path="M 161 45  L 159 49  L 158 49  L 0 4  L 2 0  L 161 45  L 161 45  L 161 45  N"/>
          </draw:custom-shape>
          <draw:custom-shape draw:style-name="gr986" draw:text-style-name="P182" draw:layer="layout" svg:width="0.71cm" svg:height="0.225cm" svg:x="20.21cm" svg:y="17.039cm">
            <text:p/>
            <draw:enhanced-geometry svg:viewBox="0 0 161 51" draw:type="non-primitive" draw:enhanced-path="M 160 45  L 157 50  L 0 5  L 1 2  L 2 0  L 160 45  L 160 45  L 160 45  N"/>
          </draw:custom-shape>
          <draw:custom-shape draw:style-name="gr987" draw:text-style-name="P184" draw:layer="layout" svg:width="1.353cm" svg:height="0.516cm" svg:x="19.553cm" svg:y="17.061cm">
            <text:p/>
            <draw:enhanced-geometry svg:viewBox="0 0 307 117" draw:type="non-primitive" draw:enhanced-path="M 306 45  L 305 48  L 299 55  L 294 62  L 287 69  L 285 71  L 282 73  L 280 76  L 278 77  L 276 80  L 272 81  L 270 83  L 268 85  L 265 87  L 263 89  L 260 90  L 257 92  L 254 94  L 251 96  L 249 97  L 246 99  L 242 100  L 239 102  L 236 103  L 233 104  L 230 106  L 227 107  L 224 108  L 220 109  L 218 111  L 214 111  L 211 112  L 208 114  L 204 114  L 201 115  L 197 116  L 194 116  L 0 103  L 3 102  L 8 101  L 12 100  L 17 99  L 21 97  L 25 97  L 29 95  L 33 94  L 37 92  L 41 90  L 45 89  L 49 88  L 53 86  L 57 84  L 60 83  L 64 81  L 68 79  L 71 77  L 75 75  L 78 73  L 82 71  L 85 69  L 89 66  L 92 64  L 95 62  L 98 59  L 102 56  L 104 54  L 107 51  L 111 48  L 114 46  L 116 43  L 124 35  L 131 26  L 138 17  L 145 7  L 148 0  L 306 45  L 306 45  N"/>
          </draw:custom-shape>
          <draw:custom-shape draw:style-name="gr988" draw:text-style-name="P164" draw:layer="layout" svg:width="1.874cm" svg:height="1.332cm" svg:x="18.393cm" svg:y="13.829cm">
            <text:p/>
            <draw:enhanced-geometry svg:viewBox="0 0 425 302" draw:type="non-primitive" draw:enhanced-path="M 0 300  L 0 298  L 2 287  L 4 277  L 7 266  L 10 256  L 13 246  L 17 236  L 20 227  L 25 218  L 30 210  L 35 200  L 41 193  L 47 185  L 50 180  L 54 176  L 58 172  L 62 167  L 67 162  L 71 159  L 76 155  L 81 151  L 85 147  L 90 144  L 95 139  L 100 136  L 105 132  L 111 129  L 116 126  L 122 122  L 122 101  L 122 80  L 122 58  L 122 36  L 125 36  L 128 35  L 130 35  L 133 34  L 135 33  L 138 33  L 140 32  L 142 31  L 145 30  L 148 30  L 151 29  L 153 28  L 155 28  L 158 27  L 161 26  L 164 26  L 164 46  L 164 66  L 164 85  L 164 105  L 166 104  L 168 103  L 170 103  L 171 102  L 174 101  L 176 101  L 178 101  L 180 99  L 183 99  L 185 98  L 187 98  L 189 97  L 192 96  L 194 96  L 196 95  L 198 95  L 201 94  L 203 94  L 206 94  L 209 93  L 211 92  L 213 92  L 216 92  L 218 91  L 218 71  L 218 51  L 218 31  L 218 11  L 221 11  L 224 10  L 227 9  L 230 9  L 232 8  L 235 7  L 237 7  L 240 6  L 243 5  L 246 4  L 249 4  L 251 3  L 254 2  L 256 2  L 259 1  L 263 0  L 263 22  L 263 44  L 263 66  L 263 87  L 269 87  L 276 88  L 283 88  L 289 89  L 296 91  L 303 92  L 309 94  L 315 96  L 321 98  L 327 101  L 333 103  L 339 106  L 344 108  L 349 112  L 354 115  L 360 119  L 367 125  L 374 132  L 380 140  L 386 148  L 391 156  L 397 165  L 401 175  L 405 185  L 410 195  L 413 207  L 415 218  L 418 230  L 420 243  L 422 256  L 423 269  L 424 284  L 419 285  L 416 285  L 412 285  L 408 286  L 404 287  L 400 287  L 397 288  L 393 289  L 390 289  L 386 290  L 382 291  L 378 291  L 374 292  L 371 292  L 367 293  L 363 294  L 360 295  L 356 295  L 352 296  L 348 297  L 345 297  L 341 298  L 337 298  L 334 299  L 330 299  L 327 300  L 325 301  L 304 301  L 304 297  L 303 291  L 302 285  L 301 278  L 299 273  L 298 267  L 296 262  L 294 257  L 292 252  L 289 248  L 287 244  L 284 240  L 281 236  L 277 233  L 275 230  L 271 227  L 270 226  L 269 226  L 268 225  L 266 224  L 266 224  L 265 223  L 263 222  L 263 221  L 263 266  L 263 301  L 218 301  L 218 300  L 218 255  L 218 210  L 217 210  L 216 210  L 213 210  L 212 210  L 210 210  L 208 210  L 206 211  L 204 211  L 202 212  L 201 212  L 199 212  L 197 212  L 195 212  L 193 213  L 191 213  L 189 213  L 187 214  L 185 214  L 184 214  L 182 215  L 180 215  L 179 216  L 178 217  L 176 217  L 174 217  L 173 217  L 171 218  L 169 219  L 168 219  L 166 219  L 165 220  L 164 220  L 164 261  L 164 301  L 122 301  L 122 277  L 122 247  L 121 248  L 121 249  L 120 250  L 119 250  L 114 257  L 109 264  L 105 272  L 102 280  L 100 289  L 97 298  L 97 301  L 0 301  L 0 301  L 0 300  N"/>
          </draw:custom-shape>
          <draw:custom-shape draw:style-name="gr989" draw:text-style-name="P164" draw:layer="layout" svg:width="0.463cm" svg:height="0.075cm" svg:x="18.362cm" svg:y="16.528cm">
            <text:p/>
            <draw:enhanced-geometry svg:viewBox="0 0 105 17" draw:type="non-primitive" draw:enhanced-path="M 0 16  L 3 16  L 7 16  L 10 16  L 12 16  L 16 16  L 19 14  L 22 14  L 25 12  L 29 12  L 31 12  L 35 12  L 38 10  L 41 10  L 44 10  L 47 8  L 50 8  L 54 8  L 57 6  L 60 6  L 64 6  L 67 6  L 70 6  L 73 4  L 76 4  L 80 2  L 83 2  L 86 2  L 90 2  L 93 2  L 96 0  L 100 0  L 102 0  L 104 12  L 104 16  L 0 16  L 0 16  N"/>
          </draw:custom-shape>
          <draw:custom-shape draw:style-name="gr990" draw:text-style-name="P164" draw:layer="layout" svg:width="1.98cm" svg:height="1.411cm" svg:x="18.38cm" svg:y="15.156cm">
            <text:p/>
            <draw:enhanced-geometry svg:viewBox="0 0 449 320" draw:type="non-primitive" draw:enhanced-path="M 125 319  L 125 299  L 125 257  L 125 214  L 119 213  L 114 211  L 108 211  L 103 208  L 98 207  L 93 206  L 88 204  L 84 202  L 79 200  L 75 198  L 71 196  L 67 194  L 63 192  L 60 190  L 57 188  L 54 186  L 51 184  L 48 181  L 45 178  L 42 175  L 39 173  L 37 169  L 33 166  L 31 163  L 29 159  L 26 155  L 24 152  L 22 147  L 20 144  L 18 140  L 16 136  L 15 132  L 11 122  L 8 112  L 6 102  L 3 92  L 2 80  L 1 69  L 1 57  L 0 44  L 1 32  L 1 20  L 2 9  L 3 0  L 100 0  L 99 8  L 98 18  L 99 22  L 99 25  L 100 28  L 100 31  L 101 34  L 103 38  L 104 41  L 105 44  L 108 47  L 109 50  L 111 52  L 114 55  L 116 57  L 119 60  L 122 62  L 125 64  L 125 35  L 125 5  L 125 0  L 167 0  L 167 0  L 167 41  L 167 81  L 168 81  L 169 81  L 171 82  L 172 82  L 174 82  L 176 83  L 177 83  L 179 83  L 181 83  L 182 83  L 183 84  L 185 84  L 187 85  L 188 85  L 190 85  L 192 85  L 194 86  L 196 86  L 198 86  L 200 86  L 202 87  L 205 87  L 207 87  L 208 88  L 210 88  L 212 88  L 214 88  L 215 88  L 217 88  L 219 89  L 220 89  L 221 89  L 221 44  L 221 0  L 266 0  L 266 10  L 266 54  L 266 98  L 270 99  L 275 100  L 279 101  L 283 102  L 287 102  L 291 103  L 295 104  L 299 105  L 302 106  L 305 107  L 309 108  L 311 109  L 315 109  L 317 110  L 320 111  L 323 111  L 325 112  L 329 114  L 332 114  L 335 116  L 339 116  L 342 118  L 344 119  L 348 120  L 351 121  L 354 122  L 356 123  L 359 125  L 362 126  L 365 128  L 367 129  L 370 130  L 375 133  L 379 135  L 383 138  L 387 141  L 392 145  L 396 147  L 400 151  L 403 155  L 407 159  L 411 163  L 413 166  L 416 170  L 419 175  L 422 180  L 424 185  L 427 190  L 431 200  L 434 211  L 438 222  L 441 234  L 444 247  L 446 260  L 447 275  L 448 290  L 447 304  L 446 318  L 446 319  L 320 319  L 320 319  L 320 314  L 319 309  L 318 304  L 316 299  L 315 295  L 313 290  L 309 286  L 306 281  L 302 277  L 299 273  L 294 269  L 289 265  L 284 261  L 278 258  L 272 255  L 266 251  L 266 290  L 266 319  L 221 319  L 221 281  L 221 235  L 219 234  L 216 234  L 214 233  L 211 232  L 208 231  L 205 231  L 202 229  L 199 229  L 196 228  L 193 227  L 190 227  L 186 227  L 183 226  L 181 225  L 177 225  L 174 224  L 173 224  L 171 222  L 171 222  L 169 222  L 169 222  L 168 222  L 167 222  L 167 222  L 167 269  L 167 316  L 167 319  L 125 319  L 125 319  N"/>
          </draw:custom-shape>
          <draw:custom-shape draw:style-name="gr989" draw:text-style-name="P164" draw:layer="layout" svg:width="0.097cm" svg:height="0.075cm" svg:x="19.734cm" svg:y="15.152cm">
            <text:p/>
            <draw:enhanced-geometry svg:viewBox="0 0 22 17" draw:type="non-primitive" draw:enhanced-path="M 0 0  L 1 16  L 4 12  L 8 8  L 11 8  L 16 8  L 19 4  L 21 4  L 0 4  L 0 4  L 0 0  N"/>
          </draw:custom-shape>
          <draw:custom-shape draw:style-name="gr991" draw:text-style-name="P164" draw:layer="layout" svg:width="1.989cm" svg:height="0.463cm" svg:x="18.362cm" svg:y="16.563cm">
            <text:p/>
            <draw:enhanced-geometry svg:viewBox="0 0 451 105" draw:type="non-primitive" draw:enhanced-path="M 19 104  L 15 94  L 12 84  L 10 73  L 7 62  L 5 51  L 3 38  L 2 26  L 0 14  L 0 0  L 104 0  L 104 3  L 105 9  L 107 14  L 108 19  L 109 24  L 111 30  L 112 34  L 114 39  L 116 43  L 118 47  L 119 51  L 122 55  L 124 59  L 126 62  L 129 66  L 129 23  L 129 0  L 171 0  L 171 45  L 171 92  L 173 92  L 176 94  L 179 94  L 182 95  L 185 96  L 188 97  L 192 97  L 194 97  L 198 98  L 202 98  L 205 98  L 209 98  L 212 98  L 216 98  L 220 98  L 223 98  L 224 98  L 225 98  L 225 98  L 225 98  L 225 52  L 225 7  L 225 0  L 270 0  L 270 10  L 270 49  L 270 88  L 272 87  L 273 87  L 275 85  L 277 85  L 280 84  L 282 83  L 283 81  L 286 80  L 287 79  L 289 78  L 291 77  L 293 75  L 294 74  L 296 73  L 298 71  L 300 70  L 306 63  L 310 56  L 315 48  L 318 39  L 321 31  L 322 20  L 324 10  L 324 0  L 450 0  L 449 13  L 448 26  L 445 40  L 442 52  L 438 64  L 435 76  L 431 88  L 426 99  L 423 104  L 19 104  L 19 104  L 19 104  N"/>
          </draw:custom-shape>
          <draw:custom-shape draw:style-name="gr992" draw:text-style-name="P164" draw:layer="layout" svg:width="1.79cm" svg:height="0.78cm" svg:x="18.446cm" svg:y="17.022cm">
            <text:p/>
            <draw:enhanced-geometry svg:viewBox="0 0 406 177" draw:type="non-primitive" draw:enhanced-path="M 0 0  L 0 1  L 5 10  L 8 19  L 14 28  L 19 38  L 24 45  L 31 53  L 37 61  L 41 65  L 45 68  L 48 72  L 52 75  L 57 79  L 61 82  L 65 85  L 70 88  L 75 91  L 79 94  L 84 96  L 89 99  L 95 101  L 100 103  L 105 105  L 110 107  L 110 124  L 110 141  L 110 158  L 110 176  L 113 176  L 116 176  L 118 176  L 121 176  L 123 176  L 126 176  L 128 176  L 130 176  L 133 176  L 136 176  L 139 176  L 141 176  L 143 176  L 146 176  L 149 176  L 152 176  L 152 160  L 152 146  L 152 131  L 152 115  L 154 116  L 156 116  L 159 116  L 161 116  L 164 117  L 166 117  L 169 117  L 172 118  L 174 118  L 177 118  L 180 118  L 183 118  L 185 118  L 187 118  L 190 118  L 193 118  L 194 118  L 197 118  L 198 118  L 200 118  L 201 118  L 204 118  L 205 118  L 206 117  L 206 132  L 206 146  L 206 161  L 206 176  L 209 176  L 212 176  L 215 176  L 218 176  L 220 176  L 223 176  L 225 176  L 228 176  L 231 176  L 234 176  L 237 176  L 239 176  L 242 176  L 244 176  L 247 176  L 251 176  L 251 160  L 251 144  L 251 128  L 251 112  L 254 111  L 259 110  L 263 109  L 268 108  L 272 106  L 276 106  L 280 104  L 284 103  L 288 101  L 292 99  L 296 98  L 300 97  L 304 95  L 308 93  L 311 92  L 315 90  L 319 88  L 322 86  L 326 84  L 329 82  L 333 80  L 336 78  L 340 75  L 343 73  L 346 71  L 349 68  L 353 65  L 355 63  L 358 60  L 362 57  L 365 55  L 367 52  L 375 44  L 382 35  L 389 26  L 396 16  L 401 6  L 405 0  L 0 0  L 0 0  L 0 0  N"/>
          </draw:custom-shape>
          <draw:custom-shape draw:style-name="gr993" draw:text-style-name="P36" draw:layer="layout" svg:width="0.952cm" svg:height="0.34cm" svg:x="18.768cm" svg:y="14.296cm">
            <text:p/>
            <draw:enhanced-geometry svg:viewBox="0 0 216 77" draw:type="non-primitive" draw:enhanced-path="M 0 57  L 215 0  L 215 21  L 0 76  L 0 57  L 0 57  L 0 57  N"/>
          </draw:custom-shape>
          <draw:custom-shape draw:style-name="gr994" draw:text-style-name="P36" draw:layer="layout" svg:width="1.306cm" svg:height="0.415cm" svg:x="18.622cm" svg:y="14.393cm">
            <text:p/>
            <draw:enhanced-geometry svg:viewBox="0 0 296 94" draw:type="non-primitive" draw:enhanced-path="M 0 74  L 295 0  L 295 22  L 1 93  L 1 74  L 1 74  L 0 74  N"/>
          </draw:custom-shape>
          <draw:custom-shape draw:style-name="gr121" draw:text-style-name="P16" draw:layer="layout" svg:width="0.092cm" svg:height="0.101cm" svg:x="18.499cm" svg:y="14.054cm">
            <text:p/>
            <draw:enhanced-geometry svg:viewBox="0 0 21 23" draw:type="non-primitive" draw:enhanced-path="M 4 0  L 18 1  L 20 1  L 20 1  L 20 1  L 20 2  L 16 20  L 16 21  L 14 21  L 14 22  L 14 22  L 10 21  L 10 21  L 8 21  L 6 20  L 6 20  L 0 2  L 0 1  L 2 1  L 2 1  L 4 1  L 4 1  L 4 0  N"/>
          </draw:custom-shape>
          <draw:custom-shape draw:style-name="gr995" draw:text-style-name="P221" draw:layer="layout" svg:width="0.092cm" svg:height="0.097cm" svg:x="18.499cm" svg:y="14.058cm">
            <text:p/>
            <draw:enhanced-geometry svg:viewBox="0 0 21 22" draw:type="non-primitive" draw:enhanced-path="M 4 0  L 4 0  L 6 0  L 8 0  L 8 0  L 10 0  L 12 0  L 14 0  L 18 0  L 20 0  L 20 0  L 20 0  L 20 1  L 20 4  L 20 7  L 18 11  L 16 19  L 16 20  L 14 20  L 14 21  L 14 21  L 12 21  L 12 21  L 12 21  L 10 20  L 10 20  L 8 20  L 6 19  L 6 19  L 4 16  L 4 13  L 4 9  L 0 1  L 0 0  L 2 0  L 4 0  L 4 0  L 4 0  N"/>
          </draw:custom-shape>
          <draw:custom-shape draw:style-name="gr996" draw:text-style-name="P222" draw:layer="layout" svg:width="0.093cm" svg:height="0.097cm" svg:x="18.503cm" svg:y="14.058cm">
            <text:p/>
            <draw:enhanced-geometry svg:viewBox="0 0 21 22" draw:type="non-primitive" draw:enhanced-path="M 2 0  L 2 0  L 4 0  L 6 0  L 6 0  L 8 0  L 11 0  L 13 0  L 17 0  L 17 0  L 20 0  L 20 1  L 20 2  L 20 4  L 20 7  L 17 11  L 15 19  L 15 20  L 13 20  L 13 21  L 11 21  L 11 21  L 11 21  L 11 21  L 8 20  L 8 20  L 6 20  L 6 19  L 4 19  L 4 16  L 2 13  L 2 9  L 0 2  L 0 1  L 0 0  L 2 0  L 2 0  L 2 0  L 2 0  N"/>
          </draw:custom-shape>
          <draw:custom-shape draw:style-name="gr997" draw:text-style-name="P223" draw:layer="layout" svg:width="0.093cm" svg:height="0.097cm" svg:x="18.503cm" svg:y="14.058cm">
            <text:p/>
            <draw:enhanced-geometry svg:viewBox="0 0 21 22" draw:type="non-primitive" draw:enhanced-path="M 2 0  L 2 0  L 4 0  L 6 0  L 6 0  L 8 0  L 11 0  L 13 0  L 15 0  L 17 0  L 20 1  L 20 2  L 20 2  L 20 5  L 17 7  L 17 11  L 15 19  L 13 20  L 13 20  L 13 21  L 11 21  L 11 21  L 11 21  L 11 21  L 8 20  L 8 20  L 6 20  L 6 19  L 4 19  L 4 16  L 2 13  L 2 9  L 0 2  L 0 1  L 0 1  L 2 0  L 2 0  L 2 0  L 2 0  N"/>
          </draw:custom-shape>
          <draw:custom-shape draw:style-name="gr998" draw:text-style-name="P224" draw:layer="layout" svg:width="0.093cm" svg:height="0.092cm" svg:x="18.503cm" svg:y="14.063cm">
            <text:p/>
            <draw:enhanced-geometry svg:viewBox="0 0 21 21" draw:type="non-primitive" draw:enhanced-path="M 2 0  L 2 0  L 4 0  L 6 0  L 6 0  L 8 0  L 11 0  L 13 0  L 15 0  L 17 0  L 17 1  L 20 1  L 20 1  L 20 4  L 17 7  L 17 11  L 15 18  L 13 19  L 13 19  L 13 20  L 11 20  L 11 20  L 11 20  L 11 20  L 8 19  L 8 19  L 6 19  L 6 18  L 6 18  L 4 15  L 2 12  L 2 8  L 0 1  L 0 1  L 0 1  L 2 0  L 2 0  L 2 0  L 2 0  N"/>
          </draw:custom-shape>
          <draw:custom-shape draw:style-name="gr999" draw:text-style-name="P195" draw:layer="layout" svg:width="0.093cm" svg:height="0.088cm" svg:x="18.503cm" svg:y="14.067cm">
            <text:p/>
            <draw:enhanced-geometry svg:viewBox="0 0 21 20" draw:type="non-primitive" draw:enhanced-path="M 2 0  L 2 0  L 5 0  L 7 0  L 7 0  L 10 0  L 12 0  L 12 0  L 17 0  L 17 0  L 20 0  L 20 0  L 20 0  L 20 4  L 20 6  L 17 10  L 15 17  L 15 18  L 15 18  L 15 19  L 12 19  L 12 19  L 12 19  L 12 19  L 10 18  L 10 18  L 7 18  L 7 17  L 7 17  L 5 14  L 2 12  L 2 8  L 0 0  L 0 0  L 2 0  L 2 0  L 2 0  L 2 0  N"/>
          </draw:custom-shape>
          <draw:custom-shape draw:style-name="gr1000" draw:text-style-name="P198" draw:layer="layout" svg:width="0.093cm" svg:height="0.088cm" svg:x="18.503cm" svg:y="14.067cm">
            <text:p/>
            <draw:enhanced-geometry svg:viewBox="0 0 21 20" draw:type="non-primitive" draw:enhanced-path="M 2 0  L 5 0  L 5 0  L 7 0  L 7 0  L 10 0  L 12 0  L 12 0  L 17 0  L 17 0  L 20 0  L 20 0  L 20 1  L 20 4  L 20 7  L 17 10  L 15 17  L 15 18  L 15 18  L 15 19  L 12 19  L 12 19  L 12 19  L 12 19  L 10 18  L 10 18  L 7 18  L 7 17  L 7 17  L 5 14  L 2 12  L 2 8  L 0 1  L 0 0  L 2 0  L 2 0  L 2 0  L 2 0  N"/>
          </draw:custom-shape>
          <draw:custom-shape draw:style-name="gr989" draw:text-style-name="P164" draw:layer="layout" svg:width="0.093cm" svg:height="0.088cm" svg:x="18.503cm" svg:y="14.067cm">
            <text:p/>
            <draw:enhanced-geometry svg:viewBox="0 0 21 20" draw:type="non-primitive" draw:enhanced-path="M 2 0  L 2 0  L 5 0  L 7 0  L 7 0  L 10 0  L 10 0  L 12 0  L 15 0  L 17 0  L 17 0  L 20 1  L 20 1  L 17 4  L 17 7  L 17 10  L 15 17  L 15 18  L 15 18  L 15 19  L 12 19  L 12 19  L 12 19  L 12 19  L 10 18  L 10 18  L 7 18  L 7 17  L 7 17  L 5 14  L 2 12  L 2 8  L 0 1  L 2 1  L 2 0  L 2 0  L 2 0  L 2 0  L 2 0  N"/>
          </draw:custom-shape>
          <draw:custom-shape draw:style-name="gr1001" draw:text-style-name="P205" draw:layer="layout" svg:width="0.093cm" svg:height="0.088cm" svg:x="18.512cm" svg:y="14.067cm">
            <text:p/>
            <draw:enhanced-geometry svg:viewBox="0 0 21 20" draw:type="non-primitive" draw:enhanced-path="M 0 0  L 0 0  L 2 0  L 5 0  L 5 0  L 8 0  L 8 0  L 11 0  L 14 0  L 17 0  L 17 0  L 17 1  L 20 2  L 17 5  L 17 7  L 17 10  L 14 17  L 14 18  L 14 18  L 14 19  L 11 19  L 11 19  L 11 19  L 11 19  L 8 18  L 8 18  L 5 18  L 5 17  L 5 17  L 2 14  L 2 12  L 0 8  L 0 2  L 0 1  L 0 0  L 0 0  L 0 0  L 0 0  N"/>
          </draw:custom-shape>
          <draw:custom-shape draw:style-name="gr1002" draw:text-style-name="P210" draw:layer="layout" svg:width="0.093cm" svg:height="0.088cm" svg:x="18.512cm" svg:y="14.067cm">
            <text:p/>
            <draw:enhanced-geometry svg:viewBox="0 0 21 20" draw:type="non-primitive" draw:enhanced-path="M 0 0  L 3 0  L 6 0  L 10 0  L 16 0  L 16 1  L 20 1  L 20 1  L 20 2  L 20 5  L 20 7  L 16 10  L 16 17  L 16 17  L 16 18  L 13 19  L 13 19  L 13 19  L 13 19  L 13 19  L 10 18  L 10 18  L 10 18  L 6 17  L 6 17  L 3 14  L 3 12  L 0 9  L 0 2  L 0 1  L 0 1  L 0 1  L 0 0  L 0 0  L 0 0  N"/>
          </draw:custom-shape>
          <draw:custom-shape draw:style-name="gr1003" draw:text-style-name="P214" draw:layer="layout" svg:width="0.093cm" svg:height="0.084cm" svg:x="18.512cm" svg:y="14.071cm">
            <text:p/>
            <draw:enhanced-geometry svg:viewBox="0 0 21 19" draw:type="non-primitive" draw:enhanced-path="M 0 0  L 3 0  L 6 0  L 10 0  L 16 0  L 16 0  L 20 1  L 20 1  L 20 1  L 20 4  L 20 6  L 16 9  L 16 16  L 16 16  L 16 17  L 13 18  L 13 18  L 13 18  L 13 18  L 13 18  L 10 17  L 10 17  L 10 17  L 6 16  L 6 16  L 3 13  L 3 11  L 0 8  L 0 1  L 0 1  L 0 1  L 0 0  L 0 0  L 0 0  L 0 0  N"/>
          </draw:custom-shape>
          <draw:custom-shape draw:style-name="gr1004" draw:text-style-name="P218" draw:layer="layout" svg:width="0.093cm" svg:height="0.079cm" svg:x="18.512cm" svg:y="14.076cm">
            <text:p/>
            <draw:enhanced-geometry svg:viewBox="0 0 21 18" draw:type="non-primitive" draw:enhanced-path="M 0 0  L 3 0  L 6 0  L 10 0  L 16 0  L 16 0  L 16 0  L 20 0  L 20 0  L 16 3  L 16 5  L 16 9  L 16 15  L 16 15  L 16 16  L 13 17  L 13 17  L 13 17  L 13 17  L 13 17  L 10 16  L 10 16  L 10 16  L 6 15  L 6 15  L 3 12  L 3 10  L 0 7  L 0 0  L 0 0  L 0 0  L 0 0  L 0 0  L 0 0  L 0 0  N"/>
          </draw:custom-shape>
          <draw:custom-shape draw:style-name="gr758" draw:text-style-name="P165" draw:layer="layout" svg:width="0.093cm" svg:height="0.079cm" svg:x="18.512cm" svg:y="14.076cm">
            <text:p/>
            <draw:enhanced-geometry svg:viewBox="0 0 21 18" draw:type="non-primitive" draw:enhanced-path="M 0 0  L 4 0  L 8 0  L 12 0  L 20 0  L 20 0  L 20 0  L 20 0  L 20 1  L 20 4  L 20 6  L 20 9  L 20 15  L 20 15  L 20 16  L 16 17  L 16 17  L 16 17  L 16 17  L 16 17  L 12 16  L 12 16  L 12 16  L 12 15  L 8 15  L 8 12  L 4 10  L 0 7  L 0 1  L 0 0  L 0 0  L 0 0  L 0 0  L 0 0  N"/>
          </draw:custom-shape>
          <draw:custom-shape draw:style-name="gr763" draw:text-style-name="P170" draw:layer="layout" svg:width="0.093cm" svg:height="0.079cm" svg:x="18.512cm" svg:y="14.076cm">
            <text:p/>
            <draw:enhanced-geometry svg:viewBox="0 0 21 18" draw:type="non-primitive" draw:enhanced-path="M 0 0  L 4 0  L 8 0  L 12 0  L 16 0  L 20 0  L 20 1  L 20 1  L 20 1  L 20 4  L 20 6  L 20 9  L 20 15  L 20 15  L 16 16  L 16 17  L 16 17  L 16 17  L 16 17  L 12 16  L 12 16  L 12 16  L 12 15  L 8 15  L 8 12  L 4 10  L 4 7  L 0 1  L 0 1  L 0 1  L 0 0  L 0 0  L 0 0  L 0 0  N"/>
          </draw:custom-shape>
          <draw:custom-shape draw:style-name="gr1005" draw:text-style-name="P174" draw:layer="layout" svg:width="0.093cm" svg:height="0.079cm" svg:x="18.512cm" svg:y="14.076cm">
            <text:p/>
            <draw:enhanced-geometry svg:viewBox="0 0 21 18" draw:type="non-primitive" draw:enhanced-path="M 0 0  L 4 0  L 8 0  L 12 0  L 16 0  L 16 1  L 20 1  L 20 1  L 20 2  L 20 5  L 20 6  L 20 10  L 20 15  L 20 15  L 16 16  L 16 16  L 16 17  L 16 17  L 16 17  L 12 16  L 12 16  L 12 16  L 12 15  L 8 15  L 8 12  L 8 11  L 4 7  L 0 2  L 0 1  L 0 1  L 0 1  L 0 0  L 0 0  N"/>
          </draw:custom-shape>
          <draw:custom-shape draw:style-name="gr1006" draw:text-style-name="P178" draw:layer="layout" svg:width="0.093cm" svg:height="0.075cm" svg:x="18.512cm" svg:y="14.08cm">
            <text:p/>
            <draw:enhanced-geometry svg:viewBox="0 0 21 17" draw:type="non-primitive" draw:enhanced-path="M 0 0  L 4 0  L 8 0  L 12 0  L 16 0  L 16 0  L 20 0  L 20 1  L 20 1  L 20 4  L 20 6  L 20 9  L 16 14  L 16 14  L 16 15  L 16 15  L 16 16  L 16 16  L 16 15  L 16 15  L 12 15  L 12 15  L 12 15  L 12 14  L 12 14  L 8 11  L 8 10  L 4 7  L 0 1  L 0 1  L 0 0  L 0 0  L 0 0  L 0 0  L 0 0  N"/>
          </draw:custom-shape>
          <draw:custom-shape draw:style-name="gr1007" draw:text-style-name="P183" draw:layer="layout" svg:width="0.093cm" svg:height="0.075cm" svg:x="18.512cm" svg:y="14.08cm">
            <text:p/>
            <draw:enhanced-geometry svg:viewBox="0 0 21 17" draw:type="non-primitive" draw:enhanced-path="M 4 0  L 4 0  L 8 0  L 12 0  L 16 0  L 16 1  L 16 1  L 20 1  L 20 2  L 16 4  L 16 6  L 16 9  L 16 14  L 16 14  L 16 15  L 16 15  L 16 16  L 16 16  L 16 15  L 16 15  L 12 15  L 12 15  L 12 15  L 12 14  L 12 14  L 8 11  L 8 10  L 4 7  L 0 2  L 0 1  L 0 1  L 0 1  L 4 0  L 4 0  L 4 0  N"/>
          </draw:custom-shape>
          <draw:custom-shape draw:style-name="gr880" draw:text-style-name="P187" draw:layer="layout" svg:width="0.093cm" svg:height="0.075cm" svg:x="18.512cm" svg:y="14.085cm">
            <text:p/>
            <draw:enhanced-geometry svg:viewBox="0 0 21 17" draw:type="non-primitive" draw:enhanced-path="M 5 0  L 5 0  L 10 0  L 15 0  L 20 0  L 20 0  L 20 0  L 20 1  L 20 1  L 20 3  L 20 5  L 20 8  L 20 13  L 20 13  L 20 14  L 20 14  L 20 16  L 20 14  L 15 14  L 15 14  L 15 14  L 15 14  L 15 13  L 15 13  L 10 11  L 10 9  L 5 6  L 0 1  L 0 1  L 0 0  L 0 0  L 5 0  L 5 0  L 5 0  N"/>
          </draw:custom-shape>
          <draw:custom-shape draw:style-name="gr790" draw:text-style-name="P190" draw:layer="layout" svg:width="0.093cm" svg:height="0.075cm" svg:x="18.512cm" svg:y="14.089cm">
            <text:p/>
            <draw:enhanced-geometry svg:viewBox="0 0 21 17" draw:type="non-primitive" draw:enhanced-path="M 5 0  L 5 0  L 10 0  L 15 0  L 20 0  L 20 0  L 20 0  L 20 0  L 20 0  L 20 2  L 20 4  L 20 8  L 20 13  L 20 13  L 20 14  L 20 14  L 20 16  L 20 14  L 20 14  L 15 14  L 15 14  L 15 14  L 15 13  L 15 13  L 15 11  L 10 9  L 5 5  L 0 0  L 0 0  L 0 0  L 0 0  L 5 0  L 5 0  N"/>
          </draw:custom-shape>
          <draw:custom-shape draw:style-name="gr1008" draw:text-style-name="P225" draw:layer="layout" svg:width="0.093cm" svg:height="0.075cm" svg:x="18.512cm" svg:y="14.089cm">
            <text:p/>
            <draw:enhanced-geometry svg:viewBox="0 0 21 17" draw:type="non-primitive" draw:enhanced-path="M 5 0  L 10 0  L 10 0  L 15 0  L 20 0  L 20 0  L 20 0  L 20 0  L 20 0  L 20 3  L 20 4  L 20 8  L 20 13  L 20 14  L 20 14  L 20 14  L 20 16  L 20 14  L 20 14  L 15 14  L 15 14  L 15 14  L 15 13  L 15 13  L 15 11  L 10 10  L 5 5  L 0 0  L 0 0  L 0 0  L 5 0  L 5 0  L 5 0  L 5 0  N"/>
          </draw:custom-shape>
          <draw:custom-shape draw:style-name="gr1009" draw:text-style-name="P226" draw:layer="layout" svg:width="0.093cm" svg:height="0.075cm" svg:x="18.512cm" svg:y="14.089cm">
            <text:p/>
            <draw:enhanced-geometry svg:viewBox="0 0 21 17" draw:type="non-primitive" draw:enhanced-path="M 5 0  L 10 0  L 10 0  L 15 0  L 15 0  L 20 0  L 20 0  L 20 1  L 20 1  L 20 3  L 20 6  L 20 8  L 20 14  L 20 16  L 20 16  L 20 16  L 20 16  L 20 16  L 15 16  L 15 16  L 15 16  L 15 14  L 15 14  L 15 12  L 10 11  L 10 7  L 0 1  L 0 0  L 5 0  L 5 0  L 5 0  L 5 0  N"/>
          </draw:custom-shape>
          <draw:custom-shape draw:style-name="gr1010" draw:text-style-name="P227" draw:layer="layout" svg:width="0.093cm" svg:height="0.075cm" svg:x="18.512cm" svg:y="14.089cm">
            <text:p/>
            <draw:enhanced-geometry svg:viewBox="0 0 21 17" draw:type="non-primitive" draw:enhanced-path="M 0 0  L 13 0  L 13 0  L 13 1  L 20 1  L 20 2  L 20 14  L 20 16  L 20 16  L 20 16  L 20 16  L 13 16  L 13 16  L 13 16  L 13 14  L 13 14  L 0 2  L 0 1  L 0 1  L 0 0  L 0 0  L 0 0  N"/>
          </draw:custom-shape>
          <draw:custom-shape draw:style-name="gr121" draw:text-style-name="P16" draw:layer="layout" svg:width="0.291cm" svg:height="0.075cm" svg:x="18.556cm" svg:y="14.155cm">
            <text:p/>
            <draw:enhanced-geometry svg:viewBox="0 0 66 17" draw:type="non-primitive" draw:enhanced-path="M 0 1  L 55 16  L 56 16  L 58 14  L 60 14  L 61 14  L 63 12  L 65 12  L 65 10  L 65 10  L 0 0  L 0 1  L 0 1  N"/>
          </draw:custom-shape>
          <draw:custom-shape draw:style-name="gr995" draw:text-style-name="P221" draw:layer="layout" svg:width="0.282cm" svg:height="0.075cm" svg:x="18.556cm" svg:y="14.155cm">
            <text:p/>
            <draw:enhanced-geometry svg:viewBox="0 0 64 17" draw:type="non-primitive" draw:enhanced-path="M 0 2  L 4 2  L 6 2  L 8 4  L 11 4  L 13 6  L 14 6  L 16 8  L 18 8  L 20 8  L 24 8  L 27 10  L 31 12  L 35 12  L 41 14  L 47 16  L 54 16  L 56 16  L 57 16  L 58 16  L 60 16  L 61 14  L 63 14  L 63 12  L 63 12  L 59 12  L 56 12  L 53 12  L 51 10  L 49 10  L 46 10  L 44 8  L 42 8  L 39 8  L 36 8  L 32 8  L 27 6  L 23 4  L 16 2  L 9 2  L 0 0  L 0 0  L 0 0  L 0 0  L 0 2  L 0 2  N"/>
          </draw:custom-shape>
          <draw:custom-shape draw:style-name="gr1011" draw:text-style-name="P228" draw:layer="layout" svg:width="0.278cm" svg:height="0.075cm" svg:x="18.556cm" svg:y="14.155cm">
            <text:p/>
            <draw:enhanced-geometry svg:viewBox="0 0 63 17" draw:type="non-primitive" draw:enhanced-path="M 0 2  L 4 2  L 6 2  L 8 4  L 10 4  L 13 6  L 14 6  L 16 6  L 18 8  L 20 8  L 23 8  L 27 8  L 30 10  L 34 12  L 40 12  L 46 14  L 53 16  L 55 16  L 56 16  L 58 16  L 59 16  L 60 14  L 61 14  L 62 12  L 61 12  L 58 12  L 55 12  L 52 12  L 50 10  L 48 10  L 46 8  L 44 8  L 41 8  L 38 8  L 35 8  L 31 6  L 27 6  L 22 4  L 16 2  L 8 2  L 0 0  L 0 0  L 0 0  L 0 0  L 0 2  L 0 2  N"/>
          </draw:custom-shape>
          <draw:custom-shape draw:style-name="gr1012" draw:text-style-name="P34" draw:layer="layout" svg:width="0.269cm" svg:height="0.075cm" svg:x="18.556cm" svg:y="14.155cm">
            <text:p/>
            <draw:enhanced-geometry svg:viewBox="0 0 61 17" draw:type="non-primitive" draw:enhanced-path="M 0 2  L 4 2  L 6 2  L 8 4  L 10 4  L 12 4  L 14 6  L 16 6  L 18 8  L 20 8  L 23 8  L 26 8  L 30 10  L 34 12  L 40 12  L 46 14  L 53 16  L 54 16  L 56 16  L 57 16  L 58 14  L 60 14  L 60 14  L 60 12  L 60 12  L 57 12  L 53 12  L 51 12  L 49 10  L 47 10  L 45 8  L 43 8  L 40 8  L 37 8  L 34 8  L 31 6  L 27 6  L 22 4  L 16 2  L 8 2  L 0 0  L 0 0  L 0 0  L 0 0  L 0 2  L 0 2  N"/>
          </draw:custom-shape>
          <draw:custom-shape draw:style-name="gr1013" draw:text-style-name="P229" draw:layer="layout" svg:width="0.269cm" svg:height="0.075cm" svg:x="18.556cm" svg:y="14.155cm">
            <text:p/>
            <draw:enhanced-geometry svg:viewBox="0 0 61 17" draw:type="non-primitive" draw:enhanced-path="M 0 2  L 3 2  L 6 2  L 8 4  L 10 4  L 12 4  L 13 6  L 16 6  L 18 8  L 20 8  L 23 8  L 26 8  L 30 10  L 34 12  L 39 12  L 45 14  L 52 16  L 53 16  L 54 16  L 56 16  L 57 14  L 58 14  L 59 12  L 60 12  L 59 12  L 56 12  L 53 12  L 51 10  L 48 10  L 46 10  L 44 8  L 42 8  L 39 8  L 37 8  L 34 8  L 30 6  L 26 6  L 21 4  L 16 2  L 8 2  L 0 0  L 0 0  L 0 0  L 0 0  L 0 2  L 0 2  N"/>
          </draw:custom-shape>
          <draw:custom-shape draw:style-name="gr1014" draw:text-style-name="P230" draw:layer="layout" svg:width="0.26cm" svg:height="0.075cm" svg:x="18.556cm" svg:y="14.155cm">
            <text:p/>
            <draw:enhanced-geometry svg:viewBox="0 0 59 17" draw:type="non-primitive" draw:enhanced-path="M 0 2  L 3 2  L 6 2  L 8 4  L 10 4  L 12 4  L 13 6  L 16 6  L 18 8  L 20 8  L 23 8  L 25 8  L 29 10  L 34 12  L 39 12  L 44 14  L 51 16  L 52 16  L 53 16  L 55 16  L 56 14  L 57 14  L 58 12  L 58 12  L 58 12  L 55 12  L 52 12  L 49 10  L 47 10  L 45 10  L 43 8  L 41 8  L 39 8  L 37 8  L 34 8  L 30 6  L 25 6  L 20 4  L 15 2  L 8 2  L 0 0  L 0 0  L 0 0  L 0 0  L 0 2  L 0 2  N"/>
          </draw:custom-shape>
          <draw:custom-shape draw:style-name="gr1015" draw:text-style-name="P196" draw:layer="layout" svg:width="0.256cm" svg:height="0.075cm" svg:x="18.556cm" svg:y="14.155cm">
            <text:p/>
            <draw:enhanced-geometry svg:viewBox="0 0 58 17" draw:type="non-primitive" draw:enhanced-path="M 0 2  L 3 2  L 6 2  L 8 2  L 10 4  L 12 4  L 13 6  L 16 6  L 17 8  L 20 8  L 22 8  L 25 8  L 29 10  L 33 12  L 38 12  L 44 14  L 51 16  L 51 16  L 53 16  L 54 14  L 55 14  L 56 14  L 57 12  L 57 12  L 57 12  L 53 12  L 51 12  L 49 10  L 46 10  L 44 10  L 42 8  L 40 8  L 38 8  L 35 8  L 32 8  L 29 6  L 25 6  L 20 4  L 15 2  L 8 2  L 0 0  L 0 0  L 0 0  L 0 0  L 0 2  L 0 2  N"/>
          </draw:custom-shape>
          <draw:custom-shape draw:style-name="gr1016" draw:text-style-name="P199" draw:layer="layout" svg:width="0.251cm" svg:height="0.075cm" svg:x="18.556cm" svg:y="14.155cm">
            <text:p/>
            <draw:enhanced-geometry svg:viewBox="0 0 57 17" draw:type="non-primitive" draw:enhanced-path="M 0 2  L 3 2  L 6 2  L 8 2  L 10 4  L 11 4  L 13 6  L 15 6  L 17 8  L 19 8  L 22 8  L 25 8  L 28 10  L 32 12  L 37 12  L 44 14  L 50 16  L 51 16  L 52 14  L 53 14  L 54 14  L 56 14  L 56 12  L 56 12  L 56 12  L 52 12  L 50 12  L 47 10  L 45 10  L 44 8  L 42 8  L 39 8  L 37 8  L 34 8  L 32 8  L 29 6  L 25 4  L 20 4  L 14 2  L 8 2  L 0 0  L 0 0  L 0 0  L 0 0  L 0 2  L 0 2  N"/>
          </draw:custom-shape>
          <draw:custom-shape draw:style-name="gr989" draw:text-style-name="P164" draw:layer="layout" svg:width="0.247cm" svg:height="0.075cm" svg:x="18.556cm" svg:y="14.155cm">
            <text:p/>
            <draw:enhanced-geometry svg:viewBox="0 0 56 17" draw:type="non-primitive" draw:enhanced-path="M 0 2  L 3 2  L 6 2  L 8 2  L 10 4  L 11 4  L 13 6  L 15 6  L 17 6  L 19 9  L 21 9  L 25 9  L 28 9  L 32 11  L 37 13  L 43 13  L 49 16  L 51 16  L 51 16  L 52 16  L 53 16  L 54 13  L 55 13  L 55 13  L 55 13  L 51 13  L 49 13  L 46 11  L 44 11  L 42 9  L 41 9  L 39 9  L 37 9  L 34 9  L 31 9  L 28 6  L 24 4  L 20 4  L 14 2  L 8 2  L 0 0  L 0 0  L 0 0  L 0 0  L 0 2  L 0 2  N"/>
          </draw:custom-shape>
          <draw:custom-shape draw:style-name="gr1001" draw:text-style-name="P205" draw:layer="layout" svg:width="0.247cm" svg:height="0.075cm" svg:x="18.556cm" svg:y="14.155cm">
            <text:p/>
            <draw:enhanced-geometry svg:viewBox="0 0 56 17" draw:type="non-primitive" draw:enhanced-path="M 0 2  L 3 2  L 6 2  L 8 2  L 10 4  L 11 4  L 13 4  L 15 6  L 17 6  L 19 9  L 21 9  L 24 9  L 27 9  L 32 11  L 37 13  L 42 13  L 49 16  L 50 16  L 51 16  L 51 16  L 53 16  L 53 13  L 53 13  L 55 13  L 53 13  L 51 13  L 48 11  L 46 11  L 44 9  L 42 9  L 40 9  L 38 9  L 36 9  L 34 9  L 30 9  L 27 6  L 23 4  L 19 4  L 14 2  L 8 2  L 0 0  L 0 0  L 0 0  L 0 0  L 0 2  L 0 2  N"/>
          </draw:custom-shape>
          <draw:custom-shape draw:style-name="gr1017" draw:text-style-name="P209" draw:layer="layout" svg:width="0.238cm" svg:height="0.075cm" svg:x="18.556cm" svg:y="14.155cm">
            <text:p/>
            <draw:enhanced-geometry svg:viewBox="0 0 54 17" draw:type="non-primitive" draw:enhanced-path="M 0 2  L 3 2  L 6 2  L 8 2  L 10 4  L 11 4  L 13 4  L 14 6  L 16 6  L 18 9  L 20 9  L 24 9  L 27 9  L 31 11  L 36 13  L 42 13  L 48 16  L 49 16  L 50 16  L 51 16  L 51 13  L 52 13  L 53 13  L 53 13  L 52 13  L 49 13  L 47 11  L 44 11  L 42 9  L 41 9  L 39 9  L 37 9  L 35 9  L 33 9  L 30 9  L 27 6  L 23 4  L 19 4  L 13 2  L 8 2  L 0 0  L 0 0  L 0 0  L 0 0  L 0 2  L 0 2  N"/>
          </draw:custom-shape>
          <draw:custom-shape draw:style-name="gr1018" draw:text-style-name="P213" draw:layer="layout" svg:width="0.229cm" svg:height="0.075cm" svg:x="18.556cm" svg:y="14.155cm">
            <text:p/>
            <draw:enhanced-geometry svg:viewBox="0 0 52 17" draw:type="non-primitive" draw:enhanced-path="M 0 2  L 3 2  L 6 2  L 7 2  L 9 4  L 11 4  L 13 4  L 14 6  L 16 6  L 18 9  L 20 9  L 23 9  L 27 9  L 30 11  L 35 13  L 41 13  L 47 16  L 48 16  L 49 16  L 50 16  L 51 13  L 51 13  L 51 13  L 51 13  L 51 13  L 49 13  L 46 11  L 44 11  L 42 9  L 40 9  L 38 9  L 37 9  L 34 9  L 32 9  L 30 9  L 26 6  L 23 4  L 18 4  L 13 2  L 7 2  L 0 0  L 0 0  L 0 0  L 0 0  L 0 2  L 0 2  N"/>
          </draw:custom-shape>
          <draw:custom-shape draw:style-name="gr1019" draw:text-style-name="P217" draw:layer="layout" svg:width="0.229cm" svg:height="0.075cm" svg:x="18.556cm" svg:y="14.155cm">
            <text:p/>
            <draw:enhanced-geometry svg:viewBox="0 0 52 17" draw:type="non-primitive" draw:enhanced-path="M 0 2  L 3 2  L 6 2  L 7 2  L 9 2  L 11 4  L 13 4  L 14 6  L 16 6  L 18 6  L 20 9  L 23 9  L 26 9  L 30 11  L 34 13  L 40 13  L 46 16  L 47 16  L 48 16  L 49 13  L 50 13  L 51 13  L 51 13  L 51 13  L 50 13  L 47 11  L 44 11  L 43 11  L 41 9  L 39 9  L 37 9  L 35 9  L 34 9  L 31 9  L 29 6  L 25 6  L 22 4  L 18 2  L 13 2  L 7 2  L 0 0  L 0 0  L 0 0  L 0 0  L 0 2  L 0 2  N"/>
          </draw:custom-shape>
          <draw:custom-shape draw:style-name="gr757" draw:text-style-name="P36" draw:layer="layout" svg:width="0.225cm" svg:height="0.075cm" svg:x="18.556cm" svg:y="14.155cm">
            <text:p/>
            <draw:enhanced-geometry svg:viewBox="0 0 51 17" draw:type="non-primitive" draw:enhanced-path="M 0 2  L 3 2  L 6 2  L 7 2  L 9 2  L 11 5  L 12 5  L 13 5  L 16 8  L 18 8  L 20 10  L 23 10  L 26 10  L 30 10  L 34 13  L 39 16  L 46 16  L 46 16  L 47 16  L 48 16  L 49 16  L 49 16  L 50 16  L 50 16  L 49 16  L 46 13  L 44 13  L 42 13  L 40 10  L 38 10  L 37 10  L 34 10  L 33 10  L 30 10  L 28 8  L 25 8  L 22 5  L 18 2  L 13 2  L 7 2  L 0 0  L 0 0  L 0 0  L 0 0  L 0 2  L 0 2  N"/>
          </draw:custom-shape>
          <draw:custom-shape draw:style-name="gr760" draw:text-style-name="P167" draw:layer="layout" svg:width="0.225cm" svg:height="0.075cm" svg:x="18.556cm" svg:y="14.155cm">
            <text:p/>
            <draw:enhanced-geometry svg:viewBox="0 0 51 17" draw:type="non-primitive" draw:enhanced-path="M 0 2  L 3 2  L 5 2  L 7 2  L 9 2  L 10 5  L 12 5  L 13 5  L 16 8  L 17 8  L 20 10  L 23 10  L 25 10  L 29 10  L 34 13  L 39 16  L 45 16  L 46 16  L 46 16  L 47 16  L 48 16  L 50 16  L 50 16  L 50 16  L 48 16  L 45 13  L 43 13  L 41 13  L 39 10  L 37 10  L 36 10  L 34 10  L 32 10  L 30 10  L 27 8  L 25 8  L 21 5  L 17 2  L 13 2  L 7 2  L 0 0  L 0 0  L 0 0  L 0 0  L 0 2  L 0 2  N"/>
          </draw:custom-shape>
          <draw:custom-shape draw:style-name="gr1020" draw:text-style-name="P171" draw:layer="layout" svg:width="0.212cm" svg:height="0.075cm" svg:x="18.556cm" svg:y="14.155cm">
            <text:p/>
            <draw:enhanced-geometry svg:viewBox="0 0 48 17" draw:type="non-primitive" draw:enhanced-path="M 0 2  L 3 2  L 5 2  L 7 2  L 8 2  L 10 5  L 12 5  L 13 5  L 15 8  L 17 8  L 19 10  L 22 10  L 25 10  L 29 10  L 33 13  L 38 16  L 44 16  L 46 16  L 47 16  L 47 16  L 46 16  L 44 13  L 42 13  L 40 10  L 38 10  L 37 10  L 34 10  L 33 10  L 31 10  L 29 10  L 27 8  L 24 8  L 20 5  L 17 2  L 12 2  L 6 2  L 0 0  L 0 0  L 0 0  L 0 0  L 0 2  L 0 2  N"/>
          </draw:custom-shape>
          <draw:custom-shape draw:style-name="gr1021" draw:text-style-name="P175" draw:layer="layout" svg:width="0.207cm" svg:height="0.075cm" svg:x="18.556cm" svg:y="14.155cm">
            <text:p/>
            <draw:enhanced-geometry svg:viewBox="0 0 47 17" draw:type="non-primitive" draw:enhanced-path="M 0 2  L 3 2  L 5 2  L 7 2  L 8 2  L 10 5  L 11 5  L 13 5  L 15 8  L 17 8  L 19 10  L 21 10  L 25 10  L 28 10  L 32 13  L 37 16  L 44 16  L 45 16  L 46 16  L 46 16  L 46 16  L 43 13  L 41 13  L 39 10  L 37 10  L 35 10  L 34 10  L 32 10  L 30 10  L 29 10  L 26 8  L 23 8  L 20 5  L 16 2  L 12 2  L 6 2  L 0 0  L 0 0  L 0 0  L 0 0  L 0 2  L 0 2  N"/>
          </draw:custom-shape>
          <draw:custom-shape draw:style-name="gr1022" draw:text-style-name="P179" draw:layer="layout" svg:width="0.203cm" svg:height="0.075cm" svg:x="18.556cm" svg:y="14.155cm">
            <text:p/>
            <draw:enhanced-geometry svg:viewBox="0 0 46 17" draw:type="non-primitive" draw:enhanced-path="M 0 2  L 3 2  L 5 2  L 6 2  L 8 2  L 10 5  L 11 5  L 13 5  L 15 5  L 16 8  L 19 8  L 21 10  L 24 10  L 27 10  L 32 10  L 37 13  L 43 16  L 44 16  L 45 16  L 45 16  L 44 13  L 42 13  L 40 10  L 38 10  L 36 10  L 34 10  L 33 10  L 32 10  L 30 10  L 27 10  L 25 8  L 23 8  L 20 5  L 16 2  L 11 2  L 6 2  L 0 0  L 0 0  L 0 0  L 0 0  L 0 2  L 0 2  N"/>
          </draw:custom-shape>
          <draw:custom-shape draw:style-name="gr1007" draw:text-style-name="P183" draw:layer="layout" svg:width="0.203cm" svg:height="0.075cm" svg:x="18.556cm" svg:y="14.155cm">
            <text:p/>
            <draw:enhanced-geometry svg:viewBox="0 0 46 17" draw:type="non-primitive" draw:enhanced-path="M 0 2  L 3 2  L 5 2  L 6 2  L 8 2  L 10 2  L 11 5  L 13 5  L 14 5  L 16 8  L 18 8  L 20 10  L 24 10  L 27 10  L 32 10  L 37 13  L 42 16  L 45 16  L 45 16  L 45 16  L 45 13  L 41 13  L 39 10  L 37 10  L 35 10  L 34 10  L 32 10  L 30 10  L 29 10  L 27 10  L 25 8  L 23 8  L 19 5  L 16 2  L 11 2  L 6 2  L 0 0  L 0 0  L 0 0  L 0 0  L 0 2  L 0 2  N"/>
          </draw:custom-shape>
          <draw:custom-shape draw:style-name="gr1023" draw:text-style-name="P186" draw:layer="layout" svg:width="0.194cm" svg:height="0.075cm" svg:x="18.556cm" svg:y="14.155cm">
            <text:p/>
            <draw:enhanced-geometry svg:viewBox="0 0 44 17" draw:type="non-primitive" draw:enhanced-path="M 0 2  L 3 2  L 5 2  L 6 2  L 8 2  L 10 2  L 11 5  L 13 5  L 14 5  L 16 8  L 18 8  L 20 8  L 23 10  L 27 10  L 31 10  L 36 13  L 42 16  L 42 16  L 43 16  L 43 16  L 42 13  L 40 13  L 38 10  L 36 10  L 34 10  L 33 10  L 32 10  L 30 10  L 28 10  L 27 8  L 24 8  L 22 5  L 19 5  L 16 2  L 11 2  L 6 2  L 0 0  L 0 0  L 0 0  L 0 0  L 0 2  L 0 2  N"/>
          </draw:custom-shape>
          <draw:custom-shape draw:style-name="gr789" draw:text-style-name="P189" draw:layer="layout" svg:width="0.19cm" svg:height="0.075cm" svg:x="18.556cm" svg:y="14.155cm">
            <text:p/>
            <draw:enhanced-geometry svg:viewBox="0 0 43 17" draw:type="non-primitive" draw:enhanced-path="M 0 2  L 3 2  L 5 2  L 6 2  L 8 2  L 10 2  L 11 5  L 12 5  L 14 5  L 16 8  L 18 8  L 20 8  L 23 10  L 27 10  L 30 10  L 35 13  L 40 16  L 42 16  L 42 16  L 42 13  L 42 13  L 39 13  L 37 10  L 35 10  L 34 10  L 32 10  L 30 10  L 29 10  L 27 10  L 25 8  L 23 8  L 21 5  L 18 5  L 15 2  L 11 2  L 6 2  L 0 0  L 0 0  L 0 0  L 0 0  L 0 2  L 0 2  N"/>
          </draw:custom-shape>
          <draw:custom-shape draw:style-name="gr793" draw:text-style-name="P193" draw:layer="layout" svg:width="0.19cm" svg:height="0.075cm" svg:x="18.556cm" svg:y="14.155cm">
            <text:p/>
            <draw:enhanced-geometry svg:viewBox="0 0 43 17" draw:type="non-primitive" draw:enhanced-path="M 0 2  L 40 13  L 42 16  L 42 16  L 42 13  L 40 13  L 0 0  L 0 2  L 0 2  N"/>
          </draw:custom-shape>
          <draw:custom-shape draw:style-name="gr121" draw:text-style-name="P16" draw:layer="layout" svg:width="0.336cm" svg:height="0.075cm" svg:x="18.15cm" svg:y="14.138cm">
            <text:p/>
            <draw:enhanced-geometry svg:viewBox="0 0 76 17" draw:type="non-primitive" draw:enhanced-path="M 75 9  L 10 0  L 8 3  L 7 3  L 5 6  L 3 9  L 1 9  L 1 12  L 0 12  L 1 16  L 75 12  L 75 9  L 75 9  N"/>
          </draw:custom-shape>
          <draw:custom-shape draw:style-name="gr995" draw:text-style-name="P221" draw:layer="layout" svg:width="0.327cm" svg:height="0.075cm" svg:x="18.159cm" svg:y="14.142cm">
            <text:p/>
            <draw:enhanced-geometry svg:viewBox="0 0 74 17" draw:type="non-primitive" draw:enhanced-path="M 73 8  L 70 8  L 66 8  L 63 8  L 61 8  L 58 8  L 56 8  L 54 8  L 51 8  L 49 4  L 46 4  L 42 4  L 37 4  L 32 0  L 25 0  L 18 0  L 9 0  L 8 0  L 6 0  L 4 4  L 2 8  L 1 8  L 0 12  L 0 12  L 0 16  L 4 16  L 7 16  L 11 16  L 13 16  L 16 16  L 19 16  L 21 16  L 24 16  L 27 16  L 31 16  L 36 16  L 41 16  L 47 12  L 55 12  L 63 12  L 73 12  L 73 12  L 73 12  L 73 12  L 73 8  L 73 8  N"/>
          </draw:custom-shape>
          <draw:custom-shape draw:style-name="gr1011" draw:text-style-name="P228" draw:layer="layout" svg:width="0.322cm" svg:height="0.075cm" svg:x="18.164cm" svg:y="14.142cm">
            <text:p/>
            <draw:enhanced-geometry svg:viewBox="0 0 73 17" draw:type="non-primitive" draw:enhanced-path="M 72 8  L 69 8  L 65 8  L 62 8  L 60 8  L 58 8  L 56 8  L 53 8  L 51 8  L 48 8  L 45 4  L 41 4  L 36 4  L 31 0  L 25 0  L 17 0  L 9 0  L 7 0  L 6 0  L 4 4  L 3 8  L 1 8  L 0 12  L 0 12  L 0 16  L 4 16  L 7 16  L 11 16  L 14 16  L 16 16  L 19 16  L 22 16  L 24 12  L 27 12  L 31 12  L 35 12  L 41 12  L 47 12  L 54 12  L 62 12  L 72 12  L 72 12  L 72 12  L 72 12  L 72 8  L 72 8  N"/>
          </draw:custom-shape>
          <draw:custom-shape draw:style-name="gr1012" draw:text-style-name="P34" draw:layer="layout" svg:width="0.318cm" svg:height="0.075cm" svg:x="18.168cm" svg:y="14.142cm">
            <text:p/>
            <draw:enhanced-geometry svg:viewBox="0 0 72 17" draw:type="non-primitive" draw:enhanced-path="M 71 10  L 68 10  L 64 10  L 61 10  L 59 10  L 57 10  L 55 10  L 53 10  L 50 10  L 47 10  L 44 5  L 40 5  L 36 5  L 30 5  L 24 0  L 17 0  L 9 0  L 7 0  L 6 0  L 4 5  L 2 10  L 1 10  L 0 16  L 0 16  L 0 16  L 4 16  L 8 16  L 11 16  L 14 16  L 16 16  L 18 16  L 21 16  L 24 16  L 27 16  L 31 16  L 35 16  L 40 16  L 47 16  L 54 16  L 61 16  L 71 16  L 71 16  L 71 16  L 71 16  L 71 10  L 71 10  N"/>
          </draw:custom-shape>
          <draw:custom-shape draw:style-name="gr1013" draw:text-style-name="P229" draw:layer="layout" svg:width="0.314cm" svg:height="0.075cm" svg:x="18.172cm" svg:y="14.142cm">
            <text:p/>
            <draw:enhanced-geometry svg:viewBox="0 0 71 17" draw:type="non-primitive" draw:enhanced-path="M 70 10  L 67 10  L 63 10  L 60 10  L 58 10  L 56 10  L 54 10  L 52 10  L 50 10  L 46 10  L 43 10  L 40 5  L 36 5  L 30 5  L 24 0  L 17 0  L 8 0  L 7 0  L 6 0  L 4 5  L 3 10  L 1 10  L 1 16  L 0 16  L 1 16  L 5 16  L 8 16  L 11 16  L 14 16  L 16 16  L 18 16  L 21 16  L 24 16  L 27 16  L 30 16  L 35 16  L 40 16  L 46 16  L 53 16  L 60 16  L 70 16  L 70 16  L 70 16  L 70 16  L 70 10  L 70 10  N"/>
          </draw:custom-shape>
          <draw:custom-shape draw:style-name="gr1014" draw:text-style-name="P230" draw:layer="layout" svg:width="0.305cm" svg:height="0.075cm" svg:x="18.181cm" svg:y="14.142cm">
            <text:p/>
            <draw:enhanced-geometry svg:viewBox="0 0 69 17" draw:type="non-primitive" draw:enhanced-path="M 68 10  L 65 10  L 61 10  L 59 10  L 57 10  L 55 10  L 52 10  L 51 10  L 48 10  L 45 10  L 42 10  L 38 5  L 34 5  L 29 5  L 22 5  L 15 0  L 7 0  L 6 0  L 5 5  L 3 5  L 2 10  L 1 10  L 0 16  L 0 16  L 0 16  L 4 16  L 7 16  L 11 16  L 13 16  L 15 16  L 18 16  L 20 16  L 22 16  L 26 16  L 30 16  L 34 16  L 38 16  L 44 16  L 51 16  L 59 16  L 68 16  L 68 16  L 68 16  L 68 16  L 68 10  L 68 10  N"/>
          </draw:custom-shape>
          <draw:custom-shape draw:style-name="gr1015" draw:text-style-name="P196" draw:layer="layout" svg:width="0.3cm" svg:height="0.075cm" svg:x="18.186cm" svg:y="14.142cm">
            <text:p/>
            <draw:enhanced-geometry svg:viewBox="0 0 68 17" draw:type="non-primitive" draw:enhanced-path="M 67 10  L 64 10  L 61 10  L 58 10  L 56 10  L 54 10  L 52 10  L 50 10  L 47 10  L 45 10  L 41 10  L 38 5  L 33 5  L 29 5  L 22 5  L 15 0  L 7 0  L 6 0  L 5 5  L 3 5  L 2 10  L 1 10  L 0 16  L 0 16  L 0 16  L 4 16  L 7 16  L 10 16  L 13 16  L 15 16  L 17 16  L 20 16  L 23 16  L 26 16  L 29 16  L 33 16  L 38 16  L 43 16  L 50 16  L 58 16  L 67 16  L 67 16  L 67 16  L 67 16  L 67 10  L 67 10  N"/>
          </draw:custom-shape>
          <draw:custom-shape draw:style-name="gr1016" draw:text-style-name="P199" draw:layer="layout" svg:width="0.296cm" svg:height="0.075cm" svg:x="18.19cm" svg:y="14.142cm">
            <text:p/>
            <draw:enhanced-geometry svg:viewBox="0 0 67 17" draw:type="non-primitive" draw:enhanced-path="M 66 10  L 63 10  L 60 10  L 57 10  L 55 10  L 53 10  L 51 10  L 49 10  L 46 10  L 44 10  L 41 10  L 37 10  L 33 10  L 28 5  L 22 5  L 16 5  L 7 0  L 6 0  L 5 5  L 4 10  L 2 10  L 1 10  L 0 16  L 0 16  L 1 16  L 4 16  L 8 16  L 11 16  L 13 16  L 16 16  L 18 16  L 20 16  L 23 16  L 25 16  L 29 16  L 32 16  L 37 16  L 43 16  L 49 16  L 57 16  L 66 16  L 66 16  L 66 16  L 66 16  L 66 10  L 66 10  N"/>
          </draw:custom-shape>
          <draw:custom-shape draw:style-name="gr989" draw:text-style-name="P164" draw:layer="layout" svg:width="0.291cm" svg:height="0.075cm" svg:x="18.195cm" svg:y="14.142cm">
            <text:p/>
            <draw:enhanced-geometry svg:viewBox="0 0 66 17" draw:type="non-primitive" draw:enhanced-path="M 65 10  L 62 10  L 59 10  L 56 10  L 54 10  L 52 10  L 50 10  L 48 10  L 45 10  L 43 10  L 40 10  L 36 10  L 32 10  L 27 5  L 22 5  L 15 5  L 7 0  L 5 0  L 5 5  L 3 10  L 2 10  L 1 10  L 0 16  L 0 16  L 1 16  L 5 16  L 8 16  L 11 16  L 13 16  L 15 16  L 18 16  L 20 16  L 22 16  L 25 16  L 29 16  L 32 16  L 37 16  L 43 16  L 49 16  L 57 16  L 65 16  L 65 16  L 65 16  L 65 16  L 65 10  L 65 10  N"/>
          </draw:custom-shape>
          <draw:custom-shape draw:style-name="gr1001" draw:text-style-name="P205" draw:layer="layout" svg:width="0.283cm" svg:height="0.075cm" svg:x="18.203cm" svg:y="14.142cm">
            <text:p/>
            <draw:enhanced-geometry svg:viewBox="0 0 64 17" draw:type="non-primitive" draw:enhanced-path="M 63 10  L 60 10  L 57 10  L 55 10  L 53 10  L 50 10  L 48 10  L 46 10  L 44 10  L 41 10  L 39 10  L 35 10  L 31 10  L 26 5  L 20 5  L 13 5  L 6 0  L 5 5  L 3 5  L 2 10  L 1 10  L 1 10  L 0 16  L 0 16  L 1 16  L 4 16  L 7 16  L 10 16  L 13 16  L 15 16  L 17 16  L 19 16  L 21 16  L 24 16  L 27 16  L 32 16  L 36 16  L 41 16  L 47 16  L 55 16  L 63 16  L 63 16  L 63 16  L 63 16  L 63 10  L 63 10  N"/>
          </draw:custom-shape>
          <draw:custom-shape draw:style-name="gr1017" draw:text-style-name="P209" draw:layer="layout" svg:width="0.278cm" svg:height="0.075cm" svg:x="18.208cm" svg:y="14.146cm">
            <text:p/>
            <draw:enhanced-geometry svg:viewBox="0 0 63 17" draw:type="non-primitive" draw:enhanced-path="M 62 8  L 59 8  L 56 8  L 54 8  L 52 8  L 50 8  L 47 8  L 45 8  L 43 8  L 40 8  L 38 8  L 35 8  L 31 8  L 26 8  L 20 0  L 14 0  L 6 0  L 5 0  L 4 0  L 2 8  L 1 8  L 0 8  L 0 16  L 0 16  L 0 16  L 5 16  L 7 16  L 9 16  L 12 16  L 14 16  L 16 16  L 19 16  L 21 16  L 24 16  L 27 16  L 31 16  L 35 16  L 40 16  L 47 16  L 54 16  L 62 16  L 62 16  L 62 16  L 62 16  L 62 8  L 62 8  N"/>
          </draw:custom-shape>
          <draw:custom-shape draw:style-name="gr1018" draw:text-style-name="P213" draw:layer="layout" svg:width="0.274cm" svg:height="0.075cm" svg:x="18.212cm" svg:y="14.146cm">
            <text:p/>
            <draw:enhanced-geometry svg:viewBox="0 0 62 17" draw:type="non-primitive" draw:enhanced-path="M 61 8  L 58 8  L 55 8  L 53 8  L 51 8  L 49 8  L 47 8  L 45 8  L 43 8  L 40 8  L 37 8  L 34 8  L 30 8  L 25 8  L 20 0  L 13 0  L 6 0  L 5 0  L 4 0  L 3 8  L 1 8  L 1 8  L 0 16  L 0 16  L 1 16  L 4 16  L 7 16  L 10 16  L 12 16  L 14 16  L 16 16  L 19 16  L 21 16  L 24 16  L 27 16  L 31 16  L 34 16  L 40 16  L 46 16  L 53 16  L 61 16  L 61 16  L 61 16  L 61 16  L 61 8  L 61 8  N"/>
          </draw:custom-shape>
          <draw:custom-shape draw:style-name="gr1019" draw:text-style-name="P217" draw:layer="layout" svg:width="0.269cm" svg:height="0.075cm" svg:x="18.217cm" svg:y="14.146cm">
            <text:p/>
            <draw:enhanced-geometry svg:viewBox="0 0 61 17" draw:type="non-primitive" draw:enhanced-path="M 60 8  L 57 8  L 54 8  L 52 8  L 50 8  L 48 8  L 46 8  L 44 8  L 42 8  L 40 8  L 36 8  L 33 8  L 30 8  L 25 8  L 19 8  L 13 0  L 5 0  L 5 0  L 3 8  L 3 8  L 2 8  L 1 8  L 0 16  L 0 16  L 1 16  L 5 16  L 7 16  L 10 16  L 12 16  L 14 16  L 17 16  L 19 16  L 21 16  L 24 16  L 26 16  L 30 16  L 34 16  L 39 16  L 45 16  L 52 16  L 60 16  L 60 16  L 60 16  L 60 16  L 60 8  L 60 8  N"/>
          </draw:custom-shape>
          <draw:custom-shape draw:style-name="gr757" draw:text-style-name="P36" draw:layer="layout" svg:width="0.261cm" svg:height="0.075cm" svg:x="18.225cm" svg:y="14.146cm">
            <text:p/>
            <draw:enhanced-geometry svg:viewBox="0 0 59 17" draw:type="non-primitive" draw:enhanced-path="M 58 8  L 55 8  L 52 8  L 50 8  L 48 8  L 46 8  L 44 8  L 42 8  L 40 8  L 38 8  L 35 8  L 31 8  L 28 8  L 23 8  L 18 8  L 12 8  L 4 0  L 3 0  L 3 8  L 1 8  L 1 8  L 1 8  L 0 8  L 0 16  L 1 16  L 4 16  L 7 16  L 9 16  L 11 16  L 13 16  L 15 16  L 17 16  L 20 16  L 22 16  L 25 16  L 29 16  L 33 16  L 38 16  L 43 16  L 50 16  L 58 16  L 58 16  L 58 16  L 58 16  L 58 8  L 58 8  N"/>
          </draw:custom-shape>
          <draw:custom-shape draw:style-name="gr760" draw:text-style-name="P167" draw:layer="layout" svg:width="0.256cm" svg:height="0.075cm" svg:x="18.23cm" svg:y="14.146cm">
            <text:p/>
            <draw:enhanced-geometry svg:viewBox="0 0 58 17" draw:type="non-primitive" draw:enhanced-path="M 57 8  L 54 8  L 51 8  L 49 8  L 47 8  L 45 8  L 44 8  L 41 8  L 40 8  L 37 8  L 34 8  L 31 8  L 27 8  L 23 8  L 17 8  L 11 8  L 4 0  L 3 0  L 2 8  L 2 8  L 1 8  L 0 8  L 0 8  L 0 16  L 1 16  L 4 16  L 7 16  L 9 16  L 11 16  L 14 16  L 15 16  L 17 16  L 20 16  L 22 16  L 25 16  L 28 16  L 33 16  L 37 16  L 43 16  L 49 16  L 57 16  L 57 16  L 57 16  L 57 16  L 57 8  L 57 8  N"/>
          </draw:custom-shape>
          <draw:custom-shape draw:style-name="gr1020" draw:text-style-name="P171" draw:layer="layout" svg:width="0.247cm" svg:height="0.075cm" svg:x="18.239cm" svg:y="14.151cm">
            <text:p/>
            <draw:enhanced-geometry svg:viewBox="0 0 56 17" draw:type="non-primitive" draw:enhanced-path="M 55 0  L 52 0  L 50 0  L 47 0  L 45 0  L 43 0  L 42 0  L 40 0  L 38 0  L 35 0  L 33 0  L 29 0  L 26 0  L 21 0  L 17 0  L 10 0  L 3 0  L 2 0  L 1 0  L 0 0  L 0 0  L 0 0  L 0 0  L 0 16  L 0 16  L 3 16  L 6 16  L 8 16  L 11 16  L 12 16  L 14 16  L 17 16  L 19 16  L 21 16  L 24 16  L 27 16  L 31 16  L 35 16  L 41 16  L 48 16  L 55 16  L 55 16  L 55 16  L 55 16  L 55 0  L 55 0  N"/>
          </draw:custom-shape>
          <draw:custom-shape draw:style-name="gr1021" draw:text-style-name="P175" draw:layer="layout" svg:width="0.239cm" svg:height="0.075cm" svg:x="18.247cm" svg:y="14.151cm">
            <text:p/>
            <draw:enhanced-geometry svg:viewBox="0 0 54 17" draw:type="non-primitive" draw:enhanced-path="M 53 0  L 50 0  L 48 0  L 45 0  L 43 0  L 41 0  L 40 0  L 38 0  L 36 0  L 33 0  L 31 0  L 28 0  L 24 0  L 20 0  L 15 0  L 9 0  L 2 0  L 1 0  L 0 0  L 0 0  L 0 0  L 0 0  L 0 0  L 0 16  L 0 16  L 3 16  L 5 16  L 7 16  L 10 16  L 12 16  L 13 16  L 15 16  L 17 16  L 19 16  L 23 16  L 26 16  L 29 16  L 34 16  L 40 16  L 46 16  L 53 16  L 53 16  L 53 16  L 53 16  L 53 0  L 53 0  N"/>
          </draw:custom-shape>
          <draw:custom-shape draw:style-name="gr1022" draw:text-style-name="P179" draw:layer="layout" svg:width="0.239cm" svg:height="0.075cm" svg:x="18.247cm" svg:y="14.151cm">
            <text:p/>
            <draw:enhanced-geometry svg:viewBox="0 0 54 17" draw:type="non-primitive" draw:enhanced-path="M 53 0  L 50 0  L 48 0  L 45 0  L 43 0  L 42 0  L 40 0  L 38 0  L 36 0  L 34 0  L 31 0  L 29 0  L 25 0  L 21 0  L 16 0  L 10 0  L 3 0  L 1 0  L 0 0  L 0 0  L 0 16  L 4 16  L 7 16  L 9 16  L 11 16  L 12 16  L 15 16  L 16 16  L 19 16  L 21 16  L 23 16  L 26 16  L 30 16  L 35 16  L 40 16  L 46 16  L 53 16  L 53 16  L 53 16  L 53 16  L 53 0  L 53 0  N"/>
          </draw:custom-shape>
          <draw:custom-shape draw:style-name="gr1007" draw:text-style-name="P183" draw:layer="layout" svg:width="0.234cm" svg:height="0.075cm" svg:x="18.252cm" svg:y="14.151cm">
            <text:p/>
            <draw:enhanced-geometry svg:viewBox="0 0 53 17" draw:type="non-primitive" draw:enhanced-path="M 52 0  L 49 0  L 47 0  L 44 0  L 42 0  L 41 0  L 39 0  L 37 0  L 35 0  L 33 0  L 31 0  L 28 0  L 25 0  L 21 0  L 15 0  L 9 0  L 3 0  L 2 0  L 0 0  L 0 0  L 2 16  L 4 16  L 6 16  L 9 16  L 11 16  L 13 16  L 14 16  L 16 16  L 18 16  L 21 16  L 23 16  L 26 16  L 30 16  L 35 16  L 39 16  L 45 16  L 52 16  L 52 16  L 52 16  L 52 16  L 52 0  L 52 0  N"/>
          </draw:custom-shape>
          <draw:custom-shape draw:style-name="gr1023" draw:text-style-name="P186" draw:layer="layout" svg:width="0.225cm" svg:height="0.075cm" svg:x="18.261cm" svg:y="14.151cm">
            <text:p/>
            <draw:enhanced-geometry svg:viewBox="0 0 51 17" draw:type="non-primitive" draw:enhanced-path="M 50 0  L 47 0  L 45 0  L 43 0  L 41 0  L 39 0  L 38 0  L 36 0  L 34 0  L 32 0  L 29 0  L 26 0  L 23 0  L 19 0  L 14 0  L 8 0  L 2 0  L 0 0  L 0 0  L 0 0  L 0 0  L 3 0  L 6 16  L 8 16  L 10 16  L 12 16  L 13 16  L 15 16  L 17 16  L 19 16  L 22 16  L 25 16  L 28 16  L 33 16  L 38 16  L 43 16  L 50 16  L 50 16  L 50 16  L 50 16  L 50 0  L 50 0  N"/>
          </draw:custom-shape>
          <draw:custom-shape draw:style-name="gr789" draw:text-style-name="P189" draw:layer="layout" svg:width="0.225cm" svg:height="0.075cm" svg:x="18.261cm" svg:y="14.151cm">
            <text:p/>
            <draw:enhanced-geometry svg:viewBox="0 0 51 17" draw:type="non-primitive" draw:enhanced-path="M 50 0  L 47 0  L 45 0  L 43 0  L 41 0  L 40 0  L 38 0  L 36 0  L 34 0  L 32 0  L 30 0  L 26 0  L 23 0  L 19 0  L 14 0  L 9 0  L 2 0  L 1 0  L 0 0  L 1 0  L 2 0  L 4 0  L 7 16  L 9 16  L 11 16  L 13 16  L 14 16  L 16 16  L 18 16  L 20 16  L 23 16  L 26 16  L 29 16  L 33 16  L 38 16  L 44 16  L 50 16  L 50 16  L 50 16  L 50 16  L 50 0  L 50 0  N"/>
          </draw:custom-shape>
          <draw:custom-shape draw:style-name="gr793" draw:text-style-name="P193" draw:layer="layout" svg:width="0.217cm" svg:height="0.075cm" svg:x="18.269cm" svg:y="14.151cm">
            <text:p/>
            <draw:enhanced-geometry svg:viewBox="0 0 49 17" draw:type="non-primitive" draw:enhanced-path="M 48 0  L 1 0  L 0 0  L 0 0  L 0 0  L 1 0  L 48 16  L 48 0  L 48 0  N"/>
          </draw:custom-shape>
          <draw:custom-shape draw:style-name="gr114" draw:text-style-name="P35" draw:layer="layout" svg:width="0.102cm" svg:height="0.075cm" svg:x="18.472cm" svg:y="14.142cm">
            <text:p/>
            <draw:enhanced-geometry svg:viewBox="0 0 23 17" draw:type="non-primitive" draw:enhanced-path="M 11 16  L 11 9  L 9 9  L 4 9  L 1 9  L 0 6  L 0 4  L 1 4  L 8 4  L 8 2  L 8 0  L 8 0  L 15 0  L 15 0  L 16 0  L 17 4  L 13 4  L 13 4  L 19 4  L 19 4  L 21 4  L 22 6  L 22 9  L 21 11  L 16 11  L 16 16  L 15 16  L 15 9  L 13 9  L 13 16  L 11 16  L 11 16  N"/>
          </draw:custom-shape>
          <draw:custom-shape draw:style-name="gr1024" draw:text-style-name="P184" draw:layer="layout" svg:width="0.092cm" svg:height="0.15cm" svg:x="18.314cm" svg:y="14.217cm">
            <text:p/>
            <draw:enhanced-geometry svg:viewBox="0 0 21 34" draw:type="non-primitive" draw:enhanced-path="M 18 11  L 18 12  L 16 13  L 14 13  L 13 13  L 11 14  L 9 14  L 8 15  L 7 15  L 5 11  L 4 8  L 3 4  L 2 0  L 1 1  L 1 1  L 0 1  L 0 1  L 0 6  L 1 10  L 1 14  L 2 18  L 1 18  L 1 19  L 1 20  L 1 20  L 1 20  L 1 20  L 2 20  L 2 20  L 2 24  L 2 27  L 1 30  L 0 33  L 1 32  L 2 32  L 3 31  L 4 30  L 4 27  L 5 25  L 6 23  L 7 20  L 8 20  L 9 20  L 11 20  L 13 20  L 14 19  L 16 19  L 18 19  L 20 19  L 20 11  L 20 11  L 18 11  N"/>
          </draw:custom-shape>
          <draw:custom-shape draw:style-name="gr1007" draw:text-style-name="P183" draw:layer="layout" svg:width="0.093cm" svg:height="0.075cm" svg:x="18.393cm" svg:y="14.265cm">
            <text:p/>
            <draw:enhanced-geometry svg:viewBox="0 0 21 17" draw:type="non-primitive" draw:enhanced-path="M 0 0  L 10 0  L 10 0  L 20 0  L 20 0  L 20 16  L 20 16  L 10 16  L 10 16  L 10 16  L 10 0  L 10 0  L 0 0  N"/>
          </draw:custom-shape>
          <draw:custom-shape draw:style-name="gr1025" draw:text-style-name="P181" draw:layer="layout" svg:width="0.092cm" svg:height="0.075cm" svg:x="18.402cm" svg:y="14.265cm">
            <text:p/>
            <draw:enhanced-geometry svg:viewBox="0 0 21 17" draw:type="non-primitive" draw:enhanced-path="M 0 0  L 20 0  L 20 0  L 20 0  L 20 0  L 20 16  L 20 16  L 20 16  L 20 16  L 0 16  L 0 0  L 0 0  N"/>
          </draw:custom-shape>
          <draw:custom-shape draw:style-name="gr1022" draw:text-style-name="P179" draw:layer="layout" svg:width="0.093cm" svg:height="0.075cm" svg:x="18.406cm" svg:y="14.261cm">
            <text:p/>
            <draw:enhanced-geometry svg:viewBox="0 0 21 17" draw:type="non-primitive" draw:enhanced-path="M 0 1  L 0 1  L 0 1  L 0 0  L 20 0  L 20 16  L 0 16  L 0 16  L 0 16  L 0 16  L 0 1  L 0 1  N"/>
          </draw:custom-shape>
          <draw:custom-shape draw:style-name="gr1006" draw:text-style-name="P178" draw:layer="layout" svg:width="0.093cm" svg:height="0.075cm" svg:x="18.406cm" svg:y="14.261cm">
            <text:p/>
            <draw:enhanced-geometry svg:viewBox="0 0 21 17" draw:type="non-primitive" draw:enhanced-path="M 0 0  L 10 0  L 10 0  L 20 0  L 20 0  L 20 16  L 20 16  L 10 16  L 10 16  L 10 16  L 10 0  L 10 0  L 0 0  N"/>
          </draw:custom-shape>
          <draw:custom-shape draw:style-name="gr1026" draw:text-style-name="P176" draw:layer="layout" svg:width="0.004cm" svg:height="0.075cm" svg:x="18.415cm" svg:y="14.261cm">
            <text:p/>
            <draw:enhanced-geometry svg:viewBox="0 0 1 17" draw:type="non-primitive" draw:enhanced-path="M 0 0  L 0 0  L 0 0  L 0 0  L 0 0  L 0 16  L 0 16  L 0 16  L 0 16  L 0 16  L 0 0  L 0 0  L 0 0  N"/>
          </draw:custom-shape>
          <draw:custom-shape draw:style-name="gr1021" draw:text-style-name="P175" draw:layer="layout" svg:width="0.093cm" svg:height="0.075cm" svg:x="18.415cm" svg:y="14.261cm">
            <text:p/>
            <draw:enhanced-geometry svg:viewBox="0 0 21 17" draw:type="non-primitive" draw:enhanced-path="M 0 0  L 10 0  L 10 0  L 20 0  L 20 0  L 20 14  L 20 14  L 10 14  L 10 16  L 0 16  L 0 0  L 0 0  L 0 0  N"/>
          </draw:custom-shape>
          <draw:custom-shape draw:style-name="gr1027" draw:text-style-name="P173" draw:layer="layout" svg:width="0.092cm" svg:height="0.075cm" svg:x="18.424cm" svg:y="14.257cm">
            <text:p/>
            <draw:enhanced-geometry svg:viewBox="0 0 21 17" draw:type="non-primitive" draw:enhanced-path="M 0 1  L 0 0  L 0 0  L 0 0  L 20 0  L 20 16  L 0 16  L 0 16  L 0 16  L 0 16  L 0 1  L 0 1  N"/>
          </draw:custom-shape>
          <draw:custom-shape draw:style-name="gr1028" draw:text-style-name="P172" draw:layer="layout" svg:width="0.005cm" svg:height="0.075cm" svg:x="18.428cm" svg:y="14.257cm">
            <text:p/>
            <draw:enhanced-geometry svg:viewBox="0 0 1 17" draw:type="non-primitive" draw:enhanced-path="M 0 0  L 0 0  L 0 0  L 0 0  L 0 0  L 0 16  L 0 16  L 0 16  L 0 16  L 0 16  L 0 0  L 0 0  L 0 0  N"/>
          </draw:custom-shape>
          <draw:custom-shape draw:style-name="gr763" draw:text-style-name="P170" draw:layer="layout" svg:width="0.093cm" svg:height="0.075cm" svg:x="18.428cm" svg:y="14.252cm">
            <text:p/>
            <draw:enhanced-geometry svg:viewBox="0 0 21 17" draw:type="non-primitive" draw:enhanced-path="M 0 1  L 10 0  L 10 0  L 10 0  L 20 0  L 20 16  L 10 16  L 10 16  L 10 16  L 0 16  L 0 1  L 0 1  N"/>
          </draw:custom-shape>
          <draw:custom-shape draw:style-name="gr761" draw:text-style-name="P168" draw:layer="layout" svg:width="0.004cm" svg:height="0.075cm" svg:x="18.437cm" svg:y="14.252cm">
            <text:p/>
            <draw:enhanced-geometry svg:viewBox="0 0 1 17" draw:type="non-primitive" draw:enhanced-path="M 0 0  L 0 0  L 0 0  L 0 0  L 0 0  L 0 16  L 0 16  L 0 16  L 0 16  L 0 16  L 0 0  L 0 0  L 0 0  N"/>
          </draw:custom-shape>
          <draw:custom-shape draw:style-name="gr760" draw:text-style-name="P167" draw:layer="layout" svg:width="0.093cm" svg:height="0.075cm" svg:x="18.437cm" svg:y="14.235cm">
            <text:p/>
            <draw:enhanced-geometry svg:viewBox="0 0 21 17" draw:type="non-primitive" draw:enhanced-path="M 0 4  L 0 4  L 0 4  L 0 4  L 20 4  L 20 3  L 20 2  L 20 1  L 20 0  L 20 16  L 20 16  L 0 16  L 0 16  L 0 16  L 0 4  L 0 4  L 0 4  N"/>
          </draw:custom-shape>
          <draw:custom-shape draw:style-name="gr758" draw:text-style-name="P165" draw:layer="layout" svg:width="0.092cm" svg:height="0.08cm" svg:x="18.446cm" svg:y="14.221cm">
            <text:p/>
            <draw:enhanced-geometry svg:viewBox="0 0 21 18" draw:type="non-primitive" draw:enhanced-path="M 0 3  L 0 3  L 20 1  L 20 0  L 20 0  L 20 17  L 20 17  L 20 17  L 20 17  L 0 17  L 0 3  L 0 3  L 0 3  N"/>
          </draw:custom-shape>
          <draw:custom-shape draw:style-name="gr757" draw:text-style-name="P36" draw:layer="layout" svg:width="0.092cm" svg:height="0.088cm" svg:x="18.446cm" svg:y="14.213cm">
            <text:p/>
            <draw:enhanced-geometry svg:viewBox="0 0 21 20" draw:type="non-primitive" draw:enhanced-path="M 0 2  L 0 1  L 0 1  L 20 0  L 20 0  L 20 19  L 20 19  L 20 19  L 0 19  L 0 19  L 0 19  L 0 2  L 0 2  L 0 2  N"/>
          </draw:custom-shape>
          <draw:custom-shape draw:style-name="gr1029" draw:text-style-name="P220" draw:layer="layout" svg:width="0.093cm" svg:height="0.093cm" svg:x="18.45cm" svg:y="14.208cm">
            <text:p/>
            <draw:enhanced-geometry svg:viewBox="0 0 21 21" draw:type="non-primitive" draw:enhanced-path="M 0 1  L 0 1  L 0 1  L 20 0  L 20 0  L 20 20  L 20 20  L 0 20  L 0 20  L 0 20  L 0 1  L 0 1  N"/>
          </draw:custom-shape>
          <draw:custom-shape draw:style-name="gr1004" draw:text-style-name="P218" draw:layer="layout" svg:width="0.092cm" svg:height="0.097cm" svg:x="18.455cm" svg:y="14.204cm">
            <text:p/>
            <draw:enhanced-geometry svg:viewBox="0 0 21 22" draw:type="non-primitive" draw:enhanced-path="M 0 1  L 0 0  L 0 0  L 20 0  L 20 0  L 20 21  L 20 21  L 20 21  L 0 21  L 0 21  L 0 1  L 0 1  N"/>
          </draw:custom-shape>
          <draw:custom-shape draw:style-name="gr1030" draw:text-style-name="P216" draw:layer="layout" svg:width="0.093cm" svg:height="0.097cm" svg:x="18.459cm" svg:y="14.204cm">
            <text:p/>
            <draw:enhanced-geometry svg:viewBox="0 0 21 22" draw:type="non-primitive" draw:enhanced-path="M 0 0  L 0 0  L 0 0  L 0 0  L 20 0  L 20 21  L 20 21  L 0 21  L 0 21  L 0 21  L 0 0  L 0 0  L 0 0  N"/>
          </draw:custom-shape>
          <draw:custom-shape draw:style-name="gr1031" draw:text-style-name="P215" draw:layer="layout" svg:width="0.093cm" svg:height="0.102cm" svg:x="18.468cm" svg:y="14.199cm">
            <text:p/>
            <draw:enhanced-geometry svg:viewBox="0 0 21 23" draw:type="non-primitive" draw:enhanced-path="M 0 1  L 0 1  L 20 0  L 20 0  L 20 0  L 20 22  L 20 22  L 20 22  L 0 22  L 0 22  L 0 1  L 0 1  N"/>
          </draw:custom-shape>
          <draw:custom-shape draw:style-name="gr1018" draw:text-style-name="P213" draw:layer="layout" svg:width="0.004cm" svg:height="0.106cm" svg:x="18.468cm" svg:y="14.195cm">
            <text:p/>
            <draw:enhanced-geometry svg:viewBox="0 0 1 24" draw:type="non-primitive" draw:enhanced-path="M 0 1  L 0 1  L 0 0  L 0 0  L 0 0  L 0 23  L 0 23  L 0 23  L 0 23  L 0 23  L 0 1  L 0 1  L 0 1  N"/>
          </draw:custom-shape>
          <draw:custom-shape draw:style-name="gr1032" draw:text-style-name="P212" draw:layer="layout" svg:width="0.093cm" svg:height="0.115cm" svg:x="18.468cm" svg:y="14.19cm">
            <text:p/>
            <draw:enhanced-geometry svg:viewBox="0 0 21 26" draw:type="non-primitive" draw:enhanced-path="M 0 1  L 10 1  L 10 1  L 10 1  L 20 0  L 20 25  L 10 24  L 10 24  L 10 24  L 0 24  L 0 1  L 0 1  L 0 1  N"/>
          </draw:custom-shape>
          <draw:custom-shape draw:style-name="gr1002" draw:text-style-name="P210" draw:layer="layout" svg:width="0.004cm" svg:height="0.119cm" svg:x="18.477cm" svg:y="14.186cm">
            <text:p/>
            <draw:enhanced-geometry svg:viewBox="0 0 1 27" draw:type="non-primitive" draw:enhanced-path="M 0 1  L 0 1  L 0 1  L 0 1  L 0 1  L 0 1  L 0 1  L 0 0  L 0 26  L 0 26  L 0 26  L 0 26  L 0 26  L 0 1  L 0 1  N"/>
          </draw:custom-shape>
          <draw:custom-shape draw:style-name="gr1017" draw:text-style-name="P209" draw:layer="layout" svg:width="0.092cm" svg:height="0.128cm" svg:x="18.477cm" svg:y="14.182cm">
            <text:p/>
            <draw:enhanced-geometry svg:viewBox="0 0 21 29" draw:type="non-primitive" draw:enhanced-path="M 0 1  L 0 1  L 20 1  L 20 1  L 20 0  L 20 0  L 20 0  L 20 0  L 20 28  L 20 27  L 20 27  L 20 27  L 0 27  L 0 1  L 0 1  L 0 1  N"/>
          </draw:custom-shape>
          <draw:custom-shape draw:style-name="gr1033" draw:text-style-name="P207" draw:layer="layout" svg:width="0.093cm" svg:height="0.128cm" svg:x="18.481cm" svg:y="14.182cm">
            <text:p/>
            <draw:enhanced-geometry svg:viewBox="0 0 21 29" draw:type="non-primitive" draw:enhanced-path="M 0 0  L 10 0  L 10 0  L 10 0  L 20 0  L 20 28  L 10 28  L 10 28  L 10 28  L 0 28  L 0 0  L 0 0  L 0 0  N"/>
          </draw:custom-shape>
          <draw:custom-shape draw:style-name="gr1001" draw:text-style-name="P205" draw:layer="layout" svg:width="0.004cm" svg:height="0.128cm" svg:x="18.49cm" svg:y="14.182cm">
            <text:p/>
            <draw:enhanced-geometry svg:viewBox="0 0 1 29" draw:type="non-primitive" draw:enhanced-path="M 0 0  L 0 0  L 0 0  L 0 0  L 0 0  L 0 28  L 0 28  L 0 28  L 0 28  L 0 28  L 0 0  L 0 0  N"/>
          </draw:custom-shape>
          <draw:custom-shape draw:style-name="gr1034" draw:text-style-name="P204" draw:layer="layout" svg:width="0.093cm" svg:height="0.128cm" svg:x="18.49cm" svg:y="14.182cm">
            <text:p/>
            <draw:enhanced-geometry svg:viewBox="0 0 21 29" draw:type="non-primitive" draw:enhanced-path="M 0 0  L 0 0  L 20 0  L 20 0  L 20 0  L 20 28  L 20 28  L 20 28  L 0 28  L 0 28  L 0 0  L 0 0  N"/>
          </draw:custom-shape>
          <draw:custom-shape draw:style-name="gr1035" draw:text-style-name="P202" draw:layer="layout" svg:width="0.093cm" svg:height="0.128cm" svg:x="18.494cm" svg:y="14.182cm">
            <text:p/>
            <draw:enhanced-geometry svg:viewBox="0 0 21 29" draw:type="non-primitive" draw:enhanced-path="M 0 0  L 0 0  L 20 0  L 20 0  L 20 0  L 20 28  L 20 28  L 20 28  L 0 28  L 0 28  L 0 0  L 0 0  N"/>
          </draw:custom-shape>
          <draw:custom-shape draw:style-name="gr989" draw:text-style-name="P164" draw:layer="layout" svg:width="0.092cm" svg:height="0.128cm" svg:x="18.499cm" svg:y="14.182cm">
            <text:p/>
            <draw:enhanced-geometry svg:viewBox="0 0 21 29" draw:type="non-primitive" draw:enhanced-path="M 0 0  L 0 0  L 0 0  L 20 0  L 20 0  L 20 28  L 20 28  L 0 28  L 0 28  L 0 28  L 0 28  L 0 0  L 0 0  L 0 0  N"/>
          </draw:custom-shape>
          <draw:custom-shape draw:style-name="gr1036" draw:text-style-name="P201" draw:layer="layout" svg:width="0.093cm" svg:height="0.128cm" svg:x="18.503cm" svg:y="14.182cm">
            <text:p/>
            <draw:enhanced-geometry svg:viewBox="0 0 21 29" draw:type="non-primitive" draw:enhanced-path="M 0 0  L 0 0  L 20 0  L 20 0  L 20 0  L 20 28  L 20 28  L 20 28  L 0 28  L 0 28  L 0 0  L 0 0  L 0 0  N"/>
          </draw:custom-shape>
          <draw:custom-shape draw:style-name="gr1016" draw:text-style-name="P199" draw:layer="layout" svg:width="0.004cm" svg:height="0.133cm" svg:x="18.512cm" svg:y="14.177cm">
            <text:p/>
            <draw:enhanced-geometry svg:viewBox="0 0 1 30" draw:type="non-primitive" draw:enhanced-path="M 0 0  L 0 1  L 0 1  L 0 1  L 0 0  L 0 29  L 0 29  L 0 29  L 0 29  L 0 29  L 0 1  L 0 1  L 0 0  N"/>
          </draw:custom-shape>
          <draw:custom-shape draw:style-name="gr1037" draw:text-style-name="P31" draw:layer="layout" svg:width="0.093cm" svg:height="0.137cm" svg:x="18.512cm" svg:y="14.173cm">
            <text:p/>
            <draw:enhanced-geometry svg:viewBox="0 0 21 31" draw:type="non-primitive" draw:enhanced-path="M 0 1  L 0 1  L 10 1  L 10 1  L 10 1  L 10 1  L 20 0  L 20 30  L 10 30  L 10 30  L 10 30  L 0 30  L 0 1  L 0 1  N"/>
          </draw:custom-shape>
          <draw:custom-shape draw:style-name="gr1038" draw:text-style-name="P197" draw:layer="layout" svg:width="0.093cm" svg:height="0.137cm" svg:x="18.516cm" svg:y="14.173cm">
            <text:p/>
            <draw:enhanced-geometry svg:viewBox="0 0 21 31" draw:type="non-primitive" draw:enhanced-path="M 0 0  L 0 0  L 0 0  L 20 0  L 20 0  L 20 30  L 20 30  L 0 30  L 0 30  L 0 30  L 0 0  L 0 0  L 0 0  N"/>
          </draw:custom-shape>
          <draw:custom-shape draw:style-name="gr1039" draw:text-style-name="P81" draw:layer="layout" svg:width="0.092cm" svg:height="0.137cm" svg:x="18.521cm" svg:y="14.173cm">
            <text:p/>
            <draw:enhanced-geometry svg:viewBox="0 0 21 31" draw:type="non-primitive" draw:enhanced-path="M 0 0  L 0 0  L 0 0  L 0 0  L 0 0  L 20 0  L 20 0  L 20 30  L 20 30  L 0 30  L 0 30  L 0 30  L 0 0  L 0 0  N"/>
          </draw:custom-shape>
          <draw:custom-shape draw:style-name="gr999" draw:text-style-name="P195" draw:layer="layout" svg:width="0.005cm" svg:height="0.137cm" svg:x="18.525cm" svg:y="14.173cm">
            <text:p/>
            <draw:enhanced-geometry svg:viewBox="0 0 1 31" draw:type="non-primitive" draw:enhanced-path="M 0 0  L 0 0  L 0 0  L 0 0  L 0 0  L 0 30  L 0 30  L 0 30  L 0 30  L 0 30  L 0 0  L 0 0  L 0 0  N"/>
          </draw:custom-shape>
          <draw:custom-shape draw:style-name="gr1014" draw:text-style-name="P230" draw:layer="layout" svg:width="0.093cm" svg:height="0.137cm" svg:x="18.525cm" svg:y="14.173cm">
            <text:p/>
            <draw:enhanced-geometry svg:viewBox="0 0 21 31" draw:type="non-primitive" draw:enhanced-path="M 0 0  L 20 0  L 20 0  L 20 0  L 20 0  L 20 30  L 20 30  L 20 30  L 20 30  L 0 30  L 0 0  L 0 0  N"/>
          </draw:custom-shape>
          <draw:custom-shape draw:style-name="gr1040" draw:text-style-name="P231" draw:layer="layout" svg:width="0.093cm" svg:height="0.137cm" svg:x="18.534cm" svg:y="14.173cm">
            <text:p/>
            <draw:enhanced-geometry svg:viewBox="0 0 21 31" draw:type="non-primitive" draw:enhanced-path="M 0 0  L 20 0  L 20 0  L 20 0  L 20 0  L 20 30  L 20 30  L 20 30  L 20 30  L 0 30  L 0 0  L 0 0  L 0 0  N"/>
          </draw:custom-shape>
          <draw:custom-shape draw:style-name="gr1041" draw:text-style-name="P232" draw:layer="layout" svg:width="0.093cm" svg:height="0.137cm" svg:x="18.534cm" svg:y="14.173cm">
            <text:p/>
            <draw:enhanced-geometry svg:viewBox="0 0 21 31" draw:type="non-primitive" draw:enhanced-path="M 0 0  L 10 0  L 10 0  L 20 0  L 20 0  L 20 30  L 20 30  L 10 30  L 10 30  L 0 30  L 0 0  L 0 0  N"/>
          </draw:custom-shape>
          <draw:custom-shape draw:style-name="gr1042" draw:text-style-name="P233" draw:layer="layout" svg:width="0.004cm" svg:height="0.137cm" svg:x="18.543cm" svg:y="14.173cm">
            <text:p/>
            <draw:enhanced-geometry svg:viewBox="0 0 1 31" draw:type="non-primitive" draw:enhanced-path="M 0 0  L 0 0  L 0 0  L 0 0  L 0 0  L 0 30  L 0 30  L 0 30  L 0 30  L 0 30  L 0 0  L 0 0  N"/>
          </draw:custom-shape>
          <draw:custom-shape draw:style-name="gr997" draw:text-style-name="P223" draw:layer="layout" svg:width="0.092cm" svg:height="0.137cm" svg:x="18.543cm" svg:y="14.173cm">
            <text:p/>
            <draw:enhanced-geometry svg:viewBox="0 0 21 31" draw:type="non-primitive" draw:enhanced-path="M 0 0  L 0 0  L 20 0  L 20 0  L 20 0  L 20 30  L 20 30  L 20 30  L 20 30  L 0 30  L 0 30  L 0 30  L 0 0  L 0 0  L 0 0  N"/>
          </draw:custom-shape>
          <draw:custom-shape draw:style-name="gr1012" draw:text-style-name="P34" draw:layer="layout" svg:width="0.093cm" svg:height="0.137cm" svg:x="18.547cm" svg:y="14.173cm">
            <text:p/>
            <draw:enhanced-geometry svg:viewBox="0 0 21 31" draw:type="non-primitive" draw:enhanced-path="M 0 0  L 20 0  L 20 0  L 20 0  L 20 1  L 20 30  L 20 30  L 20 30  L 20 30  L 0 30  L 0 0  L 0 0  N"/>
          </draw:custom-shape>
          <draw:custom-shape draw:style-name="gr1043" draw:text-style-name="P234" draw:layer="layout" svg:width="0.093cm" svg:height="0.133cm" svg:x="18.556cm" svg:y="14.177cm">
            <text:p/>
            <draw:enhanced-geometry svg:viewBox="0 0 21 30" draw:type="non-primitive" draw:enhanced-path="M 0 0  L 1 0  L 1 0  L 1 0  L 1 0  L 2 1  L 2 1  L 3 1  L 3 2  L 4 2  L 5 3  L 6 3  L 7 3  L 8 3  L 9 4  L 10 4  L 11 5  L 12 6  L 14 6  L 14 7  L 15 8  L 17 10  L 18 13  L 20 15  L 20 17  L 20 19  L 20 20  L 20 22  L 18 22  L 17 23  L 16 24  L 14 25  L 14 26  L 12 27  L 11 27  L 10 28  L 9 28  L 7 29  L 7 29  L 5 29  L 4 29  L 3 29  L 2 29  L 1 29  L 0 29  L 0 0  L 0 0  L 0 0  N"/>
          </draw:custom-shape>
          <draw:custom-shape draw:style-name="gr1044" draw:text-style-name="P235" draw:layer="layout" svg:width="0.167cm" svg:height="0.12cm" svg:x="18.314cm" svg:y="14.19cm">
            <text:p/>
            <draw:enhanced-geometry svg:viewBox="0 0 38 27" draw:type="non-primitive" draw:enhanced-path="M 1 26  L 1 26  L 1 25  L 1 24  L 2 24  L 1 20  L 1 16  L 0 12  L 0 7  L 0 7  L 1 7  L 1 7  L 2 6  L 3 10  L 4 14  L 5 17  L 7 21  L 9 21  L 12 19  L 15 19  L 18 18  L 21 17  L 23 16  L 26 15  L 29 14  L 29 12  L 29 10  L 30 8  L 30 7  L 31 5  L 33 3  L 35 2  L 37 0  L 35 3  L 34 5  L 33 7  L 32 9  L 31 12  L 30 13  L 29 15  L 29 16  L 1 26  L 1 26  L 1 26  N"/>
          </draw:custom-shape>
          <draw:custom-shape draw:style-name="gr114" draw:text-style-name="P35" draw:layer="layout" svg:width="0.102cm" svg:height="0.075cm" svg:x="18.538cm" svg:y="14.195cm">
            <text:p/>
            <draw:enhanced-geometry svg:viewBox="0 0 23 17" draw:type="non-primitive" draw:enhanced-path="M 22 16  L 21 16  L 20 14  L 20 13  L 18 13  L 17 13  L 15 13  L 14 13  L 13 13  L 12 13  L 12 11  L 11 11  L 10 11  L 10 11  L 8 11  L 8 11  L 7 11  L 6 11  L 5 11  L 4 11  L 4 11  L 3 13  L 2 13  L 1 13  L 1 13  L 0 2  L 0 2  L 0 2  L 1 2  L 1 1  L 1 1  L 2 1  L 3 1  L 4 0  L 4 0  L 5 0  L 6 0  L 7 0  L 8 0  L 8 0  L 9 1  L 10 1  L 10 1  L 12 1  L 12 1  L 13 2  L 14 2  L 15 2  L 15 2  L 16 2  L 17 2  L 17 2  L 17 4  L 18 5  L 20 7  L 20 10  L 21 13  L 22 16  L 22 16  N"/>
          </draw:custom-shape>
          <draw:custom-shape draw:style-name="gr114" draw:text-style-name="P35" draw:layer="layout" svg:width="0.092cm" svg:height="0.075cm" svg:x="18.499cm" svg:y="14.204cm">
            <text:p/>
            <draw:enhanced-geometry svg:viewBox="0 0 21 17" draw:type="non-primitive" draw:enhanced-path="M 20 12  L 2 16  L 0 14  L 0 3  L 0 3  L 2 1  L 2 1  L 5 0  L 17 0  L 20 0  L 20 12  L 20 12  N"/>
          </draw:custom-shape>
          <draw:custom-shape draw:style-name="gr114" draw:text-style-name="P35" draw:layer="layout" svg:width="0.093cm" svg:height="0.075cm" svg:x="18.49cm" svg:y="14.213cm">
            <text:p/>
            <draw:enhanced-geometry svg:viewBox="0 0 21 17" draw:type="non-primitive" draw:enhanced-path="M 20 0  L 20 16  L 13 16  L 13 16  L 13 16  L 13 16  L 13 16  L 6 16  L 6 16  L 6 16  L 6 16  L 0 13  L 0 11  L 0 11  L 0 11  L 0 6  L 6 4  L 6 2  L 6 2  L 6 2  L 6 0  L 6 0  L 13 0  L 13 0  L 13 0  L 20 0  L 20 0  L 20 0  N"/>
          </draw:custom-shape>
          <draw:custom-shape draw:style-name="gr793" draw:text-style-name="P193" draw:layer="layout" svg:width="0.093cm" svg:height="0.075cm" svg:x="18.415cm" svg:y="14.261cm">
            <text:p/>
            <draw:enhanced-geometry svg:viewBox="0 0 21 17" draw:type="non-primitive" draw:enhanced-path="M 20 14  L 1 16  L 0 14  L 0 12  L 1 8  L 3 7  L 5 5  L 6 3  L 8 1  L 11 0  L 11 1  L 11 5  L 11 5  L 13 8  L 15 8  L 16 12  L 16 14  L 20 14  L 20 14  L 20 14  N"/>
          </draw:custom-shape>
          <draw:custom-shape draw:style-name="gr1044" draw:text-style-name="P235" draw:layer="layout" svg:width="0.093cm" svg:height="0.075cm" svg:x="18.296cm" svg:y="14.274cm">
            <text:p/>
            <draw:enhanced-geometry svg:viewBox="0 0 21 17" draw:type="non-primitive" draw:enhanced-path="M 20 8  L 16 8  L 15 8  L 14 4  L 12 4  L 10 4  L 8 0  L 6 0  L 4 0  L 4 0  L 4 0  L 3 0  L 3 0  L 2 0  L 1 0  L 1 4  L 0 4  L 0 8  L 0 8  L 0 8  L 0 8  L 12 16  L 20 8  L 20 8  N"/>
          </draw:custom-shape>
          <draw:custom-shape draw:style-name="gr1045" draw:text-style-name="P211" draw:layer="layout" svg:width="0.093cm" svg:height="0.075cm" svg:x="18.296cm" svg:y="14.274cm">
            <text:p/>
            <draw:enhanced-geometry svg:viewBox="0 0 21 17" draw:type="non-primitive" draw:enhanced-path="M 20 6  L 17 6  L 16 6  L 14 6  L 13 6  L 11 6  L 8 3  L 7 3  L 6 3  L 4 3  L 4 0  L 4 0  L 3 0  L 2 3  L 2 3  L 1 3  L 1 6  L 0 6  L 0 6  L 0 6  L 0 6  L 0 6  L 12 16  L 20 6  L 20 6  L 20 6  N"/>
          </draw:custom-shape>
          <draw:custom-shape draw:style-name="gr1046" draw:text-style-name="P236" draw:layer="layout" svg:width="0.322cm" svg:height="0.075cm" svg:x="18.318cm" svg:y="14.235cm">
            <text:p/>
            <draw:enhanced-geometry svg:viewBox="0 0 73 17" draw:type="non-primitive" draw:enhanced-path="M 72 4  L 72 4  L 71 3  L 70 2  L 68 2  L 67 2  L 65 2  L 64 2  L 63 2  L 61 2  L 60 1  L 58 2  L 56 2  L 54 2  L 53 2  L 51 2  L 49 2  L 48 2  L 46 2  L 44 3  L 43 3  L 41 4  L 40 4  L 39 5  L 37 5  L 36 6  L 34 6  L 34 7  L 32 7  L 31 9  L 30 9  L 30 9  L 30 10  L 0 16  L 0 16  L 0 16  L 0 16  L 0 16  L 30 9  L 30 9  L 31 8  L 32 7  L 32 6  L 34 6  L 34 5  L 36 4  L 37 4  L 39 4  L 40 3  L 42 2  L 43 2  L 45 2  L 47 1  L 48 1  L 50 0  L 52 0  L 53 0  L 55 0  L 57 0  L 58 0  L 60 0  L 61 0  L 63 0  L 64 0  L 65 0  L 67 1  L 69 1  L 70 2  L 71 2  L 72 3  L 72 3  L 72 4  L 72 4  L 72 4  L 72 4  L 72 4  L 72 4  N"/>
          </draw:custom-shape>
          <draw:custom-shape draw:style-name="gr1044" draw:text-style-name="P235" draw:layer="layout" svg:width="0.207cm" svg:height="0.075cm" svg:x="18.433cm" svg:y="14.243cm">
            <text:p/>
            <draw:enhanced-geometry svg:viewBox="0 0 47 17" draw:type="non-primitive" draw:enhanced-path="M 0 16  L 1 16  L 1 16  L 2 16  L 3 16  L 4 16  L 5 14  L 5 14  L 6 14  L 6 12  L 6 12  L 6 9  L 7 9  L 8 9  L 8 8  L 10 6  L 11 6  L 13 5  L 14 5  L 15 4  L 17 4  L 19 2  L 21 2  L 23 2  L 25 1  L 27 1  L 29 1  L 32 0  L 34 0  L 35 0  L 36 0  L 37 0  L 38 0  L 39 0  L 41 1  L 41 1  L 43 1  L 44 2  L 45 2  L 46 4  L 46 5  L 46 6  L 46 6  L 46 8  L 46 9  L 46 6  L 45 5  L 44 5  L 42 4  L 41 4  L 41 4  L 39 4  L 38 2  L 37 2  L 36 2  L 35 2  L 34 2  L 32 2  L 29 2  L 27 2  L 25 4  L 23 4  L 21 5  L 19 5  L 17 6  L 15 6  L 14 6  L 13 8  L 12 9  L 10 9  L 9 9  L 8 10  L 7 12  L 7 12  L 6 13  L 6 14  L 7 16  L 6 16  L 6 16  L 4 16  L 3 16  L 3 16  L 1 16  L 1 16  L 0 16  L 0 16  L 0 16  N"/>
          </draw:custom-shape>
          <draw:custom-shape draw:style-name="gr1047" draw:text-style-name="P237" draw:layer="layout" svg:width="0.005cm" svg:height="0.075cm" svg:x="18.6cm" svg:y="14.217cm">
            <text:p/>
            <draw:enhanced-geometry svg:viewBox="0 0 1 17" draw:type="non-primitive" draw:enhanced-path="M 0 0  L 0 5  L 0 5  L 0 5  L 0 10  L 0 10  L 0 10  L 0 16  L 0 16  L 0 0  L 0 0  N"/>
          </draw:custom-shape>
          <draw:custom-shape draw:style-name="gr1048" draw:text-style-name="P238" draw:layer="layout" svg:width="0.093cm" svg:height="0.075cm" svg:x="18.6cm" svg:y="14.217cm">
            <text:p/>
            <draw:enhanced-geometry svg:viewBox="0 0 21 17" draw:type="non-primitive" draw:enhanced-path="M 0 0  L 20 0  L 20 0  L 0 16  L 0 16  L 0 0  L 0 0  N"/>
          </draw:custom-shape>
          <draw:custom-shape draw:style-name="gr1049" draw:text-style-name="P239" draw:layer="layout" svg:width="0.093cm" svg:height="0.075cm" svg:x="18.6cm" svg:y="14.217cm">
            <text:p/>
            <draw:enhanced-geometry svg:viewBox="0 0 21 17" draw:type="non-primitive" draw:enhanced-path="M 20 0  L 20 0  L 20 0  L 20 0  L 0 16  L 0 16  L 0 16  L 20 0  L 20 0  N"/>
          </draw:custom-shape>
          <draw:custom-shape draw:style-name="gr1050" draw:text-style-name="P240" draw:layer="layout" svg:width="0.093cm" svg:height="0.075cm" svg:x="18.6cm" svg:y="14.217cm">
            <text:p/>
            <draw:enhanced-geometry svg:viewBox="0 0 21 17" draw:type="non-primitive" draw:enhanced-path="M 20 0  L 20 0  L 0 16  L 0 16  L 0 16  L 20 0  L 20 0  N"/>
          </draw:custom-shape>
          <draw:custom-shape draw:style-name="gr1051" draw:text-style-name="P241" draw:layer="layout" svg:width="0.093cm" svg:height="0.075cm" svg:x="18.6cm" svg:y="14.217cm">
            <text:p/>
            <draw:enhanced-geometry svg:viewBox="0 0 21 17" draw:type="non-primitive" draw:enhanced-path="M 20 0  L 20 0  L 20 0  L 20 0  L 20 16  L 20 16  L 0 16  L 20 0  L 20 0  L 20 0  N"/>
          </draw:custom-shape>
          <draw:custom-shape draw:style-name="gr1052" draw:text-style-name="P242" draw:layer="layout" svg:width="0.092cm" svg:height="0.075cm" svg:x="18.605cm" svg:y="14.217cm">
            <text:p/>
            <draw:enhanced-geometry svg:viewBox="0 0 21 17" draw:type="non-primitive" draw:enhanced-path="M 0 0  L 20 0  L 0 16  L 0 16  L 0 0  L 0 0  N"/>
          </draw:custom-shape>
          <draw:custom-shape draw:style-name="gr1053" draw:text-style-name="P243" draw:layer="layout" svg:width="0.092cm" svg:height="0.075cm" svg:x="18.605cm" svg:y="14.217cm">
            <text:p/>
            <draw:enhanced-geometry svg:viewBox="0 0 21 17" draw:type="non-primitive" draw:enhanced-path="M 20 0  L 20 0  L 0 16  L 0 16  L 20 0  L 20 0  N"/>
          </draw:custom-shape>
          <draw:custom-shape draw:style-name="gr1054" draw:text-style-name="P244" draw:layer="layout" svg:width="0.092cm" svg:height="0.075cm" svg:x="18.605cm" svg:y="14.217cm">
            <text:p/>
            <draw:enhanced-geometry svg:viewBox="0 0 21 17" draw:type="non-primitive" draw:enhanced-path="M 20 0  L 20 0  L 20 0  L 20 0  L 0 16  L 0 16  L 0 16  L 20 0  L 20 0  N"/>
          </draw:custom-shape>
          <draw:custom-shape draw:style-name="gr1055" draw:text-style-name="P245" draw:layer="layout" svg:width="0.092cm" svg:height="0.075cm" svg:x="18.605cm" svg:y="14.213cm">
            <text:p/>
            <draw:enhanced-geometry svg:viewBox="0 0 21 17" draw:type="non-primitive" draw:enhanced-path="M 10 0  L 20 3  L 0 16  L 0 12  L 0 12  L 10 3  L 10 3  L 10 0  N"/>
          </draw:custom-shape>
          <draw:custom-shape draw:style-name="gr1056" draw:text-style-name="P246" draw:layer="layout" svg:width="0.092cm" svg:height="0.075cm" svg:x="18.605cm" svg:y="14.213cm">
            <text:p/>
            <draw:enhanced-geometry svg:viewBox="0 0 21 17" draw:type="non-primitive" draw:enhanced-path="M 20 0  L 20 0  L 20 0  L 20 0  L 10 16  L 0 16  L 0 16  L 20 3  L 20 3  L 20 0  N"/>
          </draw:custom-shape>
          <draw:custom-shape draw:style-name="gr1057" draw:text-style-name="P247" draw:layer="layout" svg:width="0.093cm" svg:height="0.075cm" svg:x="18.609cm" svg:y="14.208cm">
            <text:p/>
            <draw:enhanced-geometry svg:viewBox="0 0 21 17" draw:type="non-primitive" draw:enhanced-path="M 20 2  L 20 2  L 20 2  L 20 2  L 20 2  L 20 2  L 20 2  L 20 2  L 20 0  L 20 0  L 0 16  L 0 16  L 20 2  L 20 2  N"/>
          </draw:custom-shape>
          <draw:custom-shape draw:style-name="gr1058" draw:text-style-name="P248" draw:layer="layout" svg:width="0.093cm" svg:height="0.075cm" svg:x="18.609cm" svg:y="14.208cm">
            <text:p/>
            <draw:enhanced-geometry svg:viewBox="0 0 21 17" draw:type="non-primitive" draw:enhanced-path="M 20 0  L 20 2  L 20 2  L 20 2  L 0 16  L 0 16  L 0 16  L 20 0  L 20 0  N"/>
          </draw:custom-shape>
          <draw:custom-shape draw:style-name="gr1059" draw:text-style-name="P249" draw:layer="layout" svg:width="0.093cm" svg:height="0.075cm" svg:x="18.609cm" svg:y="14.213cm">
            <text:p/>
            <draw:enhanced-geometry svg:viewBox="0 0 21 17" draw:type="non-primitive" draw:enhanced-path="M 20 0  L 20 16  L 20 16  L 0 16  L 20 0  L 20 0  L 20 0  N"/>
          </draw:custom-shape>
          <draw:custom-shape draw:style-name="gr1060" draw:text-style-name="P250" draw:layer="layout" svg:width="0.005cm" svg:height="0.075cm" svg:x="18.613cm" svg:y="14.213cm">
            <text:p/>
            <draw:enhanced-geometry svg:viewBox="0 0 1 17" draw:type="non-primitive" draw:enhanced-path="M 0 0  L 0 0  L 0 0  L 0 16  L 0 16  L 0 16  L 0 0  L 0 0  L 0 0  N"/>
          </draw:custom-shape>
          <draw:custom-shape draw:style-name="gr1061" draw:text-style-name="P251" draw:layer="layout" svg:width="0.093cm" svg:height="0.075cm" svg:x="18.613cm" svg:y="14.213cm">
            <text:p/>
            <draw:enhanced-geometry svg:viewBox="0 0 21 17" draw:type="non-primitive" draw:enhanced-path="M 0 0  L 20 0  L 20 0  L 0 16  L 0 16  L 0 0  L 0 0  L 0 0  N"/>
          </draw:custom-shape>
          <draw:custom-shape draw:style-name="gr1062" draw:text-style-name="P252" draw:layer="layout" svg:width="0.093cm" svg:height="0.075cm" svg:x="18.613cm" svg:y="14.213cm">
            <text:p/>
            <draw:enhanced-geometry svg:viewBox="0 0 21 17" draw:type="non-primitive" draw:enhanced-path="M 20 0  L 20 0  L 0 16  L 0 16  L 20 0  L 20 0  L 20 0  N"/>
          </draw:custom-shape>
          <draw:custom-shape draw:style-name="gr1063" draw:text-style-name="P253" draw:layer="layout" svg:width="0.093cm" svg:height="0.075cm" svg:x="18.613cm" svg:y="14.213cm">
            <text:p/>
            <draw:enhanced-geometry svg:viewBox="0 0 21 17" draw:type="non-primitive" draw:enhanced-path="M 20 0  L 20 0  L 20 0  L 0 16  L 0 16  L 0 16  L 0 16  L 20 0  L 20 0  L 20 0  N"/>
          </draw:custom-shape>
          <draw:custom-shape draw:style-name="gr1064" draw:text-style-name="P254" draw:layer="layout" svg:width="0.093cm" svg:height="0.075cm" svg:x="18.613cm" svg:y="14.213cm">
            <text:p/>
            <draw:enhanced-geometry svg:viewBox="0 0 21 17" draw:type="non-primitive" draw:enhanced-path="M 20 0  L 20 0  L 20 3  L 0 16  L 0 16  L 20 0  L 20 0  N"/>
          </draw:custom-shape>
          <draw:custom-shape draw:style-name="gr1065" draw:text-style-name="P255" draw:layer="layout" svg:width="0.093cm" svg:height="0.075cm" svg:x="18.613cm" svg:y="14.213cm">
            <text:p/>
            <draw:enhanced-geometry svg:viewBox="0 0 21 17" draw:type="non-primitive" draw:enhanced-path="M 10 0  L 20 3  L 20 3  L 20 3  L 0 16  L 0 16  L 10 3  L 10 3  L 10 0  N"/>
          </draw:custom-shape>
          <draw:custom-shape draw:style-name="gr1066" draw:text-style-name="P256" draw:layer="layout" svg:width="0.093cm" svg:height="0.075cm" svg:x="18.613cm" svg:y="14.217cm">
            <text:p/>
            <draw:enhanced-geometry svg:viewBox="0 0 21 17" draw:type="non-primitive" draw:enhanced-path="M 20 0  L 20 0  L 0 16  L 0 16  L 0 16  L 20 0  L 20 0  L 20 0  N"/>
          </draw:custom-shape>
          <draw:custom-shape draw:style-name="gr1067" draw:text-style-name="P257" draw:layer="layout" svg:width="0.093cm" svg:height="0.075cm" svg:x="18.613cm" svg:y="14.217cm">
            <text:p/>
            <draw:enhanced-geometry svg:viewBox="0 0 21 17" draw:type="non-primitive" draw:enhanced-path="M 20 0  L 20 0  L 20 0  L 20 0  L 10 16  L 10 16  L 10 16  L 0 16  L 20 0  L 20 0  N"/>
          </draw:custom-shape>
          <draw:custom-shape draw:style-name="gr1068" draw:text-style-name="P258" draw:layer="layout" svg:width="0.093cm" svg:height="0.075cm" svg:x="18.622cm" svg:y="14.217cm">
            <text:p/>
            <draw:enhanced-geometry svg:viewBox="0 0 21 17" draw:type="non-primitive" draw:enhanced-path="M 20 0  L 20 0  L 0 16  L 0 16  L 20 0  L 20 0  L 20 0  N"/>
          </draw:custom-shape>
          <draw:custom-shape draw:style-name="gr1069" draw:text-style-name="P259" draw:layer="layout" svg:width="0.093cm" svg:height="0.075cm" svg:x="18.622cm" svg:y="14.217cm">
            <text:p/>
            <draw:enhanced-geometry svg:viewBox="0 0 21 17" draw:type="non-primitive" draw:enhanced-path="M 10 0  L 20 4  L 20 4  L 20 4  L 10 16  L 10 16  L 0 16  L 10 0  L 10 0  N"/>
          </draw:custom-shape>
          <draw:custom-shape draw:style-name="gr1070" draw:text-style-name="P260" draw:layer="layout" svg:width="0.093cm" svg:height="0.075cm" svg:x="18.622cm" svg:y="14.221cm">
            <text:p/>
            <draw:enhanced-geometry svg:viewBox="0 0 21 17" draw:type="non-primitive" draw:enhanced-path="M 20 0  L 20 0  L 20 0  L 0 16  L 0 16  L 20 0  L 20 0  L 20 0  N"/>
          </draw:custom-shape>
          <draw:custom-shape draw:style-name="gr1071" draw:text-style-name="P261" draw:layer="layout" svg:width="0.093cm" svg:height="0.075cm" svg:x="18.622cm" svg:y="14.221cm">
            <text:p/>
            <draw:enhanced-geometry svg:viewBox="0 0 21 17" draw:type="non-primitive" draw:enhanced-path="M 20 0  L 20 0  L 20 0  L 0 16  L 0 16  L 0 16  L 20 0  L 20 0  L 20 0  N"/>
          </draw:custom-shape>
          <draw:custom-shape draw:style-name="gr1072" draw:text-style-name="P262" draw:layer="layout" svg:width="0.093cm" svg:height="0.075cm" svg:x="18.622cm" svg:y="14.221cm">
            <text:p/>
            <draw:enhanced-geometry svg:viewBox="0 0 21 17" draw:type="non-primitive" draw:enhanced-path="M 20 0  L 20 0  L 20 0  L 20 0  L 20 16  L 20 16  L 0 16  L 20 0  L 20 0  L 20 0  N"/>
          </draw:custom-shape>
          <draw:custom-shape draw:style-name="gr1073" draw:text-style-name="P263" draw:layer="layout" svg:width="0.004cm" svg:height="0.075cm" svg:x="18.627cm" svg:y="14.221cm">
            <text:p/>
            <draw:enhanced-geometry svg:viewBox="0 0 1 17" draw:type="non-primitive" draw:enhanced-path="M 0 0  L 0 5  L 0 5  L 0 16  L 0 16  L 0 0  L 0 0  N"/>
          </draw:custom-shape>
          <draw:custom-shape draw:style-name="gr1074" draw:text-style-name="P264" draw:layer="layout" svg:width="0.004cm" svg:height="0.075cm" svg:x="18.627cm" svg:y="14.226cm">
            <text:p/>
            <draw:enhanced-geometry svg:viewBox="0 0 1 17" draw:type="non-primitive" draw:enhanced-path="M 0 0  L 0 0  L 0 0  L 0 8  L 0 16  L 0 16  L 0 16  L 0 0  L 0 0  L 0 0  N"/>
          </draw:custom-shape>
          <draw:custom-shape draw:style-name="gr1075" draw:text-style-name="P265" draw:layer="layout" svg:width="0.004cm" svg:height="0.075cm" svg:x="18.627cm" svg:y="14.23cm">
            <text:p/>
            <draw:enhanced-geometry svg:viewBox="0 0 1 17" draw:type="non-primitive" draw:enhanced-path="M 0 0  L 0 0  L 0 16  L 0 16  L 0 0  L 0 0  L 0 0  N"/>
          </draw:custom-shape>
          <draw:custom-shape draw:style-name="gr1076" draw:text-style-name="P266" draw:layer="layout" svg:width="0.004cm" svg:height="0.075cm" svg:x="18.627cm" svg:y="14.23cm">
            <text:p/>
            <draw:enhanced-geometry svg:viewBox="0 0 1 17" draw:type="non-primitive" draw:enhanced-path="M 0 0  L 0 0  L 0 0  L 0 16  L 0 16  L 0 16  L 0 16  L 0 0  L 0 0  N"/>
          </draw:custom-shape>
          <draw:custom-shape draw:style-name="gr1077" draw:text-style-name="P267" draw:layer="layout" svg:width="0.004cm" svg:height="0.004cm" svg:x="18.627cm" svg:y="14.235cm">
            <text:p/>
            <draw:enhanced-geometry svg:viewBox="0 0 1 1" draw:type="non-primitive" draw:enhanced-path="M 0 0  L 0 0  L 0 0  L 0 0  L 0 0  L 0 0  L 0 0  L 0 0  N"/>
          </draw:custom-shape>
          <draw:custom-shape draw:style-name="gr1078" draw:text-style-name="P268" draw:layer="layout" svg:width="0.092cm" svg:height="0.075cm" svg:x="18.627cm" svg:y="14.235cm">
            <text:p/>
            <draw:enhanced-geometry svg:viewBox="0 0 21 17" draw:type="non-primitive" draw:enhanced-path="M 0 0  L 20 0  L 20 0  L 20 0  L 20 16  L 0 0  L 0 0  L 0 0  L 0 0  N"/>
          </draw:custom-shape>
          <draw:custom-shape draw:style-name="gr1079" draw:text-style-name="P269" draw:layer="layout" svg:width="0.004cm" svg:height="0.075cm" svg:x="18.631cm" svg:y="14.235cm">
            <text:p/>
            <draw:enhanced-geometry svg:viewBox="0 0 1 17" draw:type="non-primitive" draw:enhanced-path="M 0 0  L 0 0  L 0 0  L 0 16  L 0 16  L 0 0  L 0 0  L 0 0  N"/>
          </draw:custom-shape>
          <draw:custom-shape draw:style-name="gr1080" draw:text-style-name="P270" draw:layer="layout" svg:width="0.004cm" svg:height="0.075cm" svg:x="18.631cm" svg:y="14.235cm">
            <text:p/>
            <draw:enhanced-geometry svg:viewBox="0 0 1 17" draw:type="non-primitive" draw:enhanced-path="M 0 0  L 0 0  L 0 0  L 0 16  L 0 16  L 0 16  L 0 16  L 0 0  L 0 0  L 0 0  N"/>
          </draw:custom-shape>
          <draw:custom-shape draw:style-name="gr1081" draw:text-style-name="P127" draw:layer="layout" svg:width="0.004cm" svg:height="0.004cm" svg:x="18.631cm" svg:y="14.239cm">
            <text:p/>
            <draw:enhanced-geometry svg:viewBox="0 0 1 1" draw:type="non-primitive" draw:enhanced-path="M 0 0  L 0 0  L 0 0  L 0 0  L 0 0  L 0 0  L 0 0  N"/>
          </draw:custom-shape>
          <draw:custom-shape draw:style-name="gr114" draw:text-style-name="P35" draw:layer="layout" svg:width="0.092cm" svg:height="0.075cm" svg:x="18.543cm" svg:y="14.235cm">
            <text:p/>
            <draw:enhanced-geometry svg:viewBox="0 0 21 17" draw:type="non-primitive" draw:enhanced-path="M 0 1  L 0 1  L 2 1  L 5 1  L 5 0  L 8 0  L 8 0  L 11 0  L 11 0  L 14 0  L 17 0  L 17 1  L 20 1  L 20 3  L 20 5  L 20 7  L 20 10  L 20 12  L 20 12  L 17 14  L 17 16  L 2 16  L 0 1  L 0 1  L 0 1  N"/>
          </draw:custom-shape>
          <draw:custom-shape draw:style-name="gr114" draw:text-style-name="P35" draw:layer="layout" svg:width="0.198cm" svg:height="0.075cm" svg:x="18.437cm" svg:y="14.257cm">
            <text:p/>
            <draw:enhanced-geometry svg:viewBox="0 0 45 17" draw:type="non-primitive" draw:enhanced-path="M 0 16  L 0 14  L 0 12  L 1 12  L 2 11  L 3 10  L 3 10  L 4 10  L 5 10  L 5 10  L 6 9  L 6 9  L 7 9  L 7 9  L 7 8  L 7 8  L 7 8  L 7 6  L 8 6  L 9 5  L 10 5  L 11 4  L 12 4  L 12 4  L 13 4  L 14 3  L 16 3  L 16 2  L 18 2  L 20 2  L 21 1  L 23 1  L 24 1  L 26 1  L 27 1  L 28 1  L 30 0  L 32 0  L 33 0  L 35 1  L 37 1  L 37 1  L 38 1  L 39 1  L 40 1  L 41 1  L 42 1  L 43 2  L 44 2  L 44 2  L 44 3  L 44 4  L 44 4  L 43 5  L 43 6  L 41 8  L 40 9  L 38 10  L 37 10  L 35 11  L 34 11  L 34 12  L 33 12  L 33 12  L 33 12  L 33 12  L 34 14  L 35 16  L 33 16  L 32 13  L 31 12  L 30 12  L 29 12  L 28 12  L 28 12  L 27 12  L 26 12  L 25 12  L 24 12  L 24 12  L 24 12  L 24 12  L 24 12  L 24 13  L 24 13  L 25 13  L 25 14  L 25 16  L 24 16  L 24 14  L 23 14  L 22 13  L 21 12  L 21 12  L 20 12  L 20 12  L 19 12  L 18 12  L 17 12  L 16 12  L 16 12  L 16 13  L 16 13  L 16 14  L 15 16  L 13 16  L 13 16  L 13 14  L 14 14  L 14 13  L 14 13  L 14 12  L 13 12  L 12 12  L 12 12  L 11 12  L 10 12  L 10 13  L 10 16  L 8 16  L 8 14  L 9 13  L 9 12  L 9 12  L 9 12  L 9 12  L 9 12  L 9 12  L 9 11  L 7 10  L 7 10  L 6 10  L 5 10  L 5 11  L 4 11  L 3 12  L 3 12  L 2 12  L 2 13  L 1 16  L 0 16  L 0 16  N"/>
          </draw:custom-shape>
          <draw:custom-shape draw:style-name="gr114" draw:text-style-name="P35" draw:layer="layout" svg:width="0.093cm" svg:height="0.075cm" svg:x="18.415cm" svg:y="14.318cm">
            <text:p/>
            <draw:enhanced-geometry svg:viewBox="0 0 21 17" draw:type="non-primitive" draw:enhanced-path="M 5 0  L 5 0  L 4 2  L 4 4  L 4 6  L 4 9  L 3 9  L 3 9  L 3 9  L 2 9  L 2 9  L 2 9  L 2 9  L 2 11  L 1 11  L 0 11  L 0 13  L 0 13  L 0 16  L 0 16  L 0 16  L 1 16  L 17 4  L 18 4  L 19 2  L 19 0  L 20 0  L 18 0  L 17 0  L 17 0  L 17 0  L 16 0  L 16 0  L 15 0  L 14 0  L 15 0  L 13 0  L 13 0  L 13 0  L 13 0  L 13 2  L 12 2  L 5 9  L 5 4  L 5 2  L 5 0  L 6 0  L 5 0  L 5 0  N"/>
          </draw:custom-shape>
          <draw:custom-shape draw:style-name="gr114" draw:text-style-name="P35" draw:layer="layout" svg:width="0.101cm" svg:height="0.075cm" svg:x="18.534cm" svg:y="14.318cm">
            <text:p/>
            <draw:enhanced-geometry svg:viewBox="0 0 23 17" draw:type="non-primitive" draw:enhanced-path="M 2 0  L 2 0  L 2 1  L 3 4  L 3 7  L 3 10  L 4 10  L 3 11  L 3 11  L 3 13  L 3 13  L 2 13  L 2 13  L 2 14  L 2 14  L 1 14  L 1 16  L 0 16  L 0 16  L 0 16  L 1 16  L 1 16  L 18 8  L 19 7  L 20 5  L 21 5  L 21 4  L 21 2  L 21 2  L 22 1  L 22 1  L 21 0  L 21 0  L 21 0  L 20 1  L 20 1  L 20 2  L 20 2  L 19 4  L 19 5  L 18 5  L 18 5  L 18 5  L 14 8  L 13 2  L 13 0  L 13 0  L 11 0  L 11 0  L 12 1  L 12 2  L 13 8  L 5 11  L 5 11  L 5 10  L 5 10  L 5 10  L 4 5  L 4 4  L 4 1  L 3 0  L 2 0  L 2 0  N"/>
          </draw:custom-shape>
          <draw:custom-shape draw:style-name="gr1082" draw:text-style-name="P271" draw:layer="layout" svg:width="0.092cm" svg:height="0.291cm" svg:x="18.305cm" svg:y="17.48cm">
            <text:p/>
            <draw:enhanced-geometry svg:viewBox="0 0 21 66" draw:type="non-primitive" draw:enhanced-path="M 10 0  L 12 1  L 13 3  L 16 6  L 16 10  L 18 15  L 20 20  L 20 26  L 20 33  L 20 39  L 20 45  L 18 50  L 16 56  L 16 59  L 13 63  L 12 64  L 11 65  L 7 64  L 6 63  L 5 59  L 3 56  L 2 50  L 1 45  L 0 39  L 0 33  L 0 26  L 1 20  L 2 15  L 3 10  L 5 6  L 6 3  L 7 1  L 11 1  L 11 1  L 10 0  N"/>
          </draw:custom-shape>
          <draw:custom-shape draw:style-name="gr1082" draw:text-style-name="P271" draw:layer="layout" svg:width="0.093cm" svg:height="0.291cm" svg:x="21.215cm" svg:y="17.48cm">
            <text:p/>
            <draw:enhanced-geometry svg:viewBox="0 0 21 66" draw:type="non-primitive" draw:enhanced-path="M 11 0  L 8 1  L 6 3  L 5 6  L 3 10  L 2 15  L 1 20  L 1 26  L 0 33  L 1 39  L 1 45  L 2 50  L 3 56  L 5 59  L 6 63  L 8 64  L 11 65  L 12 64  L 13 63  L 16 59  L 17 56  L 18 50  L 20 45  L 20 39  L 20 33  L 20 26  L 20 20  L 18 15  L 17 10  L 16 6  L 13 3  L 12 1  L 11 1  L 11 1  L 11 0  N"/>
          </draw:custom-shape>
          <draw:custom-shape draw:style-name="gr1083" draw:text-style-name="P272" draw:layer="layout" svg:width="0.092cm" svg:height="0.352cm" svg:x="18.424cm" svg:y="17.41cm">
            <text:p/>
            <draw:enhanced-geometry svg:viewBox="0 0 21 80" draw:type="non-primitive" draw:enhanced-path="M 10 0  L 11 1  L 14 3  L 15 7  L 17 11  L 18 18  L 20 24  L 20 32  L 20 39  L 20 48  L 20 55  L 18 62  L 17 68  L 15 72  L 14 76  L 11 79  L 10 79  L 8 79  L 5 76  L 3 72  L 3 68  L 1 62  L 1 55  L 0 48  L 0 39  L 0 32  L 1 24  L 1 18  L 3 11  L 3 7  L 5 3  L 8 1  L 10 0  L 10 0  N"/>
          </draw:custom-shape>
          <draw:custom-shape draw:style-name="gr1083" draw:text-style-name="P272" draw:layer="layout" svg:width="0.092cm" svg:height="0.352cm" svg:x="21.092cm" svg:y="17.41cm">
            <text:p/>
            <draw:enhanced-geometry svg:viewBox="0 0 21 80" draw:type="non-primitive" draw:enhanced-path="M 10 0  L 7 1  L 6 3  L 4 7  L 3 11  L 1 18  L 1 24  L 1 32  L 0 39  L 1 48  L 1 55  L 1 62  L 3 68  L 4 72  L 6 76  L 7 79  L 10 79  L 12 79  L 14 76  L 15 72  L 17 68  L 17 62  L 18 55  L 20 48  L 20 39  L 20 32  L 18 24  L 17 18  L 17 11  L 15 7  L 14 3  L 12 1  L 10 0  L 10 0  L 10 0  N"/>
          </draw:custom-shape>
          <draw:custom-shape draw:style-name="gr1084" draw:text-style-name="P271" draw:layer="layout" svg:width="0.093cm" svg:height="0.243cm" svg:x="18.49cm" svg:y="17.533cm">
            <text:p/>
            <draw:enhanced-geometry svg:viewBox="0 0 21 55" draw:type="non-primitive" draw:enhanced-path="M 10 0  L 12 1  L 14 2  L 15 5  L 17 8  L 18 12  L 18 17  L 20 22  L 20 28  L 20 33  L 18 37  L 18 42  L 17 47  L 15 50  L 14 52  L 12 54  L 10 54  L 7 54  L 5 52  L 4 50  L 2 47  L 1 42  L 1 37  L 1 33  L 0 28  L 1 22  L 1 17  L 1 12  L 2 8  L 4 5  L 5 2  L 7 1  L 10 0  L 10 0  L 10 0  N"/>
          </draw:custom-shape>
          <draw:custom-shape draw:style-name="gr1084" draw:text-style-name="P271" draw:layer="layout" svg:width="0.092cm" svg:height="0.243cm" svg:x="21.048cm" svg:y="17.533cm">
            <text:p/>
            <draw:enhanced-geometry svg:viewBox="0 0 21 55" draw:type="non-primitive" draw:enhanced-path="M 10 0  L 7 1  L 5 2  L 2 5  L 2 8  L 1 12  L 0 17  L 0 22  L 0 28  L 0 33  L 0 37  L 1 42  L 2 47  L 2 50  L 5 52  L 7 54  L 10 54  L 11 54  L 12 52  L 15 50  L 15 47  L 17 42  L 18 37  L 20 33  L 20 28  L 20 22  L 18 17  L 17 12  L 15 8  L 15 5  L 12 2  L 11 1  L 10 0  L 10 0  L 10 0  N"/>
          </draw:custom-shape>
          <draw:custom-shape draw:style-name="gr1084" draw:text-style-name="P271" draw:layer="layout" svg:width="0.093cm" svg:height="0.119cm" svg:x="18.591cm" svg:y="17.657cm">
            <text:p/>
            <draw:enhanced-geometry svg:viewBox="0 0 21 27" draw:type="non-primitive" draw:enhanced-path="M 9 0  L 12 0  L 14 1  L 16 2  L 18 4  L 18 6  L 18 8  L 20 10  L 20 13  L 20 16  L 18 18  L 18 20  L 18 22  L 16 23  L 14 25  L 12 26  L 9 26  L 9 26  L 5 25  L 3 23  L 3 22  L 1 20  L 0 18  L 0 16  L 0 13  L 0 10  L 0 8  L 1 6  L 3 4  L 3 2  L 5 1  L 9 0  L 9 0  L 9 0  N"/>
          </draw:custom-shape>
          <draw:custom-shape draw:style-name="gr1084" draw:text-style-name="P271" draw:layer="layout" svg:width="0.092cm" svg:height="0.119cm" svg:x="20.951cm" svg:y="17.657cm">
            <text:p/>
            <draw:enhanced-geometry svg:viewBox="0 0 21 27" draw:type="non-primitive" draw:enhanced-path="M 10 0  L 8 0  L 6 1  L 5 2  L 5 4  L 3 6  L 1 8  L 0 10  L 0 13  L 0 16  L 1 18  L 3 20  L 5 22  L 5 23  L 6 25  L 8 26  L 10 26  L 11 26  L 13 25  L 16 23  L 16 22  L 18 20  L 18 18  L 20 16  L 20 13  L 20 10  L 18 8  L 18 6  L 16 4  L 16 2  L 13 1  L 11 0  L 10 0  L 10 0  L 10 0  N"/>
          </draw:custom-shape>
          <draw:custom-shape draw:style-name="gr1085" draw:text-style-name="P273" draw:layer="layout" svg:width="0.092cm" svg:height="0.264cm" svg:x="18.658cm" svg:y="17.529cm">
            <text:p/>
            <draw:enhanced-geometry svg:viewBox="0 0 21 60" draw:type="non-primitive" draw:enhanced-path="M 7 0  L 10 1  L 12 3  L 14 5  L 16 9  L 16 13  L 18 18  L 18 24  L 20 29  L 18 36  L 18 41  L 16 46  L 16 50  L 14 54  L 12 57  L 10 58  L 7 59  L 7 58  L 3 57  L 3 54  L 1 50  L 0 46  L 0 41  L 0 36  L 0 29  L 0 24  L 0 18  L 0 13  L 1 9  L 3 5  L 3 3  L 7 1  L 7 0  L 7 0  L 7 0  N"/>
          </draw:custom-shape>
          <draw:custom-shape draw:style-name="gr1085" draw:text-style-name="P273" draw:layer="layout" svg:width="0.093cm" svg:height="0.264cm" svg:x="20.893cm" svg:y="17.529cm">
            <text:p/>
            <draw:enhanced-geometry svg:viewBox="0 0 21 60" draw:type="non-primitive" draw:enhanced-path="M 10 0  L 8 1  L 6 3  L 5 5  L 3 9  L 1 13  L 0 18  L 0 24  L 0 29  L 0 36  L 0 41  L 1 46  L 3 50  L 5 54  L 6 57  L 8 58  L 10 59  L 11 58  L 13 57  L 15 54  L 16 50  L 16 46  L 18 41  L 18 36  L 20 29  L 18 24  L 18 18  L 16 13  L 16 9  L 15 5  L 13 3  L 11 1  L 10 0  L 10 0  N"/>
          </draw:custom-shape>
          <draw:custom-shape draw:style-name="gr1086" draw:text-style-name="P272" draw:layer="layout" svg:width="0.092cm" svg:height="0.207cm" svg:x="18.724cm" svg:y="17.595cm">
            <text:p/>
            <draw:enhanced-geometry svg:viewBox="0 0 21 47" draw:type="non-primitive" draw:enhanced-path="M 10 0  L 10 0  L 14 1  L 16 3  L 18 6  L 20 9  L 20 14  L 20 18  L 20 23  L 20 27  L 20 31  L 20 35  L 18 39  L 16 42  L 14 44  L 10 45  L 10 46  L 7 45  L 7 44  L 3 42  L 3 39  L 1 35  L 1 31  L 1 27  L 0 23  L 1 18  L 1 14  L 1 9  L 3 6  L 3 3  L 7 1  L 7 0  L 10 0  L 10 0  N"/>
          </draw:custom-shape>
          <draw:custom-shape draw:style-name="gr1086" draw:text-style-name="P272" draw:layer="layout" svg:width="0.093cm" svg:height="0.207cm" svg:x="20.827cm" svg:y="17.595cm">
            <text:p/>
            <draw:enhanced-geometry svg:viewBox="0 0 21 47" draw:type="non-primitive" draw:enhanced-path="M 10 0  L 8 0  L 6 1  L 4 3  L 2 6  L 2 9  L 0 14  L 0 18  L 0 23  L 0 27  L 0 31  L 2 35  L 2 39  L 4 42  L 6 44  L 8 45  L 10 46  L 12 45  L 14 44  L 16 42  L 18 39  L 20 35  L 20 31  L 20 27  L 20 23  L 20 18  L 20 14  L 20 9  L 18 6  L 16 3  L 14 1  L 12 0  L 10 0  L 10 0  N"/>
          </draw:custom-shape>
          <draw:custom-shape draw:style-name="gr1084" draw:text-style-name="P271" draw:layer="layout" svg:width="0.092cm" svg:height="0.145cm" svg:x="18.768cm" svg:y="17.648cm">
            <text:p/>
            <draw:enhanced-geometry svg:viewBox="0 0 21 33" draw:type="non-primitive" draw:enhanced-path="M 9 0  L 12 1  L 13 2  L 15 3  L 16 5  L 18 8  L 18 10  L 20 14  L 20 16  L 20 20  L 18 23  L 18 25  L 16 28  L 15 30  L 13 32  L 12 32  L 10 32  L 7 32  L 6 32  L 4 30  L 3 28  L 1 25  L 1 23  L 0 20  L 0 16  L 0 14  L 1 10  L 1 8  L 3 5  L 4 3  L 6 2  L 7 1  L 10 0  L 10 0  L 9 0  N"/>
          </draw:custom-shape>
          <draw:custom-shape draw:style-name="gr1084" draw:text-style-name="P271" draw:layer="layout" svg:width="0.093cm" svg:height="0.145cm" svg:x="20.765cm" svg:y="17.648cm">
            <text:p/>
            <draw:enhanced-geometry svg:viewBox="0 0 21 33" draw:type="non-primitive" draw:enhanced-path="M 10 0  L 8 1  L 5 2  L 4 3  L 2 5  L 2 8  L 1 10  L 0 14  L 0 16  L 0 20  L 1 23  L 2 25  L 2 28  L 4 30  L 5 32  L 8 32  L 10 32  L 11 32  L 12 32  L 15 30  L 17 28  L 18 25  L 20 23  L 20 20  L 20 16  L 20 14  L 20 10  L 18 8  L 17 5  L 15 3  L 12 2  L 11 1  L 10 0  L 10 0  L 10 0  N"/>
          </draw:custom-shape>
          <draw:custom-shape draw:style-name="gr1087" draw:text-style-name="P211" draw:layer="layout" svg:width="3.51cm" svg:height="0.327cm" svg:x="17.886cm" svg:y="17.793cm">
            <text:p/>
            <draw:enhanced-geometry svg:viewBox="0 0 796 74" draw:type="non-primitive" draw:enhanced-path="M 795 0  L 0 0  L 0 73  L 795 73  L 795 0  L 795 0  L 795 0  N"/>
          </draw:custom-shape>
          <draw:custom-shape draw:style-name="gr1088" draw:text-style-name="P164" draw:layer="layout" svg:width="1.129cm" svg:height="0.075cm" svg:x="18.931cm" svg:y="17.78cm">
            <text:p/>
            <draw:enhanced-geometry svg:viewBox="0 0 256 17" draw:type="non-primitive" draw:enhanced-path="M 42 0  L 255 16  L 253 16  L 252 16  L 249 16  L 248 16  L 245 16  L 243 16  L 241 16  L 239 16  L 237 16  L 235 16  L 233 16  L 231 16  L 229 16  L 226 16  L 225 16  L 222 16  L 0 0  L 3 0  L 6 0  L 8 0  L 11 0  L 13 0  L 16 0  L 18 0  L 20 0  L 23 0  L 26 0  L 29 0  L 31 0  L 33 0  L 36 0  L 39 0  L 42 0  L 42 0  N"/>
          </draw:custom-shape>
          <draw:custom-shape draw:style-name="gr1089" draw:text-style-name="P164" draw:layer="layout" svg:width="1.059cm" svg:height="0.075cm" svg:x="19.354cm" svg:y="17.78cm">
            <text:p/>
            <draw:enhanced-geometry svg:viewBox="0 0 240 17" draw:type="non-primitive" draw:enhanced-path="M 45 0  L 239 16  L 237 16  L 234 16  L 232 16  L 230 16  L 227 16  L 225 16  L 223 16  L 221 16  L 219 16  L 216 16  L 215 16  L 213 16  L 210 16  L 208 16  L 206 16  L 204 16  L 0 0  L 3 0  L 6 0  L 9 0  L 12 0  L 14 0  L 17 0  L 19 0  L 22 0  L 25 0  L 28 0  L 31 0  L 33 0  L 36 0  L 38 0  L 41 0  L 45 0  L 45 0  N"/>
          </draw:custom-shape>
          <draw:custom-shape draw:style-name="gr1090" draw:text-style-name="P164" draw:layer="layout" svg:width="5.155cm" svg:height="0.221cm" svg:x="13.009cm" svg:y="5.653cm">
            <text:p/>
            <draw:enhanced-geometry svg:viewBox="0 0 1169 50" draw:type="non-primitive" draw:enhanced-path="M 0 49  L 1 0  L 1168 0  L 1168 49  L 1 49  L 1 49  L 0 49  N"/>
          </draw:custom-shape>
          <draw:custom-shape draw:style-name="gr1091" draw:text-style-name="P164" draw:layer="layout" svg:width="5.155cm" svg:height="0.441cm" svg:x="13.009cm" svg:y="4.176cm">
            <text:p/>
            <draw:enhanced-geometry svg:viewBox="0 0 1169 100" draw:type="non-primitive" draw:enhanced-path="M 0 0  L 1168 0  L 1168 99  L 1 99  L 1 0  L 1 0  L 0 0  N"/>
          </draw:custom-shape>
          <draw:custom-shape draw:style-name="gr1092" draw:text-style-name="P164" draw:layer="layout" svg:width="5.155cm" svg:height="0.432cm" svg:x="13.009cm" svg:y="4.67cm">
            <text:p/>
            <draw:enhanced-geometry svg:viewBox="0 0 1169 98" draw:type="non-primitive" draw:enhanced-path="M 0 0  L 1168 0  L 1168 97  L 1 97  L 1 0  L 1 0  L 0 0  N"/>
          </draw:custom-shape>
          <draw:custom-shape draw:style-name="gr1092" draw:text-style-name="P164" draw:layer="layout" svg:width="5.155cm" svg:height="0.432cm" svg:x="13.009cm" svg:y="5.164cm">
            <text:p/>
            <draw:enhanced-geometry svg:viewBox="0 0 1169 98" draw:type="non-primitive" draw:enhanced-path="M 0 0  L 1168 0  L 1168 97  L 1 97  L 1 0  L 1 0  L 0 0  N"/>
          </draw:custom-shape>
          <draw:custom-shape draw:style-name="gr1090" draw:text-style-name="P164" draw:layer="layout" svg:width="5.155cm" svg:height="0.221cm" svg:x="13.009cm" svg:y="5.869cm">
            <text:p/>
            <draw:enhanced-geometry svg:viewBox="0 0 1169 50" draw:type="non-primitive" draw:enhanced-path="M 0 0  L 1 49  L 1168 49  L 1168 0  L 1 0  L 1 0  L 0 0  N"/>
          </draw:custom-shape>
          <draw:custom-shape draw:style-name="gr1092" draw:text-style-name="P164" draw:layer="layout" svg:width="5.155cm" svg:height="0.432cm" svg:x="13.009cm" svg:y="6.147cm">
            <text:p/>
            <draw:enhanced-geometry svg:viewBox="0 0 1169 98" draw:type="non-primitive" draw:enhanced-path="M 0 0  L 1168 0  L 1168 97  L 1 97  L 1 0  L 1 0  L 0 0  N"/>
          </draw:custom-shape>
          <draw:custom-shape draw:style-name="gr1092" draw:text-style-name="P164" draw:layer="layout" svg:width="5.155cm" svg:height="0.432cm" svg:x="13.009cm" svg:y="6.641cm">
            <text:p/>
            <draw:enhanced-geometry svg:viewBox="0 0 1169 98" draw:type="non-primitive" draw:enhanced-path="M 0 0  L 1168 0  L 1168 97  L 1 97  L 1 0  L 1 0  L 0 0  N"/>
          </draw:custom-shape>
          <draw:custom-shape draw:style-name="gr1091" draw:text-style-name="P164" draw:layer="layout" svg:width="5.155cm" svg:height="0.441cm" svg:x="13.009cm" svg:y="7.126cm">
            <text:p/>
            <draw:enhanced-geometry svg:viewBox="0 0 1169 100" draw:type="non-primitive" draw:enhanced-path="M 0 0  L 1168 0  L 1168 99  L 1 99  L 1 0  L 1 0  L 0 0  N"/>
          </draw:custom-shape>
          <draw:custom-shape draw:style-name="gr121" draw:text-style-name="P16" draw:layer="layout" svg:width="0.005cm" svg:height="0.005cm" svg:x="14.133cm" svg:y="7.474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4.133cm" svg:y="7.474cm">
            <text:p/>
            <draw:enhanced-geometry svg:viewBox="0 0 1 1" draw:type="non-primitive" draw:enhanced-path="M 0 0  L 0 0  L 0 0  L 0 0  N"/>
          </draw:custom-shape>
          <draw:custom-shape draw:style-name="gr1093" draw:text-style-name="P35" draw:layer="layout" svg:width="1.01cm" svg:height="0.265cm" svg:x="13.141cm" svg:y="7.223cm">
            <text:p/>
            <draw:enhanced-geometry svg:viewBox="0 0 229 60" draw:type="non-primitive" draw:enhanced-path="M 30 15  L 32 14  L 34 17  L 32 14  L 30 14  L 30 13  L 31 13  L 31 11  L 32 11  L 32 11  L 33 11  L 34 11  L 34 11  L 34 13  L 34 13  L 36 27  L 35 30  L 35 30  L 36 30  L 37 30  L 38 30  L 39 31  L 40 31  L 40 31  L 40 45  L 53 45  L 53 42  L 56 42  L 56 41  L 44 41  L 44 39  L 44 0  L 228 0  L 228 39  L 228 45  L 227 45  L 227 47  L 225 50  L 225 57  L 224 57  L 224 50  L 212 51  L 212 51  L 212 50  L 212 51  L 212 52  L 212 52  L 212 54  L 211 55  L 210 56  L 209 57  L 208 59  L 207 59  L 205 59  L 204 59  L 202 58  L 202 57  L 201 55  L 200 54  L 200 53  L 199 52  L 197 52  L 194 52  L 194 52  L 194 51  L 194 51  L 194 52  L 194 52  L 193 54  L 193 55  L 192 56  L 191 57  L 189 59  L 188 59  L 186 59  L 185 59  L 184 58  L 183 57  L 183 55  L 182 54  L 181 53  L 180 52  L 179 52  L 169 52  L 169 49  L 167 49  L 167 47  L 140 47  L 140 52  L 126 52  L 126 52  L 126 53  L 126 54  L 125 54  L 124 54  L 111 54  L 110 54  L 110 54  L 110 53  L 110 52  L 110 52  L 101 52  L 101 54  L 101 54  L 102 54  L 102 54  L 102 55  L 102 56  L 102 56  L 101 57  L 100 57  L 99 57  L 99 56  L 98 56  L 98 55  L 98 54  L 98 54  L 99 54  L 99 54  L 99 45  L 85 45  L 79 41  L 63 41  L 63 42  L 64 42  L 65 45  L 69 47  L 71 49  L 69 52  L 67 52  L 67 51  L 67 51  L 67 51  L 67 52  L 67 52  L 66 54  L 65 55  L 65 56  L 64 57  L 62 59  L 61 59  L 60 59  L 58 59  L 57 58  L 56 57  L 56 55  L 55 54  L 54 53  L 53 52  L 52 52  L 48 52  L 48 52  L 48 53  L 48 54  L 48 54  L 47 54  L 34 54  L 33 54  L 32 54  L 32 53  L 32 52  L 32 52  L 31 52  L 30 56  L 30 56  L 29 52  L 28 52  L 28 51  L 28 51  L 28 51  L 28 52  L 28 52  L 27 54  L 27 55  L 26 56  L 25 57  L 23 59  L 22 59  L 20 59  L 19 59  L 18 59  L 16 58  L 15 57  L 14 56  L 13 54  L 13 53  L 13 52  L 13 52  L 12 52  L 12 52  L 12 52  L 8 52  L 5 52  L 5 51  L 3 51  L 2 51  L 1 51  L 1 50  L 1 50  L 1 47  L 1 47  L 0 47  L 0 47  L 0 47  L 0 46  L 0 41  L 0 40  L 0 40  L 0 40  L 1 39  L 1 39  L 1 33  L 3 30  L 4 19  L 5 18  L 5 17  L 6 16  L 8 16  L 8 16  L 15 7  L 15 6  L 17 6  L 18 5  L 19 4  L 20 4  L 21 3  L 22 3  L 23 3  L 30 3  L 30 15  L 30 15  N"/>
          </draw:custom-shape>
          <draw:custom-shape draw:style-name="gr121" draw:text-style-name="P16" draw:layer="layout" svg:width="0.005cm" svg:height="0.005cm" svg:x="15.447cm" svg:y="7.474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5.447cm" svg:y="7.474cm">
            <text:p/>
            <draw:enhanced-geometry svg:viewBox="0 0 1 1" draw:type="non-primitive" draw:enhanced-path="M 0 0  L 0 0  L 0 0  L 0 0  N"/>
          </draw:custom-shape>
          <draw:custom-shape draw:style-name="gr1094" draw:text-style-name="P35" draw:layer="layout" svg:width="1.005cm" svg:height="0.265cm" svg:x="14.455cm" svg:y="7.223cm">
            <text:p/>
            <draw:enhanced-geometry svg:viewBox="0 0 228 60" draw:type="non-primitive" draw:enhanced-path="M 30 15  L 32 14  L 33 17  L 32 14  L 30 14  L 30 13  L 30 13  L 31 11  L 31 11  L 32 11  L 32 11  L 33 11  L 34 11  L 34 13  L 34 13  L 35 27  L 34 30  L 35 30  L 35 30  L 37 30  L 37 30  L 39 31  L 39 31  L 40 31  L 40 45  L 52 45  L 53 42  L 56 42  L 56 41  L 44 41  L 44 39  L 44 0  L 227 0  L 227 39  L 227 45  L 226 45  L 226 47  L 225 50  L 225 57  L 224 57  L 224 50  L 212 51  L 212 51  L 212 50  L 212 51  L 212 52  L 212 52  L 211 54  L 211 55  L 210 56  L 208 57  L 207 59  L 206 59  L 205 59  L 203 59  L 202 58  L 201 57  L 201 55  L 200 54  L 199 53  L 198 52  L 197 52  L 194 52  L 194 52  L 194 51  L 194 51  L 194 52  L 193 52  L 193 54  L 192 55  L 191 56  L 191 57  L 189 59  L 187 59  L 186 59  L 185 59  L 183 58  L 183 57  L 182 55  L 181 54  L 181 53  L 180 52  L 179 52  L 169 52  L 169 49  L 167 49  L 167 47  L 139 47  L 139 52  L 126 52  L 126 52  L 125 53  L 125 54  L 124 54  L 124 54  L 110 54  L 110 54  L 109 54  L 109 53  L 109 52  L 109 52  L 101 52  L 101 54  L 101 54  L 101 54  L 101 54  L 102 55  L 101 56  L 101 56  L 101 57  L 100 57  L 99 57  L 98 56  L 98 56  L 98 55  L 98 54  L 98 54  L 98 54  L 99 54  L 99 45  L 84 45  L 79 41  L 62 41  L 62 42  L 64 42  L 65 45  L 68 47  L 71 49  L 68 52  L 67 52  L 67 51  L 67 51  L 67 51  L 67 52  L 66 52  L 65 54  L 65 55  L 64 56  L 63 57  L 62 59  L 60 59  L 59 59  L 58 59  L 56 58  L 56 57  L 56 55  L 55 54  L 53 53  L 53 52  L 51 52  L 49 52  L 49 52  L 48 53  L 48 54  L 47 54  L 47 54  L 33 54  L 32 54  L 32 54  L 32 53  L 32 52  L 32 52  L 31 52  L 30 56  L 30 56  L 30 52  L 27 52  L 27 51  L 27 51  L 27 51  L 27 52  L 27 52  L 27 54  L 27 55  L 25 56  L 25 57  L 23 59  L 21 59  L 20 59  L 18 59  L 17 59  L 16 58  L 15 57  L 14 56  L 13 54  L 13 53  L 13 52  L 12 52  L 12 52  L 11 52  L 11 52  L 8 52  L 4 52  L 4 51  L 2 51  L 1 51  L 1 51  L 1 50  L 0 50  L 0 47  L 0 47  L 0 47  L 0 47  L 0 47  L 0 46  L 0 41  L 0 40  L 0 40  L 0 40  L 0 39  L 1 39  L 1 33  L 4 30  L 4 19  L 4 18  L 5 17  L 6 16  L 7 16  L 8 16  L 15 7  L 15 6  L 16 6  L 17 5  L 18 4  L 19 4  L 20 3  L 21 3  L 23 3  L 30 3  L 30 15  L 30 15  L 30 15  N"/>
          </draw:custom-shape>
          <draw:custom-shape draw:style-name="gr121" draw:text-style-name="P16" draw:layer="layout" svg:width="0.005cm" svg:height="0.005cm" svg:x="18.018cm" svg:y="7.474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8.018cm" svg:y="7.474cm">
            <text:p/>
            <draw:enhanced-geometry svg:viewBox="0 0 1 1" draw:type="non-primitive" draw:enhanced-path="M 0 0  L 0 0  L 0 0  L 0 0  N"/>
          </draw:custom-shape>
          <draw:custom-shape draw:style-name="gr1095" draw:text-style-name="P35" draw:layer="layout" svg:width="1.009cm" svg:height="0.265cm" svg:x="17.022cm" svg:y="7.223cm">
            <text:p/>
            <draw:enhanced-geometry svg:viewBox="0 0 229 60" draw:type="non-primitive" draw:enhanced-path="M 31 15  L 32 14  L 34 17  L 32 14  L 31 14  L 31 13  L 32 13  L 32 11  L 32 11  L 32 11  L 34 11  L 35 11  L 35 11  L 35 13  L 35 13  L 36 27  L 35 30  L 36 30  L 37 30  L 37 30  L 39 30  L 39 31  L 40 31  L 41 31  L 41 45  L 53 45  L 54 42  L 56 42  L 56 41  L 44 41  L 44 39  L 44 0  L 228 0  L 228 39  L 228 45  L 227 45  L 227 47  L 226 50  L 226 57  L 224 57  L 224 50  L 213 51  L 213 51  L 213 50  L 213 51  L 213 52  L 213 52  L 212 54  L 212 55  L 210 56  L 210 57  L 208 59  L 207 59  L 205 59  L 204 59  L 203 58  L 203 57  L 202 55  L 201 54  L 200 53  L 199 52  L 198 52  L 195 52  L 195 52  L 195 51  L 195 51  L 195 52  L 195 52  L 194 54  L 193 55  L 193 56  L 191 57  L 190 59  L 188 59  L 187 59  L 186 59  L 185 58  L 184 57  L 183 55  L 183 54  L 182 53  L 181 52  L 179 52  L 169 52  L 169 49  L 167 49  L 167 47  L 141 47  L 141 52  L 127 52  L 127 52  L 127 53  L 126 54  L 126 54  L 125 54  L 112 54  L 110 54  L 110 54  L 110 53  L 110 52  L 110 52  L 101 52  L 101 54  L 102 54  L 102 54  L 103 54  L 103 55  L 103 56  L 102 56  L 101 57  L 101 57  L 100 57  L 100 56  L 99 56  L 99 55  L 99 54  L 99 54  L 100 54  L 100 54  L 100 45  L 86 45  L 80 41  L 63 41  L 63 42  L 65 42  L 65 45  L 69 47  L 72 49  L 69 52  L 68 52  L 68 51  L 68 51  L 68 51  L 68 52  L 68 52  L 67 54  L 66 55  L 65 56  L 64 57  L 63 59  L 61 59  L 60 59  L 58 59  L 58 58  L 57 57  L 56 55  L 56 54  L 55 53  L 54 52  L 52 52  L 49 52  L 49 52  L 49 53  L 49 54  L 48 54  L 48 54  L 34 54  L 33 54  L 33 54  L 32 53  L 32 52  L 32 52  L 32 52  L 31 56  L 31 56  L 30 52  L 29 52  L 29 51  L 29 51  L 29 51  L 29 52  L 28 52  L 28 54  L 27 55  L 27 56  L 25 57  L 24 59  L 23 59  L 21 59  L 20 59  L 18 59  L 17 58  L 16 57  L 15 56  L 14 54  L 14 53  L 14 52  L 13 52  L 13 52  L 12 52  L 12 52  L 9 52  L 6 52  L 6 51  L 3 51  L 3 51  L 2 51  L 1 50  L 1 50  L 1 47  L 1 47  L 1 47  L 0 47  L 0 47  L 1 46  L 1 41  L 0 40  L 0 40  L 1 40  L 1 39  L 1 39  L 1 33  L 4 30  L 5 19  L 6 18  L 6 17  L 6 16  L 8 16  L 9 16  L 16 7  L 16 6  L 17 6  L 18 5  L 19 4  L 20 4  L 22 3  L 23 3  L 23 3  L 31 3  L 31 15  L 31 15  N"/>
          </draw:custom-shape>
          <draw:custom-shape draw:style-name="gr121" draw:text-style-name="P16" draw:layer="layout" svg:width="0.093cm" svg:height="0.005cm" svg:x="16.779cm" svg:y="7.474cm">
            <text:p/>
            <draw:enhanced-geometry svg:viewBox="0 0 21 1" draw:type="non-primitive" draw:enhanced-path="M 0 0  L 20 0  L 20 0  L 20 0  L 0 0  N"/>
          </draw:custom-shape>
          <draw:custom-shape draw:style-name="gr666" draw:text-style-name="P2" draw:layer="layout" svg:width="0.093cm" svg:height="0.005cm" svg:x="16.779cm" svg:y="7.474cm">
            <text:p/>
            <draw:enhanced-geometry svg:viewBox="0 0 21 1" draw:type="non-primitive" draw:enhanced-path="M 0 0  L 20 0  L 20 0  L 20 0  N"/>
          </draw:custom-shape>
          <draw:custom-shape draw:style-name="gr1093" draw:text-style-name="P35" draw:layer="layout" svg:width="1.01cm" svg:height="0.265cm" svg:x="15.787cm" svg:y="7.223cm">
            <text:p/>
            <draw:enhanced-geometry svg:viewBox="0 0 229 60" draw:type="non-primitive" draw:enhanced-path="M 31 15  L 32 14  L 34 17  L 32 14  L 31 14  L 31 13  L 31 13  L 31 11  L 31 11  L 32 11  L 33 11  L 34 11  L 34 11  L 35 13  L 35 13  L 36 27  L 35 30  L 35 30  L 36 30  L 37 30  L 38 30  L 39 31  L 40 31  L 40 31  L 40 45  L 52 45  L 54 42  L 56 42  L 56 41  L 44 41  L 44 39  L 44 0  L 228 0  L 228 39  L 228 45  L 228 45  L 228 47  L 226 50  L 226 57  L 224 57  L 224 50  L 213 51  L 213 51  L 213 50  L 213 51  L 213 52  L 213 52  L 212 54  L 211 55  L 210 56  L 209 57  L 208 59  L 206 59  L 205 59  L 204 59  L 203 58  L 202 57  L 201 55  L 201 54  L 199 53  L 199 52  L 197 52  L 194 52  L 194 52  L 194 51  L 194 51  L 194 52  L 194 52  L 194 54  L 193 55  L 192 56  L 191 57  L 189 59  L 188 59  L 187 59  L 185 59  L 184 58  L 184 57  L 183 55  L 182 54  L 182 53  L 180 52  L 179 52  L 170 52  L 170 49  L 167 49  L 168 47  L 140 47  L 140 52  L 126 52  L 126 52  L 126 53  L 125 54  L 125 54  L 125 54  L 111 54  L 111 54  L 110 54  L 109 53  L 109 52  L 109 52  L 102 52  L 102 54  L 102 54  L 102 54  L 102 54  L 102 55  L 102 56  L 102 56  L 101 57  L 101 57  L 100 57  L 99 56  L 99 56  L 99 55  L 99 54  L 99 54  L 99 54  L 100 54  L 100 45  L 85 45  L 80 41  L 63 41  L 63 42  L 64 42  L 65 45  L 68 47  L 71 49  L 68 52  L 67 52  L 67 51  L 67 51  L 67 51  L 67 52  L 67 52  L 66 54  L 66 55  L 64 56  L 64 57  L 62 59  L 61 59  L 59 59  L 58 59  L 57 58  L 57 57  L 56 55  L 55 54  L 54 53  L 54 52  L 52 52  L 49 52  L 49 52  L 49 53  L 48 54  L 48 54  L 47 54  L 34 54  L 33 54  L 33 54  L 32 53  L 32 52  L 32 52  L 31 52  L 31 56  L 31 56  L 31 52  L 28 52  L 28 51  L 28 51  L 28 51  L 28 52  L 28 52  L 28 54  L 27 55  L 26 56  L 25 57  L 23 59  L 22 59  L 21 59  L 19 59  L 18 59  L 16 58  L 15 57  L 14 56  L 14 54  L 14 53  L 13 52  L 13 52  L 13 52  L 12 52  L 12 52  L 8 52  L 5 52  L 5 51  L 3 51  L 2 51  L 2 51  L 1 50  L 1 50  L 1 47  L 1 47  L 0 47  L 0 47  L 0 47  L 0 46  L 0 41  L 0 40  L 0 40  L 0 40  L 1 39  L 1 39  L 1 33  L 4 30  L 5 19  L 5 18  L 6 17  L 6 16  L 7 16  L 8 16  L 15 7  L 16 6  L 17 6  L 18 5  L 19 4  L 20 4  L 21 3  L 22 3  L 23 3  L 31 3  L 31 15  L 31 15  N"/>
          </draw:custom-shape>
          <draw:custom-shape draw:style-name="gr121" draw:text-style-name="P16" draw:layer="layout" svg:width="0.005cm" svg:height="0.004cm" svg:x="14.133cm" svg:y="5.98cm">
            <text:p/>
            <draw:enhanced-geometry svg:viewBox="0 0 1 1" draw:type="non-primitive" draw:enhanced-path="M 0 0  L 0 0  L 0 0  L 0 0  L 0 0  N"/>
          </draw:custom-shape>
          <draw:custom-shape draw:style-name="gr666" draw:text-style-name="P2" draw:layer="layout" svg:width="0.005cm" svg:height="0.004cm" svg:x="14.133cm" svg:y="5.98cm">
            <text:p/>
            <draw:enhanced-geometry svg:viewBox="0 0 1 1" draw:type="non-primitive" draw:enhanced-path="M 0 0  L 0 0  L 0 0  L 0 0  N"/>
          </draw:custom-shape>
          <draw:custom-shape draw:style-name="gr1093" draw:text-style-name="P35" draw:layer="layout" svg:width="1.01cm" svg:height="0.265cm" svg:x="13.141cm" svg:y="5.728cm">
            <text:p/>
            <draw:enhanced-geometry svg:viewBox="0 0 229 60" draw:type="non-primitive" draw:enhanced-path="M 30 15  L 32 15  L 34 17  L 32 15  L 30 15  L 30 13  L 31 13  L 31 12  L 32 11  L 32 11  L 33 11  L 34 11  L 34 12  L 34 13  L 34 13  L 36 27  L 35 30  L 35 30  L 36 30  L 37 31  L 38 31  L 39 31  L 40 31  L 40 31  L 40 32  L 40 45  L 53 45  L 53 43  L 56 43  L 56 41  L 44 41  L 44 39  L 44 0  L 228 0  L 228 39  L 228 45  L 227 45  L 227 48  L 225 51  L 225 57  L 224 57  L 224 51  L 212 51  L 212 51  L 212 51  L 212 51  L 212 53  L 212 54  L 211 55  L 210 57  L 209 58  L 208 58  L 207 59  L 205 59  L 204 59  L 202 58  L 202 57  L 201 56  L 200 54  L 200 53  L 199 52  L 197 51  L 194 51  L 194 51  L 194 51  L 194 51  L 194 51  L 194 53  L 193 54  L 193 55  L 192 56  L 191 58  L 189 58  L 188 59  L 186 59  L 185 59  L 184 58  L 183 57  L 183 56  L 182 54  L 181 53  L 180 52  L 179 51  L 169 51  L 169 49  L 167 49  L 167 48  L 140 48  L 140 51  L 126 51  L 126 53  L 126 53  L 126 54  L 125 54  L 124 54  L 111 54  L 110 54  L 110 54  L 110 53  L 110 53  L 110 51  L 101 51  L 101 54  L 101 54  L 102 54  L 102 55  L 102 56  L 102 56  L 102 57  L 101 57  L 100 57  L 99 57  L 99 57  L 98 56  L 98 56  L 98 55  L 98 54  L 99 54  L 99 53  L 99 45  L 85 45  L 79 41  L 63 41  L 63 43  L 64 43  L 65 45  L 69 48  L 71 50  L 69 51  L 67 51  L 67 51  L 67 51  L 67 51  L 67 51  L 67 53  L 66 54  L 65 55  L 65 56  L 64 58  L 62 58  L 61 59  L 60 59  L 58 59  L 57 58  L 56 57  L 56 56  L 55 54  L 54 53  L 53 52  L 52 51  L 48 51  L 48 53  L 48 53  L 48 54  L 48 54  L 47 54  L 34 54  L 33 54  L 32 54  L 32 53  L 32 53  L 32 51  L 31 51  L 30 57  L 30 57  L 29 51  L 28 51  L 28 51  L 28 51  L 28 51  L 28 51  L 28 53  L 27 54  L 27 55  L 26 56  L 25 58  L 23 58  L 22 59  L 20 59  L 19 59  L 18 59  L 16 58  L 15 57  L 14 56  L 13 55  L 13 53  L 13 51  L 13 52  L 12 52  L 12 52  L 12 52  L 8 51  L 5 51  L 5 51  L 3 51  L 2 51  L 1 51  L 1 51  L 1 51  L 1 48  L 1 47  L 0 47  L 0 47  L 0 46  L 0 46  L 0 41  L 0 41  L 0 40  L 0 39  L 1 39  L 1 39  L 1 33  L 3 30  L 4 19  L 5 18  L 5 17  L 6 16  L 8 16  L 8 16  L 15 7  L 15 6  L 17 6  L 18 5  L 19 4  L 20 4  L 21 4  L 22 4  L 23 4  L 30 4  L 30 15  L 30 15  L 30 15  N"/>
          </draw:custom-shape>
          <draw:custom-shape draw:style-name="gr121" draw:text-style-name="P16" draw:layer="layout" svg:width="0.005cm" svg:height="0.004cm" svg:x="15.447cm" svg:y="5.98cm">
            <text:p/>
            <draw:enhanced-geometry svg:viewBox="0 0 1 1" draw:type="non-primitive" draw:enhanced-path="M 0 0  L 0 0  L 0 0  L 0 0  L 0 0  N"/>
          </draw:custom-shape>
          <draw:custom-shape draw:style-name="gr666" draw:text-style-name="P2" draw:layer="layout" svg:width="0.005cm" svg:height="0.004cm" svg:x="15.447cm" svg:y="5.98cm">
            <text:p/>
            <draw:enhanced-geometry svg:viewBox="0 0 1 1" draw:type="non-primitive" draw:enhanced-path="M 0 0  L 0 0  L 0 0  L 0 0  N"/>
          </draw:custom-shape>
          <draw:custom-shape draw:style-name="gr1094" draw:text-style-name="P35" draw:layer="layout" svg:width="1.005cm" svg:height="0.265cm" svg:x="14.455cm" svg:y="5.728cm">
            <text:p/>
            <draw:enhanced-geometry svg:viewBox="0 0 228 60" draw:type="non-primitive" draw:enhanced-path="M 30 15  L 32 15  L 33 17  L 32 15  L 30 15  L 30 13  L 30 13  L 31 12  L 31 11  L 32 11  L 32 11  L 33 11  L 34 12  L 34 13  L 34 13  L 35 27  L 34 30  L 35 30  L 35 30  L 37 31  L 37 31  L 39 31  L 39 31  L 40 31  L 40 32  L 40 45  L 52 45  L 53 43  L 56 43  L 56 41  L 44 41  L 44 39  L 44 0  L 227 0  L 227 39  L 227 45  L 226 45  L 226 48  L 225 51  L 225 57  L 224 57  L 224 51  L 212 51  L 212 51  L 212 51  L 212 51  L 212 53  L 211 54  L 211 55  L 210 57  L 208 58  L 207 58  L 206 59  L 205 59  L 203 59  L 202 58  L 201 57  L 201 56  L 200 54  L 199 53  L 198 52  L 197 51  L 194 51  L 194 51  L 194 51  L 194 51  L 194 51  L 193 53  L 193 54  L 192 55  L 191 56  L 191 58  L 189 58  L 187 59  L 186 59  L 185 59  L 183 58  L 183 57  L 182 56  L 181 54  L 181 53  L 180 52  L 179 51  L 169 51  L 169 49  L 167 49  L 167 48  L 139 48  L 139 51  L 126 51  L 126 53  L 125 53  L 125 54  L 124 54  L 124 54  L 110 54  L 110 54  L 109 54  L 109 53  L 109 53  L 109 51  L 101 51  L 101 54  L 101 54  L 101 54  L 101 55  L 102 56  L 101 56  L 101 57  L 101 57  L 100 57  L 99 57  L 98 57  L 98 56  L 98 56  L 98 55  L 98 54  L 98 54  L 99 53  L 99 45  L 84 45  L 79 41  L 62 41  L 62 43  L 64 43  L 65 45  L 68 48  L 71 50  L 68 51  L 67 51  L 67 51  L 67 51  L 67 51  L 67 51  L 66 53  L 65 54  L 65 55  L 64 56  L 63 58  L 62 58  L 60 59  L 59 59  L 58 59  L 56 58  L 56 57  L 56 56  L 55 54  L 53 53  L 53 52  L 51 51  L 49 51  L 49 53  L 48 53  L 48 54  L 47 54  L 47 54  L 33 54  L 32 54  L 32 54  L 32 53  L 32 53  L 32 51  L 31 51  L 30 57  L 30 57  L 30 51  L 27 51  L 27 51  L 27 51  L 27 51  L 27 51  L 27 53  L 27 54  L 27 55  L 25 56  L 25 58  L 23 58  L 21 59  L 20 59  L 18 59  L 17 59  L 16 58  L 15 57  L 14 56  L 13 55  L 13 53  L 13 51  L 12 52  L 12 52  L 11 52  L 11 52  L 8 51  L 4 51  L 4 51  L 2 51  L 1 51  L 1 51  L 1 51  L 0 51  L 0 48  L 0 47  L 0 47  L 0 47  L 0 46  L 0 46  L 0 41  L 0 41  L 0 40  L 0 39  L 0 39  L 1 39  L 1 33  L 4 30  L 4 19  L 4 18  L 5 17  L 6 16  L 7 16  L 8 16  L 15 7  L 15 6  L 16 6  L 17 5  L 18 4  L 19 4  L 20 4  L 21 4  L 23 4  L 30 4  L 30 15  L 30 15  L 30 15  N"/>
          </draw:custom-shape>
          <draw:custom-shape draw:style-name="gr121" draw:text-style-name="P16" draw:layer="layout" svg:width="0.005cm" svg:height="0.004cm" svg:x="18.018cm" svg:y="5.98cm">
            <text:p/>
            <draw:enhanced-geometry svg:viewBox="0 0 1 1" draw:type="non-primitive" draw:enhanced-path="M 0 0  L 0 0  L 0 0  L 0 0  L 0 0  N"/>
          </draw:custom-shape>
          <draw:custom-shape draw:style-name="gr666" draw:text-style-name="P2" draw:layer="layout" svg:width="0.005cm" svg:height="0.004cm" svg:x="18.018cm" svg:y="5.98cm">
            <text:p/>
            <draw:enhanced-geometry svg:viewBox="0 0 1 1" draw:type="non-primitive" draw:enhanced-path="M 0 0  L 0 0  L 0 0  L 0 0  N"/>
          </draw:custom-shape>
          <draw:custom-shape draw:style-name="gr1095" draw:text-style-name="P35" draw:layer="layout" svg:width="1.009cm" svg:height="0.265cm" svg:x="17.022cm" svg:y="5.728cm">
            <text:p/>
            <draw:enhanced-geometry svg:viewBox="0 0 229 60" draw:type="non-primitive" draw:enhanced-path="M 31 15  L 32 15  L 34 17  L 32 15  L 31 15  L 31 13  L 32 13  L 32 12  L 32 11  L 32 11  L 34 11  L 35 11  L 35 12  L 35 13  L 35 13  L 36 27  L 35 30  L 36 30  L 37 30  L 37 31  L 39 31  L 39 31  L 40 31  L 41 31  L 41 32  L 41 45  L 53 45  L 54 43  L 56 43  L 56 41  L 44 41  L 44 39  L 44 0  L 228 0  L 228 39  L 228 45  L 227 45  L 227 48  L 226 51  L 226 57  L 224 57  L 224 51  L 213 51  L 213 51  L 213 51  L 213 51  L 213 53  L 212 54  L 212 55  L 210 57  L 210 58  L 208 58  L 207 59  L 205 59  L 204 59  L 203 58  L 203 57  L 202 56  L 201 54  L 200 53  L 199 52  L 198 51  L 195 51  L 195 51  L 195 51  L 195 51  L 195 51  L 195 53  L 194 54  L 193 55  L 193 56  L 191 58  L 190 58  L 188 59  L 187 59  L 186 59  L 185 58  L 184 57  L 183 56  L 183 54  L 182 53  L 181 52  L 179 51  L 169 51  L 169 49  L 167 49  L 167 48  L 141 48  L 141 51  L 127 51  L 127 53  L 127 53  L 126 54  L 126 54  L 125 54  L 112 54  L 110 54  L 110 54  L 110 53  L 110 53  L 110 51  L 101 51  L 101 54  L 102 54  L 102 54  L 103 55  L 103 56  L 103 56  L 102 57  L 101 57  L 101 57  L 100 57  L 100 57  L 99 56  L 99 56  L 99 55  L 99 54  L 100 54  L 100 53  L 100 45  L 86 45  L 80 41  L 63 41  L 63 43  L 65 43  L 65 45  L 69 48  L 72 50  L 69 51  L 68 51  L 68 51  L 68 51  L 68 51  L 68 51  L 68 53  L 67 54  L 66 55  L 65 56  L 64 58  L 63 58  L 61 59  L 60 59  L 58 59  L 58 58  L 57 57  L 56 56  L 56 54  L 55 53  L 54 52  L 52 51  L 49 51  L 49 53  L 49 53  L 49 54  L 48 54  L 48 54  L 34 54  L 33 54  L 33 54  L 32 53  L 32 53  L 32 51  L 32 51  L 31 57  L 31 57  L 30 51  L 29 51  L 29 51  L 29 51  L 29 51  L 29 51  L 28 53  L 28 54  L 27 55  L 27 56  L 25 58  L 24 58  L 23 59  L 21 59  L 20 59  L 18 59  L 17 58  L 16 57  L 15 56  L 14 55  L 14 53  L 14 51  L 13 52  L 13 52  L 12 52  L 12 52  L 9 51  L 6 51  L 6 51  L 3 51  L 3 51  L 2 51  L 1 51  L 1 51  L 1 48  L 1 47  L 1 47  L 0 47  L 0 46  L 1 46  L 1 41  L 0 41  L 0 40  L 1 39  L 1 39  L 1 39  L 1 33  L 4 30  L 5 19  L 6 18  L 6 17  L 6 16  L 8 16  L 9 16  L 16 7  L 16 6  L 17 6  L 18 5  L 19 4  L 20 4  L 22 4  L 23 4  L 23 4  L 31 4  L 31 15  L 31 15  L 31 15  N"/>
          </draw:custom-shape>
          <draw:custom-shape draw:style-name="gr121" draw:text-style-name="P16" draw:layer="layout" svg:width="0.093cm" svg:height="0.004cm" svg:x="16.779cm" svg:y="5.98cm">
            <text:p/>
            <draw:enhanced-geometry svg:viewBox="0 0 21 1" draw:type="non-primitive" draw:enhanced-path="M 0 0  L 20 0  L 20 0  L 20 0  L 0 0  N"/>
          </draw:custom-shape>
          <draw:custom-shape draw:style-name="gr666" draw:text-style-name="P2" draw:layer="layout" svg:width="0.093cm" svg:height="0.004cm" svg:x="16.779cm" svg:y="5.98cm">
            <text:p/>
            <draw:enhanced-geometry svg:viewBox="0 0 21 1" draw:type="non-primitive" draw:enhanced-path="M 0 0  L 20 0  L 20 0  L 20 0  N"/>
          </draw:custom-shape>
          <draw:custom-shape draw:style-name="gr1093" draw:text-style-name="P35" draw:layer="layout" svg:width="1.01cm" svg:height="0.265cm" svg:x="15.787cm" svg:y="5.728cm">
            <text:p/>
            <draw:enhanced-geometry svg:viewBox="0 0 229 60" draw:type="non-primitive" draw:enhanced-path="M 31 15  L 32 15  L 34 17  L 32 15  L 31 15  L 31 13  L 31 13  L 31 12  L 31 11  L 32 11  L 33 11  L 34 11  L 34 12  L 35 13  L 35 13  L 36 27  L 35 30  L 35 30  L 36 30  L 37 31  L 38 31  L 39 31  L 40 31  L 40 31  L 40 32  L 40 45  L 52 45  L 54 43  L 56 43  L 56 41  L 44 41  L 44 39  L 44 0  L 228 0  L 228 39  L 228 45  L 228 45  L 228 48  L 226 51  L 226 57  L 224 57  L 224 51  L 213 51  L 213 51  L 213 51  L 213 51  L 213 53  L 212 54  L 211 55  L 210 57  L 209 58  L 208 58  L 206 59  L 205 59  L 204 59  L 203 58  L 202 57  L 201 56  L 201 54  L 199 53  L 199 52  L 197 51  L 194 51  L 194 51  L 194 51  L 194 51  L 194 51  L 194 53  L 194 54  L 193 55  L 192 56  L 191 58  L 189 58  L 188 59  L 187 59  L 185 59  L 184 58  L 184 57  L 183 56  L 182 54  L 182 53  L 180 52  L 179 51  L 170 51  L 170 49  L 167 49  L 168 48  L 140 48  L 140 51  L 126 51  L 126 53  L 126 53  L 125 54  L 125 54  L 125 54  L 111 54  L 111 54  L 110 54  L 109 53  L 109 53  L 109 51  L 102 51  L 102 54  L 102 54  L 102 54  L 102 55  L 102 56  L 102 56  L 102 57  L 101 57  L 101 57  L 100 57  L 99 57  L 99 56  L 99 56  L 99 55  L 99 54  L 99 54  L 100 53  L 100 45  L 85 45  L 80 41  L 63 41  L 63 43  L 64 43  L 65 45  L 68 48  L 71 50  L 68 51  L 67 51  L 67 51  L 67 51  L 67 51  L 67 51  L 67 53  L 66 54  L 66 55  L 64 56  L 64 58  L 62 58  L 61 59  L 59 59  L 58 59  L 57 58  L 57 57  L 56 56  L 55 54  L 54 53  L 54 52  L 52 51  L 49 51  L 49 53  L 49 53  L 48 54  L 48 54  L 47 54  L 34 54  L 33 54  L 33 54  L 32 53  L 32 53  L 32 51  L 31 51  L 31 57  L 31 57  L 31 51  L 28 51  L 28 51  L 28 51  L 28 51  L 28 51  L 28 53  L 28 54  L 27 55  L 26 56  L 25 58  L 23 58  L 22 59  L 21 59  L 19 59  L 18 59  L 16 58  L 15 57  L 14 56  L 14 55  L 14 53  L 13 51  L 13 52  L 13 52  L 12 52  L 12 52  L 8 51  L 5 51  L 5 51  L 3 51  L 2 51  L 2 51  L 1 51  L 1 51  L 1 48  L 1 47  L 0 47  L 0 47  L 0 46  L 0 46  L 0 41  L 0 41  L 0 40  L 0 39  L 1 39  L 1 39  L 1 33  L 4 30  L 5 19  L 5 18  L 6 17  L 6 16  L 7 16  L 8 16  L 15 7  L 16 6  L 17 6  L 18 5  L 19 4  L 20 4  L 21 4  L 22 4  L 23 4  L 31 4  L 31 15  L 31 15  L 31 15  N"/>
          </draw:custom-shape>
          <draw:custom-shape draw:style-name="gr121" draw:text-style-name="P16" draw:layer="layout" svg:width="0.005cm" svg:height="0.005cm" svg:x="15.447cm" svg:y="4.987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5.447cm" svg:y="4.987cm">
            <text:p/>
            <draw:enhanced-geometry svg:viewBox="0 0 1 1" draw:type="non-primitive" draw:enhanced-path="M 0 0  L 0 0  L 0 0  L 0 0  N"/>
          </draw:custom-shape>
          <draw:custom-shape draw:style-name="gr1096" draw:text-style-name="P35" draw:layer="layout" svg:width="1.005cm" svg:height="0.269cm" svg:x="14.455cm" svg:y="4.736cm">
            <text:p/>
            <draw:enhanced-geometry svg:viewBox="0 0 228 61" draw:type="non-primitive" draw:enhanced-path="M 30 16  L 32 16  L 33 17  L 32 15  L 30 15  L 30 14  L 30 13  L 31 12  L 31 12  L 32 12  L 32 12  L 33 12  L 34 12  L 34 13  L 34 14  L 35 28  L 34 31  L 35 31  L 35 31  L 37 31  L 37 32  L 39 32  L 39 32  L 40 32  L 40 32  L 40 45  L 52 45  L 53 43  L 56 43  L 56 42  L 44 42  L 44 40  L 44 0  L 227 0  L 227 40  L 227 45  L 226 45  L 226 48  L 225 51  L 225 57  L 224 57  L 224 51  L 212 51  L 212 51  L 212 51  L 212 52  L 212 53  L 211 54  L 211 56  L 210 57  L 208 58  L 207 59  L 206 59  L 205 60  L 203 59  L 202 59  L 201 57  L 201 56  L 200 54  L 199 54  L 198 53  L 197 52  L 194 52  L 194 52  L 194 51  L 194 51  L 194 52  L 193 53  L 193 54  L 192 55  L 191 56  L 191 58  L 189 59  L 187 59  L 186 60  L 185 59  L 183 59  L 183 57  L 182 56  L 181 54  L 181 54  L 180 53  L 179 52  L 169 52  L 169 49  L 167 49  L 167 48  L 139 48  L 139 52  L 126 52  L 126 54  L 125 54  L 125 54  L 124 54  L 124 54  L 110 54  L 110 54  L 109 54  L 109 54  L 109 54  L 109 52  L 101 52  L 101 54  L 101 54  L 101 55  L 101 55  L 102 56  L 101 56  L 101 57  L 101 57  L 100 57  L 99 57  L 98 57  L 98 56  L 98 56  L 98 55  L 98 54  L 98 54  L 99 54  L 99 45  L 84 45  L 79 42  L 62 42  L 62 43  L 64 43  L 65 45  L 68 48  L 71 50  L 68 52  L 67 52  L 67 52  L 67 51  L 67 51  L 67 52  L 66 53  L 65 54  L 65 55  L 64 56  L 63 58  L 62 59  L 60 59  L 59 60  L 58 59  L 56 59  L 56 57  L 56 56  L 55 54  L 53 54  L 53 53  L 51 52  L 49 52  L 49 54  L 48 54  L 48 54  L 47 54  L 47 54  L 33 54  L 32 54  L 32 54  L 32 54  L 32 54  L 32 52  L 31 52  L 30 57  L 30 57  L 30 52  L 27 52  L 27 52  L 27 51  L 27 51  L 27 52  L 27 53  L 27 54  L 27 55  L 25 56  L 25 58  L 23 59  L 21 59  L 20 60  L 18 60  L 17 59  L 16 59  L 15 58  L 14 56  L 13 55  L 13 54  L 13 52  L 12 52  L 12 52  L 11 53  L 11 53  L 8 52  L 4 52  L 4 52  L 2 51  L 1 51  L 1 51  L 1 51  L 0 51  L 0 48  L 0 48  L 0 47  L 0 47  L 0 47  L 0 47  L 0 41  L 0 41  L 0 41  L 0 40  L 0 40  L 1 40  L 1 33  L 4 30  L 4 20  L 4 19  L 5 17  L 6 17  L 7 16  L 8 16  L 15 8  L 15 7  L 16 6  L 17 5  L 18 5  L 19 5  L 20 4  L 21 4  L 23 4  L 30 4  L 30 16  L 30 16  L 30 16  N"/>
          </draw:custom-shape>
          <draw:custom-shape draw:style-name="gr121" draw:text-style-name="P16" draw:layer="layout" svg:width="0.005cm" svg:height="0.005cm" svg:x="18.018cm" svg:y="4.987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8.018cm" svg:y="4.987cm">
            <text:p/>
            <draw:enhanced-geometry svg:viewBox="0 0 1 1" draw:type="non-primitive" draw:enhanced-path="M 0 0  L 0 0  L 0 0  L 0 0  N"/>
          </draw:custom-shape>
          <draw:custom-shape draw:style-name="gr1097" draw:text-style-name="P35" draw:layer="layout" svg:width="1.009cm" svg:height="0.269cm" svg:x="17.022cm" svg:y="4.736cm">
            <text:p/>
            <draw:enhanced-geometry svg:viewBox="0 0 229 61" draw:type="non-primitive" draw:enhanced-path="M 31 16  L 32 16  L 34 17  L 32 15  L 31 15  L 31 14  L 32 13  L 32 12  L 32 12  L 32 12  L 34 12  L 35 12  L 35 12  L 35 13  L 35 14  L 36 28  L 35 31  L 36 31  L 37 31  L 37 31  L 39 32  L 39 32  L 40 32  L 41 32  L 41 32  L 41 45  L 53 45  L 54 43  L 56 43  L 56 42  L 44 42  L 44 40  L 44 0  L 228 0  L 228 40  L 228 45  L 227 45  L 227 48  L 226 51  L 226 57  L 224 57  L 224 51  L 213 51  L 213 51  L 213 51  L 213 52  L 213 53  L 212 54  L 212 56  L 210 57  L 210 58  L 208 59  L 207 59  L 205 60  L 204 59  L 203 59  L 203 57  L 202 56  L 201 54  L 200 54  L 199 53  L 198 52  L 195 52  L 195 52  L 195 51  L 195 51  L 195 52  L 195 53  L 194 54  L 193 55  L 193 56  L 191 58  L 190 59  L 188 59  L 187 60  L 186 59  L 185 59  L 184 57  L 183 56  L 183 54  L 182 54  L 181 53  L 179 52  L 169 52  L 169 49  L 167 49  L 167 48  L 141 48  L 141 52  L 127 52  L 127 54  L 127 54  L 126 54  L 126 54  L 125 54  L 112 54  L 110 54  L 110 54  L 110 54  L 110 54  L 110 52  L 101 52  L 101 54  L 102 54  L 102 55  L 103 55  L 103 56  L 103 56  L 102 57  L 101 57  L 101 57  L 100 57  L 100 57  L 99 56  L 99 56  L 99 55  L 99 54  L 100 54  L 100 54  L 100 45  L 86 45  L 80 42  L 63 42  L 63 43  L 65 43  L 65 45  L 69 48  L 72 50  L 69 52  L 68 52  L 68 52  L 68 51  L 68 51  L 68 52  L 68 53  L 67 54  L 66 55  L 65 56  L 64 58  L 63 59  L 61 59  L 60 60  L 58 59  L 58 59  L 57 57  L 56 56  L 56 54  L 55 54  L 54 53  L 52 52  L 49 52  L 49 54  L 49 54  L 49 54  L 48 54  L 48 54  L 34 54  L 33 54  L 33 54  L 32 54  L 32 54  L 32 52  L 32 52  L 31 57  L 31 57  L 30 52  L 29 52  L 29 52  L 29 51  L 29 51  L 29 52  L 28 53  L 28 54  L 27 55  L 27 56  L 25 58  L 24 59  L 23 59  L 21 60  L 20 60  L 18 59  L 17 59  L 16 58  L 15 56  L 14 55  L 14 54  L 14 52  L 13 52  L 13 52  L 12 53  L 12 53  L 9 52  L 6 52  L 6 52  L 3 51  L 3 51  L 2 51  L 1 51  L 1 51  L 1 48  L 1 48  L 1 47  L 0 47  L 0 47  L 1 47  L 1 41  L 0 41  L 0 41  L 1 40  L 1 40  L 1 40  L 1 33  L 4 30  L 5 20  L 6 19  L 6 17  L 6 17  L 8 16  L 9 16  L 16 8  L 16 7  L 17 6  L 18 5  L 19 5  L 20 5  L 22 4  L 23 4  L 23 4  L 31 4  L 31 16  L 31 16  N"/>
          </draw:custom-shape>
          <draw:custom-shape draw:style-name="gr121" draw:text-style-name="P16" draw:layer="layout" svg:width="0.005cm" svg:height="0.004cm" svg:x="18.018cm" svg:y="4.507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4cm" svg:x="18.018cm" svg:y="4.507cm">
            <text:p/>
            <draw:enhanced-geometry svg:viewBox="0 0 1 1" draw:type="non-primitive" draw:enhanced-path="M 0 0  L 0 0  L 0 0  L 0 0  N"/>
          </draw:custom-shape>
          <draw:custom-shape draw:style-name="gr1095" draw:text-style-name="P35" draw:layer="layout" svg:width="1.009cm" svg:height="0.265cm" svg:x="17.022cm" svg:y="4.255cm">
            <text:p/>
            <draw:enhanced-geometry svg:viewBox="0 0 229 60" draw:type="non-primitive" draw:enhanced-path="M 31 15  L 32 15  L 34 17  L 32 15  L 31 15  L 31 12  L 32 12  L 32 12  L 32 12  L 32 11  L 34 11  L 35 12  L 35 12  L 35 12  L 35 12  L 36 27  L 35 30  L 36 30  L 37 30  L 37 31  L 39 31  L 39 31  L 40 31  L 41 31  L 41 31  L 41 45  L 53 45  L 54 43  L 56 43  L 56 40  L 44 40  L 44 38  L 44 0  L 228 0  L 228 38  L 228 45  L 227 45  L 227 47  L 226 50  L 226 57  L 224 57  L 224 50  L 213 50  L 213 50  L 213 50  L 213 50  L 213 51  L 213 52  L 212 54  L 212 55  L 210 56  L 210 57  L 208 58  L 207 59  L 205 59  L 204 59  L 203 58  L 203 57  L 202 55  L 201 54  L 200 52  L 199 52  L 198 51  L 195 51  L 195 51  L 195 50  L 195 50  L 195 51  L 195 52  L 194 54  L 193 55  L 193 56  L 191 57  L 190 58  L 188 59  L 187 59  L 186 59  L 185 58  L 184 57  L 183 55  L 183 54  L 182 52  L 181 52  L 179 51  L 169 51  L 169 49  L 167 49  L 167 47  L 141 47  L 141 51  L 127 51  L 127 52  L 127 53  L 126 54  L 126 54  L 125 54  L 112 54  L 110 54  L 110 54  L 110 53  L 110 52  L 110 51  L 101 51  L 101 54  L 102 54  L 102 54  L 103 55  L 103 55  L 103 56  L 102 56  L 101 57  L 101 57  L 100 57  L 100 56  L 99 56  L 99 55  L 99 55  L 99 54  L 100 54  L 100 53  L 100 45  L 86 45  L 80 40  L 63 40  L 63 43  L 65 43  L 65 45  L 69 48  L 72 50  L 69 51  L 68 51  L 68 51  L 68 50  L 68 50  L 68 51  L 68 52  L 67 54  L 66 55  L 65 56  L 64 57  L 63 58  L 61 59  L 60 59  L 58 59  L 58 58  L 57 57  L 56 55  L 56 54  L 55 52  L 54 52  L 52 51  L 49 51  L 49 52  L 49 53  L 49 54  L 48 54  L 48 54  L 34 54  L 33 54  L 33 54  L 32 53  L 32 52  L 32 51  L 32 51  L 31 56  L 31 56  L 30 51  L 29 51  L 29 51  L 29 50  L 29 50  L 29 51  L 28 52  L 28 54  L 27 55  L 27 56  L 25 57  L 24 58  L 23 59  L 21 59  L 20 59  L 18 58  L 17 58  L 16 57  L 15 56  L 14 55  L 14 53  L 14 51  L 13 52  L 13 52  L 12 52  L 12 52  L 9 51  L 6 51  L 6 51  L 3 50  L 3 50  L 2 50  L 1 50  L 1 50  L 1 47  L 1 47  L 1 47  L 0 46  L 0 46  L 1 46  L 1 40  L 0 40  L 0 40  L 1 40  L 1 39  L 1 39  L 1 33  L 4 29  L 5 19  L 6 18  L 6 17  L 6 17  L 8 16  L 9 16  L 16 7  L 16 6  L 17 5  L 18 5  L 19 4  L 20 4  L 22 3  L 23 3  L 23 3  L 31 3  L 31 15  L 31 15  N"/>
          </draw:custom-shape>
          <draw:custom-shape draw:style-name="gr121" draw:text-style-name="P16" draw:layer="layout" svg:width="0.005cm" svg:height="0.004cm" svg:x="14.133cm" svg:y="6.478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4cm" svg:x="14.133cm" svg:y="6.478cm">
            <text:p/>
            <draw:enhanced-geometry svg:viewBox="0 0 1 1" draw:type="non-primitive" draw:enhanced-path="M 0 0  L 0 0  L 0 0  L 0 0  N"/>
          </draw:custom-shape>
          <draw:custom-shape draw:style-name="gr1098" draw:text-style-name="P35" draw:layer="layout" svg:width="1.01cm" svg:height="0.264cm" svg:x="13.141cm" svg:y="6.227cm">
            <text:p/>
            <draw:enhanced-geometry svg:viewBox="0 0 229 60" draw:type="non-primitive" draw:enhanced-path="M 30 15  L 32 15  L 34 17  L 32 15  L 30 15  L 30 13  L 31 13  L 31 12  L 32 11  L 32 11  L 33 11  L 34 11  L 34 12  L 34 13  L 34 13  L 36 28  L 35 30  L 35 30  L 36 30  L 37 30  L 38 31  L 39 31  L 40 31  L 40 31  L 40 31  L 40 45  L 53 45  L 53 43  L 56 43  L 56 41  L 44 41  L 44 39  L 44 0  L 228 0  L 228 39  L 228 45  L 227 45  L 227 47  L 225 50  L 225 57  L 224 57  L 224 50  L 212 51  L 212 51  L 212 51  L 212 51  L 212 52  L 212 53  L 211 55  L 210 56  L 209 58  L 208 58  L 207 59  L 205 59  L 204 59  L 202 58  L 202 57  L 201 56  L 200 54  L 200 53  L 199 52  L 197 51  L 194 51  L 194 51  L 194 51  L 194 51  L 194 51  L 194 52  L 193 53  L 193 55  L 192 56  L 191 58  L 189 58  L 188 59  L 186 59  L 185 59  L 184 58  L 183 57  L 183 56  L 182 54  L 181 53  L 180 52  L 179 51  L 169 51  L 169 49  L 167 49  L 167 47  L 140 47  L 140 51  L 126 51  L 126 53  L 126 53  L 126 53  L 125 54  L 124 54  L 111 54  L 110 54  L 110 53  L 110 53  L 110 53  L 110 51  L 101 51  L 101 53  L 101 54  L 102 54  L 102 55  L 102 55  L 102 56  L 102 56  L 101 57  L 100 57  L 99 57  L 99 56  L 98 56  L 98 55  L 98 55  L 98 54  L 99 54  L 99 53  L 99 45  L 85 45  L 79 41  L 63 41  L 63 43  L 64 43  L 65 45  L 69 47  L 71 50  L 69 51  L 67 51  L 67 51  L 67 51  L 67 51  L 67 51  L 67 52  L 66 53  L 65 55  L 65 56  L 64 58  L 62 58  L 61 59  L 60 59  L 58 59  L 57 58  L 56 57  L 56 56  L 55 54  L 54 53  L 53 52  L 52 51  L 48 51  L 48 53  L 48 53  L 48 53  L 48 54  L 47 54  L 34 54  L 33 54  L 32 53  L 32 53  L 32 53  L 32 51  L 31 51  L 30 56  L 30 56  L 29 51  L 28 51  L 28 51  L 28 51  L 28 51  L 28 51  L 28 52  L 27 53  L 27 55  L 26 56  L 25 58  L 23 58  L 22 59  L 20 59  L 19 59  L 18 58  L 16 58  L 15 57  L 14 56  L 13 55  L 13 53  L 13 51  L 13 51  L 12 52  L 12 52  L 12 52  L 8 51  L 5 51  L 5 51  L 3 51  L 2 51  L 1 51  L 1 51  L 1 50  L 1 47  L 1 47  L 0 47  L 0 47  L 0 46  L 0 46  L 0 41  L 0 41  L 0 40  L 0 39  L 1 39  L 1 39  L 1 33  L 3 30  L 4 19  L 5 18  L 5 17  L 6 16  L 8 16  L 8 16  L 15 7  L 15 6  L 17 6  L 18 5  L 19 4  L 20 4  L 21 4  L 22 4  L 23 3  L 30 3  L 30 15  L 30 15  N"/>
          </draw:custom-shape>
          <draw:custom-shape draw:style-name="gr121" draw:text-style-name="P16" draw:layer="layout" svg:width="0.005cm" svg:height="0.004cm" svg:x="15.447cm" svg:y="6.478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4cm" svg:x="15.447cm" svg:y="6.478cm">
            <text:p/>
            <draw:enhanced-geometry svg:viewBox="0 0 1 1" draw:type="non-primitive" draw:enhanced-path="M 0 0  L 0 0  L 0 0  L 0 0  N"/>
          </draw:custom-shape>
          <draw:custom-shape draw:style-name="gr1099" draw:text-style-name="P35" draw:layer="layout" svg:width="1.005cm" svg:height="0.264cm" svg:x="14.455cm" svg:y="6.227cm">
            <text:p/>
            <draw:enhanced-geometry svg:viewBox="0 0 228 60" draw:type="non-primitive" draw:enhanced-path="M 30 15  L 32 15  L 33 17  L 32 15  L 30 15  L 30 13  L 30 13  L 31 12  L 31 11  L 32 11  L 32 11  L 33 11  L 34 12  L 34 13  L 34 13  L 35 28  L 34 30  L 35 30  L 35 30  L 37 30  L 37 31  L 39 31  L 39 31  L 40 31  L 40 31  L 40 45  L 52 45  L 53 43  L 56 43  L 56 41  L 44 41  L 44 39  L 44 0  L 227 0  L 227 39  L 227 45  L 226 45  L 226 47  L 225 50  L 225 57  L 224 57  L 224 50  L 212 51  L 212 51  L 212 51  L 212 51  L 212 52  L 211 53  L 211 55  L 210 56  L 208 58  L 207 58  L 206 59  L 205 59  L 203 59  L 202 58  L 201 57  L 201 56  L 200 54  L 199 53  L 198 52  L 197 51  L 194 51  L 194 51  L 194 51  L 194 51  L 194 51  L 193 52  L 193 53  L 192 55  L 191 56  L 191 58  L 189 58  L 187 59  L 186 59  L 185 59  L 183 58  L 183 57  L 182 56  L 181 54  L 181 53  L 180 52  L 179 51  L 169 51  L 169 49  L 167 49  L 167 47  L 139 47  L 139 51  L 126 51  L 126 53  L 125 53  L 125 53  L 124 54  L 124 54  L 110 54  L 110 54  L 109 53  L 109 53  L 109 53  L 109 51  L 101 51  L 101 53  L 101 54  L 101 54  L 101 55  L 102 55  L 101 56  L 101 56  L 101 57  L 100 57  L 99 57  L 98 56  L 98 56  L 98 55  L 98 55  L 98 54  L 98 54  L 99 53  L 99 45  L 84 45  L 79 41  L 62 41  L 62 43  L 64 43  L 65 45  L 68 47  L 71 50  L 68 51  L 67 51  L 67 51  L 67 51  L 67 51  L 67 51  L 66 52  L 65 53  L 65 55  L 64 56  L 63 58  L 62 58  L 60 59  L 59 59  L 58 59  L 56 58  L 56 57  L 56 56  L 55 54  L 53 53  L 53 52  L 51 51  L 49 51  L 49 53  L 48 53  L 48 53  L 47 54  L 47 54  L 33 54  L 32 54  L 32 53  L 32 53  L 32 53  L 32 51  L 31 51  L 30 56  L 30 56  L 30 51  L 27 51  L 27 51  L 27 51  L 27 51  L 27 51  L 27 52  L 27 53  L 27 55  L 25 56  L 25 58  L 23 58  L 21 59  L 20 59  L 18 59  L 17 58  L 16 58  L 15 57  L 14 56  L 13 55  L 13 53  L 13 51  L 12 51  L 12 52  L 11 52  L 11 52  L 8 51  L 4 51  L 4 51  L 2 51  L 1 51  L 1 51  L 1 51  L 0 50  L 0 47  L 0 47  L 0 47  L 0 47  L 0 46  L 0 46  L 0 41  L 0 41  L 0 40  L 0 39  L 0 39  L 1 39  L 1 33  L 4 30  L 4 19  L 4 18  L 5 17  L 6 16  L 7 16  L 8 16  L 15 7  L 15 6  L 16 6  L 17 5  L 18 4  L 19 4  L 20 4  L 21 4  L 23 3  L 30 3  L 30 15  L 30 15  L 30 15  N"/>
          </draw:custom-shape>
          <draw:custom-shape draw:style-name="gr121" draw:text-style-name="P16" draw:layer="layout" svg:width="0.005cm" svg:height="0.004cm" svg:x="18.018cm" svg:y="6.478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4cm" svg:x="18.018cm" svg:y="6.478cm">
            <text:p/>
            <draw:enhanced-geometry svg:viewBox="0 0 1 1" draw:type="non-primitive" draw:enhanced-path="M 0 0  L 0 0  L 0 0  L 0 0  N"/>
          </draw:custom-shape>
          <draw:custom-shape draw:style-name="gr1100" draw:text-style-name="P35" draw:layer="layout" svg:width="1.009cm" svg:height="0.264cm" svg:x="17.022cm" svg:y="6.227cm">
            <text:p/>
            <draw:enhanced-geometry svg:viewBox="0 0 229 60" draw:type="non-primitive" draw:enhanced-path="M 31 15  L 32 15  L 34 17  L 32 15  L 31 15  L 31 13  L 32 13  L 32 12  L 32 11  L 32 11  L 34 11  L 35 11  L 35 12  L 35 13  L 35 13  L 36 28  L 35 30  L 36 30  L 37 30  L 37 30  L 39 31  L 39 31  L 40 31  L 41 31  L 41 31  L 41 45  L 53 45  L 54 43  L 56 43  L 56 41  L 44 41  L 44 39  L 44 0  L 228 0  L 228 39  L 228 45  L 227 45  L 227 47  L 226 50  L 226 57  L 224 57  L 224 50  L 213 51  L 213 51  L 213 51  L 213 51  L 213 52  L 212 53  L 212 55  L 210 56  L 210 58  L 208 58  L 207 59  L 205 59  L 204 59  L 203 58  L 203 57  L 202 56  L 201 54  L 200 53  L 199 52  L 198 51  L 195 51  L 195 51  L 195 51  L 195 51  L 195 51  L 195 52  L 194 53  L 193 55  L 193 56  L 191 58  L 190 58  L 188 59  L 187 59  L 186 59  L 185 58  L 184 57  L 183 56  L 183 54  L 182 53  L 181 52  L 179 51  L 169 51  L 169 49  L 167 49  L 167 47  L 141 47  L 141 51  L 127 51  L 127 53  L 127 53  L 126 53  L 126 54  L 125 54  L 112 54  L 110 54  L 110 53  L 110 53  L 110 53  L 110 51  L 101 51  L 101 53  L 102 54  L 102 54  L 103 55  L 103 55  L 103 56  L 102 56  L 101 57  L 101 57  L 100 57  L 100 56  L 99 56  L 99 55  L 99 55  L 99 54  L 100 54  L 100 53  L 100 45  L 86 45  L 80 41  L 63 41  L 63 43  L 65 43  L 65 45  L 69 47  L 72 50  L 69 51  L 68 51  L 68 51  L 68 51  L 68 51  L 68 51  L 68 52  L 67 53  L 66 55  L 65 56  L 64 58  L 63 58  L 61 59  L 60 59  L 58 59  L 58 58  L 57 57  L 56 56  L 56 54  L 55 53  L 54 52  L 52 51  L 49 51  L 49 53  L 49 53  L 49 53  L 48 54  L 48 54  L 34 54  L 33 54  L 33 53  L 32 53  L 32 53  L 32 51  L 32 51  L 31 56  L 31 56  L 30 51  L 29 51  L 29 51  L 29 51  L 29 51  L 29 51  L 28 52  L 28 53  L 27 55  L 27 56  L 25 58  L 24 58  L 23 59  L 21 59  L 20 59  L 18 58  L 17 58  L 16 57  L 15 56  L 14 55  L 14 53  L 14 51  L 13 51  L 13 52  L 12 52  L 12 52  L 9 51  L 6 51  L 6 51  L 3 51  L 3 51  L 2 51  L 1 51  L 1 50  L 1 47  L 1 47  L 1 47  L 0 47  L 0 46  L 1 46  L 1 41  L 0 41  L 0 40  L 1 39  L 1 39  L 1 39  L 1 33  L 4 30  L 5 19  L 6 18  L 6 17  L 6 16  L 8 16  L 9 16  L 16 7  L 16 6  L 17 6  L 18 5  L 19 4  L 20 4  L 22 4  L 23 4  L 23 3  L 31 3  L 31 15  L 31 15  N"/>
          </draw:custom-shape>
          <draw:custom-shape draw:style-name="gr121" draw:text-style-name="P16" draw:layer="layout" svg:width="0.093cm" svg:height="0.004cm" svg:x="16.779cm" svg:y="6.478cm">
            <text:p/>
            <draw:enhanced-geometry svg:viewBox="0 0 21 1" draw:type="non-primitive" draw:enhanced-path="M 0 0  L 20 0  L 20 0  L 20 0  L 0 0  N"/>
          </draw:custom-shape>
          <draw:custom-shape draw:style-name="gr666" draw:text-style-name="P2" draw:layer="layout" svg:width="0.093cm" svg:height="0.004cm" svg:x="16.779cm" svg:y="6.478cm">
            <text:p/>
            <draw:enhanced-geometry svg:viewBox="0 0 21 1" draw:type="non-primitive" draw:enhanced-path="M 0 0  L 20 0  L 20 0  L 20 0  N"/>
          </draw:custom-shape>
          <draw:custom-shape draw:style-name="gr1098" draw:text-style-name="P35" draw:layer="layout" svg:width="1.01cm" svg:height="0.264cm" svg:x="15.787cm" svg:y="6.227cm">
            <text:p/>
            <draw:enhanced-geometry svg:viewBox="0 0 229 60" draw:type="non-primitive" draw:enhanced-path="M 31 15  L 32 15  L 34 17  L 32 15  L 31 15  L 31 13  L 31 13  L 31 12  L 31 11  L 32 11  L 33 11  L 34 11  L 34 12  L 35 13  L 35 13  L 36 28  L 35 30  L 35 30  L 36 30  L 37 30  L 38 31  L 39 31  L 40 31  L 40 31  L 40 31  L 40 45  L 52 45  L 54 43  L 56 43  L 56 41  L 44 41  L 44 39  L 44 0  L 228 0  L 228 39  L 228 45  L 228 45  L 228 47  L 226 50  L 226 57  L 224 57  L 224 50  L 213 51  L 213 51  L 213 51  L 213 51  L 213 52  L 212 53  L 211 55  L 210 56  L 209 58  L 208 58  L 206 59  L 205 59  L 204 59  L 203 58  L 202 57  L 201 56  L 201 54  L 199 53  L 199 52  L 197 51  L 194 51  L 194 51  L 194 51  L 194 51  L 194 51  L 194 52  L 194 53  L 193 55  L 192 56  L 191 58  L 189 58  L 188 59  L 187 59  L 185 59  L 184 58  L 184 57  L 183 56  L 182 54  L 182 53  L 180 52  L 179 51  L 170 51  L 170 49  L 167 49  L 168 47  L 140 47  L 140 51  L 126 51  L 126 53  L 126 53  L 125 53  L 125 54  L 125 54  L 111 54  L 111 54  L 110 53  L 109 53  L 109 53  L 109 51  L 102 51  L 102 53  L 102 54  L 102 54  L 102 55  L 102 55  L 102 56  L 102 56  L 101 57  L 101 57  L 100 57  L 99 56  L 99 56  L 99 55  L 99 55  L 99 54  L 99 54  L 100 53  L 100 45  L 85 45  L 80 41  L 63 41  L 63 43  L 64 43  L 65 45  L 68 47  L 71 50  L 68 51  L 67 51  L 67 51  L 67 51  L 67 51  L 67 51  L 67 52  L 66 53  L 66 55  L 64 56  L 64 58  L 62 58  L 61 59  L 59 59  L 58 59  L 57 58  L 57 57  L 56 56  L 55 54  L 54 53  L 54 52  L 52 51  L 49 51  L 49 53  L 49 53  L 48 53  L 48 54  L 47 54  L 34 54  L 33 54  L 33 53  L 32 53  L 32 53  L 32 51  L 31 51  L 31 56  L 31 56  L 31 51  L 28 51  L 28 51  L 28 51  L 28 51  L 28 51  L 28 52  L 28 53  L 27 55  L 26 56  L 25 58  L 23 58  L 22 59  L 21 59  L 19 59  L 18 58  L 16 58  L 15 57  L 14 56  L 14 55  L 14 53  L 13 51  L 13 51  L 13 52  L 12 52  L 12 52  L 8 51  L 5 51  L 5 51  L 3 51  L 2 51  L 2 51  L 1 51  L 1 50  L 1 47  L 1 47  L 0 47  L 0 47  L 0 46  L 0 46  L 0 41  L 0 41  L 0 40  L 0 39  L 1 39  L 1 39  L 1 33  L 4 30  L 5 19  L 5 18  L 6 17  L 6 16  L 7 16  L 8 16  L 15 7  L 16 6  L 17 6  L 18 5  L 19 4  L 20 4  L 21 4  L 22 4  L 23 3  L 31 3  L 31 15  L 31 15  N"/>
          </draw:custom-shape>
          <draw:custom-shape draw:style-name="gr121" draw:text-style-name="P16" draw:layer="layout" svg:width="0.005cm" svg:height="0.004cm" svg:x="15.447cm" svg:y="5.486cm">
            <text:p/>
            <draw:enhanced-geometry svg:viewBox="0 0 1 1" draw:type="non-primitive" draw:enhanced-path="M 0 0  L 0 0  L 0 0  L 0 0  L 0 0  N"/>
          </draw:custom-shape>
          <draw:custom-shape draw:style-name="gr666" draw:text-style-name="P2" draw:layer="layout" svg:width="0.005cm" svg:height="0.004cm" svg:x="15.447cm" svg:y="5.486cm">
            <text:p/>
            <draw:enhanced-geometry svg:viewBox="0 0 1 1" draw:type="non-primitive" draw:enhanced-path="M 0 0  L 0 0  L 0 0  L 0 0  N"/>
          </draw:custom-shape>
          <draw:custom-shape draw:style-name="gr1096" draw:text-style-name="P35" draw:layer="layout" svg:width="1.005cm" svg:height="0.269cm" svg:x="14.455cm" svg:y="5.234cm">
            <text:p/>
            <draw:enhanced-geometry svg:viewBox="0 0 228 61" draw:type="non-primitive" draw:enhanced-path="M 30 16  L 32 15  L 33 17  L 32 15  L 30 15  L 30 13  L 30 13  L 31 12  L 31 12  L 32 12  L 32 12  L 33 12  L 34 12  L 34 13  L 34 13  L 35 28  L 34 31  L 35 31  L 35 31  L 37 31  L 37 31  L 39 32  L 39 32  L 40 32  L 40 32  L 40 45  L 52 45  L 53 43  L 56 43  L 56 41  L 44 41  L 44 39  L 44 0  L 227 0  L 227 39  L 227 45  L 226 45  L 226 48  L 225 51  L 225 57  L 224 57  L 224 51  L 212 51  L 212 51  L 212 51  L 212 51  L 212 52  L 212 53  L 211 54  L 211 55  L 210 57  L 208 58  L 207 59  L 206 59  L 205 60  L 203 59  L 202 59  L 201 57  L 201 56  L 200 54  L 199 54  L 198 52  L 197 52  L 194 52  L 194 52  L 194 51  L 194 51  L 194 52  L 193 53  L 193 54  L 192 55  L 191 57  L 191 58  L 189 59  L 187 59  L 186 60  L 185 59  L 183 59  L 183 57  L 182 56  L 181 54  L 181 54  L 180 52  L 179 52  L 169 52  L 169 50  L 167 50  L 167 48  L 139 48  L 139 52  L 126 52  L 126 53  L 125 54  L 125 54  L 124 54  L 124 54  L 110 54  L 110 54  L 109 54  L 109 54  L 109 53  L 109 52  L 101 52  L 101 54  L 101 54  L 101 54  L 101 55  L 102 56  L 101 57  L 101 57  L 101 57  L 100 57  L 99 57  L 98 57  L 98 57  L 98 56  L 98 55  L 98 54  L 98 54  L 99 54  L 99 45  L 84 45  L 79 41  L 62 41  L 62 43  L 64 43  L 65 45  L 68 48  L 71 50  L 68 52  L 67 52  L 67 52  L 67 51  L 67 51  L 67 52  L 66 53  L 65 54  L 65 55  L 64 57  L 63 58  L 62 59  L 60 59  L 59 60  L 58 59  L 56 59  L 56 57  L 56 56  L 55 54  L 53 54  L 53 52  L 51 52  L 49 52  L 49 53  L 48 54  L 48 54  L 47 54  L 47 54  L 33 54  L 32 54  L 32 54  L 32 54  L 32 53  L 32 52  L 31 52  L 30 57  L 30 57  L 30 52  L 27 52  L 27 52  L 27 51  L 27 51  L 27 52  L 27 53  L 27 54  L 27 55  L 25 57  L 25 58  L 23 59  L 21 59  L 20 60  L 18 60  L 17 59  L 16 59  L 15 57  L 14 57  L 13 55  L 13 54  L 13 52  L 12 52  L 12 52  L 11 52  L 11 52  L 8 52  L 4 52  L 4 52  L 2 51  L 1 51  L 1 51  L 1 51  L 0 51  L 0 48  L 0 48  L 0 47  L 0 47  L 0 47  L 0 47  L 0 41  L 0 41  L 0 40  L 0 40  L 0 40  L 1 40  L 1 33  L 4 30  L 4 20  L 4 19  L 5 17  L 6 17  L 7 17  L 8 17  L 15 8  L 15 7  L 16 6  L 17 5  L 18 5  L 19 5  L 20 4  L 21 4  L 23 4  L 30 4  L 30 16  L 30 16  L 30 16  N"/>
          </draw:custom-shape>
          <draw:custom-shape draw:style-name="gr121" draw:text-style-name="P16" draw:layer="layout" svg:width="0.005cm" svg:height="0.004cm" svg:x="18.018cm" svg:y="5.486cm">
            <text:p/>
            <draw:enhanced-geometry svg:viewBox="0 0 1 1" draw:type="non-primitive" draw:enhanced-path="M 0 0  L 0 0  L 0 0  L 0 0  L 0 0  N"/>
          </draw:custom-shape>
          <draw:custom-shape draw:style-name="gr666" draw:text-style-name="P2" draw:layer="layout" svg:width="0.005cm" svg:height="0.004cm" svg:x="18.018cm" svg:y="5.486cm">
            <text:p/>
            <draw:enhanced-geometry svg:viewBox="0 0 1 1" draw:type="non-primitive" draw:enhanced-path="M 0 0  L 0 0  L 0 0  L 0 0  N"/>
          </draw:custom-shape>
          <draw:custom-shape draw:style-name="gr1097" draw:text-style-name="P35" draw:layer="layout" svg:width="1.009cm" svg:height="0.269cm" svg:x="17.022cm" svg:y="5.234cm">
            <text:p/>
            <draw:enhanced-geometry svg:viewBox="0 0 229 61" draw:type="non-primitive" draw:enhanced-path="M 31 16  L 32 15  L 34 17  L 32 15  L 31 15  L 31 13  L 32 13  L 32 12  L 32 12  L 32 12  L 34 12  L 35 12  L 35 12  L 35 13  L 35 13  L 36 28  L 35 31  L 36 31  L 37 31  L 37 31  L 39 31  L 39 32  L 40 32  L 41 32  L 41 32  L 41 45  L 53 45  L 54 43  L 56 43  L 56 41  L 44 41  L 44 39  L 44 0  L 228 0  L 228 39  L 228 45  L 227 45  L 227 48  L 226 51  L 226 57  L 224 57  L 224 51  L 213 51  L 213 51  L 213 51  L 213 51  L 213 52  L 213 53  L 212 54  L 212 55  L 210 57  L 210 58  L 208 59  L 207 59  L 205 60  L 204 59  L 203 59  L 203 57  L 202 56  L 201 54  L 200 54  L 199 52  L 198 52  L 195 52  L 195 52  L 195 51  L 195 51  L 195 52  L 195 53  L 194 54  L 193 55  L 193 57  L 191 58  L 190 59  L 188 59  L 187 60  L 186 59  L 185 59  L 184 57  L 183 56  L 183 54  L 182 54  L 181 52  L 179 52  L 169 52  L 169 50  L 167 50  L 167 48  L 141 48  L 141 52  L 127 52  L 127 53  L 127 54  L 126 54  L 126 54  L 125 54  L 112 54  L 110 54  L 110 54  L 110 54  L 110 53  L 110 52  L 101 52  L 101 54  L 102 54  L 102 54  L 103 55  L 103 56  L 103 57  L 102 57  L 101 57  L 101 57  L 100 57  L 100 57  L 99 57  L 99 56  L 99 55  L 99 54  L 100 54  L 100 54  L 100 45  L 86 45  L 80 41  L 63 41  L 63 43  L 65 43  L 65 45  L 69 48  L 72 50  L 69 52  L 68 52  L 68 52  L 68 51  L 68 51  L 68 52  L 68 53  L 67 54  L 66 55  L 65 57  L 64 58  L 63 59  L 61 59  L 60 60  L 58 59  L 58 59  L 57 57  L 56 56  L 56 54  L 55 54  L 54 52  L 52 52  L 49 52  L 49 53  L 49 54  L 49 54  L 48 54  L 48 54  L 34 54  L 33 54  L 33 54  L 32 54  L 32 53  L 32 52  L 32 52  L 31 57  L 31 57  L 30 52  L 29 52  L 29 52  L 29 51  L 29 51  L 29 52  L 28 53  L 28 54  L 27 55  L 27 57  L 25 58  L 24 59  L 23 59  L 21 60  L 20 60  L 18 59  L 17 59  L 16 57  L 15 57  L 14 55  L 14 54  L 14 52  L 13 52  L 13 52  L 12 52  L 12 52  L 9 52  L 6 52  L 6 52  L 3 51  L 3 51  L 2 51  L 1 51  L 1 51  L 1 48  L 1 48  L 1 47  L 0 47  L 0 47  L 1 47  L 1 41  L 0 41  L 0 40  L 1 40  L 1 40  L 1 40  L 1 33  L 4 30  L 5 20  L 6 19  L 6 17  L 6 17  L 8 17  L 9 17  L 16 8  L 16 7  L 17 6  L 18 5  L 19 5  L 20 5  L 22 4  L 23 4  L 23 4  L 31 4  L 31 16  L 31 16  N"/>
          </draw:custom-shape>
          <draw:custom-shape draw:style-name="gr121" draw:text-style-name="P16" draw:layer="layout" svg:width="0.093cm" svg:height="0.004cm" svg:x="16.779cm" svg:y="5.486cm">
            <text:p/>
            <draw:enhanced-geometry svg:viewBox="0 0 21 1" draw:type="non-primitive" draw:enhanced-path="M 0 0  L 20 0  L 20 0  L 20 0  L 0 0  N"/>
          </draw:custom-shape>
          <draw:custom-shape draw:style-name="gr666" draw:text-style-name="P2" draw:layer="layout" svg:width="0.093cm" svg:height="0.004cm" svg:x="16.779cm" svg:y="5.486cm">
            <text:p/>
            <draw:enhanced-geometry svg:viewBox="0 0 21 1" draw:type="non-primitive" draw:enhanced-path="M 0 0  L 20 0  L 20 0  L 20 0  N"/>
          </draw:custom-shape>
          <draw:custom-shape draw:style-name="gr1101" draw:text-style-name="P35" draw:layer="layout" svg:width="1.01cm" svg:height="0.269cm" svg:x="15.787cm" svg:y="5.234cm">
            <text:p/>
            <draw:enhanced-geometry svg:viewBox="0 0 229 61" draw:type="non-primitive" draw:enhanced-path="M 31 16  L 32 15  L 34 17  L 32 15  L 31 15  L 31 13  L 31 13  L 31 12  L 31 12  L 32 12  L 33 12  L 34 12  L 34 12  L 35 13  L 35 13  L 36 28  L 35 31  L 35 31  L 36 31  L 37 31  L 38 31  L 39 32  L 40 32  L 40 32  L 40 32  L 40 45  L 52 45  L 54 43  L 56 43  L 56 41  L 44 41  L 44 39  L 44 0  L 228 0  L 228 39  L 228 45  L 228 45  L 228 48  L 226 51  L 226 57  L 224 57  L 224 51  L 213 51  L 213 51  L 213 51  L 213 51  L 213 52  L 213 53  L 212 54  L 211 55  L 210 57  L 209 58  L 208 59  L 206 59  L 205 60  L 204 59  L 203 59  L 202 57  L 201 56  L 201 54  L 199 54  L 199 52  L 197 52  L 194 52  L 194 52  L 194 51  L 194 51  L 194 52  L 194 53  L 194 54  L 193 55  L 192 57  L 191 58  L 189 59  L 188 59  L 187 60  L 185 59  L 184 59  L 184 57  L 183 56  L 182 54  L 182 54  L 180 52  L 179 52  L 170 52  L 170 50  L 167 50  L 168 48  L 140 48  L 140 52  L 126 52  L 126 53  L 126 54  L 125 54  L 125 54  L 125 54  L 111 54  L 111 54  L 110 54  L 109 54  L 109 53  L 109 52  L 102 52  L 102 54  L 102 54  L 102 54  L 102 55  L 102 56  L 102 57  L 102 57  L 101 57  L 101 57  L 100 57  L 99 57  L 99 57  L 99 56  L 99 55  L 99 54  L 99 54  L 100 54  L 100 45  L 85 45  L 80 41  L 63 41  L 63 43  L 64 43  L 65 45  L 68 48  L 71 50  L 68 52  L 67 52  L 67 52  L 67 51  L 67 51  L 67 52  L 67 53  L 66 54  L 66 55  L 64 57  L 64 58  L 62 59  L 61 59  L 59 60  L 58 59  L 57 59  L 57 57  L 56 56  L 55 54  L 54 54  L 54 52  L 52 52  L 49 52  L 49 53  L 49 54  L 48 54  L 48 54  L 47 54  L 34 54  L 33 54  L 33 54  L 32 54  L 32 53  L 32 52  L 31 52  L 31 57  L 31 57  L 31 52  L 28 52  L 28 52  L 28 51  L 28 51  L 28 52  L 28 53  L 28 54  L 27 55  L 26 57  L 25 58  L 23 59  L 22 59  L 21 60  L 19 60  L 18 59  L 16 59  L 15 57  L 14 57  L 14 55  L 14 54  L 13 52  L 13 52  L 13 52  L 12 52  L 12 52  L 8 52  L 5 52  L 5 52  L 3 51  L 2 51  L 2 51  L 1 51  L 1 51  L 1 48  L 1 48  L 0 47  L 0 47  L 0 47  L 0 47  L 0 41  L 0 41  L 0 40  L 0 40  L 1 40  L 1 40  L 1 33  L 4 30  L 5 20  L 5 19  L 6 17  L 6 17  L 7 17  L 8 17  L 15 8  L 16 7  L 17 6  L 18 5  L 19 5  L 20 5  L 21 4  L 22 4  L 23 4  L 31 4  L 31 16  L 31 16  N"/>
          </draw:custom-shape>
          <draw:custom-shape draw:style-name="gr121" draw:text-style-name="P16" draw:layer="layout" svg:width="0.005cm" svg:height="0.005cm" svg:x="14.133cm" svg:y="6.976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4.133cm" svg:y="6.976cm">
            <text:p/>
            <draw:enhanced-geometry svg:viewBox="0 0 1 1" draw:type="non-primitive" draw:enhanced-path="M 0 0  L 0 0  L 0 0  L 0 0  N"/>
          </draw:custom-shape>
          <draw:custom-shape draw:style-name="gr1101" draw:text-style-name="P35" draw:layer="layout" svg:width="1.01cm" svg:height="0.269cm" svg:x="13.141cm" svg:y="6.72cm">
            <text:p/>
            <draw:enhanced-geometry svg:viewBox="0 0 229 61" draw:type="non-primitive" draw:enhanced-path="M 30 16  L 32 16  L 34 18  L 32 15  L 30 15  L 30 14  L 31 14  L 31 12  L 32 12  L 32 12  L 33 12  L 34 12  L 34 12  L 34 14  L 34 14  L 36 28  L 35 31  L 35 31  L 36 31  L 37 31  L 38 32  L 39 32  L 40 32  L 40 32  L 40 32  L 40 45  L 53 45  L 53 43  L 56 43  L 56 42  L 44 42  L 44 40  L 44 0  L 228 0  L 228 40  L 228 45  L 227 45  L 227 48  L 225 51  L 225 58  L 224 58  L 224 51  L 212 52  L 212 52  L 212 52  L 212 52  L 212 52  L 212 53  L 212 55  L 211 56  L 210 57  L 209 59  L 208 59  L 207 60  L 205 60  L 204 60  L 202 59  L 202 58  L 201 56  L 200 55  L 200 54  L 199 53  L 197 52  L 194 52  L 194 52  L 194 52  L 194 52  L 194 52  L 194 53  L 193 55  L 193 56  L 192 57  L 191 59  L 189 59  L 188 60  L 186 60  L 185 60  L 184 59  L 183 58  L 183 56  L 182 55  L 181 54  L 180 53  L 179 52  L 169 52  L 169 50  L 167 50  L 167 48  L 140 48  L 140 52  L 126 52  L 126 54  L 126 55  L 126 55  L 125 55  L 124 55  L 111 55  L 110 55  L 110 55  L 110 55  L 110 54  L 110 52  L 101 52  L 101 55  L 101 55  L 102 55  L 102 56  L 102 56  L 102 57  L 102 57  L 101 58  L 100 58  L 99 58  L 99 57  L 98 57  L 98 56  L 98 56  L 98 55  L 99 55  L 99 55  L 99 45  L 85 45  L 79 42  L 63 42  L 63 43  L 64 43  L 65 45  L 69 48  L 71 50  L 69 52  L 67 52  L 67 52  L 67 52  L 67 52  L 67 52  L 67 53  L 66 55  L 65 56  L 65 57  L 64 59  L 62 59  L 61 60  L 60 60  L 58 60  L 57 59  L 56 58  L 56 56  L 55 55  L 54 54  L 53 53  L 52 52  L 48 52  L 48 54  L 48 55  L 48 55  L 48 55  L 47 55  L 34 55  L 33 55  L 32 55  L 32 55  L 32 54  L 32 52  L 31 52  L 30 57  L 30 57  L 29 52  L 28 52  L 28 52  L 28 52  L 28 52  L 28 52  L 28 53  L 27 55  L 27 56  L 26 57  L 25 59  L 23 59  L 22 60  L 20 60  L 19 60  L 18 59  L 16 59  L 15 58  L 14 57  L 13 55  L 13 55  L 13 52  L 13 52  L 12 52  L 12 53  L 12 53  L 8 52  L 5 52  L 5 52  L 3 52  L 2 52  L 1 52  L 1 52  L 1 51  L 1 48  L 1 48  L 0 48  L 0 48  L 0 48  L 0 47  L 0 42  L 0 41  L 0 41  L 0 41  L 1 41  L 1 40  L 1 34  L 3 31  L 4 20  L 5 19  L 5 18  L 6 17  L 8 17  L 8 17  L 15 8  L 15 8  L 17 7  L 18 6  L 19 5  L 20 5  L 21 5  L 22 4  L 23 4  L 30 4  L 30 16  L 30 16  N"/>
          </draw:custom-shape>
          <draw:custom-shape draw:style-name="gr121" draw:text-style-name="P16" draw:layer="layout" svg:width="0.005cm" svg:height="0.005cm" svg:x="15.447cm" svg:y="6.976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5.447cm" svg:y="6.976cm">
            <text:p/>
            <draw:enhanced-geometry svg:viewBox="0 0 1 1" draw:type="non-primitive" draw:enhanced-path="M 0 0  L 0 0  L 0 0  L 0 0  N"/>
          </draw:custom-shape>
          <draw:custom-shape draw:style-name="gr1096" draw:text-style-name="P35" draw:layer="layout" svg:width="1.005cm" svg:height="0.269cm" svg:x="14.455cm" svg:y="6.72cm">
            <text:p/>
            <draw:enhanced-geometry svg:viewBox="0 0 228 61" draw:type="non-primitive" draw:enhanced-path="M 30 16  L 32 16  L 33 18  L 32 15  L 30 15  L 30 14  L 30 14  L 31 12  L 31 12  L 32 12  L 32 12  L 33 12  L 34 12  L 34 14  L 34 14  L 35 28  L 34 31  L 35 31  L 35 31  L 37 31  L 37 32  L 39 32  L 39 32  L 40 32  L 40 32  L 40 45  L 52 45  L 53 43  L 56 43  L 56 42  L 44 42  L 44 40  L 44 0  L 227 0  L 227 40  L 227 45  L 226 45  L 226 48  L 225 51  L 225 58  L 224 58  L 224 51  L 212 52  L 212 52  L 212 52  L 212 52  L 212 52  L 212 53  L 211 55  L 211 56  L 210 57  L 208 59  L 207 59  L 206 60  L 205 60  L 203 60  L 202 59  L 201 58  L 201 56  L 200 55  L 199 54  L 198 53  L 197 52  L 194 52  L 194 52  L 194 52  L 194 52  L 194 52  L 193 53  L 193 55  L 192 56  L 191 57  L 191 59  L 189 59  L 187 60  L 186 60  L 185 60  L 183 59  L 183 58  L 182 56  L 181 55  L 181 54  L 180 53  L 179 52  L 169 52  L 169 50  L 167 50  L 167 48  L 139 48  L 139 52  L 126 52  L 126 54  L 125 55  L 125 55  L 124 55  L 124 55  L 110 55  L 110 55  L 109 55  L 109 55  L 109 54  L 109 52  L 101 52  L 101 55  L 101 55  L 101 55  L 101 56  L 102 56  L 101 57  L 101 57  L 101 58  L 100 58  L 99 58  L 98 57  L 98 57  L 98 56  L 98 56  L 98 55  L 98 55  L 99 55  L 99 45  L 84 45  L 79 42  L 62 42  L 62 43  L 64 43  L 65 45  L 68 48  L 71 50  L 68 52  L 67 52  L 67 52  L 67 52  L 67 52  L 67 52  L 66 53  L 65 55  L 65 56  L 64 57  L 63 59  L 62 59  L 60 60  L 59 60  L 58 60  L 56 59  L 56 58  L 56 56  L 55 55  L 53 54  L 53 53  L 51 52  L 49 52  L 49 54  L 48 55  L 48 55  L 47 55  L 47 55  L 33 55  L 32 55  L 32 55  L 32 55  L 32 54  L 32 52  L 31 52  L 30 57  L 30 57  L 30 52  L 27 52  L 27 52  L 27 52  L 27 52  L 27 52  L 27 53  L 27 55  L 27 56  L 25 57  L 25 59  L 23 59  L 21 60  L 20 60  L 18 60  L 17 59  L 16 59  L 15 58  L 14 57  L 13 55  L 13 55  L 13 52  L 12 52  L 12 52  L 11 53  L 11 53  L 8 52  L 4 52  L 4 52  L 2 52  L 1 52  L 1 52  L 1 52  L 0 51  L 0 48  L 0 48  L 0 48  L 0 48  L 0 48  L 0 47  L 0 42  L 0 41  L 0 41  L 0 41  L 0 41  L 1 40  L 1 34  L 4 31  L 4 20  L 4 19  L 5 18  L 6 17  L 7 17  L 8 17  L 15 8  L 15 8  L 16 7  L 17 6  L 18 5  L 19 5  L 20 5  L 21 4  L 23 4  L 30 4  L 30 16  L 30 16  L 30 16  N"/>
          </draw:custom-shape>
          <draw:custom-shape draw:style-name="gr121" draw:text-style-name="P16" draw:layer="layout" svg:width="0.005cm" svg:height="0.005cm" svg:x="18.018cm" svg:y="6.976cm">
            <text:p/>
            <draw:enhanced-geometry svg:viewBox="0 0 1 1" draw:type="non-primitive" draw:enhanced-path="M 0 0  L 0 0  L 0 0  L 0 0  N"/>
          </draw:custom-shape>
          <draw:custom-shape draw:style-name="gr666" draw:text-style-name="P2" draw:layer="layout" svg:width="0.005cm" svg:height="0.005cm" svg:x="18.018cm" svg:y="6.976cm">
            <text:p/>
            <draw:enhanced-geometry svg:viewBox="0 0 1 1" draw:type="non-primitive" draw:enhanced-path="M 0 0  L 0 0  L 0 0  L 0 0  N"/>
          </draw:custom-shape>
          <draw:custom-shape draw:style-name="gr1097" draw:text-style-name="P35" draw:layer="layout" svg:width="1.009cm" svg:height="0.269cm" svg:x="17.022cm" svg:y="6.72cm">
            <text:p/>
            <draw:enhanced-geometry svg:viewBox="0 0 229 61" draw:type="non-primitive" draw:enhanced-path="M 31 16  L 32 16  L 34 18  L 32 15  L 31 15  L 31 14  L 32 14  L 32 12  L 32 12  L 32 12  L 34 12  L 35 12  L 35 12  L 35 14  L 35 14  L 36 28  L 35 31  L 36 31  L 37 31  L 37 31  L 39 32  L 39 32  L 40 32  L 41 32  L 41 32  L 41 45  L 53 45  L 54 43  L 56 43  L 56 42  L 44 42  L 44 40  L 44 0  L 228 0  L 228 40  L 228 45  L 227 45  L 227 48  L 226 51  L 226 58  L 224 58  L 224 51  L 213 52  L 213 52  L 213 52  L 213 52  L 213 52  L 213 53  L 212 55  L 212 56  L 210 57  L 210 59  L 208 59  L 207 60  L 205 60  L 204 60  L 203 59  L 203 58  L 202 56  L 201 55  L 200 54  L 199 53  L 198 52  L 195 52  L 195 52  L 195 52  L 195 52  L 195 52  L 195 53  L 194 55  L 193 56  L 193 57  L 191 59  L 190 59  L 188 60  L 187 60  L 186 60  L 185 59  L 184 58  L 183 56  L 183 55  L 182 54  L 181 53  L 179 52  L 169 52  L 169 50  L 167 50  L 167 48  L 141 48  L 141 52  L 127 52  L 127 54  L 127 55  L 126 55  L 126 55  L 125 55  L 112 55  L 110 55  L 110 55  L 110 55  L 110 54  L 110 52  L 101 52  L 101 55  L 102 55  L 102 55  L 103 56  L 103 56  L 103 57  L 102 57  L 101 58  L 101 58  L 100 58  L 100 57  L 99 57  L 99 56  L 99 56  L 99 55  L 100 55  L 100 55  L 100 45  L 86 45  L 80 42  L 63 42  L 63 43  L 65 43  L 65 45  L 69 48  L 72 50  L 69 52  L 68 52  L 68 52  L 68 52  L 68 52  L 68 52  L 68 53  L 67 55  L 66 56  L 65 57  L 64 59  L 63 59  L 61 60  L 60 60  L 58 60  L 58 59  L 57 58  L 56 56  L 56 55  L 55 54  L 54 53  L 52 52  L 49 52  L 49 54  L 49 55  L 49 55  L 48 55  L 48 55  L 34 55  L 33 55  L 33 55  L 32 55  L 32 54  L 32 52  L 32 52  L 31 57  L 31 57  L 30 52  L 29 52  L 29 52  L 29 52  L 29 52  L 29 52  L 28 53  L 28 55  L 27 56  L 27 57  L 25 59  L 24 59  L 23 60  L 21 60  L 20 60  L 18 59  L 17 59  L 16 58  L 15 57  L 14 55  L 14 55  L 14 52  L 13 52  L 13 52  L 12 53  L 12 53  L 9 52  L 6 52  L 6 52  L 3 52  L 3 52  L 2 52  L 1 52  L 1 51  L 1 48  L 1 48  L 1 48  L 0 48  L 0 48  L 1 47  L 1 42  L 0 41  L 0 41  L 1 41  L 1 41  L 1 40  L 1 34  L 4 31  L 5 20  L 6 19  L 6 18  L 6 17  L 8 17  L 9 17  L 16 8  L 16 8  L 17 7  L 18 6  L 19 5  L 20 5  L 22 5  L 23 4  L 23 4  L 31 4  L 31 16  L 31 16  N"/>
          </draw:custom-shape>
          <draw:custom-shape draw:style-name="gr121" draw:text-style-name="P16" draw:layer="layout" svg:width="0.093cm" svg:height="0.005cm" svg:x="16.779cm" svg:y="6.976cm">
            <text:p/>
            <draw:enhanced-geometry svg:viewBox="0 0 21 1" draw:type="non-primitive" draw:enhanced-path="M 0 0  L 20 0  L 20 0  L 20 0  L 0 0  N"/>
          </draw:custom-shape>
          <draw:custom-shape draw:style-name="gr666" draw:text-style-name="P2" draw:layer="layout" svg:width="0.093cm" svg:height="0.005cm" svg:x="16.779cm" svg:y="6.976cm">
            <text:p/>
            <draw:enhanced-geometry svg:viewBox="0 0 21 1" draw:type="non-primitive" draw:enhanced-path="M 0 0  L 20 0  L 20 0  L 20 0  N"/>
          </draw:custom-shape>
          <draw:custom-shape draw:style-name="gr1101" draw:text-style-name="P35" draw:layer="layout" svg:width="1.01cm" svg:height="0.269cm" svg:x="15.787cm" svg:y="6.72cm">
            <text:p/>
            <draw:enhanced-geometry svg:viewBox="0 0 229 61" draw:type="non-primitive" draw:enhanced-path="M 31 16  L 32 16  L 34 18  L 32 15  L 31 15  L 31 14  L 31 14  L 31 12  L 31 12  L 32 12  L 33 12  L 34 12  L 34 12  L 35 14  L 35 14  L 36 28  L 35 31  L 35 31  L 36 31  L 37 31  L 38 32  L 39 32  L 40 32  L 40 32  L 40 32  L 40 45  L 52 45  L 54 43  L 56 43  L 56 42  L 44 42  L 44 40  L 44 0  L 228 0  L 228 40  L 228 45  L 228 45  L 228 48  L 226 51  L 226 58  L 224 58  L 224 51  L 213 52  L 213 52  L 213 52  L 213 52  L 213 52  L 213 53  L 212 55  L 211 56  L 210 57  L 209 59  L 208 59  L 206 60  L 205 60  L 204 60  L 203 59  L 202 58  L 201 56  L 201 55  L 199 54  L 199 53  L 197 52  L 194 52  L 194 52  L 194 52  L 194 52  L 194 52  L 194 53  L 194 55  L 193 56  L 192 57  L 191 59  L 189 59  L 188 60  L 187 60  L 185 60  L 184 59  L 184 58  L 183 56  L 182 55  L 182 54  L 180 53  L 179 52  L 170 52  L 170 50  L 167 50  L 168 48  L 140 48  L 140 52  L 126 52  L 126 54  L 126 55  L 125 55  L 125 55  L 125 55  L 111 55  L 111 55  L 110 55  L 109 55  L 109 54  L 109 52  L 102 52  L 102 55  L 102 55  L 102 55  L 102 56  L 102 56  L 102 57  L 102 57  L 101 58  L 101 58  L 100 58  L 99 57  L 99 57  L 99 56  L 99 56  L 99 55  L 99 55  L 100 55  L 100 45  L 85 45  L 80 42  L 63 42  L 63 43  L 64 43  L 65 45  L 68 48  L 71 50  L 68 52  L 67 52  L 67 52  L 67 52  L 67 52  L 67 52  L 67 53  L 66 55  L 66 56  L 64 57  L 64 59  L 62 59  L 61 60  L 59 60  L 58 60  L 57 59  L 57 58  L 56 56  L 55 55  L 54 54  L 54 53  L 52 52  L 49 52  L 49 54  L 49 55  L 48 55  L 48 55  L 47 55  L 34 55  L 33 55  L 33 55  L 32 55  L 32 54  L 32 52  L 31 52  L 31 57  L 31 57  L 31 52  L 28 52  L 28 52  L 28 52  L 28 52  L 28 52  L 28 53  L 28 55  L 27 56  L 26 57  L 25 59  L 23 59  L 22 60  L 21 60  L 19 60  L 18 59  L 16 59  L 15 58  L 14 57  L 14 55  L 14 55  L 13 52  L 13 52  L 13 52  L 12 53  L 12 53  L 8 52  L 5 52  L 5 52  L 3 52  L 2 52  L 2 52  L 1 52  L 1 51  L 1 48  L 1 48  L 0 48  L 0 48  L 0 48  L 0 47  L 0 42  L 0 41  L 0 41  L 0 41  L 1 41  L 1 40  L 1 34  L 4 31  L 5 20  L 5 19  L 6 18  L 6 17  L 7 17  L 8 17  L 15 8  L 16 8  L 17 7  L 18 6  L 19 5  L 20 5  L 21 5  L 22 4  L 23 4  L 31 4  L 31 16  L 31 16  N"/>
          </draw:custom-shape>
          <draw:line draw:style-name="gr1102" draw:text-style-name="P14" draw:layer="layout" svg:x1="6.875cm" svg:y1="16.576cm" svg:x2="6.227cm" svg:y2="16.576cm">
            <text:p/>
          </draw:line>
          <draw:line draw:style-name="gr1102" draw:text-style-name="P14" draw:layer="layout" svg:x1="8.166cm" svg:y1="16.576cm" svg:x2="7.513cm" svg:y2="16.576cm">
            <text:p/>
          </draw:line>
          <draw:line draw:style-name="gr1102" draw:text-style-name="P14" draw:layer="layout" svg:x1="7.197cm" svg:y1="17.352cm" svg:x2="7.197cm" svg:y2="16.7cm">
            <text:p/>
          </draw:line>
          <draw:line draw:style-name="gr1102" draw:text-style-name="P14" draw:layer="layout" svg:x1="7.197cm" svg:y1="15.239cm" svg:x2="7.197cm" svg:y2="14.586cm">
            <text:p/>
          </draw:line>
          <draw:line draw:style-name="gr1103" draw:text-style-name="P14" draw:layer="layout" svg:x1="6.875cm" svg:y1="16.594cm" svg:x2="6.227cm" svg:y2="16.594cm">
            <text:p/>
          </draw:line>
          <draw:line draw:style-name="gr1103" draw:text-style-name="P14" draw:layer="layout" svg:x1="8.166cm" svg:y1="16.594cm" svg:x2="7.513cm" svg:y2="16.594cm">
            <text:p/>
          </draw:line>
          <draw:line draw:style-name="gr1103" draw:text-style-name="P14" draw:layer="layout" svg:x1="7.214cm" svg:y1="17.352cm" svg:x2="7.219cm" svg:y2="16.7cm">
            <text:p/>
          </draw:line>
          <draw:line draw:style-name="gr1103" draw:text-style-name="P14" draw:layer="layout" svg:x1="7.214cm" svg:y1="15.239cm" svg:x2="7.219cm" svg:y2="14.586cm">
            <text:p/>
          </draw:line>
          <draw:custom-shape draw:style-name="gr1104" draw:text-style-name="P274" draw:layer="layout" svg:width="0.339cm" svg:height="0.825cm" svg:x="5.398cm" svg:y="15.857cm">
            <text:p/>
            <draw:enhanced-geometry svg:viewBox="0 0 77 187" draw:type="non-primitive" draw:enhanced-path="M 47 0  L 70 5  L 72 6  L 73 7  L 74 7  L 75 9  L 76 10  L 76 11  L 76 13  L 76 14  L 37 181  L 37 181  L 36 183  L 35 184  L 34 185  L 33 186  L 32 186  L 30 186  L 29 186  L 6 181  L 4 180  L 3 179  L 1 179  L 1 177  L 0 176  L 0 174  L 0 173  L 0 172  L 39 5  L 39 4  L 39 3  L 40 2  L 42 1  L 43 0  L 44 0  L 46 0  L 47 0  L 47 0  L 47 0  N"/>
          </draw:custom-shape>
          <draw:custom-shape draw:style-name="gr1104" draw:text-style-name="P274" draw:layer="layout" svg:width="0.339cm" svg:height="0.825cm" svg:x="8.692cm" svg:y="15.857cm">
            <text:p/>
            <draw:enhanced-geometry svg:viewBox="0 0 77 187" draw:type="non-primitive" draw:enhanced-path="M 29 0  L 6 5  L 4 6  L 3 7  L 2 7  L 1 9  L 1 10  L 0 11  L 0 13  L 0 14  L 39 181  L 39 181  L 40 183  L 41 184  L 42 185  L 43 186  L 45 186  L 46 186  L 47 186  L 71 181  L 72 180  L 73 179  L 75 179  L 75 177  L 76 176  L 76 174  L 76 173  L 76 172  L 37 5  L 37 4  L 37 3  L 35 2  L 35 1  L 33 0  L 32 0  L 30 0  L 29 0  L 29 0  N"/>
          </draw:custom-shape>
          <draw:custom-shape draw:style-name="gr1105" draw:text-style-name="P2" draw:layer="layout" svg:width="0.339cm" svg:height="0.763cm" svg:x="5.398cm" svg:y="15.919cm">
            <text:p/>
            <draw:enhanced-geometry svg:viewBox="0 0 77 173" draw:type="non-primitive" draw:enhanced-path="M 76 0  L 37 167  L 37 167  L 37 169  L 35 170  L 34 171  L 33 172  L 32 172  L 30 172  L 29 172  L 6 167  L 4 166  L 3 165  L 1 165  L 1 163  L 1 162  L 0 160  L 0 159  L 0 158  N"/>
          </draw:custom-shape>
          <draw:custom-shape draw:style-name="gr1105" draw:text-style-name="P2" draw:layer="layout" svg:width="0.339cm" svg:height="0.763cm" svg:x="8.692cm" svg:y="15.919cm">
            <text:p/>
            <draw:enhanced-geometry svg:viewBox="0 0 77 173" draw:type="non-primitive" draw:enhanced-path="M 0 0  L 39 167  L 39 167  L 40 169  L 41 170  L 42 171  L 43 172  L 45 172  L 46 172  L 47 172  L 71 167  L 72 166  L 73 165  L 75 165  L 75 163  L 75 162  L 76 160  L 76 159  L 76 158  N"/>
          </draw:custom-shape>
          <draw:custom-shape draw:style-name="gr1106" draw:text-style-name="P274" draw:layer="layout" svg:width="0.679cm" svg:height="0.675cm" svg:x="5.609cm" svg:y="15.963cm">
            <text:p/>
            <draw:enhanced-geometry svg:viewBox="0 0 154 153" draw:type="non-primitive" draw:enhanced-path="M 37 0  L 0 152  L 75 152  L 139 151  L 153 94  L 116 68  L 100 32  L 37 1  L 37 1  L 37 0  N"/>
          </draw:custom-shape>
          <draw:custom-shape draw:style-name="gr1106" draw:text-style-name="P274" draw:layer="layout" svg:width="0.679cm" svg:height="0.675cm" svg:x="8.14cm" svg:y="15.963cm">
            <text:p/>
            <draw:enhanced-geometry svg:viewBox="0 0 154 153" draw:type="non-primitive" draw:enhanced-path="M 116 0  L 153 152  L 78 152  L 14 151  L 0 94  L 37 68  L 53 32  L 116 1  L 116 1  L 116 0  N"/>
          </draw:custom-shape>
          <draw:custom-shape draw:style-name="gr1107" draw:text-style-name="P2" draw:layer="layout" svg:width="0.679cm" svg:height="0.26cm" svg:x="5.609cm" svg:y="16.378cm">
            <text:p/>
            <draw:enhanced-geometry svg:viewBox="0 0 154 59" draw:type="non-primitive" draw:enhanced-path="M 153 0  L 138 58  L 0 58  N"/>
          </draw:custom-shape>
          <draw:custom-shape draw:style-name="gr1108" draw:text-style-name="P2" draw:layer="layout" svg:width="0.675cm" svg:height="0.26cm" svg:x="8.136cm" svg:y="16.378cm">
            <text:p/>
            <draw:enhanced-geometry svg:viewBox="0 0 153 59" draw:type="non-primitive" draw:enhanced-path="M 0 0  L 14 58  L 152 58  N"/>
          </draw:custom-shape>
          <draw:custom-shape draw:style-name="gr1109" draw:text-style-name="P274" draw:layer="layout" svg:width="0.502cm" svg:height="0.111cm" svg:x="5.583cm" svg:y="16.664cm">
            <text:p/>
            <draw:enhanced-geometry svg:viewBox="0 0 114 25" draw:type="non-primitive" draw:enhanced-path="M 0 11  L 40 11  L 58 0  L 77 11  L 113 11  L 113 24  L 0 24  L 0 11  L 0 11  N"/>
          </draw:custom-shape>
          <draw:custom-shape draw:style-name="gr1110" draw:text-style-name="P274" draw:layer="layout" svg:width="0.503cm" svg:height="0.111cm" svg:x="8.343cm" svg:y="16.664cm">
            <text:p/>
            <draw:enhanced-geometry svg:viewBox="0 0 114 25" draw:type="non-primitive" draw:enhanced-path="M 112 11  L 74 11  L 55 0  L 36 11  L 0 11  L 0 24  L 113 24  L 113 11  L 113 11  L 112 11  N"/>
          </draw:custom-shape>
          <draw:custom-shape draw:style-name="gr1111" draw:text-style-name="P2" draw:layer="layout" svg:width="0.502cm" svg:height="0.075cm" svg:x="5.583cm" svg:y="16.713cm">
            <text:p/>
            <draw:enhanced-geometry svg:viewBox="0 0 114 17" draw:type="non-primitive" draw:enhanced-path="M 113 0  L 113 16  L 0 16  N"/>
          </draw:custom-shape>
          <draw:custom-shape draw:style-name="gr1112" draw:text-style-name="P2" draw:layer="layout" svg:width="0.503cm" svg:height="0.075cm" svg:x="8.343cm" svg:y="16.713cm">
            <text:p/>
            <draw:enhanced-geometry svg:viewBox="0 0 114 17" draw:type="non-primitive" draw:enhanced-path="M 0 0  L 0 16  L 113 16  N"/>
          </draw:custom-shape>
          <draw:line draw:style-name="gr1102" draw:text-style-name="P14" draw:layer="layout" svg:x1="5.918cm" svg:y1="16.713cm" svg:x2="6.081cm" svg:y2="16.713cm">
            <text:p/>
          </draw:line>
          <draw:line draw:style-name="gr1102" draw:text-style-name="P14" draw:layer="layout" svg:x1="8.497cm" svg:y1="16.713cm" svg:x2="8.342cm" svg:y2="16.713cm">
            <text:p/>
          </draw:line>
          <draw:line draw:style-name="gr1103" draw:text-style-name="P14" draw:layer="layout" svg:x1="5.83cm" svg:y1="16.66cm" svg:x2="5.918cm" svg:y2="16.713cm">
            <text:p/>
          </draw:line>
          <draw:line draw:style-name="gr1103" draw:text-style-name="P14" draw:layer="layout" svg:x1="8.586cm" svg:y1="16.66cm" svg:x2="8.498cm" svg:y2="16.713cm">
            <text:p/>
          </draw:line>
          <draw:custom-shape draw:style-name="gr1113" draw:text-style-name="P2" draw:layer="layout" svg:width="0.251cm" svg:height="0.111cm" svg:x="5.583cm" svg:y="16.664cm">
            <text:p/>
            <draw:enhanced-geometry svg:viewBox="0 0 57 25" draw:type="non-primitive" draw:enhanced-path="M 0 24  L 0 11  L 39 11  L 56 0  N"/>
          </draw:custom-shape>
          <draw:custom-shape draw:style-name="gr1113" draw:text-style-name="P2" draw:layer="layout" svg:width="0.26cm" svg:height="0.111cm" svg:x="8.586cm" svg:y="16.664cm">
            <text:p/>
            <draw:enhanced-geometry svg:viewBox="0 0 59 25" draw:type="non-primitive" draw:enhanced-path="M 58 24  L 58 11  L 18 11  L 0 0  N"/>
          </draw:custom-shape>
          <draw:custom-shape draw:style-name="gr1114" draw:text-style-name="P274" draw:layer="layout" svg:width="0.499cm" svg:height="0.11cm" svg:x="6.989cm" svg:y="14.208cm">
            <text:p/>
            <draw:enhanced-geometry svg:viewBox="0 0 113 25" draw:type="non-primitive" draw:enhanced-path="M 0 11  L 39 10  L 57 0  L 76 10  L 112 10  L 112 24  L 0 24  L 0 11  L 0 11  N"/>
          </draw:custom-shape>
          <draw:custom-shape draw:style-name="gr1115" draw:text-style-name="P2" draw:layer="layout" svg:width="0.499cm" svg:height="0.075cm" svg:x="6.989cm" svg:y="14.257cm">
            <text:p/>
            <draw:enhanced-geometry svg:viewBox="0 0 113 17" draw:type="non-primitive" draw:enhanced-path="M 112 0  L 112 16  L 0 16  N"/>
          </draw:custom-shape>
          <draw:line draw:style-name="gr1102" draw:text-style-name="P14" draw:layer="layout" svg:x1="7.329cm" svg:y1="14.257cm" svg:x2="7.483cm" svg:y2="14.257cm">
            <text:p/>
          </draw:line>
          <draw:line draw:style-name="gr1103" draw:text-style-name="P14" draw:layer="layout" svg:x1="7.241cm" svg:y1="14.208cm" svg:x2="7.329cm" svg:y2="14.257cm">
            <text:p/>
          </draw:line>
          <draw:custom-shape draw:style-name="gr1113" draw:text-style-name="P2" draw:layer="layout" svg:width="0.256cm" svg:height="0.11cm" svg:x="6.989cm" svg:y="14.208cm">
            <text:p/>
            <draw:enhanced-geometry svg:viewBox="0 0 58 25" draw:type="non-primitive" draw:enhanced-path="M 0 24  L 0 11  L 39 11  L 57 0  N"/>
          </draw:custom-shape>
          <draw:custom-shape draw:style-name="gr1116" draw:text-style-name="P274" draw:layer="layout" svg:width="0.652cm" svg:height="0.19cm" svg:x="4.582cm" svg:y="16.629cm">
            <text:p/>
            <draw:enhanced-geometry svg:viewBox="0 0 148 43" draw:type="non-primitive" draw:enhanced-path="M 11 20  L 132 0  L 134 0  L 136 1  L 138 3  L 139 4  L 141 7  L 142 10  L 143 13  L 143 16  L 147 42  L 0 42  L 0 35  L 1 32  L 1 30  L 2 27  L 4 25  L 5 23  L 7 21  L 9 20  L 11 20  L 11 20  L 11 20  N"/>
          </draw:custom-shape>
          <draw:custom-shape draw:style-name="gr1117" draw:text-style-name="P274" draw:layer="layout" svg:width="0.653cm" svg:height="0.19cm" svg:x="9.194cm" svg:y="16.629cm">
            <text:p/>
            <draw:enhanced-geometry svg:viewBox="0 0 148 43" draw:type="non-primitive" draw:enhanced-path="M 136 20  L 16 0  L 13 0  L 11 1  L 9 3  L 8 4  L 6 7  L 6 10  L 4 13  L 4 16  L 0 42  L 147 42  L 147 35  L 147 32  L 146 30  L 145 27  L 144 25  L 142 23  L 140 21  L 138 20  L 136 20  L 136 20  L 136 20  N"/>
          </draw:custom-shape>
          <draw:custom-shape draw:style-name="gr1118" draw:text-style-name="P2" draw:layer="layout" svg:width="0.652cm" svg:height="0.163cm" svg:x="4.582cm" svg:y="16.656cm">
            <text:p/>
            <draw:enhanced-geometry svg:viewBox="0 0 148 37" draw:type="non-primitive" draw:enhanced-path="M 140 0  L 141 3  L 143 7  L 143 11  L 144 17  L 145 22  L 146 27  L 146 32  L 147 36  L 0 36  N"/>
          </draw:custom-shape>
          <draw:custom-shape draw:style-name="gr1119" draw:text-style-name="P2" draw:layer="layout" svg:width="0.653cm" svg:height="0.163cm" svg:x="9.194cm" svg:y="16.656cm">
            <text:p/>
            <draw:enhanced-geometry svg:viewBox="0 0 148 37" draw:type="non-primitive" draw:enhanced-path="M 7 0  L 6 3  L 5 7  L 4 11  L 3 17  L 2 22  L 2 27  L 1 32  L 0 36  L 147 36  N"/>
          </draw:custom-shape>
          <draw:custom-shape draw:style-name="gr1120" draw:text-style-name="P2" draw:layer="layout" svg:width="0.626cm" svg:height="0.19cm" svg:x="4.582cm" svg:y="16.629cm">
            <text:p/>
            <draw:enhanced-geometry svg:viewBox="0 0 142 43" draw:type="non-primitive" draw:enhanced-path="M 0 42  L 0 35  L 1 32  L 1 30  L 2 27  L 4 25  L 5 23  L 7 21  L 9 20  L 11 20  L 132 0  L 134 0  L 135 0  L 136 1  L 138 2  L 139 3  L 139 4  L 140 6  L 141 9  N"/>
          </draw:custom-shape>
          <draw:custom-shape draw:style-name="gr1120" draw:text-style-name="P2" draw:layer="layout" svg:width="0.626cm" svg:height="0.19cm" svg:x="9.221cm" svg:y="16.629cm">
            <text:p/>
            <draw:enhanced-geometry svg:viewBox="0 0 142 43" draw:type="non-primitive" draw:enhanced-path="M 141 42  L 141 35  L 141 32  L 140 30  L 139 27  L 138 25  L 136 23  L 134 21  L 132 20  L 130 20  L 10 0  L 7 0  L 6 0  L 5 1  L 3 2  L 3 3  L 2 4  L 1 6  L 0 9  N"/>
          </draw:custom-shape>
          <draw:line draw:style-name="gr1102" draw:text-style-name="P14" draw:layer="layout" svg:x1="5.609cm" svg:y1="16.632cm" svg:x2="5.772cm" svg:y2="15.967cm">
            <text:p/>
          </draw:line>
          <draw:line draw:style-name="gr1102" draw:text-style-name="P14" draw:layer="layout" svg:x1="8.806cm" svg:y1="16.632cm" svg:x2="8.652cm" svg:y2="15.967cm">
            <text:p/>
          </draw:line>
          <draw:custom-shape draw:style-name="gr1121" draw:text-style-name="P2" draw:layer="layout" svg:width="0.516cm" svg:height="0.414cm" svg:x="5.772cm" svg:y="15.968cm">
            <text:p/>
            <draw:enhanced-geometry svg:viewBox="0 0 117 94" draw:type="non-primitive" draw:enhanced-path="M 116 93  L 79 67  L 63 31  L 0 0  N"/>
          </draw:custom-shape>
          <draw:custom-shape draw:style-name="gr1122" draw:text-style-name="P2" draw:layer="layout" svg:width="0.52cm" svg:height="0.414cm" svg:x="8.136cm" svg:y="15.968cm">
            <text:p/>
            <draw:enhanced-geometry svg:viewBox="0 0 118 94" draw:type="non-primitive" draw:enhanced-path="M 0 93  L 38 67  L 54 31  L 117 0  N"/>
          </draw:custom-shape>
          <draw:custom-shape draw:style-name="gr1123" draw:text-style-name="P2" draw:layer="layout" svg:width="0.339cm" svg:height="0.763cm" svg:x="5.398cm" svg:y="15.857cm">
            <text:p/>
            <draw:enhanced-geometry svg:viewBox="0 0 77 173" draw:type="non-primitive" draw:enhanced-path="M 0 172  L 39 5  L 39 4  L 39 3  L 40 2  L 42 1  L 43 0  L 44 0  L 46 0  L 47 0  L 70 5  L 72 6  L 73 7  L 74 7  L 74 9  L 76 10  L 76 11  L 76 13  L 76 14  N"/>
          </draw:custom-shape>
          <draw:custom-shape draw:style-name="gr1123" draw:text-style-name="P2" draw:layer="layout" svg:width="0.339cm" svg:height="0.763cm" svg:x="8.692cm" svg:y="15.857cm">
            <text:p/>
            <draw:enhanced-geometry svg:viewBox="0 0 77 173" draw:type="non-primitive" draw:enhanced-path="M 76 172  L 37 5  L 37 4  L 37 3  L 35 2  L 35 1  L 33 0  L 32 0  L 30 0  L 29 0  L 6 5  L 4 6  L 3 7  L 2 7  L 1 9  L 1 10  L 0 11  L 0 13  L 0 14  N"/>
          </draw:custom-shape>
          <draw:custom-shape draw:style-name="gr1124" draw:text-style-name="P274" draw:layer="layout" svg:width="1.547cm" svg:height="0.784cm" svg:x="6.271cm" svg:y="17.388cm">
            <text:p/>
            <draw:enhanced-geometry svg:viewBox="0 0 351 178" draw:type="non-primitive" draw:enhanced-path="M 106 140  L 11 127  L 10 127  L 9 127  L 7 126  L 4 124  L 3 123  L 1 122  L 0 120  L 0 119  L 0 96  L 1 95  L 2 94  L 3 94  L 4 94  L 6 94  L 7 94  L 9 94  L 10 94  L 106 94  L 105 19  L 106 16  L 106 14  L 108 12  L 109 10  L 111 9  L 113 8  L 115 7  L 118 7  L 158 7  L 170 0  L 272 0  L 289 7  L 338 7  L 341 7  L 343 8  L 345 9  L 347 10  L 348 12  L 349 14  L 350 16  L 350 19  L 350 66  L 328 91  L 328 166  L 327 168  L 326 170  L 325 172  L 324 174  L 322 175  L 320 176  L 318 177  L 315 177  L 118 177  L 115 177  L 113 176  L 111 175  L 109 174  L 108 172  L 107 170  L 106 168  L 106 166  L 106 140  L 106 140  N"/>
          </draw:custom-shape>
          <draw:custom-shape draw:style-name="gr1125" draw:text-style-name="P2" draw:layer="layout" svg:width="1.547cm" svg:height="0.701cm" svg:x="6.271cm" svg:y="17.471cm">
            <text:p/>
            <draw:enhanced-geometry svg:viewBox="0 0 351 159" draw:type="non-primitive" draw:enhanced-path="M 350 0  L 350 47  L 328 72  L 328 147  L 327 149  L 326 151  L 325 153  L 324 155  L 322 156  L 320 157  L 318 158  L 315 158  L 118 158  L 115 158  L 113 157  L 111 156  L 109 155  L 108 153  L 107 151  L 106 149  L 106 147  L 106 121  L 11 108  L 10 108  L 9 108  L 7 107  L 4 105  L 3 104  L 1 103  L 0 101  L 0 100  N"/>
          </draw:custom-shape>
          <draw:custom-shape draw:style-name="gr1126" draw:text-style-name="P2" draw:layer="layout" svg:width="1.547cm" svg:height="0.524cm" svg:x="6.271cm" svg:y="17.388cm">
            <text:p/>
            <draw:enhanced-geometry svg:viewBox="0 0 351 119" draw:type="non-primitive" draw:enhanced-path="M 0 118  L 0 96  L 1 95  L 2 94  L 3 94  L 4 94  L 6 94  L 7 94  L 9 94  L 10 94  L 106 94  L 105 19  L 106 16  L 106 14  L 108 12  L 109 10  L 111 9  L 113 8  L 115 7  L 118 7  L 158 7  L 170 0  L 272 0  L 289 7  L 338 7  L 341 7  L 343 8  L 345 9  L 347 10  L 348 12  L 349 14  L 350 16  L 350 19  N"/>
          </draw:custom-shape>
          <draw:custom-shape draw:style-name="gr1127" draw:text-style-name="P274" draw:layer="layout" svg:width="0.965cm" svg:height="0.771cm" svg:x="6.756cm" svg:y="13.419cm">
            <text:p/>
            <draw:enhanced-geometry svg:viewBox="0 0 219 175" draw:type="non-primitive" draw:enhanced-path="M 0 159  L 1 162  L 2 165  L 3 168  L 4 169  L 7 171  L 9 173  L 12 173  L 14 174  L 203 174  L 206 173  L 209 173  L 211 171  L 213 169  L 215 168  L 216 165  L 218 162  L 218 159  L 218 14  L 218 11  L 216 8  L 215 6  L 213 4  L 211 2  L 209 1  L 206 0  L 203 0  L 14 0  L 12 0  L 9 1  L 7 2  L 4 4  L 3 6  L 2 8  L 1 11  L 0 14  L 0 159  L 0 159  L 0 159  N"/>
          </draw:custom-shape>
          <draw:custom-shape draw:style-name="gr1128" draw:text-style-name="P2" draw:layer="layout" svg:width="0.965cm" svg:height="0.771cm" svg:x="6.756cm" svg:y="13.419cm">
            <text:p/>
            <draw:enhanced-geometry svg:viewBox="0 0 219 175" draw:type="non-primitive" draw:enhanced-path="M 0 159  L 1 162  L 2 165  L 3 168  L 4 169  L 7 171  L 9 173  L 12 173  L 14 174  L 203 174  L 206 173  L 209 173  L 211 171  L 213 169  L 215 168  L 216 165  L 218 162  L 218 159  L 218 14  L 218 11  L 216 8  L 215 6  L 213 4  L 211 2  L 209 1  L 206 0  L 203 0  L 14 0  L 12 0  L 9 1  L 7 2  L 4 4  L 3 6  L 2 8  L 1 11  L 0 14  L 0 159  L 0 159  N"/>
          </draw:custom-shape>
          <draw:custom-shape draw:style-name="gr1129" draw:text-style-name="P2" draw:layer="layout" svg:width="0.965cm" svg:height="0.709cm" svg:x="6.756cm" svg:y="13.481cm">
            <text:p/>
            <draw:enhanced-geometry svg:viewBox="0 0 219 161" draw:type="non-primitive" draw:enhanced-path="M 218 0  L 218 145  L 218 148  L 218 151  L 215 154  L 213 155  L 211 157  L 209 159  L 206 159  L 203 160  L 14 160  L 12 159  L 9 159  L 7 157  L 4 155  L 3 154  L 2 151  L 1 148  L 0 145  N"/>
          </draw:custom-shape>
          <draw:custom-shape draw:style-name="gr1130" draw:text-style-name="P2" draw:layer="layout" svg:width="0.965cm" svg:height="0.705cm" svg:x="6.756cm" svg:y="13.419cm">
            <text:p/>
            <draw:enhanced-geometry svg:viewBox="0 0 219 160" draw:type="non-primitive" draw:enhanced-path="M 0 159  L 0 14  L 1 11  L 2 8  L 3 6  L 4 4  L 7 2  L 9 1  L 12 0  L 14 0  L 203 0  L 206 0  L 209 1  L 211 2  L 213 4  L 215 6  L 218 8  L 218 11  L 218 14  N"/>
          </draw:custom-shape>
          <draw:custom-shape draw:style-name="gr1131" draw:text-style-name="P2" draw:layer="layout" svg:width="0.644cm" svg:height="0.477cm" svg:x="6.923cm" svg:y="13.586cm">
            <text:p/>
            <draw:enhanced-geometry svg:viewBox="0 0 146 108" draw:type="non-primitive" draw:enhanced-path="M 145 0  L 145 97  L 144 99  L 144 101  L 143 102  L 142 104  L 140 105  L 138 106  L 137 107  L 135 107  L 9 107  L 7 107  L 5 106  L 3 105  L 3 104  L 1 102  L 1 101  L 0 99  L 0 97  N"/>
          </draw:custom-shape>
          <draw:custom-shape draw:style-name="gr1132" draw:text-style-name="P2" draw:layer="layout" svg:width="0.644cm" svg:height="0.472cm" svg:x="6.923cm" svg:y="13.547cm">
            <text:p/>
            <draw:enhanced-geometry svg:viewBox="0 0 146 107" draw:type="non-primitive" draw:enhanced-path="M 0 106  L 0 9  L 0 7  L 1 5  L 1 4  L 3 2  L 3 1  L 5 0  L 7 0  L 9 0  L 135 0  L 137 0  L 138 0  L 140 1  L 142 2  L 143 4  L 144 5  L 144 7  L 145 9  N"/>
          </draw:custom-shape>
          <draw:custom-shape draw:style-name="gr1133" draw:text-style-name="P274" draw:layer="layout" svg:width="0.622cm" svg:height="1.605cm" svg:x="6.879cm" svg:y="15.2cm">
            <text:p/>
            <draw:enhanced-geometry svg:viewBox="0 0 141 364" draw:type="non-primitive" draw:enhanced-path="M 4 0  L 135 1  L 137 1  L 138 2  L 139 4  L 140 5  L 140 358  L 139 360  L 138 361  L 137 363  L 135 363  L 4 363  L 3 363  L 1 361  L 0 360  L 0 358  L 0 5  L 0 4  L 1 2  L 3 1  L 4 1  L 4 1  L 4 0  N"/>
          </draw:custom-shape>
          <draw:custom-shape draw:style-name="gr1134" draw:text-style-name="P2" draw:layer="layout" svg:width="0.622cm" svg:height="1.583cm" svg:x="6.879cm" svg:y="15.222cm">
            <text:p/>
            <draw:enhanced-geometry svg:viewBox="0 0 141 359" draw:type="non-primitive" draw:enhanced-path="M 140 0  L 140 353  L 139 355  L 138 356  L 137 358  L 135 358  L 4 358  L 3 358  L 1 356  L 0 355  L 0 353  N"/>
          </draw:custom-shape>
          <draw:custom-shape draw:style-name="gr1135" draw:text-style-name="P2" draw:layer="layout" svg:width="0.622cm" svg:height="1.578cm" svg:x="6.879cm" svg:y="15.205cm">
            <text:p/>
            <draw:enhanced-geometry svg:viewBox="0 0 141 358" draw:type="non-primitive" draw:enhanced-path="M 0 357  L 0 4  L 0 3  L 1 1  L 3 0  L 4 0  L 135 0  L 137 0  L 138 1  L 139 3  L 140 4  N"/>
          </draw:custom-shape>
          <draw:line draw:style-name="gr1102" draw:text-style-name="P14" draw:layer="layout" svg:x1="6.879cm" svg:y1="15.438cm" svg:x2="7.21cm" svg:y2="15.438cm">
            <text:p/>
          </draw:line>
          <draw:line draw:style-name="gr1102" draw:text-style-name="P14" draw:layer="layout" svg:x1="6.879cm" svg:y1="15.738cm" svg:x2="7.21cm" svg:y2="15.743cm">
            <text:p/>
          </draw:line>
          <draw:line draw:style-name="gr1102" draw:text-style-name="P14" draw:layer="layout" svg:x1="6.879cm" svg:y1="15.584cm" svg:x2="7.21cm" svg:y2="15.584cm">
            <text:p/>
          </draw:line>
          <draw:line draw:style-name="gr1102" draw:text-style-name="P14" draw:layer="layout" svg:x1="6.879cm" svg:y1="15.884cm" svg:x2="7.21cm" svg:y2="15.884cm">
            <text:p/>
          </draw:line>
          <draw:line draw:style-name="gr1102" draw:text-style-name="P14" draw:layer="layout" svg:x1="6.879cm" svg:y1="15.509cm" svg:x2="7.21cm" svg:y2="15.509cm">
            <text:p/>
          </draw:line>
          <draw:line draw:style-name="gr1102" draw:text-style-name="P14" draw:layer="layout" svg:x1="6.879cm" svg:y1="15.804cm" svg:x2="7.21cm" svg:y2="15.804cm">
            <text:p/>
          </draw:line>
          <draw:line draw:style-name="gr1102" draw:text-style-name="P14" draw:layer="layout" svg:x1="6.879cm" svg:y1="15.655cm" svg:x2="7.21cm" svg:y2="15.655cm">
            <text:p/>
          </draw:line>
          <draw:line draw:style-name="gr1102" draw:text-style-name="P14" draw:layer="layout" svg:x1="6.879cm" svg:y1="15.95cm" svg:x2="7.21cm" svg:y2="15.95cm">
            <text:p/>
          </draw:line>
          <draw:line draw:style-name="gr1103" draw:text-style-name="P14" draw:layer="layout" svg:x1="6.879cm" svg:y1="15.421cm" svg:x2="7.21cm" svg:y2="15.421cm">
            <text:p/>
          </draw:line>
          <draw:line draw:style-name="gr1103" draw:text-style-name="P14" draw:layer="layout" svg:x1="6.879cm" svg:y1="15.721cm" svg:x2="7.21cm" svg:y2="15.721cm">
            <text:p/>
          </draw:line>
          <draw:line draw:style-name="gr1103" draw:text-style-name="P14" draw:layer="layout" svg:x1="6.879cm" svg:y1="15.566cm" svg:x2="7.21cm" svg:y2="15.566cm">
            <text:p/>
          </draw:line>
          <draw:line draw:style-name="gr1103" draw:text-style-name="P14" draw:layer="layout" svg:x1="6.879cm" svg:y1="15.866cm" svg:x2="7.21cm" svg:y2="15.866cm">
            <text:p/>
          </draw:line>
          <draw:line draw:style-name="gr1103" draw:text-style-name="P14" draw:layer="layout" svg:x1="6.879cm" svg:y1="15.491cm" svg:x2="7.21cm" svg:y2="15.491cm">
            <text:p/>
          </draw:line>
          <draw:line draw:style-name="gr1103" draw:text-style-name="P14" draw:layer="layout" svg:x1="6.879cm" svg:y1="15.791cm" svg:x2="7.21cm" svg:y2="15.791cm">
            <text:p/>
          </draw:line>
          <draw:line draw:style-name="gr1103" draw:text-style-name="P14" draw:layer="layout" svg:x1="6.879cm" svg:y1="15.637cm" svg:x2="7.21cm" svg:y2="15.637cm">
            <text:p/>
          </draw:line>
          <draw:line draw:style-name="gr1103" draw:text-style-name="P14" draw:layer="layout" svg:x1="6.879cm" svg:y1="15.937cm" svg:x2="7.21cm" svg:y2="15.937cm">
            <text:p/>
          </draw:line>
          <draw:custom-shape draw:style-name="gr1136" draw:text-style-name="P274" draw:layer="layout" svg:width="1.548cm" svg:height="0.216cm" svg:x="6.531cm" svg:y="14.407cm">
            <text:p/>
            <draw:enhanced-geometry svg:viewBox="0 0 351 49" draw:type="non-primitive" draw:enhanced-path="M 175 48  L 348 48  L 350 41  L 349 38  L 349 36  L 348 34  L 348 34  L 326 3  L 326 2  L 325 1  L 324 1  L 324 1  L 323 0  L 322 0  L 321 0  L 319 0  L 175 0  L 30 0  L 29 0  L 28 0  L 27 0  L 27 1  L 26 1  L 26 1  L 24 2  L 24 3  L 3 34  L 2 34  L 1 36  L 1 38  L 0 41  L 2 48  L 175 48  L 175 48  N"/>
          </draw:custom-shape>
          <draw:custom-shape draw:style-name="gr1137" draw:text-style-name="P2" draw:layer="layout" svg:width="1.442cm" svg:height="0.185cm" svg:x="6.531cm" svg:y="14.407cm">
            <text:p/>
            <draw:enhanced-geometry svg:viewBox="0 0 327 42" draw:type="non-primitive" draw:enhanced-path="M 326 3  L 326 2  L 325 1  L 324 1  L 324 1  L 323 0  L 322 0  L 321 0  L 319 0  L 175 0  L 30 0  L 29 0  L 28 0  L 27 0  L 27 1  L 26 1  L 26 1  L 24 2  L 24 3  L 3 34  L 2 34  L 1 36  L 1 38  L 0 41  N"/>
          </draw:custom-shape>
          <draw:custom-shape draw:style-name="gr1138" draw:text-style-name="P2" draw:layer="layout" svg:width="1.548cm" svg:height="0.203cm" svg:x="6.531cm" svg:y="14.42cm">
            <text:p/>
            <draw:enhanced-geometry svg:viewBox="0 0 351 46" draw:type="non-primitive" draw:enhanced-path="M 0 38  L 2 45  L 175 45  L 348 45  L 350 38  L 349 35  L 349 33  L 348 31  L 348 31  L 326 0  N"/>
          </draw:custom-shape>
          <draw:line draw:style-name="gr1102" draw:text-style-name="P14" draw:layer="layout" svg:x1="6.593cm" svg:y1="14.561cm" svg:x2="7.999cm" svg:y2="14.561cm">
            <text:p/>
          </draw:line>
          <draw:custom-shape draw:style-name="gr1139" draw:text-style-name="P21" draw:layer="layout" svg:width="2.19cm" svg:height="0.808cm" svg:x="3.617cm" svg:y="14.623cm">
            <text:list text:style-name="L5">
              <text:list-header>
                <text:p text:style-name="P20"><text:span text:style-name="T59">Intern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0" draw:text-style-name="P21" draw:layer="layout" svg:width="3.46cm" svg:height="0.808cm" svg:x="2.975cm" svg:y="15.178cm">
            <text:list text:style-name="L5">
              <text:list-header>
                <text:p text:style-name="P20"><text:span text:style-name="T59">Technologi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1" draw:text-style-name="P21" draw:layer="layout" svg:width="2.775cm" svg:height="0.808cm" svg:x="4.246cm" svg:y="10.495cm">
            <text:list text:style-name="L5">
              <text:list-header>
                <text:p text:style-name="P20"><text:span text:style-name="T59">Enterpri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2" draw:text-style-name="P21" draw:layer="layout" svg:width="2.394cm" svg:height="0.808cm" svg:x="4.443cm" svg:y="11.051cm">
            <text:list text:style-name="L5">
              <text:list-header>
                <text:p text:style-name="P20"><text:span text:style-name="T59">System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3" draw:text-style-name="P21" draw:layer="layout" svg:width="2.897cm" svg:height="0.808cm" svg:x="19.072cm" svg:y="4.225cm">
            <text:list text:style-name="L5">
              <text:list-header>
                <text:p text:style-name="P20"><text:span text:style-name="T59">Planning &amp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4" draw:text-style-name="P21" draw:layer="layout" svg:width="3.105cm" svg:height="0.808cm" svg:x="18.961cm" svg:y="4.78cm">
            <text:list text:style-name="L5">
              <text:list-header>
                <text:p text:style-name="P20"><text:span text:style-name="T59">Foreca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5" draw:text-style-name="P21" draw:layer="layout" svg:width="1.276cm" svg:height="0.808cm" svg:x="19.288cm" svg:y="10.05cm">
            <text:list text:style-name="L5">
              <text:list-header>
                <text:p text:style-name="P20"><text:span text:style-name="T59">ED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6" draw:text-style-name="P21" draw:layer="layout" svg:width="3.029cm" svg:height="0.808cm" svg:x="18.075cm" svg:y="11.655cm">
            <text:list text:style-name="L5">
              <text:list-header>
                <text:p text:style-name="P20"><text:span text:style-name="T59">Commodit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7" draw:text-style-name="P21" draw:layer="layout" svg:width="2.775cm" svg:height="0.808cm" svg:x="18.198cm" svg:y="12.215cm">
            <text:list text:style-name="L5">
              <text:list-header>
                <text:p text:style-name="P20"><text:span text:style-name="T59">Brokera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8" draw:text-style-name="P21" draw:layer="layout" svg:width="3.439cm" svg:height="1.019cm" svg:x="11.739cm" svg:y="14.376cm">
            <text:list text:style-name="L5">
              <text:list-header>
                <text:p text:style-name="P20"><text:span text:style-name="T12">THE WEB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12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CEO’s Infinite Resource Planning Vision</text:p>
              </text:list-header>
            </text:list>
          </draw:text-box>
        </draw:frame>
        <anim:par presentation:node-type="timing-root">
          <anim:par smil:begin="id15.begin">
            <anim:transitionFilter smil:dur="1s" smil:type="fade" smil:subtype="fadeOverColor" smil:fadeColor="#000000"/>
          </anim:par>
        </anim:par>
        <presentation:notes draw:style-name="dp3">
          <draw:frame draw:style-name="gr1149" draw:text-style-name="P27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1149" draw:text-style-name="P27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1150" draw:text-style-name="P27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1150" draw:text-style-name="P27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page-thumbnail draw:style-name="gr1" draw:layer="layout" svg:width="12.656cm" svg:height="9.494cm" svg:x="3.197cm" svg:y="1.918cm" draw:page-number="15" presentation:class="page"/>
          <draw:frame presentation:style-name="pr13" draw:text-style-name="P275" draw:layer="layout" svg:width="13.97cm" svg:height="11.434cm" svg:x="2.54cm" svg:y="12.061cm" presentation:class="notes" presentation:user-transformed="true">
            <draw:text-box>
              <text:list text:style-name="L3">
                <text:list-header>
                  <text:p text:style-name="P7"><text:span text:style-name="T4">And what’s the CEO’s goal ? <text:s/>Aberdeen believes it is found in this interconnected, cross-supply chain model, and that the movement toward and adoption of the IRP model is the next significant form of computing and of conducting business.</text:span></text:p>
                  <text:p text:style-name="P7"><text:span text:style-name="T4"/></text:p>
                  <text:p text:style-name="P7"><text:span text:style-name="T4">UPS/Fedex - Distribution Systems</text:span></text:p>
                  <text:p text:style-name="P7"><text:span text:style-name="T4">NetLogistics - Best Way &amp; Best Price</text:span></text:p>
                  <text:p text:style-name="P7"><text:span text:style-name="T4">Cisco - 64% ($5.6 billion) of Cisco’s revenues now come over the web. <text:s/>CEO John Chambers believes that $1 - $2 trillion in business will be conducted on the web in 2002. <text:s/>His company saves $500 million a year by using the Internet.</text:span></text:p>
                  <text:p text:style-name="P7"><text:span text:style-name="T4"/></text:p>
                </text:list-header>
              </text:list>
            </draw:text-box>
          </draw:frame>
        </presentation:notes>
      </draw:page>
      <draw:page draw:name="Virtual Internet Computing:  Reality is Complex, Multi-Company" draw:style-name="dp1" draw:master-page-name="Default" presentation:presentation-page-layout-name="AL3T19" xml:id="id16" draw:id="id16">
        <draw:custom-shape draw:style-name="gr1151" draw:text-style-name="P17" draw:layer="layout" svg:width="11.853cm" svg:height="13.124cm" svg:x="12.7cm" svg:y="5.503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1152" draw:text-style-name="P2" draw:layer="layout" svg:width="5.157cm" svg:height="1.157cm" svg:x="2.216cm" svg:y="16.975cm">
            <text:p/>
            <draw:enhanced-geometry svg:viewBox="0 0 21600 21600" draw:type="rectangle" draw:enhanced-path="M 0 0 L 21600 0 21600 21600 0 21600 0 0 Z N"/>
          </draw:custom-shape>
          <draw:custom-shape draw:style-name="gr1152" draw:text-style-name="P2" draw:layer="layout" svg:width="7.445cm" svg:height="1.157cm" svg:x="8.801cm" svg:y="16.975cm">
            <text:p/>
            <draw:enhanced-geometry svg:viewBox="0 0 21600 21600" draw:type="rectangle" draw:enhanced-path="M 0 0 L 21600 0 21600 21600 0 21600 0 0 Z N"/>
          </draw:custom-shape>
          <draw:custom-shape draw:style-name="gr1153" draw:text-style-name="P31" draw:layer="layout" svg:width="1.867cm" svg:height="2.463cm" svg:x="17.303cm" svg:y="12.493cm">
            <text:p/>
            <draw:enhanced-geometry svg:viewBox="0 0 447 596" draw:type="non-primitive" draw:enhanced-path="M 0 595  L 0 577  L 111 539  L 111 0  L 334 0  L 334 539  L 446 577  L 446 595  L 0 595  N"/>
          </draw:custom-shape>
          <draw:line draw:style-name="gr1154" draw:text-style-name="P14" draw:layer="layout" svg:x1="17.767cm" svg:y1="14.722cm" svg:x2="17.767cm" svg:y2="14.953cm">
            <text:p/>
          </draw:line>
          <draw:line draw:style-name="gr1154" draw:text-style-name="P14" draw:layer="layout" svg:x1="18.702cm" svg:y1="14.722cm" svg:x2="18.702cm" svg:y2="14.953cm">
            <text:p/>
          </draw:line>
          <draw:line draw:style-name="gr1154" draw:text-style-name="P14" draw:layer="layout" svg:x1="18.075cm" svg:y1="13.262cm" svg:x2="18.388cm" svg:y2="13.262cm">
            <text:p/>
          </draw:line>
          <draw:line draw:style-name="gr1154" draw:text-style-name="P14" draw:layer="layout" svg:x1="18.025cm" svg:y1="13.001cm" svg:x2="18.438cm" svg:y2="13.001cm">
            <text:p/>
          </draw:line>
          <draw:custom-shape draw:style-name="gr1155" draw:text-style-name="P2" draw:layer="layout" svg:width="0.705cm" svg:height="1.43cm" svg:x="17.879cm" svg:y="12.605cm">
            <text:p/>
            <draw:enhanced-geometry svg:viewBox="0 0 169 346" draw:type="non-primitive" draw:enhanced-path="M 0 0  L 168 0  L 168 345  L 0 345  L 0 0  N"/>
          </draw:custom-shape>
          <draw:custom-shape draw:style-name="gr1153" draw:text-style-name="P31" draw:layer="layout" svg:width="0.155cm" svg:height="0.07cm" svg:x="18.159cm" svg:y="13.238cm">
            <text:p/>
            <draw:enhanced-geometry svg:viewBox="0 0 37 17" draw:type="non-primitive" draw:enhanced-path="M 0 16  L 36 16  L 36 0  L 0 0  L 0 16  N"/>
          </draw:custom-shape>
          <draw:custom-shape draw:style-name="gr1153" draw:text-style-name="P31" draw:layer="layout" svg:width="0.78cm" svg:height="0.669cm" svg:x="17.846cm" svg:y="14.135cm">
            <text:p/>
            <draw:enhanced-geometry svg:viewBox="0 0 187 162" draw:type="non-primitive" draw:enhanced-path="M 0 99  L 14 99  L 14 0  L 0 0  L 0 99  L 28 99  L 42 99  L 42 0  L 28 0  L 28 99  L 57 99  L 71 99  L 71 0  L 57 0  L 57 99  L 85 99  L 100 99  L 100 0  L 85 0  L 85 99  L 114 99  L 128 99  L 128 0  L 114 0  L 114 99  L 143 99  L 157 99  L 157 0  L 143 0  L 143 99  L 171 99  L 186 99  L 186 0  L 171 0  L 171 99  L 171 161  L 186 161  L 186 111  L 171 111  L 171 161  L 143 161  L 157 161  L 157 111  L 143 111  L 143 161  L 114 161  L 128 161  L 128 111  L 114 111  L 114 161  L 85 161  L 100 161  L 100 111  L 85 111  L 85 161  L 57 161  L 71 161  L 71 111  L 57 111  L 57 161  L 28 161  L 42 161  L 42 111  L 28 111  L 28 161  L 0 161  L 14 161  L 14 111  L 0 111  L 0 161  L 0 99  N"/>
          </draw:custom-shape>
          <draw:custom-shape draw:style-name="gr1155" draw:text-style-name="P2" draw:layer="layout" svg:width="0.606cm" svg:height="0.207cm" svg:x="17.933cm" svg:y="12.646cm">
            <text:p/>
            <draw:enhanced-geometry svg:viewBox="0 0 145 50" draw:type="non-primitive" draw:enhanced-path="M 0 0  L 0 49  L 144 49  L 144 0  L 0 0  N"/>
          </draw:custom-shape>
          <draw:custom-shape draw:style-name="gr1155" draw:text-style-name="P2" draw:layer="layout" svg:width="0.606cm" svg:height="0.07cm" svg:x="17.933cm" svg:y="12.646cm">
            <text:p/>
            <draw:enhanced-geometry svg:viewBox="0 0 145 17" draw:type="non-primitive" draw:enhanced-path="M 0 0  L 14 16  L 128 16  L 144 0  N"/>
          </draw:custom-shape>
          <draw:custom-shape draw:style-name="gr1155" draw:text-style-name="P2" draw:layer="layout" svg:width="0.606cm" svg:height="0.21cm" svg:x="17.933cm" svg:y="12.902cm">
            <text:p/>
            <draw:enhanced-geometry svg:viewBox="0 0 145 51" draw:type="non-primitive" draw:enhanced-path="M 0 50  L 144 50  L 144 0  L 0 0  L 0 50  N"/>
          </draw:custom-shape>
          <draw:custom-shape draw:style-name="gr1155" draw:text-style-name="P2" draw:layer="layout" svg:width="0.606cm" svg:height="0.21cm" svg:x="17.933cm" svg:y="13.154cm">
            <text:p/>
            <draw:enhanced-geometry svg:viewBox="0 0 145 51" draw:type="non-primitive" draw:enhanced-path="M 0 50  L 144 50  L 144 0  L 0 0  L 0 50  N"/>
          </draw:custom-shape>
          <draw:custom-shape draw:style-name="gr1155" draw:text-style-name="P2" draw:layer="layout" svg:width="0.606cm" svg:height="0.207cm" svg:x="17.933cm" svg:y="13.415cm">
            <text:p/>
            <draw:enhanced-geometry svg:viewBox="0 0 145 50" draw:type="non-primitive" draw:enhanced-path="M 0 49  L 144 49  L 144 0  L 0 0  L 0 49  N"/>
          </draw:custom-shape>
          <draw:custom-shape draw:style-name="gr1155" draw:text-style-name="P2" draw:layer="layout" svg:width="0.606cm" svg:height="0.21cm" svg:x="17.933cm" svg:y="13.672cm">
            <text:p/>
            <draw:enhanced-geometry svg:viewBox="0 0 145 51" draw:type="non-primitive" draw:enhanced-path="M 0 50  L 144 50  L 144 0  L 0 0  L 0 50  N"/>
          </draw:custom-shape>
          <draw:line draw:style-name="gr1154" draw:text-style-name="P14" draw:layer="layout" svg:x1="17.933cm" svg:y1="12.848cm" svg:x2="17.991cm" svg:y2="12.696cm">
            <text:p/>
          </draw:line>
          <draw:line draw:style-name="gr1154" draw:text-style-name="P14" draw:layer="layout" svg:x1="17.963cm" svg:y1="13.593cm" svg:x2="18.351cm" svg:y2="13.593cm">
            <text:p/>
          </draw:line>
          <draw:line draw:style-name="gr1154" draw:text-style-name="P14" draw:layer="layout" svg:x1="17.963cm" svg:y1="13.556cm" svg:x2="18.351cm" svg:y2="13.556cm">
            <text:p/>
          </draw:line>
          <draw:line draw:style-name="gr1154" draw:text-style-name="P14" draw:layer="layout" svg:x1="17.963cm" svg:y1="13.518cm" svg:x2="18.351cm" svg:y2="13.518cm">
            <text:p/>
          </draw:line>
          <draw:line draw:style-name="gr1154" draw:text-style-name="P14" draw:layer="layout" svg:x1="17.963cm" svg:y1="13.481cm" svg:x2="18.351cm" svg:y2="13.481cm">
            <text:p/>
          </draw:line>
          <draw:line draw:style-name="gr1154" draw:text-style-name="P14" draw:layer="layout" svg:x1="17.963cm" svg:y1="13.44cm" svg:x2="18.351cm" svg:y2="13.44cm">
            <text:p/>
          </draw:line>
          <draw:custom-shape draw:style-name="gr1155" draw:text-style-name="P2" draw:layer="layout" svg:width="0.188cm" svg:height="0.107cm" svg:x="18.23cm" svg:y="12.952cm">
            <text:p/>
            <draw:enhanced-geometry svg:viewBox="0 0 45 26" draw:type="non-primitive" draw:enhanced-path="M 0 25  L 44 25  L 44 0  L 0 0  L 0 25  N"/>
          </draw:custom-shape>
          <draw:custom-shape draw:style-name="gr1155" draw:text-style-name="P2" draw:layer="layout" svg:width="0.091cm" svg:height="0.07cm" svg:x="18.397cm" svg:y="13.3cm">
            <text:p/>
            <draw:enhanced-geometry svg:viewBox="0 0 22 17" draw:type="non-primitive" draw:enhanced-path="M 0 16  L 21 16  L 21 0  L 0 0  L 0 16  N"/>
          </draw:custom-shape>
          <draw:custom-shape draw:style-name="gr1155" draw:text-style-name="P2" draw:layer="layout" svg:width="0.091cm" svg:height="0.07cm" svg:x="18.397cm" svg:y="13.44cm">
            <text:p/>
            <draw:enhanced-geometry svg:viewBox="0 0 22 17" draw:type="non-primitive" draw:enhanced-path="M 0 16  L 21 16  L 21 0  L 0 0  L 0 16  N"/>
          </draw:custom-shape>
          <draw:custom-shape draw:style-name="gr1155" draw:text-style-name="P2" draw:layer="layout" svg:width="0.091cm" svg:height="0.07cm" svg:x="18.397cm" svg:y="13.494cm">
            <text:p/>
            <draw:enhanced-geometry svg:viewBox="0 0 22 17" draw:type="non-primitive" draw:enhanced-path="M 0 16  L 21 16  L 21 0  L 0 0  L 0 16  N"/>
          </draw:custom-shape>
          <draw:custom-shape draw:style-name="gr1156" draw:text-style-name="P16" draw:layer="layout" svg:width="1.874cm" svg:height="1.851cm" svg:x="4.02cm" svg:y="9.413cm">
            <text:p/>
            <draw:enhanced-geometry svg:viewBox="0 0 449 448" draw:type="non-primitive" draw:enhanced-path="M 98 293  L 0 293  L 0 447  L 448 447  L 448 293  L 349 293  L 349 272  L 391 272  L 391 0  L 56 0  L 56 272  L 98 272  L 98 293  N"/>
          </draw:custom-shape>
          <draw:line draw:style-name="gr1154" draw:text-style-name="P14" draw:layer="layout" svg:x1="4.434cm" svg:y1="10.625cm" svg:x2="5.481cm" svg:y2="10.625cm">
            <text:p/>
          </draw:line>
          <draw:line draw:style-name="gr1154" draw:text-style-name="P14" draw:layer="layout" svg:x1="4.434cm" svg:y1="10.538cm" svg:x2="5.481cm" svg:y2="10.538cm">
            <text:p/>
          </draw:line>
          <draw:custom-shape draw:style-name="gr1156" draw:text-style-name="P16" draw:layer="layout" svg:width="0.768cm" svg:height="0.525cm" svg:x="4.98cm" svg:y="10.682cm">
            <text:p/>
            <draw:enhanced-geometry svg:viewBox="0 0 184 127" draw:type="non-primitive" draw:enhanced-path="M 0 126  L 147 126  L 147 0  L 0 0  L 0 126  L 161 20  L 183 20  L 183 0  L 161 0  L 161 20  L 0 126  N"/>
          </draw:custom-shape>
          <draw:line draw:style-name="gr1154" draw:text-style-name="P14" draw:layer="layout" svg:x1="4.98cm" svg:y1="10.856cm" svg:x2="5.598cm" svg:y2="10.856cm">
            <text:p/>
          </draw:line>
          <draw:line draw:style-name="gr1154" draw:text-style-name="P14" draw:layer="layout" svg:x1="4.98cm" svg:y1="11.025cm" svg:x2="5.598cm" svg:y2="11.025cm">
            <text:p/>
          </draw:line>
          <draw:line draw:style-name="gr1154" draw:text-style-name="P14" draw:layer="layout" svg:x1="5.014cm" svg:y1="10.943cm" svg:x2="5.565cm" svg:y2="10.943cm">
            <text:p/>
          </draw:line>
          <draw:custom-shape draw:style-name="gr1155" draw:text-style-name="P2" draw:layer="layout" svg:width="0.179cm" svg:height="0.12cm" svg:x="5.335cm" svg:y="10.884cm">
            <text:p/>
            <draw:enhanced-geometry svg:viewBox="0 0 43 29" draw:type="non-primitive" draw:enhanced-path="M 0 28  L 42 28  L 42 0  L 0 0  L 0 28  N"/>
          </draw:custom-shape>
          <draw:custom-shape draw:style-name="gr1157" draw:text-style-name="P35" draw:layer="layout" svg:width="1.753cm" svg:height="1.245cm" svg:x="4.082cm" svg:y="9.541cm">
            <text:p/>
            <draw:enhanced-geometry svg:viewBox="0 0 420 301" draw:type="non-primitive" draw:enhanced-path="M 351 214  L 366 214  L 366 210  L 351 210  L 351 214  L 94 178  L 94 21  L 325 21  L 325 178  L 94 178  L 84 188  L 335 188  L 335 10  L 346 10  L 346 0  L 73 0  L 73 199  L 84 199  L 84 188  L 0 290  L 42 290  L 42 276  L 0 276  L 0 290  L 245 300  L 335 300  L 335 293  L 245 293  L 245 300  L 405 282  L 419 282  L 419 276  L 405 276  L 405 282  L 405 296  L 419 296  L 419 290  L 405 290  L 405 296  L 351 214  N"/>
          </draw:custom-shape>
          <draw:line draw:style-name="gr1154" draw:text-style-name="P14" draw:layer="layout" svg:x1="4.257cm" svg:y1="10.472cm" svg:x2="5.656cm" svg:y2="10.472cm">
            <text:p/>
          </draw:line>
          <draw:line draw:style-name="gr1154" draw:text-style-name="P14" draw:layer="layout" svg:x1="4.604cm" svg:y1="10.536cm" svg:x2="4.604cm" svg:y2="10.471cm">
            <text:p/>
          </draw:line>
          <draw:line draw:style-name="gr1154" draw:text-style-name="P14" draw:layer="layout" svg:x1="4.955cm" svg:y1="10.536cm" svg:x2="4.955cm" svg:y2="10.471cm">
            <text:p/>
          </draw:line>
          <draw:custom-shape draw:style-name="gr1158" draw:text-style-name="P277" draw:layer="layout" svg:width="0.703cm" svg:height="1.008cm" svg:x="4.52cm" svg:y="9.273cm">
            <text:list text:style-name="L22">
              <text:list-header>
                <text:p text:style-name="P276"><text:span text:style-name="T60">i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53" draw:text-style-name="P31" draw:layer="layout" svg:width="1.457cm" svg:height="2.055cm" svg:x="17.713cm" svg:y="6.333cm">
            <text:p/>
            <draw:enhanced-geometry svg:viewBox="0 0 349 497" draw:type="non-primitive" draw:enhanced-path="M 0 43  L 0 453  L 1 458  L 5 463  L 11 468  L 20 473  L 31 477  L 44 482  L 59 485  L 75 488  L 93 491  L 113 493  L 132 495  L 153 496  L 174 496  L 195 496  L 216 495  L 236 493  L 255 491  L 273 488  L 289 485  L 304 482  L 317 477  L 328 473  L 336 468  L 343 463  L 346 458  L 348 453  L 348 43  L 346 37  L 343 33  L 336 27  L 328 23  L 317 18  L 304 14  L 289 10  L 273 7  L 255 4  L 236 2  L 216 1  L 195 0  L 174 0  L 153 0  L 132 1  L 113 2  L 93 4  L 75 7  L 59 10  L 44 14  L 31 18  L 20 23  L 11 27  L 5 33  L 1 37  L 0 43  N"/>
          </draw:custom-shape>
          <draw:custom-shape draw:style-name="gr1155" draw:text-style-name="P2" draw:layer="layout" svg:width="1.457cm" svg:height="0.181cm" svg:x="17.713cm" svg:y="6.511cm">
            <text:p/>
            <draw:enhanced-geometry svg:viewBox="0 0 349 44" draw:type="non-primitive" draw:enhanced-path="M 0 0  L 1 5  L 5 10  L 11 16  L 20 20  L 31 25  L 44 29  L 59 32  L 75 35  L 93 38  L 113 41  L 132 42  L 153 43  L 174 43  L 195 43  L 216 42  L 236 41  L 255 38  L 273 35  L 289 32  L 304 29  L 317 25  L 328 20  L 336 16  L 343 10  L 346 5  L 348 0  N"/>
          </draw:custom-shape>
          <draw:custom-shape draw:style-name="gr1159" draw:text-style-name="P277" draw:layer="layout" svg:width="0.669cm" svg:height="0.373cm" svg:x="18cm" svg:y="7.115cm">
            <text:list text:style-name="L22">
              <text:list-header>
                <text:p text:style-name="P276"><text:span text:style-name="T61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160" draw:text-style-name="P14" draw:layer="layout" svg:x1="12.735cm" svg:y1="5.51cm" svg:x2="12.735cm" svg:y2="14.543cm">
            <text:p/>
          </draw:line>
          <draw:line draw:style-name="gr1160" draw:text-style-name="P14" draw:layer="layout" svg:x1="5.269cm" svg:y1="5.51cm" svg:x2="20.205cm" svg:y2="5.51cm">
            <text:p/>
          </draw:line>
          <draw:custom-shape draw:style-name="gr1156" draw:text-style-name="P16" draw:layer="layout" svg:width="1.87cm" svg:height="1.852cm" svg:x="11.282cm" svg:y="15.776cm">
            <text:p/>
            <draw:enhanced-geometry svg:viewBox="0 0 448 448" draw:type="non-primitive" draw:enhanced-path="M 98 293  L 0 293  L 0 447  L 447 447  L 447 293  L 350 293  L 350 272  L 392 272  L 392 0  L 56 0  L 56 272  L 98 272  L 98 293  N"/>
          </draw:custom-shape>
          <draw:line draw:style-name="gr1154" draw:text-style-name="P14" draw:layer="layout" svg:x1="11.691cm" svg:y1="16.987cm" svg:x2="12.743cm" svg:y2="16.987cm">
            <text:p/>
          </draw:line>
          <draw:line draw:style-name="gr1154" draw:text-style-name="P14" draw:layer="layout" svg:x1="11.691cm" svg:y1="16.901cm" svg:x2="12.743cm" svg:y2="16.901cm">
            <text:p/>
          </draw:line>
          <draw:custom-shape draw:style-name="gr1156" draw:text-style-name="P16" draw:layer="layout" svg:width="0.764cm" svg:height="0.525cm" svg:x="12.246cm" svg:y="17.045cm">
            <text:p/>
            <draw:enhanced-geometry svg:viewBox="0 0 183 127" draw:type="non-primitive" draw:enhanced-path="M 0 126  L 147 126  L 147 0  L 0 0  L 0 126  L 161 21  L 182 21  L 182 0  L 161 0  L 161 21  L 0 126  N"/>
          </draw:custom-shape>
          <draw:line draw:style-name="gr1154" draw:text-style-name="P14" draw:layer="layout" svg:x1="12.246cm" svg:y1="17.219cm" svg:x2="12.859cm" svg:y2="17.219cm">
            <text:p/>
          </draw:line>
          <draw:line draw:style-name="gr1154" draw:text-style-name="P14" draw:layer="layout" svg:x1="12.246cm" svg:y1="17.392cm" svg:x2="12.859cm" svg:y2="17.392cm">
            <text:p/>
          </draw:line>
          <draw:line draw:style-name="gr1154" draw:text-style-name="P14" draw:layer="layout" svg:x1="12.275cm" svg:y1="17.306cm" svg:x2="12.826cm" svg:y2="17.306cm">
            <text:p/>
          </draw:line>
          <draw:custom-shape draw:style-name="gr1155" draw:text-style-name="P2" draw:layer="layout" svg:width="0.178cm" svg:height="0.12cm" svg:x="12.597cm" svg:y="17.248cm">
            <text:p/>
            <draw:enhanced-geometry svg:viewBox="0 0 43 29" draw:type="non-primitive" draw:enhanced-path="M 0 28  L 42 28  L 42 0  L 0 0  L 0 28  N"/>
          </draw:custom-shape>
          <draw:custom-shape draw:style-name="gr1157" draw:text-style-name="P35" draw:layer="layout" svg:width="1.753cm" svg:height="1.248cm" svg:x="11.34cm" svg:y="15.904cm">
            <text:p/>
            <draw:enhanced-geometry svg:viewBox="0 0 420 302" draw:type="non-primitive" draw:enhanced-path="M 351 215  L 367 215  L 367 210  L 351 210  L 351 215  L 95 178  L 95 21  L 325 21  L 325 178  L 95 178  L 84 189  L 336 189  L 336 11  L 346 11  L 346 0  L 74 0  L 74 200  L 84 200  L 84 189  L 0 290  L 42 290  L 42 276  L 0 276  L 0 290  L 245 301  L 336 301  L 336 294  L 245 294  L 245 301  L 405 283  L 419 283  L 419 276  L 405 276  L 405 283  L 405 297  L 419 297  L 419 290  L 405 290  L 405 297  L 351 215  N"/>
          </draw:custom-shape>
          <draw:line draw:style-name="gr1154" draw:text-style-name="P14" draw:layer="layout" svg:x1="11.516cm" svg:y1="16.834cm" svg:x2="12.918cm" svg:y2="16.834cm">
            <text:p/>
          </draw:line>
          <draw:line draw:style-name="gr1154" draw:text-style-name="P14" draw:layer="layout" svg:x1="11.866cm" svg:y1="16.9cm" svg:x2="11.866cm" svg:y2="16.834cm">
            <text:p/>
          </draw:line>
          <draw:line draw:style-name="gr1154" draw:text-style-name="P14" draw:layer="layout" svg:x1="12.217cm" svg:y1="16.9cm" svg:x2="12.217cm" svg:y2="16.834cm">
            <text:p/>
          </draw:line>
          <draw:custom-shape draw:style-name="gr1161" draw:text-style-name="P277" draw:layer="layout" svg:width="0.656cm" svg:height="1.008cm" svg:x="11.774cm" svg:y="15.635cm">
            <text:list text:style-name="L22">
              <text:list-header>
                <text:p text:style-name="P276"><text:span text:style-name="T62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56" draw:text-style-name="P16" draw:layer="layout" svg:width="5.194cm" svg:height="1.235cm" svg:x="10.137cm" svg:y="14.135cm">
            <text:p/>
            <draw:enhanced-geometry svg:viewBox="0 0 1244 299" draw:type="non-primitive" draw:enhanced-path="M 183 221  L 197 232  L 213 243  L 231 253  L 251 263  L 272 271  L 294 278  L 318 285  L 343 289  L 369 293  L 395 296  L 421 297  L 449 298  L 475 296  L 502 294  L 527 290  L 553 286  L 576 280  L 600 273  L 621 265  L 643 273  L 666 280  L 690 286  L 715 290  L 741 294  L 767 296  L 794 298  L 821 297  L 847 296  L 873 293  L 899 289  L 924 285  L 948 278  L 971 271  L 992 263  L 1012 253  L 1029 243  L 1045 232  L 1059 221  L 1078 222  L 1097 223  L 1116 222  L 1135 220  L 1153 217  L 1170 213  L 1185 208  L 1200 201  L 1212 194  L 1223 186  L 1231 177  L 1237 168  L 1241 158  L 1243 149  L 1241 139  L 1237 130  L 1231 120  L 1223 112  L 1212 104  L 1200 96  L 1185 90  L 1170 85  L 1153 80  L 1135 77  L 1116 75  L 1097 74  L 1078 75  L 1059 77  L 1045 65  L 1029 54  L 1012 44  L 992 34  L 971 26  L 948 19  L 924 13  L 899 8  L 873 4  L 847 1  L 821 0  L 794 0  L 767 0  L 741 3  L 715 6  L 690 11  L 666 17  L 643 24  L 621 32  L 600 24  L 576 17  L 553 11  L 527 6  L 502 3  L 475 0  L 449 0  L 421 0  L 395 1  L 369 4  L 343 8  L 318 13  L 294 19  L 272 26  L 251 34  L 231 44  L 213 54  L 197 65  L 183 77  L 164 75  L 145 74  L 126 75  L 108 77  L 90 80  L 72 85  L 57 90  L 43 96  L 30 104  L 19 112  L 12 120  L 5 130  L 2 139  L 0 149  L 2 158  L 5 168  L 12 177  L 19 186  L 30 194  L 43 201  L 57 208  L 72 213  L 90 217  L 108 220  L 126 222  L 145 223  L 164 222  L 183 221  N"/>
          </draw:custom-shape>
          <draw:custom-shape draw:style-name="gr1162" draw:text-style-name="P279" draw:layer="layout" svg:width="8.276cm" svg:height="0.67cm" svg:x="0.849cm" svg:y="11.377cm">
            <text:list text:style-name="L5">
              <text:list-header>
                <text:p text:style-name="P278"><text:span text:style-name="T63">Internet desktop with Web Brows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53" draw:text-style-name="P31" draw:layer="layout" svg:width="1.87cm" svg:height="2.468cm" svg:x="13.566cm" svg:y="8.896cm">
            <text:p/>
            <draw:enhanced-geometry svg:viewBox="0 0 448 597" draw:type="non-primitive" draw:enhanced-path="M 0 596  L 0 578  L 111 540  L 111 0  L 335 0  L 335 540  L 447 578  L 447 596  L 0 596  N"/>
          </draw:custom-shape>
          <draw:line draw:style-name="gr1154" draw:text-style-name="P14" draw:layer="layout" svg:x1="14.342cm" svg:y1="9.666cm" svg:x2="14.65cm" svg:y2="9.666cm">
            <text:p/>
          </draw:line>
          <draw:line draw:style-name="gr1154" draw:text-style-name="P14" draw:layer="layout" svg:x1="14.296cm" svg:y1="9.413cm" svg:x2="14.706cm" svg:y2="9.413cm">
            <text:p/>
          </draw:line>
          <draw:custom-shape draw:style-name="gr1155" draw:text-style-name="P2" draw:layer="layout" svg:width="0.701cm" svg:height="1.43cm" svg:x="14.15cm" svg:y="9.012cm">
            <text:p/>
            <draw:enhanced-geometry svg:viewBox="0 0 168 346" draw:type="non-primitive" draw:enhanced-path="M 0 0  L 167 0  L 167 345  L 0 345  L 0 0  N"/>
          </draw:custom-shape>
          <draw:custom-shape draw:style-name="gr1153" draw:text-style-name="P31" draw:layer="layout" svg:width="0.158cm" svg:height="0.07cm" svg:x="14.422cm" svg:y="9.64cm">
            <text:p/>
            <draw:enhanced-geometry svg:viewBox="0 0 38 17" draw:type="non-primitive" draw:enhanced-path="M 0 16  L 37 16  L 37 0  L 0 0  L 0 16  N"/>
          </draw:custom-shape>
          <draw:custom-shape draw:style-name="gr1153" draw:text-style-name="P31" draw:layer="layout" svg:width="0.785cm" svg:height="0.674cm" svg:x="14.109cm" svg:y="10.538cm">
            <text:p/>
            <draw:enhanced-geometry svg:viewBox="0 0 188 163" draw:type="non-primitive" draw:enhanced-path="M 0 100  L 15 100  L 15 0  L 0 0  L 0 100  L 29 100  L 43 100  L 43 0  L 29 0  L 29 100  L 58 100  L 72 100  L 72 0  L 58 0  L 58 100  L 86 100  L 101 100  L 101 0  L 86 0  L 86 100  L 115 100  L 129 100  L 129 0  L 115 0  L 115 100  L 144 100  L 158 100  L 158 0  L 144 0  L 144 100  L 172 100  L 187 100  L 187 0  L 172 0  L 172 100  L 172 162  L 187 162  L 187 112  L 172 112  L 172 162  L 144 162  L 158 162  L 158 112  L 144 112  L 144 162  L 115 162  L 129 162  L 129 112  L 115 112  L 115 162  L 86 162  L 101 162  L 101 112  L 86 112  L 86 162  L 58 162  L 72 162  L 72 112  L 58 112  L 58 162  L 29 162  L 43 162  L 43 112  L 29 112  L 29 162  L 0 162  L 15 162  L 15 112  L 0 112  L 0 162  L 0 100  N"/>
          </draw:custom-shape>
          <draw:custom-shape draw:style-name="gr1155" draw:text-style-name="P2" draw:layer="layout" svg:width="0.601cm" svg:height="0.21cm" svg:x="14.2cm" svg:y="9.05cm">
            <text:p/>
            <draw:enhanced-geometry svg:viewBox="0 0 144 51" draw:type="non-primitive" draw:enhanced-path="M 0 0  L 0 50  L 143 50  L 143 0  L 0 0  N"/>
          </draw:custom-shape>
          <draw:custom-shape draw:style-name="gr1155" draw:text-style-name="P2" draw:layer="layout" svg:width="0.601cm" svg:height="0.07cm" svg:x="14.2cm" svg:y="9.05cm">
            <text:p/>
            <draw:enhanced-geometry svg:viewBox="0 0 144 17" draw:type="non-primitive" draw:enhanced-path="M 0 0  L 14 16  L 128 16  L 143 0  N"/>
          </draw:custom-shape>
          <draw:custom-shape draw:style-name="gr1155" draw:text-style-name="P2" draw:layer="layout" svg:width="0.601cm" svg:height="0.21cm" svg:x="14.2cm" svg:y="9.306cm">
            <text:p/>
            <draw:enhanced-geometry svg:viewBox="0 0 144 51" draw:type="non-primitive" draw:enhanced-path="M 0 50  L 143 50  L 143 0  L 0 0  L 0 50  N"/>
          </draw:custom-shape>
          <draw:custom-shape draw:style-name="gr1155" draw:text-style-name="P2" draw:layer="layout" svg:width="0.601cm" svg:height="0.206cm" svg:x="14.2cm" svg:y="9.566cm">
            <text:p/>
            <draw:enhanced-geometry svg:viewBox="0 0 144 50" draw:type="non-primitive" draw:enhanced-path="M 0 49  L 143 49  L 143 0  L 0 0  L 0 49  N"/>
          </draw:custom-shape>
          <draw:custom-shape draw:style-name="gr1155" draw:text-style-name="P2" draw:layer="layout" svg:width="0.601cm" svg:height="0.21cm" svg:x="14.2cm" svg:y="9.822cm">
            <text:p/>
            <draw:enhanced-geometry svg:viewBox="0 0 144 51" draw:type="non-primitive" draw:enhanced-path="M 0 50  L 143 50  L 143 0  L 0 0  L 0 50  N"/>
          </draw:custom-shape>
          <draw:custom-shape draw:style-name="gr1155" draw:text-style-name="P2" draw:layer="layout" svg:width="0.601cm" svg:height="0.206cm" svg:x="14.2cm" svg:y="10.079cm">
            <text:p/>
            <draw:enhanced-geometry svg:viewBox="0 0 144 50" draw:type="non-primitive" draw:enhanced-path="M 0 49  L 143 49  L 143 0  L 0 0  L 0 49  N"/>
          </draw:custom-shape>
          <draw:line draw:style-name="gr1154" draw:text-style-name="P14" draw:layer="layout" svg:x1="14.2cm" svg:y1="9.255cm" svg:x2="14.258cm" svg:y2="9.103cm">
            <text:p/>
          </draw:line>
          <draw:line draw:style-name="gr1154" draw:text-style-name="P14" draw:layer="layout" svg:x1="14.734cm" svg:y1="9.103cm" svg:x2="14.797cm" svg:y2="9.255cm">
            <text:p/>
          </draw:line>
          <draw:line draw:style-name="gr1154" draw:text-style-name="P14" draw:layer="layout" svg:x1="14.234cm" svg:y1="10cm" svg:x2="14.618cm" svg:y2="10cm">
            <text:p/>
          </draw:line>
          <draw:line draw:style-name="gr1154" draw:text-style-name="P14" draw:layer="layout" svg:x1="14.234cm" svg:y1="9.963cm" svg:x2="14.618cm" svg:y2="9.963cm">
            <text:p/>
          </draw:line>
          <draw:line draw:style-name="gr1154" draw:text-style-name="P14" draw:layer="layout" svg:x1="14.234cm" svg:y1="9.922cm" svg:x2="14.618cm" svg:y2="9.922cm">
            <text:p/>
          </draw:line>
          <draw:line draw:style-name="gr1154" draw:text-style-name="P14" draw:layer="layout" svg:x1="14.234cm" svg:y1="9.884cm" svg:x2="14.618cm" svg:y2="9.884cm">
            <text:p/>
          </draw:line>
          <draw:line draw:style-name="gr1154" draw:text-style-name="P14" draw:layer="layout" svg:x1="14.234cm" svg:y1="9.848cm" svg:x2="14.618cm" svg:y2="9.848cm">
            <text:p/>
          </draw:line>
          <draw:custom-shape draw:style-name="gr1155" draw:text-style-name="P2" draw:layer="layout" svg:width="0.183cm" svg:height="0.107cm" svg:x="14.497cm" svg:y="9.359cm">
            <text:p/>
            <draw:enhanced-geometry svg:viewBox="0 0 44 26" draw:type="non-primitive" draw:enhanced-path="M 0 25  L 43 25  L 43 0  L 0 0  L 0 25  N"/>
          </draw:custom-shape>
          <draw:custom-shape draw:style-name="gr1155" draw:text-style-name="P2" draw:layer="layout" svg:width="0.1cm" svg:height="0.07cm" svg:x="14.66cm" svg:y="9.707cm">
            <text:p/>
            <draw:enhanced-geometry svg:viewBox="0 0 24 17" draw:type="non-primitive" draw:enhanced-path="M 0 16  L 23 16  L 23 0  L 0 0  L 0 16  N"/>
          </draw:custom-shape>
          <draw:custom-shape draw:style-name="gr1155" draw:text-style-name="P2" draw:layer="layout" svg:width="0.1cm" svg:height="0.07cm" svg:x="14.66cm" svg:y="9.848cm">
            <text:p/>
            <draw:enhanced-geometry svg:viewBox="0 0 24 17" draw:type="non-primitive" draw:enhanced-path="M 0 16  L 23 16  L 23 0  L 0 0  L 0 16  N"/>
          </draw:custom-shape>
          <draw:custom-shape draw:style-name="gr1155" draw:text-style-name="P2" draw:layer="layout" svg:width="0.1cm" svg:height="0.07cm" svg:x="14.66cm" svg:y="9.901cm">
            <text:p/>
            <draw:enhanced-geometry svg:viewBox="0 0 24 17" draw:type="non-primitive" draw:enhanced-path="M 0 16  L 23 16  L 23 0  L 0 0  L 0 16  N"/>
          </draw:custom-shape>
          <draw:custom-shape draw:style-name="gr1153" draw:text-style-name="P31" draw:layer="layout" svg:width="1.866cm" svg:height="2.467cm" svg:x="8.38cm" svg:y="10.848cm">
            <text:p/>
            <draw:enhanced-geometry svg:viewBox="0 0 447 597" draw:type="non-primitive" draw:enhanced-path="M 0 596  L 0 578  L 111 540  L 111 0  L 335 0  L 335 540  L 446 578  L 446 596  L 0 596  N"/>
          </draw:custom-shape>
          <draw:line draw:style-name="gr1154" draw:text-style-name="P14" draw:layer="layout" svg:x1="8.843cm" svg:y1="13.08cm" svg:x2="8.843cm" svg:y2="13.311cm">
            <text:p/>
          </draw:line>
          <draw:line draw:style-name="gr1154" draw:text-style-name="P14" draw:layer="layout" svg:x1="9.783cm" svg:y1="13.08cm" svg:x2="9.783cm" svg:y2="13.311cm">
            <text:p/>
          </draw:line>
          <draw:line draw:style-name="gr1154" draw:text-style-name="P14" draw:layer="layout" svg:x1="9.156cm" svg:y1="11.617cm" svg:x2="9.469cm" svg:y2="11.617cm">
            <text:p/>
          </draw:line>
          <draw:line draw:style-name="gr1154" draw:text-style-name="P14" draw:layer="layout" svg:x1="9.106cm" svg:y1="11.361cm" svg:x2="9.519cm" svg:y2="11.361cm">
            <text:p/>
          </draw:line>
          <draw:custom-shape draw:style-name="gr1155" draw:text-style-name="P2" draw:layer="layout" svg:width="0.701cm" svg:height="1.426cm" svg:x="8.96cm" svg:y="10.963cm">
            <text:p/>
            <draw:enhanced-geometry svg:viewBox="0 0 168 345" draw:type="non-primitive" draw:enhanced-path="M 0 0  L 167 0  L 167 344  L 0 344  L 0 0  N"/>
          </draw:custom-shape>
          <draw:custom-shape draw:style-name="gr1153" draw:text-style-name="P31" draw:layer="layout" svg:width="0.154cm" svg:height="0.07cm" svg:x="9.236cm" svg:y="11.592cm">
            <text:p/>
            <draw:enhanced-geometry svg:viewBox="0 0 37 17" draw:type="non-primitive" draw:enhanced-path="M 0 16  L 36 16  L 36 0  L 0 0  L 0 16  N"/>
          </draw:custom-shape>
          <draw:custom-shape draw:style-name="gr1153" draw:text-style-name="P31" draw:layer="layout" svg:width="0.781cm" svg:height="0.665cm" svg:x="8.922cm" svg:y="12.493cm">
            <text:p/>
            <draw:enhanced-geometry svg:viewBox="0 0 187 161" draw:type="non-primitive" draw:enhanced-path="M 0 99  L 14 99  L 14 0  L 0 0  L 0 99  L 28 99  L 42 99  L 42 0  L 28 0  L 28 99  L 57 99  L 71 99  L 71 0  L 57 0  L 57 99  L 85 99  L 100 99  L 100 0  L 85 0  L 85 99  L 114 99  L 128 99  L 128 0  L 114 0  L 114 99  L 143 99  L 157 99  L 157 0  L 143 0  L 143 99  L 171 99  L 186 99  L 186 0  L 171 0  L 171 99  L 171 160  L 186 160  L 186 111  L 171 111  L 171 160  L 143 160  L 157 160  L 157 111  L 143 111  L 143 160  L 114 160  L 128 160  L 128 111  L 114 111  L 114 160  L 85 160  L 100 160  L 100 111  L 85 111  L 85 160  L 57 160  L 71 160  L 71 111  L 57 111  L 57 160  L 28 160  L 42 160  L 42 111  L 28 111  L 28 160  L 0 160  L 14 160  L 14 111  L 0 111  L 0 160  L 0 99  N"/>
          </draw:custom-shape>
          <draw:custom-shape draw:style-name="gr1155" draw:text-style-name="P2" draw:layer="layout" svg:width="0.605cm" svg:height="0.21cm" svg:x="9.01cm" svg:y="11.001cm">
            <text:p/>
            <draw:enhanced-geometry svg:viewBox="0 0 145 51" draw:type="non-primitive" draw:enhanced-path="M 0 0  L 0 50  L 144 50  L 144 0  L 0 0  N"/>
          </draw:custom-shape>
          <draw:custom-shape draw:style-name="gr1155" draw:text-style-name="P2" draw:layer="layout" svg:width="0.605cm" svg:height="0.07cm" svg:x="9.01cm" svg:y="11.001cm">
            <text:p/>
            <draw:enhanced-geometry svg:viewBox="0 0 145 17" draw:type="non-primitive" draw:enhanced-path="M 0 0  L 14 16  L 129 16  L 144 0  N"/>
          </draw:custom-shape>
          <draw:custom-shape draw:style-name="gr1155" draw:text-style-name="P2" draw:layer="layout" svg:width="0.605cm" svg:height="0.206cm" svg:x="9.01cm" svg:y="11.261cm">
            <text:p/>
            <draw:enhanced-geometry svg:viewBox="0 0 145 50" draw:type="non-primitive" draw:enhanced-path="M 0 49  L 144 49  L 144 0  L 0 0  L 0 49  N"/>
          </draw:custom-shape>
          <draw:custom-shape draw:style-name="gr1155" draw:text-style-name="P2" draw:layer="layout" svg:width="0.605cm" svg:height="0.21cm" svg:x="9.01cm" svg:y="11.514cm">
            <text:p/>
            <draw:enhanced-geometry svg:viewBox="0 0 145 51" draw:type="non-primitive" draw:enhanced-path="M 0 50  L 144 50  L 144 0  L 0 0  L 0 50  N"/>
          </draw:custom-shape>
          <draw:custom-shape draw:style-name="gr1155" draw:text-style-name="P2" draw:layer="layout" svg:width="0.605cm" svg:height="0.21cm" svg:x="9.01cm" svg:y="11.77cm">
            <text:p/>
            <draw:enhanced-geometry svg:viewBox="0 0 145 51" draw:type="non-primitive" draw:enhanced-path="M 0 50  L 144 50  L 144 0  L 0 0  L 0 50  N"/>
          </draw:custom-shape>
          <draw:custom-shape draw:style-name="gr1155" draw:text-style-name="P2" draw:layer="layout" svg:width="0.605cm" svg:height="0.206cm" svg:x="9.01cm" svg:y="12.03cm">
            <text:p/>
            <draw:enhanced-geometry svg:viewBox="0 0 145 50" draw:type="non-primitive" draw:enhanced-path="M 0 49  L 144 49  L 144 0  L 0 0  L 0 49  N"/>
          </draw:custom-shape>
          <draw:line draw:style-name="gr1154" draw:text-style-name="P14" draw:layer="layout" svg:x1="9.01cm" svg:y1="11.206cm" svg:x2="9.072cm" svg:y2="11.054cm">
            <text:p/>
          </draw:line>
          <draw:line draw:style-name="gr1154" draw:text-style-name="P14" draw:layer="layout" svg:x1="9.553cm" svg:y1="11.054cm" svg:x2="9.611cm" svg:y2="11.206cm">
            <text:p/>
          </draw:line>
          <draw:line draw:style-name="gr1154" draw:text-style-name="P14" draw:layer="layout" svg:x1="9.043cm" svg:y1="11.951cm" svg:x2="9.427cm" svg:y2="11.951cm">
            <text:p/>
          </draw:line>
          <draw:line draw:style-name="gr1154" draw:text-style-name="P14" draw:layer="layout" svg:x1="9.043cm" svg:y1="11.915cm" svg:x2="9.427cm" svg:y2="11.915cm">
            <text:p/>
          </draw:line>
          <draw:line draw:style-name="gr1154" draw:text-style-name="P14" draw:layer="layout" svg:x1="9.043cm" svg:y1="11.877cm" svg:x2="9.427cm" svg:y2="11.877cm">
            <text:p/>
          </draw:line>
          <draw:line draw:style-name="gr1154" draw:text-style-name="P14" draw:layer="layout" svg:x1="9.043cm" svg:y1="11.836cm" svg:x2="9.427cm" svg:y2="11.836cm">
            <text:p/>
          </draw:line>
          <draw:line draw:style-name="gr1154" draw:text-style-name="P14" draw:layer="layout" svg:x1="9.043cm" svg:y1="11.799cm" svg:x2="9.427cm" svg:y2="11.799cm">
            <text:p/>
          </draw:line>
          <draw:custom-shape draw:style-name="gr1155" draw:text-style-name="P2" draw:layer="layout" svg:width="0.178cm" svg:height="0.111cm" svg:x="9.315cm" svg:y="11.306cm">
            <text:p/>
            <draw:enhanced-geometry svg:viewBox="0 0 43 27" draw:type="non-primitive" draw:enhanced-path="M 0 26  L 42 26  L 42 0  L 0 0  L 0 26  N"/>
          </draw:custom-shape>
          <draw:custom-shape draw:style-name="gr1155" draw:text-style-name="P2" draw:layer="layout" svg:width="0.095cm" svg:height="0.07cm" svg:x="9.478cm" svg:y="11.658cm">
            <text:p/>
            <draw:enhanced-geometry svg:viewBox="0 0 23 17" draw:type="non-primitive" draw:enhanced-path="M 0 16  L 22 16  L 22 0  L 0 0  L 0 16  N"/>
          </draw:custom-shape>
          <draw:custom-shape draw:style-name="gr1155" draw:text-style-name="P2" draw:layer="layout" svg:width="0.095cm" svg:height="0.07cm" svg:x="9.478cm" svg:y="11.799cm">
            <text:p/>
            <draw:enhanced-geometry svg:viewBox="0 0 23 17" draw:type="non-primitive" draw:enhanced-path="M 0 16  L 22 16  L 22 0  L 0 0  L 0 16  N"/>
          </draw:custom-shape>
          <draw:custom-shape draw:style-name="gr1155" draw:text-style-name="P2" draw:layer="layout" svg:width="0.095cm" svg:height="0.07cm" svg:x="9.478cm" svg:y="11.852cm">
            <text:p/>
            <draw:enhanced-geometry svg:viewBox="0 0 23 17" draw:type="non-primitive" draw:enhanced-path="M 0 16  L 22 16  L 22 0  L 0 0  L 0 16  N"/>
          </draw:custom-shape>
          <draw:custom-shape draw:style-name="gr1153" draw:text-style-name="P31" draw:layer="layout" svg:width="1.874cm" svg:height="2.468cm" svg:x="10.033cm" svg:y="5.717cm">
            <text:p/>
            <draw:enhanced-geometry svg:viewBox="0 0 449 597" draw:type="non-primitive" draw:enhanced-path="M 0 596  L 0 577  L 112 539  L 112 0  L 336 0  L 336 539  L 448 577  L 448 596  L 0 596  N"/>
          </draw:custom-shape>
          <draw:line draw:style-name="gr1154" draw:text-style-name="P14" draw:layer="layout" svg:x1="10.504cm" svg:y1="7.945cm" svg:x2="10.504cm" svg:y2="8.181cm">
            <text:p/>
          </draw:line>
          <draw:line draw:style-name="gr1154" draw:text-style-name="P14" draw:layer="layout" svg:x1="11.44cm" svg:y1="7.945cm" svg:x2="11.44cm" svg:y2="8.181cm">
            <text:p/>
          </draw:line>
          <draw:line draw:style-name="gr1154" draw:text-style-name="P14" draw:layer="layout" svg:x1="10.818cm" svg:y1="6.486cm" svg:x2="11.126cm" svg:y2="6.486cm">
            <text:p/>
          </draw:line>
          <draw:line draw:style-name="gr1154" draw:text-style-name="P14" draw:layer="layout" svg:x1="10.764cm" svg:y1="6.229cm" svg:x2="11.181cm" svg:y2="6.229cm">
            <text:p/>
          </draw:line>
          <draw:custom-shape draw:style-name="gr1155" draw:text-style-name="P2" draw:layer="layout" svg:width="0.706cm" svg:height="1.426cm" svg:x="10.617cm" svg:y="5.833cm">
            <text:p/>
            <draw:enhanced-geometry svg:viewBox="0 0 169 345" draw:type="non-primitive" draw:enhanced-path="M 0 0  L 168 0  L 168 344  L 0 344  L 0 0  N"/>
          </draw:custom-shape>
          <draw:custom-shape draw:style-name="gr1153" draw:text-style-name="P31" draw:layer="layout" svg:width="0.166cm" svg:height="0.07cm" svg:x="10.889cm" svg:y="6.461cm">
            <text:p/>
            <draw:enhanced-geometry svg:viewBox="0 0 40 17" draw:type="non-primitive" draw:enhanced-path="M 0 16  L 39 16  L 39 0  L 0 0  L 0 16  N"/>
          </draw:custom-shape>
          <draw:custom-shape draw:style-name="gr1153" draw:text-style-name="P31" draw:layer="layout" svg:width="0.781cm" svg:height="0.669cm" svg:x="10.584cm" svg:y="7.358cm">
            <text:p/>
            <draw:enhanced-geometry svg:viewBox="0 0 187 162" draw:type="non-primitive" draw:enhanced-path="M 0 99  L 14 99  L 14 0  L 0 0  L 0 99  L 29 99  L 43 99  L 43 0  L 29 0  L 29 99  L 57 99  L 71 99  L 71 0  L 57 0  L 57 99  L 86 99  L 100 99  L 100 0  L 86 0  L 86 99  L 114 99  L 129 99  L 129 0  L 114 0  L 114 99  L 143 99  L 157 99  L 157 0  L 143 0  L 143 99  L 172 99  L 186 99  L 186 0  L 172 0  L 172 99  L 172 161  L 186 161  L 186 111  L 172 111  L 172 161  L 143 161  L 157 161  L 157 111  L 143 111  L 143 161  L 114 161  L 129 161  L 129 111  L 114 111  L 114 161  L 86 161  L 100 161  L 100 111  L 86 111  L 86 161  L 57 161  L 71 161  L 71 111  L 57 111  L 57 161  L 29 161  L 43 161  L 43 111  L 29 111  L 29 161  L 0 161  L 14 161  L 14 111  L 0 111  L 0 161  L 0 99  N"/>
          </draw:custom-shape>
          <draw:custom-shape draw:style-name="gr1155" draw:text-style-name="P2" draw:layer="layout" svg:width="0.596cm" svg:height="0.207cm" svg:x="10.672cm" svg:y="5.869cm">
            <text:p/>
            <draw:enhanced-geometry svg:viewBox="0 0 143 50" draw:type="non-primitive" draw:enhanced-path="M 0 0  L 0 49  L 142 49  L 142 0  L 0 0  N"/>
          </draw:custom-shape>
          <draw:custom-shape draw:style-name="gr1155" draw:text-style-name="P2" draw:layer="layout" svg:width="0.596cm" svg:height="0.07cm" svg:x="10.672cm" svg:y="5.869cm">
            <text:p/>
            <draw:enhanced-geometry svg:viewBox="0 0 143 17" draw:type="non-primitive" draw:enhanced-path="M 0 0  L 13 16  L 128 16  L 142 0  N"/>
          </draw:custom-shape>
          <draw:custom-shape draw:style-name="gr1155" draw:text-style-name="P2" draw:layer="layout" svg:width="0.596cm" svg:height="0.21cm" svg:x="10.672cm" svg:y="6.126cm">
            <text:p/>
            <draw:enhanced-geometry svg:viewBox="0 0 143 51" draw:type="non-primitive" draw:enhanced-path="M 0 50  L 142 50  L 142 0  L 0 0  L 0 50  N"/>
          </draw:custom-shape>
          <draw:custom-shape draw:style-name="gr1155" draw:text-style-name="P2" draw:layer="layout" svg:width="0.596cm" svg:height="0.207cm" svg:x="10.672cm" svg:y="6.382cm">
            <text:p/>
            <draw:enhanced-geometry svg:viewBox="0 0 143 50" draw:type="non-primitive" draw:enhanced-path="M 0 49  L 142 49  L 142 0  L 0 0  L 0 49  N"/>
          </draw:custom-shape>
          <draw:custom-shape draw:style-name="gr1155" draw:text-style-name="P2" draw:layer="layout" svg:width="0.596cm" svg:height="0.21cm" svg:x="10.672cm" svg:y="6.639cm">
            <text:p/>
            <draw:enhanced-geometry svg:viewBox="0 0 143 51" draw:type="non-primitive" draw:enhanced-path="M 0 50  L 142 50  L 142 0  L 0 0  L 0 50  N"/>
          </draw:custom-shape>
          <draw:custom-shape draw:style-name="gr1155" draw:text-style-name="P2" draw:layer="layout" svg:width="0.596cm" svg:height="0.21cm" svg:x="10.672cm" svg:y="6.895cm">
            <text:p/>
            <draw:enhanced-geometry svg:viewBox="0 0 143 51" draw:type="non-primitive" draw:enhanced-path="M 0 50  L 142 50  L 142 0  L 0 0  L 0 50  N"/>
          </draw:custom-shape>
          <draw:line draw:style-name="gr1154" draw:text-style-name="P14" draw:layer="layout" svg:x1="10.672cm" svg:y1="6.071cm" svg:x2="10.73cm" svg:y2="5.918cm">
            <text:p/>
          </draw:line>
          <draw:line draw:style-name="gr1154" draw:text-style-name="P14" draw:layer="layout" svg:x1="11.211cm" svg:y1="5.919cm" svg:x2="11.264cm" svg:y2="6.072cm">
            <text:p/>
          </draw:line>
          <draw:line draw:style-name="gr1154" draw:text-style-name="P14" draw:layer="layout" svg:x1="10.701cm" svg:y1="6.821cm" svg:x2="11.089cm" svg:y2="6.821cm">
            <text:p/>
          </draw:line>
          <draw:line draw:style-name="gr1154" draw:text-style-name="P14" draw:layer="layout" svg:x1="10.701cm" svg:y1="6.78cm" svg:x2="11.089cm" svg:y2="6.78cm">
            <text:p/>
          </draw:line>
          <draw:line draw:style-name="gr1154" draw:text-style-name="P14" draw:layer="layout" svg:x1="10.701cm" svg:y1="6.742cm" svg:x2="11.089cm" svg:y2="6.742cm">
            <text:p/>
          </draw:line>
          <draw:line draw:style-name="gr1154" draw:text-style-name="P14" draw:layer="layout" svg:x1="10.701cm" svg:y1="6.705cm" svg:x2="11.089cm" svg:y2="6.705cm">
            <text:p/>
          </draw:line>
          <draw:line draw:style-name="gr1154" draw:text-style-name="P14" draw:layer="layout" svg:x1="10.701cm" svg:y1="6.664cm" svg:x2="11.089cm" svg:y2="6.664cm">
            <text:p/>
          </draw:line>
          <draw:custom-shape draw:style-name="gr1155" draw:text-style-name="P2" draw:layer="layout" svg:width="0.183cm" svg:height="0.106cm" svg:x="10.972cm" svg:y="6.176cm">
            <text:p/>
            <draw:enhanced-geometry svg:viewBox="0 0 44 26" draw:type="non-primitive" draw:enhanced-path="M 0 25  L 43 25  L 43 0  L 0 0  L 0 25  N"/>
          </draw:custom-shape>
          <draw:custom-shape draw:style-name="gr1155" draw:text-style-name="P2" draw:layer="layout" svg:width="0.091cm" svg:height="0.07cm" svg:x="11.135cm" svg:y="6.523cm">
            <text:p/>
            <draw:enhanced-geometry svg:viewBox="0 0 22 17" draw:type="non-primitive" draw:enhanced-path="M 0 16  L 21 16  L 21 0  L 0 0  L 0 16  N"/>
          </draw:custom-shape>
          <draw:custom-shape draw:style-name="gr1155" draw:text-style-name="P2" draw:layer="layout" svg:width="0.091cm" svg:height="0.07cm" svg:x="11.135cm" svg:y="6.664cm">
            <text:p/>
            <draw:enhanced-geometry svg:viewBox="0 0 22 17" draw:type="non-primitive" draw:enhanced-path="M 0 16  L 21 16  L 21 0  L 0 0  L 0 16  N"/>
          </draw:custom-shape>
          <draw:custom-shape draw:style-name="gr1155" draw:text-style-name="P2" draw:layer="layout" svg:width="0.091cm" svg:height="0.07cm" svg:x="11.135cm" svg:y="6.717cm">
            <text:p/>
            <draw:enhanced-geometry svg:viewBox="0 0 22 17" draw:type="non-primitive" draw:enhanced-path="M 0 16  L 21 16  L 21 0  L 0 0  L 0 16  N"/>
          </draw:custom-shape>
          <draw:custom-shape draw:style-name="gr1153" draw:text-style-name="P31" draw:layer="layout" svg:width="1.874cm" svg:height="2.468cm" svg:x="7.236cm" svg:y="6.535cm">
            <text:p/>
            <draw:enhanced-geometry svg:viewBox="0 0 449 597" draw:type="non-primitive" draw:enhanced-path="M 0 596  L 0 578  L 112 540  L 112 0  L 335 0  L 335 540  L 448 578  L 448 596  L 0 596  N"/>
          </draw:custom-shape>
          <draw:line draw:style-name="gr1154" draw:text-style-name="P14" draw:layer="layout" svg:x1="7.707cm" svg:y1="8.768cm" svg:x2="7.707cm" svg:y2="8.999cm">
            <text:p/>
          </draw:line>
          <draw:line draw:style-name="gr1154" draw:text-style-name="P14" draw:layer="layout" svg:x1="8.634cm" svg:y1="8.768cm" svg:x2="8.634cm" svg:y2="8.999cm">
            <text:p/>
          </draw:line>
          <draw:line draw:style-name="gr1154" draw:text-style-name="P14" draw:layer="layout" svg:x1="8.016cm" svg:y1="7.305cm" svg:x2="8.329cm" svg:y2="7.305cm">
            <text:p/>
          </draw:line>
          <draw:line draw:style-name="gr1154" draw:text-style-name="P14" draw:layer="layout" svg:x1="7.962cm" svg:y1="7.048cm" svg:x2="8.379cm" svg:y2="7.048cm">
            <text:p/>
          </draw:line>
          <draw:custom-shape draw:style-name="gr1155" draw:text-style-name="P2" draw:layer="layout" svg:width="0.705cm" svg:height="1.426cm" svg:x="7.82cm" svg:y="6.651cm">
            <text:p/>
            <draw:enhanced-geometry svg:viewBox="0 0 169 345" draw:type="non-primitive" draw:enhanced-path="M 0 0  L 168 0  L 168 344  L 0 344  L 0 0  N"/>
          </draw:custom-shape>
          <draw:custom-shape draw:style-name="gr1153" draw:text-style-name="P31" draw:layer="layout" svg:width="0.162cm" svg:height="0.07cm" svg:x="8.092cm" svg:y="7.28cm">
            <text:p/>
            <draw:enhanced-geometry svg:viewBox="0 0 39 17" draw:type="non-primitive" draw:enhanced-path="M 0 16  L 38 16  L 38 0  L 0 0  L 0 16  N"/>
          </draw:custom-shape>
          <draw:custom-shape draw:style-name="gr1153" draw:text-style-name="P31" draw:layer="layout" svg:width="0.785cm" svg:height="0.669cm" svg:x="7.778cm" svg:y="8.181cm">
            <text:p/>
            <draw:enhanced-geometry svg:viewBox="0 0 188 162" draw:type="non-primitive" draw:enhanced-path="M 0 99  L 14 99  L 14 0  L 0 0  L 0 99  L 29 99  L 43 99  L 43 0  L 29 0  L 29 99  L 57 99  L 72 99  L 72 0  L 57 0  L 57 99  L 86 99  L 100 99  L 100 0  L 86 0  L 86 99  L 115 99  L 129 99  L 129 0  L 115 0  L 115 99  L 143 99  L 158 99  L 158 0  L 143 0  L 143 99  L 172 99  L 187 99  L 187 0  L 172 0  L 172 99  L 172 161  L 187 161  L 187 111  L 172 111  L 172 161  L 143 161  L 158 161  L 158 111  L 143 111  L 143 161  L 115 161  L 129 161  L 129 111  L 115 111  L 115 161  L 86 161  L 100 161  L 100 111  L 86 111  L 86 161  L 57 161  L 72 161  L 72 111  L 57 111  L 57 161  L 29 161  L 43 161  L 43 111  L 29 111  L 29 161  L 0 161  L 14 161  L 14 111  L 0 111  L 0 161  L 0 99  N"/>
          </draw:custom-shape>
          <draw:custom-shape draw:style-name="gr1155" draw:text-style-name="P2" draw:layer="layout" svg:width="0.597cm" svg:height="0.21cm" svg:x="7.874cm" svg:y="6.689cm">
            <text:p/>
            <draw:enhanced-geometry svg:viewBox="0 0 143 51" draw:type="non-primitive" draw:enhanced-path="M 0 0  L 0 50  L 142 50  L 142 0  L 0 0  N"/>
          </draw:custom-shape>
          <draw:custom-shape draw:style-name="gr1155" draw:text-style-name="P2" draw:layer="layout" svg:width="0.597cm" svg:height="0.07cm" svg:x="7.874cm" svg:y="6.689cm">
            <text:p/>
            <draw:enhanced-geometry svg:viewBox="0 0 143 17" draw:type="non-primitive" draw:enhanced-path="M 0 0  L 13 16  L 128 16  L 142 0  N"/>
          </draw:custom-shape>
          <draw:custom-shape draw:style-name="gr1155" draw:text-style-name="P2" draw:layer="layout" svg:width="0.597cm" svg:height="0.207cm" svg:x="7.874cm" svg:y="6.949cm">
            <text:p/>
            <draw:enhanced-geometry svg:viewBox="0 0 143 50" draw:type="non-primitive" draw:enhanced-path="M 0 49  L 142 49  L 142 0  L 0 0  L 0 49  N"/>
          </draw:custom-shape>
          <draw:custom-shape draw:style-name="gr1155" draw:text-style-name="P2" draw:layer="layout" svg:width="0.597cm" svg:height="0.21cm" svg:x="7.874cm" svg:y="7.201cm">
            <text:p/>
            <draw:enhanced-geometry svg:viewBox="0 0 143 51" draw:type="non-primitive" draw:enhanced-path="M 0 50  L 142 50  L 142 0  L 0 0  L 0 50  N"/>
          </draw:custom-shape>
          <draw:custom-shape draw:style-name="gr1155" draw:text-style-name="P2" draw:layer="layout" svg:width="0.597cm" svg:height="0.21cm" svg:x="7.874cm" svg:y="7.458cm">
            <text:p/>
            <draw:enhanced-geometry svg:viewBox="0 0 143 51" draw:type="non-primitive" draw:enhanced-path="M 0 50  L 142 50  L 142 0  L 0 0  L 0 50  N"/>
          </draw:custom-shape>
          <draw:custom-shape draw:style-name="gr1155" draw:text-style-name="P2" draw:layer="layout" svg:width="0.597cm" svg:height="0.206cm" svg:x="7.874cm" svg:y="7.718cm">
            <text:p/>
            <draw:enhanced-geometry svg:viewBox="0 0 143 50" draw:type="non-primitive" draw:enhanced-path="M 0 49  L 142 49  L 142 0  L 0 0  L 0 49  N"/>
          </draw:custom-shape>
          <draw:line draw:style-name="gr1154" draw:text-style-name="P14" draw:layer="layout" svg:x1="7.874cm" svg:y1="6.894cm" svg:x2="7.932cm" svg:y2="6.742cm">
            <text:p/>
          </draw:line>
          <draw:line draw:style-name="gr1154" draw:text-style-name="P14" draw:layer="layout" svg:x1="8.413cm" svg:y1="6.742cm" svg:x2="8.466cm" svg:y2="6.894cm">
            <text:p/>
          </draw:line>
          <draw:line draw:style-name="gr1154" draw:text-style-name="P14" draw:layer="layout" svg:x1="7.903cm" svg:y1="7.64cm" svg:x2="8.291cm" svg:y2="7.64cm">
            <text:p/>
          </draw:line>
          <draw:line draw:style-name="gr1154" draw:text-style-name="P14" draw:layer="layout" svg:x1="7.903cm" svg:y1="7.602cm" svg:x2="8.291cm" svg:y2="7.602cm">
            <text:p/>
          </draw:line>
          <draw:line draw:style-name="gr1154" draw:text-style-name="P14" draw:layer="layout" svg:x1="7.903cm" svg:y1="7.565cm" svg:x2="8.291cm" svg:y2="7.565cm">
            <text:p/>
          </draw:line>
          <draw:line draw:style-name="gr1154" draw:text-style-name="P14" draw:layer="layout" svg:x1="7.903cm" svg:y1="7.523cm" svg:x2="8.291cm" svg:y2="7.523cm">
            <text:p/>
          </draw:line>
          <draw:line draw:style-name="gr1154" draw:text-style-name="P14" draw:layer="layout" svg:x1="7.903cm" svg:y1="7.487cm" svg:x2="8.291cm" svg:y2="7.487cm">
            <text:p/>
          </draw:line>
          <draw:custom-shape draw:style-name="gr1155" draw:text-style-name="P2" draw:layer="layout" svg:width="0.183cm" svg:height="0.107cm" svg:x="8.17cm" svg:y="6.998cm">
            <text:p/>
            <draw:enhanced-geometry svg:viewBox="0 0 44 26" draw:type="non-primitive" draw:enhanced-path="M 0 25  L 43 25  L 43 0  L 0 0  L 0 25  N"/>
          </draw:custom-shape>
          <draw:custom-shape draw:style-name="gr1155" draw:text-style-name="P2" draw:layer="layout" svg:width="0.091cm" svg:height="0.07cm" svg:x="8.338cm" svg:y="7.346cm">
            <text:p/>
            <draw:enhanced-geometry svg:viewBox="0 0 22 17" draw:type="non-primitive" draw:enhanced-path="M 0 16  L 21 16  L 21 0  L 0 0  L 0 16  N"/>
          </draw:custom-shape>
          <draw:custom-shape draw:style-name="gr1155" draw:text-style-name="P2" draw:layer="layout" svg:width="0.091cm" svg:height="0.07cm" svg:x="8.338cm" svg:y="7.487cm">
            <text:p/>
            <draw:enhanced-geometry svg:viewBox="0 0 22 17" draw:type="non-primitive" draw:enhanced-path="M 0 16  L 21 16  L 21 0  L 0 0  L 0 16  N"/>
          </draw:custom-shape>
          <draw:custom-shape draw:style-name="gr1155" draw:text-style-name="P2" draw:layer="layout" svg:width="0.091cm" svg:height="0.07cm" svg:x="8.338cm" svg:y="7.54cm">
            <text:p/>
            <draw:enhanced-geometry svg:viewBox="0 0 22 17" draw:type="non-primitive" draw:enhanced-path="M 0 16  L 21 16  L 21 0  L 0 0  L 0 16  N"/>
          </draw:custom-shape>
          <draw:custom-shape draw:style-name="gr1153" draw:text-style-name="P31" draw:layer="layout" svg:width="1.461cm" svg:height="2.054cm" svg:x="19.061cm" svg:y="9.413cm">
            <text:p/>
            <draw:enhanced-geometry svg:viewBox="0 0 350 497" draw:type="non-primitive" draw:enhanced-path="M 0 43  L 0 453  L 2 458  L 5 463  L 11 468  L 20 473  L 31 477  L 44 482  L 58 485  L 75 488  L 93 491  L 112 493  L 133 495  L 153 496  L 174 496  L 195 496  L 215 495  L 235 493  L 255 491  L 272 488  L 289 485  L 304 482  L 317 477  L 328 473  L 337 468  L 343 463  L 347 458  L 349 453  L 349 43  L 347 37  L 343 33  L 337 27  L 328 23  L 317 18  L 304 14  L 289 10  L 272 7  L 255 4  L 235 2  L 215 1  L 195 0  L 174 0  L 153 0  L 133 1  L 112 2  L 93 4  L 75 7  L 58 10  L 44 14  L 31 18  L 20 23  L 11 27  L 5 33  L 2 37  L 0 43  N"/>
          </draw:custom-shape>
          <draw:custom-shape draw:style-name="gr1155" draw:text-style-name="P2" draw:layer="layout" svg:width="1.461cm" svg:height="0.181cm" svg:x="19.061cm" svg:y="9.591cm">
            <text:p/>
            <draw:enhanced-geometry svg:viewBox="0 0 350 44" draw:type="non-primitive" draw:enhanced-path="M 0 0  L 2 5  L 5 10  L 11 16  L 20 20  L 31 25  L 44 29  L 58 32  L 75 35  L 93 38  L 112 41  L 133 42  L 153 43  L 174 43  L 195 43  L 215 42  L 235 41  L 255 38  L 272 35  L 289 32  L 304 29  L 317 25  L 328 20  L 337 16  L 343 10  L 347 5  L 349 0  N"/>
          </draw:custom-shape>
          <draw:custom-shape draw:style-name="gr1163" draw:text-style-name="P277" draw:layer="layout" svg:width="0.669cm" svg:height="0.373cm" svg:x="19.349cm" svg:y="10.194cm">
            <text:list text:style-name="L22">
              <text:list-header>
                <text:p text:style-name="P276"><text:span text:style-name="T61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64" draw:text-style-name="P277" draw:layer="layout" svg:width="3.272cm" svg:height="0.67cm" svg:x="8.14cm" svg:y="13.254cm">
              <text:list text:style-name="L5">
                <text:list-header>
                  <text:p text:style-name="P276"><text:span text:style-name="T63">WWW Serv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52" draw:text-style-name="P2" draw:layer="layout" svg:width="0.484cm" svg:height="0.876cm" svg:x="8.129cm" svg:y="13.638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65" draw:text-style-name="P277" draw:layer="layout" svg:width="3.272cm" svg:height="0.67cm" svg:x="16.459cm" svg:y="15.297cm">
              <text:list text:style-name="L5">
                <text:list-header>
                  <text:p text:style-name="P276"><text:span text:style-name="T63">WWW Serv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52" draw:text-style-name="P2" draw:layer="layout" svg:width="0.483cm" svg:height="0.876cm" svg:x="16.451cm" svg:y="15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66" draw:text-style-name="P277" draw:layer="layout" svg:width="3.835cm" svg:height="0.67cm" svg:x="6.687cm" svg:y="8.921cm">
            <text:list text:style-name="L5">
              <text:list-header>
                <text:p text:style-name="P276"><text:span text:style-name="T63">Distributed We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7" draw:text-style-name="P277" draw:layer="layout" svg:width="4.631cm" svg:height="0.67cm" svg:x="6.337cm" svg:y="9.504cm">
            <text:list text:style-name="L5">
              <text:list-header>
                <text:p text:style-name="P276"><text:span text:style-name="T63">Transaction Engi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8" draw:text-style-name="P281" draw:layer="layout" svg:width="3.45cm" svg:height="1.37cm" svg:x="11.484cm" svg:y="6.713cm">
            <text:list text:style-name="L5">
              <text:list-header>
                <text:p text:style-name="P280"><text:span text:style-name="T64">Consolidated</text:span><text:span text:style-name="T64"><text:line-break/></text:span><text:span text:style-name="T64">Financial Mgt</text:span><text:span text:style-name="T64"><text:line-break/></text:span><text:span text:style-name="T64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style-name="gr4">
            <draw:line draw:style-name="gr1154" draw:text-style-name="P14" draw:layer="layout" svg:x1="14.028cm" svg:y1="11.129cm" svg:x2="14.028cm" svg:y2="11.36cm">
              <text:p/>
            </draw:line>
            <draw:line draw:style-name="gr1154" draw:text-style-name="P14" draw:layer="layout" svg:x1="14.963cm" svg:y1="11.129cm" svg:x2="14.963cm" svg:y2="11.36cm">
              <text:p/>
            </draw:line>
            <draw:custom-shape draw:style-name="gr1169" draw:text-style-name="P283" draw:layer="layout" svg:width="3.835cm" svg:height="0.86cm" svg:x="13.111cm" svg:y="11.063cm">
              <text:list text:style-name="L5">
                <text:list-header>
                  <text:p text:style-name="P282"><text:span text:style-name="T63">Distributed We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170" draw:text-style-name="P277" draw:layer="layout" svg:width="4.631cm" svg:height="0.67cm" svg:x="12.735cm" svg:y="11.782cm">
            <text:list text:style-name="L5">
              <text:list-header>
                <text:p text:style-name="P276"><text:span text:style-name="T63">Transaction Engi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style-name="gr4">
            <draw:line draw:style-name="gr1154" draw:text-style-name="P14" draw:layer="layout" svg:x1="18.472cm" svg:y1="12.695cm" svg:x2="18.534cm" svg:y2="12.847cm">
              <text:p/>
            </draw:line>
            <draw:custom-shape draw:style-name="gr1171" draw:text-style-name="P277" draw:layer="layout" svg:width="3.01cm" svg:height="0.67cm" svg:x="18.651cm" svg:y="11.323cm">
              <text:list text:style-name="L5">
                <text:list-header>
                  <text:p text:style-name="P276"><text:span text:style-name="T65">Order Entry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72" draw:text-style-name="P277" draw:layer="layout" svg:width="1.952cm" svg:height="0.67cm" svg:x="18.975cm" svg:y="11.906cm">
              <text:list text:style-name="L5">
                <text:list-header>
                  <text:p text:style-name="P276"><text:span text:style-name="T65">System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73" draw:text-style-name="P277" draw:layer="layout" svg:width="2.07cm" svg:height="0.67cm" svg:x="19.572cm" svg:y="6.395cm">
              <text:list text:style-name="L5">
                <text:list-header>
                  <text:p text:style-name="P276"><text:span text:style-name="T65">Produc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74" draw:text-style-name="P277" draw:layer="layout" svg:width="2.57cm" svg:height="1.305cm" svg:x="19.461cm" svg:y="6.977cm">
              <text:list text:style-name="L5">
                <text:list-header>
                  <text:p text:style-name="P276"><text:span text:style-name="T65"><text:s/></text:span><text:span text:style-name="T65">Catalog</text:span><text:span text:style-name="T65"><text:line-break/></text:span><text:span text:style-name="T65"> Databa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style-name="gr1154" draw:text-style-name="P14" draw:layer="layout" svg:x1="6.166cm" svg:y1="9.527cm" svg:x2="7.272cm" svg:y2="8.06cm">
            <text:p/>
          </draw:line>
          <draw:custom-shape draw:style-name="gr1175" draw:text-style-name="P35" draw:layer="layout" svg:width="1.248cm" svg:height="1.645cm" svg:x="6.095cm" svg:y="7.974cm">
            <text:p/>
            <draw:enhanced-geometry svg:viewBox="0 0 299 398" draw:type="non-primitive" draw:enhanced-path="M 31 382  L 0 397  L 7 363  L 31 382  L 268 15  L 298 0  L 292 33  L 268 15  L 31 382  N"/>
          </draw:custom-shape>
          <draw:line draw:style-name="gr1160" draw:text-style-name="P14" draw:layer="layout" svg:x1="8.169cm" svg:y1="12.079cm" svg:x2="6.187cm" svg:y2="10.504cm">
            <text:p/>
          </draw:line>
          <draw:custom-shape draw:style-name="gr1176" draw:text-style-name="P35" draw:layer="layout" svg:width="0.142cm" svg:height="0.128cm" svg:x="6.095cm" svg:y="10.438cm">
            <text:p/>
            <draw:enhanced-geometry svg:viewBox="0 0 34 31" draw:type="non-primitive" draw:enhanced-path="M 14 30  L 0 0  L 33 7  L 14 30  N"/>
          </draw:custom-shape>
          <draw:line draw:style-name="gr1160" draw:text-style-name="P14" draw:layer="layout" svg:x1="9.111cm" svg:y1="7.32cm" svg:x2="10.137cm" svg:y2="6.982cm">
            <text:p/>
          </draw:line>
          <draw:custom-shape draw:style-name="gr1176" draw:text-style-name="P35" draw:layer="layout" svg:width="1.244cm" svg:height="0.458cm" svg:x="9.002cm" svg:y="6.924cm">
            <text:p/>
            <draw:enhanced-geometry svg:viewBox="0 0 298 111" draw:type="non-primitive" draw:enhanced-path="M 33 110  L 0 105  L 23 80  L 33 110  L 263 0  L 297 6  L 273 30  L 263 0  L 33 110  N"/>
          </draw:custom-shape>
          <draw:line draw:style-name="gr1160" draw:text-style-name="P14" draw:layer="layout" svg:x1="6.208cm" svg:y1="10.029cm" svg:x2="13.453cm" svg:y2="10.029cm">
            <text:p/>
          </draw:line>
          <draw:custom-shape draw:style-name="gr1175" draw:text-style-name="P35" draw:layer="layout" svg:width="7.474cm" svg:height="0.132cm" svg:x="6.095cm" svg:y="9.963cm">
            <text:p/>
            <draw:enhanced-geometry svg:viewBox="0 0 1790 32" draw:type="non-primitive" draw:enhanced-path="M 31 31  L 0 16  L 31 0  L 31 31  L 1758 0  L 1789 16  L 1758 31  L 1758 0  L 31 31  N"/>
          </draw:custom-shape>
          <draw:line draw:style-name="gr1160" draw:text-style-name="P14" draw:layer="layout" svg:x1="17.501cm" svg:y1="7.565cm" svg:x2="15.306cm" svg:y2="9.541cm">
            <text:p/>
          </draw:line>
          <draw:custom-shape draw:style-name="gr1176" draw:text-style-name="P35" draw:layer="layout" svg:width="0.142cm" svg:height="0.135cm" svg:x="15.223cm" svg:y="9.484cm">
            <text:p/>
            <draw:enhanced-geometry svg:viewBox="0 0 34 33" draw:type="non-primitive" draw:enhanced-path="M 33 23  L 0 32  L 12 0  L 33 23  N"/>
          </draw:custom-shape>
          <draw:line draw:style-name="gr1160" draw:text-style-name="P14" draw:layer="layout" svg:x1="18.746cm" svg:y1="10.437cm" svg:x2="15.331cm" svg:y2="10.036cm">
            <text:p/>
          </draw:line>
          <draw:custom-shape draw:style-name="gr1176" draw:text-style-name="P35" draw:layer="layout" svg:width="0.142cm" svg:height="0.127cm" svg:x="15.223cm" svg:y="9.98cm">
            <text:p/>
            <draw:enhanced-geometry svg:viewBox="0 0 34 31" draw:type="non-primitive" draw:enhanced-path="M 28 30  L 0 12  L 33 0  L 28 30  N"/>
          </draw:custom-shape>
          <draw:line draw:style-name="gr1160" draw:text-style-name="P14" draw:layer="layout" svg:x1="17.399cm" svg:y1="13.722cm" svg:x2="12.731cm" svg:y2="15.532cm">
            <text:p/>
          </draw:line>
          <draw:custom-shape draw:style-name="gr1176" draw:text-style-name="P35" draw:layer="layout" svg:width="0.149cm" svg:height="0.12cm" svg:x="12.526cm" svg:y="15.465cm">
            <text:p/>
            <draw:enhanced-geometry svg:viewBox="0 0 36 29" draw:type="non-primitive" draw:enhanced-path="M 35 28  L 0 25  L 23 0  L 35 28  N"/>
          </draw:custom-shape>
          <draw:custom-shape draw:style-name="gr1177" draw:text-style-name="P277" draw:layer="layout" svg:width="1.774cm" svg:height="0.67cm" svg:x="8.496cm" svg:y="6.056cm">
            <text:list text:style-name="L5">
              <text:list-header>
                <text:p text:style-name="P276"><text:span text:style-name="T65">TCP/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78" draw:text-style-name="P277" draw:layer="layout" svg:width="1.452cm" svg:height="0.67cm" svg:x="7.108cm" svg:y="10.752cm">
            <text:list text:style-name="L5">
              <text:list-header>
                <text:p text:style-name="P276"><text:span text:style-name="T65">HTT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79" draw:text-style-name="P277" draw:layer="layout" svg:width="1.452cm" svg:height="0.67cm" svg:x="15.159cm" svg:y="14.436cm">
            <text:list text:style-name="L5">
              <text:list-header>
                <text:p text:style-name="P276"><text:span text:style-name="T65">HTT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80" draw:text-style-name="P277" draw:layer="layout" svg:width="1.774cm" svg:height="0.67cm" svg:x="4.959cm" svg:y="7.88cm">
            <text:list text:style-name="L5">
              <text:list-header>
                <text:p text:style-name="P276"><text:span text:style-name="T65">TCP/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81" draw:text-style-name="P277" draw:layer="layout" svg:width="1.774cm" svg:height="0.67cm" svg:x="10.357cm" svg:y="10.331cm">
            <text:list text:style-name="L5">
              <text:list-header>
                <text:p text:style-name="P276"><text:span text:style-name="T65">TCP/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82" draw:text-style-name="P277" draw:layer="layout" svg:width="3.785cm" svg:height="0.839cm" svg:x="6.372cm" svg:y="4.03cm">
              <text:list text:style-name="L5">
                <text:list-header>
                  <text:p text:style-name="P276"><text:span text:style-name="T66">Company A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83" draw:text-style-name="P277" draw:layer="layout" svg:width="4.305cm" svg:height="0.839cm" svg:x="6.215cm" svg:y="4.732cm">
              <text:list text:style-name="L5">
                <text:list-header>
                  <text:p text:style-name="P276"><text:span text:style-name="T66">Manufactur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84" draw:text-style-name="P285" draw:layer="layout" svg:width="3.785cm" svg:height="0.919cm" svg:x="15.084cm" svg:y="4.022cm">
              <text:list text:style-name="L5">
                <text:list-header>
                  <text:p text:style-name="P284"><text:span text:style-name="T66">Company 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85" draw:text-style-name="P285" draw:layer="layout" svg:width="2.747cm" svg:height="0.919cm" svg:x="15.404cm" svg:y="4.712cm">
              <text:list text:style-name="L5">
                <text:list-header>
                  <text:p text:style-name="P284"><text:span text:style-name="T66">Suppli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style-name="gr1154" draw:text-style-name="P14" draw:layer="layout" svg:x1="14.338cm" svg:y1="12.58cm" svg:x2="12.384cm" svg:y2="15.478cm">
            <text:p/>
          </draw:line>
          <draw:custom-shape draw:style-name="gr1175" draw:text-style-name="P35" draw:layer="layout" svg:width="2.079cm" svg:height="3.079cm" svg:x="12.317cm" svg:y="12.493cm">
            <text:p/>
            <draw:enhanced-geometry svg:viewBox="0 0 498 745" draw:type="non-primitive" draw:enhanced-path="M 468 16  L 497 0  L 493 33  L 468 16  L 30 727  L 0 744  L 5 711  L 30 727  L 468 16  N"/>
          </draw:custom-shape>
          <draw:custom-shape draw:style-name="gr1186" draw:text-style-name="P277" draw:layer="layout" svg:width="1.774cm" svg:height="0.67cm" svg:x="13.802cm" svg:y="12.824cm">
            <text:list text:style-name="L5">
              <text:list-header>
                <text:p text:style-name="P276"><text:span text:style-name="T65">TCP/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87" draw:text-style-name="P279" draw:layer="layout" svg:width="8.276cm" svg:height="0.67cm" svg:x="4.155cm" svg:y="15.942cm">
            <text:list text:style-name="L5">
              <text:list-header>
                <text:p text:style-name="P278"><text:span text:style-name="T63">Internet desktop with Web Brows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88" draw:text-style-name="P285" draw:layer="layout" svg:width="4.34cm" svg:height="0.919cm" svg:x="12.94cm" svg:y="16.723cm">
              <text:list text:style-name="L5">
                <text:list-header>
                  <text:p text:style-name="P284"><text:span text:style-name="T66"><text:s text:c="3"/></text:span><text:span text:style-name="T66">Company 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89" draw:text-style-name="P285" draw:layer="layout" svg:width="5.05cm" svg:height="0.919cm" svg:x="13.268cm" svg:y="17.412cm">
              <text:list text:style-name="L5">
                <text:list-header>
                  <text:p text:style-name="P284"><text:span text:style-name="T66">Trading Partn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190" draw:text-style-name="P287" draw:layer="layout" svg:width="1.88cm" svg:height="0.67cm" svg:x="15.378cm" svg:y="13.101cm">
            <text:list text:style-name="L3">
              <text:list-header>
                <text:p text:style-name="P286"><text:span text:style-name="T67">Launc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0" draw:text-style-name="P287" draw:layer="layout" svg:width="2.201cm" svg:height="0.67cm" svg:x="11.525cm" svg:y="12.704cm">
            <text:list text:style-name="L3">
              <text:list-header>
                <text:p text:style-name="P286"><text:span text:style-name="T67">Transa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0" draw:text-style-name="P287" draw:layer="layout" svg:width="1.88cm" svg:height="0.67cm" svg:x="6.358cm" svg:y="12.109cm">
            <text:list text:style-name="L3">
              <text:list-header>
                <text:p text:style-name="P286"><text:span text:style-name="T67">Launc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0" draw:text-style-name="P287" draw:layer="layout" svg:width="2.201cm" svg:height="0.67cm" svg:x="11.12cm" svg:y="8.735cm">
            <text:list text:style-name="L3">
              <text:list-header>
                <text:p text:style-name="P286"><text:span text:style-name="T67">Transa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0" draw:text-style-name="P287" draw:layer="layout" svg:width="2.201cm" svg:height="0.67cm" svg:x="5.312cm" svg:y="6.949cm">
            <text:list text:style-name="L3">
              <text:list-header>
                <text:p text:style-name="P286"><text:span text:style-name="T67">Transac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<text:span text:style-name="T5">Virtual Internet Computing: </text:span><text:span text:style-name="T5"><text:line-break/></text:span><text:span text:style-name="T5">Reality is Complex, Multi-Company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fadeOverColor" smil:fadeColor="#000000"/>
          </anim:par>
        </anim:par>
        <presentation:notes draw:style-name="dp3">
          <draw:frame draw:style-name="gr1149" draw:text-style-name="P275" draw:layer="layout" svg:width="8.255cm" svg:height="1.27cm" svg:x="10.794cm" svg:y="24.13cm">
            <draw:text-box>
              <text:list text:style-name="L9">
                <text:list-header>
                  <text:p text:style-name="P24"><text:span text:style-name="T18"><text:page-number>&lt;number&gt;</text:page-number></text:span></text:p>
                </text:list-header>
              </text:list>
            </draw:text-box>
          </draw:frame>
          <draw:frame draw:style-name="gr1149" draw:text-style-name="P275" draw:layer="layout" svg:width="8.255cm" svg:height="1.27cm" svg:x="-0.001cm" svg:y="24.13cm">
            <draw:text-box>
              <text:list text:style-name="L9">
                <text:list-header>
                  <text:p text:style-name="P1"><text:span text:style-name="T18"><presentation:footer/></text:span></text:p>
                </text:list-header>
              </text:list>
            </draw:text-box>
          </draw:frame>
          <draw:frame draw:style-name="gr1150" draw:text-style-name="P275" draw:layer="layout" svg:width="8.255cm" svg:height="1.27cm" svg:x="-0.001cm" svg:y="0cm">
            <draw:text-box>
              <text:list text:style-name="L9">
                <text:list-header>
                  <text:p text:style-name="P1"><text:span text:style-name="T18"><presentation:header/></text:span></text:p>
                </text:list-header>
              </text:list>
            </draw:text-box>
          </draw:frame>
          <draw:frame draw:style-name="gr1150" draw:text-style-name="P275" draw:layer="layout" svg:width="8.255cm" svg:height="1.27cm" svg:x="10.794cm" svg:y="0cm">
            <draw:text-box>
              <text:list text:style-name="L9">
                <text:list-header>
                  <text:p text:style-name="P24"><text:span text:style-name="T18"><presentation:date-time/></text:span></text:p>
                </text:list-header>
              </text:list>
            </draw:text-box>
          </draw:frame>
          <draw:page-thumbnail draw:style-name="gr1" draw:layer="layout" svg:width="12.656cm" svg:height="9.49cm" svg:x="3.197cm" svg:y="1.896cm" draw:page-number="16" presentation:class="page"/>
          <draw:frame presentation:style-name="pr14" draw:text-style-name="P275" draw:layer="layout" svg:width="13.97cm" svg:height="11.434cm" svg:x="2.54cm" svg:y="12.061cm" presentation:class="notes" presentation:user-transformed="true">
            <draw:text-box>
              <text:list text:style-name="L3">
                <text:list-header>
                  <text:p text:style-name="P4"><text:span text:style-name="T3">But to you who have to implement Internet supply chains, it’s a complex infrastructure at best. <text:s/>It starts with the hard wall between your company and your supplier’s. <text:s/>Security issues are rampant. <text:s/>Once those are solved, we get to data access and control, queries versus transactions, real time versus queued, etc.</text:span></text:p>
                  <text:p text:style-name="P4"><text:span text:style-name="T3">The key to this puzzle is to throw out the notion that you can dictate to your suppliers exactly the IT infrastructure they can use. <text:s/>Here you need an architecture, the pragmatic use of standards, a secure boundary to your enterprise, and lastly a flexible infrastructure that can roll with the unforeseen punches we will undoubtedly get thrown in the next decade.</text:span></text:p>
                </text:list-header>
              </text:list>
            </draw:text-box>
          </draw:frame>
        </presentation:notes>
      </draw:page>
      <draw:page draw:name="Building a Common Infrastructure: Management Options" draw:style-name="dp1" draw:master-page-name="Default" presentation:presentation-page-layout-name="AL2T1" xml:id="id17" draw:id="id17">
        <draw:frame presentation:style-name="pr4" draw:text-style-name="P2" draw:layer="layout" svg:width="24.342cm" svg:height="3.175cm" svg:x="1.058cm" svg:y="-0.001cm" presentation:class="title" presentation:user-transformed="true">
          <draw:text-box>
            <text:list text:style-name="L1">
              <text:list-header>
                <text:p text:style-name="P1"><text:span text:style-name="T68">Building a Common Infrastructure:</text:span><text:span text:style-name="T68"><text:line-break/></text:span><text:span text:style-name="T68">Management Options</text:span>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Do nothing</text:p>
              </text:list-item>
              <text:list-item>
                <text:p text:style-name="P6">Outsource</text:p>
              </text:list-item>
              <text:list-item>
                <text:p text:style-name="P6">Standards-based</text:p>
              </text:list-item>
              <text:list-item>
                <text:p text:style-name="P6">Architecture</text:p>
              </text:list-item>
              <text:list-item>
                <text:p text:style-name="P6">Vendor-based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So, those were the six infrastructure fragmentation issues that will challenge you in the coming years.</text:span></text:p>
                  <text:p text:style-name="P4"><text:span text:style-name="T3">What are we going to do about this infrastructure crisis?</text:span></text:p>
                  <text:p text:style-name="P4"><text:span text:style-name="T3">Let’s evaluate five management approaches that you can implement.</text:span></text:p>
                </text:list-header>
              </text:list>
            </draw:text-box>
          </draw:frame>
        </presentation:notes>
      </draw:page>
      <draw:page draw:name="Do Nothing" draw:style-name="dp1" draw:master-page-name="Default" presentation:presentation-page-layout-name="AL2T1" xml:id="id18" draw:id="id18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Do Nothing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<text:span text:style-name="T19">Take no active steps to build a manageable common IM and EM infrastructure</text:span></text:p>
              </text:list-item>
              <text:list-item>
                <text:p text:style-name="P6">Benefits</text:p>
              </text:list-item>
            </text:list>
            <text:list text:style-name="L21">
              <text:list-item>
                <text:list>
                  <text:list-item>
                    <text:p text:style-name="P39">Just keep on doing what you’re doing</text:p>
                  </text:list-item>
                </text:list>
              </text:list-item>
            </text:list>
            <text:list text:style-name="L4">
              <text:list-item>
                <text:p text:style-name="P6">Implications</text:p>
              </text:list-item>
            </text:list>
            <text:list text:style-name="L21">
              <text:list-item>
                <text:list>
                  <text:list-item>
                    <text:p text:style-name="P39">Fragmentation gets worse</text:p>
                  </text:list-item>
                  <text:list-item>
                    <text:p text:style-name="P39">Ability to disentangle and react diminishes</text:p>
                  </text:list-item>
                  <text:list-item>
                    <text:p text:style-name="P39">If you buy this, today’s speakers have failed abjectly!</text:p>
                  </text:list-item>
                </text:list>
              </text:list-item>
            </text:list>
            <text:list text:style-name="L4">
              <text:list-header>
                <text:p text:style-name="P6"/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Doing nothing is inertia. <text:s/>It’s hiding your head in the sand. <text:s/>It will delay but not solve any problems.</text:span></text:p>
                </text:list-header>
              </text:list>
            </draw:text-box>
          </draw:frame>
        </presentation:notes>
      </draw:page>
      <draw:page draw:name="Outsource" draw:style-name="dp1" draw:master-page-name="Default" presentation:presentation-page-layout-name="AL2T1" xml:id="id19" draw:id="id19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Outsource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<text:span text:style-name="T19">Outside service provider handles IT services</text:span></text:p>
              </text:list-item>
              <text:list-item>
                <text:p text:style-name="P6">Benefits</text:p>
              </text:list-item>
            </text:list>
            <text:list text:style-name="L21">
              <text:list-item>
                <text:list>
                  <text:list-item>
                    <text:p text:style-name="P288">Provider assumes future-shock risks</text:p>
                  </text:list-item>
                  <text:list-item>
                    <text:p text:style-name="P288">Establishes cost-for-service basis</text:p>
                  </text:list-item>
                  <text:list-item>
                    <text:p text:style-name="P288">One direction for finger pointing</text:p>
                  </text:list-item>
                </text:list>
              </text:list-item>
            </text:list>
            <text:list text:style-name="L4">
              <text:list-item>
                <text:p text:style-name="P6">Implications</text:p>
              </text:list-item>
            </text:list>
            <text:list text:style-name="L21">
              <text:list-item>
                <text:list>
                  <text:list-item>
                    <text:p text:style-name="P288">Will provider upgrade your technology base fast enough?</text:p>
                  </text:list-item>
                  <text:list-item>
                    <text:p text:style-name="P288">What key IS skills will atrophy?</text:p>
                  </text:list-item>
                  <text:list-item>
                    <text:p text:style-name="P288">Best suited for targeted cost-benefits (e.g., telecomm, “out-tasking”)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We could do a whole hour on outsourcing issues …</text:span></text:p>
                  <text:p text:style-name="P4"><text:span text:style-name="T3">Here, you sell your problems to somebody else. <text:s/>They take the technology risk, and you get on vendor to call on the carpet.</text:span></text:p>
                  <text:p text:style-name="P4"><text:span text:style-name="T3">The risks are hidden in your contract. <text:s/>Will the outsourcer upgrade your technology base? <text:s/></text:span></text:p>
                  <text:p text:style-name="P4"><text:span text:style-name="T3">Will the programmer/analysts who know your business processes inside out now work for someone else?</text:span></text:p>
                  <text:p text:style-name="P4"><text:span text:style-name="T3">Aberdeen’s take is that outsourcing makes sense for a growing list of specific situations.</text:span></text:p>
                </text:list-header>
              </text:list>
            </draw:text-box>
          </draw:frame>
        </presentation:notes>
      </draw:page>
      <draw:page draw:name="Standards-based Infrastructure" draw:style-name="dp1" draw:master-page-name="Default" presentation:presentation-page-layout-name="AL2T1" xml:id="id20" draw:id="id20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Standards-based <text:span text:style-name="T68">Infrastructure</text:span>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289"><text:span text:style-name="T19">Using industry standards, create an approved set of hardware, software, and networking technologies</text:span></text:p>
              </text:list-item>
              <text:list-item>
                <text:p text:style-name="P289">Benefits</text:p>
              </text:list-item>
            </text:list>
            <text:list text:style-name="L21">
              <text:list-item>
                <text:list>
                  <text:list-item>
                    <text:p text:style-name="P288">Interoperability yields easier systems integration</text:p>
                  </text:list-item>
                  <text:list-item>
                    <text:p text:style-name="P288">Less vendor technology lock-in</text:p>
                  </text:list-item>
                </text:list>
              </text:list-item>
            </text:list>
            <text:list text:style-name="L4">
              <text:list-item>
                <text:p text:style-name="P289">Implications</text:p>
              </text:list-item>
            </text:list>
            <text:list text:style-name="L21">
              <text:list-item>
                <text:list>
                  <text:list-item>
                    <text:p text:style-name="P288">Standards come slower; often are incomplete; always behind leading edge</text:p>
                  </text:list-item>
                  <text:list-item>
                    <text:p text:style-name="P288">Do not always provide the optimal solution</text:p>
                  </text:list-item>
                  <text:list-item>
                    <text:p text:style-name="P288">IS still has to build/integrate on standard platforms</text:p>
                    <text:p text:style-name="P288"/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Many are drawn to standards, <text:s/>Why not? <text:s/>You get interoperability which gives your organization more choices and more competition. <text:s/>And let’s face it, standards-driven competition makes it harder for your IT suppliers to lock you in to their kit.</text:span></text:p>
                  <text:p text:style-name="P4"><text:span text:style-name="T3">However,</text:span></text:p>
                  <text:p text:style-name="P4"><text:span text:style-name="T3">- standards are usually late, incomplete, and slow</text:span></text:p>
                  <text:p text:style-name="P4"><text:span text:style-name="T3">- they are seldom optimized for your particular environment and application needs</text:span></text:p>
                  <text:p text:style-name="P4"><text:span text:style-name="T3">- And, you still are in the systems integration business.</text:span></text:p>
                </text:list-header>
              </text:list>
            </draw:text-box>
          </draw:frame>
        </presentation:notes>
      </draw:page>
      <draw:page draw:name="Architecture" draw:style-name="dp1" draw:master-page-name="Default" presentation:presentation-page-layout-name="AL2T1" xml:id="id21" draw:id="id21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Architecture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289"><text:span text:style-name="T19">Choose the key technologies for an architecture, then the best-of-breed products to implement it</text:span></text:p>
              </text:list-item>
              <text:list-item>
                <text:p text:style-name="P289">Benefits</text:p>
              </text:list-item>
            </text:list>
            <text:list text:style-name="L21">
              <text:list-item>
                <text:list>
                  <text:list-item>
                    <text:p text:style-name="P288">Architecture fits your enterprise’s requirements. <text:s/>No “one size fits all” solution</text:p>
                  </text:list-item>
                  <text:list-item>
                    <text:p text:style-name="P288">Best-of-breed products can change over time while preserving the investment in the architecture</text:p>
                  </text:list-item>
                </text:list>
              </text:list-item>
            </text:list>
            <text:list text:style-name="L4">
              <text:list-item>
                <text:p text:style-name="P289">Implications</text:p>
              </text:list-item>
            </text:list>
            <text:list text:style-name="L21">
              <text:list-item>
                <text:list>
                  <text:list-item>
                    <text:p text:style-name="P288">Requires intense discipline to avoid “exceptions”</text:p>
                  </text:list-item>
                  <text:list-item>
                    <text:p text:style-name="P288">What is best for the enterprise may not be best for the line-of-business system buyer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An architectural approach has a lot going for it. <text:s/>Here, IT technologists choose the best technologies for your situation. <text:s/>Then, they can choose the best vendor solutions for the various pieces. <text:s/>A good architecture can absorb technology change at one level by isolating the changes from other levels. <text:s/>For example, changing your WAN protocols from SNA to TCP/IP.</text:span></text:p>
                  <text:p text:style-name="P4"><text:span text:style-name="T3">Two caveats:</text:span></text:p>
                  <text:p text:style-name="P4"><text:span text:style-name="T3">- It is always easy to defeat the long-term benefits of an architecture with exceptions. <text:s/>Example, an Oracle database shop needs an application package that only runs on Sybase.</text:span></text:p>
                  <text:p text:style-name="P4"><text:span text:style-name="T3">- </text:span></text:p>
                </text:list-header>
              </text:list>
            </draw:text-box>
          </draw:frame>
        </presentation:notes>
      </draw:page>
      <draw:page draw:name="Vendor-based" draw:style-name="dp1" draw:master-page-name="Default" presentation:presentation-page-layout-name="AL2T1" xml:id="id22" draw:id="id22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Vendor-based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289"><text:span text:style-name="T19">Choose a vendor’s solutions and build on those</text:span></text:p>
              </text:list-item>
              <text:list-item>
                <text:p text:style-name="P289">Benefits</text:p>
              </text:list-item>
            </text:list>
            <text:list text:style-name="L21">
              <text:list-item>
                <text:list>
                  <text:list-item>
                    <text:p text:style-name="P288">Vendor endures the technology shocks</text:p>
                  </text:list-item>
                  <text:list-item>
                    <text:p text:style-name="P288">Focused on rolling out leading-edge solutions</text:p>
                  </text:list-item>
                  <text:list-item>
                    <text:p text:style-name="P288">Some supply value-added technology integration</text:p>
                  </text:list-item>
                </text:list>
              </text:list-item>
            </text:list>
            <text:list text:style-name="L4">
              <text:list-item>
                <text:p text:style-name="P289">Implications</text:p>
              </text:list-item>
            </text:list>
            <text:list text:style-name="L21">
              <text:list-item>
                <text:list>
                  <text:list-item>
                    <text:p text:style-name="P288">No <text:span text:style-name="T19">single</text:span> vendor can supply all the infrastructure</text:p>
                  </text:list-item>
                  <text:list-item>
                    <text:p text:style-name="P288">If the vendor fails, so do you</text:p>
                  </text:list-item>
                  <text:list-item>
                    <text:p text:style-name="P288">At the mercy of the vendor’s technology curve</text:p>
                  </text:list-item>
                  <text:list-item>
                    <text:p text:style-name="P288">Nevertheless, an attractive choice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4"><text:span text:style-name="T3">A vendor-based infrastructure puts the technology hand-grenade in your supplier’s hands. <text:s/>The vendor worries about the technology integration, changes, and gaining their own competitive advantage through their products.</text:span></text:p>
                  <text:p text:style-name="P4"><text:span text:style-name="T3">Implications</text:span></text:p>
                  <text:p text:style-name="P4"><text:span text:style-name="T3">- Much as we would like, no single vendor can supply it all. <text:s/>Sorry, Microsoft.</text:span></text:p>
                  <text:p text:style-name="P4"><text:span text:style-name="T3">- You are in effect outsourcing your common infrastructure integration. <text:s/>There are risks.</text:span></text:p>
                  <text:p text:style-name="P4"><text:span text:style-name="T3">- On the whole, many IT organizations are attracted to vendor-based infrastructures simply because there is a lot of value for the money.</text:span></text:p>
                </text:list-header>
              </text:list>
            </draw:text-box>
          </draw:frame>
        </presentation:notes>
      </draw:page>
      <draw:page draw:name="Aberdeen’s Rating of Management Options" draw:style-name="dp1" draw:master-page-name="Default" presentation:presentation-page-layout-name="AL6T3" xml:id="id23" draw:id="id23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Aberdeen’s Rating of<text:line-break/>Management Options</text:p>
              </text:list-header>
            </text:list>
          </draw:text-box>
        </draw:frame>
        <draw:frame presentation:style-name="pr5" draw:text-style-name="P2" draw:layer="layout" svg:width="11.148cm" svg:height="11.589cm" svg:x="1.27cm" svg:y="5.238cm" presentation:class="outline" presentation:user-transformed="true">
          <draw:text-box>
            <text:list text:style-name="L4">
              <text:list-item>
                <text:p text:style-name="P39"><text:span text:style-name="T28">Do nothing</text:span><text:span text:style-name="T28"><text:line-break/></text:span><text:span text:style-name="T28"/></text:p>
              </text:list-item>
              <text:list-item>
                <text:p text:style-name="P39"><text:span text:style-name="T28">Outsource</text:span><text:span text:style-name="T28"><text:line-break/></text:span><text:span text:style-name="T28"/></text:p>
              </text:list-item>
              <text:list-item>
                <text:p text:style-name="P39"><text:span text:style-name="T28">Standards-based</text:span><text:span text:style-name="T28"><text:line-break/></text:span><text:span text:style-name="T28"><text:line-break/></text:span><text:span text:style-name="T28"/></text:p>
              </text:list-item>
              <text:list-item>
                <text:p text:style-name="P39"><text:span text:style-name="T28">Architecture</text:span><text:span text:style-name="T28"><text:line-break/></text:span><text:span text:style-name="T28"/></text:p>
              </text:list-item>
              <text:list-item>
                <text:p text:style-name="P39"><text:span text:style-name="T28">Vendor-based</text:span><text:span text:style-name="T28"><text:line-break/></text:span><text:span text:style-name="T28"/></text:p>
              </text:list-item>
            </text:list>
          </draw:text-box>
        </draw:frame>
        <draw:frame presentation:style-name="pr5" draw:text-style-name="P2" draw:layer="layout" svg:width="11.148cm" svg:height="11.589cm" svg:x="12.841cm" svg:y="5.238cm" presentation:class="outline" presentation:user-transformed="true">
          <draw:text-box>
            <text:list text:style-name="L23">
              <text:list-item>
                <text:p text:style-name="P39"><text:span text:style-name="T28">Bad idea</text:span><text:span text:style-name="T28"><text:line-break/></text:span><text:span text:style-name="T28"/></text:p>
              </text:list-item>
              <text:list-item>
                <text:p text:style-name="P39"><text:span text:style-name="T28">Parts, yes. <text:s/>The whole, never. <text:s/>Staff, never.</text:span></text:p>
              </text:list-item>
              <text:list-item>
                <text:p text:style-name="P39"><text:span text:style-name="T28">Remember DCE, DME &amp; OSI?</text:span><text:span text:style-name="T28"><text:line-break/></text:span><text:span text:style-name="T28"/></text:p>
              </text:list-item>
              <text:list-item>
                <text:p text:style-name="P39"><text:span text:style-name="T28">Good idea. <text:s/>Works best with strong central IS.</text:span></text:p>
              </text:list-item>
              <text:list-item>
                <text:p text:style-name="P39"><text:span text:style-name="T28">Good idea. <text:s/>Requires excellent relationship and basis for trust.</text:span><text:span text:style-name="T28"><text:line-break/></text:span><text:span text:style-name="T28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15" draw:text-style-name="P29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berdeen Conclusions" draw:style-name="dp1" draw:master-page-name="Default" presentation:presentation-page-layout-name="AL2T1" xml:id="id24" draw:id="id24">
        <draw:frame presentation:style-name="pr4" draw:text-style-name="P2" draw:layer="layout" svg:width="21.59cm" svg:height="3.175cm" svg:x="1.058cm" svg:y="-0.001cm" presentation:class="title" presentation:user-transformed="true">
          <draw:text-box>
            <text:list text:style-name="L1">
              <text:list-header>
                <text:p text:style-name="P1">Aberdeen Conclusions</text:p>
              </text:list-header>
            </text:list>
          </draw:text-box>
        </draw:frame>
        <draw:frame presentation:style-name="pr5" draw:text-style-name="P2" draw:layer="layout" svg:width="22.719cm" svg:height="11.589cm" svg:x="1.269cm" svg:y="5.238cm" presentation:class="outline" presentation:user-transformed="true">
          <draw:text-box>
            <text:list text:style-name="L4">
              <text:list-item>
                <text:p text:style-name="P6"><text:span text:style-name="T4">IT-driven business is the wave of the present</text:span></text:p>
              </text:list-item>
              <text:list-item>
                <text:p text:style-name="P6"><text:span text:style-name="T4">Information technology is exploding -- <text:s/>threatening to fragment IS development, operations, and networks into unmanageable pieces</text:span></text:p>
              </text:list-item>
              <text:list-item>
                <text:p text:style-name="P6"><text:span text:style-name="T4">An architected, vendor-backed </text:span><text:span text:style-name="T69">common</text:span><text:span text:style-name="T4"> infrastructure yields the greatest benefits</text:span></text:p>
              </text:list-item>
            </text:list>
            <text:list text:style-name="L21">
              <text:list-item>
                <text:list>
                  <text:list-item>
                    <text:p text:style-name="P39"><text:span text:style-name="T4">Must support both information and enterprise management need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 smil:fadeColor="#000000"/>
          </anim:par>
        </anim:par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6" draw:text-style-name="P5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7"><text:span text:style-name="T4">Discuss bullets.</text:span></text:p>
                  <text:p text:style-name="P7"><text:span text:style-name="T4"/></text:p>
                  <text:p text:style-name="P7"><text:span text:style-name="T4">Aberdeen sees four suppliers with the ability to significantly impact the market for infrastructure:</text:span></text:p>
                  <text:p text:style-name="P7"><text:span text:style-name="T4">IBM-- will deliver business-object components from the San Francicso project on top of a robust infrastructure that includes DB2, CICS, MQ, and e-business infrastructure. <text:s/>IBM’s ace in the hole is the Global Services organization that can glue the infrastructure onto custom applications.</text:span></text:p>
                  <text:p text:style-name="P7"><text:span text:style-name="T4">Microsoft -- Has been pushing infrastructure for a year under the “digital <text:s/>nervous system” name. <text:s/>Poor-to-fair on heterogeneous infrastructure; non-existent in services, Microsoft nonetheless keeps expanding its infrastructure software which is highly credible for what <text:s/>it can do.</text:span></text:p>
                  <text:p text:style-name="P7"><text:span text:style-name="T4">Oracle -- has a database-centric vision of infrastructure. <text:s/>Applications and services complement an enterprise-capable server infrastructure platform.</text:span></text:p>
                  <text:p text:style-name="P7"><text:span text:style-name="T4">Computer Associates -- is building bridges between its Unicenter TNG enterprise management products, application development, and data management products such as Jasmine and Ingres. <text:s/>CA has a leg up in heterogeneous environments. <text:s/>And give CA good marks for vision, but services need to be beefed up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ertus Extra Bold" svg:font-family="'Albertus Extra Bold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Univers" svg:font-family="Univer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axial" draw:start-color="#ffc62a" draw:end-color="#7e6214" draw:start-intensity="100%" draw:end-intensity="100%" draw:angle="270deg" draw:border="0%">
      <loext:gradient-stop svg:offset="0" loext:color-type="rgb" loext:color-value="#ffc62a"/>
      <loext:gradient-stop svg:offset="1" loext:color-type="rgb" loext:color-value="#7e6214"/>
    </draw:gradient>
    <draw:gradient draw:name="Gradient_20_10" draw:display-name="Gradient 10" draw:style="linear" draw:start-color="#414141" draw:end-color="#fefefe" draw:start-intensity="100%" draw:end-intensity="100%" draw:angle="315deg" draw:border="0%">
      <loext:gradient-stop svg:offset="0" loext:color-type="rgb" loext:color-value="#414141"/>
      <loext:gradient-stop svg:offset="1" loext:color-type="rgb" loext:color-value="#fefefe"/>
    </draw:gradient>
    <draw:gradient draw:name="Gradient_20_11" draw:display-name="Gradient 11" draw:style="linear" draw:start-color="#0066ff" draw:end-color="#0046b1" draw:start-intensity="100%" draw:end-intensity="100%" draw:angle="225deg" draw:border="0%">
      <loext:gradient-stop svg:offset="0" loext:color-type="rgb" loext:color-value="#0066ff"/>
      <loext:gradient-stop svg:offset="1" loext:color-type="rgb" loext:color-value="#0046b1"/>
    </draw:gradient>
    <draw:gradient draw:name="Gradient_20_12" draw:display-name="Gradient 12" draw:style="linear" draw:start-color="#ff9933" draw:end-color="#7e4b19" draw:start-intensity="100%" draw:end-intensity="100%" draw:angle="225deg" draw:border="0%">
      <loext:gradient-stop svg:offset="0" loext:color-type="rgb" loext:color-value="#ff9933"/>
      <loext:gradient-stop svg:offset="1" loext:color-type="rgb" loext:color-value="#7e4b19"/>
    </draw:gradient>
    <draw:gradient draw:name="Gradient_20_13" draw:display-name="Gradient 13" draw:style="linear" draw:start-color="#fc0128" draw:end-color="#7d0013" draw:start-intensity="100%" draw:end-intensity="100%" draw:angle="225deg" draw:border="0%">
      <loext:gradient-stop svg:offset="0" loext:color-type="rgb" loext:color-value="#fc0128"/>
      <loext:gradient-stop svg:offset="1" loext:color-type="rgb" loext:color-value="#7d0013"/>
    </draw:gradient>
    <draw:gradient draw:name="Gradient_20_2" draw:display-name="Gradient 2" draw:style="linear" draw:start-color="#6e0043" draw:end-color="#7c1955" draw:start-intensity="100%" draw:end-intensity="100%" draw:angle="270deg" draw:border="0%">
      <loext:gradient-stop svg:offset="0" loext:color-type="rgb" loext:color-value="#6e0043"/>
      <loext:gradient-stop svg:offset="1" loext:color-type="rgb" loext:color-value="#7c1955"/>
    </draw:gradient>
    <draw:gradient draw:name="Gradient_20_3" draw:display-name="Gradient 3" draw:style="linear" draw:start-color="#fefefe" draw:end-color="#d93192" draw:start-intensity="100%" draw:end-intensity="100%" draw:angle="270deg" draw:border="0%">
      <loext:gradient-stop svg:offset="0" loext:color-type="rgb" loext:color-value="#fefefe"/>
      <loext:gradient-stop svg:offset="1" loext:color-type="rgb" loext:color-value="#d93192"/>
    </draw:gradient>
    <draw:gradient draw:name="Gradient_20_4" draw:display-name="Gradient 4" draw:style="linear" draw:start-color="#d93192" draw:end-color="#df59a7" draw:start-intensity="100%" draw:end-intensity="100%" draw:angle="270deg" draw:border="0%">
      <loext:gradient-stop svg:offset="0" loext:color-type="rgb" loext:color-value="#d93192"/>
      <loext:gradient-stop svg:offset="1" loext:color-type="rgb" loext:color-value="#df59a7"/>
    </draw:gradient>
    <draw:gradient draw:name="Gradient_20_5" draw:display-name="Gradient 5" draw:style="rectangular" draw:cx="50%" draw:cy="50%" draw:start-color="#dc0081" draw:end-color="#410026" draw:start-intensity="100%" draw:end-intensity="100%" draw:angle="0deg" draw:border="0%">
      <loext:gradient-stop svg:offset="0" loext:color-type="rgb" loext:color-value="#dc0081"/>
      <loext:gradient-stop svg:offset="1" loext:color-type="rgb" loext:color-value="#410026"/>
    </draw:gradient>
    <draw:gradient draw:name="Gradient_20_6" draw:display-name="Gradient 6" draw:style="axial" draw:start-color="#f8f8f8" draw:end-color="#cbcbcb" draw:start-intensity="100%" draw:end-intensity="100%" draw:angle="0deg" draw:border="0%">
      <loext:gradient-stop svg:offset="0" loext:color-type="rgb" loext:color-value="#f8f8f8"/>
      <loext:gradient-stop svg:offset="1" loext:color-type="rgb" loext:color-value="#cbcbcb"/>
    </draw:gradient>
    <draw:gradient draw:name="Gradient_20_7" draw:display-name="Gradient 7" draw:style="rectangular" draw:cx="50%" draw:cy="50%" draw:start-color="#000000" draw:end-color="#114ffb" draw:start-intensity="100%" draw:end-intensity="100%" draw:angle="0deg" draw:border="0%">
      <loext:gradient-stop svg:offset="0" loext:color-type="rgb" loext:color-value="#000000"/>
      <loext:gradient-stop svg:offset="1" loext:color-type="rgb" loext:color-value="#114ffb"/>
    </draw:gradient>
    <draw:gradient draw:name="Gradient_20_8" draw:display-name="Gradient 8" draw:style="linear" draw:start-color="#618ffd" draw:end-color="#567fe2" draw:start-intensity="100%" draw:end-intensity="100%" draw:angle="0deg" draw:border="0%">
      <loext:gradient-stop svg:offset="0" loext:color-type="rgb" loext:color-value="#618ffd"/>
      <loext:gradient-stop svg:offset="1" loext:color-type="rgb" loext:color-value="#567fe2"/>
    </draw:gradient>
    <draw:gradient draw:name="Gradient_20_9" draw:display-name="Gradient 9" draw:style="linear" draw:start-color="#676767" draw:end-color="#000000" draw:start-intensity="100%" draw:end-intensity="100%" draw:angle="270deg" draw:border="0%">
      <loext:gradient-stop svg:offset="0" loext:color-type="rgb" loext:color-value="#676767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46 1410" svg:d="M423 0l423 1410-423-564-423 564z"/>
    <draw:marker draw:name="Arrowheads_20_10" draw:display-name="Arrowheads 10" svg:viewBox="0 0 210 350" svg:d="M105 0l105 350-105-140-105 140z"/>
    <draw:marker draw:name="Arrowheads_20_11" draw:display-name="Arrowheads 11" svg:viewBox="0 0 210 350" svg:d="M105 0l105 350-105-140-105 140z"/>
    <draw:marker draw:name="Arrowheads_20_12" draw:display-name="Arrowheads 12" svg:viewBox="0 0 210 350" svg:d="M105 0l105 350-105-140-105 140z"/>
    <draw:marker draw:name="Arrowheads_20_13" draw:display-name="Arrowheads 13" svg:viewBox="0 0 210 350" svg:d="M105 0l105 350-105-140-105 140z"/>
    <draw:marker draw:name="Arrowheads_20_14" draw:display-name="Arrowheads 14" svg:viewBox="0 0 210 350" svg:d="M105 0l105 350-105-140-105 140z"/>
    <draw:marker draw:name="Arrowheads_20_15" draw:display-name="Arrowheads 15" svg:viewBox="0 0 210 350" svg:d="M105 0l105 350-105-140-105 140z"/>
    <draw:marker draw:name="Arrowheads_20_16" draw:display-name="Arrowheads 16" svg:viewBox="0 0 210 350" svg:d="M105 0l105 350-105-140-105 140z"/>
    <draw:marker draw:name="Arrowheads_20_17" draw:display-name="Arrowheads 17" svg:viewBox="0 0 210 350" svg:d="M105 0l105 350-105-140-105 140z"/>
    <draw:marker draw:name="Arrowheads_20_2" draw:display-name="Arrowheads 2" svg:viewBox="0 0 846 1410" svg:d="M423 0l423 1410-423-564-423 564z"/>
    <draw:marker draw:name="Arrowheads_20_3" draw:display-name="Arrowheads 3" svg:viewBox="0 0 846 1410" svg:d="M423 0l423 1410-423-564-423 564z"/>
    <draw:marker draw:name="Arrowheads_20_4" draw:display-name="Arrowheads 4" svg:viewBox="0 0 846 1410" svg:d="M423 0l423 1410-423-564-423 564z"/>
    <draw:marker draw:name="Arrowheads_20_5" draw:display-name="Arrowheads 5" svg:viewBox="0 0 846 1410" svg:d="M423 0l423 1410-423-564-423 564z"/>
    <draw:marker draw:name="Arrowheads_20_6" draw:display-name="Arrowheads 6" svg:viewBox="0 0 846 1410" svg:d="M423 0l423 1410-423-564-423 564z"/>
    <draw:marker draw:name="Arrowheads_20_7" draw:display-name="Arrowheads 7" svg:viewBox="0 0 846 1410" svg:d="M423 0l423 1410-423-564-423 564z"/>
    <draw:marker draw:name="Arrowheads_20_8" draw:display-name="Arrowheads 8" svg:viewBox="0 0 210 350" svg:d="M105 0l105 350-105-140-105 140z"/>
    <draw:marker draw:name="Arrowheads_20_9" draw:display-name="Arrowheads 9" svg:viewBox="0 0 210 350" svg:d="M105 0l105 350-105-140-105 140z"/>
    <draw:marker draw:name="msArrowStealthEnd_20_6" draw:display-name="msArrowStealthEnd 6" svg:viewBox="0 0 636 1060" svg:d="M318 0l318 1060-318-424-318 424z"/>
    <draw:stroke-dash draw:name="Dot" draw:style="rect" draw:dots1="1" draw:dots1-length="100%" draw:distance="1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lbertus Extra 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lbertus Extra Bold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lbertus Extra Bold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lbertus Extra Bol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Extra Bold" fo:font-family="'Albertus Extra Bold'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lbertus Extra 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lbertus Extra Bold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lbertus Extra Bold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lbertus Extra Bol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lbertus Extra Bold" fo:font-family="'Albertus Extra Bol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lbertus Extra 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lbertus Extra Bold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lbertus Extra Bold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lbertus Extra Bold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Extra Bold" fo:font-family="'Albertus Extra Bold'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">
            <style:list-level-properties text:min-label-width="0.953cm"/>
            <style:text-properties fo:font-family="'Monotype Sorts'" style:font-pitch="variable" style:font-charset="x-symbol" fo:color="#ffcc00" fo:font-size="100%"/>
          </text:list-level-style-bullet>
          <text:list-level-style-bullet text:level="2" text:bullet-char="">
            <style:list-level-properties text:space-before="1.27cm" text:min-label-width="0.794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 text:min-label-width="0.635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">
            <style:list-level-properties text:min-label-width="0.953cm"/>
            <style:text-properties fo:font-family="'Monotype Sorts'" style:font-pitch="variable" style:font-charset="x-symbol" fo:color="#ffcc00" fo:font-size="100%"/>
          </text:list-level-style-bullet>
          <text:list-level-style-bullet text:level="2" text:bullet-char="">
            <style:list-level-properties text:space-before="1.27cm" text:min-label-width="0.794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 text:min-label-width="0.635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lbertus Extra 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lbertus Extra Bold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lbertus Extra Bold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lbertus Extra Bold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lbertus Extra Bold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Extra Bold" fo:font-family="'Albertus Extra Bold'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 style:writing-mode="lr-tb">
        <text:list-style style:name="Title1-outline1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>
        <text:list-style style:name="Title1-outline2">
          <text:list-level-style-bullet text:level="1" text:bullet-char="">
            <style:list-level-properties/>
            <style:text-properties fo:font-family="'Monotype Sorts'" style:font-pitch="variable" style:font-charset="x-symbol" fo:color="#ffcc00" fo:font-size="100%"/>
          </text:list-level-style-bullet>
          <text:list-level-style-number text:level="2" style:num-format="">
            <style:list-level-properties/>
            <style:text-properties fo:color="#ffcc00" fo:font-size="100%"/>
          </text:list-level-style-number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1.27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2.54cm" fo:margin-right="0cm" fo:margin-top="0.176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3.81cm" fo:margin-right="0cm" fo:margin-top="0.159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08cm" fo:margin-right="0cm" fo:margin-top="0.159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6600" draw:textarea-horizontal-align="justify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 style:writing-mode="lr-tb">
        <text:list-style style:name="Title1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6600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808080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draw:fill="none" draw:fill-color="#ff6600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6600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draw:fill="none" draw:fill-color="#ff6600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3">
      <style:graphic-properties draw:stroke="none" draw:fill="none" draw:fill-color="#ff6600" draw:textarea-horizontal-align="justify" draw:textarea-vertical-align="bottom" draw:auto-grow-height="false" draw:auto-grow-width="false" fo:min-height="1.4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6600" draw:textarea-horizontal-align="justify" draw:textarea-vertical-align="bottom" draw:auto-grow-height="false" draw:auto-grow-width="false" fo:min-height="1.4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6600" draw:textarea-horizontal-align="justify" draw:textarea-vertical-align="bottom" draw:auto-grow-height="false" draw:auto-grow-width="false" fo:min-height="1.4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00cc99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00cc99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style:paragraph-properties fo:margin-left="0cm" fo:margin-right="0cm" fo:margin-top="0.309cm" fo:margin-bottom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6600"/>
      <style:paragraph-properties fo:margin-left="0cm" fo:margin-right="0cm" fo:margin-top="0.309cm" fo:margin-bottom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margin-top="0.309cm" fo:margin-bottom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6600"/>
      <style:paragraph-properties fo:margin-left="0cm" fo:margin-right="0cm" fo:margin-top="0.309cm" fo:margin-bottom="0cm" fo:line-height="100%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.309cm" fo:margin-bottom="0cm" fo:line-height="100%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ff6600"/>
      <style:paragraph-properties fo:margin-left="0cm" fo:margin-right="0cm" fo:margin-top="0.309cm" fo:margin-bottom="0cm" fo:line-height="100%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ff6600"/>
      <style:paragraph-properties fo:text-align="center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color="#5e574e" loext:opacity="100%" style:font-name="Arial" fo:font-size="14pt" style:font-size-asian="14pt" style:font-size-complex="14pt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Albertus Extra Bold" fo:color="#000000" fo:font-size="100%"/>
      </text:list-level-style-bullet>
      <text:list-level-style-bullet text:level="3" text:bullet-char="•">
        <style:list-level-properties text:space-before="2.54cm"/>
        <style:text-properties style:font-name="Albertus Extra Bold" fo:color="#000000" fo:font-size="100%"/>
      </text:list-level-style-bullet>
      <text:list-level-style-bullet text:level="4" text:bullet-char="•">
        <style:list-level-properties text:space-before="3.81cm"/>
        <style:text-properties style:font-name="Albertus Extra Bold" fo:color="#000000" fo:font-size="100%"/>
      </text:list-level-style-bullet>
      <text:list-level-style-bullet text:level="5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6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7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8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9" text:bullet-char="•">
        <style:list-level-properties text:space-before="5.08cm"/>
        <style:text-properties style:font-name="Albertus Extra Bold" fo:color="#000000" fo:font-size="100%"/>
      </text:list-level-style-bullet>
      <text:list-level-style-bullet text:level="10" text:bullet-char="•">
        <style:list-level-properties text:space-before="5.08cm"/>
        <style:text-properties style:font-name="Albertus Extra Bol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2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2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2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59cm" svg:height="3.175cm" svg:x="1.058cm" svg:y="-0.001cm" presentation:class="title" presentation:placeholder="true">
        <draw:text-box/>
      </draw:frame>
      <draw:frame presentation:style-name="Default-outline1" draw:layer="backgroundobjects" svg:width="22.719cm" svg:height="11.589cm" svg:x="1.269cm" svg:y="5.238cm" presentation:class="outline" presentation:placeholder="true">
        <draw:text-box/>
      </draw:frame>
      <draw:frame draw:style-name="Mgr4" draw:text-style-name="MP7" draw:layer="backgroundobjects" svg:width="5.292cm" svg:height="1.27cm" svg:x="1.199cm" svg:y="17.304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5" draw:text-style-name="MP9" draw:layer="backgroundobjects" svg:width="8.044cm" svg:height="1.27cm" svg:x="8.678cm" svg:y="17.304cm" presentation:class="footer">
        <draw:text-box>
          <text:list text:style-name="ML3">
            <text:list-header>
              <text:p text:style-name="MP8"><text:span text:style-name="MT2"><presentation:footer/></text:span></text:p>
            </text:list-header>
          </text:list>
        </draw:text-box>
      </draw:frame>
      <draw:frame draw:style-name="Mgr6" draw:text-style-name="MP11" draw:layer="backgroundobjects" svg:width="5.292cm" svg:height="1.27cm" svg:x="18.697cm" svg:y="17.304cm" presentation:class="page-number">
        <draw:text-box>
          <text:list text:style-name="ML3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name="paint" draw:style-name="Mgr7" draw:text-style-name="MP12" draw:layer="backgroundobjects" svg:width="22.86cm" svg:height="1.067cm" svg:x="2.54cm" svg:y="3.651cm">
        <draw:image xlink:href="Pictures/10000001000001900000003012956D44.png" xlink:type="simple" xlink:show="embed" xlink:actuate="onLoad" draw:mime-type="image/png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1.449cm" svg:height="3.175cm" svg:x="2.539cm" svg:y="1.904cm" presentation:class="title" presentation:placeholder="true">
        <draw:text-box/>
      </draw:frame>
      <draw:frame presentation:style-name="Title1-subtitle" draw:layer="backgroundobjects" svg:width="17.78cm" svg:height="4.921cm" svg:x="5.927cm" svg:y="10.794cm" presentation:class="subtitle" presentation:placeholder="true">
        <draw:text-box/>
      </draw:frame>
      <draw:frame draw:style-name="Mgr8" draw:text-style-name="MP7" draw:layer="backgroundobjects" svg:width="5.362cm" svg:height="1.429cm" svg:x="1.976cm" svg:y="17.303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9" draw:text-style-name="MP9" draw:layer="backgroundobjects" svg:width="7.902cm" svg:height="1.429cm" svg:x="8.749cm" svg:y="17.303cm" presentation:class="footer">
        <draw:text-box>
          <text:list text:style-name="ML3">
            <text:list-header>
              <text:p text:style-name="MP8"><text:span text:style-name="MT2"><presentation:footer/></text:span></text:p>
            </text:list-header>
          </text:list>
        </draw:text-box>
      </draw:frame>
      <draw:frame draw:style-name="Mgr10" draw:text-style-name="MP11" draw:layer="backgroundobjects" svg:width="5.08cm" svg:height="1.429cm" svg:x="18.344cm" svg:y="17.303cm" presentation:class="page-number">
        <draw:text-box>
          <text:list text:style-name="ML3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name="paint" draw:style-name="Mgr7" draw:text-style-name="MP12" draw:layer="backgroundobjects" svg:width="22.86cm" svg:height="1.067cm" svg:x="2.54cm" svg:y="5.08cm">
        <draw:image xlink:href="Pictures/10000001000001900000003012956D44.png" xlink:type="simple" xlink:show="embed" xlink:actuate="onLoad" draw:mime-type="image/png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" draw:text-style-name="MP5" draw:layer="backgroundobjects" svg:width="8.255cm" svg:height="1.27cm" svg:x="10.794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3" draw:layer="backgroundobjects" svg:width="8.255cm" svg:height="1.27cm" svg:x="-0.001cm" svg:y="24.13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os or Cosmos</dc:title>
    <dc:subject>CA common infrastructure speech</dc:subject>
    <dc:description>CIO conference, Coral Gables Florida
October 15, 1998</dc:description>
    <meta:initial-creator>Peter Kastner</meta:initial-creator>
    <meta:creation-date>1998-10-05T10:39:06.390000000</meta:creation-date>
    <dc:creator>Peter Kastner</dc:creator>
    <dc:date>1998-10-22T15:45:05.460000000</dc:date>
    <meta:print-date>1998-10-06T11:08:42.080000000</meta:print-date>
    <meta:editing-cycles>23</meta:editing-cycles>
    <meta:editing-duration>PT19H11M37S</meta:editing-duration>
    <meta:document-statistic meta:object-count="7128"/>
    <meta:generator>LibreOffice/24.2.7.2$Linux_X86_64 LibreOffice_project/420$Build-2</meta:generator>
  </office:meta>
</office:document-meta>
</file>