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mdITC Bk BT" svg:font-family="'GarmdITC Bk B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draw:fill="solid" draw:fill-color="#ffffe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e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e1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gradient" draw:fill-color="#ffcc99" draw:fill-gradient-name="Gradient_20_1" draw:textarea-horizontal-align="left" draw:textarea-vertical-align="middle" draw:auto-grow-height="false" fo:min-height="18.755cm" fo:min-width="0.162cm" fo:padding-top="0.13cm" fo:padding-bottom="0.13cm" fo:padding-left="0.25cm" fo:padding-right="0.25cm" fo:wrap-option="no-wrap" draw:shadow-color="#ffffcc" loext:decorative="false"/>
    </style:style>
    <style:style style:name="gr3" style:family="graphic" style:parent-style-name="standard">
      <style:graphic-properties draw:stroke="none" draw:fill="gradient" draw:fill-color="#ffcc99" draw:fill-gradient-name="Gradient_20_1" draw:textarea-horizontal-align="left" draw:textarea-vertical-align="middle" draw:auto-grow-height="false" fo:min-height="14.98cm" fo:min-width="0.537cm" fo:padding-top="0.13cm" fo:padding-bottom="0.13cm" fo:padding-left="0.25cm" fo:padding-right="0.25cm" fo:wrap-option="no-wrap" draw:shadow-color="#ffffcc" loext:decorative="false"/>
    </style:style>
    <style:style style:name="gr4" style:family="graphic" style:parent-style-name="standard">
      <style:graphic-properties draw:stroke="none" draw:fill="gradient" draw:fill-color="#ffcc99" draw:fill-gradient-name="Gradient_20_1" draw:textarea-horizontal-align="left" draw:textarea-vertical-align="middle" draw:auto-grow-height="false" fo:min-height="9.053cm" fo:min-width="2.508cm" fo:padding-top="0.13cm" fo:padding-bottom="0.13cm" fo:padding-left="0.25cm" fo:padding-right="0.25cm" fo:wrap-option="no-wrap" draw:shadow-color="#ffffcc" loext:decorative="false"/>
    </style:style>
    <style:style style:name="gr5" style:family="graphic" style:parent-style-name="standard">
      <style:graphic-properties draw:stroke="none" draw:fill="gradient" draw:fill-color="#9999ff" draw:fill-gradient-name="Gradient_20_2" draw:textarea-horizontal-align="left" draw:textarea-vertical-align="middle" draw:auto-grow-height="false" fo:min-height="12.017cm" fo:min-width="0.206cm" fo:padding-top="0.13cm" fo:padding-bottom="0.13cm" fo:padding-left="0.25cm" fo:padding-right="0.25cm" fo:wrap-option="no-wrap" draw:shadow-color="#ffffcc" loext:decorative="false"/>
    </style:style>
    <style:style style:name="gr6" style:family="graphic" style:parent-style-name="standard">
      <style:graphic-properties draw:stroke="none" draw:fill="gradient" draw:fill-color="#ff9933" draw:fill-gradient-name="Gradient_20_3" draw:textarea-horizontal-align="left" draw:textarea-vertical-align="middle" draw:auto-grow-height="false" fo:min-height="3.126cm" fo:min-width="0.959cm" fo:padding-top="0.13cm" fo:padding-bottom="0.13cm" fo:padding-left="0.25cm" fo:padding-right="0.25cm" fo:wrap-option="no-wrap" draw:shadow-color="#ffffcc" loext:decorative="false"/>
    </style:style>
    <style:style style:name="gr7" style:family="graphic" style:parent-style-name="standard">
      <style:graphic-properties draw:stroke="none" draw:fill="gradient" draw:fill-color="#ffcc99" draw:fill-gradient-name="Gradient_20_1" draw:textarea-horizontal-align="left" draw:textarea-vertical-align="middle" draw:auto-grow-height="false" fo:min-height="0.111cm" fo:min-width="23.458cm" fo:padding-top="0.13cm" fo:padding-bottom="0.13cm" fo:padding-left="0.25cm" fo:padding-right="0.25cm" fo:wrap-option="no-wrap" draw:shadow-color="#ffffcc" loext:decorative="false"/>
    </style:style>
    <style:style style:name="gr8" style:family="graphic" style:parent-style-name="standard">
      <style:graphic-properties draw:stroke="solid" svg:stroke-width="0.035cm" svg:stroke-color="#ff99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ffcc" loext:decorative="false"/>
    </style:style>
    <style:style style:name="gr9" style:family="graphic" style:parent-style-name="standard" style:list-style-name="L2">
      <style:graphic-properties draw:stroke="none" draw:fill="none" draw:fill-color="#ff993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ffffcc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9933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ffffcc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9933" draw:textarea-horizontal-align="justify" draw:textarea-vertical-align="top" draw:auto-grow-height="false" draw:auto-grow-width="false" fo:min-height="4.614cm" fo:min-width="0cm" fo:padding-top="0.128cm" fo:padding-bottom="0.128cm" fo:padding-left="0.256cm" fo:padding-right="0.256cm" fo:wrap-option="wrap" draw:shadow-color="#ffffcc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618ffd" draw:textarea-horizontal-align="justify" draw:textarea-vertical-align="top" fo:min-height="11.602cm" draw:shadow-color="#919191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9933" draw:textarea-horizontal-align="justify" draw:textarea-vertical-align="bottom" draw:auto-grow-height="false" draw:auto-grow-width="false" fo:min-height="2.973cm" fo:min-width="0cm" fo:padding-top="0.128cm" fo:padding-bottom="0.128cm" fo:padding-left="0.256cm" fo:padding-right="0.256cm" fo:wrap-option="wrap" draw:shadow-color="#ffffcc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9933" draw:textarea-horizontal-align="justify" draw:textarea-vertical-align="top" draw:auto-grow-height="false" draw:auto-grow-width="false" draw:fit-to-size="false" style:shrink-to-fit="true" fo:min-height="11.175cm" fo:min-width="0cm" fo:padding-top="0.128cm" fo:padding-bottom="0.128cm" fo:padding-left="0.256cm" fo:padding-right="0.256cm" fo:wrap-option="wrap" draw:shadow-color="#ffffcc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1.602cm" loext:decorative="false"/>
      <style:paragraph-properties style:writing-mode="lr-tb"/>
    </style:style>
    <style:style style:name="P1" style:family="paragraph">
      <loext:graphic-properties draw:fill="gradient" draw:fill-color="#ffcc99" draw:fill-gradient-name="Gradient_20_1"/>
      <style:paragraph-properties style:font-independent-line-spacing="true"/>
    </style:style>
    <style:style style:name="P2" style:family="paragraph">
      <loext:graphic-properties draw:fill="gradient" draw:fill-color="#9999ff" draw:fill-gradient-name="Gradient_20_2"/>
      <style:paragraph-properties style:font-independent-line-spacing="true"/>
    </style:style>
    <style:style style:name="P3" style:family="paragraph">
      <loext:graphic-properties draw:fill="gradient" draw:fill-color="#ff9933" draw:fill-gradient-name="Gradient_20_3"/>
      <style:paragraph-properties style:font-independent-line-spacing="true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2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9933"/>
      <style:paragraph-properties style:font-independent-line-spacing="true"/>
    </style:style>
    <style:style style:name="P7" style:family="paragraph">
      <style:paragraph-properties fo:margin-left="0cm" fo:margin-right="0cm" fo:margin-top="0.247cm" fo:margin-bottom="0cm" fo:line-height="75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65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59cm" fo:margin-bottom="0cm" fo:line-height="65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9933"/>
      <style:paragraph-properties fo:margin-left="0cm" fo:margin-right="0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618ffd"/>
    </style:style>
    <style:style style:name="P13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8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94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29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3cm" fo:margin-right="0cm" fo:margin-top="0.282cm" fo:margin-bottom="0cm" fo:line-height="90%" fo:text-align="center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265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29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247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82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12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94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21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03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90%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203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2.064cm" fo:margin-right="0cm" fo:margin-top="0.265cm" fo:margin-bottom="0cm" fo:text-align="center" fo:text-indent="-0.794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194cm" fo:margin-bottom="0cm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12cm" fo:margin-bottom="0cm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265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90%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238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/>
    </style:style>
    <style:style style:name="T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style:text-position="30% 58%" fo:font-size="22pt" style:font-size-asian="22pt" style:font-size-complex="2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0pt" fo:font-style="italic" style:font-size-asian="30pt" style:font-style-asian="italic" style:font-size-complex="30pt" style:font-style-complex="italic"/>
    </style:style>
    <style:style style:name="T13" style:family="text">
      <style:text-properties fo:font-size="23pt" style:font-size-asian="23pt" style:font-size-complex="23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1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9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9933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–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–">
        <style:list-level-properties text:space-before="5.08cm"/>
        <style:text-properties style:font-name="Arial" fo:color="#000000" fo:font-size="100%"/>
      </text:list-level-style-bullet>
      <text:list-level-style-bullet text:level="6" text:bullet-char="–">
        <style:list-level-properties text:space-before="5.08cm"/>
        <style:text-properties style:font-name="Arial" fo:color="#000000" fo:font-size="100%"/>
      </text:list-level-style-bullet>
      <text:list-level-style-bullet text:level="7" text:bullet-char="–">
        <style:list-level-properties text:space-before="5.08cm"/>
        <style:text-properties style:font-name="Arial" fo:color="#000000" fo:font-size="100%"/>
      </text:list-level-style-bullet>
      <text:list-level-style-bullet text:level="8" text:bullet-char="–">
        <style:list-level-properties text:space-before="5.08cm"/>
        <style:text-properties style:font-name="Arial" fo:color="#000000" fo:font-size="100%"/>
      </text:list-level-style-bullet>
      <text:list-level-style-bullet text:level="9" text:bullet-char="–">
        <style:list-level-properties text:space-before="5.08cm"/>
        <style:text-properties style:font-name="Arial" fo:color="#000000" fo:font-size="100%"/>
      </text:list-level-style-bullet>
      <text:list-level-style-bullet text:level="10" text:bullet-char="–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'Monotype Sorts'" style:font-pitch="variable" style:font-charset="x-symbol" fo:color="#ff9933" fo:font-size="7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'Monotype Sorts'" style:font-pitch="variable" style:font-charset="x-symbol" fo:color="#ff9933" fo:font-size="7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33" fo:font-size="75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">
        <style:list-level-properties text:min-label-width="0.953cm"/>
        <style:text-properties fo:font-family="'Monotype Sorts'" style:font-pitch="variable" style:font-charset="x-symbol" fo:color="#ff9933" fo:font-size="75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header-decl presentation:name="hdr1">Chief Financial Officer Executive Exchange</presentation:header-decl>
      <presentation:footer-decl presentation:name="ftr1">Computer Associates International</presentation:footer-decl>
      <presentation:date-time-decl presentation:name="dtd1" presentation:source="fixed">December 3-6, 1997 -- Scottsdale, AZ</presentation:date-time-decl>
      <draw:page draw:name="What Every CFO Should Know About the Year 2000 IT Tsunami" draw:style-name="dp1" draw:master-page-name="Default" presentation:presentation-page-layout-name="AL1T0">
        <draw:g draw:style-name="gr1">
          <draw:custom-shape draw:style-name="gr2" draw:text-style-name="P1" draw:layer="layout" svg:width="0.662cm" svg:height="19.015cm" svg:x="0.657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37cm" svg:height="15.24cm" svg:x="1.221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008cm" svg:height="9.313cm" svg:x="0.895cm" svg:y="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706cm" svg:height="12.277cm" svg:x="1.27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459cm" svg:height="3.386cm" svg:x="1.645cm" svg:y="7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3.958cm" svg:height="0.371cm" svg:x="1.438cm" svg:y="6.879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0.445cm" svg:y1="6.879cm" svg:x2="25.157cm" svg:y2="6.879cm">
            <text:p/>
          </draw:line>
        </draw:g>
        <draw:frame presentation:style-name="pr1" draw:text-style-name="P6" draw:layer="layout" svg:width="21.59cm" svg:height="3.175cm" svg:x="2.117cm" svg:y="1.904cm" presentation:class="title" presentation:user-transformed="true">
          <draw:text-box>
            <text:list text:style-name="L2">
              <text:list-header>
                <text:p text:style-name="P5"><text:span text:style-name="T1">What Every CFO Should Know About the Year 2000 IT Tsunami</text:span></text:p>
              </text:list-header>
            </text:list>
          </draw:text-box>
        </draw:frame>
        <draw:frame presentation:style-name="pr2" draw:text-style-name="P6" draw:layer="layout" svg:width="17.78cm" svg:height="4.869cm" svg:x="4.233cm" svg:y="13.122cm" presentation:class="subtitle" presentation:user-transformed="true">
          <draw:text-box>
            <text:list text:style-name="L3">
              <text:list-header>
                <text:p text:style-name="P7"><text:span text:style-name="T2">Peter S. Kastner</text:span></text:p>
                <text:p text:style-name="P8"><text:span text:style-name="T3">Aberdeen Group, Inc.</text:span></text:p>
                <text:p text:style-name="P8"><text:span text:style-name="T3">One Boston Place</text:span></text:p>
                <text:p text:style-name="P8"><text:span text:style-name="T3">Boston, MA 02108 USA</text:span></text:p>
                <text:p text:style-name="P9"><text:span text:style-name="T4">617/723/7890</text:span></text:p>
                <text:p text:style-name="P9"><text:span text:style-name="T4">www.aberdeen.com</text:span></text:p>
              </text:list-header>
            </text:list>
          </draw:text-box>
        </draw:frame>
        <draw:custom-shape draw:style-name="gr9" draw:text-style-name="P11" draw:layer="layout" svg:width="10.441cm" svg:height="4.321cm" svg:x="7.775cm" svg:y="7.999cm">
          <text:list text:style-name="L2">
            <text:list-header>
              <text:p text:style-name="P10"><text:span text:style-name="T5">Presented as part of</text:span><text:span text:style-name="T5"><text:line-break/></text:span><text:span text:style-name="T5">Computer Associates’</text:span><text:span text:style-name="T5"><text:line-break/></text:span><text:span text:style-name="T5">CFO Executive Exchange </text:span><text:span text:style-name="T5"><text:line-break/></text:span><text:span text:style-name="T5">December 3-6, 199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header-name="hdr1" presentation:use-footer-name="ftr1" presentation:use-date-time-name="dtd1">
          <draw:frame presentation:style-name="pr3" draw:text-style-name="P12" draw:layer="layout" svg:width="14.225cm" svg:height="11.602cm" svg:x="2.588cm" svg:y="12.25cm" presentation:class="notes" presentation:placeholder="true">
            <draw:text-box/>
          </draw:frame>
          <draw:page-thumbnail draw:style-name="gr10" draw:layer="layout" svg:width="12.845cm" svg:height="9.635cm" svg:x="3.281cm" svg:y="1.949cm" draw:page-number="1" presentation:class="page"/>
        </presentation:notes>
      </draw:page>
      <draw:page draw:name="Agenda" draw:style-name="dp3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Agenda</text:p>
              </text:list-header>
            </text:list>
          </draw:text-box>
        </draw:frame>
        <draw:frame presentation:style-name="pr5" draw:text-style-name="P6" draw:layer="layout" svg:width="20.955cm" svg:height="11.43cm" svg:x="3.597cm" svg:y="5.292cm" presentation:class="outline" presentation:user-transformed="true">
          <draw:text-box>
            <text:list text:style-name="L4">
              <text:list-item>
                <text:p text:style-name="P14">Key Business Environment Planning Implications</text:p>
              </text:list-item>
              <text:list-item>
                <text:p text:style-name="P14">Management Options</text:p>
              </text:list-item>
              <text:list-item>
                <text:p text:style-name="P14">Action Recommendations</text:p>
              </text:list-item>
              <text:list-item>
                <text:p text:style-name="P14">Summary Observations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frame presentation:style-name="pr3" draw:text-style-name="P12" draw:layer="layout" svg:width="14.225cm" svg:height="11.602cm" svg:x="2.588cm" svg:y="12.25cm" presentation:class="notes" presentation:placeholder="true">
            <draw:text-box/>
          </draw:frame>
          <draw:page-thumbnail draw:style-name="gr10" draw:layer="layout" svg:width="12.845cm" svg:height="9.635cm" svg:x="3.281cm" svg:y="1.949cm" draw:page-number="2" presentation:class="page"/>
        </presentation:notes>
      </draw:page>
      <draw:page draw:name="Time Is Your Enemy" draw:style-name="dp3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Time Is Your Enemy</text:p>
              </text:list-header>
            </text:list>
          </draw:text-box>
        </draw:frame>
        <draw:frame presentation:style-name="pr5" draw:text-style-name="P6" draw:layer="layout" svg:width="22.644cm" svg:height="11.43cm" svg:x="2.752cm" svg:y="4.445cm" presentation:class="outline" presentation:user-transformed="true">
          <draw:text-box>
            <text:list text:style-name="L4">
              <text:list-item>
                <text:p text:style-name="P15"><text:span text:style-name="T6">The majority of US enterprises are acting as though they have 2-3 years to fix the numerous Y2K problems they will face</text:span></text:p>
              </text:list-item>
              <text:list-item>
                <text:p text:style-name="P15"><text:span text:style-name="T6">But to be Y2K safe on 1/1/2000, you must have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Your Y2K safe applications in place by 9/30/98 for 5 quarters of testing-cutting over to production </text:span></text:p>
                  </text:list-item>
                  <text:list-item>
                    <text:p text:style-name="P17"><text:span text:style-name="T7">Your 12-month renovation/replacement program started by 9/30/97</text:span> </text:p>
                  </text:list-item>
                </text:list>
              </text:list-item>
            </text:list>
            <text:list text:style-name="L6">
              <text:list-header>
                <text:p text:style-name="P18">If you are not working on the problem today, you may have already failed!</text:p>
              </text:list-header>
            </text:list>
          </draw:text-box>
        </draw:frame>
        <presentation:notes draw:style-name="dp2" presentation:use-header-name="hdr1" presentation:use-footer-name="ftr1" presentation:use-date-time-name="dtd1">
          <draw:frame presentation:style-name="pr3" draw:text-style-name="P12" draw:layer="layout" svg:width="14.225cm" svg:height="11.602cm" svg:x="2.588cm" svg:y="12.25cm" presentation:class="notes" presentation:placeholder="true">
            <draw:text-box/>
          </draw:frame>
          <draw:page-thumbnail draw:style-name="gr10" draw:layer="layout" svg:width="12.845cm" svg:height="9.635cm" svg:x="3.281cm" svg:y="1.949cm" draw:page-number="3" presentation:class="page"/>
        </presentation:notes>
      </draw:page>
      <draw:page draw:name="Your Customers, Suppliers and Competitors May Be In Trouble" draw:style-name="dp4" draw:master-page-name="Default" presentation:presentation-page-layout-name="AL2T1">
        <draw:frame presentation:style-name="pr4" draw:text-style-name="P6" draw:layer="layout" svg:width="23.279cm" svg:height="3.228cm" svg:x="2.116cm" svg:y="0.635cm" presentation:class="title" presentation:user-transformed="true">
          <draw:text-box>
            <text:list text:style-name="L2">
              <text:list-header>
                <text:p text:style-name="P13"><text:span text:style-name="T8">Your Customers, Suppliers and Competitors May Be In Trouble</text:span></text:p>
              </text:list-header>
            </text:list>
          </draw:text-box>
        </draw:frame>
        <draw:frame presentation:style-name="pr5" draw:text-style-name="P6" draw:layer="layout" svg:width="20.955cm" svg:height="11.43cm" svg:x="3.174cm" svg:y="5.08cm" presentation:class="outline" presentation:user-transformed="true">
          <draw:text-box>
            <text:list text:style-name="L4">
              <text:list-item>
                <text:p text:style-name="P14">Enterprises existing value chains have every probability of experiencing broken links</text:p>
              </text:list-item>
              <text:list-item>
                <text:p text:style-name="P14">This is an opportunity to move into competitors’ territory if they fail — or lose business if you fail</text:p>
              </text:list-item>
              <text:list-item>
                <text:p text:style-name="P14">You must audit the Y2K progress of customers and suppliers and test EDI links through 1999 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4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Government Agency Operations Will Be Different" draw:style-name="dp4" draw:master-page-name="Default" presentation:presentation-page-layout-name="AL2T1">
        <draw:frame presentation:style-name="pr4" draw:text-style-name="P6" draw:layer="layout" svg:width="22.86cm" svg:height="3.228cm" svg:x="2.117cm" svg:y="0.635cm" presentation:class="title" presentation:user-transformed="true">
          <draw:text-box>
            <text:list text:style-name="L2">
              <text:list-header>
                <text:p text:style-name="P13">Government Agency Operations Will Be Different</text:p>
              </text:list-header>
            </text:list>
          </draw:text-box>
        </draw:frame>
        <draw:frame presentation:style-name="pr5" draw:text-style-name="P6" draw:layer="layout" svg:width="21.59cm" svg:height="11.43cm" svg:x="3.175cm" svg:y="5.08cm" presentation:class="outline" presentation:user-transformed="true">
          <draw:text-box>
            <text:list text:style-name="L4">
              <text:list-item>
                <text:p text:style-name="P14">The vast majority of government agencies will not be able to operate during 1999 and beyond as they do in 1997</text:p>
              </text:list-item>
              <text:list-item>
                <text:p text:style-name="P14">You need to have a plan in place to comply with oversight requirements</text:p>
              </text:list-item>
              <text:list-item>
                <text:p text:style-name="P14">Pay particular attention to ensure that your non-US operations will not run afoul of local governments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5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And the US is Ahead of the Rest of the World!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And the US is Ahead of the Rest of the World!</text:p>
              </text:list-header>
            </text:list>
          </draw:text-box>
        </draw:frame>
        <draw:frame presentation:style-name="pr5" draw:text-style-name="P6" draw:layer="layout" svg:width="22.856cm" svg:height="11.43cm" svg:x="2.54cm" svg:y="4.445cm" presentation:class="outline" presentation:user-transformed="true">
          <draw:text-box>
            <text:list text:style-name="L4">
              <text:list-item>
                <text:p text:style-name="P20"><text:span text:style-name="T9">European enterprises are more concerned with the European Monetary Unit issue — there is a business-to-business requirement for 1/1/1999</text:span></text:p>
              </text:list-item>
            </text:list>
            <text:list text:style-name="L5">
              <text:list-item>
                <text:list>
                  <text:list-item>
                    <text:p text:style-name="P21">Plans to get to the Y2K problem after the EMU — puts Europe 12-24 months behind the US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9">Cultural: Asia/Pacific management does not want to hear the bad Y2K news</text:span></text:p>
              </text:list-item>
              <text:list-item>
                <text:p text:style-name="P20"><text:span text:style-name="T9">Need to assess the impact of Y2K failures in non-US enterprises on your operations</text:span>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6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Few Best Practices  and Few Willing Volunteers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Few Best Practices <text:line-break/>and Few Willing Volunteers</text:p>
              </text:list-header>
            </text:list>
          </draw:text-box>
        </draw:frame>
        <draw:frame presentation:style-name="pr5" draw:text-style-name="P6" draw:layer="layout" svg:width="21.59cm" svg:height="11.43cm" svg:x="2.752cm" svg:y="4.445cm" presentation:class="outline" presentation:user-transformed="true">
          <draw:text-box>
            <text:list text:style-name="L4">
              <text:list-item>
                <text:p text:style-name="P22"><text:span text:style-name="T6">The normally considered prudent IT strategy of being a fast-second is not applicable to the Y2K problem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Until 1/1/2000, nobody can show if their Y2K corrective actions worked — therefore, no way of judging best practices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6">Business and IT managers and staff want to leave the Y2K problem to anybody else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Very few see a hero’s role</text:span></text:p>
                  </text:list-item>
                  <text:list-item>
                    <text:p text:style-name="P16"><text:span text:style-name="T7">Realistic IT managers expect at best to receive a “C</text:span><text:span text:style-name="T10">+</text:span><text:span text:style-name="T7">” for all their effort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7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Y2K Adds a New Component To Business Decisions" draw:style-name="dp4" draw:master-page-name="Default" presentation:presentation-page-layout-name="AL2T1">
        <draw:frame presentation:style-name="pr4" draw:text-style-name="P6" draw:layer="layout" svg:width="23.071cm" svg:height="3.228cm" svg:x="2.116cm" svg:y="0.635cm" presentation:class="title" presentation:user-transformed="true">
          <draw:text-box>
            <text:list text:style-name="L2">
              <text:list-header>
                <text:p text:style-name="P13">Y2K Adds a New Component To Business Decisions</text:p>
              </text:list-header>
            </text:list>
          </draw:text-box>
        </draw:frame>
        <draw:frame presentation:style-name="pr5" draw:text-style-name="P6" draw:layer="layout" svg:width="22.221cm" svg:height="11.43cm" svg:x="3.174cm" svg:y="5.08cm" presentation:class="outline" presentation:user-transformed="true">
          <draw:text-box>
            <text:list text:style-name="L4">
              <text:list-item>
                <text:p text:style-name="P23">All proposed acquisitions need to be evaluated for potential Y2K problems</text:p>
              </text:list-item>
              <text:list-item>
                <text:p text:style-name="P23">Some economists are forecasting a 1999 business slow down in part due to Y2K resource requirements</text:p>
              </text:list-item>
              <text:list-item>
                <text:p text:style-name="P23">Material Y2K expenses are starting to be reported in financial statements</text:p>
              </text:list-item>
              <text:list-item>
                <text:p text:style-name="P23">Speculatively, some tax regulations may be changed to permit agency compliance auditing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8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Nobody Really Understands the Liabilities and Costs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Nobody Really Understands the Liabilities and Costs</text:p>
              </text:list-header>
            </text:list>
          </draw:text-box>
        </draw:frame>
        <draw:frame presentation:style-name="pr5" draw:text-style-name="P6" draw:layer="layout" svg:width="22.856cm" svg:height="11.43cm" svg:x="2.328cm" svg:y="4.657cm" presentation:class="outline" presentation:user-transformed="true">
          <draw:text-box>
            <text:list text:style-name="L4">
              <text:list-item>
                <text:p text:style-name="P20"><text:span text:style-name="T9">Your enterprise’s president should have an active and monitored Y2K compliance plan in place — NOW!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Directors and Officers Insurance should specify Y2K protection</text:span></text:p>
                  </text:list-item>
                  <text:list-item>
                    <text:p text:style-name="P24"><text:span text:style-name="T11">Note that lawyers are trying to make individuals liable for failures</text:span></text:p>
                  </text:list-item>
                  <text:list-item>
                    <text:p text:style-name="P24"><text:span text:style-name="T11">Y2K meetings held with corporate counsel</text:span></text:p>
                  </text:list-item>
                  <text:list-item>
                    <text:p text:style-name="P24"><text:span text:style-name="T11">Failed operations will not be brought back to life by litigation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9">The constraint to fixing the Y2K problem is </text:span><text:span text:style-name="T12">people resources</text:span><text:span text:style-name="T9"> — not money</text:span>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9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Why Management  Does Not Act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Why Management <text:line-break/>Does Not Act</text:p>
              </text:list-header>
            </text:list>
          </draw:text-box>
        </draw:frame>
        <draw:frame presentation:style-name="pr5" draw:text-style-name="P6" draw:layer="layout" svg:width="21.798cm" svg:height="11.43cm" svg:x="3.598cm" svg:y="4.445cm" presentation:class="outline" presentation:user-transformed="true">
          <draw:text-box>
            <text:list text:style-name="L4">
              <text:list-item>
                <text:p text:style-name="P20"><text:span text:style-name="T9">Management does not act because it neither understands the business and technical issues nor does it trust the messengers</text:span></text:p>
              </text:list-item>
              <text:list-item>
                <text:p text:style-name="P20"><text:span text:style-name="T9">Technically, Y2K is too big a problem — it encompasses the enterprise’s entire infrastructure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7">Computer hardware — PC-to-mainframe</text:span></text:p>
                  </text:list-item>
                  <text:list-item>
                    <text:p text:style-name="P25"><text:span text:style-name="T7">Systems software</text:span></text:p>
                  </text:list-item>
                  <text:list-item>
                    <text:p text:style-name="P25"><text:span text:style-name="T7">Applications software</text:span></text:p>
                  </text:list-item>
                  <text:list-item>
                    <text:p text:style-name="P25"><text:span text:style-name="T7">Embedded systems</text:span></text:p>
                  </text:list-item>
                  <text:list-item>
                    <text:p text:style-name="P21"><text:span text:style-name="T7">Telecommunications</text:span>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0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Why Management <text:line-break/>Does Not Act</text:p>
              </text:list-header>
            </text:list>
          </draw:text-box>
        </draw:frame>
        <draw:frame presentation:style-name="pr5" draw:text-style-name="P6" draw:layer="layout" svg:width="21.59cm" svg:height="11.43cm" svg:x="3.175cm" svg:y="4.657cm" presentation:class="outline" presentation:user-transformed="true">
          <draw:text-box>
            <text:list text:style-name="L4">
              <text:list-item>
                <text:p text:style-name="P23">Each new internal evaluation of the costs required to internally fix the Y2K problem escalates </text:p>
              </text:list-item>
            </text:list>
            <text:list text:style-name="L5">
              <text:list-item>
                <text:list>
                  <text:list-item>
                    <text:p text:style-name="P21">“Can’t manage it without firm cost projections”</text:p>
                  </text:list-item>
                </text:list>
              </text:list-item>
            </text:list>
            <text:list text:style-name="L4">
              <text:list-item>
                <text:p text:style-name="P23">Cannot realistically analyze potential business disruption impacts</text:p>
              </text:list-item>
            </text:list>
            <text:list text:style-name="L5">
              <text:list-item>
                <text:list>
                  <text:list-item>
                    <text:p text:style-name="P21">Are IT staff alarmists or realists?</text:p>
                  </text:list-item>
                  <text:list-item>
                    <text:p text:style-name="P21">How do you evaluate if you can trust the global economic infrastructure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1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Management Options — Strategy Stages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Management Options — Strategy Stages</text:p>
              </text:list-header>
            </text:list>
          </draw:text-box>
        </draw:frame>
        <draw:frame presentation:style-name="pr5" draw:text-style-name="P6" draw:layer="layout" svg:width="21.59cm" svg:height="11.43cm" svg:x="3.387cm" svg:y="4.233cm" presentation:class="outline" presentation:user-transformed="true">
          <draw:text-box>
            <text:list text:style-name="L4">
              <text:list-item>
                <text:p text:style-name="P14">Deny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1">“</text:span><text:span text:style-name="T11">The problem will be fixed or go way”</text:span></text:p>
                  </text:list-item>
                  <text:list-item>
                    <text:p text:style-name="P26"><text:span text:style-name="T11">“</text:span><text:span text:style-name="T11">It’s somebody else’s problem”</text:span></text:p>
                  </text:list-item>
                  <text:list-item>
                    <text:p text:style-name="P26"><text:span text:style-name="T11">“</text:span><text:span text:style-name="T11">Our people are too smart to have let this problem occur here”</text:span></text:p>
                  </text:list-item>
                </text:list>
              </text:list-item>
            </text:list>
            <text:list text:style-name="L4">
              <text:list-item>
                <text:p text:style-name="P14">Bargain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1">Fix the problem but at the lowest IT cost while increasing operational effectiveness</text:span></text:p>
                  </text:list-item>
                </text:list>
              </text:list-item>
            </text:list>
            <text:list text:style-name="L4">
              <text:list-item>
                <text:p text:style-name="P14">Accept and Take Positive Action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2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Management Options — Acceptance Tactics 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Management Options — Acceptance Tactics </text:p>
              </text:list-header>
            </text:list>
          </draw:text-box>
        </draw:frame>
        <draw:frame presentation:style-name="pr5" draw:text-style-name="P6" draw:layer="layout" svg:width="22.644cm" svg:height="11.43cm" svg:x="2.752cm" svg:y="4.233cm" presentation:class="outline" presentation:user-transformed="true">
          <draw:text-box>
            <text:list text:style-name="L4">
              <text:list-item>
                <text:p text:style-name="P20"><text:span text:style-name="T9">Discard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3">The application is no longer required — put it in the trash can </text:span></text:p>
                  </text:list-item>
                  <text:list-item>
                    <text:p text:style-name="P27"><text:span text:style-name="T13">The business operation is no longer necessary — sell it off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9">Repair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3">Initiate and support efforts to fix existing applications</text:span></text:p>
                    <text:list>
                      <text:list-item>
                        <text:p text:style-name="P28">But too often ignores underlying systems softwa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0"><text:span text:style-name="T9">Replace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3">New systems and applica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3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But Evaluating Options from a Management Perspective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But Evaluating Options from a Management Perspective</text:p>
              </text:list-header>
            </text:list>
          </draw:text-box>
        </draw:frame>
        <draw:frame presentation:style-name="pr5" draw:text-style-name="P6" draw:layer="layout" svg:width="21.59cm" svg:height="11.43cm" svg:x="3.175cm" svg:y="4.657cm" presentation:class="outline" presentation:user-transformed="true">
          <draw:text-box>
            <text:list text:style-name="L4">
              <text:list-item>
                <text:p text:style-name="P14">Discard After Triage</text:p>
              </text:list-item>
            </text:list>
            <text:list text:style-name="L5">
              <text:list-item>
                <text:list>
                  <text:list-item>
                    <text:p text:style-name="P17">Much “C-level” code that was originally thought to be unnecessary (from using the A-B-C method) turns out to be required to support “A-level”</text:p>
                  </text:list-item>
                  <text:list-item>
                    <text:p text:style-name="P17">Incremental gross margins of business operations often provide significant overhead contributions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0"><text:span text:style-name="T12">Discard requires thoughtful management analysis</text:span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4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But Evaluating Options from a Management Perspective</text:p>
              </text:list-header>
            </text:list>
          </draw:text-box>
        </draw:frame>
        <draw:frame presentation:style-name="pr5" draw:text-style-name="P6" draw:layer="layout" svg:width="22.221cm" svg:height="11.43cm" svg:x="3.174cm" svg:y="4.445cm" presentation:class="outline" presentation:user-transformed="true">
          <draw:text-box>
            <text:list text:style-name="L4">
              <text:list-item>
                <text:p text:style-name="P22"><text:span text:style-name="T6">Repair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Inter-relatedness of many undocumented mainframe applications creates a very high and real risk of failure</text:span></text:p>
                    <text:list>
                      <text:list-item>
                        <text:p text:style-name="P31"><text:span text:style-name="T7">Good luck with version control and program interface documentation and modification</text:span></text:p>
                      </text:list-item>
                    </text:list>
                  </text:list-item>
                  <text:list-item>
                    <text:p text:style-name="P16"><text:span text:style-name="T7">Undocumented, older, non-COBOL systems and application software may not be repairable</text:span></text:p>
                  </text:list-item>
                  <text:list-item>
                    <text:p text:style-name="P16"><text:span text:style-name="T7">Who is qualified and available to reliably repair the existing systems?</text:span></text:p>
                  </text:list-item>
                  <text:list-item>
                    <text:p text:style-name="P16"><text:span text:style-name="T7">Repair efforts must be expensed when incurred</text:span></text:p>
                    <text:list>
                      <text:list-item>
                        <text:p text:style-name="P31"><text:span text:style-name="T7">Depresses quarterly earnings per sh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5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But Evaluating Options from a Management Perspective</text:p>
              </text:list-header>
            </text:list>
          </draw:text-box>
        </draw:frame>
        <draw:frame presentation:style-name="pr5" draw:text-style-name="P6" draw:layer="layout" svg:width="22.221cm" svg:height="11.43cm" svg:x="3.174cm" svg:y="4.233cm" presentation:class="outline" presentation:user-transformed="true">
          <draw:text-box>
            <text:list text:style-name="L4">
              <text:list-item>
                <text:p text:style-name="P14">Replace</text:p>
              </text:list-item>
            </text:list>
            <text:list text:style-name="L5">
              <text:list-item>
                <text:list>
                  <text:list-item>
                    <text:p text:style-name="P17">If you want to replace/re-engineer business processes — you are now 2 years too late</text:p>
                  </text:list-item>
                  <text:list-item>
                    <text:p text:style-name="P17">If you want to replace/replicate current functionality, it is possible if you move fast with your best executive talent</text:p>
                    <text:list>
                      <text:list-item>
                        <text:p text:style-name="P32">Replace/replicate will provide a state-of-the-art infrastructure on which to build in the future</text:p>
                      </text:list-item>
                    </text:list>
                  </text:list-item>
                  <text:list-item>
                    <text:p text:style-name="P17">Replacement costs can be capitalized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6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Managing Under Uncertainty and to Minimize Risk" draw:style-name="dp4" draw:master-page-name="Default" presentation:presentation-page-layout-name="AL2T1">
        <draw:frame presentation:style-name="pr4" draw:text-style-name="P6" draw:layer="layout" svg:width="23.071cm" svg:height="3.228cm" svg:x="2.116cm" svg:y="0.635cm" presentation:class="title" presentation:user-transformed="true">
          <draw:text-box>
            <text:list text:style-name="L2">
              <text:list-header>
                <text:p text:style-name="P13">Managing Under Uncertainty and to Minimize Risk</text:p>
              </text:list-header>
            </text:list>
          </draw:text-box>
        </draw:frame>
        <draw:frame presentation:style-name="pr5" draw:text-style-name="P6" draw:layer="layout" svg:width="21.59cm" svg:height="11.43cm" svg:x="3.175cm" svg:y="5.08cm" presentation:class="outline" presentation:user-transformed="true">
          <draw:text-box>
            <text:list text:style-name="L4">
              <text:list-item>
                <text:p text:style-name="P33"><text:span text:style-name="T9">Don’t shoot the messengers</text:span></text:p>
              </text:list-item>
              <text:list-item>
                <text:p text:style-name="P33"><text:span text:style-name="T9">Establish a powerful Y2K Office with a strong, enterprise-motivated leader</text:span></text:p>
              </text:list-item>
              <text:list-item>
                <text:p text:style-name="P33"><text:span text:style-name="T9">Arm the Y2K Office with a 3rd-party Y2K methodology that is continuously updated</text:span></text:p>
              </text:list-item>
              <text:list-item>
                <text:p text:style-name="P33"><text:span text:style-name="T9">Identify </text:span><text:span text:style-name="T12">all</text:span><text:span text:style-name="T9"> enterprise assets that may be at risk and assess the level of risk and potential impact</text:span>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7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Moving to Action" draw:style-name="dp4" draw:master-page-name="Default" presentation:presentation-page-layout-name="AL2T1">
        <draw:frame presentation:style-name="pr4" draw:text-style-name="P6" draw:layer="layout" svg:width="22.648cm" svg:height="3.228cm" svg:x="2.117cm" svg:y="0.635cm" presentation:class="title" presentation:user-transformed="true">
          <draw:text-box>
            <text:list text:style-name="L2">
              <text:list-header>
                <text:p text:style-name="P13">Moving to Action</text:p>
              </text:list-header>
            </text:list>
          </draw:text-box>
        </draw:frame>
        <draw:frame presentation:style-name="pr5" draw:text-style-name="P6" draw:layer="layout" svg:width="23.067cm" svg:height="11.43cm" svg:x="2.116cm" svg:y="4.445cm" presentation:class="outline" presentation:user-transformed="true">
          <draw:text-box>
            <text:list text:style-name="L4">
              <text:list-item>
                <text:p text:style-name="P15"><text:span text:style-name="T6">Separate information assets into the following priority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7">Customer touch</text:span></text:p>
                    <text:list>
                      <text:list-item>
                        <text:p text:style-name="P34"><text:span text:style-name="T14">Billing, order processing, telecommunications, customer service</text:span></text:p>
                      </text:list-item>
                    </text:list>
                  </text:list-item>
                  <text:list-item>
                    <text:p text:style-name="P25"><text:span text:style-name="T7">Internal process management</text:span></text:p>
                    <text:list>
                      <text:list-item>
                        <text:p text:style-name="P34"><text:span text:style-name="T14">Manufacturing scheduling, purchasing, inventory control</text:span></text:p>
                      </text:list-item>
                    </text:list>
                  </text:list-item>
                  <text:list-item>
                    <text:p text:style-name="P25"><text:span text:style-name="T7">Organizational effectiveness</text:span></text:p>
                    <text:list>
                      <text:list-item>
                        <text:p text:style-name="P34"><text:span text:style-name="T14">Office automation, records manage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6">Repair or Replace functionality by priority</text:span></text:p>
              </text:list-item>
              <text:list-item>
                <text:p text:style-name="P22"><text:span text:style-name="T6">Do not delay on tool decisions — need to make action priority moving to testing ASAP</text:span>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8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Your Operational Rules May Need Changing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Your Operational Rules May Need Changing</text:p>
              </text:list-header>
            </text:list>
          </draw:text-box>
        </draw:frame>
        <draw:frame presentation:style-name="pr5" draw:text-style-name="P6" draw:layer="layout" svg:width="22.221cm" svg:height="11.43cm" svg:x="3.174cm" svg:y="5.08cm" presentation:class="outline" presentation:user-transformed="true">
          <draw:text-box>
            <text:list text:style-name="L4">
              <text:list-item>
                <text:p text:style-name="P22"><text:span text:style-name="T6">The Y2K management process now becomes an exercise in Triage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Some currently automated functions may have to go back to manual methods temporarily</text:span></text:p>
                  </text:list-item>
                  <text:list-item>
                    <text:p text:style-name="P16"><text:span text:style-name="T7">Work directly with your customers, suppliers, and government agencies that oversee your operations to ensure that your Y2K Triage plans are all compatible</text:span></text:p>
                  </text:list-item>
                  <text:list-item>
                    <text:p text:style-name="P16"><text:span text:style-name="T7">You may have to delay initiating planned IT-based productivity improvement projects until your business-critical systems are Y2K stable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19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Take a War-Time Attitude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Take a War-Time Attitude</text:p>
              </text:list-header>
            </text:list>
          </draw:text-box>
        </draw:frame>
        <draw:frame presentation:style-name="pr5" draw:text-style-name="P6" draw:layer="layout" svg:width="22.221cm" svg:height="11.43cm" svg:x="3.174cm" svg:y="4.445cm" presentation:class="outline" presentation:user-transformed="true">
          <draw:text-box>
            <text:list text:style-name="L4">
              <text:list-item>
                <text:p text:style-name="P35"><text:span text:style-name="T15">Move quickly — every delay only increases the risks of catastrophe</text:span></text:p>
              </text:list-item>
              <text:list-item>
                <text:p text:style-name="P35"><text:span text:style-name="T15">Select your allies to help you manage through this problem smartly and quickly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Reputable suppliers are running out of capacity</text:span></text:p>
                  </text:list-item>
                </text:list>
              </text:list-item>
            </text:list>
            <text:list text:style-name="L4">
              <text:list-item>
                <text:p text:style-name="P35"><text:span text:style-name="T15">Closely monitor both internal progress and that of members of your value chain</text:span></text:p>
              </text:list-item>
              <text:list-item>
                <text:p text:style-name="P35"><text:span text:style-name="T15">Be pragmatic, not theoretical</text:span></text:p>
              </text:list-item>
              <text:list-item>
                <text:p text:style-name="P35"><text:span text:style-name="T15">Take advantage of competitors’ mis-steps</text:span></text:p>
              </text:list-item>
              <text:list-item>
                <text:p text:style-name="P35"><text:span text:style-name="T15">Let the next generation of managers worry about paying for your efforts</text:span></text:p>
              </text:list-item>
            </text:list>
          </draw:text-box>
        </draw:frame>
        <presentation:notes draw:style-name="dp5">
          <draw:page-thumbnail draw:style-name="gr11" draw:layer="layout" svg:width="12.845cm" svg:height="9.635cm" svg:x="3.28cm" svg:y="1.948cm" draw:page-number="20" presentation:class="page"/>
          <draw:frame presentation:style-name="pr6" draw:text-style-name="P19" draw:layer="layout" svg:width="14.225cm" svg:height="11.602cm" svg:x="2.588cm" svg:y="12.25cm" presentation:class="notes" presentation:placeholder="true">
            <draw:text-box/>
          </draw:frame>
        </presentation:notes>
      </draw:page>
      <draw:page draw:name="Concluding Observations" draw:style-name="dp4" draw:master-page-name="Default" presentation:presentation-page-layout-name="AL2T1">
        <draw:frame presentation:style-name="pr4" draw:text-style-name="P6" draw:layer="layout" svg:width="21.59cm" svg:height="3.228cm" svg:x="2.117cm" svg:y="0.635cm" presentation:class="title" presentation:user-transformed="true">
          <draw:text-box>
            <text:list text:style-name="L2">
              <text:list-header>
                <text:p text:style-name="P13">Concluding Observations</text:p>
              </text:list-header>
            </text:list>
          </draw:text-box>
        </draw:frame>
        <draw:frame presentation:style-name="pr5" draw:text-style-name="P6" draw:layer="layout" svg:width="22.221cm" svg:height="11.43cm" svg:x="2.962cm" svg:y="4.445cm" presentation:class="outline" presentation:user-transformed="true">
          <draw:text-box>
            <text:list text:style-name="L4">
              <text:list-item>
                <text:p text:style-name="P22"><text:span text:style-name="T17">Only you and your enterprise's executive team can make the decisions and take the unique actions necessary to manage through the Y2K tsunami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And both business and technical trade-offs will be required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7">Don’t lose site of what should be your primary objective: </text:span><text:span text:style-name="T18">Keeping Your Enterprise Operating Profitably Past 2000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9">And ideally, improving your position <text:s/>compared to your competito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0" draw:layer="layout" svg:width="12.845cm" svg:height="9.635cm" svg:x="3.281cm" svg:y="1.949cm" draw:page-number="21" presentation:class="page"/>
          <draw:frame presentation:style-name="pr3" draw:text-style-name="P12" draw:layer="layout" svg:width="14.225cm" svg:height="11.602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mdITC Bk BT" svg:font-family="'GarmdITC Bk B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ef8f3" draw:end-color="#ffcc99" draw:start-intensity="100%" draw:end-intensity="100%" draw:angle="0deg" draw:border="0%">
      <loext:gradient-stop svg:offset="0" loext:color-type="rgb" loext:color-value="#fef8f3"/>
      <loext:gradient-stop svg:offset="1" loext:color-type="rgb" loext:color-value="#ffcc99"/>
    </draw:gradient>
    <draw:gradient draw:name="Gradient_20_2" draw:display-name="Gradient 2" draw:style="linear" draw:start-color="#f3f3fe" draw:end-color="#9999ff" draw:start-intensity="100%" draw:end-intensity="100%" draw:angle="0deg" draw:border="0%">
      <loext:gradient-stop svg:offset="0" loext:color-type="rgb" loext:color-value="#f3f3fe"/>
      <loext:gradient-stop svg:offset="1" loext:color-type="rgb" loext:color-value="#9999ff"/>
    </draw:gradient>
    <draw:gradient draw:name="Gradient_20_3" draw:display-name="Gradient 3" draw:style="linear" draw:start-color="#fef3e9" draw:end-color="#ff9933" draw:start-intensity="100%" draw:end-intensity="100%" draw:angle="0deg" draw:border="0%">
      <loext:gradient-stop svg:offset="0" loext:color-type="rgb" loext:color-value="#fef3e9"/>
      <loext:gradient-stop svg:offset="1" loext:color-type="rgb" loext:color-value="#ff99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9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9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19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19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19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19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19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19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655cm"/>
          <style:tab-stop style:position="5.309cm"/>
          <style:tab-stop style:position="7.964cm"/>
          <style:tab-stop style:position="10.619cm"/>
          <style:tab-stop style:position="13.273cm"/>
          <style:tab-stop style:position="15.928cm"/>
          <style:tab-stop style:position="18.583cm"/>
          <style:tab-stop style:position="21.237cm"/>
          <style:tab-stop style:position="23.892cm"/>
          <style:tab-stop style:position="26.547cm"/>
          <style:tab-stop style:position="29.2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28cm" fo:padding-bottom="0.128cm" fo:padding-left="0.256cm" fo:padding-right="0.256cm" style:writing-mode="lr-tb">
        <text:list-style style:name="Default-outline1">
          <text:list-level-style-bullet text:level="1" text:bullet-char="">
            <style:list-level-properties text:min-label-width="0.953cm"/>
            <style:text-properties fo:font-family="'Monotype Sorts'" style:font-pitch="variable" style:font-charset="x-symbol" fo:color="#ff9933" fo:font-size="7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Noto Sans Devanagari" style:font-family-complex="'Noto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">
            <style:list-level-properties text:min-label-width="0.953cm"/>
            <style:text-properties fo:font-family="'Monotype Sorts'" style:font-pitch="variable" style:font-charset="x-symbol" fo:color="#ff9933" fo:font-size="7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ff9933" fo:font-size="75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Noto Sans Devanagari" style:font-family-complex="'Noto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Noto Sans Devanagari" style:font-family-complex="'Noto Sans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618ffd" draw:textarea-horizontal-align="justify" draw:textarea-vertical-align="top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618ffd" draw:textarea-horizontal-align="justify" draw:textarea-vertical-align="top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618ffd" draw:textarea-horizontal-align="justify" draw:textarea-vertical-align="bottom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618ffd" draw:textarea-horizontal-align="justify" draw:textarea-vertical-align="bottom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ffffcc" loext:decorative="false"/>
      <style:paragraph-properties style:writing-mode="lr-tb"/>
    </style:style>
    <style:style style:name="Mgr7" style:family="graphic">
      <style:graphic-properties style:writing-mode="lr-tb" loext:decorative="false"/>
    </style:style>
    <style:style style:name="Mgr8" style:family="graphic">
      <style:graphic-properties draw:stroke="none" draw:fill="gradient" draw:fill-color="#ffcc99" draw:fill-gradient-name="Gradient_20_1" draw:textarea-horizontal-align="left" draw:textarea-vertical-align="middle" draw:auto-grow-height="false" fo:min-height="18.755cm" fo:min-width="0.162cm" fo:padding-top="0.13cm" fo:padding-bottom="0.13cm" fo:padding-left="0.25cm" fo:padding-right="0.25cm" fo:wrap-option="no-wrap" draw:shadow-color="#ffffcc" loext:decorative="false"/>
    </style:style>
    <style:style style:name="Mgr9" style:family="graphic">
      <style:graphic-properties draw:stroke="none" draw:fill="gradient" draw:fill-color="#ffcc99" draw:fill-gradient-name="Gradient_20_1" draw:textarea-horizontal-align="left" draw:textarea-vertical-align="middle" draw:auto-grow-height="false" fo:min-height="12.705cm" fo:min-width="0.537cm" fo:padding-top="0.13cm" fo:padding-bottom="0.13cm" fo:padding-left="0.25cm" fo:padding-right="0.25cm" fo:wrap-option="no-wrap" draw:shadow-color="#ffffcc" loext:decorative="false"/>
    </style:style>
    <style:style style:name="Mgr10" style:family="graphic">
      <style:graphic-properties draw:stroke="none" draw:fill="gradient" draw:fill-color="#ffcc99" draw:fill-gradient-name="Gradient_20_1" draw:textarea-horizontal-align="left" draw:textarea-vertical-align="middle" draw:auto-grow-height="false" fo:min-height="9.053cm" fo:min-width="2.508cm" fo:padding-top="0.13cm" fo:padding-bottom="0.13cm" fo:padding-left="0.25cm" fo:padding-right="0.25cm" fo:wrap-option="no-wrap" draw:shadow-color="#ffffcc" loext:decorative="false"/>
    </style:style>
    <style:style style:name="Mgr11" style:family="graphic">
      <style:graphic-properties draw:stroke="none" draw:fill="gradient" draw:fill-color="#9999ff" draw:fill-gradient-name="Gradient_20_2" draw:textarea-horizontal-align="left" draw:textarea-vertical-align="middle" draw:auto-grow-height="false" fo:min-height="10.535cm" fo:min-width="0.347cm" fo:padding-top="0.13cm" fo:padding-bottom="0.13cm" fo:padding-left="0.25cm" fo:padding-right="0.25cm" fo:wrap-option="no-wrap" draw:shadow-color="#ffffcc" loext:decorative="false"/>
    </style:style>
    <style:style style:name="Mgr12" style:family="graphic">
      <style:graphic-properties draw:stroke="none" draw:fill="gradient" draw:fill-color="#ff9933" draw:fill-gradient-name="Gradient_20_3" draw:textarea-horizontal-align="left" draw:textarea-vertical-align="middle" draw:auto-grow-height="false" fo:min-height="3.126cm" fo:min-width="0.959cm" fo:padding-top="0.13cm" fo:padding-bottom="0.13cm" fo:padding-left="0.25cm" fo:padding-right="0.25cm" fo:wrap-option="no-wrap" draw:shadow-color="#ffffcc" loext:decorative="false"/>
    </style:style>
    <style:style style:name="Mgr13" style:family="graphic">
      <style:graphic-properties draw:stroke="none" draw:fill="gradient" draw:fill-color="#ffcc99" draw:fill-gradient-name="Gradient_20_1" draw:textarea-horizontal-align="left" draw:textarea-vertical-align="middle" draw:auto-grow-height="false" fo:min-height="0.11cm" fo:min-width="23.458cm" fo:padding-top="0.13cm" fo:padding-bottom="0.13cm" fo:padding-left="0.25cm" fo:padding-right="0.25cm" fo:wrap-option="no-wrap" draw:shadow-color="#ffffcc" loext:decorative="false"/>
    </style:style>
    <style:style style:name="Mgr14" style:family="graphic" style:parent-style-name="standard">
      <style:graphic-properties draw:stroke="solid" svg:stroke-width="0.035cm" svg:stroke-color="#ff99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ffcc" loext:decorative="false"/>
    </style:style>
    <style:style style:name="Mgr15" style:family="graphic" style:list-style-name="ML3">
      <style:graphic-properties draw:stroke="none" draw:fill="none" draw:fill-color="#ff993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ffffcc" loext:decorative="false"/>
      <style:paragraph-properties style:writing-mode="lr-tb"/>
    </style:style>
    <style:style style:name="Mgr16" style:family="graphic" style:list-style-name="ML2">
      <style:graphic-properties draw:stroke="none" draw:fill="none" draw:fill-color="#ff993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ffffcc" loext:decorative="false"/>
      <style:paragraph-properties style:writing-mode="lr-tb"/>
    </style:style>
    <style:style style:name="Mgr17" style:family="graphic" style:parent-style-name="standard">
      <style:graphic-properties draw:stroke="none" draw:fill="none" draw:fill-color="#618ffd" draw:textarea-horizontal-align="justify" draw:textarea-vertical-align="top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gr18" style:family="graphic" style:parent-style-name="standard">
      <style:graphic-properties draw:stroke="none" draw:fill="none" draw:fill-color="#618ffd" draw:textarea-horizontal-align="justify" draw:textarea-vertical-align="bottom" draw:auto-grow-height="false" draw:auto-grow-width="false" fo:min-height="1.293cm" fo:min-width="0cm" fo:padding-top="0cm" fo:padding-bottom="0cm" fo:padding-left="0.053cm" fo:padding-right="0.053cm" fo:wrap-option="wrap" draw:shadow-color="#919191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3" style:family="paragraph">
      <loext:graphic-properties draw:fill="none" draw:fill-color="#618ffd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4" style:family="paragraph">
      <style:paragraph-properties fo:margin-left="0cm" fo:margin-right="0cm" fo:line-height="100%" fo:text-align="end" fo:text-indent="0cm" loext:tab-stop-distance="0cm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5" style:family="paragraph">
      <loext:graphic-properties draw:fill="none" draw:fill-color="#618ffd"/>
      <style:paragraph-properties fo:margin-left="0cm" fo:margin-right="0cm" fo:line-height="100%" fo:text-align="end" fo:text-indent="0cm" loext:tab-stop-distance="0cm" style:font-independent-line-spacing="true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6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993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993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ff993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gradient" draw:fill-color="#ffcc99" draw:fill-gradient-name="Gradient_20_1"/>
      <style:paragraph-properties style:font-independent-line-spacing="true"/>
    </style:style>
    <style:style style:name="MP13" style:family="paragraph">
      <loext:graphic-properties draw:fill="gradient" draw:fill-color="#9999ff" draw:fill-gradient-name="Gradient_20_2"/>
      <style:paragraph-properties style:font-independent-line-spacing="true"/>
    </style:style>
    <style:style style:name="MP14" style:family="paragraph">
      <loext:graphic-properties draw:fill="gradient" draw:fill-color="#ff9933" draw:fill-gradient-name="Gradient_20_3"/>
      <style:paragraph-properties style:font-independent-line-spacing="true"/>
    </style:style>
    <style:style style:name="MP15" style:family="paragraph">
      <loext:graphic-properties draw:fill="none" draw:fill-color="#ffffff"/>
      <style:paragraph-properties fo:text-align="center"/>
    </style:style>
    <style:style style:name="MP16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9933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style:paragraph-properties fo:margin-left="0cm" fo:margin-right="0cm" fo:text-indent="0cm" loext:tab-stop-distance="0cm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19" style:family="paragraph">
      <loext:graphic-properties draw:fill="none" draw:fill-color="#618ffd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20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P21" style:family="paragraph">
      <loext:graphic-properties draw:fill="none" draw:fill-color="#618ffd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646cm"/>
          <style:tab-stop style:position="5.292cm"/>
          <style:tab-stop style:position="7.938cm"/>
          <style:tab-stop style:position="10.583cm"/>
          <style:tab-stop style:position="13.229cm"/>
          <style:tab-stop style:position="15.875cm"/>
          <style:tab-stop style:position="18.521cm"/>
          <style:tab-stop style:position="21.167cm"/>
          <style:tab-stop style:position="23.813cm"/>
          <style:tab-stop style:position="26.458cm"/>
          <style:tab-stop style:position="29.104cm"/>
        </style:tab-stops>
      </style:paragraph-properties>
    </style:style>
    <style:style style:name="MT1" style:family="text">
      <style:text-properties fo:color="#000000" loext:opacity="100%"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GarmdITC Bk BT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style:font-name="GarmdITC Bk BT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MT5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MT6" style:family="text">
      <style:text-properties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8cm" svg:x="0cm" svg:y="0cm">
        <text:p/>
      </draw:rect>
      <draw:frame draw:style-name="Mgr2" draw:text-style-name="MP3" draw:layer="backgroundobjects" svg:width="8.409cm" svg:height="1.292cm" svg:x="-0.001cm" svg:y="0cm" presentation:class="header">
        <draw:text-box>
          <text:list text:style-name="ML2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1cm" svg:height="1.292cm" svg:x="10.993cm" svg:y="0cm" presentation:class="date-time">
        <draw:text-box>
          <text:list text:style-name="ML2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409cm" svg:height="1.292cm" svg:x="-0.001cm" svg:y="24.492cm" presentation:class="footer">
        <draw:text-box>
          <text:list text:style-name="ML2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1cm" svg:height="1.292cm" svg:x="10.993cm" svg:y="24.492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7" draw:layer="backgroundobjects" svg:width="5.292cm" svg:height="1.27cm" svg:x="1.905cm" svg:y="17.357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6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draw:style-name="Mgr6" draw:text-style-name="MP11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g draw:style-name="Mgr7">
        <draw:custom-shape draw:style-name="Mgr8" draw:text-style-name="MP12" draw:layer="backgroundobjects" svg:width="0.662cm" svg:height="19.015cm" svg:x="0.657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37cm" svg:height="12.965cm" svg:x="1.221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3.008cm" svg:height="9.313cm" svg:x="0.895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0.847cm" svg:height="10.795cm" svg:x="1.129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1.459cm" svg:height="3.386cm" svg:x="1.645cm" svg:y="4.075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2" draw:layer="backgroundobjects" svg:width="23.958cm" svg:height="0.37cm" svg:x="1.411cm" svg:y="3.916cm">
          <text:p/>
          <draw:enhanced-geometry svg:viewBox="0 0 21600 21600" draw:type="rectangle" draw:enhanced-path="M 0 0 L 21600 0 21600 21600 0 21600 0 0 Z N"/>
        </draw:custom-shape>
        <draw:line draw:style-name="Mgr14" draw:text-style-name="MP15" draw:layer="backgroundobjects" svg:x1="0.445cm" svg:y1="3.916cm" svg:x2="25.157cm" svg:y2="3.916cm">
          <text:p/>
        </draw:line>
      </draw:g>
      <draw:frame presentation:style-name="Default-title" draw:layer="backgroundobjects" svg:width="21.59cm" svg:height="3.228cm" svg:x="2.117cm" svg:y="0.635cm" presentation:class="title" presentation:placeholder="true">
        <draw:text-box/>
      </draw:frame>
      <draw:frame presentation:style-name="Default-outline1" draw:layer="backgroundobjects" svg:width="21.59cm" svg:height="11.43cm" svg:x="3.175cm" svg:y="5.08cm" presentation:class="outline" presentation:placeholder="true">
        <draw:text-box/>
      </draw:frame>
      <draw:custom-shape draw:style-name="Mgr15" draw:text-style-name="MP17" draw:layer="backgroundobjects" svg:width="5.42cm" svg:height="1.019cm" svg:x="19.822cm" svg:y="17.714cm">
        <text:list text:style-name="ML3">
          <text:list-header>
            <text:p text:style-name="MP16"><text:span text:style-name="MT3">Aberdeen</text:span><text:span text:style-name="MT4">Group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6" draw:text-style-name="MP17" draw:layer="backgroundobjects" svg:width="3.498cm" svg:height="0.765cm" svg:x="1.367cm" svg:y="17.912cm">
        <text:list text:style-name="ML2">
          <text:list-header>
            <text:p text:style-name="MP16"><text:span text:style-name="MT5">Slide </text:span><text:span text:style-name="MT5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4cm" svg:height="25.78cm" svg:x="0cm" svg:y="0cm">
          <text:p/>
        </draw:rect>
        <draw:frame draw:style-name="Mgr17" draw:text-style-name="MP19" draw:layer="backgroundobjects" svg:width="8.409cm" svg:height="1.292cm" svg:x="-0.001cm" svg:y="0cm" presentation:class="header">
          <draw:text-box>
            <text:list text:style-name="ML1">
              <text:list-header>
                <text:p text:style-name="MP18"><text:span text:style-name="MT6"><presentation:header/></text:span></text:p>
              </text:list-header>
            </text:list>
          </draw:text-box>
        </draw:frame>
        <draw:frame draw:style-name="Mgr17" draw:text-style-name="MP21" draw:layer="backgroundobjects" svg:width="8.41cm" svg:height="1.292cm" svg:x="10.993cm" svg:y="0cm" presentation:class="date-time">
          <draw:text-box>
            <text:list text:style-name="ML1">
              <text:list-header>
                <text:p text:style-name="MP20"><text:span text:style-name="MT6"><presentation:date-time/></text:span></text:p>
              </text:list-header>
            </text:list>
          </draw:text-box>
        </draw:frame>
        <draw:frame draw:style-name="Mgr18" draw:text-style-name="MP19" draw:layer="backgroundobjects" svg:width="8.409cm" svg:height="1.292cm" svg:x="-0.001cm" svg:y="24.492cm" presentation:class="footer">
          <draw:text-box>
            <text:list text:style-name="ML1">
              <text:list-header>
                <text:p text:style-name="MP18"><text:span text:style-name="MT6"><presentation:footer/></text:span></text:p>
              </text:list-header>
            </text:list>
          </draw:text-box>
        </draw:frame>
        <draw:frame draw:style-name="Mgr18" draw:text-style-name="MP21" draw:layer="backgroundobjects" svg:width="8.41cm" svg:height="1.292cm" svg:x="10.993cm" svg:y="24.492cm" presentation:class="page-number">
          <draw:text-box>
            <text:list text:style-name="ML1">
              <text:list-header>
                <text:p text:style-name="MP20"><text:span text:style-name="MT6"><text:page-number>&lt;number&gt;</text:page-number></text:span></text:p>
              </text:list-header>
            </text:list>
          </draw:text-box>
        </draw:frame>
        <draw:frame presentation:style-name="Default-notes" draw:layer="backgroundobjects" svg:width="14.225cm" svg:height="11.602cm" svg:x="2.588cm" svg:y="12.25cm" presentation:class="notes" presentation:placeholder="true">
          <draw:text-box/>
        </draw:frame>
        <draw:page-thumbnail presentation:style-name="Default-title" draw:layer="backgroundobjects" svg:width="12.845cm" svg:height="9.635cm" svg:x="3.28cm" svg:y="1.948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Y2K Tsunami for CFO's</dc:title>
    <dc:subject>Y2K executive action plan</dc:subject>
    <meta:keyword>CFO Y2K CA speech</meta:keyword>
    <meta:initial-creator>Peter S. Kastner</meta:initial-creator>
    <meta:creation-date>1995-05-28T12:20:46.560000000</meta:creation-date>
    <dc:creator>Peter S. Kastner</dc:creator>
    <dc:date>1997-11-20T16:37:34.250000000</dc:date>
    <meta:print-date>1997-11-20T16:11:18.210000000</meta:print-date>
    <meta:editing-cycles>27967</meta:editing-cycles>
    <meta:editing-duration>P30DT8H22M53S</meta:editing-duration>
    <meta:document-statistic meta:object-count="126"/>
    <meta:generator>LibreOffice/24.2.7.2$Linux_X86_64 LibreOffice_project/420$Build-2</meta:generator>
  </office:meta>
</office:document-meta>
</file>