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utch801 Rm BT" svg:font-family="'Dutch801 Rm BT'" style:font-family-generic="roman" style:font-pitch="variable"/>
    <style:font-face style:name="GarmdITC Bk BT" svg:font-family="'GarmdITC Bk B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style:font-name="GarmdITC Bk BT" style:font-name-asian="GarmdITC Bk BT" style:font-name-complex="GarmdITC Bk BT"/>
    </style:style>
    <style:style style:name="P2" style:family="paragraph" style:parent-style-name="Header">
      <style:text-properties style:font-name="GarmdITC Bk BT" style:font-name-asian="GarmdITC Bk BT" style:font-name-complex="GarmdITC Bk BT"/>
    </style:style>
    <style:style style:name="P3" style:family="paragraph" style:parent-style-name="Header">
      <style:paragraph-properties fo:text-align="end" style:justify-single-word="false"/>
      <style:text-properties style:font-name="GarmdITC Bk BT" fo:font-style="italic" style:font-name-asian="GarmdITC Bk BT" style:font-style-asian="italic" style:font-name-complex="GarmdITC Bk BT" style:font-style-complex="italic"/>
    </style:style>
    <style:style style:name="P4" style:family="paragraph" style:parent-style-name="Header">
      <style:text-properties style:font-name="GarmdITC Bk BT" fo:font-size="12pt" style:font-name-asian="GarmdITC Bk BT" style:font-size-asian="12pt" style:font-name-complex="GarmdITC Bk BT" style:font-size-complex="12pt"/>
    </style:style>
    <style:style style:name="P5" style:family="paragraph" style:parent-style-name="Header">
      <style:paragraph-properties fo:margin-left="-1in" fo:margin-right="0in"/>
    </style:style>
    <style:style style:name="P6" style:family="paragraph" style:parent-style-name="Standard">
      <style:text-properties style:font-name="Dutch801 Rm BT" fo:font-size="12pt" style:font-name-asian="Dutch801 Rm BT" style:font-size-asian="12pt" style:font-name-complex="Dutch801 Rm BT" style:font-size-complex="12pt"/>
    </style:style>
    <style:style style:name="P7" style:family="paragraph" style:parent-style-name="Standard">
      <style:paragraph-properties fo:margin-left="0.1252in" fo:margin-right="0in">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style:font-name-asian="Dutch801 Rm BT" style:font-size-asian="12pt" style:font-name-complex="Dutch801 Rm BT" style:font-size-complex="12pt"/>
    </style:style>
    <style:style style:name="P8" style:family="paragraph" style:parent-style-name="Standard">
      <style:paragraph-properties>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style:font-name-asian="Dutch801 Rm BT" style:font-size-asian="12pt" style:font-name-complex="Dutch801 Rm BT" style:font-size-complex="12pt"/>
    </style:style>
    <style:style style:name="P9" style:family="paragraph" style:parent-style-name="Standard" style:list-style-name="L4">
      <style:paragraph-properties fo:margin-left="0.25in" fo:margin-right="0in" fo:text-indent="-0.25in" style:auto-text-indent="false">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style:font-name-asian="Dutch801 Rm BT" style:font-size-asian="12pt" style:font-name-complex="Dutch801 Rm BT" style:font-size-complex="12pt"/>
    </style:style>
    <style:style style:name="P10" style:family="paragraph" style:parent-style-name="Standard" style:list-style-name="L4">
      <style:paragraph-properties fo:margin-left="0.25in" fo:margin-right="0in">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style:font-name-asian="Dutch801 Rm BT" style:font-size-asian="12pt" style:font-name-complex="Dutch801 Rm BT" style:font-size-complex="12pt"/>
    </style:style>
    <style:style style:name="P11" style:family="paragraph" style:parent-style-name="Standard" style:list-style-name="L5">
      <style:paragraph-properties fo:margin-left="0.25in" fo:margin-right="0in" fo:text-indent="-0.25in" style:auto-text-indent="false">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style:font-name-asian="Dutch801 Rm BT" style:font-size-asian="12pt" style:font-name-complex="Dutch801 Rm BT" style:font-size-complex="12pt"/>
    </style:style>
    <style:style style:name="P12" style:family="paragraph" style:parent-style-name="Standard" style:list-style-name="L6">
      <style:paragraph-properties fo:margin-left="0.25in" fo:margin-right="0in" fo:text-indent="-0.25in" style:auto-text-indent="false">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style:font-name-asian="Dutch801 Rm BT" style:font-size-asian="12pt" style:font-name-complex="Dutch801 Rm BT" style:font-size-complex="12pt"/>
    </style:style>
    <style:style style:name="P13" style:family="paragraph" style:parent-style-name="Standard" style:list-style-name="L1">
      <style:paragraph-properties fo:margin-left="0.25in" fo:margin-right="0in" fo:text-indent="-0.25in" style:auto-text-indent="false"/>
      <style:text-properties style:font-name="Dutch801 Rm BT" fo:font-size="12pt" style:font-name-asian="Dutch801 Rm BT" style:font-size-asian="12pt" style:font-name-complex="Dutch801 Rm BT" style:font-size-complex="12pt"/>
    </style:style>
    <style:style style:name="P14" style:family="paragraph" style:parent-style-name="Standard" style:list-style-name="L3">
      <style:paragraph-properties fo:margin-left="0.25in" fo:margin-right="0in" fo:text-indent="-0.25in" style:auto-text-indent="false"/>
      <style:text-properties style:font-name="Dutch801 Rm BT" fo:font-size="12pt" style:font-name-asian="Dutch801 Rm BT" style:font-size-asian="12pt" style:font-name-complex="Dutch801 Rm BT" style:font-size-complex="12pt"/>
    </style:style>
    <style:style style:name="P15" style:family="paragraph" style:parent-style-name="Standard">
      <style:paragraph-properties fo:break-before="page"/>
      <style:text-properties style:font-name="Dutch801 Rm BT" fo:font-size="12pt" fo:font-weight="bold" style:font-name-asian="Dutch801 Rm BT" style:font-size-asian="12pt" style:font-weight-asian="bold" style:font-name-complex="Dutch801 Rm BT" style:font-size-complex="12pt" style:font-weight-complex="bold"/>
    </style:style>
    <style:style style:name="P16" style:family="paragraph" style:parent-style-name="Standard">
      <style:text-properties style:font-name="Dutch801 Rm BT" fo:font-size="12pt" fo:font-weight="bold" style:font-name-asian="Dutch801 Rm BT" style:font-size-asian="12pt" style:font-weight-asian="bold" style:font-name-complex="Dutch801 Rm BT" style:font-size-complex="12pt" style:font-weight-complex="bold"/>
    </style:style>
    <style:style style:name="P17" style:family="paragraph" style:parent-style-name="Standard">
      <style:paragraph-properties>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Dutch801 Rm BT" fo:font-size="12pt" fo:font-weight="bold" style:font-name-asian="Dutch801 Rm BT" style:font-size-asian="12pt" style:font-weight-asian="bold" style:font-name-complex="Dutch801 Rm BT" style:font-size-complex="12pt" style:font-weight-complex="bold"/>
    </style:style>
    <style:style style:name="P18" style:family="paragraph" style:parent-style-name="Standard">
      <style:paragraph-properties>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9" style:family="paragraph" style:parent-style-name="Standard" style:list-style-name="L4">
      <style:paragraph-properties fo:margin-left="0.25in" fo:margin-right="0in" fo:text-indent="-0.25in" style:auto-text-indent="false">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0" style:family="paragraph" style:parent-style-name="Standard" style:list-style-name="L5">
      <style:paragraph-properties fo:margin-left="0.25in" fo:margin-right="0in" fo:text-indent="-0.25in" style:auto-text-indent="false">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1" style:family="paragraph" style:parent-style-name="Standard" style:list-style-name="L5">
      <style:paragraph-properties fo:margin-left="0.25in" fo:margin-right="0in">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2" style:family="paragraph" style:parent-style-name="Standard" style:list-style-name="L6">
      <style:paragraph-properties fo:margin-left="0.25in" fo:margin-right="0in" fo:text-indent="-0.25in" style:auto-text-indent="false">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3" style:family="paragraph" style:parent-style-name="Standard" style:list-style-name="L6">
      <style:paragraph-properties fo:margin-left="0.25in" fo:margin-right="0in">
        <style:tab-stops>
          <style:tab-stop style:position="-0.8in"/>
          <style:tab-stop style:position="-0.5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4" style:family="paragraph" style:parent-style-name="Standard" style:list-style-name="L1">
      <style:paragraph-properties fo:margin-left="0.25in" fo:margin-right="0in" fo:text-indent="-0.25in" style:auto-text-indent="false"/>
    </style:style>
    <style:style style:name="P25" style:family="paragraph" style:parent-style-name="Standard" style:list-style-name="L2">
      <style:paragraph-properties fo:margin-left="0.75in" fo:margin-right="0in" fo:text-indent="-0.25in" style:auto-text-indent="false"/>
    </style:style>
    <style:style style:name="P26" style:family="paragraph" style:parent-style-name="Standard" style:list-style-name="L2">
      <style:paragraph-properties fo:margin-left="0.75in" fo:margin-right="0in"/>
    </style:style>
    <style:style style:name="P27" style:family="paragraph" style:parent-style-name="Standard" style:list-style-name="L3">
      <style:paragraph-properties fo:margin-left="0.25in" fo:margin-right="0in" fo:text-indent="-0.25in" style:auto-text-indent="false"/>
    </style:style>
    <style:style style:name="P28" style:family="paragraph" style:parent-style-name="Standard" style:list-style-name="L3">
      <style:paragraph-properties fo:margin-left="0.25in" fo:margin-right="0in"/>
    </style:style>
    <style:style style:name="T1" style:family="text">
      <style:text-properties style:font-name="Dutch801 Rm BT" fo:font-size="12pt" style:font-name-asian="Dutch801 Rm BT" style:font-size-asian="12pt" style:font-name-complex="Dutch801 Rm BT" style:font-size-complex="12pt"/>
    </style:style>
    <style:style style:name="T2" style:family="text">
      <style:text-properties style:font-name="Dutch801 Rm BT" fo:font-size="12pt" fo:font-weight="bold" style:font-name-asian="Dutch801 Rm BT" style:font-size-asian="12pt" style:font-weight-asian="bold" style:font-name-complex="Dutch801 Rm BT" style:font-size-complex="12pt" style:font-weight-complex="bold"/>
    </style:style>
    <style:style style:name="T3" style:family="text">
      <style:text-properties style:font-name="Dutch801 Rm BT" fo:font-size="12pt" fo:font-style="italic" style:font-name-asian="Dutch801 Rm BT" style:font-size-asian="12pt" style:font-style-asian="italic" style:font-name-complex="Dutch801 Rm BT" style:font-size-complex="12pt" style:font-style-complex="italic"/>
    </style:style>
    <style:style style:name="T4" style:family="text">
      <style:text-properties style:text-position="super 58%" style:font-name="Dutch801 Rm BT" fo:font-size="12pt" style:font-name-asian="Dutch801 Rm BT" style:font-size-asian="12pt" style:font-name-complex="Dutch801 Rm BT" style:font-size-complex="12pt"/>
    </style:style>
    <style:style style:name="T5" style:family="text">
      <style:text-properties style:font-name="GarmdITC Bk BT" style:font-name-asian="GarmdITC Bk BT" style:font-name-complex="GarmdITC Bk BT"/>
    </style:style>
    <style:style style:name="T6" style:family="text">
      <style:text-properties style:font-name="GarmdITC Bk BT" fo:font-size="22pt" style:font-name-asian="GarmdITC Bk BT" style:font-size-asian="22pt" style:font-name-complex="GarmdITC Bk BT" style:font-size-complex="22pt"/>
    </style:style>
    <style:style style:name="T7" style:family="text">
      <style:text-properties style:font-name="GarmdITC Bk BT" fo:font-size="22pt" fo:font-style="italic" style:font-name-asian="GarmdITC Bk BT" style:font-size-asian="22pt" style:font-style-asian="italic" style:font-name-complex="GarmdITC Bk BT" style:font-size-complex="22pt" style:font-style-complex="italic"/>
    </style:style>
    <style:style style:name="T8" style:family="text">
      <style:text-properties style:font-name="GarmdITC Bk BT" fo:font-style="italic" style:font-name-asian="GarmdITC Bk BT" style:font-style-asian="italic" style:font-name-complex="GarmdITC Bk BT" style:font-style-complex="italic"/>
    </style:style>
    <style:style style:name="T9" style:family="text">
      <style:text-properties style:font-name="GarmdITC Bk BT" fo:font-size="12pt" style:font-name-asian="GarmdITC Bk BT" style:font-size-asian="12pt" style:font-name-complex="GarmdITC Bk BT" style:font-size-complex="12pt"/>
    </style:style>
    <style:style style:name="T10" style:family="text">
      <style:text-properties style:font-name="GarmdITC Bk BT" fo:font-size="18pt" style:font-name-asian="GarmdITC Bk BT" style:font-size-asian="18pt" style:font-name-complex="GarmdITC Bk BT" style:font-size-complex="18pt"/>
    </style:style>
    <style:style style:name="T11" style:family="text">
      <style:text-properties style:font-name="GarmdITC Bk BT" fo:font-size="18pt" fo:font-style="italic" style:font-name-asian="GarmdITC Bk BT" style:font-size-asian="18pt" style:font-style-asian="italic" style:font-name-complex="GarmdITC Bk BT" style:font-size-complex="18pt" style:font-style-complex="italic"/>
    </style:style>
    <text:list-style style:name="L1">
      <text:list-level-style-number text:level="1" loext:num-list-format="%1%." style:num-suf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date style:data-style-name="N41" text:date-value="2026-04-19T14:43:48.880373016">April 19, 2026</text:date></text:p>
      <text:p text:style-name="P6"/>
      <text:p text:style-name="P6">Mr. David M. Hood<text:line-break/>Director, Analyst Relations<text:line-break/>Computer Associates International<text:line-break/>One Computer Associates Plaza<text:line-break/>Islandia, NY <text:s/>11788-7000</text:p>
      <text:p text:style-name="P6"/>
      <text:p text:style-name="P6"/>
      <text:p text:style-name="P6">Dear David:</text:p>
      <text:p text:style-name="P6"/>
      <text:p text:style-name="Standard"><text:span text:style-name="T1">It was a pleasure to have been invited to participate in CA’s analyst roundtable evaluation of Unicenter and Jasmine this week. <text:s/>We tried to contribute our verbal comments during the two, day-long sessions to yourself and to CA’s senior management. <text:s/>As you requested, this letter is Aberdeen Group’s written report to CA on our assessment of Unicenter and Jasmine’s direction and what needs to be done to maximize the (revenue) impact of these two products in 1997. <text:s/>Please feel free to call me at my direct line, 617/854-5221, if you have any questions.</text:span></text:p>
      <text:p text:style-name="P6"/>
      <text:p text:style-name="P6"/>
      <text:p text:style-name="P6">With warm regards,</text:p>
      <text:p text:style-name="P6"/>
      <text:p text:style-name="P6"/>
      <text:p text:style-name="P7"/>
      <text:p text:style-name="P8">Peter S. Kastner<text:line-break/>Group Vice President</text:p>
      <text:p text:style-name="P6"/>
      <text:p text:style-name="P15">Unicenter</text:p>
      <text:list text:style-name="L1">
        <text:list-item>
          <text:p text:style-name="P24"><text:span text:style-name="T1">CA looks like it has something to hide by not responding to Tivoli’s (scurrilous) get-CA PR campaign. <text:s/>CA is being way too meek in positioning Unicenter. <text:s/>The facts are you have dominant market share, the largest installed base, impressive and often leading technology, and many happy customers. <text:s/>You should be moving into the “Ask for the #1 product by name” branding stage. <text:s/>This implies business-executive advertising in </text:span><text:span text:style-name="T3">Business Week, Forbes,</text:span><text:span text:style-name="T1"> etc. on the business benefits of Unicenter. <text:s/>Note this means not blowing your technology horn. <text:s/>The message needs to center around tieing the enterprise’s many computing resources togther — past, present, and future; reducing costs; improving security and efficiency; greater ability to absorb change.</text:span></text:p>
        </text:list-item>
        <text:list-item>
          <text:p text:style-name="P13">Unicenter should have a list of superlatives: most customers; most nodes; largest number of partner applications, etc. <text:s/>This reinforces the “why we are #1” message above.</text:p>
        </text:list-item>
        <text:list-item>
          <text:p text:style-name="P13">High level messages should center around Unicenter as the premier product that will:</text:p>
        </text:list-item>
      </text:list>
      <text:list text:style-name="L2">
        <text:list-item>
          <text:p text:style-name="P25"><text:span text:style-name="T2">Measure</text:span><text:span text:style-name="T1">: system performance, network performance, software license compliance</text:span></text:p>
        </text:list-item>
        <text:list-item>
          <text:p text:style-name="P25"><text:span text:style-name="T2">Secure</text:span><text:span text:style-name="T1">: security policies, authentication, encryption, intrusion detection</text:span></text:p>
        </text:list-item>
        <text:list-item>
          <text:p text:style-name="P25"><text:span text:style-name="T2">Adapt</text:span><text:span text:style-name="T1">: to application, network, middleware, OS, and hardware events … then execute the pre-planned response</text:span></text:p>
        </text:list-item>
        <text:list-item>
          <text:p text:style-name="P26"><text:span text:style-name="T2">Manage</text:span><text:span text:style-name="T1">: systems, networks, desktops, assets.</text:span></text:p>
        </text:list-item>
      </text:list>
      <text:list text:style-name="L3">
        <text:list-item>
          <text:p text:style-name="P27"><text:span text:style-name="T1">CIOs all have service contracts with their user organizations. <text:s/>Your message to CIOs needs to include the fact that Uni</text:span><text:soft-page-break/><text:span text:style-name="T1">center can increase service and satisfaction levels, scale across business units and continents, and reduce costs.</text:span></text:p>
        </text:list-item>
        <text:list-item>
          <text:p text:style-name="P27"><text:span text:style-name="T1">CA is way behind in getting name-brand, first-tier business applications instrumented for Unicenter management. <text:s/>Yes, the SAP R/3 product is important, but it is first step. <text:s/>A major program is required to go after the major application providers </text:span><text:span text:style-name="T3">by vertical market</text:span><text:span text:style-name="T1">. <text:s/>CA should be prepared to make attractive concessions (i.e., pay money) to these chosen ISVs. <text:s/>The objective is to create demand pull-through. <text:s/>Our research shows that the application ISV has enormous clout in dictating the middleware and platform sales. <text:s/>If the ISV pulls through Unicenter for systems management, then the Unicenter-managed servers and clients will follow. <text:s/>Note it is </text:span><text:span text:style-name="T3">not</text:span><text:span text:style-name="T1"> necessary to have a vertical market sales program if you identify — and we can help you do this — the key, leading apps in selected verticals such as telecommunications, retail, banking, insurance, transportation, etc.</text:span></text:p>
        </text:list-item>
        <text:list-item>
          <text:p text:style-name="P27"><text:span text:style-name="T1">Your VAR business goals appear way too inadequate. <text:s/>In order to reach the lower and middle-tier markets, you must use alternate channels than your direct sales force. <text:s/>An aggressive, worldwide program is needed this year. <text:s/>Make it sales-neutral with the Emerald team.</text:span></text:p>
        </text:list-item>
        <text:list-item>
          <text:p text:style-name="P27"><text:span text:style-name="T1">Consider a new support model with your partners to better serve the now-unserved smaller-sized companies. <text:s/>The problem is that small companies or geographic units of large companies just do not have the technical expertise on site to deal with increasing technology complexity (e.g., my router is flooded because of batch job at peak OLTP hour). <text:s/>My vision is a national fault-response center (run by a large SI organization such as DEC or NCR) that funnels Unicenter-trapped faults from small companies and dis</text:span><text:soft-page-break/><text:span text:style-name="T1">patches help via their own organization — or through local VARs who could sell the service. <text:s/>Take this international. <text:s/>This is a big market in the aggregate. <text:s/>Note that Aberdeen research shows network management outsourcing as a fast-rising interest by CIOs: there is no win for CIOs in network management.</text:span></text:p>
        </text:list-item>
        <text:list-item>
          <text:p text:style-name="P27"><text:span text:style-name="T1">Where are the customer success stories? <text:s/>The references? <text:s/>CA must quickly invest modestly here to get the enormous pull-through you require. <text:s/>There is absolutely no reason in 1997 why the product shouldn’t damn near sell itself through references and success stories.</text:span></text:p>
        </text:list-item>
        <text:list-item>
          <text:p text:style-name="P27"><text:span text:style-name="T1">Start looking at non-traditional environments that require management. <text:s/>Most control systems today use digital computers as their management hosts. <text:s/>There is a huge, untapped, competition-free market for managing office buildings, factory shop-floor robots, machine tools, telephone PBXs, routers, etc.</text:span></text:p>
        </text:list-item>
        <text:list-item>
          <text:p text:style-name="P14">Tivoli as competition needs to be explained in numerous different ways to various forums. <text:s/>The fact that CA has no competitive white paper to hand analysts is a good example of how far behind CA is in terms of broad competitive collateral.</text:p>
        </text:list-item>
        <text:list-item>
          <text:p text:style-name="P14">We are unconvinced that Tivoli’s product as now constituted will be IBM’s product of three years from now. <text:s/>While IBM must be in the systems management area, the Tivoli product set per se may not be the vehicle.</text:p>
        </text:list-item>
        <text:list-item>
          <text:p text:style-name="P28"><text:span text:style-name="T1">Note that Lou Gerstner of IBM has told a public audience “not to buy from a company whose initials are Computer Associates”. <text:s/>This tells Aberdeen that IBM plans to play hardball with you. <text:s/>Be prepared.</text:span></text:p>
        </text:list-item>
      </text:list>
      <text:p text:style-name="P6"/>
      <text:p text:style-name="P16"><text:soft-page-break/>Where Aberdeen Can Help With Unicenter Positioning<text:span text:style-name="T1"/></text:p>
      <text:p text:style-name="P18"><text:span text:style-name="T1">Aberdeen Group would be pleased to further discuss a business relationship with Computer Associates for consulting and services related to Unicenter marketing. <text:s/>These are the projects we left with Charles Wang on Monday — we would consider others:</text:span></text:p>
      <text:p text:style-name="P8"/>
      <text:list text:style-name="L4">
        <text:list-item>
          <text:p text:style-name="P19"><text:span text:style-name="T1">Consulting on high-level market message development, proof-points, collateral requirements, working with advertising and collateral-generation suppliers. <text:s/>We can contribute for all of the Unicenter audiences, but would prefer to work above the technical-detail, feature-comparison level.</text:span></text:p>
        </text:list-item>
        <text:list-item>
          <text:p text:style-name="P19"><text:span text:style-name="T1">White Paper — setting out the business requirements, options, and benefits for enterprise systems management. <text:s/>Creates the issues-oriented environment for a technology solution i.e., Unicenter. <text:s/>Variations of the paper for executive management (CEO, CFO, CIO) and line of business management.</text:span></text:p>
        </text:list-item>
        <text:list-item>
          <text:p text:style-name="P19"><text:span text:style-name="T1">White Paper — A high-level competitive analysis of so-called systems management products including Tivoli TME, OpenView, SystemView, NetView, Platinum, MS SMS, OpenVision, network managers, and best-of-breed point solutions. <text:s/>Measure on CA-favorable issues such as scalability, availability now, platform selection, breadth of functionality, partners, etc. <text:s/>Audience is both executive and technical management. <text:s/>For technical management (at IS, VAR and other partners), the paper will serve to set up the CA sales force to point out Unicenter’s best suitability, and to address/point out the short-comings of competitor’s offerings — without having CA’s name on the white paper. <text:s/>For executive management, the paper can serve a dual purpose of a) justifying corroboration of a Unicenter decision by tech</text:span><text:soft-page-break/><text:span text:style-name="T1">nical management; b) high-level management technical selling that positions Unicenter and competition.</text:span></text:p>
        </text:list-item>
        <text:list-item>
          <text:p text:style-name="P9">CEO and CIO speeches and sales seminar presentations which could reach many focus audiences such as partners, Big 6, etc.</text:p>
        </text:list-item>
        <text:list-item>
          <text:p text:style-name="P9">Partner sales training and awareness building. <text:s/>Note that the white paper in item 3 would be useful to turn into a speech(es).</text:p>
        </text:list-item>
        <text:list-item>
          <text:p text:style-name="P9">Consulting on CA’s go-to-market program: ads, collateral, training, positioning, demos, benchmarks, press tours, etc. <text:s/>Use Aberdeen as a dis-interested outside party who can be a sounding board.</text:p>
        </text:list-item>
        <text:list-item>
          <text:p text:style-name="P9">Research and write up case studies — either as writing for hire or under the Aberdeen logo.</text:p>
        </text:list-item>
        <text:list-item>
          <text:p text:style-name="P19"><text:span text:style-name="T1">Conduct a cost-of-ownership study of Unicenter and selected competitors.</text:span></text:p>
        </text:list-item>
        <text:list-item>
          <text:p text:style-name="P19"><text:span text:style-name="T1">Train the sales force in systems management issues, market conditions, what the audience(s) needs are and how to address them, Aberdeen’s view on competition and why CA wins.</text:span></text:p>
        </text:list-item>
        <text:list-item>
          <text:p text:style-name="P9">Partnership building program with systems integrators and Big Six accounting firms. <text:s/>Generic market-building program for VARs and ISVs.</text:p>
        </text:list-item>
        <text:list-item>
          <text:p text:style-name="P10">Identify the key vertical market applications that CA should pursue to have broad, best-of-breed applications solutions instrumented for Unicenter.</text:p>
        </text:list-item>
      </text:list>
      <text:p text:style-name="P8"/>
      <text:p text:style-name="P17">Jasmine and Jade<text:span text:style-name="T1"/></text:p>
      <text:list text:style-name="L5">
        <text:list-item>
          <text:p text:style-name="P11">Aberdeen believes that the market positioning of Jasmine will have a permanent impact on the success of the product. <text:s/>Moreover, the OO development and particularly the <text:soft-page-break/>OODBMS markets are immature, forcing CA to missionary sell. <text:s/>Lastly, we believe that a frontal attack on Universal Server RDBMSs will fail because the market will not understand the technical points CA is making, won’t care when they understand, and CA won’t be able to out-market IBM, Informix, and Oracle.</text:p>
        </text:list-item>
        <text:list-item>
          <text:p text:style-name="P20"><text:span text:style-name="T1">I cannot explain what applications and computing problems that Jasmine is best suited for. <text:s/>That is, when an OODBMS beats an ORDBMS hands down. <text:s/>It is not just the ability to store and retrieve multimedia. <text:s/>Is it complex data relationships: what kind of relationships and how can a mere-mortal sales rep get out of the technical morass? <text:s/>CA needs to have ready application examples of what Jasmine can do easily that the others do with difficulty — or not at all.</text:span></text:p>
        </text:list-item>
        <text:list-item>
          <text:p text:style-name="P20"><text:span text:style-name="T1">To date, CA has underestimated the intrinsic value of Jade as a point-and-click development environment. <text:s/>Punch up Jade functionality. <text:s/>Make sure Jade can stand the scrutiny of the spotlight, and position Jade/Jasmine as a bundle.</text:span></text:p>
        </text:list-item>
        <text:list-item>
          <text:p text:style-name="P11">Jasmine would be a lot more attractive as a repository for logic and data if it had a version control and change management system — maybe even written in Jade.</text:p>
        </text:list-item>
        <text:list-item>
          <text:p text:style-name="P20"><text:span text:style-name="T1">Componentware is an emerging market. <text:s/>The degree of third-party support for Jasmine will determine its success. <text:s/>CA must systematically build (or buy) relationships with development ISVs. <text:s/>Start with Informix’s DataBlade partners.</text:span></text:p>
        </text:list-item>
        <text:list-item>
          <text:p text:style-name="P11">Anders floored me when he said CA might recommend third-party components for such basic features as forms windows. <text:s/>No! <text:s/>Buyers want the whole enchilada from one tool!</text:p>
        </text:list-item>
        <text:list-item>
          <text:p text:style-name="P20"><text:span text:style-name="T1">Since Web applications are an obvious use, focus on being a best-of-breed ICE tool. First, have a shadow development team recreate NetHaven customer sites using Jasmine/</text:span><text:soft-page-break/><text:span text:style-name="T1">Jade. <text:s/>Feed back requirements to R&amp;D. <text:s/>If practical, integrate Jasmine with NetHaven’s site-building tools and put into production there. <text:s/>Then you can say “we eat our own dogfood”. <text:s/>Next, build a program aimed at ISVs who build/host Web sites (e.g., NetHaven’s competitors). <text:s/>This could quickly build a reference list of people who bet their business on Jasmine — including CA.</text:span></text:p>
        </text:list-item>
        <text:list-item>
          <text:p text:style-name="P21"><text:span text:style-name="T1">Overall, I believe that the current plan of launching Jasmine/Jade as yet another application development environment cum database will not achieve the expectations that CA has. <text:s/>I believe my best suggestion, which we briefly discussed Tuesday, is to target Jasmine/Jade as “the premier Java application development environment (ADE) for professional programmers”. <text:s/>Let me code-name this product as Orchid. <text:s/>For this to work, CA must pull all the application development good stuff it has on the shelf such as Endevor. <text:s/>Get Marc Sokol involved. <text:s/>Make the competition look like $79 toys (which they are). <text:s/>This strategy creates customer value by focusing on the Java ADE. <text:s/>CA gets to re-package existing code and sell at a high price. <text:s/>Corporate developers (and VAR/ISVs) are prepared to spend several thousand dollars per seat for quality development tools — and Jasmine would make an arguably excellent platform for run-time data storage. <text:s/>However, the thrust of Orchid would be Java-based application development. <text:s/>Jade might be useful. <text:s/>ODQL is not useful here. <text:s/>And Jasmine as runtime data base is optional — an RDBMS may be the target platform.</text:span></text:p>
        </text:list-item>
      </text:list>
      <text:p text:style-name="P8"/>
      <text:p text:style-name="P17">How Aberdeen Can Help With Jasmine/Jade Marketing</text:p>
      <text:list text:style-name="L6">
        <text:list-item>
          <text:p text:style-name="P22"><text:soft-page-break/><text:span text:style-name="T1">Market survey: <text:s/>what do IT buyers want in an OODBMS. <text:s/>What will make them buy? <text:s/>What messages resonate? <text:s/>This study of 15-20 organizations via in-depth, in-person interviews is needed because the market is nascent and because there are many confusing almost-alike technologies such as universal servers that have confused the market.</text:span></text:p>
        </text:list-item>
        <text:list-item>
          <text:p text:style-name="P22"><text:span text:style-name="T1">Market research and consulting: <text:s/>what applications and computing problems are best suited for an OODBMS? <text:s/>You need this basic research of existing OO sites to direct your sales force and partners to fertile selling ground. <text:s/>“New, multi-media apps” is too small and vague a <text:s/>market for your sales force.</text:span></text:p>
        </text:list-item>
        <text:list-item>
          <text:p text:style-name="P22"><text:span text:style-name="T1">Design, audit, and write a white paper on a synthetic benchmark of Jasmine. <text:s/>Consider whether to use an existing benchmark or to plow new ground. <text:s/>Goal is to show that Jasmine is fast enough and scaleable enough for real-world applications.</text:span></text:p>
        </text:list-item>
        <text:list-item>
          <text:p text:style-name="P12">Design course collateral material and train the sales forces of the IBUs, domestic and international.</text:p>
        </text:list-item>
        <text:list-item>
          <text:p text:style-name="P22"><text:span text:style-name="T1">White Paper: <text:s/>Why Orchid is a superior Java ADE. <text:s/>Audience is application development management, operations management, CTO, CIO.</text:span></text:p>
        </text:list-item>
        <text:list-item>
          <text:p text:style-name="P12">CIO, CTO sales seminar speeches.</text:p>
        </text:list-item>
        <text:list-item>
          <text:p text:style-name="P22"><text:span text:style-name="T1">Consulting: <text:s/>selection and prioritization of 3</text:span><text:span text:style-name="T4">rd</text:span><text:span text:style-name="T1">-party candidates.</text:span></text:p>
        </text:list-item>
        <text:list-item>
          <text:p text:style-name="P23"><text:span text:style-name="T1">Off-the-shelf market research study available April: <text:s/></text:span><text:span text:style-name="T3">Business-to-consumer Electronic Commerce: <text:s/>Virtual Stores, Real Profits.</text:span></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utch801 Rm BT" svg:font-family="'Dutch801 Rm BT'" style:font-family-generic="roman" style:font-pitch="variable"/>
    <style:font-face style:name="GarmdITC Bk BT" svg:font-family="'GarmdITC Bk B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GarmdITC Bk BT" style:font-name-asian="GarmdITC Bk BT" style:font-name-complex="GarmdITC Bk BT"/>
    </style:style>
    <style:style style:name="MP2" style:family="paragraph" style:parent-style-name="Header">
      <style:text-properties style:font-name="GarmdITC Bk BT" fo:font-size="12pt" style:font-name-asian="GarmdITC Bk BT" style:font-size-asian="12pt" style:font-name-complex="GarmdITC Bk BT" style:font-size-complex="12pt"/>
    </style:style>
    <style:style style:name="MP3" style:family="paragraph" style:parent-style-name="Header">
      <style:paragraph-properties fo:margin-left="-1in" fo:margin-right="0in"/>
    </style:style>
    <style:style style:name="MP4" style:family="paragraph" style:parent-style-name="Header">
      <style:paragraph-properties fo:text-align="end" style:justify-single-word="false"/>
      <style:text-properties style:font-name="GarmdITC Bk BT" style:font-name-asian="GarmdITC Bk BT" style:font-name-complex="GarmdITC Bk BT"/>
    </style:style>
    <style:style style:name="MP5" style:family="paragraph" style:parent-style-name="Header">
      <style:paragraph-properties fo:text-align="end" style:justify-single-word="false"/>
      <style:text-properties style:font-name="GarmdITC Bk BT" fo:font-style="italic" style:font-name-asian="GarmdITC Bk BT" style:font-style-asian="italic" style:font-name-complex="GarmdITC Bk BT" style:font-style-complex="italic"/>
    </style:style>
    <style:style style:name="MT1" style:family="text">
      <style:text-properties style:font-name="GarmdITC Bk BT" fo:font-size="12pt" style:font-name-asian="GarmdITC Bk BT" style:font-size-asian="12pt" style:font-name-complex="GarmdITC Bk BT" style:font-size-complex="12pt"/>
    </style:style>
    <style:style style:name="MT2" style:family="text">
      <style:text-properties style:font-name="GarmdITC Bk BT" fo:font-size="18pt" style:font-name-asian="GarmdITC Bk BT" style:font-size-asian="18pt" style:font-name-complex="GarmdITC Bk BT" style:font-size-complex="18pt"/>
    </style:style>
    <style:style style:name="MT3" style:family="text">
      <style:text-properties style:font-name="GarmdITC Bk BT" fo:font-size="18pt" fo:font-style="italic" style:font-name-asian="GarmdITC Bk BT" style:font-size-asian="18pt" style:font-style-asian="italic" style:font-name-complex="GarmdITC Bk BT" style:font-size-complex="18pt" style:font-style-complex="italic"/>
    </style:style>
    <style:style style:name="MT4" style:family="text">
      <style:text-properties style:font-name="GarmdITC Bk BT" style:font-name-asian="GarmdITC Bk BT" style:font-name-complex="GarmdITC Bk BT"/>
    </style:style>
    <style:style style:name="MT5" style:family="text">
      <style:text-properties style:font-name="GarmdITC Bk BT" fo:font-size="22pt" style:font-name-asian="GarmdITC Bk BT" style:font-size-asian="22pt" style:font-name-complex="GarmdITC Bk BT" style:font-size-complex="22pt"/>
    </style:style>
    <style:style style:name="MT6" style:family="text">
      <style:text-properties style:font-name="GarmdITC Bk BT" fo:font-size="22pt" fo:font-style="italic" style:font-name-asian="GarmdITC Bk BT" style:font-size-asian="22pt" style:font-style-asian="italic" style:font-name-complex="GarmdITC Bk BT" style:font-size-complex="22pt" style:font-style-complex="italic"/>
    </style:style>
    <style:style style:name="MT7" style:family="text">
      <style:text-properties style:font-name="GarmdITC Bk BT" fo:font-style="italic" style:font-name-asian="GarmdITC Bk BT" style:font-style-asian="italic" style:font-name-complex="GarmdITC Bk BT" style:font-style-complex="italic"/>
    </style:style>
    <style:page-layout style:name="Mpm1">
      <style:page-layout-properties fo:page-width="8.5in" fo:page-height="11in" style:num-format="1" style:print-orientation="portrait" fo:margin-top="0.5in" fo:margin-bottom="1in" fo:margin-left="2.1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1in" fo:margin-bottom="2.061in" style:dynamic-spacing="true"/>
      </style:header-style>
      <style:footer-style/>
    </style:page-layout>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
        <text:p text:style-name="MP1"/>
        <text:p text:style-name="Header"><text:span text:style-name="MT1">Page </text:span><text:span text:style-name="Page_20_Number"><text:span text:style-name="MT1"><text:page-number text:select-page="current">9</text:page-number></text:span></text:span></text:p>
        <text:p text:style-name="Header"><text:span text:style-name="Page_20_Number"><text:span text:style-name="MT1"/></text:span></text:p>
        <text:p text:style-name="Header"><text:span text:style-name="Page_20_Number"><text:span text:style-name="MT1"><text:date style:data-style-name="N41" text:date-value="2026-04-19T14:43:48.858646494">April 19, 2026</text:date></text:span></text:span></text:p>
        <text:p text:style-name="Header"><text:span text:style-name="Page_20_Number"><text:span text:style-name="MT1"/></text:span></text:p>
        <text:p text:style-name="Header"><text:span text:style-name="MT1">David Hood — Computer Associates International</text:span></text:p>
        <text:p text:style-name="MP2"/>
        <text:p text:style-name="MP1"/>
        <text:p text:style-name="MP1"/>
        <text:p text:style-name="MP3"><text:span text:style-name="MT2">Aberdeen</text:span><text:span text:style-name="MT3">Group</text:span><text:span text:style-name="MT4"> </text:span></text:p>
      </style:header>
      <style:header-first>
        <text:p text:style-name="MP4">Aberdeen Group, Inc.</text:p>
        <text:p text:style-name="MP5">One Boston Place <text:s text:c="17"/>Telephone 617 723 7890</text:p>
        <text:p text:style-name="MP5">Boston, Massachusetts <text:s text:c="19"/>FAX 617 723 7897 <text:s text:c="8"/></text:p>
        <text:p text:style-name="MP5"><text:s text:c="8"/>02108 <text:s text:c="23"/>Direct 617 854-5221 <text:s text:c="10"/><text:span text:style-name="MT4"/></text:p>
        <text:p text:style-name="MP1"/>
        <text:p text:style-name="MP1"/>
        <text:p text:style-name="MP1"/>
        <text:p text:style-name="MP1"/>
        <text:p text:style-name="Header"><text:span text:style-name="MT5">Aberdeen</text:span><text:span text:style-name="MT6">Group <text:s text:c="3"/></text:span><text:span text:style-name="MT7"><text:s text:c="50"/></text:span><text:span text:style-name="MT4">. <text:s text:c="14"/></text:span></text:p>
        <text:p text:style-name="MP1"/>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January 4, 1996</dc:title>
    <meta:initial-creator>Peter S. Kastner</meta:initial-creator>
    <meta:creation-date>1997-01-22T18:13:00</meta:creation-date>
    <dc:creator>Peter S. Kastner</dc:creator>
    <dc:date>1997-01-23T14:03:00</dc:date>
    <meta:print-date>1997-01-23T13:00:00</meta:print-date>
    <meta:editing-cycles>6</meta:editing-cycles>
    <meta:editing-duration>PT2H23M</meta:editing-duration>
    <meta:document-statistic meta:table-count="0" meta:image-count="0" meta:object-count="0" meta:page-count="9" meta:paragraph-count="63" meta:word-count="2073" meta:character-count="13607" meta:non-whitespace-character-count="11377"/>
    <meta:generator>LibreOffice/24.2.7.2$Linux_X86_64 LibreOffice_project/420$Build-2</meta:generator>
  </office:meta>
</office:document-meta>
</file>