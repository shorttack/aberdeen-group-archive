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face style:name="Courier New" svg:font-family="'Courier New'" style:font-family-generic="modern"/>
    <style:font-face style:name="Dutch801 Rm BT" svg:font-family="'Dutch801 Rm BT'" style:font-family-generic="roman" style:font-pitch="variable"/>
    <style:font-face style:name="Garamond" svg:font-family="Garamond" style:font-family-generic="roman" style:font-pitch="variable"/>
    <style:font-face style:name="GarmdITC Bk BT" svg:font-family="'GarmdITC Bk B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text-properties fo:color="#ffffff" loext:opacity="100%" style:font-name="Garamond" fo:font-size="32pt" fo:letter-spacing="-0.028in" fo:font-style="italic" style:font-size-asian="32pt" style:font-style-asian="italic" style:font-name-complex="Garamond"/>
    </style:style>
    <style:style style:name="P2" style:family="paragraph" style:parent-style-name="Standard">
      <style:paragraph-properties fo:margin-left="4in" fo:margin-right="0in" fo:margin-top="0in" fo:margin-bottom="0.0417in" style:contextual-spacing="false"/>
      <style:text-properties fo:color="#ffffff" loext:opacity="100%" style:font-name="Garamond" fo:font-size="11pt" style:letter-kerning="true" style:font-size-asian="11pt" style:font-name-complex="Garamond"/>
    </style:style>
    <style:style style:name="P3" style:family="paragraph" style:parent-style-name="Standard">
      <style:paragraph-properties fo:margin-left="4in" fo:margin-right="0in" fo:margin-top="0in" fo:margin-bottom="0.0417in" style:contextual-spacing="false">
        <style:tab-stops>
          <style:tab-stop style:position="5.8126in"/>
        </style:tab-stops>
      </style:paragraph-properties>
      <style:text-properties fo:color="#ffffff" loext:opacity="100%" style:font-name="Garamond" fo:font-size="11pt" fo:font-style="italic" style:letter-kerning="true" style:font-size-asian="11pt" style:font-style-asian="italic" style:font-name-complex="Garamond"/>
    </style:style>
    <style:style style:name="P4" style:family="paragraph" style:parent-style-name="Standard">
      <style:paragraph-properties fo:text-align="end" style:justify-single-word="false"/>
    </style:style>
    <style:style style:name="P5" style:family="paragraph" style:parent-style-name="Standard">
      <style:text-properties fo:color="#808000" loext:opacity="100%" style:font-name="Garamond" fo:font-size="32pt" fo:letter-spacing="-0.028in" fo:font-style="italic" style:font-size-asian="32pt" style:font-style-asian="italic" style:font-name-complex="Garamond"/>
    </style:style>
    <style:style style:name="P6" style:family="paragraph" style:parent-style-name="Standard">
      <style:paragraph-properties>
        <style:tab-stops>
          <style:tab-stop style:position="1.6874in"/>
        </style:tab-stops>
      </style:paragraph-properties>
      <style:text-properties style:font-name="Dutch801 Rm BT" style:font-name-complex="Dutch801 Rm BT"/>
    </style:style>
    <style:style style:name="P7" style:family="paragraph" style:parent-style-name="Standard">
      <style:text-properties style:font-name="Dutch801 Rm BT" style:font-name-complex="Dutch801 Rm BT"/>
    </style:style>
    <style:style style:name="P8" style:family="paragraph" style:parent-style-name="Standard">
      <style:paragraph-properties fo:keep-with-next="always"/>
      <style:text-properties style:font-name="Dutch801 Rm BT" style:font-name-complex="Dutch801 Rm BT"/>
    </style:style>
    <style:style style:name="P9" style:family="paragraph" style:parent-style-name="wfxRecipient">
      <style:paragraph-properties>
        <style:tab-stops>
          <style:tab-stop style:position="1.6874in"/>
        </style:tab-stops>
      </style:paragraph-properties>
      <style:text-properties style:font-name="Dutch801 Rm BT" style:font-name-complex="Dutch801 Rm BT"/>
    </style:style>
    <style:style style:name="T1" style:family="text">
      <style:text-properties fo:color="#ffffff" loext:opacity="100%" style:font-name="Garamond" fo:font-size="20pt" style:font-size-asian="20pt" style:font-name-complex="Garamond"/>
    </style:style>
    <style:style style:name="T2" style:family="text">
      <style:text-properties fo:color="#ffffff" loext:opacity="100%" style:font-name="Garamond" fo:font-size="32pt" fo:letter-spacing="-0.0138in" style:font-size-asian="32pt" style:font-name-complex="Garamond"/>
    </style:style>
    <style:style style:name="T3" style:family="text">
      <style:text-properties fo:color="#ffffff" loext:opacity="100%" style:font-name="Garamond" fo:font-size="32pt" fo:letter-spacing="-0.028in" fo:font-style="italic" style:font-size-asian="32pt" style:font-style-asian="italic" style:font-name-complex="Garamond"/>
    </style:style>
    <style:style style:name="T4" style:family="text">
      <style:text-properties fo:color="#808000" loext:opacity="100%" style:font-name="Garamond" fo:letter-spacing="-0.028in" style:font-name-complex="Garamo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uly 19, 2001</text:p>
      <text:p text:style-name="P6">Mr. Sanjay Kumar<text:line-break/>Chief Executive Officer<text:line-break/>Computer Associates International<text:line-break/>One Computer Associates Plaza<text:line-break/>Islandia, NY <text:s/>11749</text:p>
      <text:p text:style-name="P9">Dear Sanjay,</text:p>
      <text:p text:style-name="P7">I’d like to take a moment to express on behalf of Aberdeen Group our thanks for the hospitality and quality time that we were so graciously offered at CA World last week, and to pass on some observations.</text:p>
      <text:p text:style-name="P7">To begin with, Debra Cattani’s analyst relations team is at the top of the industry, and the support we get from Janice Thomas is superlative. <text:s/>CA’s analyst relations program is just plain excellent. <text:s/>It’s that simple.</text:p>
      <text:p text:style-name="P7">CA’s customers are more satisfied today than at any time since I started following CA in 1992. <text:s/>Yes, a lot is going on that changes the business model – and the way business is done. <text:s/>However, the “CA animosity factor” is much reduced. <text:s/>That’s really good news. <text:s/>Unfortunately, the uninformed press still has the “old, bad CA” mindset, but that can be mitigated over time with a <text:s/>quietly focused PR campaign.</text:p>
      <text:p text:style-name="P7"><text:soft-page-break/>The Ranger situation is a non-starter with customers. <text:s/>However, I can imagine what you and Charles are going through. <text:s/>The good news is that most people believe this is much to do about nothing, and that the Ranger crowd will go away or lose badly sooner or later. <text:s/></text:p>
      <text:p text:style-name="P7">At CA World, the executive presentations, the show floor exhibits, press conferences etc. all played to the broad 3x6 theme. <text:s/>Unlike some previous CA Worlds which were single product or family focused, the branding was cohesive and the overall World theme was broad enough and inclusive enough to touch a large majority of your customers. <text:s/>There was something for everyone, and that should energize the sales influencers who attend CA World as well as energize your sales team and channel partners. <text:s/>It’s so exciting to see the “new CA” gathering momentum – and I mean that in the physics sense. <text:s/>Congratulations to your team. <text:s/></text:p>
      <text:p text:style-name="P8">Thanks again your time, and for supporting what I believe is a deep and productive relationship between our companies. <text:s/>I look forward to speaking with you soon.</text:p>
      <text:p text:style-name="P7"/>
      <text:p text:style-name="P7">Best regards,</text:p>
      <text:p text:style-name="P7"/>
      <text:p text:style-name="P7"/>
      <text:p text:style-name="P7"/>
      <text:p text:style-name="P7">Peter S. Kastner<text:line-break/>Founder and Chief Research Officer</text:p>
      <text:p text:style-name="P7"/>
      <text:p text:style-name="P7">cc <text:s/>Russ Art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face style:name="Courier New" svg:font-family="'Courier New'" style:font-family-generic="modern"/>
    <style:font-face style:name="Dutch801 Rm BT" svg:font-family="'Dutch801 Rm BT'" style:font-family-generic="roman" style:font-pitch="variable"/>
    <style:font-face style:name="Garamond" svg:font-family="Garamond" style:font-family-generic="roman" style:font-pitch="variable"/>
    <style:font-face style:name="GarmdITC Bk BT" svg:font-family="'GarmdITC Bk B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loext:opacity="0%" style:font-name="GarmdITC Bk BT" fo:font-family="'GarmdITC Bk BT'" style:font-family-generic="roman" style:font-pitch="variable" fo:font-size="12pt" fo:language="en" fo:country="US" style:font-name-asian="Times New Roman" style:font-family-asian="'Times New Roman'" style:font-family-generic-asian="roman" style:font-pitch-asian="variable" style:font-size-asian="12pt" style:font-name-complex="GarmdITC Bk BT" style:font-family-complex="'GarmdITC Bk BT'"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Dutch801 Rm BT" fo:font-family="'Dutch801 Rm BT'" style:font-family-generic="roman" style:font-pitch="variable" style:font-name-complex="Dutch801 Rm BT" style:font-family-complex="'Dutch801 Rm BT'" style:font-family-generic-complex="roman"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text-properties style:font-name="Courier" fo:font-family="Courier" style:font-family-generic="modern" style:font-name-complex="Courier" style:font-family-complex="Courier" style:font-family-generic-complex="modern"/>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in" style:contextual-spacing="false" fo:keep-with-next="alway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Dutch801 Rm BT" fo:font-family="'Dutch801 Rm BT'" style:font-family-generic="roman" style:font-pitch="variable" fo:font-style="italic" style:font-style-asian="italic" style:font-name-complex="Dutch801 Rm BT" style:font-family-complex="'Dutch801 Rm BT'"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left="1in" fo:margin-right="0in" fo:text-indent="0in" style:auto-text-indent="false" fo:keep-with-next="always"/>
      <style:text-properties style:font-name="Dutch801 Rm BT" fo:font-family="'Dutch801 Rm BT'" style:font-family-generic="roman" style:font-pitch="variable" style:font-name-complex="Dutch801 Rm BT" style:font-family-complex="'Dutch801 Rm BT'"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Dutch801 Rm BT" fo:font-family="'Dutch801 Rm BT'" style:font-family-generic="roman" style:font-pitch="variable" style:font-name-complex="Dutch801 Rm BT" style:font-family-complex="'Dutch801 Rm BT'"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Dutch801 Rm BT" fo:font-family="'Dutch801 Rm BT'" style:font-family-generic="roman" style:font-pitch="variable" fo:font-weight="bold" style:font-weight-asian="bold" style:font-name-complex="Dutch801 Rm BT" style:font-family-complex="'Dutch801 Rm BT'"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Dutch801 Rm BT" fo:font-family="'Dutch801 Rm BT'" style:font-family-generic="roman" style:font-pitch="variable" fo:font-weight="bold" style:font-weight-asian="bold" style:font-name-complex="Dutch801 Rm BT" style:font-family-complex="'Dutch801 Rm BT'"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5in" fo:margin-right="0in" fo:text-indent="0.5in" style:auto-text-indent="false" fo:keep-with-next="always"/>
      <style:text-properties style:font-name="Dutch801 Rm BT" fo:font-family="'Dutch801 Rm BT'" style:font-family-generic="roman" style:font-pitch="variable" fo:font-weight="bold" style:font-weight-asian="bold" style:font-name-complex="Dutch801 Rm BT" style:font-family-complex="'Dutch801 Rm BT'"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0in" fo:margin-right="-0.1in" fo:text-align="center" style:justify-single-word="false" fo:text-indent="0in" style:auto-text-indent="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0.55in" fo:keep-together="always" fo:text-indent="0in" style:auto-text-indent="false" fo:keep-with-next="always">
        <style:tab-stops>
          <style:tab-stop style:position="-1in"/>
          <style:tab-stop style:position="-0.5in"/>
          <style:tab-stop style:position="0.000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62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weight="bold" style:font-weight-asian="bold"/>
    </style:style>
    <style:style style:name="wfxRecipient" style:family="paragraph" style:parent-style-name="Standard"/>
    <style:style style:name="wfxFaxNum" style:family="paragraph" style:parent-style-name="Standard"/>
    <style:style style:name="wfxDate" style:family="paragraph" style:parent-style-name="Standard"/>
    <style:style style:name="wfxTime" style:family="paragraph" style:parent-style-name="Standard"/>
    <style:style style:name="wfxCompany" style:family="paragraph" style:parent-style-name="Standard"/>
    <style:style style:name="wfxSubject" style:family="paragraph" style:parent-style-name="Standard"/>
    <style:style style:name="wfxKeyword" style:family="paragraph" style:parent-style-name="Standard"/>
    <style:style style:name="wfxBillcode"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1" style:display-name="Contents 1" style:family="paragraph" style:parent-style-name="Standard" style:next-style-name="Standard" style:class="index">
      <style:paragraph-properties fo:margin-left="0.5in" fo:margin-right="0.5in" fo:margin-top="0.3335in" fo:margin-bottom="0.0835in" style:contextual-spacing="false"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class="index">
      <style:paragraph-properties fo:margin-left="1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class="index">
      <style:paragraph-properties fo:margin-left="1.5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class="index">
      <style:paragraph-properties fo:margin-left="2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Standard" style:next-style-name="Standard" style:class="index">
      <style:paragraph-properties fo:margin-left="2.5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6" style:display-name="Contents 6" style:family="paragraph" style:parent-style-name="Standard" style:next-style-name="Standard" style:class="index">
      <style:paragraph-properties fo:margin-left="0.5in" fo:margin-right="0in" fo:hyphenation-ladder-count="no-limit" fo:text-indent="-0.5in" style:auto-text-indent="false">
        <style:tab-stops>
          <style:tab-stop style:position="6.25in"/>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7" style:display-name="Contents 7" style:family="paragraph" style:parent-style-name="Standard" style:next-style-name="Standard" style:class="index">
      <style:paragraph-properties fo:margin-left="0.5in" fo:margin-right="0in" fo:hyphenation-ladder-count="no-limit" fo:text-indent="-0.5in" style:auto-text-indent="false"/>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8" style:display-name="Contents 8" style:family="paragraph" style:parent-style-name="Standard" style:next-style-name="Standard" style:class="index">
      <style:paragraph-properties fo:margin-left="0.5in" fo:margin-right="0in" fo:hyphenation-ladder-count="no-limit" fo:text-indent="-0.5in" style:auto-text-indent="false">
        <style:tab-stops>
          <style:tab-stop style:position="6.25in"/>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Contents_20_9" style:display-name="Contents 9" style:family="paragraph" style:parent-style-name="Standard" style:next-style-name="Standard" style:class="index">
      <style:paragraph-properties fo:margin-left="0.5in" fo:margin-right="0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Index_20_1" style:display-name="Index 1" style:family="paragraph" style:parent-style-name="Standard" style:next-style-name="Standard" style:class="index">
      <style:paragraph-properties fo:margin-left="1in" fo:margin-right="0.5in" fo:hyphenation-ladder-count="no-limit" fo:text-indent="-1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Index_20_2" style:display-name="Index 2" style:family="paragraph" style:parent-style-name="Standard" style:next-style-name="Standard" style:class="index">
      <style:paragraph-properties fo:margin-left="1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TOA_20_Heading" style:display-name="TOA Heading" style:family="paragraph" style:parent-style-name="Standard" style:next-style-name="Standard">
      <style:paragraph-properties fo:hyphenation-ladder-count="no-limit">
        <style:tab-stops>
          <style:tab-stop style:position="6.25in"/>
          <style:tab-stop style:position="6.5in" style:type="right"/>
        </style:tab-stops>
      </style:paragraph-properties>
      <style:text-properties style:font-name="Courier" fo:font-family="Courier" style:font-family-generic="modern" fo:font-size="10pt" style:font-size-asian="10pt" style:font-name-complex="Courier" style:font-family-complex="Courier" style:font-family-generic-complex="modern" fo:hyphenate="false" fo:hyphenation-remain-char-count="2" fo:hyphenation-push-char-count="2" loext:hyphenation-no-caps="false" loext:hyphenation-no-last-word="false" loext:hyphenation-word-char-count="5" loext:hyphenation-zone="no-limit"/>
    </style:style>
    <style:style style:name="Body_20_Text_20_2" style:display-name="Body Text 2" style:family="paragraph" style:parent-style-name="Standard">
      <style:text-properties style:font-name="Dutch801 Rm BT" fo:font-family="'Dutch801 Rm BT'" style:font-family-generic="roman" style:font-pitch="variable" fo:font-style="italic" style:font-style-asian="italic" style:font-name-complex="Dutch801 Rm BT" style:font-family-complex="'Dutch801 Rm BT'" style:font-family-generic-complex="roman" style:font-pitch-complex="variable"/>
    </style:style>
    <style:style style:name="Address" style:family="paragraph" style:parent-style-name="Standard">
      <style:paragraph-properties fo:margin-top="0in" fo:margin-bottom="0in" style:contextual-spacing="false" fo:hyphenation-ladder-count="no-limit">
        <style:tab-stops>
          <style:tab-stop style:position="0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Body_20_Text_20_Indent_20_3" style:display-name="Body Text Indent 3" style:family="paragraph" style:parent-style-name="Standard">
      <style:paragraph-properties fo:margin-left="0.5in" fo:margin-right="0in" fo:text-indent="0in" style:auto-text-indent="false"/>
    </style:style>
    <style:style style:name="Block_20_Text" style:display-name="Block Text" style:family="paragraph" style:parent-style-name="Standard">
      <style:paragraph-properties fo:margin-left="0.5in" fo:margin-right="0.55in" fo:keep-together="always" fo:text-indent="-0.5in" style:auto-text-indent="false" fo:keep-with-next="always">
        <style:tab-stops>
          <style:tab-stop style:position="-1in"/>
          <style:tab-stop style:position="-0.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62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Default_20_Paragraph_20_Font" style:display-name="Default Paragraph Font" style:family="tex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fo:color="#808000" loext:opacity="100%" style:font-name="Garamond" fo:font-size="32pt" fo:letter-spacing="-0.028in" fo:font-style="italic" style:font-size-asian="32pt" style:font-style-asian="italic" style:font-name-complex="Garamond"/>
    </style:style>
    <style:style style:name="MP3" style:family="paragraph" style:parent-style-name="Standard">
      <style:paragraph-properties fo:margin-left="4in" fo:margin-right="0in" fo:margin-top="0in" fo:margin-bottom="0.0417in" style:contextual-spacing="false"/>
      <style:text-properties fo:color="#ffffff" loext:opacity="100%" style:font-name="Garamond" fo:font-size="11pt" style:letter-kerning="true" style:font-size-asian="11pt" style:font-name-complex="Garamond"/>
    </style:style>
    <style:style style:name="MP4" style:family="paragraph" style:parent-style-name="Standard">
      <style:paragraph-properties fo:margin-left="4in" fo:margin-right="0in" fo:margin-top="0in" fo:margin-bottom="0.0417in" style:contextual-spacing="false">
        <style:tab-stops>
          <style:tab-stop style:position="5.8126in"/>
        </style:tab-stops>
      </style:paragraph-properties>
      <style:text-properties fo:color="#ffffff" loext:opacity="100%" style:font-name="Garamond" fo:font-size="11pt" fo:font-style="italic" style:letter-kerning="true" style:font-size-asian="11pt" style:font-style-asian="italic" style:font-name-complex="Garamond"/>
    </style:style>
    <style:style style:name="MP5" style:family="paragraph" style:parent-style-name="Header">
      <style:text-properties fo:color="#ffffff" loext:opacity="100%" style:font-name="Garamond" fo:font-size="32pt" fo:letter-spacing="-0.028in" fo:font-style="italic" style:font-size-asian="32pt" style:font-style-asian="italic" style:font-name-complex="Garamond"/>
    </style:style>
    <style:style style:name="MT1" style:family="text">
      <style:text-properties fo:color="#ffffff" loext:opacity="100%" style:font-name="Garamond" fo:font-size="32pt" fo:letter-spacing="-0.0138in" style:font-size-asian="32pt" style:font-name-complex="Garamond"/>
    </style:style>
    <style:style style:name="MT2" style:family="text">
      <style:text-properties fo:color="#ffffff" loext:opacity="100%" style:font-name="Garamond" fo:font-size="32pt" fo:letter-spacing="-0.028in" fo:font-style="italic" style:font-size-asian="32pt" style:font-style-asian="italic" style:font-name-complex="Garamond"/>
    </style:style>
    <style:style style:name="MT3" style:family="text">
      <style:text-properties fo:color="#ffffff" loext:opacity="100%" style:font-name="Garamond" fo:font-size="20pt" style:font-size-asian="20pt" style:font-name-complex="Garamond"/>
    </style:style>
    <style:page-layout style:name="Mpm1">
      <style:page-layout-properties fo:page-width="8.5in" fo:page-height="11in" style:num-format="1" style:print-orientation="portrait" fo:margin-top="0.5in" fo:margin-bottom="1in" fo:margin-left="2.1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text:span text:style-name="MT1">Aberdeen</text:span><text:span text:style-name="MT2">Group</text:span></text:p>
        <text:p text:style-name="MP2"/>
        <text:p text:style-name="Header">Page <text:span text:style-name="Page_20_Number"><text:page-number text:select-page="current">2</text:page-number></text:span><text:span text:style-name="Page_20_Number"><text:s/>of </text:span><text:span text:style-name="Page_20_Number"><text:page-count style:num-format="1">2</text:page-count></text:span></text:p>
        <text:p text:style-name="Header"><text:span text:style-name="Page_20_Number">Sanjay Kumar – Computer Associates</text:span></text:p>
        <text:p text:style-name="Header"><text:span text:style-name="Page_20_Number"/></text:p>
      </style:header>
      <style:header-first>
        <text:p text:style-name="MP3">Aberdeen Group, Inc.</text:p>
        <text:p text:style-name="MP4">One Boston Place</text:p>
        <text:p text:style-name="MP4">Boston, Massachusetts 02108</text:p>
        <text:p text:style-name="MP4">Telephone 617 723 7890</text:p>
        <text:p text:style-name="MP4">Fax 617 723 7897<text:span text:style-name="MT3"/></text:p>
        <text:p text:style-name="Header"><text:span text:style-name="MT1">Aberdeen</text:span><text:span text:style-name="MT2">Group</text:span></text:p>
        <text:p text:style-name="MP5"/>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berdeen Group, Inc</dc:title>
    <meta:initial-creator>Peter Kastner</meta:initial-creator>
    <meta:creation-date>2001-07-19T10:30:00</meta:creation-date>
    <dc:creator>Peter Kastner</dc:creator>
    <dc:date>2001-07-19T15:43:00</dc:date>
    <meta:print-date>2001-07-19T15:38:00</meta:print-date>
    <meta:editing-cycles>7</meta:editing-cycles>
    <meta:editing-duration>PT5H13M</meta:editing-duration>
    <meta:document-statistic meta:table-count="0" meta:image-count="0" meta:object-count="0" meta:page-count="2" meta:paragraph-count="21" meta:word-count="383" meta:character-count="2283" meta:non-whitespace-character-count="1898"/>
    <meta:generator>LibreOffice/24.2.7.2$Linux_X86_64 LibreOffice_project/420$Build-2</meta:generator>
  </office:meta>
</office:document-meta>
</file>